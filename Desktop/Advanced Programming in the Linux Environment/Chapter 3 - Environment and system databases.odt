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9F4CA1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style:font-family-generic="modern" style:font-pitch="fixed"/>
    <style:font-face style:name="Courier" svg:font-family="Courier" style:font-family-generic="modern" style:font-pitch="fixed"/>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34" style:family="table">
      <style:table-properties style:width="6.6931in" table:align="margins"/>
    </style:style>
    <style:style style:name="Table134.A" style:family="table-column">
      <style:table-column-properties style:column-width="6.6931in" style:rel-column-width="65535*"/>
    </style:style>
    <style:style style:name="Table134.A1" style:family="table-cell">
      <style:table-cell-properties fo:padding="0.0382in" fo:border="0.5pt solid #000000"/>
    </style:style>
    <style:style style:name="Table135" style:family="table">
      <style:table-properties style:width="6.6931in" table:align="margins"/>
    </style:style>
    <style:style style:name="Table135.A" style:family="table-column">
      <style:table-column-properties style:column-width="6.6931in" style:rel-column-width="65535*"/>
    </style:style>
    <style:style style:name="Table135.A1" style:family="table-cell">
      <style:table-cell-properties fo:padding="0.0382in" fo:border="0.5pt solid #000000"/>
    </style:style>
    <style:style style:name="Table136" style:family="table">
      <style:table-properties style:width="6.6931in" table:align="margins"/>
    </style:style>
    <style:style style:name="Table136.A" style:family="table-column">
      <style:table-column-properties style:column-width="6.6931in" style:rel-column-width="65535*"/>
    </style:style>
    <style:style style:name="Table136.A1" style:family="table-cell">
      <style:table-cell-properties fo:padding="0.0382in" fo:border="0.5pt solid #000000"/>
    </style:style>
    <style:style style:name="Table137" style:family="table">
      <style:table-properties style:width="6.6931in" table:align="margins"/>
    </style:style>
    <style:style style:name="Table137.A" style:family="table-column">
      <style:table-column-properties style:column-width="6.6931in" style:rel-column-width="65535*"/>
    </style:style>
    <style:style style:name="Table137.A1" style:family="table-cell">
      <style:table-cell-properties fo:padding="0.0382in" fo:border="0.5pt solid #000000"/>
    </style:style>
    <style:style style:name="Table138" style:family="table">
      <style:table-properties style:width="6.6931in" table:align="margins"/>
    </style:style>
    <style:style style:name="Table138.A" style:family="table-column">
      <style:table-column-properties style:column-width="6.6931in" style:rel-column-width="65535*"/>
    </style:style>
    <style:style style:name="Table138.A1" style:family="table-cell">
      <style:table-cell-properties fo:padding="0.0382in" fo:border="0.5pt solid #000000"/>
    </style:style>
    <style:style style:name="Table139" style:family="table">
      <style:table-properties style:width="6.6931in" table:align="margins"/>
    </style:style>
    <style:style style:name="Table139.A" style:family="table-column">
      <style:table-column-properties style:column-width="6.6931in" style:rel-column-width="65535*"/>
    </style:style>
    <style:style style:name="Table139.A1" style:family="table-cell">
      <style:table-cell-properties fo:padding="0.0382in" fo:border="0.5pt solid #000000"/>
    </style:style>
    <style:style style:name="Table140" style:family="table">
      <style:table-properties style:width="6.6931in" table:align="margins"/>
    </style:style>
    <style:style style:name="Table140.A" style:family="table-column">
      <style:table-column-properties style:column-width="6.6931in" style:rel-column-width="65535*"/>
    </style:style>
    <style:style style:name="Table140.A1" style:family="table-cell">
      <style:table-cell-properties fo:padding="0.0382in" fo:border="0.5pt solid #000000"/>
    </style:style>
    <style:style style:name="Table141" style:family="table">
      <style:table-properties style:width="6.6931in" table:align="margins"/>
    </style:style>
    <style:style style:name="Table141.A" style:family="table-column">
      <style:table-column-properties style:column-width="6.6931in" style:rel-column-width="65535*"/>
    </style:style>
    <style:style style:name="Table141.A1" style:family="table-cell">
      <style:table-cell-properties fo:padding="0.0382in" fo:border="0.5pt solid #000000"/>
    </style:style>
    <style:style style:name="Table142" style:family="table">
      <style:table-properties style:width="6.6931in" table:align="margins"/>
    </style:style>
    <style:style style:name="Table142.A" style:family="table-column">
      <style:table-column-properties style:column-width="6.6931in" style:rel-column-width="65535*"/>
    </style:style>
    <style:style style:name="Table142.A1" style:family="table-cell">
      <style:table-cell-properties fo:padding="0.0382in" fo:border="0.5pt solid #000000"/>
    </style:style>
    <style:style style:name="Table143" style:family="table">
      <style:table-properties style:width="6.6931in" table:align="margins"/>
    </style:style>
    <style:style style:name="Table143.A" style:family="table-column">
      <style:table-column-properties style:column-width="2.6042in" style:rel-column-width="25498*"/>
    </style:style>
    <style:style style:name="Table143.B" style:family="table-column">
      <style:table-column-properties style:column-width="4.0889in" style:rel-column-width="40037*"/>
    </style:style>
    <style:style style:name="Table143.A1" style:family="table-cell">
      <style:table-cell-properties fo:padding="0.0382in" fo:border-left="0.5pt solid #000000" fo:border-right="none" fo:border-top="0.5pt solid #000000" fo:border-bottom="0.5pt solid #000000"/>
    </style:style>
    <style:style style:name="Table143.B1" style:family="table-cell">
      <style:table-cell-properties fo:padding="0.0382in" fo:border="0.5pt solid #000000"/>
    </style:style>
    <style:style style:name="Table143.A2" style:family="table-cell">
      <style:table-cell-properties fo:padding="0.0382in" fo:border-left="0.5pt solid #000000" fo:border-right="none" fo:border-top="none" fo:border-bottom="0.5pt solid #000000"/>
    </style:style>
    <style:style style:name="Table143.B2" style:family="table-cell">
      <style:table-cell-properties fo:padding="0.0382in" fo:border-left="0.5pt solid #000000" fo:border-right="0.5pt solid #000000" fo:border-top="none" fo:border-bottom="0.5pt solid #000000"/>
    </style:style>
    <style:style style:name="Table144" style:family="table">
      <style:table-properties style:width="6.6931in" table:align="margins"/>
    </style:style>
    <style:style style:name="Table144.A" style:family="table-column">
      <style:table-column-properties style:column-width="6.6931in" style:rel-column-width="65535*"/>
    </style:style>
    <style:style style:name="Table144.A1" style:family="table-cell">
      <style:table-cell-properties fo:padding="0.0382in" fo:border="0.5pt solid #000000"/>
    </style:style>
    <style:style style:name="Table145" style:family="table">
      <style:table-properties style:width="6.6931in" table:align="margins"/>
    </style:style>
    <style:style style:name="Table145.A" style:family="table-column">
      <style:table-column-properties style:column-width="6.6931in" style:rel-column-width="65535*"/>
    </style:style>
    <style:style style:name="Table145.A1" style:family="table-cell">
      <style:table-cell-properties fo:padding="0.0382in" fo:border="0.5pt solid #000000"/>
    </style:style>
    <style:style style:name="Table146" style:family="table">
      <style:table-properties style:width="6.6931in" table:align="margins"/>
    </style:style>
    <style:style style:name="Table146.A" style:family="table-column">
      <style:table-column-properties style:column-width="6.6931in" style:rel-column-width="65535*"/>
    </style:style>
    <style:style style:name="Table146.A1" style:family="table-cell">
      <style:table-cell-properties fo:padding="0.0382in" fo:border="0.5pt solid #000000"/>
    </style:style>
    <style:style style:name="Table147" style:family="table">
      <style:table-properties style:width="6.6931in" table:align="margins"/>
    </style:style>
    <style:style style:name="Table147.A" style:family="table-column">
      <style:table-column-properties style:column-width="6.6931in" style:rel-column-width="65535*"/>
    </style:style>
    <style:style style:name="Table147.A1" style:family="table-cell">
      <style:table-cell-properties fo:padding="0.0382in" fo:border="0.5pt solid #000000"/>
    </style:style>
    <style:style style:name="Table148" style:family="table">
      <style:table-properties style:width="6.6931in" table:align="margins"/>
    </style:style>
    <style:style style:name="Table148.A" style:family="table-column">
      <style:table-column-properties style:column-width="6.6931in" style:rel-column-width="65535*"/>
    </style:style>
    <style:style style:name="Table148.A1" style:family="table-cell">
      <style:table-cell-properties fo:padding="0.0382in" fo:border="0.5pt solid #000000"/>
    </style:style>
    <style:style style:name="Table149" style:family="table">
      <style:table-properties style:width="6.6931in" table:align="margins"/>
    </style:style>
    <style:style style:name="Table149.A" style:family="table-column">
      <style:table-column-properties style:column-width="6.6931in" style:rel-column-width="65535*"/>
    </style:style>
    <style:style style:name="Table149.A1" style:family="table-cell">
      <style:table-cell-properties fo:padding="0.0382in" fo:border="0.5pt solid #000000"/>
    </style:style>
    <style:style style:name="Table150" style:family="table">
      <style:table-properties style:width="6.6931in" table:align="margins"/>
    </style:style>
    <style:style style:name="Table150.A" style:family="table-column">
      <style:table-column-properties style:column-width="6.6931in" style:rel-column-width="65535*"/>
    </style:style>
    <style:style style:name="Table150.A1" style:family="table-cell">
      <style:table-cell-properties fo:padding="0.0382in" fo:border="0.5pt solid #000000"/>
    </style:style>
    <style:style style:name="Table151" style:family="table">
      <style:table-properties style:width="6.6931in" table:align="margins"/>
    </style:style>
    <style:style style:name="Table151.A" style:family="table-column">
      <style:table-column-properties style:column-width="6.6931in" style:rel-column-width="65535*"/>
    </style:style>
    <style:style style:name="Table151.A1" style:family="table-cell">
      <style:table-cell-properties fo:padding="0.0382in" fo:border="0.5pt solid #000000"/>
    </style:style>
    <style:style style:name="Table152" style:family="table">
      <style:table-properties style:width="6.6931in" table:align="margins"/>
    </style:style>
    <style:style style:name="Table152.A" style:family="table-column">
      <style:table-column-properties style:column-width="6.6931in" style:rel-column-width="65535*"/>
    </style:style>
    <style:style style:name="Table152.A1" style:family="table-cell">
      <style:table-cell-properties fo:padding="0.0382in" fo:border="0.5pt solid #000000"/>
    </style:style>
    <style:style style:name="Table153" style:family="table">
      <style:table-properties style:width="6.6931in" table:align="margins"/>
    </style:style>
    <style:style style:name="Table153.A" style:family="table-column">
      <style:table-column-properties style:column-width="6.6931in" style:rel-column-width="65535*"/>
    </style:style>
    <style:style style:name="Table153.1" style:family="table-row">
      <style:table-row-properties style:min-row-height="0.2292in"/>
    </style:style>
    <style:style style:name="Table153.A1" style:family="table-cell">
      <style:table-cell-properties fo:padding="0.0382in" fo:border="0.5pt solid #000000"/>
    </style:style>
    <style:style style:name="Table154" style:family="table">
      <style:table-properties style:width="6.6931in" table:align="margins"/>
    </style:style>
    <style:style style:name="Table154.A" style:family="table-column">
      <style:table-column-properties style:column-width="6.6931in" style:rel-column-width="65535*"/>
    </style:style>
    <style:style style:name="Table154.A1" style:family="table-cell">
      <style:table-cell-properties fo:padding="0.0382in" fo:border="0.5pt solid #000000"/>
    </style:style>
    <style:style style:name="Table1" style:family="table">
      <style:table-properties style:width="6.6931in" table:align="margins"/>
    </style:style>
    <style:style style:name="Table1.A" style:family="table-column">
      <style:table-column-properties style:column-width="1.5417in" style:rel-column-width="15095*"/>
    </style:style>
    <style:style style:name="Table1.B" style:family="table-column">
      <style:table-column-properties style:column-width="5.1514in" style:rel-column-width="5044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4.4743in" fo:margin-left="1.5354in" table:align="left"/>
    </style:style>
    <style:style style:name="Table6.A" style:family="table-column">
      <style:table-column-properties style:column-width="0.2868in"/>
    </style:style>
    <style:style style:name="Table6.B" style:family="table-column">
      <style:table-column-properties style:column-width="4.187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0688in" table:align="right"/>
    </style:style>
    <style:style style:name="Table10.A" style:family="table-column">
      <style:table-column-properties style:column-width="1.0625in"/>
    </style:style>
    <style:style style:name="Table10.B" style:family="table-column">
      <style:table-column-properties style:column-width="5.0063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228" style:family="table">
      <style:table-properties style:width="6.6931in" table:align="margins"/>
    </style:style>
    <style:style style:name="Table228.A" style:family="table-column">
      <style:table-column-properties style:column-width="6.6931in" style:rel-column-width="65535*"/>
    </style:style>
    <style:style style:name="Table228.A1" style:family="table-cell">
      <style:table-cell-properties fo:padding="0.0382in" fo:border="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5pt solid #000000"/>
    </style:style>
    <style:style style:name="Table25" style:family="table">
      <style:table-properties style:width="6.6931in" table:align="margins"/>
    </style:style>
    <style:style style:name="Table25.A" style:family="table-column">
      <style:table-column-properties style:column-width="1.2243in" style:rel-column-width="11987*"/>
    </style:style>
    <style:style style:name="Table25.B" style:family="table-column">
      <style:table-column-properties style:column-width="3.0625in" style:rel-column-width="29986*"/>
    </style:style>
    <style:style style:name="Table25.C" style:family="table-column">
      <style:table-column-properties style:column-width="2.4063in" style:rel-column-width="23562*"/>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5.9" style:family="table-row">
      <style:table-row-properties style:min-row-height="0.3035in"/>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5pt solid #000000"/>
    </style:style>
    <style:style style:name="Table28" style:family="table">
      <style:table-properties style:width="6.6931in" table:align="margins"/>
    </style:style>
    <style:style style:name="Table28.A" style:family="table-column">
      <style:table-column-properties style:column-width="1.7868in" style:rel-column-width="17495*"/>
    </style:style>
    <style:style style:name="Table28.B" style:family="table-column">
      <style:table-column-properties style:column-width="4.9063in" style:rel-column-width="48040*"/>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6.6931in" table:align="margins"/>
    </style:style>
    <style:style style:name="Table29.A" style:family="table-column">
      <style:table-column-properties style:column-width="1.2868in" style:rel-column-width="12599*"/>
    </style:style>
    <style:style style:name="Table29.B" style:family="table-column">
      <style:table-column-properties style:column-width="5.4063in" style:rel-column-width="52936*"/>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5pt solid #000000"/>
    </style:style>
    <style:style style:name="Table229" style:family="table">
      <style:table-properties style:width="6.6931in" table:align="margins"/>
    </style:style>
    <style:style style:name="Table229.A" style:family="table-column">
      <style:table-column-properties style:column-width="6.6931in" style:rel-column-width="65535*"/>
    </style:style>
    <style:style style:name="Table229.A1" style:family="table-cell">
      <style:table-cell-properties fo:padding="0.0382in" fo:border="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5pt solid #000000"/>
    </style:style>
    <style:style style:name="Table35" style:family="table">
      <style:table-properties style:width="6.6931in" table:align="margins"/>
    </style:style>
    <style:style style:name="Table35.A" style:family="table-column">
      <style:table-column-properties style:column-width="1.3493in" style:rel-column-width="13211*"/>
    </style:style>
    <style:style style:name="Table35.B" style:family="table-column">
      <style:table-column-properties style:column-width="5.3438in" style:rel-column-width="52324*"/>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39" style:family="table">
      <style:table-properties style:width="6.6931in" table:align="margins"/>
    </style:style>
    <style:style style:name="Table39.A" style:family="table-column">
      <style:table-column-properties style:column-width="2.7243in" style:rel-column-width="26675*"/>
    </style:style>
    <style:style style:name="Table39.B" style:family="table-column">
      <style:table-column-properties style:column-width="3.9688in" style:rel-column-width="38860*"/>
    </style:style>
    <style:style style:name="Table39.A1" style:family="table-cell">
      <style:table-cell-properties fo:padding="0.0382in" fo:border-left="0.5pt solid #000000" fo:border-right="none" fo:border-top="0.5pt solid #000000" fo:border-bottom="0.5pt solid #000000"/>
    </style:style>
    <style:style style:name="Table39.B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0.5pt solid #000000" fo:border-top="none" fo:border-bottom="0.5pt solid #000000"/>
    </style:style>
    <style:style style:name="Table40" style:family="table">
      <style:table-properties style:width="6.6931in" table:align="margins"/>
    </style:style>
    <style:style style:name="Table40.A" style:family="table-column">
      <style:table-column-properties style:column-width="1.9743in" style:rel-column-width="19331*"/>
    </style:style>
    <style:style style:name="Table40.B" style:family="table-column">
      <style:table-column-properties style:column-width="4.7188in" style:rel-column-width="46204*"/>
    </style:style>
    <style:style style:name="Table40.A1" style:family="table-cell">
      <style:table-cell-properties fo:padding="0.0382in" fo:border-left="0.5pt solid #000000" fo:border-right="none" fo:border-top="0.5pt solid #000000" fo:border-bottom="0.5pt solid #000000"/>
    </style:style>
    <style:style style:name="Table40.B1" style:family="table-cell">
      <style:table-cell-properties fo:padding="0.0382in" fo:border="0.5pt solid #000000"/>
    </style:style>
    <style:style style:name="Table40.A2" style:family="table-cell">
      <style:table-cell-properties fo:padding="0.0382in" fo:border-left="0.5pt solid #000000" fo:border-right="none" fo:border-top="none" fo:border-bottom="0.5pt solid #000000"/>
    </style:style>
    <style:style style:name="Table40.B2" style:family="table-cell">
      <style:table-cell-properties fo:padding="0.0382in" fo:border-left="0.5pt solid #000000" fo:border-right="0.5pt solid #000000" fo:border-top="none" fo:border-bottom="0.5pt solid #000000"/>
    </style:style>
    <style:style style:name="Table4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1.3493in" style:rel-column-width="13211*"/>
    </style:style>
    <style:style style:name="Table41.B" style:family="table-column">
      <style:table-column-properties style:column-width="2.8125in" style:rel-column-width="27538*"/>
    </style:style>
    <style:style style:name="Table41.C" style:family="table-column">
      <style:table-column-properties style:column-width="2.5313in" style:rel-column-width="24786*"/>
    </style:style>
    <style:style style:name="Table41.A1" style:family="table-cell">
      <style:table-cell-properties fo:padding="0.0382in" fo:border-left="0.5pt solid #000000" fo:border-right="none" fo:border-top="0.5pt solid #000000" fo:border-bottom="0.5pt solid #000000"/>
    </style:style>
    <style:style style:name="Table41.C1" style:family="table-cell">
      <style:table-cell-properties fo:padding="0.0382in" fo:border="0.5pt solid #000000"/>
    </style:style>
    <style:style style:name="Table41.2" style:family="table-row">
      <style:table-row-properties fo:background-color="transparent" fo:keep-together="auto">
        <style:background-image/>
      </style:table-row-properties>
    </style:style>
    <style:style style:name="Table41.A2" style:family="table-cell">
      <style:table-cell-properties fo:padding="0.0382in" fo:border-left="0.5pt solid #000000" fo:border-right="none" fo:border-top="none" fo:border-bottom="0.5pt solid #000000"/>
    </style:style>
    <style:style style:name="Table41.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padding="0.0382in" fo:border-left="0.5pt solid #000000" fo:border-right="0.5pt solid #000000" fo:border-top="none" fo:border-bottom="0.5pt solid #000000"/>
    </style:style>
    <style:style style:name="Table41.C3" style:family="table-cell">
      <style:table-cell-properties fo:padding="0.0382in" fo:border-left="0.5pt solid #000000" fo:border-right="0.5pt solid #000000" fo:border-top="none" fo:border-bottom="0.5pt solid #000000"/>
    </style:style>
    <style:style style:name="Table41.C4" style:family="table-cell">
      <style:table-cell-properties fo:padding="0.0382in" fo:border-left="0.5pt solid #000000" fo:border-right="0.5pt solid #000000" fo:border-top="none" fo:border-bottom="0.5pt solid #000000"/>
    </style:style>
    <style:style style:name="Table41.C5" style:family="table-cell">
      <style:table-cell-properties fo:padding="0.0382in" fo:border-left="0.5pt solid #000000" fo:border-right="0.5pt solid #000000" fo:border-top="none" fo:border-bottom="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5pt solid #000000"/>
    </style:style>
    <style:style style:name="Table43" style:family="table">
      <style:table-properties style:width="6.6931in" table:align="margins"/>
    </style:style>
    <style:style style:name="Table43.A" style:family="table-column">
      <style:table-column-properties style:column-width="6.6931in" style:rel-column-width="65535*"/>
    </style:style>
    <style:style style:name="Table43.A1" style:family="table-cell">
      <style:table-cell-properties fo:padding="0.0382in" fo:border="0.5pt solid #000000"/>
    </style:style>
    <style:style style:name="Table44" style:family="table">
      <style:table-properties style:width="6.6931in" table:align="margins"/>
    </style:style>
    <style:style style:name="Table44.A" style:family="table-column">
      <style:table-column-properties style:column-width="6.6931in" style:rel-column-width="65535*"/>
    </style:style>
    <style:style style:name="Table44.A1" style:family="table-cell">
      <style:table-cell-properties fo:padding="0.0382in" fo:border="0.5pt solid #000000"/>
    </style:style>
    <style:style style:name="Table45" style:family="table">
      <style:table-properties style:width="6.6931in" table:align="margins"/>
    </style:style>
    <style:style style:name="Table45.A" style:family="table-column">
      <style:table-column-properties style:column-width="6.6931in" style:rel-column-width="65535*"/>
    </style:style>
    <style:style style:name="Table45.A1" style:family="table-cell">
      <style:table-cell-properties fo:padding="0.0382in" fo:border="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5pt solid #000000"/>
    </style:style>
    <style:style style:name="Table54" style:family="table">
      <style:table-properties style:width="6.6931in" table:align="margins"/>
    </style:style>
    <style:style style:name="Table54.A" style:family="table-column">
      <style:table-column-properties style:column-width="6.6931in" style:rel-column-width="65535*"/>
    </style:style>
    <style:style style:name="Table54.A1" style:family="table-cell">
      <style:table-cell-properties fo:padding="0.0382in" fo:border="0.5pt solid #000000"/>
    </style:style>
    <style:style style:name="Table53" style:family="table">
      <style:table-properties style:width="6.6931in" table:align="margins"/>
    </style:style>
    <style:style style:name="Table53.A" style:family="table-column">
      <style:table-column-properties style:column-width="6.6931in" style:rel-column-width="65535*"/>
    </style:style>
    <style:style style:name="Table53.A1" style:family="table-cell">
      <style:table-cell-properties fo:padding="0.0382in" fo:border="0.5pt solid #000000"/>
    </style:style>
    <style:style style:name="Table52" style:family="table">
      <style:table-properties style:width="6.6931in" table:align="margins"/>
    </style:style>
    <style:style style:name="Table52.A" style:family="table-column">
      <style:table-column-properties style:column-width="6.6931in" style:rel-column-width="65535*"/>
    </style:style>
    <style:style style:name="Table52.A1" style:family="table-cell">
      <style:table-cell-properties fo:padding="0.0382in" fo:border="0.5pt solid #000000"/>
    </style:style>
    <style:style style:name="Table55" style:family="table">
      <style:table-properties style:width="6.6931in" table:align="margins"/>
    </style:style>
    <style:style style:name="Table55.A" style:family="table-column">
      <style:table-column-properties style:column-width="6.6931in" style:rel-column-width="65535*"/>
    </style:style>
    <style:style style:name="Table55.A1" style:family="table-cell">
      <style:table-cell-properties fo:padding="0.0382in" fo:border="0.5pt solid #000000"/>
    </style:style>
    <style:style style:name="Table56" style:family="table">
      <style:table-properties style:width="6.6931in" table:align="margins"/>
    </style:style>
    <style:style style:name="Table56.A" style:family="table-column">
      <style:table-column-properties style:column-width="6.6931in" style:rel-column-width="65535*"/>
    </style:style>
    <style:style style:name="Table56.A1" style:family="table-cell">
      <style:table-cell-properties fo:padding="0.0382in" fo:border="0.5pt solid #000000"/>
    </style:style>
    <style:style style:name="Table57" style:family="table">
      <style:table-properties style:width="6.6931in" table:align="margins"/>
    </style:style>
    <style:style style:name="Table57.A" style:family="table-column">
      <style:table-column-properties style:column-width="6.6931in" style:rel-column-width="65535*"/>
    </style:style>
    <style:style style:name="Table57.A1" style:family="table-cell">
      <style:table-cell-properties fo:padding="0.0382in" fo:border="0.5pt solid #000000"/>
    </style:style>
    <style:style style:name="Table58" style:family="table">
      <style:table-properties style:width="6.6931in" table:align="margins"/>
    </style:style>
    <style:style style:name="Table58.A" style:family="table-column">
      <style:table-column-properties style:column-width="6.6931in" style:rel-column-width="65535*"/>
    </style:style>
    <style:style style:name="Table58.A1" style:family="table-cell">
      <style:table-cell-properties fo:padding="0.0382in" fo:border="0.5pt solid #000000"/>
    </style:style>
    <style:style style:name="Table59" style:family="table">
      <style:table-properties style:width="6.6931in" table:align="margins"/>
    </style:style>
    <style:style style:name="Table59.A" style:family="table-column">
      <style:table-column-properties style:column-width="6.6931in" style:rel-column-width="65535*"/>
    </style:style>
    <style:style style:name="Table59.A1" style:family="table-cell">
      <style:table-cell-properties fo:padding="0.0382in" fo:border="0.5pt solid #000000"/>
    </style:style>
    <style:style style:name="Table62" style:family="table">
      <style:table-properties style:width="6.6931in" table:align="margins"/>
    </style:style>
    <style:style style:name="Table62.A" style:family="table-column">
      <style:table-column-properties style:column-width="6.6931in" style:rel-column-width="65535*"/>
    </style:style>
    <style:style style:name="Table62.A1" style:family="table-cell">
      <style:table-cell-properties fo:padding="0.0382in" fo:border="0.5pt solid #000000"/>
    </style:style>
    <style:style style:name="Table63" style:family="table">
      <style:table-properties style:width="6.6931in" table:align="margins"/>
    </style:style>
    <style:style style:name="Table63.A" style:family="table-column">
      <style:table-column-properties style:column-width="6.6931in" style:rel-column-width="65535*"/>
    </style:style>
    <style:style style:name="Table63.A1" style:family="table-cell">
      <style:table-cell-properties fo:padding="0.0382in" fo:border="0.5pt solid #000000"/>
    </style:style>
    <style:style style:name="Table79" style:family="table">
      <style:table-properties style:width="6.6931in" table:align="margins"/>
    </style:style>
    <style:style style:name="Table79.A" style:family="table-column">
      <style:table-column-properties style:column-width="6.6931in" style:rel-column-width="65535*"/>
    </style:style>
    <style:style style:name="Table79.A1" style:family="table-cell">
      <style:table-cell-properties fo:padding="0.0382in" fo:border="0.5pt solid #000000"/>
    </style:style>
    <style:style style:name="Table64" style:family="table">
      <style:table-properties style:width="6.6931in" table:align="margins"/>
    </style:style>
    <style:style style:name="Table64.A" style:family="table-column">
      <style:table-column-properties style:column-width="6.6931in" style:rel-column-width="65535*"/>
    </style:style>
    <style:style style:name="Table64.A1" style:family="table-cell">
      <style:table-cell-properties fo:padding="0.0382in" fo:border="0.5pt solid #000000"/>
    </style:style>
    <style:style style:name="Table66" style:family="table">
      <style:table-properties style:width="6.6931in" table:align="margins"/>
    </style:style>
    <style:style style:name="Table66.A" style:family="table-column">
      <style:table-column-properties style:column-width="6.6931in" style:rel-column-width="65535*"/>
    </style:style>
    <style:style style:name="Table66.A1" style:family="table-cell">
      <style:table-cell-properties fo:padding="0.0382in" fo:border="0.5pt solid #000000"/>
    </style:style>
    <style:style style:name="Table67" style:family="table">
      <style:table-properties style:width="6.6931in" table:align="margins"/>
    </style:style>
    <style:style style:name="Table67.A" style:family="table-column">
      <style:table-column-properties style:column-width="6.6931in" style:rel-column-width="65535*"/>
    </style:style>
    <style:style style:name="Table67.A1" style:family="table-cell">
      <style:table-cell-properties fo:padding="0.0382in" fo:border="0.5pt solid #000000"/>
    </style:style>
    <style:style style:name="Table65" style:family="table">
      <style:table-properties style:width="6.6931in" table:align="margins"/>
    </style:style>
    <style:style style:name="Table65.A" style:family="table-column">
      <style:table-column-properties style:column-width="6.6931in" style:rel-column-width="65535*"/>
    </style:style>
    <style:style style:name="Table65.A1" style:family="table-cell">
      <style:table-cell-properties fo:padding="0.0382in" fo:border="0.5pt solid #000000"/>
    </style:style>
    <style:style style:name="Table68" style:family="table">
      <style:table-properties style:width="6.6931in" table:align="margins"/>
    </style:style>
    <style:style style:name="Table68.A" style:family="table-column">
      <style:table-column-properties style:column-width="6.6931in" style:rel-column-width="65535*"/>
    </style:style>
    <style:style style:name="Table68.A1" style:family="table-cell">
      <style:table-cell-properties fo:padding="0.0382in" fo:border="0.5pt solid #000000"/>
    </style:style>
    <style:style style:name="Table69" style:family="table">
      <style:table-properties style:width="6.6931in" table:align="margins"/>
    </style:style>
    <style:style style:name="Table69.A" style:family="table-column">
      <style:table-column-properties style:column-width="6.6931in" style:rel-column-width="65535*"/>
    </style:style>
    <style:style style:name="Table69.A1" style:family="table-cell">
      <style:table-cell-properties fo:padding="0.0382in" fo:border="0.5pt solid #000000"/>
    </style:style>
    <style:style style:name="Table70" style:family="table">
      <style:table-properties style:width="4.5368in" fo:margin-left="1.1556in" table:align="left"/>
    </style:style>
    <style:style style:name="Table70.A" style:family="table-column">
      <style:table-column-properties style:column-width="1.0993in"/>
    </style:style>
    <style:style style:name="Table70.B" style:family="table-column">
      <style:table-column-properties style:column-width="3.4375in"/>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71" style:family="table">
      <style:table-properties style:width="6.6931in" table:align="margins"/>
    </style:style>
    <style:style style:name="Table71.A" style:family="table-column">
      <style:table-column-properties style:column-width="6.6931in" style:rel-column-width="65535*"/>
    </style:style>
    <style:style style:name="Table71.A1" style:family="table-cell">
      <style:table-cell-properties fo:padding="0.0382in" fo:border="0.5pt solid #000000"/>
    </style:style>
    <style:style style:name="Table72" style:family="table">
      <style:table-properties style:width="6.6931in" table:align="margins"/>
    </style:style>
    <style:style style:name="Table72.A" style:family="table-column">
      <style:table-column-properties style:column-width="6.6931in" style:rel-column-width="65535*"/>
    </style:style>
    <style:style style:name="Table72.A1" style:family="table-cell">
      <style:table-cell-properties fo:padding="0.0382in" fo:border="0.5pt solid #000000"/>
    </style:style>
    <style:style style:name="Table77" style:family="table">
      <style:table-properties style:width="6.6931in" table:align="margins"/>
    </style:style>
    <style:style style:name="Table77.A" style:family="table-column">
      <style:table-column-properties style:column-width="6.6931in" style:rel-column-width="65535*"/>
    </style:style>
    <style:style style:name="Table77.A1" style:family="table-cell">
      <style:table-cell-properties fo:padding="0.0382in" fo:border="0.5pt solid #000000"/>
    </style:style>
    <style:style style:name="Table73" style:family="table">
      <style:table-properties style:width="5.9375in" fo:margin-left="0.4368in" table:align="left"/>
    </style:style>
    <style:style style:name="Table73.A" style:family="table-column">
      <style:table-column-properties style:column-width="1in"/>
    </style:style>
    <style:style style:name="Table73.B" style:family="table-column">
      <style:table-column-properties style:column-width="4.9375in"/>
    </style:style>
    <style:style style:name="Table73.A1" style:family="table-cell">
      <style:table-cell-properties style:vertical-align="middle" fo:padding="0.0194in" fo:border="none"/>
    </style:style>
    <style:style style:name="Table78" style:family="table">
      <style:table-properties style:width="6.6931in" table:align="margins"/>
    </style:style>
    <style:style style:name="Table78.A" style:family="table-column">
      <style:table-column-properties style:column-width="6.6931in" style:rel-column-width="65535*"/>
    </style:style>
    <style:style style:name="Table78.A1" style:family="table-cell">
      <style:table-cell-properties fo:padding="0.0382in" fo:border="0.5pt solid #000000"/>
    </style:style>
    <style:style style:name="Table89" style:family="table">
      <style:table-properties style:width="6.6931in" table:align="margins"/>
    </style:style>
    <style:style style:name="Table89.A" style:family="table-column">
      <style:table-column-properties style:column-width="6.6931in" style:rel-column-width="65535*"/>
    </style:style>
    <style:style style:name="Table89.A1" style:family="table-cell">
      <style:table-cell-properties fo:padding="0.0382in" fo:border="0.5pt solid #000000"/>
    </style:style>
    <style:style style:name="Table80" style:family="table">
      <style:table-properties style:width="6.6931in" table:align="margins"/>
    </style:style>
    <style:style style:name="Table80.A" style:family="table-column">
      <style:table-column-properties style:column-width="6.6931in" style:rel-column-width="65535*"/>
    </style:style>
    <style:style style:name="Table80.A1" style:family="table-cell">
      <style:table-cell-properties fo:padding="0.0382in" fo:border="0.5pt solid #000000"/>
    </style:style>
    <style:style style:name="Table81" style:family="table">
      <style:table-properties style:width="6.6931in" table:align="margins"/>
    </style:style>
    <style:style style:name="Table81.A" style:family="table-column">
      <style:table-column-properties style:column-width="6.6931in" style:rel-column-width="65535*"/>
    </style:style>
    <style:style style:name="Table81.A1" style:family="table-cell">
      <style:table-cell-properties fo:padding="0.0382in" fo:border="0.5pt solid #000000"/>
    </style:style>
    <style:style style:name="Table82" style:family="table">
      <style:table-properties style:width="6.6931in" table:align="margins"/>
    </style:style>
    <style:style style:name="Table82.A" style:family="table-column">
      <style:table-column-properties style:column-width="6.6931in" style:rel-column-width="65535*"/>
    </style:style>
    <style:style style:name="Table82.A1" style:family="table-cell">
      <style:table-cell-properties fo:padding="0.0382in" fo:border="0.5pt solid #000000"/>
    </style:style>
    <style:style style:name="Table83" style:family="table">
      <style:table-properties style:width="6.6931in" table:align="margins"/>
    </style:style>
    <style:style style:name="Table83.A" style:family="table-column">
      <style:table-column-properties style:column-width="6.6931in" style:rel-column-width="65535*"/>
    </style:style>
    <style:style style:name="Table83.A1" style:family="table-cell">
      <style:table-cell-properties fo:padding="0.0382in" fo:border="0.5pt solid #000000"/>
    </style:style>
    <style:style style:name="Table84" style:family="table">
      <style:table-properties style:width="6.6931in" table:align="margins"/>
    </style:style>
    <style:style style:name="Table84.A" style:family="table-column">
      <style:table-column-properties style:column-width="6.6931in" style:rel-column-width="65535*"/>
    </style:style>
    <style:style style:name="Table84.A1" style:family="table-cell">
      <style:table-cell-properties fo:padding="0.0382in" fo:border="0.5pt solid #000000"/>
    </style:style>
    <style:style style:name="Table85" style:family="table">
      <style:table-properties style:width="6.6931in" table:align="margins"/>
    </style:style>
    <style:style style:name="Table85.A" style:family="table-column">
      <style:table-column-properties style:column-width="6.6931in" style:rel-column-width="65535*"/>
    </style:style>
    <style:style style:name="Table85.A1" style:family="table-cell">
      <style:table-cell-properties fo:padding="0.0382in" fo:border="0.5pt solid #000000"/>
    </style:style>
    <style:style style:name="Table86" style:family="table">
      <style:table-properties style:width="6.6931in" table:align="margins"/>
    </style:style>
    <style:style style:name="Table86.A" style:family="table-column">
      <style:table-column-properties style:column-width="6.6931in" style:rel-column-width="65535*"/>
    </style:style>
    <style:style style:name="Table86.A1" style:family="table-cell">
      <style:table-cell-properties fo:padding="0.0382in" fo:border="0.5pt solid #000000"/>
    </style:style>
    <style:style style:name="Table87" style:family="table">
      <style:table-properties style:width="6.6931in" table:align="margins"/>
    </style:style>
    <style:style style:name="Table87.A" style:family="table-column">
      <style:table-column-properties style:column-width="6.6931in" style:rel-column-width="65535*"/>
    </style:style>
    <style:style style:name="Table87.A1" style:family="table-cell">
      <style:table-cell-properties fo:padding="0.0382in" fo:border="0.5pt solid #000000"/>
    </style:style>
    <style:style style:name="Table92" style:family="table">
      <style:table-properties style:width="4.8701in" fo:margin-left="0.8431in" table:align="left"/>
    </style:style>
    <style:style style:name="Table92.A" style:family="table-column">
      <style:table-column-properties style:column-width="2.8493in"/>
    </style:style>
    <style:style style:name="Table92.B" style:family="table-column">
      <style:table-column-properties style:column-width="1in"/>
    </style:style>
    <style:style style:name="Table92.C" style:family="table-column">
      <style:table-column-properties style:column-width="1.0208in"/>
    </style:style>
    <style:style style:name="Table92.A1" style:family="table-cell">
      <style:table-cell-properties fo:padding="0.0382in" fo:border-left="0.5pt solid #000000" fo:border-right="none" fo:border-top="0.5pt solid #000000" fo:border-bottom="0.5pt solid #000000"/>
    </style:style>
    <style:style style:name="Table92.C1" style:family="table-cell">
      <style:table-cell-properties fo:padding="0.0382in" fo:border="0.5pt solid #000000"/>
    </style:style>
    <style:style style:name="Table92.A2" style:family="table-cell">
      <style:table-cell-properties fo:padding="0.0382in" fo:border-left="0.5pt solid #000000" fo:border-right="none" fo:border-top="none" fo:border-bottom="0.5pt solid #000000"/>
    </style:style>
    <style:style style:name="Table92.C2" style:family="table-cell">
      <style:table-cell-properties fo:padding="0.0382in" fo:border-left="0.5pt solid #000000" fo:border-right="0.5pt solid #000000" fo:border-top="none" fo:border-bottom="0.5pt solid #000000"/>
    </style:style>
    <style:style style:name="Table93" style:family="table">
      <style:table-properties style:width="6.6931in" table:align="margins"/>
    </style:style>
    <style:style style:name="Table93.A" style:family="table-column">
      <style:table-column-properties style:column-width="6.6931in" style:rel-column-width="65535*"/>
    </style:style>
    <style:style style:name="Table93.A1" style:family="table-cell">
      <style:table-cell-properties fo:padding="0.0382in" fo:border="0.5pt solid #000000"/>
    </style:style>
    <style:style style:name="Table96" style:family="table">
      <style:table-properties style:width="6.6931in" table:align="margins"/>
    </style:style>
    <style:style style:name="Table96.A" style:family="table-column">
      <style:table-column-properties style:column-width="6.6931in" style:rel-column-width="65535*"/>
    </style:style>
    <style:style style:name="Table96.A1" style:family="table-cell">
      <style:table-cell-properties fo:padding="0.0382in" fo:border="0.5pt solid #000000"/>
    </style:style>
    <style:style style:name="Table97" style:family="table">
      <style:table-properties style:width="6.6931in" table:align="margins"/>
    </style:style>
    <style:style style:name="Table97.A" style:family="table-column">
      <style:table-column-properties style:column-width="6.6931in" style:rel-column-width="65535*"/>
    </style:style>
    <style:style style:name="Table97.A1" style:family="table-cell">
      <style:table-cell-properties fo:padding="0.0382in" fo:border="0.5pt solid #000000"/>
    </style:style>
    <style:style style:name="Table98" style:family="table">
      <style:table-properties style:width="6.6931in" table:align="margins"/>
    </style:style>
    <style:style style:name="Table98.A" style:family="table-column">
      <style:table-column-properties style:column-width="6.6931in" style:rel-column-width="65535*"/>
    </style:style>
    <style:style style:name="Table98.A1" style:family="table-cell">
      <style:table-cell-properties fo:padding="0.0382in" fo:border="0.5pt solid #000000"/>
    </style:style>
    <style:style style:name="Table94" style:family="table">
      <style:table-properties style:width="6.6931in" table:align="margins"/>
    </style:style>
    <style:style style:name="Table94.A" style:family="table-column">
      <style:table-column-properties style:column-width="6.6931in" style:rel-column-width="65535*"/>
    </style:style>
    <style:style style:name="Table94.A1" style:family="table-cell">
      <style:table-cell-properties fo:padding="0.0382in" fo:border="0.5pt solid #000000"/>
    </style:style>
    <style:style style:name="Table99" style:family="table">
      <style:table-properties style:width="6.6931in" table:align="margins"/>
    </style:style>
    <style:style style:name="Table99.A" style:family="table-column">
      <style:table-column-properties style:column-width="6.6931in" style:rel-column-width="65535*"/>
    </style:style>
    <style:style style:name="Table99.A1" style:family="table-cell">
      <style:table-cell-properties fo:padding="0.0382in" fo:border="0.5pt solid #000000"/>
    </style:style>
    <style:style style:name="Table100" style:family="table">
      <style:table-properties style:width="6.6931in" table:align="margins"/>
    </style:style>
    <style:style style:name="Table100.A" style:family="table-column">
      <style:table-column-properties style:column-width="6.6931in" style:rel-column-width="65535*"/>
    </style:style>
    <style:style style:name="Table100.A1" style:family="table-cell">
      <style:table-cell-properties fo:padding="0.0382in" fo:border="0.5pt solid #000000"/>
    </style:style>
    <style:style style:name="Table101" style:family="table">
      <style:table-properties style:width="6.6931in" table:align="margins"/>
    </style:style>
    <style:style style:name="Table101.A" style:family="table-column">
      <style:table-column-properties style:column-width="6.6931in" style:rel-column-width="65535*"/>
    </style:style>
    <style:style style:name="Table101.A1" style:family="table-cell">
      <style:table-cell-properties fo:padding="0.0382in" fo:border="0.5pt solid #000000"/>
    </style:style>
    <style:style style:name="Table103" style:family="table">
      <style:table-properties style:width="6.6931in" table:align="margins"/>
    </style:style>
    <style:style style:name="Table103.A" style:family="table-column">
      <style:table-column-properties style:column-width="6.6931in" style:rel-column-width="65535*"/>
    </style:style>
    <style:style style:name="Table103.1" style:family="table-row">
      <style:table-row-properties style:min-row-height="0.8493in"/>
    </style:style>
    <style:style style:name="Table103.A1" style:family="table-cell">
      <style:table-cell-properties fo:padding="0.0382in" fo:border="0.5pt solid #000000"/>
    </style:style>
    <style:style style:name="Table104" style:family="table">
      <style:table-properties style:width="6.6931in" table:align="margins"/>
    </style:style>
    <style:style style:name="Table104.A" style:family="table-column">
      <style:table-column-properties style:column-width="6.6931in" style:rel-column-width="65535*"/>
    </style:style>
    <style:style style:name="Table104.A1" style:family="table-cell">
      <style:table-cell-properties fo:padding="0.0382in" fo:border="0.5pt solid #000000"/>
    </style:style>
    <style:style style:name="Table105" style:family="table">
      <style:table-properties style:width="6.6931in" table:align="margins"/>
    </style:style>
    <style:style style:name="Table105.A" style:family="table-column">
      <style:table-column-properties style:column-width="6.6931in" style:rel-column-width="65535*"/>
    </style:style>
    <style:style style:name="Table105.A1" style:family="table-cell">
      <style:table-cell-properties fo:padding="0.0382in" fo:border="0.5pt solid #000000"/>
    </style:style>
    <style:style style:name="Table106" style:family="table">
      <style:table-properties style:width="6.6931in" table:align="margins"/>
    </style:style>
    <style:style style:name="Table106.A" style:family="table-column">
      <style:table-column-properties style:column-width="6.6931in" style:rel-column-width="65535*"/>
    </style:style>
    <style:style style:name="Table106.A1" style:family="table-cell">
      <style:table-cell-properties fo:padding="0.0382in" fo:border="0.5pt solid #000000"/>
    </style:style>
    <style:style style:name="Table107" style:family="table">
      <style:table-properties style:width="6.6931in" table:align="margins"/>
    </style:style>
    <style:style style:name="Table107.A" style:family="table-column">
      <style:table-column-properties style:column-width="0.9743in" style:rel-column-width="9539*"/>
    </style:style>
    <style:style style:name="Table107.B" style:family="table-column">
      <style:table-column-properties style:column-width="2.3125in" style:rel-column-width="22642*"/>
    </style:style>
    <style:style style:name="Table107.C" style:family="table-column">
      <style:table-column-properties style:column-width="3.4063in" style:rel-column-width="33354*"/>
    </style:style>
    <style:style style:name="Table107.A1" style:family="table-cell">
      <style:table-cell-properties fo:padding="0.0382in" fo:border-left="0.5pt solid #000000" fo:border-right="none" fo:border-top="0.5pt solid #000000" fo:border-bottom="0.5pt solid #000000"/>
    </style:style>
    <style:style style:name="Table107.C1" style:family="table-cell">
      <style:table-cell-properties fo:padding="0.0382in" fo:border="0.5pt solid #000000"/>
    </style:style>
    <style:style style:name="Table107.A2" style:family="table-cell">
      <style:table-cell-properties fo:padding="0.0382in" fo:border-left="0.5pt solid #000000" fo:border-right="none" fo:border-top="none" fo:border-bottom="0.5pt solid #000000"/>
    </style:style>
    <style:style style:name="Table107.C2" style:family="table-cell">
      <style:table-cell-properties fo:padding="0.0382in" fo:border-left="0.5pt solid #000000" fo:border-right="0.5pt solid #000000" fo:border-top="none" fo:border-bottom="0.5pt solid #000000"/>
    </style:style>
    <style:style style:name="Table108" style:family="table">
      <style:table-properties style:width="3.5993in" fo:margin-left="1.3792in" table:align="left"/>
    </style:style>
    <style:style style:name="Table108.A" style:family="table-column">
      <style:table-column-properties style:column-width="1.5368in"/>
    </style:style>
    <style:style style:name="Table108.B" style:family="table-column">
      <style:table-column-properties style:column-width="2.0625in"/>
    </style:style>
    <style:style style:name="Table108.A1" style:family="table-cell">
      <style:table-cell-properties fo:padding="0.0382in" fo:border-left="0.5pt solid #000000" fo:border-right="none" fo:border-top="0.5pt solid #000000" fo:border-bottom="0.5pt solid #000000"/>
    </style:style>
    <style:style style:name="Table108.B1" style:family="table-cell">
      <style:table-cell-properties fo:padding="0.0382in" fo:border="0.5pt solid #000000"/>
    </style:style>
    <style:style style:name="Table108.A2" style:family="table-cell">
      <style:table-cell-properties fo:padding="0.0382in" fo:border-left="0.5pt solid #000000" fo:border-right="none" fo:border-top="none" fo:border-bottom="0.5pt solid #000000"/>
    </style:style>
    <style:style style:name="Table108.B2" style:family="table-cell">
      <style:table-cell-properties fo:padding="0.0382in" fo:border-left="0.5pt solid #000000" fo:border-right="0.5pt solid #000000" fo:border-top="none" fo:border-bottom="0.5pt solid #000000"/>
    </style:style>
    <style:style style:name="Table109" style:family="table">
      <style:table-properties style:width="6.6931in" table:align="margins"/>
    </style:style>
    <style:style style:name="Table109.A" style:family="table-column">
      <style:table-column-properties style:column-width="6.6931in" style:rel-column-width="65535*"/>
    </style:style>
    <style:style style:name="Table109.A1" style:family="table-cell">
      <style:table-cell-properties fo:padding="0.0382in" fo:border="0.5pt solid #000000"/>
    </style:style>
    <style:style style:name="Table110" style:family="table">
      <style:table-properties style:width="6.6931in" table:align="margins"/>
    </style:style>
    <style:style style:name="Table110.A" style:family="table-column">
      <style:table-column-properties style:column-width="6.6931in" style:rel-column-width="65535*"/>
    </style:style>
    <style:style style:name="Table110.A1" style:family="table-cell">
      <style:table-cell-properties fo:padding="0.0382in" fo:border="0.5pt solid #000000"/>
    </style:style>
    <style:style style:name="Table111" style:family="table">
      <style:table-properties style:width="6.6931in" table:align="margins"/>
    </style:style>
    <style:style style:name="Table111.A" style:family="table-column">
      <style:table-column-properties style:column-width="6.6931in" style:rel-column-width="65535*"/>
    </style:style>
    <style:style style:name="Table111.A1" style:family="table-cell">
      <style:table-cell-properties fo:padding="0.0382in" fo:border="0.5pt solid #000000"/>
    </style:style>
    <style:style style:name="Table112" style:family="table">
      <style:table-properties style:width="6.6931in" table:align="margins"/>
    </style:style>
    <style:style style:name="Table112.A" style:family="table-column">
      <style:table-column-properties style:column-width="6.6931in" style:rel-column-width="65535*"/>
    </style:style>
    <style:style style:name="Table112.A1" style:family="table-cell">
      <style:table-cell-properties fo:padding="0.0382in" fo:border="0.5pt solid #000000"/>
    </style:style>
    <style:style style:name="Table113" style:family="table">
      <style:table-properties style:width="6.6931in" table:align="margins"/>
    </style:style>
    <style:style style:name="Table113.A" style:family="table-column">
      <style:table-column-properties style:column-width="6.6931in" style:rel-column-width="65535*"/>
    </style:style>
    <style:style style:name="Table113.A1" style:family="table-cell">
      <style:table-cell-properties fo:padding="0.0382in" fo:border="0.5pt solid #000000"/>
    </style:style>
    <style:style style:name="Table114" style:family="table">
      <style:table-properties style:width="6.6931in" table:align="margins"/>
    </style:style>
    <style:style style:name="Table114.A" style:family="table-column">
      <style:table-column-properties style:column-width="6.6931in" style:rel-column-width="65535*"/>
    </style:style>
    <style:style style:name="Table114.A1" style:family="table-cell">
      <style:table-cell-properties fo:padding="0.0382in" fo:border="0.5pt solid #000000"/>
    </style:style>
    <style:style style:name="Table115" style:family="table">
      <style:table-properties style:width="6.6931in" table:align="margins"/>
    </style:style>
    <style:style style:name="Table115.A" style:family="table-column">
      <style:table-column-properties style:column-width="6.6931in" style:rel-column-width="65535*"/>
    </style:style>
    <style:style style:name="Table115.A1" style:family="table-cell">
      <style:table-cell-properties fo:padding="0.0382in" fo:border="0.5pt solid #000000"/>
    </style:style>
    <style:style style:name="Table116" style:family="table">
      <style:table-properties style:width="6.6931in" table:align="margins"/>
    </style:style>
    <style:style style:name="Table116.A" style:family="table-column">
      <style:table-column-properties style:column-width="6.6931in" style:rel-column-width="65535*"/>
    </style:style>
    <style:style style:name="Table116.A1" style:family="table-cell">
      <style:table-cell-properties fo:padding="0.0382in" fo:border="0.5pt solid #000000"/>
    </style:style>
    <style:style style:name="Table117" style:family="table">
      <style:table-properties style:width="5.0368in" fo:margin-left="0.9729in" table:align="left"/>
    </style:style>
    <style:style style:name="Table117.A" style:family="table-column">
      <style:table-column-properties style:column-width="1.5993in"/>
    </style:style>
    <style:style style:name="Table117.B" style:family="table-column">
      <style:table-column-properties style:column-width="3.4375in"/>
    </style:style>
    <style:style style:name="Table117.A1" style:family="table-cell">
      <style:table-cell-properties fo:padding="0.0382in" fo:border-left="0.5pt solid #000000" fo:border-right="none" fo:border-top="0.5pt solid #000000" fo:border-bottom="0.5pt solid #000000"/>
    </style:style>
    <style:style style:name="Table117.B1" style:family="table-cell">
      <style:table-cell-properties fo:padding="0.0382in" fo:border="0.5pt solid #000000"/>
    </style:style>
    <style:style style:name="Table117.A2" style:family="table-cell">
      <style:table-cell-properties fo:padding="0.0382in" fo:border-left="0.5pt solid #000000" fo:border-right="none" fo:border-top="none" fo:border-bottom="0.5pt solid #000000"/>
    </style:style>
    <style:style style:name="Table117.B2" style:family="table-cell">
      <style:table-cell-properties fo:padding="0.0382in" fo:border-left="0.5pt solid #000000" fo:border-right="0.5pt solid #000000" fo:border-top="none" fo:border-bottom="0.5pt solid #000000"/>
    </style:style>
    <style:style style:name="Table118" style:family="table">
      <style:table-properties style:width="6.6931in" table:align="margins"/>
    </style:style>
    <style:style style:name="Table118.A" style:family="table-column">
      <style:table-column-properties style:column-width="6.6931in" style:rel-column-width="65535*"/>
    </style:style>
    <style:style style:name="Table118.A1" style:family="table-cell">
      <style:table-cell-properties fo:padding="0.0382in" fo:border="0.5pt solid #000000"/>
    </style:style>
    <style:style style:name="Table119" style:family="table">
      <style:table-properties style:width="5.5in" fo:margin-left="0.5181in" table:align="left"/>
    </style:style>
    <style:style style:name="Table119.A" style:family="table-column">
      <style:table-column-properties style:column-width="1.7431in"/>
    </style:style>
    <style:style style:name="Table119.B" style:family="table-column">
      <style:table-column-properties style:column-width="3.7569in"/>
    </style:style>
    <style:style style:name="Table119.A1" style:family="table-cell">
      <style:table-cell-properties fo:padding="0.0382in" fo:border-left="0.5pt solid #000000" fo:border-right="none" fo:border-top="0.5pt solid #000000" fo:border-bottom="0.5pt solid #000000"/>
    </style:style>
    <style:style style:name="Table119.B1" style:family="table-cell">
      <style:table-cell-properties fo:padding="0.0382in" fo:border="0.5pt solid #000000"/>
    </style:style>
    <style:style style:name="Table119.A2" style:family="table-cell">
      <style:table-cell-properties fo:padding="0.0382in" fo:border-left="0.5pt solid #000000" fo:border-right="none" fo:border-top="none" fo:border-bottom="0.5pt solid #000000"/>
    </style:style>
    <style:style style:name="Table119.B2" style:family="table-cell">
      <style:table-cell-properties fo:padding="0.0382in" fo:border-left="0.5pt solid #000000" fo:border-right="0.5pt solid #000000" fo:border-top="none" fo:border-bottom="0.5pt solid #000000"/>
    </style:style>
    <style:style style:name="Table120" style:family="table">
      <style:table-properties style:width="6.6931in" table:align="margins"/>
    </style:style>
    <style:style style:name="Table120.A" style:family="table-column">
      <style:table-column-properties style:column-width="6.6931in" style:rel-column-width="65535*"/>
    </style:style>
    <style:style style:name="Table120.A1" style:family="table-cell">
      <style:table-cell-properties fo:padding="0.0382in" fo:border="0.5pt solid #000000"/>
    </style:style>
    <style:style style:name="Table121" style:family="table">
      <style:table-properties style:width="4.6882in" fo:margin-left="1.1243in" table:align="left"/>
    </style:style>
    <style:style style:name="Table121.A" style:family="table-column">
      <style:table-column-properties style:column-width="1.625in"/>
    </style:style>
    <style:style style:name="Table121.B" style:family="table-column">
      <style:table-column-properties style:column-width="0.875in"/>
    </style:style>
    <style:style style:name="Table121.C" style:family="table-column">
      <style:table-column-properties style:column-width="2.1882in"/>
    </style:style>
    <style:style style:name="Table121.A1" style:family="table-cell">
      <style:table-cell-properties style:vertical-align="middle" fo:padding="0.0194in" fo:border="none"/>
    </style:style>
    <style:style style:name="Table122" style:family="table">
      <style:table-properties style:width="6.6931in" table:align="margins"/>
    </style:style>
    <style:style style:name="Table122.A" style:family="table-column">
      <style:table-column-properties style:column-width="6.6931in" style:rel-column-width="65535*"/>
    </style:style>
    <style:style style:name="Table122.A1" style:family="table-cell">
      <style:table-cell-properties fo:padding="0.0382in" fo:border="0.5pt solid #000000"/>
    </style:style>
    <style:style style:name="Table123" style:family="table">
      <style:table-properties style:width="6.6931in" table:align="margins"/>
    </style:style>
    <style:style style:name="Table123.A" style:family="table-column">
      <style:table-column-properties style:column-width="6.6931in" style:rel-column-width="65535*"/>
    </style:style>
    <style:style style:name="Table123.A1" style:family="table-cell">
      <style:table-cell-properties fo:padding="0.0382in" fo:border="0.5pt solid #000000"/>
    </style:style>
    <style:style style:name="Table124" style:family="table">
      <style:table-properties style:width="6.6931in" table:align="margins"/>
    </style:style>
    <style:style style:name="Table124.A" style:family="table-column">
      <style:table-column-properties style:column-width="6.6931in" style:rel-column-width="65535*"/>
    </style:style>
    <style:style style:name="Table124.A1" style:family="table-cell">
      <style:table-cell-properties fo:padding="0.0382in" fo:border="0.5pt solid #000000"/>
    </style:style>
    <style:style style:name="Table125" style:family="table">
      <style:table-properties style:width="6.6931in" table:align="margins"/>
    </style:style>
    <style:style style:name="Table125.A" style:family="table-column">
      <style:table-column-properties style:column-width="6.6931in" style:rel-column-width="65535*"/>
    </style:style>
    <style:style style:name="Table125.A1" style:family="table-cell">
      <style:table-cell-properties fo:padding="0.0382in" fo:border="0.5pt solid #000000"/>
    </style:style>
    <style:style style:name="Table126" style:family="table">
      <style:table-properties style:width="6.6931in" table:align="margins"/>
    </style:style>
    <style:style style:name="Table126.A" style:family="table-column">
      <style:table-column-properties style:column-width="6.6931in" style:rel-column-width="65535*"/>
    </style:style>
    <style:style style:name="Table126.A1" style:family="table-cell">
      <style:table-cell-properties fo:padding="0.0382in" fo:border="0.5pt solid #000000"/>
    </style:style>
    <style:style style:name="Table131" style:family="table">
      <style:table-properties style:width="6.6931in" table:align="margins"/>
    </style:style>
    <style:style style:name="Table131.A" style:family="table-column">
      <style:table-column-properties style:column-width="6.6931in" style:rel-column-width="65535*"/>
    </style:style>
    <style:style style:name="Table131.A1" style:family="table-cell">
      <style:table-cell-properties fo:padding="0.0382in" fo:border="0.5pt solid #000000"/>
    </style:style>
    <style:style style:name="Table127" style:family="table">
      <style:table-properties style:width="6.6931in" table:align="margins"/>
    </style:style>
    <style:style style:name="Table127.A" style:family="table-column">
      <style:table-column-properties style:column-width="6.6931in" style:rel-column-width="65535*"/>
    </style:style>
    <style:style style:name="Table127.A1" style:family="table-cell">
      <style:table-cell-properties fo:padding="0.0382in" fo:border="0.5pt solid #000000"/>
    </style:style>
    <style:style style:name="Table128" style:family="table">
      <style:table-properties style:width="6.6931in" table:align="margins"/>
    </style:style>
    <style:style style:name="Table128.A" style:family="table-column">
      <style:table-column-properties style:column-width="6.6931in" style:rel-column-width="65535*"/>
    </style:style>
    <style:style style:name="Table128.A1" style:family="table-cell">
      <style:table-cell-properties fo:padding="0.0382in" fo:border="0.5pt solid #000000"/>
    </style:style>
    <style:style style:name="Table129" style:family="table">
      <style:table-properties style:width="6.6931in" table:align="margins"/>
    </style:style>
    <style:style style:name="Table129.A" style:family="table-column">
      <style:table-column-properties style:column-width="6.6931in" style:rel-column-width="65535*"/>
    </style:style>
    <style:style style:name="Table129.A1" style:family="table-cell">
      <style:table-cell-properties fo:padding="0.0382in" fo:border="0.5pt solid #000000"/>
    </style:style>
    <style:style style:name="Table130" style:family="table">
      <style:table-properties style:width="6.6931in" table:align="margins"/>
    </style:style>
    <style:style style:name="Table130.A" style:family="table-column">
      <style:table-column-properties style:column-width="6.6931in" style:rel-column-width="65535*"/>
    </style:style>
    <style:style style:name="Table130.A1" style:family="table-cell">
      <style:table-cell-properties fo:padding="0.0382in" fo:border="0.5pt solid #000000"/>
    </style:style>
    <style:style style:name="Table155" style:family="table">
      <style:table-properties style:width="6.6931in" table:align="margins"/>
    </style:style>
    <style:style style:name="Table155.A" style:family="table-column">
      <style:table-column-properties style:column-width="6.6931in" style:rel-column-width="65535*"/>
    </style:style>
    <style:style style:name="Table155.A1" style:family="table-cell">
      <style:table-cell-properties fo:padding="0.0382in" fo:border="0.5pt solid #000000"/>
    </style:style>
    <style:style style:name="Table156" style:family="table">
      <style:table-properties style:width="6.6931in" table:align="margins"/>
    </style:style>
    <style:style style:name="Table156.A" style:family="table-column">
      <style:table-column-properties style:column-width="6.6931in" style:rel-column-width="65535*"/>
    </style:style>
    <style:style style:name="Table156.A1" style:family="table-cell">
      <style:table-cell-properties fo:padding="0.0382in" fo:border="0.5pt solid #000000"/>
    </style:style>
    <style:style style:name="Table157" style:family="table">
      <style:table-properties style:width="6.6931in" table:align="margins"/>
    </style:style>
    <style:style style:name="Table157.A" style:family="table-column">
      <style:table-column-properties style:column-width="6.6931in" style:rel-column-width="65535*"/>
    </style:style>
    <style:style style:name="Table157.A1" style:family="table-cell">
      <style:table-cell-properties fo:padding="0.0382in" fo:border="0.5pt solid #000000"/>
    </style:style>
    <style:style style:name="Table158" style:family="table">
      <style:table-properties style:width="6.6931in" table:align="margins"/>
    </style:style>
    <style:style style:name="Table158.A" style:family="table-column">
      <style:table-column-properties style:column-width="6.6931in" style:rel-column-width="65535*"/>
    </style:style>
    <style:style style:name="Table158.A1" style:family="table-cell">
      <style:table-cell-properties fo:padding="0.0382in" fo:border="0.5pt solid #000000"/>
    </style:style>
    <style:style style:name="Table159" style:family="table">
      <style:table-properties style:width="6.6931in" table:align="margins"/>
    </style:style>
    <style:style style:name="Table159.A" style:family="table-column">
      <style:table-column-properties style:column-width="6.6931in" style:rel-column-width="65535*"/>
    </style:style>
    <style:style style:name="Table159.A1" style:family="table-cell">
      <style:table-cell-properties fo:padding="0.0382in" fo:border="0.5pt solid #000000"/>
    </style:style>
    <style:style style:name="Table160" style:family="table">
      <style:table-properties style:width="6.6931in" table:align="margins"/>
    </style:style>
    <style:style style:name="Table160.A" style:family="table-column">
      <style:table-column-properties style:column-width="6.6931in" style:rel-column-width="65535*"/>
    </style:style>
    <style:style style:name="Table160.A1" style:family="table-cell">
      <style:table-cell-properties fo:padding="0.0382in" fo:border="0.5pt solid #000000"/>
    </style:style>
    <style:style style:name="Table161" style:family="table">
      <style:table-properties style:width="6.6931in" table:align="margins"/>
    </style:style>
    <style:style style:name="Table161.A" style:family="table-column">
      <style:table-column-properties style:column-width="6.6931in" style:rel-column-width="65535*"/>
    </style:style>
    <style:style style:name="Table161.A1" style:family="table-cell">
      <style:table-cell-properties fo:padding="0.0382in" fo:border="0.5pt solid #000000"/>
    </style:style>
    <style:style style:name="Table162" style:family="table">
      <style:table-properties style:width="6.6931in" table:align="margins"/>
    </style:style>
    <style:style style:name="Table162.A" style:family="table-column">
      <style:table-column-properties style:column-width="6.6931in" style:rel-column-width="65535*"/>
    </style:style>
    <style:style style:name="Table162.A1" style:family="table-cell">
      <style:table-cell-properties fo:padding="0.0382in" fo:border="0.5pt solid #000000"/>
    </style:style>
    <style:style style:name="Table163" style:family="table">
      <style:table-properties style:width="6.6931in" table:align="margins"/>
    </style:style>
    <style:style style:name="Table163.A" style:family="table-column">
      <style:table-column-properties style:column-width="6.6931in" style:rel-column-width="65535*"/>
    </style:style>
    <style:style style:name="Table163.A1" style:family="table-cell">
      <style:table-cell-properties fo:padding="0.0382in" fo:border="0.5pt solid #000000"/>
    </style:style>
    <style:style style:name="Table164" style:family="table">
      <style:table-properties style:width="6.6931in" table:align="margins"/>
    </style:style>
    <style:style style:name="Table164.A" style:family="table-column">
      <style:table-column-properties style:column-width="6.6931in" style:rel-column-width="65535*"/>
    </style:style>
    <style:style style:name="Table164.A1" style:family="table-cell">
      <style:table-cell-properties fo:padding="0.0382in" fo:border="0.5pt solid #000000"/>
    </style:style>
    <style:style style:name="Table165" style:family="table">
      <style:table-properties style:width="6.6931in" table:align="margins"/>
    </style:style>
    <style:style style:name="Table165.A" style:family="table-column">
      <style:table-column-properties style:column-width="6.6931in" style:rel-column-width="65535*"/>
    </style:style>
    <style:style style:name="Table165.A1" style:family="table-cell">
      <style:table-cell-properties fo:padding="0.0382in" fo:border="0.5pt solid #000000"/>
    </style:style>
    <style:style style:name="Table166" style:family="table">
      <style:table-properties style:width="6.6931in" table:align="margins"/>
    </style:style>
    <style:style style:name="Table166.A" style:family="table-column">
      <style:table-column-properties style:column-width="6.6931in" style:rel-column-width="65535*"/>
    </style:style>
    <style:style style:name="Table166.A1" style:family="table-cell">
      <style:table-cell-properties fo:padding="0.0382in" fo:border="0.5pt solid #000000"/>
    </style:style>
    <style:style style:name="Table167" style:family="table">
      <style:table-properties style:width="6.6931in" table:align="margins"/>
    </style:style>
    <style:style style:name="Table167.A" style:family="table-column">
      <style:table-column-properties style:column-width="6.6931in" style:rel-column-width="65535*"/>
    </style:style>
    <style:style style:name="Table167.A1" style:family="table-cell">
      <style:table-cell-properties fo:padding="0.0382in" fo:border="0.5pt solid #000000"/>
    </style:style>
    <style:style style:name="Table168" style:family="table">
      <style:table-properties style:width="6.6931in" table:align="margins"/>
    </style:style>
    <style:style style:name="Table168.A" style:family="table-column">
      <style:table-column-properties style:column-width="6.6931in" style:rel-column-width="65535*"/>
    </style:style>
    <style:style style:name="Table168.A1" style:family="table-cell">
      <style:table-cell-properties fo:padding="0.0382in" fo:border="0.5pt solid #000000"/>
    </style:style>
    <style:style style:name="Table169" style:family="table">
      <style:table-properties style:width="6.6931in" table:align="margins"/>
    </style:style>
    <style:style style:name="Table169.A" style:family="table-column">
      <style:table-column-properties style:column-width="6.6931in" style:rel-column-width="65535*"/>
    </style:style>
    <style:style style:name="Table169.A1" style:family="table-cell">
      <style:table-cell-properties fo:padding="0.0382in" fo:border="0.5pt solid #000000"/>
    </style:style>
    <style:style style:name="Table170" style:family="table">
      <style:table-properties style:width="3.6618in" fo:margin-left="1.3167in" table:align="left"/>
    </style:style>
    <style:style style:name="Table170.A" style:family="table-column">
      <style:table-column-properties style:column-width="1.2868in"/>
    </style:style>
    <style:style style:name="Table170.B" style:family="table-column">
      <style:table-column-properties style:column-width="2.375in"/>
    </style:style>
    <style:style style:name="Table170.A1" style:family="table-cell">
      <style:table-cell-properties fo:padding="0.0382in" fo:border-left="0.5pt solid #000000" fo:border-right="none" fo:border-top="0.5pt solid #000000" fo:border-bottom="0.5pt solid #000000"/>
    </style:style>
    <style:style style:name="Table170.B1" style:family="table-cell">
      <style:table-cell-properties fo:padding="0.0382in" fo:border="0.5pt solid #000000"/>
    </style:style>
    <style:style style:name="Table170.A2" style:family="table-cell">
      <style:table-cell-properties fo:padding="0.0382in" fo:border-left="0.5pt solid #000000" fo:border-right="none" fo:border-top="none" fo:border-bottom="0.5pt solid #000000"/>
    </style:style>
    <style:style style:name="Table170.B2" style:family="table-cell">
      <style:table-cell-properties fo:padding="0.0382in" fo:border-left="0.5pt solid #000000" fo:border-right="0.5pt solid #000000" fo:border-top="none" fo:border-bottom="0.5pt solid #000000"/>
    </style:style>
    <style:style style:name="Table171" style:family="table">
      <style:table-properties style:width="6.6931in" table:align="margins"/>
    </style:style>
    <style:style style:name="Table171.A" style:family="table-column">
      <style:table-column-properties style:column-width="6.6931in" style:rel-column-width="65535*"/>
    </style:style>
    <style:style style:name="Table171.A1" style:family="table-cell">
      <style:table-cell-properties fo:padding="0.0382in" fo:border="0.5pt solid #000000"/>
    </style:style>
    <style:style style:name="Table172" style:family="table">
      <style:table-properties style:width="6.6931in" table:align="margins"/>
    </style:style>
    <style:style style:name="Table172.A" style:family="table-column">
      <style:table-column-properties style:column-width="6.6931in" style:rel-column-width="65535*"/>
    </style:style>
    <style:style style:name="Table172.A1" style:family="table-cell">
      <style:table-cell-properties fo:padding="0.0382in" fo:border="0.5pt solid #000000"/>
    </style:style>
    <style:style style:name="Table173" style:family="table">
      <style:table-properties style:width="6.6521in" table:align="right"/>
    </style:style>
    <style:style style:name="Table173.A" style:family="table-column">
      <style:table-column-properties style:column-width="2.4743in"/>
    </style:style>
    <style:style style:name="Table173.B" style:family="table-column">
      <style:table-column-properties style:column-width="0.9375in"/>
    </style:style>
    <style:style style:name="Table173.C" style:family="table-column">
      <style:table-column-properties style:column-width="3.2403in"/>
    </style:style>
    <style:style style:name="Table173.A1" style:family="table-cell">
      <style:table-cell-properties fo:padding="0.0382in" fo:border-left="0.5pt solid #000000" fo:border-right="none" fo:border-top="0.5pt solid #000000" fo:border-bottom="0.5pt solid #000000"/>
    </style:style>
    <style:style style:name="Table173.C1" style:family="table-cell">
      <style:table-cell-properties fo:padding="0.0382in" fo:border="0.5pt solid #000000"/>
    </style:style>
    <style:style style:name="Table173.A2" style:family="table-cell">
      <style:table-cell-properties fo:padding="0.0382in" fo:border-left="0.5pt solid #000000" fo:border-right="none" fo:border-top="none" fo:border-bottom="0.5pt solid #000000"/>
    </style:style>
    <style:style style:name="Table173.C2" style:family="table-cell">
      <style:table-cell-properties fo:padding="0.0382in" fo:border-left="0.5pt solid #000000" fo:border-right="0.5pt solid #000000" fo:border-top="none" fo:border-bottom="0.5pt solid #000000"/>
    </style:style>
    <style:style style:name="Table174" style:family="table">
      <style:table-properties style:width="6.6931in" table:align="margins"/>
    </style:style>
    <style:style style:name="Table174.A" style:family="table-column">
      <style:table-column-properties style:column-width="6.6931in" style:rel-column-width="65535*"/>
    </style:style>
    <style:style style:name="Table174.A1" style:family="table-cell">
      <style:table-cell-properties fo:padding="0.0382in" fo:border="0.5pt solid #000000"/>
    </style:style>
    <style:style style:name="Table175" style:family="table">
      <style:table-properties style:width="6.6931in" table:align="margins"/>
    </style:style>
    <style:style style:name="Table175.A" style:family="table-column">
      <style:table-column-properties style:column-width="6.6931in" style:rel-column-width="65535*"/>
    </style:style>
    <style:style style:name="Table175.A1" style:family="table-cell">
      <style:table-cell-properties fo:padding="0.0382in" fo:border="0.5pt solid #000000"/>
    </style:style>
    <style:style style:name="Table176" style:family="table">
      <style:table-properties style:width="6.6931in" table:align="margins"/>
    </style:style>
    <style:style style:name="Table176.A" style:family="table-column">
      <style:table-column-properties style:column-width="6.6931in" style:rel-column-width="65535*"/>
    </style:style>
    <style:style style:name="Table176.A1" style:family="table-cell">
      <style:table-cell-properties fo:padding="0.0382in" fo:border="0.5pt solid #000000"/>
    </style:style>
    <style:style style:name="Table177" style:family="table">
      <style:table-properties style:width="6.6931in" table:align="margins"/>
    </style:style>
    <style:style style:name="Table177.A" style:family="table-column">
      <style:table-column-properties style:column-width="6.6931in" style:rel-column-width="65535*"/>
    </style:style>
    <style:style style:name="Table177.A1" style:family="table-cell">
      <style:table-cell-properties fo:padding="0.0382in" fo:border="0.5pt solid #000000"/>
    </style:style>
    <style:style style:name="Table178" style:family="table">
      <style:table-properties style:width="6.6931in" table:align="margins"/>
    </style:style>
    <style:style style:name="Table178.A" style:family="table-column">
      <style:table-column-properties style:column-width="6.6931in" style:rel-column-width="65535*"/>
    </style:style>
    <style:style style:name="Table178.A1" style:family="table-cell">
      <style:table-cell-properties fo:padding="0.0382in" fo:border="0.5pt solid #000000"/>
    </style:style>
    <style:style style:name="Table180" style:family="table">
      <style:table-properties style:width="6.6931in" table:align="margins"/>
    </style:style>
    <style:style style:name="Table180.A" style:family="table-column">
      <style:table-column-properties style:column-width="6.6931in" style:rel-column-width="65535*"/>
    </style:style>
    <style:style style:name="Table180.A1" style:family="table-cell">
      <style:table-cell-properties fo:padding="0.0382in" fo:border="0.5pt solid #000000"/>
    </style:style>
    <style:style style:name="Table179" style:family="table">
      <style:table-properties style:width="6.6931in" table:align="margins"/>
    </style:style>
    <style:style style:name="Table179.A" style:family="table-column">
      <style:table-column-properties style:column-width="6.6931in" style:rel-column-width="65535*"/>
    </style:style>
    <style:style style:name="Table179.A1" style:family="table-cell">
      <style:table-cell-properties fo:padding="0.0382in" fo:border="0.5pt solid #000000"/>
    </style:style>
    <style:style style:name="Table181" style:family="table">
      <style:table-properties style:width="6.6931in" table:align="margins"/>
    </style:style>
    <style:style style:name="Table181.A" style:family="table-column">
      <style:table-column-properties style:column-width="2.2868in" style:rel-column-width="22391*"/>
    </style:style>
    <style:style style:name="Table181.B" style:family="table-column">
      <style:table-column-properties style:column-width="2.375in" style:rel-column-width="23254*"/>
    </style:style>
    <style:style style:name="Table181.C" style:family="table-column">
      <style:table-column-properties style:column-width="2.0313in" style:rel-column-width="19890*"/>
    </style:style>
    <style:style style:name="Table181.A1" style:family="table-cell">
      <style:table-cell-properties fo:padding="0.0382in" fo:border-left="0.5pt solid #000000" fo:border-right="none" fo:border-top="0.5pt solid #000000" fo:border-bottom="0.5pt solid #000000"/>
    </style:style>
    <style:style style:name="Table181.C1" style:family="table-cell">
      <style:table-cell-properties fo:padding="0.0382in" fo:border="0.5pt solid #000000"/>
    </style:style>
    <style:style style:name="Table181.A2" style:family="table-cell">
      <style:table-cell-properties fo:padding="0.0382in" fo:border-left="0.5pt solid #000000" fo:border-right="none" fo:border-top="none" fo:border-bottom="0.5pt solid #000000"/>
    </style:style>
    <style:style style:name="Table181.C2" style:family="table-cell">
      <style:table-cell-properties fo:padding="0.0382in" fo:border-left="0.5pt solid #000000" fo:border-right="0.5pt solid #000000" fo:border-top="none" fo:border-bottom="0.5pt solid #000000"/>
    </style:style>
    <style:style style:name="Table182" style:family="table">
      <style:table-properties style:width="6.6931in" table:align="margins"/>
    </style:style>
    <style:style style:name="Table182.A" style:family="table-column">
      <style:table-column-properties style:column-width="1.9743in" style:rel-column-width="19331*"/>
    </style:style>
    <style:style style:name="Table182.B" style:family="table-column">
      <style:table-column-properties style:column-width="4.7188in" style:rel-column-width="46204*"/>
    </style:style>
    <style:style style:name="Table182.A1" style:family="table-cell">
      <style:table-cell-properties fo:padding="0.0382in" fo:border-left="0.5pt solid #000000" fo:border-right="none" fo:border-top="0.5pt solid #000000" fo:border-bottom="0.5pt solid #000000"/>
    </style:style>
    <style:style style:name="Table182.B1" style:family="table-cell">
      <style:table-cell-properties fo:padding="0.0382in" fo:border="0.5pt solid #000000"/>
    </style:style>
    <style:style style:name="Table182.A2" style:family="table-cell">
      <style:table-cell-properties fo:padding="0.0382in" fo:border-left="0.5pt solid #000000" fo:border-right="none" fo:border-top="none" fo:border-bottom="0.5pt solid #000000"/>
    </style:style>
    <style:style style:name="Table182.B2" style:family="table-cell">
      <style:table-cell-properties fo:padding="0.0382in" fo:border-left="0.5pt solid #000000" fo:border-right="0.5pt solid #000000" fo:border-top="none" fo:border-bottom="0.5pt solid #000000"/>
    </style:style>
    <style:style style:name="Table183" style:family="table">
      <style:table-properties style:width="6.6931in" table:align="margins"/>
    </style:style>
    <style:style style:name="Table183.A" style:family="table-column">
      <style:table-column-properties style:column-width="6.6931in" style:rel-column-width="65535*"/>
    </style:style>
    <style:style style:name="Table183.A1" style:family="table-cell">
      <style:table-cell-properties fo:padding="0.0382in" fo:border="0.5pt solid #000000"/>
    </style:style>
    <style:style style:name="Table184" style:family="table">
      <style:table-properties style:width="6.6931in" table:align="margins"/>
    </style:style>
    <style:style style:name="Table184.A" style:family="table-column">
      <style:table-column-properties style:column-width="6.6931in" style:rel-column-width="65535*"/>
    </style:style>
    <style:style style:name="Table184.A1" style:family="table-cell">
      <style:table-cell-properties fo:padding="0.0382in" fo:border="0.5pt solid #000000"/>
    </style:style>
    <style:style style:name="Table185" style:family="table">
      <style:table-properties style:width="6.6931in" table:align="margins"/>
    </style:style>
    <style:style style:name="Table185.A" style:family="table-column">
      <style:table-column-properties style:column-width="6.6931in" style:rel-column-width="65535*"/>
    </style:style>
    <style:style style:name="Table185.A1" style:family="table-cell">
      <style:table-cell-properties fo:padding="0.0382in" fo:border="0.5pt solid #000000"/>
    </style:style>
    <style:style style:name="Table186" style:family="table">
      <style:table-properties style:width="6.6931in" table:align="margins"/>
    </style:style>
    <style:style style:name="Table186.A" style:family="table-column">
      <style:table-column-properties style:column-width="6.6931in" style:rel-column-width="65535*"/>
    </style:style>
    <style:style style:name="Table186.A1" style:family="table-cell">
      <style:table-cell-properties fo:padding="0.0382in" fo:border="0.5pt solid #000000"/>
    </style:style>
    <style:style style:name="Table187" style:family="table">
      <style:table-properties style:width="6.6931in" table:align="margins"/>
    </style:style>
    <style:style style:name="Table187.A" style:family="table-column">
      <style:table-column-properties style:column-width="2.6618in" style:rel-column-width="26063*"/>
    </style:style>
    <style:style style:name="Table187.B" style:family="table-column">
      <style:table-column-properties style:column-width="4.0313in" style:rel-column-width="39472*"/>
    </style:style>
    <style:style style:name="Table187.A1" style:family="table-cell">
      <style:table-cell-properties fo:padding="0.0382in" fo:border-left="0.5pt solid #000000" fo:border-right="none" fo:border-top="0.5pt solid #000000" fo:border-bottom="0.5pt solid #000000"/>
    </style:style>
    <style:style style:name="Table187.B1" style:family="table-cell">
      <style:table-cell-properties fo:padding="0.0382in" fo:border="0.5pt solid #000000"/>
    </style:style>
    <style:style style:name="Table187.A2" style:family="table-cell">
      <style:table-cell-properties fo:padding="0.0382in" fo:border-left="0.5pt solid #000000" fo:border-right="none" fo:border-top="none" fo:border-bottom="0.5pt solid #000000"/>
    </style:style>
    <style:style style:name="Table187.B2" style:family="table-cell">
      <style:table-cell-properties fo:padding="0.0382in" fo:border-left="0.5pt solid #000000" fo:border-right="0.5pt solid #000000" fo:border-top="none" fo:border-bottom="0.5pt solid #000000"/>
    </style:style>
    <style:style style:name="Table188" style:family="table">
      <style:table-properties style:width="6.6931in" table:align="margins"/>
    </style:style>
    <style:style style:name="Table188.A" style:family="table-column">
      <style:table-column-properties style:column-width="6.6931in" style:rel-column-width="65535*"/>
    </style:style>
    <style:style style:name="Table188.A1" style:family="table-cell">
      <style:table-cell-properties fo:padding="0.0382in" fo:border="0.5pt solid #000000"/>
    </style:style>
    <style:style style:name="Table189" style:family="table">
      <style:table-properties style:width="6.6931in" table:align="margins"/>
    </style:style>
    <style:style style:name="Table189.A" style:family="table-column">
      <style:table-column-properties style:column-width="6.6931in" style:rel-column-width="65535*"/>
    </style:style>
    <style:style style:name="Table189.A1" style:family="table-cell">
      <style:table-cell-properties fo:padding="0.0382in" fo:border="0.5pt solid #000000"/>
    </style:style>
    <style:style style:name="Table190" style:family="table">
      <style:table-properties style:width="6.6931in" table:align="margins"/>
    </style:style>
    <style:style style:name="Table190.A" style:family="table-column">
      <style:table-column-properties style:column-width="6.6931in" style:rel-column-width="65535*"/>
    </style:style>
    <style:style style:name="Table190.A1" style:family="table-cell">
      <style:table-cell-properties fo:padding="0.0382in" fo:border="0.5pt solid #000000"/>
    </style:style>
    <style:style style:name="Table191" style:family="table">
      <style:table-properties style:width="6.6931in" table:align="margins"/>
    </style:style>
    <style:style style:name="Table191.A" style:family="table-column">
      <style:table-column-properties style:column-width="6.6931in" style:rel-column-width="65535*"/>
    </style:style>
    <style:style style:name="Table191.A1" style:family="table-cell">
      <style:table-cell-properties fo:padding="0.0382in" fo:border="0.5pt solid #000000"/>
    </style:style>
    <style:style style:name="Table192" style:family="table">
      <style:table-properties style:width="6.6931in" table:align="margins"/>
    </style:style>
    <style:style style:name="Table192.A" style:family="table-column">
      <style:table-column-properties style:column-width="6.6931in" style:rel-column-width="65535*"/>
    </style:style>
    <style:style style:name="Table192.A1" style:family="table-cell">
      <style:table-cell-properties fo:padding="0.0382in" fo:border="0.5pt solid #000000"/>
    </style:style>
    <style:style style:name="Table193" style:family="table">
      <style:table-properties style:width="6.6931in" table:align="margins"/>
    </style:style>
    <style:style style:name="Table193.A" style:family="table-column">
      <style:table-column-properties style:column-width="6.6931in" style:rel-column-width="65535*"/>
    </style:style>
    <style:style style:name="Table193.A1" style:family="table-cell">
      <style:table-cell-properties fo:padding="0.0382in" fo:border="0.5pt solid #000000"/>
    </style:style>
    <style:style style:name="Table194" style:family="table">
      <style:table-properties style:width="4.3493in" fo:margin-left="1.1556in" table:align="left"/>
    </style:style>
    <style:style style:name="Table194.A" style:family="table-column">
      <style:table-column-properties style:column-width="2.1875in"/>
    </style:style>
    <style:style style:name="Table194.B" style:family="table-column">
      <style:table-column-properties style:column-width="2.1618in"/>
    </style:style>
    <style:style style:name="Table194.A1" style:family="table-cell">
      <style:table-cell-properties fo:padding="0.0382in" fo:border-left="0.5pt solid #000000" fo:border-right="none" fo:border-top="0.5pt solid #000000" fo:border-bottom="0.5pt solid #000000"/>
    </style:style>
    <style:style style:name="Table194.B1" style:family="table-cell">
      <style:table-cell-properties fo:padding="0.0382in" fo:border="0.5pt solid #000000"/>
    </style:style>
    <style:style style:name="Table194.A2" style:family="table-cell">
      <style:table-cell-properties fo:padding="0.0382in" fo:border-left="0.5pt solid #000000" fo:border-right="none" fo:border-top="none" fo:border-bottom="0.5pt solid #000000"/>
    </style:style>
    <style:style style:name="Table194.B2" style:family="table-cell">
      <style:table-cell-properties fo:padding="0.0382in" fo:border-left="0.5pt solid #000000" fo:border-right="0.5pt solid #000000" fo:border-top="none" fo:border-bottom="0.5pt solid #000000"/>
    </style:style>
    <style:style style:name="Table195" style:family="table">
      <style:table-properties style:width="6.6931in" table:align="margins"/>
    </style:style>
    <style:style style:name="Table195.A" style:family="table-column">
      <style:table-column-properties style:column-width="6.6931in" style:rel-column-width="65535*"/>
    </style:style>
    <style:style style:name="Table195.A1" style:family="table-cell">
      <style:table-cell-properties fo:padding="0.0382in" fo:border="0.5pt solid #000000"/>
    </style:style>
    <style:style style:name="Table196" style:family="table">
      <style:table-properties style:width="6.6931in" table:align="margins"/>
    </style:style>
    <style:style style:name="Table196.A" style:family="table-column">
      <style:table-column-properties style:column-width="6.6931in" style:rel-column-width="65535*"/>
    </style:style>
    <style:style style:name="Table196.A1" style:family="table-cell">
      <style:table-cell-properties fo:padding="0.0382in" fo:border="0.5pt solid #000000"/>
    </style:style>
    <style:style style:name="Table197" style:family="table">
      <style:table-properties style:width="6.6931in" table:align="margins"/>
    </style:style>
    <style:style style:name="Table197.A" style:family="table-column">
      <style:table-column-properties style:column-width="6.6931in" style:rel-column-width="65535*"/>
    </style:style>
    <style:style style:name="Table197.A1" style:family="table-cell">
      <style:table-cell-properties fo:padding="0.0382in" fo:border="0.5pt solid #000000"/>
    </style:style>
    <style:style style:name="Table198" style:family="table">
      <style:table-properties style:width="6.6931in" table:align="margins"/>
    </style:style>
    <style:style style:name="Table198.A" style:family="table-column">
      <style:table-column-properties style:column-width="6.6931in" style:rel-column-width="65535*"/>
    </style:style>
    <style:style style:name="Table198.A1" style:family="table-cell">
      <style:table-cell-properties fo:padding="0.0382in" fo:border="0.5pt solid #000000"/>
    </style:style>
    <style:style style:name="Table199" style:family="table">
      <style:table-properties style:width="6.6931in" table:align="margins"/>
    </style:style>
    <style:style style:name="Table199.A" style:family="table-column">
      <style:table-column-properties style:column-width="6.6931in" style:rel-column-width="65535*"/>
    </style:style>
    <style:style style:name="Table199.A1" style:family="table-cell">
      <style:table-cell-properties fo:padding="0.0382in" fo:border="0.5pt solid #000000"/>
    </style:style>
    <style:style style:name="Table200" style:family="table">
      <style:table-properties style:width="6.6931in" table:align="margins"/>
    </style:style>
    <style:style style:name="Table200.A" style:family="table-column">
      <style:table-column-properties style:column-width="6.6931in" style:rel-column-width="65535*"/>
    </style:style>
    <style:style style:name="Table200.A1" style:family="table-cell">
      <style:table-cell-properties fo:padding="0.0382in" fo:border="0.5pt solid #000000"/>
    </style:style>
    <style:style style:name="Table201" style:family="table">
      <style:table-properties style:width="6.6931in" table:align="margins"/>
    </style:style>
    <style:style style:name="Table201.A" style:family="table-column">
      <style:table-column-properties style:column-width="6.6931in" style:rel-column-width="65535*"/>
    </style:style>
    <style:style style:name="Table201.A1" style:family="table-cell">
      <style:table-cell-properties fo:padding="0.0382in" fo:border="0.5pt solid #000000"/>
    </style:style>
    <style:style style:name="Table202" style:family="table">
      <style:table-properties style:width="6.6931in" table:align="margins"/>
    </style:style>
    <style:style style:name="Table202.A" style:family="table-column">
      <style:table-column-properties style:column-width="6.6931in" style:rel-column-width="65535*"/>
    </style:style>
    <style:style style:name="Table202.A1" style:family="table-cell">
      <style:table-cell-properties fo:padding="0.0382in" fo:border="0.5pt solid #000000"/>
    </style:style>
    <style:style style:name="Table203" style:family="table">
      <style:table-properties style:width="6.6931in" table:align="margins"/>
    </style:style>
    <style:style style:name="Table203.A" style:family="table-column">
      <style:table-column-properties style:column-width="2.4118in" style:rel-column-width="23615*"/>
    </style:style>
    <style:style style:name="Table203.B" style:family="table-column">
      <style:table-column-properties style:column-width="2.3125in" style:rel-column-width="22642*"/>
    </style:style>
    <style:style style:name="Table203.C" style:family="table-column">
      <style:table-column-properties style:column-width="1.9688in" style:rel-column-width="19278*"/>
    </style:style>
    <style:style style:name="Table203.A1" style:family="table-cell">
      <style:table-cell-properties fo:padding="0.0382in" fo:border-left="0.5pt solid #000000" fo:border-right="none" fo:border-top="0.5pt solid #000000" fo:border-bottom="0.5pt solid #000000"/>
    </style:style>
    <style:style style:name="Table203.C1" style:family="table-cell">
      <style:table-cell-properties fo:padding="0.0382in" fo:border="0.5pt solid #000000"/>
    </style:style>
    <style:style style:name="Table203.A2" style:family="table-cell">
      <style:table-cell-properties fo:padding="0.0382in" fo:border-left="0.5pt solid #000000" fo:border-right="none" fo:border-top="none" fo:border-bottom="0.5pt solid #000000"/>
    </style:style>
    <style:style style:name="Table203.C2" style:family="table-cell">
      <style:table-cell-properties fo:padding="0.0382in" fo:border-left="0.5pt solid #000000" fo:border-right="0.5pt solid #000000" fo:border-top="none" fo:border-bottom="0.5pt solid #000000"/>
    </style:style>
    <style:style style:name="Table204" style:family="table">
      <style:table-properties style:width="6.5688in" fo:margin-left="0.0771in" table:align="left"/>
    </style:style>
    <style:style style:name="Table204.A" style:family="table-column">
      <style:table-column-properties style:column-width="1.6458in"/>
    </style:style>
    <style:style style:name="Table204.B" style:family="table-column">
      <style:table-column-properties style:column-width="4.9229in"/>
    </style:style>
    <style:style style:name="Table204.A1" style:family="table-cell">
      <style:table-cell-properties style:vertical-align="middle" fo:padding="0.0194in" fo:border="none"/>
    </style:style>
    <style:style style:name="Table205" style:family="table">
      <style:table-properties style:width="6.6931in" table:align="margins"/>
    </style:style>
    <style:style style:name="Table205.A" style:family="table-column">
      <style:table-column-properties style:column-width="6.6931in" style:rel-column-width="65535*"/>
    </style:style>
    <style:style style:name="Table205.A1" style:family="table-cell">
      <style:table-cell-properties fo:padding="0.0382in" fo:border="0.5pt solid #000000"/>
    </style:style>
    <style:style style:name="Table218" style:family="table">
      <style:table-properties style:width="6.6931in" table:align="margins"/>
    </style:style>
    <style:style style:name="Table218.A" style:family="table-column">
      <style:table-column-properties style:column-width="6.6931in" style:rel-column-width="65535*"/>
    </style:style>
    <style:style style:name="Table218.A1" style:family="table-cell">
      <style:table-cell-properties fo:padding="0.0382in" fo:border="0.5pt solid #000000"/>
    </style:style>
    <style:style style:name="Table206" style:family="table">
      <style:table-properties style:width="5.875in" fo:margin-left="0.4993in" table:align="left"/>
    </style:style>
    <style:style style:name="Table206.A" style:family="table-column">
      <style:table-column-properties style:column-width="0.6458in"/>
    </style:style>
    <style:style style:name="Table206.B" style:family="table-column">
      <style:table-column-properties style:column-width="1.875in"/>
    </style:style>
    <style:style style:name="Table206.C" style:family="table-column">
      <style:table-column-properties style:column-width="3.3542in"/>
    </style:style>
    <style:style style:name="Table206.A1" style:family="table-cell">
      <style:table-cell-properties style:vertical-align="middle" fo:padding="0.0194in" fo:border="none"/>
    </style:style>
    <style:style style:name="Table207" style:family="table">
      <style:table-properties style:width="6.6931in" table:align="margins"/>
    </style:style>
    <style:style style:name="Table207.A" style:family="table-column">
      <style:table-column-properties style:column-width="6.6931in" style:rel-column-width="65535*"/>
    </style:style>
    <style:style style:name="Table207.A1" style:family="table-cell">
      <style:table-cell-properties fo:padding="0.0382in" fo:border="0.5pt solid #000000"/>
    </style:style>
    <style:style style:name="Table208" style:family="table">
      <style:table-properties style:width="6.6931in" table:align="margins"/>
    </style:style>
    <style:style style:name="Table208.A" style:family="table-column">
      <style:table-column-properties style:column-width="2.4743in" style:rel-column-width="24227*"/>
    </style:style>
    <style:style style:name="Table208.B" style:family="table-column">
      <style:table-column-properties style:column-width="1.5in" style:rel-column-width="14687*"/>
    </style:style>
    <style:style style:name="Table208.C" style:family="table-column">
      <style:table-column-properties style:column-width="2.7188in" style:rel-column-width="26621*"/>
    </style:style>
    <style:style style:name="Table208.A1" style:family="table-cell">
      <style:table-cell-properties fo:padding="0.0382in" fo:border-left="0.5pt solid #000000" fo:border-right="none" fo:border-top="0.5pt solid #000000" fo:border-bottom="0.5pt solid #000000"/>
    </style:style>
    <style:style style:name="Table208.C1" style:family="table-cell">
      <style:table-cell-properties fo:padding="0.0382in" fo:border="0.5pt solid #000000"/>
    </style:style>
    <style:style style:name="Table208.A2" style:family="table-cell">
      <style:table-cell-properties fo:padding="0.0382in" fo:border-left="0.5pt solid #000000" fo:border-right="none" fo:border-top="none" fo:border-bottom="0.5pt solid #000000"/>
    </style:style>
    <style:style style:name="Table208.C2" style:family="table-cell">
      <style:table-cell-properties fo:padding="0.0382in" fo:border-left="0.5pt solid #000000" fo:border-right="0.5pt solid #000000" fo:border-top="none" fo:border-bottom="0.5pt solid #000000"/>
    </style:style>
    <style:style style:name="Table209" style:family="table">
      <style:table-properties style:width="6.6931in" table:align="margins"/>
    </style:style>
    <style:style style:name="Table209.A" style:family="table-column">
      <style:table-column-properties style:column-width="6.6931in" style:rel-column-width="65535*"/>
    </style:style>
    <style:style style:name="Table209.A1" style:family="table-cell">
      <style:table-cell-properties fo:padding="0.0382in" fo:border="0.5pt solid #000000"/>
    </style:style>
    <style:style style:name="Table210" style:family="table">
      <style:table-properties style:width="6.6931in" table:align="margins"/>
    </style:style>
    <style:style style:name="Table210.A" style:family="table-column">
      <style:table-column-properties style:column-width="6.6931in" style:rel-column-width="65535*"/>
    </style:style>
    <style:style style:name="Table210.A1" style:family="table-cell">
      <style:table-cell-properties fo:padding="0.0382in" fo:border="0.5pt solid #000000"/>
    </style:style>
    <style:style style:name="Table211" style:family="table">
      <style:table-properties style:width="6.6931in" table:align="margins"/>
    </style:style>
    <style:style style:name="Table211.A" style:family="table-column">
      <style:table-column-properties style:column-width="6.6931in" style:rel-column-width="65535*"/>
    </style:style>
    <style:style style:name="Table211.A1" style:family="table-cell">
      <style:table-cell-properties fo:padding="0.0382in" fo:border="0.5pt solid #000000"/>
    </style:style>
    <style:style style:name="Table212" style:family="table">
      <style:table-properties style:width="6.6931in" table:align="margins"/>
    </style:style>
    <style:style style:name="Table212.A" style:family="table-column">
      <style:table-column-properties style:column-width="6.6931in" style:rel-column-width="65535*"/>
    </style:style>
    <style:style style:name="Table212.A1" style:family="table-cell">
      <style:table-cell-properties fo:padding="0.0382in" fo:border="0.5pt solid #000000"/>
    </style:style>
    <style:style style:name="Table214" style:family="table">
      <style:table-properties style:width="6.6931in" table:align="margins"/>
    </style:style>
    <style:style style:name="Table214.A" style:family="table-column">
      <style:table-column-properties style:column-width="6.6931in" style:rel-column-width="65535*"/>
    </style:style>
    <style:style style:name="Table214.A1" style:family="table-cell">
      <style:table-cell-properties fo:padding="0.0382in" fo:border="0.5pt solid #000000"/>
    </style:style>
    <style:style style:name="Table215" style:family="table">
      <style:table-properties style:width="6.6931in" table:align="margins"/>
    </style:style>
    <style:style style:name="Table215.A" style:family="table-column">
      <style:table-column-properties style:column-width="2.0993in" style:rel-column-width="20555*"/>
    </style:style>
    <style:style style:name="Table215.B" style:family="table-column">
      <style:table-column-properties style:column-width="4.5938in" style:rel-column-width="44980*"/>
    </style:style>
    <style:style style:name="Table215.A1" style:family="table-cell">
      <style:table-cell-properties fo:padding="0.0382in" fo:border-left="0.5pt solid #000000" fo:border-right="none" fo:border-top="0.5pt solid #000000" fo:border-bottom="0.5pt solid #000000"/>
    </style:style>
    <style:style style:name="Table215.B1" style:family="table-cell">
      <style:table-cell-properties fo:padding="0.0382in" fo:border="0.5pt solid #000000"/>
    </style:style>
    <style:style style:name="Table215.A2" style:family="table-cell">
      <style:table-cell-properties fo:padding="0.0382in" fo:border-left="0.5pt solid #000000" fo:border-right="none" fo:border-top="none" fo:border-bottom="0.5pt solid #000000"/>
    </style:style>
    <style:style style:name="Table215.B2" style:family="table-cell">
      <style:table-cell-properties fo:padding="0.0382in" fo:border-left="0.5pt solid #000000" fo:border-right="0.5pt solid #000000" fo:border-top="none" fo:border-bottom="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216" style:family="table">
      <style:table-properties style:width="6.6931in" table:align="margins"/>
    </style:style>
    <style:style style:name="Table216.A" style:family="table-column">
      <style:table-column-properties style:column-width="6.6931in" style:rel-column-width="65535*"/>
    </style:style>
    <style:style style:name="Table216.A1" style:family="table-cell">
      <style:table-cell-properties fo:padding="0.0382in" fo:border="0.5pt solid #000000"/>
    </style:style>
    <style:style style:name="Table217" style:family="table">
      <style:table-properties style:width="6.6931in" table:align="margins"/>
    </style:style>
    <style:style style:name="Table217.A" style:family="table-column">
      <style:table-column-properties style:column-width="6.6931in" style:rel-column-width="65535*"/>
    </style:style>
    <style:style style:name="Table217.A1" style:family="table-cell">
      <style:table-cell-properties fo:padding="0.0382in" fo:border="0.5pt solid #000000"/>
    </style:style>
    <style:style style:name="Table221" style:family="table">
      <style:table-properties style:width="6.6931in" table:align="margins"/>
    </style:style>
    <style:style style:name="Table221.A" style:family="table-column">
      <style:table-column-properties style:column-width="6.6931in" style:rel-column-width="65535*"/>
    </style:style>
    <style:style style:name="Table221.A1" style:family="table-cell">
      <style:table-cell-properties fo:padding="0.0382in" fo:border="0.5pt solid #000000"/>
    </style:style>
    <style:style style:name="Table219" style:family="table">
      <style:table-properties style:width="6.6931in" table:align="margins"/>
    </style:style>
    <style:style style:name="Table219.A" style:family="table-column">
      <style:table-column-properties style:column-width="6.6931in" style:rel-column-width="65535*"/>
    </style:style>
    <style:style style:name="Table219.A1" style:family="table-cell">
      <style:table-cell-properties fo:padding="0.0382in" fo:border="0.5pt solid #000000"/>
    </style:style>
    <style:style style:name="Table220" style:family="table">
      <style:table-properties style:width="6.6931in" table:align="margins"/>
    </style:style>
    <style:style style:name="Table220.A" style:family="table-column">
      <style:table-column-properties style:column-width="6.6931in" style:rel-column-width="65535*"/>
    </style:style>
    <style:style style:name="Table220.A1" style:family="table-cell">
      <style:table-cell-properties fo:padding="0.0382in" fo:border="0.5pt solid #000000"/>
    </style:style>
    <style:style style:name="Table222" style:family="table">
      <style:table-properties style:width="6.6931in" table:align="margins"/>
    </style:style>
    <style:style style:name="Table222.A" style:family="table-column">
      <style:table-column-properties style:column-width="6.6931in" style:rel-column-width="65535*"/>
    </style:style>
    <style:style style:name="Table222.A1" style:family="table-cell">
      <style:table-cell-properties fo:padding="0.0382in" fo:border="0.5pt solid #000000"/>
    </style:style>
    <style:style style:name="Table60" style:family="table">
      <style:table-properties style:width="6.6931in" table:align="margins"/>
    </style:style>
    <style:style style:name="Table60.A" style:family="table-column">
      <style:table-column-properties style:column-width="6.6931in" style:rel-column-width="65535*"/>
    </style:style>
    <style:style style:name="Table60.A1" style:family="table-cell">
      <style:table-cell-properties fo:padding="0.0382in" fo:border="0.5pt solid #000000"/>
    </style:style>
    <style:style style:name="Table61" style:family="table">
      <style:table-properties style:width="6.6931in" table:align="margins"/>
    </style:style>
    <style:style style:name="Table61.A" style:family="table-column">
      <style:table-column-properties style:column-width="1.5368in" style:rel-column-width="15047*"/>
    </style:style>
    <style:style style:name="Table61.B" style:family="table-column">
      <style:table-column-properties style:column-width="5.1563in" style:rel-column-width="50488*"/>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74" style:family="table">
      <style:table-properties style:width="6.6931in" table:align="margins"/>
    </style:style>
    <style:style style:name="Table74.A" style:family="table-column">
      <style:table-column-properties style:column-width="6.6931in" style:rel-column-width="65535*"/>
    </style:style>
    <style:style style:name="Table74.A1" style:family="table-cell">
      <style:table-cell-properties fo:padding="0.0382in" fo:border="0.5pt solid #000000"/>
    </style:style>
    <style:style style:name="Table75" style:family="table">
      <style:table-properties style:width="6.6931in" table:align="margins"/>
    </style:style>
    <style:style style:name="Table75.A" style:family="table-column">
      <style:table-column-properties style:column-width="6.6931in" style:rel-column-width="65535*"/>
    </style:style>
    <style:style style:name="Table75.A1" style:family="table-cell">
      <style:table-cell-properties fo:padding="0.0382in" fo:border="0.5pt solid #000000"/>
    </style:style>
    <style:style style:name="Table76" style:family="table">
      <style:table-properties style:width="6.6931in" table:align="margins"/>
    </style:style>
    <style:style style:name="Table76.A" style:family="table-column">
      <style:table-column-properties style:column-width="6.6931in" style:rel-column-width="65535*"/>
    </style:style>
    <style:style style:name="Table76.A1" style:family="table-cell">
      <style:table-cell-properties fo:padding="0.0382in" fo:border="0.5pt solid #000000"/>
    </style:style>
    <style:style style:name="Table88" style:family="table">
      <style:table-properties style:width="6.7243in" fo:margin-left="0in" table:align="left"/>
    </style:style>
    <style:style style:name="Table88.A" style:family="table-column">
      <style:table-column-properties style:column-width="1.0993in"/>
    </style:style>
    <style:style style:name="Table88.B" style:family="table-column">
      <style:table-column-properties style:column-width="2.9375in"/>
    </style:style>
    <style:style style:name="Table88.C" style:family="table-column">
      <style:table-column-properties style:column-width="2.6875in"/>
    </style:style>
    <style:style style:name="Table88.A1" style:family="table-cell">
      <style:table-cell-properties fo:padding="0.0382in" fo:border-left="0.5pt solid #000000" fo:border-right="none" fo:border-top="0.5pt solid #000000" fo:border-bottom="0.5pt solid #000000"/>
    </style:style>
    <style:style style:name="Table88.C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C2" style:family="table-cell">
      <style:table-cell-properties fo:padding="0.0382in" fo:border-left="0.5pt solid #000000" fo:border-right="0.5pt solid #000000" fo:border-top="none" fo:border-bottom="0.5pt solid #000000"/>
    </style:style>
    <style:style style:name="Table90" style:family="table">
      <style:table-properties style:width="4.2868in" fo:margin-left="1.166in" table:align="left"/>
    </style:style>
    <style:style style:name="Table90.A" style:family="table-column">
      <style:table-column-properties style:column-width="2.0368in"/>
    </style:style>
    <style:style style:name="Table90.B" style:family="table-column">
      <style:table-column-properties style:column-width="2.25in"/>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4.9743in" fo:margin-left="0.5458in" table:align="left"/>
    </style:style>
    <style:style style:name="Table91.A" style:family="table-column">
      <style:table-column-properties style:column-width="0.8493in"/>
    </style:style>
    <style:style style:name="Table91.B" style:family="table-column">
      <style:table-column-properties style:column-width="2.4375in"/>
    </style:style>
    <style:style style:name="Table91.C" style:family="table-column">
      <style:table-column-properties style:column-width="1.6875in"/>
    </style:style>
    <style:style style:name="Table91.A1" style:family="table-cell">
      <style:table-cell-properties fo:padding="0.0382in" fo:border-left="0.5pt solid #000000" fo:border-right="none" fo:border-top="0.5pt solid #000000" fo:border-bottom="0.5pt solid #000000"/>
    </style:style>
    <style:style style:name="Table91.C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C2" style:family="table-cell">
      <style:table-cell-properties fo:padding="0.0382in" fo:border-left="0.5pt solid #000000" fo:border-right="0.5pt solid #000000" fo:border-top="none" fo:border-bottom="0.5pt solid #000000"/>
    </style:style>
    <style:style style:name="Table102" style:family="table">
      <style:table-properties style:width="6.6931in" table:align="margins"/>
    </style:style>
    <style:style style:name="Table102.A" style:family="table-column">
      <style:table-column-properties style:column-width="6.6931in" style:rel-column-width="65535*"/>
    </style:style>
    <style:style style:name="Table102.A1" style:family="table-cell">
      <style:table-cell-properties fo:padding="0.0382in" fo:border="0.5pt solid #000000"/>
    </style:style>
    <style:style style:name="Table9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1in" style:rel-column-width="9791*"/>
    </style:style>
    <style:style style:name="Table95.B" style:family="table-column">
      <style:table-column-properties style:column-width="2.4118in" style:rel-column-width="23615*"/>
    </style:style>
    <style:style style:name="Table95.C" style:family="table-column">
      <style:table-column-properties style:column-width="3.2813in" style:rel-column-width="32129*"/>
    </style:style>
    <style:style style:name="Table95.1" style:family="table-row">
      <style:table-row-properties fo:background-color="transparent" fo:keep-together="auto">
        <style:background-image/>
      </style:table-row-properties>
    </style:style>
    <style:style style:name="Table95.A1" style:family="table-cell">
      <style:table-cell-properties fo:padding="0.0382in" fo:border-left="0.5pt solid #000000" fo:border-right="none" fo:border-top="0.5pt solid #000000" fo:border-bottom="0.5pt solid #000000"/>
    </style:style>
    <style:style style:name="Table95.C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le95.A2" style:family="table-cell">
      <style:table-cell-properties fo:padding="0.0382in" fo:border-left="0.5pt solid #000000" fo:border-right="none" fo:border-top="none" fo:border-bottom="0.5pt solid #000000"/>
    </style:style>
    <style:style style:name="Table95.B2" style:family="table-cell">
      <style:table-cell-properties fo:padding="0.0382in" fo:border-left="0.5pt solid #000000" fo:border-right="none" fo:border-top="none" fo:border-bottom="0.5pt solid #000000"/>
    </style:style>
    <style:style style:name="Table95.C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95.A3" style:family="table-cell">
      <style:table-cell-properties fo:padding="0.0382in" fo:border-left="0.5pt solid #000000" fo:border-right="none" fo:border-top="none" fo:border-bottom="0.5pt solid #000000"/>
    </style:style>
    <style:style style:name="Table95.B3" style:family="table-cell">
      <style:table-cell-properties fo:padding="0.0382in" fo:border-left="0.5pt solid #000000" fo:border-right="none" fo:border-top="none" fo:border-bottom="0.5pt solid #000000"/>
    </style:style>
    <style:style style:name="Table95.A4" style:family="table-cell">
      <style:table-cell-properties fo:padding="0.0382in" fo:border-left="0.5pt solid #000000" fo:border-right="none" fo:border-top="none" fo:border-bottom="0.5pt solid #000000"/>
    </style:style>
    <style:style style:name="Table95.B4" style:family="table-cell">
      <style:table-cell-properties fo:padding="0.0382in" fo:border-left="0.5pt solid #000000" fo:border-right="none" fo:border-top="none" fo:border-bottom="0.5pt solid #000000"/>
    </style:style>
    <style:style style:name="Table95.A5" style:family="table-cell">
      <style:table-cell-properties fo:padding="0.0382in" fo:border-left="0.5pt solid #000000" fo:border-right="none" fo:border-top="none" fo:border-bottom="0.5pt solid #000000"/>
    </style:style>
    <style:style style:name="Table95.B5" style:family="table-cell">
      <style:table-cell-properties fo:padding="0.0382in" fo:border-left="0.5pt solid #000000" fo:border-right="none" fo:border-top="none" fo:border-bottom="0.5pt solid #000000"/>
    </style:style>
    <style:style style:name="Table132" style:family="table">
      <style:table-properties style:width="6.6931in" table:align="left"/>
    </style:style>
    <style:style style:name="Table132.A" style:family="table-column">
      <style:table-column-properties style:column-width="1.6035in"/>
    </style:style>
    <style:style style:name="Table132.B" style:family="table-column">
      <style:table-column-properties style:column-width="1.6674in"/>
    </style:style>
    <style:style style:name="Table132.C" style:family="table-column">
      <style:table-column-properties style:column-width="3.4222in"/>
    </style:style>
    <style:style style:name="Table132.A1" style:family="table-cell">
      <style:table-cell-properties style:vertical-align="middle" fo:padding="0.0194in" fo:border="none"/>
    </style:style>
    <style:style style:name="Table133" style:family="table">
      <style:table-properties style:width="6.6931in" fo:break-before="auto" fo:break-after="auto" table:align="left" fo:background-color="transparent" fo:keep-with-next="auto" style:may-break-between-rows="true" style:writing-mode="page">
        <style:background-image/>
      </style:table-properties>
    </style:style>
    <style:style style:name="Table133.A" style:family="table-column">
      <style:table-column-properties style:column-width="2.3958in"/>
    </style:style>
    <style:style style:name="Table133.B" style:family="table-column">
      <style:table-column-properties style:column-width="2.375in"/>
    </style:style>
    <style:style style:name="Table133.C" style:family="table-column">
      <style:table-column-properties style:column-width="1.9222in"/>
    </style:style>
    <style:style style:name="Table133.A1" style:family="table-cell">
      <style:table-cell-properties style:vertical-align="middle" fo:padding="0.0194in" fo:border="none"/>
    </style:style>
    <style:style style:name="Table133.8" style:family="table-row">
      <style:table-row-properties fo:background-color="transparent" fo:keep-together="auto">
        <style:background-image/>
      </style:table-row-properties>
    </style:style>
    <style:style style:name="Table133.A8" style:family="table-cell">
      <style:table-cell-properties style:vertical-align="middle" fo:background-color="transparent" fo:padding="0.0194in" fo:border="none" style:writing-mode="page">
        <style:background-image/>
      </style:table-cell-properties>
    </style:style>
    <style:style style:name="Table213" style:family="table">
      <style:table-properties style:width="6.6931in" table:align="left"/>
    </style:style>
    <style:style style:name="Table213.A" style:family="table-column">
      <style:table-column-properties style:column-width="1.8486in"/>
    </style:style>
    <style:style style:name="Table213.B" style:family="table-column">
      <style:table-column-properties style:column-width="2.8292in"/>
    </style:style>
    <style:style style:name="Table213.C" style:family="table-column">
      <style:table-column-properties style:column-width="2.0153in"/>
    </style:style>
    <style:style style:name="Table21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4pt" fo:font-weight="bold" officeooo:rsid="08142063" officeooo:paragraph-rsid="0638ca50"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8pt" fo:font-weight="bold" officeooo:rsid="264d65d8" officeooo:paragraph-rsid="0638ca50"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6pt" fo:font-weight="bold" officeooo:rsid="381f241e" officeooo:paragraph-rsid="0638ca50"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font-weight="bold" officeooo:rsid="001b29bf" officeooo:paragraph-rsid="0638ca50"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4pt" fo:font-weight="bold" officeooo:rsid="001b29bf" officeooo:paragraph-rsid="0638ca50"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fo:font-weight="bold" officeooo:rsid="0638ca50" officeooo:paragraph-rsid="0638ca50" style:font-size-asian="24pt" style:font-weight-asian="bold" style:font-size-complex="24pt" style:font-weight-complex="bold"/>
    </style:style>
    <style:style style:name="P7" style:family="paragraph" style:parent-style-name="Standard">
      <style:paragraph-properties fo:text-align="left" style:justify-single-word="false"/>
      <style:text-properties fo:font-size="14pt" fo:font-weight="bold" officeooo:rsid="08142063" officeooo:paragraph-rsid="0638ca50" style:font-size-asian="14pt" style:font-weight-asian="bold" style:font-size-complex="14pt" style:font-weight-complex="bold"/>
    </style:style>
    <style:style style:name="P8" style:family="paragraph" style:parent-style-name="Standard">
      <style:paragraph-properties fo:text-align="right" style:justify-single-word="false"/>
      <style:text-properties fo:font-size="14pt" fo:font-weight="bold" officeooo:rsid="381fa95b" officeooo:paragraph-rsid="0638ca50" style:font-size-asian="14pt" style:font-weight-asian="bold" style:font-size-complex="14pt" style:font-weight-complex="bold"/>
    </style:style>
    <style:style style:name="P9" style:family="paragraph" style:parent-style-name="Standard">
      <style:text-properties officeooo:paragraph-rsid="0638ca50"/>
    </style:style>
    <style:style style:name="P10" style:family="paragraph" style:parent-style-name="Standard">
      <style:paragraph-properties fo:text-align="justify" style:justify-single-word="false"/>
      <style:text-properties officeooo:paragraph-rsid="0638ca50"/>
    </style:style>
    <style:style style:name="P11" style:family="paragraph" style:parent-style-name="Standard">
      <style:paragraph-properties fo:text-align="center" style:justify-single-word="false"/>
      <style:text-properties fo:font-size="28pt" fo:font-weight="bold" officeooo:rsid="003a7ac6" officeooo:paragraph-rsid="0638ca50"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24pt" fo:font-weight="bold" officeooo:rsid="05684629" officeooo:paragraph-rsid="0638ca50" style:font-size-asian="24pt" style:font-weight-asian="bold" style:font-size-complex="24pt" style:font-weight-complex="bold"/>
    </style:style>
    <style:style style:name="P13" style:family="paragraph" style:parent-style-name="Standard">
      <style:paragraph-properties fo:text-align="center" style:justify-single-word="false"/>
      <style:text-properties fo:font-size="14pt" fo:font-weight="bold" officeooo:rsid="00472875" officeooo:paragraph-rsid="00433ec1"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81dc5d0" officeooo:paragraph-rsid="00433ec1" style:font-size-asian="14pt" style:font-weight-asian="bold" style:font-size-complex="14pt" style:font-weight-complex="bold"/>
    </style:style>
    <style:style style:name="P15" style:family="paragraph" style:parent-style-name="Standard">
      <style:text-properties fo:font-size="13pt" style:font-size-asian="13pt" style:font-size-complex="13pt"/>
    </style:style>
    <style:style style:name="P16" style:family="paragraph" style:parent-style-name="Standard">
      <style:text-properties fo:font-size="13pt" officeooo:paragraph-rsid="05b1c80e" style:font-size-asian="13pt" style:font-size-complex="13pt"/>
    </style:style>
    <style:style style:name="P17" style:family="paragraph" style:parent-style-name="Standard">
      <style:paragraph-properties fo:text-align="justify" style:justify-single-word="false"/>
      <style:text-properties fo:font-size="13pt" officeooo:paragraph-rsid="00433ec1" style:font-size-asian="13pt" style:font-size-complex="13pt"/>
    </style:style>
    <style:style style:name="P18" style:family="paragraph" style:parent-style-name="Standard">
      <style:paragraph-properties fo:text-align="justify" style:justify-single-word="false"/>
      <style:text-properties fo:font-size="13pt" fo:font-weight="normal" officeooo:rsid="00433ec1" officeooo:paragraph-rsid="00433ec1"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6d0dae" officeooo:paragraph-rsid="0219f66e" style:font-size-asian="13pt" style:font-weight-asian="normal" style:font-size-complex="13pt" style:font-weight-complex="normal"/>
    </style:style>
    <style:style style:name="P20" style:family="paragraph" style:parent-style-name="Standard">
      <style:paragraph-properties fo:text-align="left" style:justify-single-word="false"/>
      <style:text-properties fo:font-size="13pt" fo:font-weight="normal" officeooo:rsid="006d0dae" officeooo:paragraph-rsid="0219f66e" style:font-size-asian="13pt" style:font-weight-asian="normal" style:font-size-complex="13pt" style:font-weight-complex="normal"/>
    </style:style>
    <style:style style:name="P21" style:family="paragraph" style:parent-style-name="Standard">
      <style:paragraph-properties fo:text-align="left" style:justify-single-word="false"/>
      <style:text-properties fo:font-size="13pt" fo:font-weight="normal" officeooo:rsid="006d0dae" officeooo:paragraph-rsid="057d6690" style:font-size-asian="13pt" style:font-weight-asian="normal" style:font-size-complex="13pt" style:font-weight-complex="normal"/>
    </style:style>
    <style:style style:name="P22" style:family="paragraph" style:parent-style-name="Standard">
      <style:paragraph-properties fo:text-align="left" style:justify-single-word="false"/>
      <style:text-properties officeooo:paragraph-rsid="057d6690"/>
    </style:style>
    <style:style style:name="P23" style:family="paragraph" style:parent-style-name="Standard">
      <style:paragraph-properties fo:text-align="left" style:justify-single-word="false"/>
      <style:text-properties officeooo:paragraph-rsid="0219f66e"/>
    </style:style>
    <style:style style:name="P24" style:family="paragraph" style:parent-style-name="Standard">
      <style:paragraph-properties fo:text-align="left" style:justify-single-word="false"/>
      <style:text-properties fo:font-size="13pt" officeooo:paragraph-rsid="0219f66e" style:font-size-asian="13pt" style:font-size-complex="13pt"/>
    </style:style>
    <style:style style:name="P25" style:family="paragraph" style:parent-style-name="Standard">
      <style:paragraph-properties fo:text-align="left" style:justify-single-word="false"/>
      <style:text-properties officeooo:paragraph-rsid="05bf9719"/>
    </style:style>
    <style:style style:name="P26" style:family="paragraph" style:parent-style-name="Standard">
      <style:paragraph-properties fo:text-align="left" style:justify-single-word="false"/>
      <style:text-properties style:use-window-font-color="true" loext:opacity="0%" fo:font-size="13pt" fo:font-style="normal" fo:font-weight="normal" officeooo:rsid="013533f3" officeooo:paragraph-rsid="0584881b"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left" style:justify-single-word="false"/>
      <style:text-properties fo:font-size="13pt" officeooo:paragraph-rsid="021b494b" style:font-size-asian="13pt" style:font-size-complex="13pt"/>
    </style:style>
    <style:style style:name="P28" style:family="paragraph" style:parent-style-name="Standard">
      <style:paragraph-properties fo:text-align="left" style:justify-single-word="false"/>
      <style:text-properties officeooo:paragraph-rsid="021b494b"/>
    </style:style>
    <style:style style:name="P29" style:family="paragraph" style:parent-style-name="Standard">
      <style:paragraph-properties fo:text-align="left" style:justify-single-word="false"/>
      <style:text-properties fo:font-size="13pt" fo:font-weight="normal" officeooo:rsid="006d0dae" officeooo:paragraph-rsid="02d54aa5" style:font-size-asian="13pt" style:font-weight-asian="normal" style:font-size-complex="13pt" style:font-weight-complex="normal"/>
    </style:style>
    <style:style style:name="P30" style:family="paragraph" style:parent-style-name="Standard">
      <style:paragraph-properties fo:text-align="left" style:justify-single-word="false"/>
      <style:text-properties fo:font-size="13pt" fo:font-weight="normal" officeooo:rsid="006d0dae" officeooo:paragraph-rsid="024ca763" style:font-size-asian="13pt" style:font-weight-asian="normal" style:font-size-complex="13pt" style:font-weight-complex="normal"/>
    </style:style>
    <style:style style:name="P31" style:family="paragraph" style:parent-style-name="Standard">
      <style:paragraph-properties fo:text-align="left" style:justify-single-word="false"/>
      <style:text-properties fo:font-size="13pt" officeooo:paragraph-rsid="05ad3c6a" style:font-size-asian="13pt" style:font-size-complex="13pt"/>
    </style:style>
    <style:style style:name="P32" style:family="paragraph" style:parent-style-name="Standard">
      <style:paragraph-properties fo:text-align="left" style:justify-single-word="false"/>
      <style:text-properties fo:font-size="13pt" officeooo:paragraph-rsid="05a8edf2" style:font-size-asian="13pt" style:font-size-complex="13pt"/>
    </style:style>
    <style:style style:name="P33" style:family="paragraph" style:parent-style-name="Standard">
      <style:paragraph-properties fo:text-align="left" style:justify-single-word="false"/>
      <style:text-properties fo:font-size="13pt" fo:font-weight="normal" officeooo:rsid="006d0dae" officeooo:paragraph-rsid="02d6aa2d" style:font-size-asian="13pt" style:font-weight-asian="normal" style:font-size-complex="13pt" style:font-weight-complex="normal"/>
    </style:style>
    <style:style style:name="P34" style:family="paragraph" style:parent-style-name="Standard">
      <style:paragraph-properties fo:text-align="left" style:justify-single-word="false"/>
      <style:text-properties officeooo:paragraph-rsid="05a8edf2"/>
    </style:style>
    <style:style style:name="P35" style:family="paragraph" style:parent-style-name="Standard">
      <style:paragraph-properties fo:text-align="left" style:justify-single-word="false"/>
      <style:text-properties fo:font-size="13pt" officeooo:paragraph-rsid="0543519c" style:font-size-asian="13pt" style:font-size-complex="13pt"/>
    </style:style>
    <style:style style:name="P36" style:family="paragraph" style:parent-style-name="Standard">
      <style:paragraph-properties fo:text-align="left" style:justify-single-word="false"/>
      <style:text-properties fo:font-size="13pt" fo:font-weight="normal" officeooo:rsid="02d6aa2d" officeooo:paragraph-rsid="0543519c" style:font-size-asian="13pt" style:font-weight-asian="normal" style:font-size-complex="13pt" style:font-weight-complex="normal"/>
    </style:style>
    <style:style style:name="P37" style:family="paragraph" style:parent-style-name="Standard">
      <style:paragraph-properties fo:text-align="left" style:justify-single-word="false"/>
      <style:text-properties fo:font-size="13pt" officeooo:paragraph-rsid="059cd2b4" style:font-size-asian="13pt" style:font-size-complex="13pt"/>
    </style:style>
    <style:style style:name="P38" style:family="paragraph" style:parent-style-name="Standard">
      <style:paragraph-properties fo:text-align="left" style:justify-single-word="false"/>
      <style:text-properties fo:font-size="13pt" fo:font-weight="normal" officeooo:rsid="054941da" officeooo:paragraph-rsid="0543519c" style:font-size-asian="13pt" style:font-weight-asian="normal" style:font-size-complex="13pt" style:font-weight-complex="normal"/>
    </style:style>
    <style:style style:name="P39" style:family="paragraph" style:parent-style-name="Standard">
      <style:paragraph-properties fo:text-align="left" style:justify-single-word="false"/>
      <style:text-properties fo:font-size="13pt" fo:font-weight="normal" officeooo:rsid="054941da" officeooo:paragraph-rsid="054941da" style:font-size-asian="13pt" style:font-weight-asian="normal" style:font-size-complex="13pt" style:font-weight-complex="normal"/>
    </style:style>
    <style:style style:name="P40" style:family="paragraph" style:parent-style-name="Standard">
      <style:paragraph-properties fo:text-align="left" style:justify-single-word="false"/>
      <style:text-properties fo:font-size="13pt" fo:font-weight="normal" officeooo:rsid="0638ca50" officeooo:paragraph-rsid="0638ca50" style:font-size-asian="13pt" style:font-weight-asian="normal" style:font-size-complex="13pt" style:font-weight-complex="normal"/>
    </style:style>
    <style:style style:name="P41" style:family="paragraph" style:parent-style-name="Standard">
      <style:paragraph-properties fo:text-align="center" style:justify-single-word="false"/>
      <style:text-properties fo:font-size="18pt" fo:font-weight="bold" officeooo:rsid="052baf14" officeooo:paragraph-rsid="000d9af3" style:font-size-asian="18pt" style:font-weight-asian="bold" style:font-size-complex="18pt" style:font-weight-complex="bold"/>
    </style:style>
    <style:style style:name="P42" style:family="paragraph" style:parent-style-name="Standard">
      <style:paragraph-properties fo:text-align="justify" style:justify-single-word="false"/>
      <style:text-properties fo:font-size="12pt" fo:font-weight="bold" officeooo:rsid="052baf14" officeooo:paragraph-rsid="000d9af3"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use-window-font-color="true" loext:opacity="0%" fo:font-size="12pt" fo:font-weight="normal" officeooo:rsid="05b918d9" officeooo:paragraph-rsid="000d9af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use-window-font-color="true" loext:opacity="0%" fo:font-size="12pt" fo:font-weight="normal" officeooo:rsid="05c1c7fd" officeooo:paragraph-rsid="000d9af3" style:font-size-asian="10.5pt" style:font-weight-asian="normal" style:font-size-complex="12pt" style:font-weight-complex="normal"/>
    </style:style>
    <style:style style:name="P45" style:family="paragraph" style:parent-style-name="Table_20_Contents">
      <style:paragraph-properties fo:text-align="left" style:justify-single-word="false"/>
      <style:text-properties officeooo:paragraph-rsid="000d9af3"/>
    </style:style>
    <style:style style:name="P46" style:family="paragraph" style:parent-style-name="Table_20_Contents">
      <style:paragraph-properties fo:text-align="left" style:justify-single-word="false"/>
      <style:text-properties fo:font-weight="normal" officeooo:rsid="05c1c7fd" officeooo:paragraph-rsid="000d9af3" style:font-weight-asian="normal" style:font-weight-complex="normal"/>
    </style:style>
    <style:style style:name="P47" style:family="paragraph" style:parent-style-name="Standard">
      <style:paragraph-properties fo:text-align="justify" style:justify-single-word="false"/>
      <style:text-properties officeooo:paragraph-rsid="000d9af3"/>
    </style:style>
    <style:style style:name="P48" style:family="paragraph" style:parent-style-name="Table_20_Contents">
      <style:paragraph-properties fo:text-align="left" style:justify-single-word="false"/>
      <style:text-properties fo:font-weight="normal" officeooo:rsid="05c2428c" officeooo:paragraph-rsid="000d9af3" style:font-weight-asian="normal" style:font-weight-complex="normal"/>
    </style:style>
    <style:style style:name="P49" style:family="paragraph" style:parent-style-name="Standard">
      <style:paragraph-properties fo:text-align="justify" style:justify-single-word="false"/>
      <style:text-properties style:use-window-font-color="true" loext:opacity="0%" fo:font-size="12pt" fo:font-weight="normal" officeooo:rsid="05c26972" officeooo:paragraph-rsid="000d9af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use-window-font-color="true" loext:opacity="0%" fo:font-size="12pt" fo:font-weight="normal" officeooo:rsid="05c3f1a8" officeooo:paragraph-rsid="000d9af3" style:font-size-asian="10.5pt" style:font-weight-asian="normal" style:font-size-complex="12pt" style:font-weight-complex="normal"/>
    </style:style>
    <style:style style:name="P51" style:family="paragraph" style:parent-style-name="Table_20_Contents">
      <style:paragraph-properties fo:text-align="left" style:justify-single-word="false"/>
      <style:text-properties fo:font-weight="normal" officeooo:rsid="05c3f1a8" officeooo:paragraph-rsid="000d9af3" style:font-weight-asian="normal" style:font-weight-complex="normal"/>
    </style:style>
    <style:style style:name="P52" style:family="paragraph" style:parent-style-name="Standard">
      <style:paragraph-properties fo:text-align="justify" style:justify-single-word="false"/>
      <style:text-properties officeooo:paragraph-rsid="063c7762"/>
    </style:style>
    <style:style style:name="P53" style:family="paragraph" style:parent-style-name="Standard">
      <style:paragraph-properties fo:text-align="justify" style:justify-single-word="false"/>
      <style:text-properties style:use-window-font-color="true" loext:opacity="0%" fo:font-size="12pt" fo:font-weight="normal" officeooo:rsid="05c423df" officeooo:paragraph-rsid="000d9af3"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officeooo:paragraph-rsid="05b05131"/>
    </style:style>
    <style:style style:name="P55" style:family="paragraph" style:parent-style-name="Standard">
      <style:paragraph-properties fo:text-align="justify" style:justify-single-word="false"/>
      <style:text-properties officeooo:paragraph-rsid="063e2038"/>
    </style:style>
    <style:style style:name="P56" style:family="paragraph" style:parent-style-name="Footnote">
      <style:text-properties officeooo:paragraph-rsid="05cb84bd"/>
    </style:style>
    <style:style style:name="P57" style:family="paragraph" style:parent-style-name="Standard">
      <style:paragraph-properties fo:margin-left="0in" fo:margin-right="0in" style:line-height-at-least="0.198in" fo:text-indent="0in" style:auto-text-indent="false"/>
      <style:text-properties style:font-name="Courier" fo:font-size="11pt" officeooo:paragraph-rsid="000d9af3" style:font-size-asian="11pt" style:font-size-complex="11pt"/>
    </style:style>
    <style:style style:name="P58" style:family="paragraph" style:parent-style-name="Standard">
      <style:paragraph-properties style:line-height-at-least="0.198in"/>
      <style:text-properties style:font-name="Courier" fo:font-size="11pt" officeooo:paragraph-rsid="000d9af3" style:font-size-asian="11pt" style:font-size-complex="11pt"/>
    </style:style>
    <style:style style:name="P59" style:family="paragraph" style:parent-style-name="Standard">
      <style:paragraph-properties fo:margin-left="0in" fo:margin-right="0in" style:line-height-at-least="0.198in" fo:text-indent="0in" style:auto-text-indent="false"/>
      <style:text-properties officeooo:paragraph-rsid="000d9af3"/>
    </style:style>
    <style:style style:name="P60" style:family="paragraph" style:parent-style-name="Table_20_Contents">
      <style:paragraph-properties fo:text-align="justify" style:justify-single-word="false"/>
      <style:text-properties style:font-name="Courier" fo:font-size="11pt" officeooo:paragraph-rsid="000d9af3" style:font-size-asian="11pt" style:font-size-complex="11pt"/>
    </style:style>
    <style:style style:name="P61" style:family="paragraph" style:parent-style-name="Table_20_Contents">
      <style:paragraph-properties fo:text-align="justify" style:justify-single-word="false"/>
      <style:text-properties fo:color="#00a933" loext:opacity="100%" style:font-name="Courier" fo:font-size="10pt" officeooo:rsid="05c5e829" officeooo:paragraph-rsid="000d9af3" style:font-size-asian="10pt" style:font-size-complex="10pt"/>
    </style:style>
    <style:style style:name="P62" style:family="paragraph" style:parent-style-name="Standard">
      <style:paragraph-properties fo:text-align="justify" style:justify-single-word="false"/>
      <style:text-properties style:use-window-font-color="true" loext:opacity="0%" fo:font-size="12pt" fo:font-weight="normal" officeooo:rsid="05cc2087" officeooo:paragraph-rsid="000d9af3" style:font-size-asian="10.5pt" style:font-weight-asian="normal" style:font-size-complex="12pt" style:font-weight-complex="normal"/>
    </style:style>
    <style:style style:name="P63" style:family="paragraph" style:parent-style-name="Footnote">
      <style:text-properties officeooo:paragraph-rsid="063e2038"/>
    </style:style>
    <style:style style:name="P6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0d9af3" fo:background-color="#ffffff" style:font-size-asian="11pt" style:font-size-complex="11pt"/>
    </style:style>
    <style:style style:name="P65" style:family="paragraph" style:parent-style-name="Standard">
      <style:paragraph-properties fo:margin-left="0in" fo:margin-right="0in" style:line-height-at-least="0.198in" fo:text-indent="0in" style:auto-text-indent="false"/>
      <style:text-properties fo:color="#a31515" loext:opacity="100%" style:font-name="Courier" fo:font-size="11pt" fo:font-weight="normal" officeooo:paragraph-rsid="000d9af3" fo:background-color="#ffffff" style:font-size-asian="11pt" style:font-size-complex="11pt"/>
    </style:style>
    <style:style style:name="P66" style:family="paragraph" style:parent-style-name="Standard">
      <style:paragraph-properties fo:text-align="justify" style:justify-single-word="false"/>
      <style:text-properties style:use-window-font-color="true" loext:opacity="0%" fo:font-size="12pt" fo:font-weight="normal" officeooo:rsid="05cf0919" officeooo:paragraph-rsid="000d9af3"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loext:opacity="100%" style:font-name="Courier" fo:font-size="11pt" fo:font-weight="normal" officeooo:paragraph-rsid="000d9af3" fo:background-color="#ffffff" style:font-size-asian="11pt" style:font-size-complex="11pt"/>
    </style:style>
    <style:style style:name="P68" style:family="paragraph" style:parent-style-name="Standard">
      <style:paragraph-properties fo:text-align="justify" style:justify-single-word="false"/>
      <style:text-properties style:use-window-font-color="true" loext:opacity="0%" fo:font-size="12pt" fo:font-weight="normal" officeooo:rsid="05d31a9e" officeooo:paragraph-rsid="000d9af3" style:font-size-asian="10.5pt" style:font-weight-asian="normal" style:font-size-complex="12pt" style:font-weight-complex="normal"/>
    </style:style>
    <style:style style:name="P69" style:family="paragraph" style:parent-style-name="Horizontal_20_Line">
      <style:text-properties officeooo:paragraph-rsid="000d9af3"/>
    </style:style>
    <style:style style:name="P70" style:family="paragraph" style:parent-style-name="Standard">
      <style:paragraph-properties fo:margin-left="0in" fo:margin-right="0in" style:line-height-at-least="0.198in" fo:text-indent="0in" style:auto-text-indent="false"/>
      <style:text-properties style:use-window-font-color="true" loext:opacity="0%" style:font-name="Courier" fo:font-size="10pt" fo:font-weight="normal" officeooo:rsid="05d48597" officeooo:paragraph-rsid="000d9af3" fo:background-color="#ffffff" style:font-size-asian="10pt" style:font-size-complex="10pt"/>
    </style:style>
    <style:style style:name="P71" style:family="paragraph" style:parent-style-name="Standard">
      <style:paragraph-properties fo:text-align="center" style:justify-single-word="false"/>
      <style:text-properties style:use-window-font-color="true" loext:opacity="0%" fo:font-size="12pt" fo:font-weight="bold" officeooo:rsid="05d61464" officeooo:paragraph-rsid="000d9af3" style:font-size-asian="10.5pt" style:font-weight-asian="bold" style:font-size-complex="12pt" style:font-weight-complex="bold"/>
    </style:style>
    <style:style style:name="P72" style:family="paragraph" style:parent-style-name="Standard">
      <style:paragraph-properties fo:text-align="justify" style:justify-single-word="false"/>
      <style:text-properties style:use-window-font-color="true" loext:opacity="0%" fo:font-size="12pt" fo:font-weight="normal" officeooo:rsid="05d61464" officeooo:paragraph-rsid="000d9af3"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use-window-font-color="true" loext:opacity="0%" fo:font-size="12pt" fo:font-weight="normal" officeooo:rsid="05d802db" officeooo:paragraph-rsid="000d9af3"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use-window-font-color="true" loext:opacity="0%" fo:font-size="12pt" fo:font-weight="normal" officeooo:rsid="063e2038" officeooo:paragraph-rsid="063e2038" style:font-size-asian="10.5pt" style:font-weight-asian="normal" style:font-size-complex="12pt" style:font-weight-complex="normal"/>
    </style:style>
    <style:style style:name="P75" style:family="paragraph" style:parent-style-name="Footnote">
      <style:text-properties officeooo:paragraph-rsid="05e11ccb"/>
    </style:style>
    <style:style style:name="P76" style:family="paragraph" style:parent-style-name="Standard">
      <style:paragraph-properties fo:text-align="left" style:justify-single-word="false"/>
      <style:text-properties fo:color="#000000" loext:opacity="100%" style:font-name="Courier" fo:font-size="11pt" fo:font-weight="normal" officeooo:rsid="05d802db" officeooo:paragraph-rsid="000d9af3" fo:background-color="#ffffff" style:font-size-asian="11pt" style:font-weight-asian="normal" style:font-size-complex="11pt" style:font-weight-complex="normal"/>
    </style:style>
    <style:style style:name="P77"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00d9af3" fo:background-color="#ffffff" style:font-size-asian="11pt" style:font-size-complex="11pt"/>
    </style:style>
    <style:style style:name="P78" style:family="paragraph" style:parent-style-name="Table_20_Contents">
      <style:paragraph-properties fo:text-align="left" style:justify-single-word="false"/>
      <style:text-properties fo:font-weight="normal" officeooo:rsid="05d802db" officeooo:paragraph-rsid="000d9af3" style:font-weight-asian="normal" style:font-weight-complex="normal"/>
    </style:style>
    <style:style style:name="P79" style:family="paragraph" style:parent-style-name="Table_20_Contents">
      <style:paragraph-properties fo:text-align="left" style:justify-single-word="false"/>
      <style:text-properties fo:color="#00a933" loext:opacity="100%" style:font-name="Courier" fo:font-size="10pt" fo:font-style="italic" fo:font-weight="normal" officeooo:rsid="05d9f7fa" officeooo:paragraph-rsid="000d9af3" fo:background-color="transparent" style:font-size-asian="10pt" style:font-style-asian="italic" style:font-weight-asian="normal" style:font-size-complex="10pt" style:font-style-complex="italic" style:font-weight-complex="normal"/>
    </style:style>
    <style:style style:name="P80" style:family="paragraph" style:parent-style-name="Footnote">
      <style:text-properties officeooo:paragraph-rsid="063fba02"/>
    </style:style>
    <style:style style:name="P81" style:family="paragraph" style:parent-style-name="Footnote">
      <style:text-properties officeooo:paragraph-rsid="05e30381"/>
    </style:style>
    <style:style style:name="P82" style:family="paragraph" style:parent-style-name="Standard">
      <style:paragraph-properties fo:text-align="justify" style:justify-single-word="false"/>
      <style:text-properties style:use-window-font-color="true" loext:opacity="0%" fo:font-size="12pt" fo:font-weight="normal" officeooo:rsid="05e11ccb" officeooo:paragraph-rsid="063e2038"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officeooo:paragraph-rsid="063fba02"/>
    </style:style>
    <style:style style:name="P84" style:family="paragraph" style:parent-style-name="Standard">
      <style:paragraph-properties fo:text-align="justify" style:justify-single-word="false"/>
      <style:text-properties style:use-window-font-color="true" loext:opacity="0%" fo:font-size="12pt" fo:font-weight="normal" officeooo:rsid="05e4c70c" officeooo:paragraph-rsid="000d9af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loext:opacity="0%" style:font-name="Courier" fo:font-size="12pt" fo:font-weight="normal" officeooo:rsid="05d802db" officeooo:paragraph-rsid="000d9af3" style:font-size-asian="10.5pt" style:font-weight-asian="normal" style:font-size-complex="12pt" style:font-weight-complex="normal"/>
    </style:style>
    <style:style style:name="P86" style:family="paragraph" style:parent-style-name="Table_20_Contents">
      <style:paragraph-properties fo:text-align="left" style:justify-single-word="false"/>
      <style:text-properties fo:font-size="12pt" officeooo:rsid="05e673e7" officeooo:paragraph-rsid="000d9af3" style:font-size-asian="10.5pt" style:font-size-complex="12pt"/>
    </style:style>
    <style:style style:name="P87" style:family="paragraph" style:parent-style-name="Standard">
      <style:paragraph-properties fo:text-align="left" style:justify-single-word="false"/>
      <style:text-properties officeooo:paragraph-rsid="000d9af3"/>
    </style:style>
    <style:style style:name="P88" style:family="paragraph" style:parent-style-name="Footnote">
      <style:text-properties officeooo:rsid="05e7230c" officeooo:paragraph-rsid="05e7230c"/>
    </style:style>
    <style:style style:name="P89" style:family="paragraph" style:parent-style-name="Table_20_Contents">
      <style:paragraph-properties fo:text-align="justify" style:justify-single-word="false"/>
      <style:text-properties fo:font-size="12pt" officeooo:rsid="05e7230c" officeooo:paragraph-rsid="000d9af3" style:font-size-asian="10.5pt" style:font-size-complex="12pt"/>
    </style:style>
    <style:style style:name="P90" style:family="paragraph" style:parent-style-name="Table_20_Contents">
      <style:paragraph-properties fo:text-align="justify" style:justify-single-word="false"/>
      <style:text-properties fo:font-size="12pt" officeooo:rsid="05e8f561" officeooo:paragraph-rsid="000d9af3" style:font-size-asian="10.5pt" style:font-size-complex="12pt"/>
    </style:style>
    <style:style style:name="P91" style:family="paragraph" style:parent-style-name="Standard">
      <style:paragraph-properties fo:text-align="center" style:justify-single-word="false"/>
      <style:text-properties style:use-window-font-color="true" loext:opacity="0%" fo:font-size="12pt" fo:font-weight="normal" officeooo:rsid="005312bc" officeooo:paragraph-rsid="005312b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use-window-font-color="true" loext:opacity="0%" fo:font-size="12pt" fo:font-weight="normal" officeooo:rsid="05ee483e" officeooo:paragraph-rsid="000d9af3" style:font-size-asian="10.5pt" style:font-weight-asian="normal" style:font-size-complex="12pt" style:font-weight-complex="normal"/>
    </style:style>
    <style:style style:name="P93" style:family="paragraph" style:parent-style-name="Footnote">
      <style:text-properties officeooo:paragraph-rsid="05ee483e"/>
    </style:style>
    <style:style style:name="P94" style:family="paragraph" style:parent-style-name="Standard">
      <style:paragraph-properties fo:text-align="justify" style:justify-single-word="false"/>
      <style:text-properties style:use-window-font-color="true" loext:opacity="0%" fo:font-size="12pt" fo:font-weight="normal" officeooo:rsid="063fba02" officeooo:paragraph-rsid="063fba02"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use-window-font-color="true" loext:opacity="0%" fo:font-size="12pt" fo:font-weight="normal" officeooo:rsid="05eefd66" officeooo:paragraph-rsid="063fba02"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style:use-window-font-color="true" loext:opacity="0%" fo:font-size="12pt" fo:font-weight="bold" officeooo:rsid="05f55eb8" officeooo:paragraph-rsid="000d9af3" style:font-size-asian="10.5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loext:opacity="0%" fo:font-size="12pt" fo:font-weight="normal" officeooo:rsid="05e11ccb" officeooo:paragraph-rsid="000d9af3" style:font-size-asian="10.5pt" style:font-weight-asian="normal" style:font-size-complex="12pt" style:font-weight-complex="normal"/>
    </style:style>
    <style:style style:name="P98" style:family="paragraph" style:parent-style-name="Standard">
      <style:paragraph-properties fo:text-align="left" style:justify-single-word="false"/>
      <style:text-properties officeooo:paragraph-rsid="05d96717"/>
    </style:style>
    <style:style style:name="P99" style:family="paragraph" style:parent-style-name="Standard">
      <style:paragraph-properties fo:text-align="left" style:justify-single-word="false"/>
      <style:text-properties style:use-window-font-color="true" loext:opacity="0%" fo:font-size="12pt" fo:font-style="italic" fo:font-weight="normal" officeooo:rsid="05f75b53" officeooo:paragraph-rsid="05d96717"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left" style:justify-single-word="false"/>
      <style:text-properties fo:font-style="italic" officeooo:paragraph-rsid="000d9af3" style:font-style-asian="italic" style:font-style-complex="italic"/>
    </style:style>
    <style:style style:name="P101" style:family="paragraph" style:parent-style-name="Standard">
      <style:paragraph-properties fo:text-align="justify" style:justify-single-word="false"/>
      <style:text-properties style:use-window-font-color="true" loext:opacity="0%" fo:font-size="12pt" fo:font-weight="normal" officeooo:rsid="05f75b53" officeooo:paragraph-rsid="000d9af3" style:font-size-asian="10.5pt" style:font-weight-asian="normal" style:font-size-complex="12pt" style:font-weight-complex="normal"/>
    </style:style>
    <style:style style:name="P102" style:family="paragraph" style:parent-style-name="Table_20_Contents">
      <style:paragraph-properties fo:text-align="left" style:justify-single-word="false"/>
      <style:text-properties fo:font-weight="normal" officeooo:rsid="05f75b53" officeooo:paragraph-rsid="000d9af3" style:font-weight-asian="normal" style:font-weight-complex="normal"/>
    </style:style>
    <style:style style:name="P103" style:family="paragraph" style:parent-style-name="Standard">
      <style:paragraph-properties fo:text-align="justify" style:justify-single-word="false"/>
      <style:text-properties style:use-window-font-color="true" loext:opacity="0%" fo:font-size="12pt" fo:font-weight="normal" officeooo:rsid="05fafb16" officeooo:paragraph-rsid="000d9af3" style:font-size-asian="10.5pt" style:font-weight-asian="normal" style:font-size-complex="12pt" style:font-weight-complex="normal"/>
    </style:style>
    <style:style style:name="P104" style:family="paragraph" style:parent-style-name="Standard" style:list-style-name="L1">
      <style:paragraph-properties fo:text-align="justify" style:justify-single-word="false"/>
      <style:text-properties officeooo:paragraph-rsid="05d96717"/>
    </style:style>
    <style:style style:name="P105" style:family="paragraph" style:parent-style-name="Standard" style:list-style-name="L2">
      <style:paragraph-properties fo:text-align="justify" style:justify-single-word="false"/>
      <style:text-properties style:use-window-font-color="true" loext:opacity="0%" fo:font-size="12pt" fo:font-weight="normal" officeooo:rsid="05fafb16" officeooo:paragraph-rsid="000d9af3" style:font-size-asian="10.5pt" style:font-weight-asian="normal" style:font-size-complex="12pt" style:font-weight-complex="normal"/>
    </style:style>
    <style:style style:name="P106" style:family="paragraph" style:parent-style-name="Table_20_Contents">
      <style:paragraph-properties fo:text-align="left" style:justify-single-word="false"/>
      <style:text-properties fo:font-weight="normal" officeooo:rsid="05fc90e1" officeooo:paragraph-rsid="000d9af3" style:font-weight-asian="normal" style:font-weight-complex="normal"/>
    </style:style>
    <style:style style:name="P107" style:family="paragraph" style:parent-style-name="Standard">
      <style:paragraph-properties fo:text-align="justify" style:justify-single-word="false"/>
      <style:text-properties officeooo:paragraph-rsid="05da9c4e"/>
    </style:style>
    <style:style style:name="P108" style:family="paragraph" style:parent-style-name="Standard">
      <style:paragraph-properties fo:text-align="justify" style:justify-single-word="false"/>
      <style:text-properties style:use-window-font-color="true" loext:opacity="0%" fo:font-size="12pt" fo:font-weight="normal" officeooo:rsid="05fafb16" officeooo:paragraph-rsid="05da9c4e"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use-window-font-color="true" loext:opacity="0%" fo:font-size="12pt" fo:font-weight="normal" officeooo:rsid="0603e051" officeooo:paragraph-rsid="000d9af3" style:font-size-asian="10.5pt" style:font-weight-asian="normal" style:font-size-complex="12pt" style:font-weight-complex="normal"/>
    </style:style>
    <style:style style:name="P110" style:family="paragraph" style:parent-style-name="Standard">
      <style:paragraph-properties fo:text-align="center" style:justify-single-word="false"/>
      <style:text-properties style:use-window-font-color="true" loext:opacity="0%" fo:font-size="13pt" fo:font-weight="bold" officeooo:rsid="0614947f" officeooo:paragraph-rsid="000d9af3" style:font-size-asian="13pt" style:font-weight-asian="bold" style:font-size-complex="13pt" style:font-weight-complex="bold"/>
    </style:style>
    <style:style style:name="P111" style:family="paragraph" style:parent-style-name="Standard">
      <style:paragraph-properties fo:text-align="justify" style:justify-single-word="false"/>
      <style:text-properties style:use-window-font-color="true" loext:opacity="0%" fo:font-size="12pt" fo:font-weight="normal" officeooo:rsid="06085fe7" officeooo:paragraph-rsid="000d9af3" style:font-size-asian="10.5pt" style:font-weight-asian="normal" style:font-size-complex="12pt" style:font-weight-complex="normal"/>
    </style:style>
    <style:style style:name="P112" style:family="paragraph" style:parent-style-name="Footnote">
      <style:text-properties officeooo:paragraph-rsid="060e38e0"/>
    </style:style>
    <style:style style:name="P113" style:family="paragraph" style:parent-style-name="Standard">
      <style:paragraph-properties fo:text-align="justify" style:justify-single-word="false"/>
      <style:text-properties style:use-window-font-color="true" loext:opacity="0%" fo:font-size="12pt" fo:font-weight="normal" officeooo:rsid="06085fe7" officeooo:paragraph-rsid="05dc53d6" style:font-size-asian="10.5pt" style:font-weight-asian="normal" style:font-size-complex="12pt" style:font-weight-complex="normal"/>
    </style:style>
    <style:style style:name="P114" style:family="paragraph" style:parent-style-name="Preformatted_20_Text">
      <style:paragraph-properties fo:text-align="left" style:justify-single-word="false"/>
      <style:text-properties fo:font-weight="normal" officeooo:rsid="06085fe7" officeooo:paragraph-rsid="000d9af3" style:font-weight-asian="normal" style:font-weight-complex="normal"/>
    </style:style>
    <style:style style:name="P115" style:family="paragraph" style:parent-style-name="Preformatted_20_Text">
      <style:paragraph-properties fo:orphans="0" fo:widows="0"/>
      <style:text-properties officeooo:rsid="06085fe7" officeooo:paragraph-rsid="000d9af3"/>
    </style:style>
    <style:style style:name="P116" style:family="paragraph" style:parent-style-name="Preformatted_20_Text">
      <style:paragraph-properties fo:margin-top="0in" fo:margin-bottom="0.1965in" style:contextual-spacing="false" fo:orphans="0" fo:widows="0"/>
      <style:text-properties officeooo:rsid="06085fe7" officeooo:paragraph-rsid="000d9af3"/>
    </style:style>
    <style:style style:name="P117" style:family="paragraph" style:parent-style-name="Standard">
      <style:paragraph-properties fo:text-align="justify" style:justify-single-word="false"/>
      <style:text-properties officeooo:paragraph-rsid="05dc53d6"/>
    </style:style>
    <style:style style:name="P118" style:family="paragraph" style:parent-style-name="Footnote">
      <style:text-properties officeooo:paragraph-rsid="060a25bc"/>
    </style:style>
    <style:style style:name="P119" style:family="paragraph" style:parent-style-name="Table_20_Contents">
      <style:paragraph-properties fo:text-align="left" style:justify-single-word="false"/>
      <style:text-properties fo:font-weight="bold" officeooo:rsid="06085fe7" officeooo:paragraph-rsid="000d9af3" style:font-weight-asian="bold" style:font-weight-complex="bold"/>
    </style:style>
    <style:style style:name="P120" style:family="paragraph" style:parent-style-name="Table_20_Contents">
      <style:paragraph-properties fo:text-align="left" style:justify-single-word="false"/>
      <style:text-properties fo:font-weight="normal" officeooo:rsid="06085fe7" officeooo:paragraph-rsid="000d9af3" style:font-weight-asian="normal" style:font-weight-complex="normal"/>
    </style:style>
    <style:style style:name="P121" style:family="paragraph" style:parent-style-name="Table_20_Contents">
      <style:paragraph-properties fo:text-align="left" style:justify-single-word="false"/>
      <style:text-properties fo:font-weight="normal" officeooo:rsid="060b7a77" officeooo:paragraph-rsid="000d9af3" style:font-weight-asian="normal" style:font-weight-complex="normal"/>
    </style:style>
    <style:style style:name="P122" style:family="paragraph" style:parent-style-name="Footnote">
      <style:text-properties officeooo:rsid="060da35d" officeooo:paragraph-rsid="060da35d"/>
    </style:style>
    <style:style style:name="P123" style:family="paragraph" style:parent-style-name="Standard">
      <style:paragraph-properties fo:text-align="justify" style:justify-single-word="false"/>
      <style:text-properties officeooo:rsid="05dc53d6" officeooo:paragraph-rsid="05dc53d6"/>
    </style:style>
    <style:style style:name="P124" style:family="paragraph" style:parent-style-name="Standard">
      <style:paragraph-properties fo:text-align="justify" style:justify-single-word="false"/>
      <style:text-properties officeooo:rsid="06101188" officeooo:paragraph-rsid="000d9af3"/>
    </style:style>
    <style:style style:name="P125" style:family="paragraph" style:parent-style-name="Table_20_Contents" style:list-style-name="L3">
      <style:paragraph-properties fo:text-align="justify" style:justify-single-word="false"/>
      <style:text-properties fo:font-size="12pt" officeooo:rsid="06101188" officeooo:paragraph-rsid="000d9af3" style:font-size-asian="10.5pt" style:font-size-complex="12pt"/>
    </style:style>
    <style:style style:name="P126" style:family="paragraph" style:parent-style-name="Table_20_Contents">
      <style:paragraph-properties fo:text-align="justify" style:justify-single-word="false"/>
      <style:text-properties fo:font-size="12pt" fo:font-style="italic" officeooo:rsid="06101188" officeooo:paragraph-rsid="000d9af3" style:font-size-asian="10.5pt" style:font-style-asian="italic" style:font-size-complex="12pt" style:font-style-complex="italic"/>
    </style:style>
    <style:style style:name="P127" style:family="paragraph" style:parent-style-name="Standard" style:list-style-name="L3">
      <style:paragraph-properties fo:text-align="justify" style:justify-single-word="false"/>
      <style:text-properties fo:font-size="12pt" officeooo:rsid="06101188" officeooo:paragraph-rsid="000d9af3" style:font-size-asian="10.5pt" style:font-size-complex="12pt"/>
    </style:style>
    <style:style style:name="P128" style:family="paragraph" style:parent-style-name="Table_20_Contents">
      <style:paragraph-properties fo:text-align="justify" style:justify-single-word="false"/>
      <style:text-properties fo:font-size="12pt" officeooo:rsid="06101188" officeooo:paragraph-rsid="000d9af3" style:font-size-asian="10.5pt" style:font-size-complex="12pt"/>
    </style:style>
    <style:style style:name="P129" style:family="paragraph" style:parent-style-name="Table_20_Contents">
      <style:paragraph-properties fo:text-align="justify" style:justify-single-word="false"/>
      <style:text-properties fo:font-style="italic" officeooo:paragraph-rsid="000d9af3" style:font-style-asian="italic" style:font-style-complex="italic"/>
    </style:style>
    <style:style style:name="P130" style:family="paragraph" style:parent-style-name="Footnote">
      <style:text-properties officeooo:paragraph-rsid="0612e2ce"/>
    </style:style>
    <style:style style:name="P131" style:family="paragraph" style:parent-style-name="Table_20_Contents">
      <style:paragraph-properties fo:text-align="justify" style:justify-single-word="false"/>
      <style:text-properties fo:font-size="12pt" officeooo:rsid="0612e2ce" officeooo:paragraph-rsid="000d9af3" style:font-size-asian="10.5pt" style:font-size-complex="12pt"/>
    </style:style>
    <style:style style:name="P132" style:family="paragraph" style:parent-style-name="Table_20_Contents">
      <style:paragraph-properties fo:text-align="left" style:justify-single-word="false"/>
      <style:text-properties fo:font-weight="normal" officeooo:rsid="0612e2ce" officeooo:paragraph-rsid="000d9af3" style:font-weight-asian="normal" style:font-weight-complex="normal"/>
    </style:style>
    <style:style style:name="P133" style:family="paragraph" style:parent-style-name="Standard">
      <style:paragraph-properties fo:text-align="justify" style:justify-single-word="false"/>
      <style:text-properties fo:font-size="12pt" officeooo:rsid="05dc53d6" officeooo:paragraph-rsid="05dc53d6" style:font-size-asian="10.5pt" style:font-size-complex="12pt"/>
    </style:style>
    <style:style style:name="P134" style:family="paragraph" style:parent-style-name="Standard" style:list-style-name="L4">
      <style:paragraph-properties fo:text-align="justify" style:justify-single-word="false"/>
      <style:text-properties fo:font-size="12pt" officeooo:rsid="05dc53d6" officeooo:paragraph-rsid="05dc53d6" style:font-size-asian="10.5pt" style:font-size-complex="12pt"/>
    </style:style>
    <style:style style:name="P135" style:family="paragraph" style:parent-style-name="Standard" style:list-style-name="L4">
      <style:paragraph-properties fo:text-align="justify" style:justify-single-word="false"/>
      <style:text-properties fo:font-size="12pt" officeooo:rsid="05dc53d6" officeooo:paragraph-rsid="064106a7" style:font-size-asian="10.5pt" style:font-size-complex="12pt"/>
    </style:style>
    <style:style style:name="P136" style:family="paragraph" style:parent-style-name="Table_20_Contents">
      <style:paragraph-properties fo:text-align="center" style:justify-single-word="false"/>
      <style:text-properties fo:font-size="12pt" fo:font-weight="bold" officeooo:rsid="061b0070" officeooo:paragraph-rsid="000d9af3" style:font-size-asian="10.5pt" style:font-weight-asian="bold" style:font-size-complex="12pt" style:font-weight-complex="bold"/>
    </style:style>
    <style:style style:name="P137" style:family="paragraph" style:parent-style-name="Table_20_Contents">
      <style:paragraph-properties fo:text-align="center" style:justify-single-word="false"/>
      <style:text-properties fo:font-size="13pt" fo:font-weight="bold" officeooo:rsid="061b0070" officeooo:paragraph-rsid="000d9af3" style:font-size-asian="13pt" style:font-weight-asian="bold" style:font-size-complex="13pt" style:font-weight-complex="bold"/>
    </style:style>
    <style:style style:name="P138" style:family="paragraph" style:parent-style-name="Table_20_Contents">
      <style:paragraph-properties fo:text-align="justify" style:justify-single-word="false"/>
      <style:text-properties fo:font-size="12pt" officeooo:rsid="06175bf4" officeooo:paragraph-rsid="000d9af3" style:font-size-asian="10.5pt" style:font-size-complex="12pt"/>
    </style:style>
    <style:style style:name="P139" style:family="paragraph" style:parent-style-name="Table_20_Contents">
      <style:paragraph-properties fo:text-align="justify" style:justify-single-word="false"/>
      <style:text-properties officeooo:paragraph-rsid="06421fbc"/>
    </style:style>
    <style:style style:name="P140" style:family="paragraph" style:parent-style-name="Footnote">
      <style:text-properties officeooo:paragraph-rsid="0617ed76"/>
    </style:style>
    <style:style style:name="P141" style:family="paragraph" style:parent-style-name="Table_20_Contents">
      <style:paragraph-properties fo:text-align="justify" style:justify-single-word="false"/>
      <style:text-properties fo:font-size="12pt" officeooo:rsid="06197fea" officeooo:paragraph-rsid="000d9af3" style:font-size-asian="10.5pt" style:font-size-complex="12pt"/>
    </style:style>
    <style:style style:name="P142" style:family="paragraph" style:parent-style-name="Text_20_body">
      <style:paragraph-properties fo:text-align="center" style:justify-single-word="false"/>
      <style:text-properties fo:font-weight="bold" officeooo:rsid="06222278" officeooo:paragraph-rsid="000d9af3" style:font-weight-asian="bold" style:font-weight-complex="bold"/>
    </style:style>
    <style:style style:name="P143" style:family="paragraph" style:parent-style-name="Footnote">
      <style:text-properties officeooo:rsid="05deaac4" officeooo:paragraph-rsid="05deaac4"/>
    </style:style>
    <style:style style:name="P144" style:family="paragraph" style:parent-style-name="Footnote">
      <style:text-properties officeooo:paragraph-rsid="05deaac4"/>
    </style:style>
    <style:style style:name="P145" style:family="paragraph" style:parent-style-name="Standard">
      <style:text-properties fo:font-size="12pt" officeooo:rsid="06222278" style:font-size-asian="10.5pt" style:font-size-complex="12pt"/>
    </style:style>
    <style:style style:name="P146" style:family="paragraph" style:parent-style-name="Table_20_Contents">
      <style:paragraph-properties fo:text-align="justify" style:justify-single-word="false"/>
      <style:text-properties officeooo:paragraph-rsid="000d9af3"/>
    </style:style>
    <style:style style:name="P147" style:family="paragraph" style:parent-style-name="Table_20_Contents">
      <style:paragraph-properties fo:text-align="justify" style:justify-single-word="false"/>
      <style:text-properties fo:font-size="12pt" officeooo:rsid="06225041" officeooo:paragraph-rsid="000d9af3" style:font-size-asian="10.5pt" style:font-size-complex="12pt"/>
    </style:style>
    <style:style style:name="P148" style:family="paragraph" style:parent-style-name="Table_20_Contents">
      <style:paragraph-properties fo:text-align="left" style:justify-single-word="false"/>
      <style:text-properties fo:font-weight="normal" officeooo:rsid="06136785" officeooo:paragraph-rsid="000d9af3" style:font-weight-asian="normal" style:font-weight-complex="normal"/>
    </style:style>
    <style:style style:name="P149" style:family="paragraph" style:parent-style-name="Table_20_Contents">
      <style:paragraph-properties fo:text-align="justify" style:justify-single-word="false"/>
      <style:text-properties fo:font-size="12pt" officeooo:rsid="06421fbc" officeooo:paragraph-rsid="000d9af3" style:font-size-asian="10.5pt" style:font-size-complex="12pt"/>
    </style:style>
    <style:style style:name="P150" style:family="paragraph" style:parent-style-name="Table_20_Contents">
      <style:paragraph-properties fo:text-align="justify" style:justify-single-word="false"/>
      <style:text-properties fo:font-size="12pt" officeooo:rsid="06235d3f" officeooo:paragraph-rsid="000d9af3" style:font-size-asian="10.5pt" style:font-size-complex="12pt"/>
    </style:style>
    <style:style style:name="P151" style:family="paragraph" style:parent-style-name="Table_20_Contents">
      <style:paragraph-properties fo:text-align="justify" style:justify-single-word="false"/>
      <style:text-properties fo:font-size="12pt" officeooo:rsid="05dfcc56" officeooo:paragraph-rsid="000d9af3" style:font-size-asian="10.5pt" style:font-size-complex="12pt"/>
    </style:style>
    <style:style style:name="P152" style:family="paragraph" style:parent-style-name="Standard" style:list-style-name="L5">
      <style:text-properties officeooo:paragraph-rsid="05dfcc56"/>
    </style:style>
    <style:style style:name="P153" style:family="paragraph" style:parent-style-name="Standard" style:list-style-name="L5">
      <style:text-properties officeooo:rsid="05dfcc56" officeooo:paragraph-rsid="05dfcc56"/>
    </style:style>
    <style:style style:name="P154" style:family="paragraph" style:parent-style-name="Standard">
      <style:text-properties fo:font-size="12pt" fo:font-weight="bold" officeooo:rsid="06353af5" style:font-size-asian="10.5pt" style:font-weight-asian="bold" style:font-size-complex="12pt" style:font-weight-complex="bold"/>
    </style:style>
    <style:style style:name="P155" style:family="paragraph" style:parent-style-name="Table_20_Contents">
      <style:paragraph-properties fo:text-align="center" style:justify-single-word="false"/>
      <style:text-properties fo:font-size="12pt" fo:font-weight="bold" officeooo:rsid="06353af5" officeooo:paragraph-rsid="000d9af3" style:font-size-asian="10.5pt" style:font-weight-asian="bold" style:font-size-complex="12pt" style:font-weight-complex="bold"/>
    </style:style>
    <style:style style:name="P156" style:family="paragraph" style:parent-style-name="Table_20_Contents">
      <style:paragraph-properties fo:text-align="center" style:justify-single-word="false"/>
      <style:text-properties fo:font-size="13pt" fo:font-weight="bold" officeooo:rsid="06353af5" officeooo:paragraph-rsid="000d9af3" style:font-size-asian="13pt" style:font-weight-asian="bold" style:font-size-complex="13pt" style:font-weight-complex="bold"/>
    </style:style>
    <style:style style:name="P157" style:family="paragraph" style:parent-style-name="Table_20_Contents">
      <style:paragraph-properties fo:text-align="justify" style:justify-single-word="false"/>
      <style:text-properties fo:font-size="12pt" officeooo:rsid="05b22025" officeooo:paragraph-rsid="000d9af3" style:font-size-asian="10.5pt" style:font-size-complex="12pt"/>
    </style:style>
    <style:style style:name="P158" style:family="paragraph" style:parent-style-name="Table_20_Contents" style:list-style-name="L6">
      <style:paragraph-properties fo:text-align="justify" style:justify-single-word="false"/>
      <style:text-properties officeooo:paragraph-rsid="05e161af"/>
    </style:style>
    <style:style style:name="P159" style:family="paragraph" style:parent-style-name="Table_20_Contents" style:list-style-name="L7">
      <style:paragraph-properties fo:text-align="justify" style:justify-single-word="false"/>
      <style:text-properties fo:font-size="12pt" officeooo:rsid="05b22025" officeooo:paragraph-rsid="000d9af3" style:font-size-asian="10.5pt" style:font-size-complex="12pt"/>
    </style:style>
    <style:style style:name="P160" style:family="paragraph" style:parent-style-name="Table_20_Contents">
      <style:paragraph-properties fo:text-align="justify" style:justify-single-word="false"/>
      <style:text-properties fo:font-size="12pt" officeooo:rsid="06101188" officeooo:paragraph-rsid="05e161af" style:font-size-asian="10.5pt" style:font-size-complex="12pt"/>
    </style:style>
    <style:style style:name="P161" style:family="paragraph" style:parent-style-name="Table_20_Contents">
      <style:paragraph-properties fo:text-align="justify" style:justify-single-word="false"/>
      <style:text-properties fo:font-size="12pt" officeooo:rsid="0627a98a" officeooo:paragraph-rsid="000d9af3" style:font-size-asian="10.5pt" style:font-size-complex="12pt"/>
    </style:style>
    <style:style style:name="P162" style:family="paragraph" style:parent-style-name="Footnote">
      <style:text-properties officeooo:paragraph-rsid="05b22025"/>
    </style:style>
    <style:style style:name="P163"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6281eec" officeooo:paragraph-rsid="000d9af3" fo:background-color="#ffffff" style:font-size-asian="10pt" style:font-style-asian="italic" style:font-size-complex="10pt" style:font-style-complex="italic"/>
    </style:style>
    <style:style style:name="P164" style:family="paragraph" style:parent-style-name="Table_20_Contents">
      <style:paragraph-properties fo:text-align="justify" style:justify-single-word="false"/>
      <style:text-properties fo:font-size="12pt" officeooo:rsid="0630df7a" officeooo:paragraph-rsid="000d9af3" style:font-size-asian="10.5pt" style:font-size-complex="12pt"/>
    </style:style>
    <style:style style:name="P165" style:family="paragraph" style:parent-style-name="Footnote">
      <style:text-properties officeooo:paragraph-rsid="0630df7a"/>
    </style:style>
    <style:style style:name="P166" style:family="paragraph" style:parent-style-name="Table_20_Contents">
      <style:paragraph-properties fo:text-align="justify" style:justify-single-word="false"/>
      <style:text-properties fo:font-size="12pt" officeooo:rsid="06318473" officeooo:paragraph-rsid="000d9af3" style:font-size-asian="10.5pt" style:font-size-complex="12pt"/>
    </style:style>
    <style:style style:name="P167" style:family="paragraph" style:parent-style-name="Footnote">
      <style:text-properties officeooo:paragraph-rsid="06339574"/>
    </style:style>
    <style:style style:name="P168" style:family="paragraph" style:parent-style-name="Table_20_Contents">
      <style:paragraph-properties fo:text-align="justify" style:justify-single-word="false"/>
      <style:text-properties style:use-window-font-color="true" loext:opacity="0%" fo:font-size="12pt" fo:font-weight="normal" officeooo:rsid="06339574" officeooo:paragraph-rsid="05e161af" style:font-size-asian="10.5pt" style:font-weight-asian="normal" style:font-size-complex="12pt" style:font-weight-complex="normal"/>
    </style:style>
    <style:style style:name="P169" style:family="paragraph" style:parent-style-name="Preformatted_20_Text">
      <style:paragraph-properties fo:text-align="left" style:justify-single-word="false"/>
      <style:text-properties fo:font-weight="normal" officeooo:rsid="06339574" officeooo:paragraph-rsid="000d9af3" style:font-weight-asian="normal" style:font-weight-complex="normal"/>
    </style:style>
    <style:style style:name="P170" style:family="paragraph" style:parent-style-name="Preformatted_20_Text">
      <style:paragraph-properties fo:orphans="0" fo:widows="0"/>
      <style:text-properties fo:font-weight="normal" officeooo:rsid="06339574" officeooo:paragraph-rsid="000d9af3" style:font-weight-asian="normal" style:font-weight-complex="normal"/>
    </style:style>
    <style:style style:name="P171" style:family="paragraph" style:parent-style-name="Preformatted_20_Text">
      <style:paragraph-properties fo:margin-top="0in" fo:margin-bottom="0.1965in" style:contextual-spacing="false" fo:orphans="0" fo:widows="0"/>
      <style:text-properties officeooo:rsid="06339574" officeooo:paragraph-rsid="000d9af3"/>
    </style:style>
    <style:style style:name="P172" style:family="paragraph" style:parent-style-name="Table_20_Contents">
      <style:paragraph-properties fo:text-align="center" style:justify-single-word="false"/>
      <style:text-properties officeooo:paragraph-rsid="000d9af3"/>
    </style:style>
    <style:style style:name="P173" style:family="paragraph" style:parent-style-name="Footnote">
      <style:text-properties officeooo:paragraph-rsid="0010f254"/>
    </style:style>
    <style:style style:name="P174" style:family="paragraph" style:parent-style-name="Standard">
      <style:text-properties style:use-window-font-color="true" loext:opacity="0%" fo:font-size="12pt" fo:font-weight="normal" officeooo:rsid="06362c90"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fo:color="#000000" loext:opacity="100%" style:font-name="Courier" fo:font-size="10.5pt" fo:font-weight="normal" officeooo:paragraph-rsid="000d9af3" fo:background-color="#ffffff" style:font-size-asian="10.5pt" style:font-size-complex="12pt"/>
    </style:style>
    <style:style style:name="P176" style:family="paragraph" style:parent-style-name="Standard">
      <style:paragraph-properties style:line-height-at-least="0.198in"/>
      <style:text-properties style:font-name="Courier" officeooo:paragraph-rsid="000d9af3"/>
    </style:style>
    <style:style style:name="P177" style:family="paragraph" style:parent-style-name="Table_20_Contents">
      <style:paragraph-properties fo:text-align="justify" style:justify-single-word="false"/>
      <style:text-properties style:font-name="Courier" fo:font-size="12pt" officeooo:paragraph-rsid="000d9af3" style:font-size-asian="10.5pt" style:font-size-complex="12pt"/>
    </style:style>
    <style:style style:name="P178" style:family="paragraph" style:parent-style-name="Table_20_Contents">
      <style:paragraph-properties fo:text-align="justify" style:justify-single-word="false"/>
      <style:text-properties fo:color="#00a933" loext:opacity="100%" style:font-name="Courier" fo:font-size="10pt" fo:font-style="italic" style:text-underline-style="none" officeooo:rsid="000f6efa" officeooo:paragraph-rsid="000f6efa" style:font-size-asian="10pt" style:font-style-asian="italic" style:font-size-complex="10pt" style:font-style-complex="italic"/>
    </style:style>
    <style:style style:name="P179" style:family="paragraph" style:parent-style-name="Standard">
      <style:paragraph-properties fo:text-align="justify" style:justify-single-word="false"/>
      <style:text-properties style:use-window-font-color="true" loext:opacity="0%" fo:font-size="12pt" fo:font-weight="normal" officeooo:rsid="06362c90" officeooo:paragraph-rsid="000d9af3"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officeooo:paragraph-rsid="0010d2a8"/>
    </style:style>
    <style:style style:name="P181" style:family="paragraph" style:parent-style-name="Standard">
      <style:paragraph-properties fo:text-align="justify" style:justify-single-word="false"/>
      <style:text-properties style:use-window-font-color="true" loext:opacity="0%" fo:font-size="12pt" fo:font-weight="normal" officeooo:rsid="0010d2a8" officeooo:paragraph-rsid="0010d2a8" style:font-size-asian="10.5pt" style:font-weight-asian="normal" style:font-size-complex="12pt" style:font-weight-complex="normal"/>
    </style:style>
    <style:style style:name="P182" style:family="paragraph" style:parent-style-name="Table_20_Contents">
      <style:paragraph-properties fo:text-align="justify" style:justify-single-word="false"/>
      <style:text-properties style:font-name="Courier" fo:font-size="12pt" fo:font-style="normal" officeooo:rsid="06222278" officeooo:paragraph-rsid="000d9af3" style:font-size-asian="10.5pt" style:font-style-asian="normal" style:font-size-complex="12pt" style:font-style-complex="normal"/>
    </style:style>
    <style:style style:name="P183" style:family="paragraph" style:parent-style-name="Table_20_Contents">
      <style:paragraph-properties fo:text-align="justify" style:justify-single-word="false"/>
      <style:text-properties fo:font-size="12pt" style:font-size-asian="10.5pt" style:font-size-complex="12pt"/>
    </style:style>
    <style:style style:name="P184" style:family="paragraph" style:parent-style-name="Standard">
      <style:paragraph-properties fo:text-align="center" style:justify-single-word="false"/>
      <style:text-properties style:use-window-font-color="true" loext:opacity="0%" fo:font-size="12pt" fo:font-weight="normal" officeooo:rsid="05a517e3" officeooo:paragraph-rsid="05a517e3" style:font-size-asian="10.5pt" style:font-weight-asian="normal" style:font-size-complex="12pt" style:font-weight-complex="normal"/>
    </style:style>
    <style:style style:name="P185" style:family="paragraph" style:parent-style-name="Table_20_Contents">
      <style:paragraph-properties fo:text-align="justify" style:justify-single-word="false"/>
      <style:text-properties officeooo:paragraph-rsid="0643734d"/>
    </style:style>
    <style:style style:name="P18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fo:background-color="#ffffff" style:font-size-asian="11pt" style:font-size-complex="11pt"/>
    </style:style>
    <style:style style:name="P18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13a84b" fo:background-color="#ffffff" style:font-size-asian="11pt" style:font-size-complex="11pt"/>
    </style:style>
    <style:style style:name="P188" style:family="paragraph" style:parent-style-name="Standard">
      <style:paragraph-properties style:line-height-at-least="0.198in"/>
      <style:text-properties style:font-name="Courier" fo:font-size="11pt" style:font-size-asian="11pt" style:font-size-complex="11pt"/>
    </style:style>
    <style:style style:name="P189"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013a84b" fo:background-color="#ffffff" style:font-size-asian="11pt" style:font-size-complex="11pt"/>
    </style:style>
    <style:style style:name="P190" style:family="paragraph" style:parent-style-name="Standard">
      <style:paragraph-properties fo:margin-left="0in" fo:margin-right="0in" style:line-height-at-least="0.198in" fo:text-indent="0in" style:auto-text-indent="false"/>
      <style:text-properties officeooo:paragraph-rsid="0013a84b"/>
    </style:style>
    <style:style style:name="P191" style:family="paragraph" style:parent-style-name="Standard">
      <style:paragraph-properties style:line-height-at-least="0.198in"/>
    </style:style>
    <style:style style:name="P192"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13a84b" fo:background-color="#ffffff"/>
    </style:style>
    <style:style style:name="P193"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officeooo:paragraph-rsid="0013a84b" fo:background-color="#ffffff"/>
    </style:style>
    <style:style style:name="P194" style:family="paragraph" style:parent-style-name="Standard">
      <style:paragraph-properties fo:margin-left="0in" fo:margin-right="0in" style:line-height-at-least="0.198in" fo:text-indent="0in" style:auto-text-indent="false"/>
      <style:text-properties style:font-name="Courier" officeooo:paragraph-rsid="0013a84b"/>
    </style:style>
    <style:style style:name="P195" style:family="paragraph" style:parent-style-name="Standard">
      <style:paragraph-properties fo:text-align="center" style:justify-single-word="false"/>
      <style:text-properties style:use-window-font-color="true" loext:opacity="0%" fo:font-size="12pt" fo:font-weight="bold" officeooo:rsid="001484f1" officeooo:paragraph-rsid="001484f1" style:font-size-asian="10.5pt" style:font-weight-asian="bold" style:font-size-complex="12pt" style:font-weight-complex="bold"/>
    </style:style>
    <style:style style:name="P196" style:family="paragraph" style:parent-style-name="Standard">
      <style:text-properties fo:font-style="italic" style:font-style-asian="italic" style:font-style-complex="italic"/>
    </style:style>
    <style:style style:name="P197" style:family="paragraph" style:parent-style-name="Standard">
      <style:paragraph-properties fo:text-align="justify" style:justify-single-word="false"/>
      <style:text-properties style:use-window-font-color="true" loext:opacity="0%" fo:font-size="12pt" fo:font-weight="normal" officeooo:rsid="0015e623" officeooo:paragraph-rsid="0015e623" style:font-size-asian="10.5pt" style:font-weight-asian="normal" style:font-size-complex="12pt" style:font-weight-complex="normal"/>
    </style:style>
    <style:style style:name="P198" style:family="paragraph" style:parent-style-name="Footnote">
      <style:text-properties officeooo:paragraph-rsid="0643734d"/>
    </style:style>
    <style:style style:name="P199" style:family="paragraph" style:parent-style-name="Table_20_Contents">
      <style:paragraph-properties fo:text-align="left" style:justify-single-word="false"/>
      <style:text-properties officeooo:paragraph-rsid="001671c2"/>
    </style:style>
    <style:style style:name="P200" style:family="paragraph" style:parent-style-name="Table_20_Contents">
      <style:paragraph-properties fo:text-align="left" style:justify-single-word="false"/>
      <style:text-properties fo:font-weight="normal" officeooo:rsid="001671c2" officeooo:paragraph-rsid="001671c2" style:font-weight-asian="normal" style:font-weight-complex="normal"/>
    </style:style>
    <style:style style:name="P201" style:family="paragraph" style:parent-style-name="Standard">
      <style:paragraph-properties fo:text-align="justify" style:justify-single-word="false"/>
    </style:style>
    <style:style style:name="P202" style:family="paragraph" style:parent-style-name="Standard" style:list-style-name="L8">
      <style:text-properties officeooo:paragraph-rsid="05e6e060"/>
    </style:style>
    <style:style style:name="P203" style:family="paragraph" style:parent-style-name="Standard">
      <style:paragraph-properties fo:text-align="justify" style:justify-single-word="false"/>
      <style:text-properties style:use-window-font-color="true" loext:opacity="0%" fo:font-size="12pt" fo:font-weight="normal" officeooo:rsid="0017c0e6" officeooo:paragraph-rsid="0017c0e6"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fo:color="#0000ff" loext:opacity="100%" style:font-name="Courier" fo:font-size="11pt" fo:font-weight="normal" fo:background-color="#ffffff" style:font-size-asian="11pt" style:font-size-complex="11pt"/>
    </style:style>
    <style:style style:name="P205"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017c0e6" officeooo:paragraph-rsid="0017c0e6" fo:background-color="#ffffff" style:font-size-asian="10pt" style:font-style-asian="italic" style:font-size-complex="10pt" style:font-style-complex="italic"/>
    </style:style>
    <style:style style:name="P20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1b117c" fo:background-color="#ffffff" style:font-size-asian="11pt" style:font-size-complex="11pt"/>
    </style:style>
    <style:style style:name="P20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1fa657" fo:background-color="#ffffff" style:font-size-asian="11pt" style:font-size-complex="11pt"/>
    </style:style>
    <style:style style:name="P208" style:family="paragraph" style:parent-style-name="Standard">
      <style:paragraph-properties fo:margin-left="0in" fo:margin-right="0in" style:line-height-at-least="0.198in" fo:text-indent="0in" style:auto-text-indent="false"/>
      <style:text-properties style:font-name="Courier" fo:font-size="11pt" officeooo:paragraph-rsid="001fa657" style:font-size-asian="11pt" style:font-size-complex="11pt"/>
    </style:style>
    <style:style style:name="P209" style:family="paragraph" style:parent-style-name="Standard">
      <style:paragraph-properties fo:text-align="center" style:justify-single-word="false"/>
      <style:text-properties style:use-window-font-color="true" loext:opacity="0%" fo:font-size="12pt" fo:font-weight="bold" officeooo:rsid="001bccf2" officeooo:paragraph-rsid="0025d2b8" style:font-size-asian="10.5pt" style:font-weight-asian="bold" style:font-size-complex="12pt" style:font-weight-complex="bold"/>
    </style:style>
    <style:style style:name="P210" style:family="paragraph" style:parent-style-name="Standard">
      <style:paragraph-properties fo:text-align="left" style:justify-single-word="false"/>
      <style:text-properties style:use-window-font-color="true" loext:opacity="0%" fo:font-size="12pt" fo:font-style="italic" fo:font-weight="normal" officeooo:rsid="001d68a7" officeooo:paragraph-rsid="0025d2b8" style:font-size-asian="10.5pt" style:font-style-asian="italic" style:font-weight-asian="normal" style:font-size-complex="12pt" style:font-style-complex="italic" style:font-weight-complex="normal"/>
    </style:style>
    <style:style style:name="P211" style:family="paragraph" style:parent-style-name="Standard">
      <style:paragraph-properties fo:text-align="justify" style:justify-single-word="false"/>
      <style:text-properties officeooo:paragraph-rsid="0025d2b8"/>
    </style:style>
    <style:style style:name="P212" style:family="paragraph" style:parent-style-name="Standard">
      <style:paragraph-properties fo:text-align="justify" style:justify-single-word="false"/>
      <style:text-properties style:use-window-font-color="true" loext:opacity="0%" fo:font-size="12pt" fo:font-weight="normal" officeooo:rsid="001bccf2" officeooo:paragraph-rsid="0025d2b8" style:font-size-asian="10.5pt" style:font-weight-asian="normal" style:font-size-complex="12pt" style:font-weight-complex="normal"/>
    </style:style>
    <style:style style:name="P213" style:family="paragraph" style:parent-style-name="Table_20_Contents">
      <style:paragraph-properties fo:text-align="left" style:justify-single-word="false"/>
      <style:text-properties officeooo:paragraph-rsid="002bfee3"/>
    </style:style>
    <style:style style:name="P214" style:family="paragraph" style:parent-style-name="Table_20_Contents">
      <style:paragraph-properties fo:text-align="left" style:justify-single-word="false"/>
      <style:text-properties fo:font-weight="normal" officeooo:rsid="002bfee3" officeooo:paragraph-rsid="002bfee3" style:font-weight-asian="normal" style:font-weight-complex="normal"/>
    </style:style>
    <style:style style:name="P215" style:family="paragraph" style:parent-style-name="Standard">
      <style:paragraph-properties fo:text-align="justify" style:justify-single-word="false"/>
      <style:text-properties style:use-window-font-color="true" loext:opacity="0%" fo:font-size="12pt" fo:font-weight="normal" officeooo:rsid="002bfee3" officeooo:paragraph-rsid="0025d2b8" style:font-size-asian="10.5pt" style:font-weight-asian="normal" style:font-size-complex="12pt" style:font-weight-complex="normal"/>
    </style:style>
    <style:style style:name="P216" style:family="paragraph" style:parent-style-name="Standard">
      <style:paragraph-properties fo:text-align="left" style:justify-single-word="false"/>
      <style:text-properties style:use-window-font-color="true" loext:opacity="0%" fo:font-size="12pt" fo:font-weight="normal" officeooo:rsid="002bfee3" officeooo:paragraph-rsid="0025d2b8" style:font-size-asian="10.5pt" style:font-weight-asian="normal" style:font-size-complex="12pt" style:font-weight-complex="normal"/>
    </style:style>
    <style:style style:name="P217" style:family="paragraph" style:parent-style-name="Standard">
      <style:paragraph-properties fo:text-align="left" style:justify-single-word="false"/>
      <style:text-properties fo:color="#000000" loext:opacity="100%" style:font-name="Courier" fo:font-size="10.5pt" fo:font-weight="normal" officeooo:rsid="002bfee3" officeooo:paragraph-rsid="0025d2b8" fo:background-color="#ffffff" style:font-size-asian="10.5pt" style:font-weight-asian="normal" style:font-size-complex="12pt" style:font-weight-complex="normal"/>
    </style:style>
    <style:style style:name="P218"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fo:background-color="#ffffff" style:font-size-asian="11pt" style:font-size-complex="11pt"/>
    </style:style>
    <style:style style:name="P219" style:family="paragraph" style:parent-style-name="Standard">
      <style:paragraph-properties fo:text-align="left" style:justify-single-word="false"/>
      <style:text-properties style:use-window-font-color="true" loext:opacity="0%" fo:font-size="11pt" fo:font-weight="normal" officeooo:rsid="002bfee3" officeooo:paragraph-rsid="0025d2b8" style:font-size-asian="11pt" style:font-weight-asian="normal" style:font-size-complex="11pt" style:font-weight-complex="normal"/>
    </style:style>
    <style:style style:name="P220" style:family="paragraph" style:parent-style-name="Standard">
      <style:paragraph-properties fo:text-align="left" style:justify-single-word="false"/>
      <style:text-properties style:use-window-font-color="true" loext:opacity="0%" fo:font-size="12pt" fo:font-weight="normal" officeooo:rsid="002bfee3" officeooo:paragraph-rsid="05aae0e3" style:font-size-asian="10.5pt" style:font-weight-asian="normal" style:font-size-complex="12pt" style:font-weight-complex="normal"/>
    </style:style>
    <style:style style:name="P221" style:family="paragraph" style:parent-style-name="Standard">
      <style:paragraph-properties fo:text-align="left" style:justify-single-word="false"/>
      <style:text-properties style:use-window-font-color="true" loext:opacity="0%" fo:font-size="12pt" fo:font-weight="normal" officeooo:rsid="0035abe3" officeooo:paragraph-rsid="0025d2b8"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style:use-window-font-color="true" loext:opacity="0%" fo:font-size="12pt" fo:font-weight="bold" officeooo:rsid="0037a8ba" officeooo:paragraph-rsid="0037a8ba" style:font-size-asian="10.5pt" style:font-weight-asian="bold" style:font-size-complex="12pt" style:font-weight-complex="bold"/>
    </style:style>
    <style:style style:name="P223" style:family="paragraph" style:parent-style-name="Standard">
      <style:paragraph-properties fo:text-align="center" style:justify-single-word="false"/>
      <style:text-properties style:use-window-font-color="true" loext:opacity="0%" fo:font-size="13pt" fo:font-weight="bold" officeooo:rsid="0046d4f7" officeooo:paragraph-rsid="0046d4f7" style:font-size-asian="13pt" style:font-weight-asian="bold" style:font-size-complex="13pt" style:font-weight-complex="bold"/>
    </style:style>
    <style:style style:name="P224" style:family="paragraph" style:parent-style-name="Standard">
      <style:paragraph-properties fo:text-align="justify" style:justify-single-word="false"/>
      <style:text-properties style:use-window-font-color="true" loext:opacity="0%" fo:font-size="12pt" fo:font-weight="bold" officeooo:rsid="052baf14" officeooo:paragraph-rsid="003c4a46" style:font-size-asian="10.5pt" style:font-weight-asian="bold" style:font-size-complex="12pt" style:font-weight-complex="bold"/>
    </style:style>
    <style:style style:name="P225" style:family="paragraph" style:parent-style-name="Standard">
      <style:paragraph-properties fo:text-align="justify" style:justify-single-word="false"/>
      <style:text-properties officeooo:paragraph-rsid="0046de2f"/>
    </style:style>
    <style:style style:name="P226" style:family="paragraph" style:parent-style-name="Footnote">
      <style:text-properties officeooo:paragraph-rsid="0046de2f"/>
    </style:style>
    <style:style style:name="P227" style:family="paragraph" style:parent-style-name="Standard">
      <style:paragraph-properties fo:text-align="justify" style:justify-single-word="false"/>
      <style:text-properties style:use-window-font-color="true" loext:opacity="0%" fo:font-size="12pt" fo:font-weight="normal" officeooo:rsid="0046de2f" officeooo:paragraph-rsid="0046de2f" style:font-size-asian="10.5pt" style:font-weight-asian="normal" style:font-size-complex="12pt" style:font-weight-complex="normal"/>
    </style:style>
    <style:style style:name="P228" style:family="paragraph" style:parent-style-name="Standard">
      <style:paragraph-properties fo:margin-left="0in" fo:margin-right="0in" style:line-height-at-least="0.198in" fo:text-indent="0in" style:auto-text-indent="false"/>
      <style:text-properties style:font-name="Courier" fo:font-size="11pt" style:font-size-asian="11pt" style:font-size-complex="11pt"/>
    </style:style>
    <style:style style:name="P229" style:family="paragraph" style:parent-style-name="Standard">
      <style:paragraph-properties fo:margin-left="0in" fo:margin-right="0in" style:line-height-at-least="0.198in" fo:text-indent="0in" style:auto-text-indent="false"/>
    </style:style>
    <style:style style:name="P230" style:family="paragraph" style:parent-style-name="Table_20_Contents">
      <style:paragraph-properties fo:text-align="justify" style:justify-single-word="false"/>
      <style:text-properties fo:font-size="12pt" officeooo:rsid="0046de2f" officeooo:paragraph-rsid="0046de2f" style:font-size-asian="10.5pt" style:font-size-complex="12pt"/>
    </style:style>
    <style:style style:name="P231" style:family="paragraph" style:parent-style-name="Table_20_Contents">
      <style:paragraph-properties fo:text-align="justify" style:justify-single-word="false"/>
      <style:text-properties officeooo:paragraph-rsid="0046de2f"/>
    </style:style>
    <style:style style:name="P232" style:family="paragraph" style:parent-style-name="Standard">
      <style:paragraph-properties fo:text-align="justify" style:justify-single-word="false"/>
      <style:text-properties officeooo:paragraph-rsid="0643c394"/>
    </style:style>
    <style:style style:name="P233" style:family="paragraph" style:parent-style-name="Standard">
      <style:paragraph-properties fo:text-align="justify" style:justify-single-word="false"/>
      <style:text-properties style:use-window-font-color="true" loext:opacity="0%" fo:font-size="12pt" fo:font-weight="normal" officeooo:rsid="004bc497" officeooo:paragraph-rsid="0046de2f" style:font-size-asian="10.5pt" style:font-weight-asian="normal" style:font-size-complex="12pt" style:font-weight-complex="normal"/>
    </style:style>
    <style:style style:name="P234" style:family="paragraph" style:parent-style-name="Standard">
      <style:paragraph-properties fo:text-align="justify" style:justify-single-word="false"/>
      <style:text-properties style:use-window-font-color="true" loext:opacity="0%" fo:font-size="12pt" fo:font-weight="normal" officeooo:rsid="004d37d9" officeooo:paragraph-rsid="004d37d9" style:font-size-asian="10.5pt" style:font-weight-asian="normal" style:font-size-complex="12pt" style:font-weight-complex="normal"/>
    </style:style>
    <style:style style:name="P235" style:family="paragraph" style:parent-style-name="Standard">
      <style:paragraph-properties fo:text-align="justify" style:justify-single-word="false"/>
      <style:text-properties style:use-window-font-color="true" loext:opacity="0%" style:font-name="Courier" fo:font-size="12pt" fo:font-weight="normal" officeooo:rsid="0046de2f" officeooo:paragraph-rsid="0046de2f" style:font-size-asian="10.5pt" style:font-weight-asian="normal" style:font-size-complex="12pt" style:font-weight-complex="normal"/>
    </style:style>
    <style:style style:name="P236" style:family="paragraph" style:parent-style-name="Table_20_Contents">
      <style:paragraph-properties fo:text-align="justify" style:justify-single-word="false"/>
      <style:text-properties fo:font-size="12pt" officeooo:rsid="004d37d9" officeooo:paragraph-rsid="004d37d9" style:font-size-asian="10.5pt" style:font-size-complex="12pt"/>
    </style:style>
    <style:style style:name="P237" style:family="paragraph" style:parent-style-name="Standard">
      <style:paragraph-properties fo:text-align="center" style:justify-single-word="false"/>
      <style:text-properties style:use-window-font-color="true" loext:opacity="0%" fo:font-size="12pt" fo:font-weight="normal" officeooo:rsid="004d37d9" officeooo:paragraph-rsid="004d37d9" style:font-size-asian="10.5pt" style:font-weight-asian="normal" style:font-size-complex="12pt" style:font-weight-complex="normal"/>
    </style:style>
    <style:style style:name="P238" style:family="paragraph" style:parent-style-name="Standard">
      <style:paragraph-properties fo:text-align="center" style:justify-single-word="false"/>
      <style:text-properties officeooo:paragraph-rsid="0046de2f"/>
    </style:style>
    <style:style style:name="P23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4d37d9" fo:background-color="#ffffff" style:font-size-asian="11pt" style:font-size-complex="11pt"/>
    </style:style>
    <style:style style:name="P240" style:family="paragraph" style:parent-style-name="Standard">
      <style:paragraph-properties fo:margin-left="0in" fo:margin-right="0in" style:line-height-at-least="0.198in" fo:text-indent="0in" style:auto-text-indent="false"/>
      <style:text-properties style:font-name="Courier" fo:font-size="11pt" officeooo:paragraph-rsid="004d37d9" style:font-size-asian="11pt" style:font-size-complex="11pt"/>
    </style:style>
    <style:style style:name="P241" style:family="paragraph" style:parent-style-name="Standard">
      <style:paragraph-properties fo:margin-left="0in" fo:margin-right="0in" style:line-height-at-least="0.198in" fo:text-indent="0in" style:auto-text-indent="false"/>
      <style:text-properties officeooo:paragraph-rsid="004d37d9"/>
    </style:style>
    <style:style style:name="P242" style:family="paragraph" style:parent-style-name="Standard">
      <style:paragraph-properties fo:text-align="center" style:justify-single-word="false"/>
      <style:text-properties style:use-window-font-color="true" loext:opacity="0%" fo:font-size="12pt" fo:font-weight="bold" officeooo:rsid="004d37d9" officeooo:paragraph-rsid="004d37d9" style:font-size-asian="10.5pt" style:font-weight-asian="bold" style:font-size-complex="12pt" style:font-weight-complex="bold"/>
    </style:style>
    <style:style style:name="P243" style:family="paragraph" style:parent-style-name="Standard">
      <style:text-properties style:use-window-font-color="true" loext:opacity="0%" fo:font-size="12pt" fo:font-weight="normal" officeooo:rsid="005312bc" style:font-size-asian="10.5pt" style:font-weight-asian="normal" style:font-size-complex="12pt" style:font-weight-complex="normal"/>
    </style:style>
    <style:style style:name="P244" style:family="paragraph" style:parent-style-name="Standard">
      <style:paragraph-properties fo:text-align="justify" style:justify-single-word="false"/>
      <style:text-properties style:use-window-font-color="true" loext:opacity="0%" fo:font-size="12pt" fo:font-weight="normal" officeooo:rsid="005312bc" officeooo:paragraph-rsid="005312bc" style:font-size-asian="10.5pt" style:font-weight-asian="normal" style:font-size-complex="12pt" style:font-weight-complex="normal"/>
    </style:style>
    <style:style style:name="P245" style:family="paragraph" style:parent-style-name="Table_20_Contents">
      <style:paragraph-properties fo:text-align="left" style:justify-single-word="false"/>
      <style:text-properties officeooo:paragraph-rsid="005312bc"/>
    </style:style>
    <style:style style:name="P246" style:family="paragraph" style:parent-style-name="Table_20_Contents">
      <style:paragraph-properties fo:text-align="left" style:justify-single-word="false"/>
      <style:text-properties officeooo:rsid="005312bc" officeooo:paragraph-rsid="005312bc" style:font-size-asian="12pt"/>
    </style:style>
    <style:style style:name="P247" style:family="paragraph" style:parent-style-name="Standard">
      <style:paragraph-properties fo:text-align="justify" style:justify-single-word="false"/>
      <style:text-properties officeooo:paragraph-rsid="005312bc"/>
    </style:style>
    <style:style style:name="P248" style:family="paragraph" style:parent-style-name="Standard">
      <style:paragraph-properties fo:text-align="center" style:justify-single-word="false"/>
      <style:text-properties style:use-window-font-color="true" loext:opacity="0%" fo:font-size="18pt" fo:font-weight="bold" officeooo:rsid="052baf14" officeooo:paragraph-rsid="003c4a46" style:font-size-asian="18pt" style:font-weight-asian="bold" style:font-size-complex="18pt" style:font-weight-complex="bold"/>
    </style:style>
    <style:style style:name="P249" style:family="paragraph" style:parent-style-name="Standard">
      <style:paragraph-properties fo:text-align="justify" style:justify-single-word="false"/>
      <style:text-properties style:use-window-font-color="true" loext:opacity="0%" fo:font-size="12pt" fo:font-weight="normal" officeooo:rsid="00548a6f" officeooo:paragraph-rsid="00548a6f" style:font-size-asian="10.5pt" style:font-weight-asian="normal" style:font-size-complex="12pt" style:font-weight-complex="normal"/>
    </style:style>
    <style:style style:name="P250" style:family="paragraph" style:parent-style-name="Footnote">
      <style:text-properties officeooo:paragraph-rsid="05d2724f"/>
    </style:style>
    <style:style style:name="P251" style:family="paragraph" style:parent-style-name="Table_20_Contents">
      <style:paragraph-properties fo:text-align="left" style:justify-single-word="false"/>
      <style:text-properties officeooo:paragraph-rsid="00548a6f"/>
    </style:style>
    <style:style style:name="P252" style:family="paragraph" style:parent-style-name="Table_20_Contents">
      <style:paragraph-properties fo:text-align="left" style:justify-single-word="false"/>
      <style:text-properties fo:color="#808080" loext:opacity="100%" officeooo:rsid="00548a6f" officeooo:paragraph-rsid="00548a6f" style:font-size-asian="12pt"/>
    </style:style>
    <style:style style:name="P253" style:family="paragraph" style:parent-style-name="Standard">
      <style:paragraph-properties fo:text-align="justify" style:justify-single-word="false"/>
      <style:text-properties style:use-window-font-color="true" loext:opacity="0%" fo:font-size="12pt" fo:font-weight="normal" officeooo:rsid="005490a8" officeooo:paragraph-rsid="005490a8" style:font-size-asian="10.5pt" style:font-weight-asian="normal" style:font-size-complex="12pt" style:font-weight-complex="normal"/>
    </style:style>
    <style:style style:name="P254" style:family="paragraph" style:parent-style-name="Table_20_Contents">
      <style:paragraph-properties fo:text-align="justify" style:justify-single-word="false"/>
      <style:text-properties style:font-name="Courier" fo:font-size="12pt" officeooo:rsid="005490a8" officeooo:paragraph-rsid="005490a8" style:font-size-asian="10.5pt" style:font-size-complex="12pt"/>
    </style:style>
    <style:style style:name="P255" style:family="paragraph" style:parent-style-name="Table_20_Contents">
      <style:paragraph-properties fo:text-align="justify" style:justify-single-word="false"/>
      <style:text-properties fo:font-size="12pt" officeooo:rsid="0055619a" officeooo:paragraph-rsid="0055619a" style:font-size-asian="10.5pt" style:font-size-complex="12pt"/>
    </style:style>
    <style:style style:name="P256" style:family="paragraph" style:parent-style-name="Footnote">
      <style:text-properties officeooo:paragraph-rsid="00548a6f"/>
    </style:style>
    <style:style style:name="P257" style:family="paragraph" style:parent-style-name="Table_20_Contents">
      <style:paragraph-properties fo:text-align="justify" style:justify-single-word="false"/>
      <style:text-properties officeooo:paragraph-rsid="005490a8"/>
    </style:style>
    <style:style style:name="P258" style:family="paragraph" style:parent-style-name="Standard">
      <style:paragraph-properties fo:text-align="center" style:justify-single-word="false"/>
      <style:text-properties style:use-window-font-color="true" loext:opacity="0%" fo:font-size="12pt" fo:font-weight="normal" officeooo:rsid="005490a8" officeooo:paragraph-rsid="005490a8" style:font-size-asian="10.5pt" style:font-weight-asian="normal" style:font-size-complex="12pt" style:font-weight-complex="normal"/>
    </style:style>
    <style:style style:name="P259" style:family="paragraph" style:parent-style-name="Standard">
      <style:paragraph-properties fo:text-align="justify" style:justify-single-word="false"/>
      <style:text-properties style:use-window-font-color="true" loext:opacity="0%" fo:font-size="12pt" fo:font-weight="normal" officeooo:rsid="0055619a" officeooo:paragraph-rsid="0055619a"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use-window-font-color="true" loext:opacity="0%" fo:font-size="13pt" fo:font-weight="bold" officeooo:rsid="05b22025" officeooo:paragraph-rsid="05b22025" style:font-size-asian="13pt" style:font-weight-asian="bold" style:font-size-complex="13pt" style:font-weight-complex="bold"/>
    </style:style>
    <style:style style:name="P261" style:family="paragraph" style:parent-style-name="Table_20_Contents">
      <style:paragraph-properties fo:text-align="justify" style:justify-single-word="false"/>
      <style:text-properties style:use-window-font-color="true" loext:opacity="0%" fo:font-size="12pt" fo:font-weight="normal" officeooo:rsid="00590aa1" officeooo:paragraph-rsid="005490a8" style:font-size-asian="10.5pt" style:font-weight-asian="normal" style:font-size-complex="12pt" style:font-weight-complex="normal"/>
    </style:style>
    <style:style style:name="P26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590aa1" fo:background-color="#ffffff" style:font-size-asian="11pt" style:font-size-complex="11pt"/>
    </style:style>
    <style:style style:name="P263" style:family="paragraph" style:parent-style-name="Standard">
      <style:paragraph-properties fo:margin-left="0in" fo:margin-right="0in" style:line-height-at-least="0.198in" fo:text-indent="0in" style:auto-text-indent="false"/>
      <style:text-properties style:font-name="Courier" fo:font-size="11pt" officeooo:paragraph-rsid="00590aa1" style:font-size-asian="11pt" style:font-size-complex="11pt"/>
    </style:style>
    <style:style style:name="P264" style:family="paragraph" style:parent-style-name="Table_20_Contents">
      <style:paragraph-properties fo:text-align="center" style:justify-single-word="false"/>
      <style:text-properties style:use-window-font-color="true" loext:opacity="0%" fo:font-size="12pt" fo:font-weight="bold" officeooo:rsid="00590aa1" officeooo:paragraph-rsid="00590aa1" style:font-size-asian="10.5pt" style:font-weight-asian="bold" style:font-size-complex="12pt" style:font-weight-complex="bold"/>
    </style:style>
    <style:style style:name="P265" style:family="paragraph" style:parent-style-name="Table_20_Contents">
      <style:paragraph-properties fo:text-align="justify" style:justify-single-word="false"/>
      <style:text-properties style:use-window-font-color="true" loext:opacity="0%" fo:font-size="12pt" fo:font-weight="normal" officeooo:rsid="00590aa1" officeooo:paragraph-rsid="00590aa1" style:font-size-asian="10.5pt" style:font-weight-asian="normal" style:font-size-complex="12pt" style:font-weight-complex="normal"/>
    </style:style>
    <style:style style:name="P266" style:family="paragraph" style:parent-style-name="Table_20_Contents">
      <style:paragraph-properties fo:text-align="justify" style:justify-single-word="false"/>
      <style:text-properties officeooo:paragraph-rsid="0644a38c"/>
    </style:style>
    <style:style style:name="P267" style:family="paragraph" style:parent-style-name="Table_20_Contents">
      <style:paragraph-properties fo:text-align="left" style:justify-single-word="false"/>
      <style:text-properties officeooo:paragraph-rsid="00590aa1"/>
    </style:style>
    <style:style style:name="P268" style:family="paragraph" style:parent-style-name="Table_20_Contents">
      <style:paragraph-properties fo:text-align="left" style:justify-single-word="false"/>
      <style:text-properties officeooo:rsid="00590aa1" officeooo:paragraph-rsid="00590aa1" style:font-size-asian="12pt"/>
    </style:style>
    <style:style style:name="P269" style:family="paragraph" style:parent-style-name="Table_20_Contents">
      <style:paragraph-properties fo:text-align="left" style:justify-single-word="false"/>
      <style:text-properties fo:color="#808080" loext:opacity="100%" fo:font-weight="normal" officeooo:rsid="00590aa1" officeooo:paragraph-rsid="00590aa1" style:font-size-asian="12pt" style:font-weight-asian="normal" style:font-weight-complex="normal"/>
    </style:style>
    <style:style style:name="P270" style:family="paragraph" style:parent-style-name="Standard">
      <style:paragraph-properties fo:text-align="justify" style:justify-single-word="false"/>
      <style:text-properties style:use-window-font-color="true" loext:opacity="0%" fo:font-size="12pt" fo:font-weight="normal" officeooo:rsid="00590aa1" officeooo:paragraph-rsid="00590aa1" style:font-size-asian="10.5pt" style:font-weight-asian="normal" style:font-size-complex="12pt" style:font-weight-complex="normal"/>
    </style:style>
    <style:style style:name="P271" style:family="paragraph" style:parent-style-name="Standard">
      <style:paragraph-properties fo:text-align="justify" style:justify-single-word="false"/>
      <style:text-properties fo:color="#000000" loext:opacity="100%" style:font-name="Courier" fo:font-size="11pt" fo:font-weight="normal" fo:background-color="#ffffff" style:font-size-asian="11pt" style:font-size-complex="11pt"/>
    </style:style>
    <style:style style:name="P272" style:family="paragraph" style:parent-style-name="Table_20_Contents">
      <style:paragraph-properties fo:text-align="justify" style:justify-single-word="false"/>
      <style:text-properties fo:color="#00a933" loext:opacity="100%" style:font-name="Courier" fo:font-size="10pt" fo:font-style="italic" officeooo:rsid="005a3113" officeooo:paragraph-rsid="005a3113" style:font-size-asian="10pt" style:font-style-asian="italic" style:font-size-complex="10pt" style:font-style-complex="italic"/>
    </style:style>
    <style:style style:name="P273" style:family="paragraph" style:parent-style-name="Standard">
      <style:paragraph-properties fo:text-align="justify" style:justify-single-word="false"/>
      <style:text-properties officeooo:paragraph-rsid="005adeff"/>
    </style:style>
    <style:style style:name="P274" style:family="paragraph" style:parent-style-name="Standard">
      <style:paragraph-properties fo:text-align="justify" style:justify-single-word="false"/>
      <style:text-properties style:use-window-font-color="true" loext:opacity="0%" fo:font-size="12pt" fo:font-style="normal" fo:font-weight="normal" officeooo:rsid="005c1552" officeooo:paragraph-rsid="005adeff" style:font-size-asian="10.5pt" style:font-style-asian="normal" style:font-weight-asian="normal" style:font-size-complex="12pt" style:font-style-complex="normal" style:font-weight-complex="normal"/>
    </style:style>
    <style:style style:name="P275" style:family="paragraph" style:parent-style-name="Standard" style:list-style-name="L9">
      <style:paragraph-properties fo:text-align="justify" style:justify-single-word="false"/>
      <style:text-properties style:use-window-font-color="true" loext:opacity="0%" fo:font-size="12pt" fo:font-style="normal" fo:font-weight="normal" officeooo:rsid="005c1552" officeooo:paragraph-rsid="005c1552"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use-window-font-color="true" loext:opacity="0%" fo:font-size="12pt" fo:font-style="normal" fo:font-weight="normal" officeooo:rsid="005c1552" officeooo:paragraph-rsid="005c1552"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use-window-font-color="true" loext:opacity="0%" fo:font-size="12pt" fo:font-style="normal" fo:font-weight="normal" officeooo:rsid="005c1552" officeooo:paragraph-rsid="05ec0267" style:font-size-asian="10.5pt" style:font-style-asian="normal" style:font-weight-asian="normal" style:font-size-complex="12pt" style:font-style-complex="normal" style:font-weight-complex="normal"/>
    </style:style>
    <style:style style:name="P278"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05c1552" officeooo:paragraph-rsid="005c1552" fo:background-color="#ffffff" style:font-size-asian="10pt" style:font-style-asian="italic" style:font-size-complex="10pt" style:font-style-complex="italic"/>
    </style:style>
    <style:style style:name="P279" style:family="paragraph" style:parent-style-name="Table_20_Contents">
      <style:paragraph-properties fo:text-align="justify" style:justify-single-word="false"/>
      <style:text-properties style:use-window-font-color="true" loext:opacity="0%" fo:font-size="12pt" fo:font-style="normal" fo:font-weight="normal" officeooo:rsid="005c5bb7" officeooo:paragraph-rsid="00590aa1" style:font-size-asian="10.5pt" style:font-style-asian="normal" style:font-weight-asian="normal" style:font-size-complex="12pt" style:font-style-complex="normal" style:font-weight-complex="normal"/>
    </style:style>
    <style:style style:name="P280" style:family="paragraph" style:parent-style-name="Table_20_Contents">
      <style:paragraph-properties fo:text-align="justify" style:justify-single-word="false"/>
      <style:text-properties officeooo:paragraph-rsid="00590aa1"/>
    </style:style>
    <style:style style:name="P281" style:family="paragraph" style:parent-style-name="Standard">
      <style:paragraph-properties fo:text-align="justify" style:justify-single-word="false"/>
      <style:text-properties style:use-window-font-color="true" loext:opacity="0%" fo:font-size="12pt" fo:font-style="normal" fo:font-weight="normal" officeooo:rsid="005c5bb7" officeooo:paragraph-rsid="005c5bb7" style:font-size-asian="10.5pt" style:font-style-asian="normal" style:font-weight-asian="normal" style:font-size-complex="12pt" style:font-style-complex="normal" style:font-weight-complex="normal"/>
    </style:style>
    <style:style style:name="P282" style:family="paragraph" style:parent-style-name="Table_20_Contents">
      <style:paragraph-properties fo:text-align="justify" style:justify-single-word="false"/>
      <style:text-properties officeooo:paragraph-rsid="05ec0267"/>
    </style:style>
    <style:style style:name="P283" style:family="paragraph" style:parent-style-name="Table_20_Contents">
      <style:paragraph-properties fo:text-align="justify" style:justify-single-word="false"/>
      <style:text-properties style:font-name="Courier" fo:font-size="11pt" style:font-size-asian="11pt" style:font-size-complex="11pt"/>
    </style:style>
    <style:style style:name="P284" style:family="paragraph" style:parent-style-name="Table_20_Contents">
      <style:paragraph-properties fo:text-align="justify" style:justify-single-word="false"/>
      <style:text-properties fo:color="#00a933" loext:opacity="100%" style:font-name="Courier" fo:font-size="10pt" fo:font-style="italic" officeooo:rsid="005c5bb7" officeooo:paragraph-rsid="005c5bb7" style:font-size-asian="10pt" style:font-style-asian="italic" style:font-size-complex="10pt" style:font-style-complex="italic"/>
    </style:style>
    <style:style style:name="P285" style:family="paragraph" style:parent-style-name="Table_20_Contents">
      <style:paragraph-properties fo:text-align="justify" style:justify-single-word="false"/>
      <style:text-properties style:use-window-font-color="true" loext:opacity="0%" fo:font-size="12pt" fo:font-style="normal" fo:font-weight="normal" officeooo:rsid="005dbda0" officeooo:paragraph-rsid="005dbda0" style:font-size-asian="10.5pt" style:font-style-asian="normal" style:font-weight-asian="normal" style:font-size-complex="12pt" style:font-style-complex="normal" style:font-weight-complex="normal"/>
    </style:style>
    <style:style style:name="P286" style:family="paragraph" style:parent-style-name="Table_20_Contents">
      <style:paragraph-properties fo:text-align="justify" style:justify-single-word="false"/>
      <style:text-properties style:use-window-font-color="true" loext:opacity="0%" fo:font-size="12pt" fo:font-style="normal" fo:font-weight="normal" officeooo:rsid="005c5bb7" officeooo:paragraph-rsid="005ea2e0"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fo:color="#000000" loext:opacity="100%" style:font-name="Courier" fo:font-size="11pt" fo:font-weight="normal" officeooo:paragraph-rsid="005ea2e0" fo:background-color="#ffffff" style:font-size-asian="11pt" style:font-size-complex="11pt"/>
    </style:style>
    <style:style style:name="P288" style:family="paragraph" style:parent-style-name="Standard">
      <style:paragraph-properties style:line-height-at-least="0.198in"/>
      <style:text-properties style:font-name="Courier" fo:font-size="11pt" officeooo:paragraph-rsid="005ea2e0" style:font-size-asian="11pt" style:font-size-complex="11pt"/>
    </style:style>
    <style:style style:name="P28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5ea2e0" fo:background-color="#ffffff" style:font-size-asian="11pt" style:font-size-complex="11pt"/>
    </style:style>
    <style:style style:name="P290" style:family="paragraph" style:parent-style-name="Table_20_Contents">
      <style:paragraph-properties fo:text-align="justify" style:justify-single-word="false"/>
      <style:text-properties style:font-name="Courier" fo:font-size="11pt" officeooo:paragraph-rsid="005ea2e0" style:font-size-asian="11pt" style:font-size-complex="11pt"/>
    </style:style>
    <style:style style:name="P291" style:family="paragraph" style:parent-style-name="Table_20_Contents">
      <style:paragraph-properties fo:text-align="justify" style:justify-single-word="false"/>
      <style:text-properties fo:color="#00a933" loext:opacity="100%" style:font-name="Courier" fo:font-size="10pt" fo:font-style="italic" officeooo:rsid="005c5bb7" officeooo:paragraph-rsid="005ea2e0" style:font-size-asian="10pt" style:font-style-asian="italic" style:font-size-complex="10pt" style:font-style-complex="italic"/>
    </style:style>
    <style:style style:name="P292" style:family="paragraph" style:parent-style-name="Table_20_Contents">
      <style:paragraph-properties fo:text-align="justify" style:justify-single-word="false"/>
      <style:text-properties style:use-window-font-color="true" loext:opacity="0%" fo:font-size="12pt" fo:font-style="normal" fo:font-weight="normal" officeooo:rsid="006125ba" officeooo:paragraph-rsid="006125ba" style:font-size-asian="10.5pt" style:font-style-asian="normal" style:font-weight-asian="normal" style:font-size-complex="12pt" style:font-style-complex="normal" style:font-weight-complex="normal"/>
    </style:style>
    <style:style style:name="P293" style:family="paragraph" style:parent-style-name="Footnote">
      <style:text-properties officeooo:paragraph-rsid="0644a38c"/>
    </style:style>
    <style:style style:name="P294" style:family="paragraph" style:parent-style-name="Standard">
      <style:paragraph-properties fo:text-align="justify" style:justify-single-word="false"/>
      <style:text-properties style:font-name="Courier" fo:font-size="11pt" style:font-size-asian="11pt" style:font-size-complex="11pt"/>
    </style:style>
    <style:style style:name="P295" style:family="paragraph" style:parent-style-name="Table_20_Contents">
      <style:paragraph-properties fo:text-align="justify" style:justify-single-word="false"/>
      <style:text-properties officeooo:paragraph-rsid="006125ba"/>
    </style:style>
    <style:style style:name="P296" style:family="paragraph" style:parent-style-name="Table_20_Contents">
      <style:paragraph-properties fo:text-align="left" style:justify-single-word="false"/>
      <style:text-properties officeooo:paragraph-rsid="00679be2"/>
    </style:style>
    <style:style style:name="P297" style:family="paragraph" style:parent-style-name="Table_20_Contents">
      <style:paragraph-properties fo:text-align="left" style:justify-single-word="false"/>
      <style:text-properties fo:color="#808080" loext:opacity="100%" fo:font-weight="normal" officeooo:rsid="00679be2" officeooo:paragraph-rsid="00679be2" style:font-size-asian="12pt" style:font-weight-asian="normal" style:font-weight-complex="normal"/>
    </style:style>
    <style:style style:name="P298" style:family="paragraph" style:parent-style-name="Table_20_Contents">
      <style:paragraph-properties fo:text-align="justify" style:justify-single-word="false"/>
      <style:text-properties style:use-window-font-color="true" loext:opacity="0%" fo:font-size="12pt" fo:font-style="normal" fo:font-weight="normal" officeooo:rsid="00629328" officeooo:paragraph-rsid="006125ba" style:font-size-asian="10.5pt" style:font-style-asian="normal" style:font-weight-asian="normal" style:font-size-complex="12pt" style:font-style-complex="normal" style:font-weight-complex="normal"/>
    </style:style>
    <style:style style:name="P29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63981b" fo:background-color="#ffffff" style:font-size-asian="11pt" style:font-size-complex="11pt"/>
    </style:style>
    <style:style style:name="P30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6561ab" fo:background-color="#ffffff" style:font-size-asian="11pt" style:font-size-complex="11pt"/>
    </style:style>
    <style:style style:name="P301" style:family="paragraph" style:parent-style-name="Standard">
      <style:paragraph-properties fo:margin-left="0in" fo:margin-right="0in" style:line-height-at-least="0.198in" fo:text-indent="0in" style:auto-text-indent="false"/>
      <style:text-properties style:font-name="Courier" fo:font-size="11pt" officeooo:paragraph-rsid="0063981b" style:font-size-asian="11pt" style:font-size-complex="11pt"/>
    </style:style>
    <style:style style:name="P302" style:family="paragraph" style:parent-style-name="Standard">
      <style:paragraph-properties fo:margin-left="0in" fo:margin-right="0in" style:line-height-at-least="0.198in" fo:text-indent="0in" style:auto-text-indent="false"/>
      <style:text-properties officeooo:paragraph-rsid="0063981b"/>
    </style:style>
    <style:style style:name="P303" style:family="paragraph" style:parent-style-name="Standard">
      <style:paragraph-properties fo:margin-left="0in" fo:margin-right="0in" style:line-height-at-least="0.198in" fo:text-indent="0in" style:auto-text-indent="false"/>
      <style:text-properties officeooo:paragraph-rsid="006561ab"/>
    </style:style>
    <style:style style:name="P304" style:family="paragraph" style:parent-style-name="Standard">
      <style:paragraph-properties fo:margin-left="0in" fo:margin-right="0in" style:line-height-at-least="0.198in" fo:text-indent="0in" style:auto-text-indent="false"/>
      <style:text-properties fo:color="#a31515" loext:opacity="100%" style:font-name="Courier" fo:font-size="11pt" fo:font-weight="normal" officeooo:paragraph-rsid="006561ab" fo:background-color="#ffffff" style:font-size-asian="11pt" style:font-size-complex="11pt"/>
    </style:style>
    <style:style style:name="P305" style:family="paragraph" style:parent-style-name="Table_20_Contents">
      <style:paragraph-properties fo:text-align="center" style:justify-single-word="false"/>
      <style:text-properties style:use-window-font-color="true" loext:opacity="0%" fo:font-size="12pt" fo:font-style="normal" fo:font-weight="bold" officeooo:rsid="0063981b" officeooo:paragraph-rsid="0063981b" style:font-size-asian="10.5pt" style:font-style-asian="normal" style:font-weight-asian="bold" style:font-size-complex="12pt" style:font-style-complex="normal" style:font-weight-complex="bold"/>
    </style:style>
    <style:style style:name="P306" style:family="paragraph" style:parent-style-name="Table_20_Contents">
      <style:paragraph-properties fo:text-align="center" style:justify-single-word="false"/>
      <style:text-properties style:use-window-font-color="true" loext:opacity="0%" fo:font-size="12pt" fo:font-style="normal" fo:font-weight="normal" officeooo:rsid="0063981b" officeooo:paragraph-rsid="0063981b" style:font-size-asian="10.5pt" style:font-style-asian="normal" style:font-weight-asian="normal" style:font-size-complex="12pt" style:font-style-complex="normal" style:font-weight-complex="normal"/>
    </style:style>
    <style:style style:name="P307" style:family="paragraph" style:parent-style-name="Standard">
      <style:text-properties fo:font-style="italic" fo:font-weight="normal" style:font-style-asian="italic" style:font-weight-asian="normal" style:font-style-complex="italic" style:font-weight-complex="normal"/>
    </style:style>
    <style:style style:name="P308" style:family="paragraph" style:parent-style-name="Table_20_Contents">
      <style:paragraph-properties fo:text-align="justify" style:justify-single-word="false"/>
      <style:text-properties style:use-window-font-color="true" loext:opacity="0%" fo:font-size="12pt" fo:font-style="normal" fo:font-weight="normal" officeooo:rsid="0644a38c" officeooo:paragraph-rsid="0644a38c" style:font-size-asian="10.5pt" style:font-style-asian="normal" style:font-weight-asian="normal" style:font-size-complex="12pt" style:font-style-complex="normal" style:font-weight-complex="normal"/>
    </style:style>
    <style:style style:name="P309" style:family="paragraph" style:parent-style-name="Table_20_Contents">
      <style:paragraph-properties fo:text-align="justify" style:justify-single-word="false"/>
      <style:text-properties style:use-window-font-color="true" loext:opacity="0%" fo:font-size="12pt" fo:font-style="normal" fo:font-weight="normal" officeooo:rsid="006125ba" officeooo:paragraph-rsid="05ec0267" style:font-size-asian="10.5pt" style:font-style-asian="normal" style:font-weight-asian="normal" style:font-size-complex="12pt" style:font-style-complex="normal" style:font-weight-complex="normal"/>
    </style:style>
    <style:style style:name="P310" style:family="paragraph" style:parent-style-name="Standard">
      <style:text-properties officeooo:paragraph-rsid="05ee4532"/>
    </style:style>
    <style:style style:name="P311" style:family="paragraph" style:parent-style-name="Table_20_Contents">
      <style:paragraph-properties fo:text-align="center" style:justify-single-word="false"/>
      <style:text-properties style:use-window-font-color="true" loext:opacity="0%" fo:font-size="13pt" fo:font-style="normal" fo:font-weight="bold" officeooo:rsid="0069b8eb" officeooo:paragraph-rsid="0069b8eb" style:font-size-asian="13pt" style:font-style-asian="normal" style:font-weight-asian="bold" style:font-size-complex="13pt" style:font-style-complex="normal" style:font-weight-complex="bold"/>
    </style:style>
    <style:style style:name="P312" style:family="paragraph" style:parent-style-name="Table_20_Contents">
      <style:paragraph-properties fo:text-align="justify" style:justify-single-word="false"/>
      <style:text-properties style:use-window-font-color="true" loext:opacity="0%" fo:font-size="12pt" fo:font-style="normal" fo:font-weight="normal" officeooo:rsid="0644a38c" officeooo:paragraph-rsid="006b0a6f" style:font-size-asian="10.5pt" style:font-style-asian="normal" style:font-weight-asian="normal" style:font-size-complex="12pt" style:font-style-complex="normal" style:font-weight-complex="normal"/>
    </style:style>
    <style:style style:name="P313" style:family="paragraph" style:parent-style-name="Table_20_Contents">
      <style:paragraph-properties fo:text-align="justify" style:justify-single-word="false"/>
      <style:text-properties officeooo:paragraph-rsid="064699ee"/>
    </style:style>
    <style:style style:name="P314" style:family="paragraph" style:parent-style-name="Table_20_Contents">
      <style:paragraph-properties fo:text-align="justify" style:justify-single-word="false"/>
      <style:text-properties style:use-window-font-color="true" loext:opacity="0%" fo:font-size="12pt" fo:font-style="normal" fo:font-weight="normal" officeooo:rsid="0644a38c" officeooo:paragraph-rsid="064699ee" style:font-size-asian="10.5pt" style:font-style-asian="normal" style:font-weight-asian="normal" style:font-size-complex="12pt" style:font-style-complex="normal" style:font-weight-complex="normal"/>
    </style:style>
    <style:style style:name="P315" style:family="paragraph" style:parent-style-name="Table_20_Contents" style:list-style-name="L10">
      <style:paragraph-properties fo:text-align="justify" style:justify-single-word="false"/>
      <style:text-properties style:use-window-font-color="true" loext:opacity="0%" fo:font-size="12pt" fo:font-style="normal" fo:font-weight="normal" officeooo:rsid="0644a38c" officeooo:paragraph-rsid="064699ee" style:font-size-asian="10.5pt" style:font-style-asian="normal" style:font-weight-asian="normal" style:font-size-complex="12pt" style:font-style-complex="normal" style:font-weight-complex="normal"/>
    </style:style>
    <style:style style:name="P316" style:family="paragraph" style:parent-style-name="Table_20_Contents">
      <style:paragraph-properties fo:text-align="justify" style:justify-single-word="false"/>
      <style:text-properties style:use-window-font-color="true" loext:opacity="0%" fo:font-size="12pt" fo:font-style="normal" fo:font-weight="normal" officeooo:rsid="006bfa8d" officeooo:paragraph-rsid="006b0a6f" style:font-size-asian="10.5pt" style:font-style-asian="normal" style:font-weight-asian="normal" style:font-size-complex="12pt" style:font-style-complex="normal" style:font-weight-complex="normal"/>
    </style:style>
    <style:style style:name="P317" style:family="paragraph" style:parent-style-name="Table_20_Contents">
      <style:paragraph-properties fo:text-align="justify" style:justify-single-word="false"/>
      <style:text-properties officeooo:paragraph-rsid="006b0a6f"/>
    </style:style>
    <style:style style:name="P31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6c9a0e" fo:background-color="#ffffff" style:font-size-asian="11pt" style:font-size-complex="11pt"/>
    </style:style>
    <style:style style:name="P319" style:family="paragraph" style:parent-style-name="Standard">
      <style:paragraph-properties fo:margin-left="0in" fo:margin-right="0in" style:line-height-at-least="0.198in" fo:text-indent="0in" style:auto-text-indent="false"/>
      <style:text-properties style:font-name="Courier" fo:font-size="11pt" officeooo:paragraph-rsid="006c9a0e" style:font-size-asian="11pt" style:font-size-complex="11pt"/>
    </style:style>
    <style:style style:name="P320" style:family="paragraph" style:parent-style-name="Table_20_Contents">
      <style:paragraph-properties fo:text-align="center" style:justify-single-word="false"/>
      <style:text-properties style:use-window-font-color="true" loext:opacity="0%" fo:font-size="12pt" fo:font-style="normal" fo:font-weight="bold" officeooo:rsid="006c5d65" officeooo:paragraph-rsid="006c5d65" style:font-size-asian="10.5pt" style:font-style-asian="normal" style:font-weight-asian="bold" style:font-size-complex="12pt" style:font-style-complex="normal" style:font-weight-complex="bold"/>
    </style:style>
    <style:style style:name="P321" style:family="paragraph" style:parent-style-name="Table_20_Contents">
      <style:paragraph-properties fo:text-align="center" style:justify-single-word="false"/>
      <style:text-properties style:use-window-font-color="true" loext:opacity="0%" fo:font-size="12pt" fo:font-style="normal" fo:font-weight="bold" officeooo:rsid="064699ee" officeooo:paragraph-rsid="064699ee" style:font-size-asian="10.5pt" style:font-style-asian="normal" style:font-weight-asian="bold" style:font-size-complex="12pt" style:font-style-complex="normal" style:font-weight-complex="bold"/>
    </style:style>
    <style:style style:name="P322" style:family="paragraph" style:parent-style-name="Table_20_Contents">
      <style:paragraph-properties fo:text-align="justify" style:justify-single-word="false"/>
      <style:text-properties officeooo:paragraph-rsid="05efbbe7"/>
    </style:style>
    <style:style style:name="P323" style:family="paragraph" style:parent-style-name="Footnote">
      <style:text-properties officeooo:paragraph-rsid="05ac1a21"/>
    </style:style>
    <style:style style:name="P32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6f322b" fo:background-color="#ffffff" style:font-size-asian="11pt" style:font-size-complex="11pt"/>
    </style:style>
    <style:style style:name="P325" style:family="paragraph" style:parent-style-name="Standard">
      <style:paragraph-properties fo:margin-left="0in" fo:margin-right="0in" style:line-height-at-least="0.198in" fo:text-indent="0in" style:auto-text-indent="false"/>
      <style:text-properties style:font-name="Courier" fo:font-size="11pt" officeooo:paragraph-rsid="006f322b" style:font-size-asian="11pt" style:font-size-complex="11pt"/>
    </style:style>
    <style:style style:name="P326"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06f322b" fo:background-color="#ffffff" style:font-size-asian="11pt" style:font-size-complex="11pt"/>
    </style:style>
    <style:style style:name="P327" style:family="paragraph" style:parent-style-name="Standard">
      <style:paragraph-properties fo:margin-left="0in" fo:margin-right="0in" style:line-height-at-least="0.198in" fo:text-indent="0in" style:auto-text-indent="false"/>
      <style:text-properties officeooo:paragraph-rsid="006f322b"/>
    </style:style>
    <style:style style:name="P328" style:family="paragraph" style:parent-style-name="Table_20_Contents">
      <style:paragraph-properties fo:text-align="center" style:justify-single-word="false"/>
      <style:text-properties style:use-window-font-color="true" loext:opacity="0%" fo:font-size="12pt" fo:font-style="normal" fo:font-weight="bold" officeooo:rsid="006f322b" officeooo:paragraph-rsid="006f322b" style:font-size-asian="10.5pt" style:font-style-asian="normal" style:font-weight-asian="bold" style:font-size-complex="12pt" style:font-style-complex="normal" style:font-weight-complex="bold"/>
    </style:style>
    <style:style style:name="P329" style:family="paragraph" style:parent-style-name="Table_20_Contents">
      <style:paragraph-properties fo:text-align="justify" style:justify-single-word="false"/>
      <style:text-properties style:use-window-font-color="true" loext:opacity="0%" fo:font-size="12pt" fo:font-style="normal" fo:font-weight="normal" officeooo:rsid="006b0a6f" officeooo:paragraph-rsid="006b0a6f" style:font-size-asian="10.5pt" style:font-style-asian="normal" style:font-weight-asian="normal" style:font-size-complex="12pt" style:font-style-complex="normal" style:font-weight-complex="normal"/>
    </style:style>
    <style:style style:name="P330" style:family="paragraph" style:parent-style-name="Standard">
      <style:text-properties style:use-window-font-color="true" loext:opacity="0%" fo:font-size="12pt" fo:font-style="normal" fo:font-weight="normal" officeooo:rsid="0071d1e1" style:font-size-asian="10.5pt" style:font-style-asian="normal" style:font-weight-asian="normal" style:font-size-complex="12pt" style:font-style-complex="normal" style:font-weight-complex="normal"/>
    </style:style>
    <style:style style:name="P331" style:family="paragraph" style:parent-style-name="Table_20_Contents">
      <style:paragraph-properties fo:text-align="justify" style:justify-single-word="false"/>
      <style:text-properties style:use-window-font-color="true" loext:opacity="0%" fo:font-size="12pt" fo:font-style="normal" fo:font-weight="normal" officeooo:rsid="0072ef6f" officeooo:paragraph-rsid="0072ef6f" style:font-size-asian="10.5pt" style:font-style-asian="normal" style:font-weight-asian="normal" style:font-size-complex="12pt" style:font-style-complex="normal" style:font-weight-complex="normal"/>
    </style:style>
    <style:style style:name="P332" style:family="paragraph" style:parent-style-name="Table_20_Contents">
      <style:paragraph-properties fo:text-align="left" style:justify-single-word="false"/>
      <style:text-properties officeooo:paragraph-rsid="00745936"/>
    </style:style>
    <style:style style:name="P333" style:family="paragraph" style:parent-style-name="Table_20_Contents">
      <style:paragraph-properties fo:text-align="left" style:justify-single-word="false"/>
      <style:text-properties officeooo:rsid="00679be2" officeooo:paragraph-rsid="00745936" style:font-size-asian="12pt"/>
    </style:style>
    <style:style style:name="P334" style:family="paragraph" style:parent-style-name="Table_20_Contents">
      <style:paragraph-properties fo:text-align="justify" style:justify-single-word="false"/>
      <style:text-properties style:use-window-font-color="true" loext:opacity="0%" fo:font-size="12pt" fo:font-style="normal" fo:font-weight="normal" officeooo:rsid="00745936" officeooo:paragraph-rsid="064699ee" style:font-size-asian="10.5pt" style:font-style-asian="normal" style:font-weight-asian="normal" style:font-size-complex="12pt" style:font-style-complex="normal" style:font-weight-complex="normal"/>
    </style:style>
    <style:style style:name="P335" style:family="paragraph" style:parent-style-name="Table_20_Contents">
      <style:paragraph-properties fo:text-align="justify" style:justify-single-word="false"/>
      <style:text-properties style:use-window-font-color="true" loext:opacity="0%" fo:font-size="12pt" fo:font-style="normal" fo:font-weight="normal" officeooo:rsid="00749e5a" officeooo:paragraph-rsid="00749e5a"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fo:color="#000000" loext:opacity="100%" style:font-name="Courier" fo:font-size="12pt" fo:font-style="normal" fo:font-weight="normal" officeooo:rsid="00749e5a" officeooo:paragraph-rsid="00749e5a"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style:line-height-at-least="0.198in"/>
      <style:text-properties fo:color="#000000" loext:opacity="100%" style:font-name="Droid Sans Mono" fo:font-size="10.5pt" fo:font-weight="normal" fo:background-color="#ffffff"/>
    </style:style>
    <style:style style:name="P338" style:family="paragraph" style:parent-style-name="Standard">
      <style:paragraph-properties fo:text-align="justify" style:justify-single-word="false"/>
      <style:text-properties fo:color="#008000" loext:opacity="100%" style:font-name="Courier" fo:font-size="12pt" fo:font-style="normal" fo:font-weight="normal" officeooo:rsid="00749e5a" officeooo:paragraph-rsid="00749e5a"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left="0in" fo:margin-right="0in" style:line-height-at-least="0.198in" fo:text-indent="0in" style:auto-text-indent="false"/>
      <style:text-properties fo:color="#008000" loext:opacity="100%" style:font-name="Courier" fo:font-size="12pt" fo:font-weight="normal" fo:background-color="#ffffff" style:font-size-asian="12pt" style:font-size-complex="12pt"/>
    </style:style>
    <style:style style:name="P340" style:family="paragraph" style:parent-style-name="Table_20_Contents">
      <style:paragraph-properties fo:text-align="justify" style:justify-single-word="false"/>
      <style:text-properties officeooo:paragraph-rsid="00745936"/>
    </style:style>
    <style:style style:name="P341" style:family="paragraph" style:parent-style-name="Table_20_Contents">
      <style:paragraph-properties fo:text-align="left" style:justify-single-word="false"/>
      <style:text-properties officeooo:paragraph-rsid="0645b4c0"/>
    </style:style>
    <style:style style:name="P342" style:family="paragraph" style:parent-style-name="Table_20_Contents">
      <style:paragraph-properties fo:text-align="left" style:justify-single-word="false"/>
      <style:text-properties officeooo:rsid="00679be2" officeooo:paragraph-rsid="0645b4c0" style:font-size-asian="12pt"/>
    </style:style>
    <style:style style:name="P343" style:family="paragraph" style:parent-style-name="Table_20_Contents">
      <style:paragraph-properties fo:text-align="justify" style:justify-single-word="false"/>
      <style:text-properties style:use-window-font-color="true" loext:opacity="0%" fo:font-size="12pt" fo:font-style="normal" fo:font-weight="normal" officeooo:rsid="00749e5a" officeooo:paragraph-rsid="00745936" style:font-size-asian="10.5pt" style:font-style-asian="normal" style:font-weight-asian="normal" style:font-size-complex="12pt" style:font-style-complex="normal" style:font-weight-complex="normal"/>
    </style:style>
    <style:style style:name="P344" style:family="paragraph" style:parent-style-name="Table_20_Contents">
      <style:paragraph-properties fo:text-align="justify" style:justify-single-word="false"/>
      <style:text-properties style:use-window-font-color="true" loext:opacity="0%" fo:font-size="12pt" fo:font-style="normal" fo:font-weight="bold" officeooo:rsid="064699ee" officeooo:paragraph-rsid="064699ee" style:font-size-asian="10.5pt" style:font-style-asian="normal" style:font-weight-asian="bold" style:font-size-complex="12pt" style:font-style-complex="normal" style:font-weight-complex="bold"/>
    </style:style>
    <style:style style:name="P34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7ac107" fo:background-color="#ffffff" style:font-size-asian="11pt" style:font-size-complex="11pt"/>
    </style:style>
    <style:style style:name="P346" style:family="paragraph" style:parent-style-name="Standard">
      <style:paragraph-properties fo:margin-left="0in" fo:margin-right="0in" style:line-height-at-least="0.198in" fo:text-indent="0in" style:auto-text-indent="false"/>
      <style:text-properties style:font-name="Courier" fo:font-size="11pt" officeooo:paragraph-rsid="007ac107" style:font-size-asian="11pt" style:font-size-complex="11pt"/>
    </style:style>
    <style:style style:name="P34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7b1d19" fo:background-color="#ffffff" style:font-size-asian="11pt" style:font-size-complex="11pt"/>
    </style:style>
    <style:style style:name="P348" style:family="paragraph" style:parent-style-name="Standard">
      <style:paragraph-properties fo:margin-left="0in" fo:margin-right="0in" style:line-height-at-least="0.198in" fo:text-indent="0in" style:auto-text-indent="false"/>
      <style:text-properties fo:color="#008000" loext:opacity="100%" style:font-name="Courier" fo:font-size="11pt" fo:font-weight="normal" officeooo:paragraph-rsid="007b1d19" fo:background-color="#ffffff" style:font-size-asian="11pt" style:font-size-complex="11pt"/>
    </style:style>
    <style:style style:name="P349" style:family="paragraph" style:parent-style-name="Standard">
      <style:paragraph-properties fo:margin-left="0in" fo:margin-right="0in" style:line-height-at-least="0.198in" fo:text-indent="0in" style:auto-text-indent="false"/>
      <style:text-properties officeooo:paragraph-rsid="007ac107"/>
    </style:style>
    <style:style style:name="P350" style:family="paragraph" style:parent-style-name="Table_20_Contents">
      <style:paragraph-properties fo:text-align="center" style:justify-single-word="false"/>
      <style:text-properties style:use-window-font-color="true" loext:opacity="0%" fo:font-size="12pt" fo:font-style="normal" fo:font-weight="bold" officeooo:rsid="007b1d19" officeooo:paragraph-rsid="007b1d19" style:font-size-asian="10.5pt" style:font-style-asian="normal" style:font-weight-asian="bold" style:font-size-complex="12pt" style:font-style-complex="normal" style:font-weight-complex="bold"/>
    </style:style>
    <style:style style:name="P351" style:family="paragraph" style:parent-style-name="Table_20_Contents">
      <style:paragraph-properties fo:text-align="justify" style:justify-single-word="false"/>
      <style:text-properties style:use-window-font-color="true" loext:opacity="0%" fo:font-size="12pt" fo:font-style="normal" fo:font-weight="normal" officeooo:rsid="0082f742" officeooo:paragraph-rsid="0082f742" style:font-size-asian="10.5pt" style:font-style-asian="normal" style:font-weight-asian="normal" style:font-size-complex="12pt" style:font-style-complex="normal" style:font-weight-complex="normal"/>
    </style:style>
    <style:style style:name="P352" style:family="paragraph" style:parent-style-name="Table_20_Contents">
      <style:paragraph-properties fo:text-align="left" style:justify-single-word="false"/>
      <style:text-properties officeooo:paragraph-rsid="0082f742"/>
    </style:style>
    <style:style style:name="P353" style:family="paragraph" style:parent-style-name="Table_20_Contents">
      <style:paragraph-properties fo:text-align="left" style:justify-single-word="false"/>
      <style:text-properties officeooo:paragraph-rsid="06479339"/>
    </style:style>
    <style:style style:name="P354" style:family="paragraph" style:parent-style-name="Table_20_Contents">
      <style:paragraph-properties fo:text-align="justify" style:justify-single-word="false"/>
      <style:text-properties style:use-window-font-color="true" loext:opacity="0%" fo:font-size="12pt" fo:font-style="normal" fo:font-weight="normal" officeooo:rsid="0082f742" officeooo:paragraph-rsid="00844827" style:font-size-asian="10.5pt" style:font-style-asian="normal" style:font-weight-asian="normal" style:font-size-complex="12pt" style:font-style-complex="normal" style:font-weight-complex="normal"/>
    </style:style>
    <style:style style:name="P355" style:family="paragraph" style:parent-style-name="Table_20_Contents">
      <style:paragraph-properties fo:text-align="left" style:justify-single-word="false"/>
      <style:text-properties officeooo:paragraph-rsid="00844827"/>
    </style:style>
    <style:style style:name="P356" style:family="paragraph" style:parent-style-name="Table_20_Contents">
      <style:paragraph-properties fo:text-align="justify" style:justify-single-word="false"/>
      <style:text-properties style:use-window-font-color="true" loext:opacity="0%" fo:font-size="12pt" fo:font-style="normal" fo:font-weight="normal" officeooo:rsid="0082f742" officeooo:paragraph-rsid="0084ce90" style:font-size-asian="10.5pt" style:font-style-asian="normal" style:font-weight-asian="normal" style:font-size-complex="12pt" style:font-style-complex="normal" style:font-weight-complex="normal"/>
    </style:style>
    <style:style style:name="P357" style:family="paragraph" style:parent-style-name="Table_20_Contents">
      <style:paragraph-properties fo:text-align="left" style:justify-single-word="false"/>
      <style:text-properties officeooo:paragraph-rsid="0084ce90"/>
    </style:style>
    <style:style style:name="P358" style:family="paragraph" style:parent-style-name="Table_20_Contents">
      <style:paragraph-properties fo:text-align="justify" style:justify-single-word="false"/>
      <style:text-properties style:use-window-font-color="true" loext:opacity="0%" fo:font-size="12pt" fo:font-style="normal" fo:font-weight="normal" officeooo:rsid="0084ce90" officeooo:paragraph-rsid="0084ce90"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center" style:justify-single-word="false"/>
      <style:text-properties style:use-window-font-color="true" loext:opacity="0%" fo:font-size="18pt" fo:font-weight="bold" officeooo:rsid="00417256" officeooo:paragraph-rsid="00417256" style:font-size-asian="18pt" style:font-weight-asian="bold" style:font-size-complex="18pt" style:font-weight-complex="bold"/>
    </style:style>
    <style:style style:name="P360" style:family="paragraph" style:parent-style-name="Standard">
      <style:paragraph-properties fo:text-align="justify" style:justify-single-word="false"/>
      <style:text-properties style:use-window-font-color="true" loext:opacity="0%" fo:font-size="12pt" fo:font-weight="bold" officeooo:rsid="00417256" officeooo:paragraph-rsid="00417256" style:font-size-asian="10.5pt" style:font-weight-asian="bold" style:font-size-complex="12pt" style:font-weight-complex="bold"/>
    </style:style>
    <style:style style:name="P361" style:family="paragraph" style:parent-style-name="Standard">
      <style:paragraph-properties fo:text-align="justify" style:justify-single-word="false"/>
      <style:text-properties style:use-window-font-color="true" loext:opacity="0%" fo:font-size="12pt" fo:font-weight="normal" officeooo:rsid="0086be77" officeooo:paragraph-rsid="0086be77" style:font-size-asian="10.5pt" style:font-weight-asian="normal" style:font-size-complex="12pt" style:font-weight-complex="normal"/>
    </style:style>
    <style:style style:name="P362" style:family="paragraph" style:parent-style-name="Table_20_Contents">
      <style:paragraph-properties fo:text-align="left" style:justify-single-word="false"/>
      <style:text-properties officeooo:paragraph-rsid="0086be77"/>
    </style:style>
    <style:style style:name="P363" style:family="paragraph" style:parent-style-name="Standard">
      <style:paragraph-properties fo:text-align="justify" style:justify-single-word="false"/>
      <style:text-properties style:use-window-font-color="true" loext:opacity="0%" fo:font-size="12pt" fo:font-weight="normal" officeooo:rsid="0089112b" officeooo:paragraph-rsid="0089112b" style:font-size-asian="10.5pt" style:font-weight-asian="normal" style:font-size-complex="12pt" style:font-weight-complex="normal"/>
    </style:style>
    <style:style style:name="P364"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365" style:family="paragraph" style:parent-style-name="Table_20_Contents">
      <style:paragraph-properties fo:text-align="center" style:justify-single-word="false"/>
      <style:text-properties fo:font-weight="bold" style:font-weight-asian="bold" style:font-weight-complex="bold"/>
    </style:style>
    <style:style style:name="P366" style:family="paragraph" style:parent-style-name="Table_20_Contents">
      <style:paragraph-properties fo:text-align="left" style:justify-single-word="false"/>
      <style:text-properties style:font-name="Courier" fo:font-size="12pt" style:font-size-asian="10.5pt" style:font-size-complex="12pt"/>
    </style:style>
    <style:style style:name="P367" style:family="paragraph" style:parent-style-name="Table_20_Contents">
      <style:paragraph-properties fo:text-align="left" style:justify-single-word="false"/>
      <style:text-properties fo:font-size="12pt" style:font-size-asian="10.5pt" style:font-size-complex="12pt"/>
    </style:style>
    <style:style style:name="P368" style:family="paragraph" style:parent-style-name="Table_20_Contents">
      <style:paragraph-properties fo:text-align="left" style:justify-single-word="false"/>
    </style:style>
    <style:style style:name="P369" style:family="paragraph" style:parent-style-name="Standard">
      <style:paragraph-properties fo:text-align="left" style:justify-single-word="false"/>
      <style:text-properties fo:font-size="12pt" style:font-size-asian="10.5pt" style:font-size-complex="12pt"/>
    </style:style>
    <style:style style:name="P370" style:family="paragraph" style:parent-style-name="Standard">
      <style:paragraph-properties fo:text-align="center" style:justify-single-word="false"/>
      <style:text-properties style:use-window-font-color="true" loext:opacity="0%" fo:font-size="12pt" fo:font-weight="normal" officeooo:rsid="0089112b" officeooo:paragraph-rsid="05a70ed4" style:font-size-asian="10.5pt" style:font-weight-asian="normal" style:font-size-complex="12pt" style:font-weight-complex="normal"/>
    </style:style>
    <style:style style:name="P371" style:family="paragraph" style:parent-style-name="Standard">
      <style:paragraph-properties fo:text-align="justify" style:justify-single-word="false"/>
      <style:text-properties style:use-window-font-color="true" loext:opacity="0%" fo:font-size="12pt" fo:font-weight="normal" officeooo:rsid="00899ddc" officeooo:paragraph-rsid="00899ddc" style:font-size-asian="10.5pt" style:font-weight-asian="normal" style:font-size-complex="12pt" style:font-weight-complex="normal"/>
    </style:style>
    <style:style style:name="P372" style:family="paragraph" style:parent-style-name="Table_20_Contents">
      <style:paragraph-properties fo:text-align="left" style:justify-single-word="false"/>
      <style:text-properties officeooo:paragraph-rsid="00899ddc"/>
    </style:style>
    <style:style style:name="P373" style:family="paragraph" style:parent-style-name="Standard">
      <style:paragraph-properties fo:text-align="justify" style:justify-single-word="false"/>
      <style:text-properties style:use-window-font-color="true" loext:opacity="0%" fo:font-size="12pt" fo:font-weight="normal" officeooo:rsid="008af08e" officeooo:paragraph-rsid="008af08e" style:font-size-asian="10.5pt" style:font-weight-asian="normal" style:font-size-complex="12pt" style:font-weight-complex="normal"/>
    </style:style>
    <style:style style:name="P374" style:family="paragraph" style:parent-style-name="Standard">
      <style:paragraph-properties fo:text-align="center" style:justify-single-word="false"/>
      <style:text-properties style:use-window-font-color="true" loext:opacity="0%" fo:font-size="13pt" fo:font-weight="bold" officeooo:rsid="05b58ab6" officeooo:paragraph-rsid="05b58ab6" style:font-size-asian="13pt" style:font-weight-asian="bold" style:font-size-complex="13pt" style:font-weight-complex="bold"/>
    </style:style>
    <style:style style:name="P375" style:family="paragraph" style:parent-style-name="Footnote">
      <style:text-properties officeooo:paragraph-rsid="05b58ab6"/>
    </style:style>
    <style:style style:name="P376" style:family="paragraph" style:parent-style-name="Standard">
      <style:paragraph-properties fo:text-align="justify" style:justify-single-word="false"/>
      <style:text-properties fo:color="#000000" loext:opacity="100%" style:font-name="Courier" fo:font-size="11pt" fo:font-weight="normal" fo:background-color="#ffffff" style:font-size-asian="11pt" style:font-weight-asian="bold" style:font-size-complex="11pt" style:font-weight-complex="bold"/>
    </style:style>
    <style:style style:name="P377"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08af08e" officeooo:paragraph-rsid="008af08e" fo:background-color="#ffffff" style:font-size-asian="10pt" style:font-style-asian="italic" style:font-size-complex="10pt" style:font-style-complex="italic"/>
    </style:style>
    <style:style style:name="P378" style:family="paragraph" style:parent-style-name="Standard">
      <style:paragraph-properties fo:text-align="justify" style:justify-single-word="false"/>
      <style:text-properties officeooo:paragraph-rsid="008af08e"/>
    </style:style>
    <style:style style:name="P379" style:family="paragraph" style:parent-style-name="Standard">
      <style:paragraph-properties fo:text-align="justify" style:justify-single-word="false"/>
      <style:text-properties style:use-window-font-color="true" loext:opacity="0%" fo:font-size="12pt" fo:font-weight="normal" officeooo:rsid="009050c3" officeooo:paragraph-rsid="009050c3" style:font-size-asian="10.5pt" style:font-weight-asian="normal" style:font-size-complex="12pt" style:font-weight-complex="normal"/>
    </style:style>
    <style:style style:name="P380" style:family="paragraph" style:parent-style-name="Table_20_Contents">
      <style:paragraph-properties fo:text-align="justify" style:justify-single-word="false"/>
      <style:text-properties style:font-name="Courier" fo:font-size="12pt" style:font-size-asian="10.5pt" style:font-size-complex="12pt"/>
    </style:style>
    <style:style style:name="P381" style:family="paragraph" style:parent-style-name="Table_20_Contents">
      <style:paragraph-properties fo:text-align="justify" style:justify-single-word="false"/>
      <style:text-properties fo:font-size="12pt" officeooo:paragraph-rsid="009050c3" style:font-size-asian="10.5pt" style:font-size-complex="12pt"/>
    </style:style>
    <style:style style:name="P382" style:family="paragraph" style:parent-style-name="Table_20_Contents">
      <style:paragraph-properties fo:text-align="justify" style:justify-single-word="false"/>
      <style:text-properties style:font-name="Courier" fo:font-size="12pt" officeooo:paragraph-rsid="009050c3" style:font-size-asian="10.5pt" style:font-size-complex="12pt"/>
    </style:style>
    <style:style style:name="P383" style:family="paragraph" style:parent-style-name="Standard">
      <style:paragraph-properties fo:text-align="center" style:justify-single-word="false"/>
      <style:text-properties style:use-window-font-color="true" loext:opacity="0%" fo:font-size="12pt" fo:font-weight="normal" officeooo:rsid="009050c3" officeooo:paragraph-rsid="009050c3" style:font-size-asian="10.5pt" style:font-weight-asian="normal" style:font-size-complex="12pt" style:font-weight-complex="normal"/>
    </style:style>
    <style:style style:name="P384" style:family="paragraph" style:parent-style-name="Standard">
      <style:paragraph-properties fo:text-align="justify" style:justify-single-word="false"/>
      <style:text-properties officeooo:paragraph-rsid="05f1833f"/>
    </style:style>
    <style:style style:name="P385" style:family="paragraph" style:parent-style-name="Standard">
      <style:paragraph-properties fo:text-align="justify" style:justify-single-word="false"/>
      <style:text-properties style:use-window-font-color="true" loext:opacity="0%" fo:font-size="12pt" fo:font-weight="normal" officeooo:rsid="00925745" officeooo:paragraph-rsid="00925745" style:font-size-asian="10.5pt" style:font-weight-asian="normal" style:font-size-complex="12pt" style:font-weight-complex="normal"/>
    </style:style>
    <style:style style:name="P386" style:family="paragraph" style:parent-style-name="Standard">
      <style:paragraph-properties fo:text-align="justify" style:justify-single-word="false"/>
      <style:text-properties fo:color="#800080" loext:opacity="100%" style:font-name="Courier" fo:font-size="12pt" fo:font-weight="normal" officeooo:rsid="009069f0" officeooo:paragraph-rsid="009069f0" style:font-size-asian="10.5pt" style:font-weight-asian="normal" style:font-size-complex="12pt" style:font-weight-complex="normal"/>
    </style:style>
    <style:style style:name="P387" style:family="paragraph" style:parent-style-name="Table_20_Contents">
      <style:paragraph-properties fo:text-align="justify" style:justify-single-word="false"/>
      <style:text-properties fo:font-size="12pt" officeooo:rsid="0093fa00" officeooo:paragraph-rsid="0093fa00" style:font-size-asian="10.5pt" style:font-size-complex="12pt"/>
    </style:style>
    <style:style style:name="P388" style:family="paragraph" style:parent-style-name="Standard">
      <style:paragraph-properties fo:text-align="left" style:justify-single-word="false"/>
      <style:text-properties officeooo:paragraph-rsid="009069f0"/>
    </style:style>
    <style:style style:name="P389" style:family="paragraph" style:parent-style-name="Standard">
      <style:paragraph-properties fo:text-align="center" style:justify-single-word="false"/>
      <style:text-properties style:use-window-font-color="true" loext:opacity="0%" fo:font-size="12pt" fo:font-weight="normal" officeooo:rsid="00a796b2" officeooo:paragraph-rsid="00a796b2" style:font-size-asian="10.5pt" style:font-weight-asian="normal" style:font-size-complex="12pt" style:font-weight-complex="normal"/>
    </style:style>
    <style:style style:name="P390" style:family="paragraph" style:parent-style-name="Standard">
      <style:paragraph-properties fo:text-align="justify" style:justify-single-word="false"/>
      <style:text-properties style:use-window-font-color="true" loext:opacity="0%" fo:font-size="12pt" fo:font-weight="normal" officeooo:rsid="00950f31" officeooo:paragraph-rsid="00950f31" style:font-size-asian="10.5pt" style:font-weight-asian="normal" style:font-size-complex="12pt" style:font-weight-complex="normal"/>
    </style:style>
    <style:style style:name="P391" style:family="paragraph" style:parent-style-name="Standard">
      <style:paragraph-properties fo:text-align="justify" style:justify-single-word="false"/>
      <style:text-properties fo:color="#000000" loext:opacity="100%" style:font-name="Courier" fo:font-size="10pt" fo:font-weight="normal" fo:background-color="#ffffff" style:font-size-asian="10pt" style:font-size-complex="10pt"/>
    </style:style>
    <style:style style:name="P392" style:family="paragraph" style:parent-style-name="Standard">
      <style:paragraph-properties fo:margin-left="0in" fo:margin-right="0in" style:line-height-at-least="0.198in" fo:text-indent="0in" style:auto-text-indent="false"/>
      <style:text-properties fo:color="#000000" loext:opacity="100%" style:font-name="Courier" fo:font-size="10pt" fo:font-weight="normal" fo:background-color="#ffffff" style:font-size-asian="10pt" style:font-size-complex="10pt"/>
    </style:style>
    <style:style style:name="P393" style:family="paragraph" style:parent-style-name="Standard">
      <style:paragraph-properties fo:margin-left="0in" fo:margin-right="0in" style:line-height-at-least="0.198in" fo:text-indent="0in" style:auto-text-indent="false"/>
      <style:text-properties fo:color="#008000" loext:opacity="100%" style:font-name="Courier" fo:font-size="10pt" fo:font-weight="normal" fo:background-color="#ffffff" style:font-size-asian="10pt" style:font-size-complex="10pt"/>
    </style:style>
    <style:style style:name="P394" style:family="paragraph" style:parent-style-name="Standard">
      <style:paragraph-properties fo:margin-left="0in" fo:margin-right="0in" style:line-height-at-least="0.198in" fo:text-indent="0in" style:auto-text-indent="false"/>
      <style:text-properties style:font-name="Courier" fo:font-size="10pt" style:font-size-asian="10pt" style:font-size-complex="10pt"/>
    </style:style>
    <style:style style:name="P395" style:family="paragraph" style:parent-style-name="Standard">
      <style:paragraph-properties fo:margin-left="0in" fo:margin-right="0in" style:line-height-at-least="0.198in" fo:text-indent="0in" style:auto-text-indent="false"/>
      <style:text-properties fo:color="#0000ff" loext:opacity="100%" style:font-name="Courier" fo:font-size="10pt" fo:font-weight="normal" fo:background-color="#ffffff" style:font-size-asian="10pt" style:font-size-complex="10pt"/>
    </style:style>
    <style:style style:name="P396" style:family="paragraph" style:parent-style-name="Standard">
      <style:paragraph-properties fo:text-align="center" style:justify-single-word="false"/>
      <style:text-properties officeooo:paragraph-rsid="05b58ab6"/>
    </style:style>
    <style:style style:name="P397" style:family="paragraph" style:parent-style-name="Standard">
      <style:paragraph-properties fo:text-align="justify" style:justify-single-word="false"/>
      <style:text-properties style:use-window-font-color="true" loext:opacity="0%" fo:font-size="12pt" fo:font-weight="normal" officeooo:rsid="05b58ab6" officeooo:paragraph-rsid="05b58ab6" style:font-size-asian="10.5pt" style:font-weight-asian="normal" style:font-size-complex="12pt" style:font-weight-complex="normal"/>
    </style:style>
    <style:style style:name="P398" style:family="paragraph" style:parent-style-name="Standard">
      <style:paragraph-properties fo:text-align="justify" style:justify-single-word="false"/>
      <style:text-properties officeooo:paragraph-rsid="00950f31"/>
    </style:style>
    <style:style style:name="P399" style:family="paragraph" style:parent-style-name="Standard">
      <style:paragraph-properties fo:text-align="justify" style:justify-single-word="false"/>
      <style:text-properties style:use-window-font-color="true" loext:opacity="0%" fo:font-size="12pt" fo:font-weight="normal" officeooo:rsid="009802e9" officeooo:paragraph-rsid="009802e9" style:font-size-asian="10.5pt" style:font-weight-asian="normal" style:font-size-complex="12pt" style:font-weight-complex="normal"/>
    </style:style>
    <style:style style:name="P400"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09802e9" officeooo:paragraph-rsid="009802e9" fo:background-color="#ffffff" style:font-size-asian="10pt" style:font-style-asian="italic" style:font-size-complex="10pt" style:font-style-complex="italic"/>
    </style:style>
    <style:style style:name="P40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9b2859" fo:background-color="#ffffff" style:font-size-asian="11pt" style:font-size-complex="11pt"/>
    </style:style>
    <style:style style:name="P402" style:family="paragraph" style:parent-style-name="Standard">
      <style:paragraph-properties fo:margin-left="0in" fo:margin-right="0in" style:line-height-at-least="0.198in" fo:text-indent="0in" style:auto-text-indent="false"/>
      <style:text-properties officeooo:paragraph-rsid="009b2859"/>
    </style:style>
    <style:style style:name="P40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9c5cc5" fo:background-color="#ffffff" style:font-size-asian="11pt" style:font-size-complex="11pt"/>
    </style:style>
    <style:style style:name="P404" style:family="paragraph" style:parent-style-name="Standard">
      <style:paragraph-properties fo:text-align="center" style:justify-single-word="false"/>
      <style:text-properties style:use-window-font-color="true" loext:opacity="0%" fo:font-size="12pt" fo:font-weight="bold" officeooo:rsid="009b2859" officeooo:paragraph-rsid="009b2859" style:font-size-asian="10.5pt" style:font-weight-asian="bold" style:font-size-complex="12pt" style:font-weight-complex="bold"/>
    </style:style>
    <style:style style:name="P405" style:family="paragraph" style:parent-style-name="Standard">
      <style:paragraph-properties fo:text-align="center" style:justify-single-word="false"/>
      <style:text-properties style:use-window-font-color="true" loext:opacity="0%" fo:font-size="12pt" fo:font-weight="normal" officeooo:rsid="009b2859" officeooo:paragraph-rsid="009b2859" style:font-size-asian="10.5pt" style:font-weight-asian="normal" style:font-size-complex="12pt" style:font-weight-complex="normal"/>
    </style:style>
    <style:style style:name="P406" style:family="paragraph" style:parent-style-name="Standard">
      <style:paragraph-properties fo:text-align="justify" style:justify-single-word="false"/>
      <style:text-properties style:use-window-font-color="true" loext:opacity="0%" fo:font-size="12pt" fo:font-weight="normal" officeooo:rsid="009d91c6" officeooo:paragraph-rsid="009d91c6" style:font-size-asian="10.5pt" style:font-weight-asian="normal" style:font-size-complex="12pt" style:font-weight-complex="normal"/>
    </style:style>
    <style:style style:name="P407" style:family="paragraph" style:parent-style-name="Table_20_Contents">
      <style:paragraph-properties fo:text-align="left" style:justify-single-word="false"/>
      <style:text-properties officeooo:paragraph-rsid="009d91c6"/>
    </style:style>
    <style:style style:name="P408" style:family="paragraph" style:parent-style-name="Table_20_Contents">
      <style:paragraph-properties fo:text-align="left" style:justify-single-word="false"/>
      <style:text-properties officeooo:paragraph-rsid="009f315c"/>
    </style:style>
    <style:style style:name="P409" style:family="paragraph" style:parent-style-name="Standard">
      <style:paragraph-properties fo:text-align="justify" style:justify-single-word="false"/>
      <style:text-properties officeooo:paragraph-rsid="06495725"/>
    </style:style>
    <style:style style:name="P410" style:family="paragraph" style:parent-style-name="Standard">
      <style:paragraph-properties fo:text-align="justify" style:justify-single-word="false"/>
      <style:text-properties style:use-window-font-color="true" loext:opacity="0%" fo:font-size="12pt" fo:font-weight="normal" officeooo:rsid="009ff374" style:font-size-asian="10.5pt" style:font-weight-asian="normal" style:font-size-complex="12pt" style:font-weight-complex="normal"/>
    </style:style>
    <style:style style:name="P411" style:family="paragraph" style:parent-style-name="Standard">
      <style:paragraph-properties fo:text-align="justify" style:justify-single-word="false"/>
      <style:text-properties style:use-window-font-color="true" loext:opacity="0%" fo:font-size="12pt" fo:font-weight="normal" officeooo:rsid="009ff374" officeooo:paragraph-rsid="06495725" style:font-size-asian="10.5pt" style:font-weight-asian="normal" style:font-size-complex="12pt" style:font-weight-complex="normal"/>
    </style:style>
    <style:style style:name="P412" style:family="paragraph" style:parent-style-name="Table_20_Contents">
      <style:paragraph-properties fo:text-align="left" style:justify-single-word="false"/>
      <style:text-properties officeooo:paragraph-rsid="06495725"/>
    </style:style>
    <style:style style:name="P413" style:family="paragraph" style:parent-style-name="Table_20_Contents">
      <style:paragraph-properties fo:text-align="left" style:justify-single-word="false"/>
      <style:text-properties fo:color="#808080" loext:opacity="100%" officeooo:paragraph-rsid="06495725"/>
    </style:style>
    <style:style style:name="P414" style:family="paragraph" style:parent-style-name="Standard">
      <style:paragraph-properties fo:text-align="justify" style:justify-single-word="false"/>
      <style:text-properties style:use-window-font-color="true" loext:opacity="0%" fo:font-size="12pt" fo:font-weight="normal" officeooo:rsid="009f315c" officeooo:paragraph-rsid="009f315c" style:font-size-asian="10.5pt" style:font-weight-asian="normal" style:font-size-complex="12pt" style:font-weight-complex="normal"/>
    </style:style>
    <style:style style:name="P415" style:family="paragraph" style:parent-style-name="Standard">
      <style:paragraph-properties fo:text-align="justify" style:justify-single-word="false"/>
      <style:text-properties style:use-window-font-color="true" loext:opacity="0%" fo:font-size="12pt" fo:font-weight="normal" officeooo:rsid="009ff374" officeooo:paragraph-rsid="009f315c" style:font-size-asian="10.5pt" style:font-weight-asian="normal" style:font-size-complex="12pt" style:font-weight-complex="normal"/>
    </style:style>
    <style:style style:name="P416" style:family="paragraph" style:parent-style-name="Standard">
      <style:text-properties style:use-window-font-color="true" loext:opacity="0%" fo:font-size="12pt" fo:font-weight="normal" officeooo:rsid="009ff374" style:font-size-asian="10.5pt" style:font-weight-asian="normal" style:font-size-complex="12pt" style:font-weight-complex="normal"/>
    </style:style>
    <style:style style:name="P417" style:family="paragraph" style:parent-style-name="Standard">
      <style:paragraph-properties fo:text-align="justify" style:justify-single-word="false"/>
      <style:text-properties officeooo:paragraph-rsid="009f315c"/>
    </style:style>
    <style:style style:name="P418" style:family="paragraph" style:parent-style-name="Standard">
      <style:paragraph-properties fo:margin-left="0in" fo:margin-right="0in" style:line-height-at-least="0.198in" fo:text-align="left" style:justify-single-word="false" fo:text-indent="0in" style:auto-text-indent="false"/>
      <style:text-properties fo:color="#00a933" loext:opacity="100%" style:font-name="Courier" fo:font-size="10pt" fo:font-style="italic" fo:font-weight="normal" officeooo:rsid="009ff374" officeooo:paragraph-rsid="009ff374" fo:background-color="#ffffff" style:font-size-asian="10pt" style:font-style-asian="italic" style:font-size-complex="10pt" style:font-style-complex="italic"/>
    </style:style>
    <style:style style:name="P419" style:family="paragraph" style:parent-style-name="Standard">
      <style:paragraph-properties fo:text-align="justify" style:justify-single-word="false"/>
      <style:text-properties style:use-window-font-color="true" loext:opacity="0%" fo:font-size="12pt" fo:font-weight="normal" officeooo:rsid="00a2b02b" officeooo:paragraph-rsid="05f1833f" style:font-size-asian="10.5pt" style:font-weight-asian="normal" style:font-size-complex="12pt" style:font-weight-complex="normal"/>
    </style:style>
    <style:style style:name="P420" style:family="paragraph" style:parent-style-name="Standard">
      <style:paragraph-properties fo:text-align="justify" style:justify-single-word="false"/>
      <style:text-properties style:use-window-font-color="true" loext:opacity="0%" fo:font-size="12pt" fo:font-weight="normal" officeooo:rsid="00a2b02b" officeooo:paragraph-rsid="009f315c" style:font-size-asian="10.5pt" style:font-weight-asian="normal" style:font-size-complex="12pt" style:font-weight-complex="normal"/>
    </style:style>
    <style:style style:name="P421" style:family="paragraph" style:parent-style-name="Standard">
      <style:paragraph-properties fo:margin-left="0in" fo:margin-right="0in" style:line-height-at-least="0.198in" fo:text-align="left" style:justify-single-word="false" fo:text-indent="0in" style:auto-text-indent="false"/>
      <style:text-properties fo:color="#000000" loext:opacity="100%" style:font-name="Courier" fo:font-size="11pt" fo:font-weight="normal" officeooo:paragraph-rsid="00a2b02b" fo:background-color="#ffffff" style:font-size-asian="11pt" style:font-size-complex="11pt"/>
    </style:style>
    <style:style style:name="P422" style:family="paragraph" style:parent-style-name="Table_20_Contents">
      <style:paragraph-properties fo:text-align="justify" style:justify-single-word="false"/>
      <style:text-properties fo:color="#00a933" loext:opacity="100%" style:font-name="Courier" fo:font-size="10pt" fo:font-style="italic" officeooo:rsid="00a2b02b" officeooo:paragraph-rsid="00a2b02b" style:font-size-asian="10pt" style:font-style-asian="italic" style:font-size-complex="10pt" style:font-style-complex="italic"/>
    </style:style>
    <style:style style:name="P423" style:family="paragraph" style:parent-style-name="Standard">
      <style:paragraph-properties fo:text-align="justify" style:justify-single-word="false"/>
      <style:text-properties style:use-window-font-color="true" loext:opacity="0%" fo:font-size="12pt" fo:font-weight="normal" officeooo:rsid="00a2b02b" officeooo:paragraph-rsid="00a2b02b" style:font-size-asian="10.5pt" style:font-weight-asian="normal" style:font-size-complex="12pt" style:font-weight-complex="normal"/>
    </style:style>
    <style:style style:name="P424" style:family="paragraph" style:parent-style-name="Standard">
      <style:paragraph-properties fo:text-align="justify" style:justify-single-word="false"/>
      <style:text-properties officeooo:paragraph-rsid="064a2a0e"/>
    </style:style>
    <style:style style:name="P425" style:family="paragraph" style:parent-style-name="Standard">
      <style:paragraph-properties fo:text-align="justify" style:justify-single-word="false"/>
      <style:text-properties style:use-window-font-color="true" loext:opacity="0%" fo:font-size="12pt" fo:font-weight="normal" officeooo:rsid="00a4dba4" officeooo:paragraph-rsid="00a4dba4" style:font-size-asian="10.5pt" style:font-weight-asian="normal" style:font-size-complex="12pt" style:font-weight-complex="normal"/>
    </style:style>
    <style:style style:name="P426" style:family="paragraph" style:parent-style-name="Standard">
      <style:paragraph-properties fo:text-align="justify" style:justify-single-word="false"/>
      <style:text-properties style:use-window-font-color="true" loext:opacity="0%" style:font-name="Courier" fo:font-size="12pt" fo:font-weight="normal" officeooo:rsid="00a4dba4" officeooo:paragraph-rsid="00a4dba4" style:font-size-asian="10.5pt" style:font-weight-asian="normal" style:font-size-complex="12pt" style:font-weight-complex="normal"/>
    </style:style>
    <style:style style:name="P427" style:family="paragraph" style:parent-style-name="Table_20_Contents">
      <style:paragraph-properties fo:text-align="justify" style:justify-single-word="false"/>
    </style:style>
    <style:style style:name="P428" style:family="paragraph" style:parent-style-name="Table_20_Contents">
      <style:paragraph-properties fo:text-align="justify" style:justify-single-word="false"/>
      <style:text-properties style:use-window-font-color="true" loext:opacity="0%" style:font-name="Courier" fo:font-size="11pt" fo:font-weight="normal" officeooo:rsid="00a4dba4" style:font-size-asian="11pt" style:font-weight-asian="normal" style:font-size-complex="11pt" style:font-weight-complex="normal"/>
    </style:style>
    <style:style style:name="P429" style:family="paragraph" style:parent-style-name="Standard">
      <style:paragraph-properties fo:text-align="center" style:justify-single-word="false"/>
      <style:text-properties officeooo:paragraph-rsid="00a4dba4"/>
    </style:style>
    <style:style style:name="P43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aa67f2" fo:background-color="#ffffff" style:font-size-asian="11pt" style:font-size-complex="11pt"/>
    </style:style>
    <style:style style:name="P431" style:family="paragraph" style:parent-style-name="Standard">
      <style:paragraph-properties fo:margin-left="0in" fo:margin-right="0in" style:line-height-at-least="0.198in" fo:text-indent="0in" style:auto-text-indent="false"/>
      <style:text-properties style:use-window-font-color="true" loext:opacity="0%" style:font-name="Courier" fo:font-size="10pt" fo:font-weight="normal" officeooo:rsid="00aa67f2" officeooo:paragraph-rsid="00aa67f2" fo:background-color="#ffffff" style:font-size-asian="10pt" style:font-size-complex="10pt"/>
    </style:style>
    <style:style style:name="P432" style:family="paragraph" style:parent-style-name="Standard">
      <style:paragraph-properties fo:margin-left="0in" fo:margin-right="0in" style:line-height-at-least="0.198in" fo:text-indent="0in" style:auto-text-indent="false"/>
      <style:text-properties style:font-name="Courier" fo:font-size="11pt" officeooo:paragraph-rsid="00aa67f2" style:font-size-asian="11pt" style:font-size-complex="11pt"/>
    </style:style>
    <style:style style:name="P433" style:family="paragraph" style:parent-style-name="Standard">
      <style:paragraph-properties fo:margin-left="0in" fo:margin-right="0in" style:line-height-at-least="0.198in" fo:text-indent="0in" style:auto-text-indent="false"/>
      <style:text-properties officeooo:paragraph-rsid="00aa67f2"/>
    </style:style>
    <style:style style:name="P434" style:family="paragraph" style:parent-style-name="Standard">
      <style:paragraph-properties style:line-height-at-least="0.198in"/>
      <style:text-properties fo:color="#008000" loext:opacity="100%" style:font-name="Courier" fo:font-size="11pt" fo:font-weight="normal" fo:background-color="#ffffff" style:font-size-asian="11pt" style:font-size-complex="11pt"/>
    </style:style>
    <style:style style:name="P435" style:family="paragraph" style:parent-style-name="Standard">
      <style:paragraph-properties fo:text-align="center" style:justify-single-word="false"/>
      <style:text-properties style:use-window-font-color="true" loext:opacity="0%" fo:font-size="12pt" fo:font-weight="bold" officeooo:rsid="00aa67f2" officeooo:paragraph-rsid="00aa67f2" style:font-size-asian="10.5pt" style:font-weight-asian="bold" style:font-size-complex="12pt" style:font-weight-complex="bold"/>
    </style:style>
    <style:style style:name="P436" style:family="paragraph" style:parent-style-name="Standard">
      <style:paragraph-properties fo:text-align="center" style:justify-single-word="false"/>
      <style:text-properties style:use-window-font-color="true" loext:opacity="0%" fo:font-size="12pt" fo:font-weight="normal" officeooo:rsid="0089112b" officeooo:paragraph-rsid="0089112b" style:font-size-asian="10.5pt" style:font-weight-asian="normal" style:font-size-complex="12pt" style:font-weight-complex="normal"/>
    </style:style>
    <style:style style:name="P437" style:family="paragraph" style:parent-style-name="Standard">
      <style:paragraph-properties fo:text-align="justify" style:justify-single-word="false"/>
      <style:text-properties officeooo:paragraph-rsid="00b0cc4c"/>
    </style:style>
    <style:style style:name="P438" style:family="paragraph" style:parent-style-name="Standard">
      <style:paragraph-properties fo:text-align="justify" style:justify-single-word="false"/>
      <style:text-properties style:use-window-font-color="true" loext:opacity="0%" fo:font-size="12pt" fo:font-style="normal" fo:font-weight="normal" officeooo:rsid="00b648ae" officeooo:paragraph-rsid="00b648ae" style:font-size-asian="10.5pt" style:font-style-asian="normal" style:font-weight-asian="normal" style:font-size-complex="12pt" style:font-style-complex="normal" style:font-weight-complex="normal"/>
    </style:style>
    <style:style style:name="P439" style:family="paragraph" style:parent-style-name="Standard">
      <style:paragraph-properties fo:text-align="justify" style:justify-single-word="false"/>
      <style:text-properties style:use-window-font-color="true" loext:opacity="0%" fo:font-size="12pt" fo:font-style="normal" style:text-underline-style="none" fo:font-weight="normal" officeooo:rsid="00b648ae" officeooo:paragraph-rsid="00b648ae" style:font-size-asian="10.5pt" style:font-style-asian="normal" style:font-weight-asian="normal" style:font-size-complex="12pt" style:font-style-complex="normal" style:font-weight-complex="normal"/>
    </style:style>
    <style:style style:name="P440" style:family="paragraph" style:parent-style-name="Table_20_Contents">
      <style:paragraph-properties fo:text-align="left" style:justify-single-word="false"/>
      <style:text-properties officeooo:paragraph-rsid="00b77755"/>
    </style:style>
    <style:style style:name="P441" style:family="paragraph" style:parent-style-name="Table_20_Contents">
      <style:paragraph-properties fo:text-align="left" style:justify-single-word="false"/>
      <style:text-properties officeooo:paragraph-rsid="00b9645f"/>
    </style:style>
    <style:style style:name="P442" style:family="paragraph" style:parent-style-name="Table_20_Contents">
      <style:paragraph-properties fo:text-align="left" style:justify-single-word="false"/>
      <style:text-properties officeooo:rsid="00b77755" officeooo:paragraph-rsid="00b9645f"/>
    </style:style>
    <style:style style:name="P443" style:family="paragraph" style:parent-style-name="Standard">
      <style:paragraph-properties fo:text-align="justify" style:justify-single-word="false"/>
      <style:text-properties officeooo:paragraph-rsid="05f193db"/>
    </style:style>
    <style:style style:name="P444" style:family="paragraph" style:parent-style-name="Standard">
      <style:paragraph-properties fo:text-align="justify" style:justify-single-word="false"/>
      <style:text-properties style:use-window-font-color="true" loext:opacity="0%" fo:font-size="12pt" fo:font-style="normal" style:text-underline-style="none" fo:font-weight="normal" officeooo:rsid="00ba86af" officeooo:paragraph-rsid="00ba86af" style:font-size-asian="10.5pt" style:font-style-asian="normal" style:font-weight-asian="normal" style:font-size-complex="12pt" style:font-style-complex="normal" style:font-weight-complex="normal"/>
    </style:style>
    <style:style style:name="P445" style:family="paragraph" style:parent-style-name="Standard">
      <style:paragraph-properties fo:text-align="justify" style:justify-single-word="false"/>
      <style:text-properties style:use-window-font-color="true" loext:opacity="0%" fo:font-size="12pt" fo:font-style="normal" style:text-underline-style="none" fo:font-weight="normal" officeooo:rsid="00ba86af" officeooo:paragraph-rsid="05f193db" style:font-size-asian="10.5pt" style:font-style-asian="normal" style:font-weight-asian="normal" style:font-size-complex="12pt" style:font-style-complex="normal" style:font-weight-complex="normal"/>
    </style:style>
    <style:style style:name="P446" style:family="paragraph" style:parent-style-name="Standard">
      <style:paragraph-properties fo:text-align="justify" style:justify-single-word="false"/>
      <style:text-properties fo:color="#00a933" loext:opacity="100%" style:font-name="Courier" fo:font-size="10pt" fo:font-style="italic" fo:font-weight="normal" officeooo:rsid="00ba86af" officeooo:paragraph-rsid="00ba86af" fo:background-color="#ffffff" style:font-size-asian="10pt" style:font-style-asian="italic" style:font-size-complex="10pt" style:font-style-complex="italic"/>
    </style:style>
    <style:style style:name="P447" style:family="paragraph" style:parent-style-name="Standard">
      <style:paragraph-properties fo:text-align="justify" style:justify-single-word="false"/>
      <style:text-properties officeooo:paragraph-rsid="00ba86af"/>
    </style:style>
    <style:style style:name="P448" style:family="paragraph" style:parent-style-name="Standard">
      <style:paragraph-properties fo:text-align="justify" style:justify-single-word="false"/>
      <style:text-properties style:use-window-font-color="true" loext:opacity="0%" fo:font-size="12pt" fo:font-style="normal" style:text-underline-style="none" fo:font-weight="normal" officeooo:rsid="00bcdc9d" officeooo:paragraph-rsid="00bcdc9d" style:font-size-asian="10.5pt" style:font-style-asian="normal" style:font-weight-asian="normal" style:font-size-complex="12pt" style:font-style-complex="normal" style:font-weight-complex="normal"/>
    </style:style>
    <style:style style:name="P449" style:family="paragraph" style:parent-style-name="Standard" style:list-style-name="L11">
      <style:paragraph-properties fo:text-align="justify" style:justify-single-word="false"/>
      <style:text-properties officeooo:paragraph-rsid="064a56fe"/>
    </style:style>
    <style:style style:name="P450" style:family="paragraph" style:parent-style-name="Standard">
      <style:paragraph-properties fo:text-align="justify" style:justify-single-word="false"/>
      <style:text-properties style:use-window-font-color="true" loext:opacity="0%" fo:font-size="12pt" fo:font-style="normal" style:text-underline-style="none" fo:font-weight="normal" officeooo:rsid="00bcdc9d" officeooo:paragraph-rsid="064a56fe" style:font-size-asian="10.5pt" style:font-style-asian="normal" style:font-weight-asian="normal" style:font-size-complex="12pt" style:font-style-complex="normal" style:font-weight-complex="normal"/>
    </style:style>
    <style:style style:name="P451" style:family="paragraph" style:parent-style-name="Standard" style:list-style-name="L11">
      <style:paragraph-properties fo:text-align="justify" style:justify-single-word="false"/>
      <style:text-properties officeooo:paragraph-rsid="00bcdc9d"/>
    </style:style>
    <style:style style:name="P452" style:family="paragraph" style:parent-style-name="Standard">
      <style:paragraph-properties fo:text-align="justify" style:justify-single-word="false"/>
      <style:text-properties officeooo:paragraph-rsid="05f24998"/>
    </style:style>
    <style:style style:name="P453" style:family="paragraph" style:parent-style-name="Footnote">
      <style:text-properties officeooo:paragraph-rsid="05b5c56a"/>
    </style:style>
    <style:style style:name="P454" style:family="paragraph" style:parent-style-name="Standard">
      <style:paragraph-properties fo:text-align="justify" style:justify-single-word="false"/>
      <style:text-properties style:use-window-font-color="true" loext:opacity="0%" fo:font-size="12pt" fo:font-weight="normal" officeooo:rsid="00bce9e2" officeooo:paragraph-rsid="00bce9e2" style:font-size-asian="10.5pt" style:font-weight-asian="normal" style:font-size-complex="12pt" style:font-weight-complex="normal"/>
    </style:style>
    <style:style style:name="P455" style:family="paragraph" style:parent-style-name="Table_20_Contents">
      <style:paragraph-properties fo:text-align="left" style:justify-single-word="false"/>
      <style:text-properties fo:color="#00a933" loext:opacity="100%" style:font-name="Courier" fo:font-size="10pt" fo:font-style="italic" officeooo:rsid="00bce9e2" officeooo:paragraph-rsid="00bce9e2" style:font-size-asian="10pt" style:font-style-asian="italic" style:font-size-complex="10pt" style:font-style-complex="italic"/>
    </style:style>
    <style:style style:name="P456" style:family="paragraph" style:parent-style-name="Standard">
      <style:paragraph-properties fo:text-align="justify" style:justify-single-word="false"/>
      <style:text-properties style:use-window-font-color="true" loext:opacity="0%" fo:font-size="12pt" fo:font-weight="normal" officeooo:rsid="00bd277d" officeooo:paragraph-rsid="00bce9e2" style:font-size-asian="10.5pt" style:font-weight-asian="normal" style:font-size-complex="12pt" style:font-weight-complex="normal"/>
    </style:style>
    <style:style style:name="P457" style:family="paragraph" style:parent-style-name="Standard">
      <style:paragraph-properties fo:text-align="justify" style:justify-single-word="false"/>
      <style:text-properties style:use-window-font-color="true" loext:opacity="0%" fo:font-size="12pt" fo:font-weight="normal" officeooo:rsid="00bd277d" officeooo:paragraph-rsid="05f24998" style:font-size-asian="10.5pt" style:font-weight-asian="normal" style:font-size-complex="12pt" style:font-weight-complex="normal"/>
    </style:style>
    <style:style style:name="P45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bea428" fo:background-color="#ffffff" style:font-size-asian="11pt" style:font-size-complex="11pt"/>
    </style:style>
    <style:style style:name="P459" style:family="paragraph" style:parent-style-name="Standard">
      <style:paragraph-properties fo:margin-left="0in" fo:margin-right="0in" style:line-height-at-least="0.198in" fo:text-indent="0in" style:auto-text-indent="false"/>
      <style:text-properties officeooo:paragraph-rsid="00bea428"/>
    </style:style>
    <style:style style:name="P460" style:family="paragraph" style:parent-style-name="Standard">
      <style:paragraph-properties fo:margin-left="0in" fo:margin-right="0in" style:line-height-at-least="0.198in" fo:text-indent="0in" style:auto-text-indent="false"/>
      <style:text-properties style:font-name="Courier" fo:font-size="11pt" officeooo:paragraph-rsid="00bea428" style:font-size-asian="11pt" style:font-size-complex="11pt"/>
    </style:style>
    <style:style style:name="P461" style:family="paragraph" style:parent-style-name="Standard">
      <style:paragraph-properties fo:text-align="center" style:justify-single-word="false"/>
      <style:text-properties style:use-window-font-color="true" loext:opacity="0%" fo:font-size="12pt" fo:font-weight="bold" officeooo:rsid="00bea428" officeooo:paragraph-rsid="00bea428" style:font-size-asian="10.5pt" style:font-weight-asian="bold" style:font-size-complex="12pt" style:font-weight-complex="bold"/>
    </style:style>
    <style:style style:name="P462" style:family="paragraph" style:parent-style-name="Standard">
      <style:text-properties fo:font-style="italic" style:text-underline-style="none" fo:font-weight="normal" officeooo:rsid="00c37d86" style:font-style-asian="italic" style:font-weight-asian="normal" style:font-style-complex="italic" style:font-weight-complex="normal"/>
    </style:style>
    <style:style style:name="P463" style:family="paragraph" style:parent-style-name="Standard">
      <style:paragraph-properties fo:text-align="left" style:justify-single-word="false"/>
      <style:text-properties fo:font-style="normal" style:text-underline-style="none" fo:font-weight="normal" officeooo:rsid="05f402ae" officeooo:paragraph-rsid="05f402ae" style:font-style-asian="normal" style:font-weight-asian="normal" style:font-style-complex="normal" style:font-weight-complex="normal"/>
    </style:style>
    <style:style style:name="P464" style:family="paragraph" style:parent-style-name="Table_20_Contents">
      <style:paragraph-properties fo:text-align="left" style:justify-single-word="false"/>
      <style:text-properties officeooo:paragraph-rsid="05f402ae"/>
    </style:style>
    <style:style style:name="P465" style:family="paragraph" style:parent-style-name="Standard">
      <style:paragraph-properties fo:text-align="justify" style:justify-single-word="false"/>
      <style:text-properties officeooo:paragraph-rsid="00bce9e2"/>
    </style:style>
    <style:style style:name="P466" style:family="paragraph" style:parent-style-name="Standard">
      <style:paragraph-properties fo:text-align="center" style:justify-single-word="false"/>
      <style:text-properties style:use-window-font-color="true" loext:opacity="0%" fo:font-size="18pt" fo:font-weight="bold" officeooo:rsid="004234ca" officeooo:paragraph-rsid="004234ca" style:font-size-asian="18pt" style:font-weight-asian="bold" style:font-size-complex="18pt" style:font-weight-complex="bold"/>
    </style:style>
    <style:style style:name="P467" style:family="paragraph" style:parent-style-name="Standard">
      <style:paragraph-properties fo:text-align="justify" style:justify-single-word="false"/>
      <style:text-properties style:use-window-font-color="true" loext:opacity="0%" fo:font-size="12pt" fo:font-weight="bold" officeooo:rsid="05b5c56a" officeooo:paragraph-rsid="05b5c56a" style:font-size-asian="10.5pt" style:font-weight-asian="bold" style:font-size-complex="12pt" style:font-weight-complex="bold"/>
    </style:style>
    <style:style style:name="P468" style:family="paragraph" style:parent-style-name="Standard">
      <style:paragraph-properties fo:text-align="center" style:justify-single-word="false"/>
      <style:text-properties style:use-window-font-color="true" loext:opacity="0%" fo:font-size="13pt" fo:font-weight="bold" officeooo:rsid="011e5481" officeooo:paragraph-rsid="011e5481" style:font-size-asian="13pt" style:font-weight-asian="bold" style:font-size-complex="13pt" style:font-weight-complex="bold"/>
    </style:style>
    <style:style style:name="P469" style:family="paragraph" style:parent-style-name="Standard">
      <style:paragraph-properties fo:text-align="justify" style:justify-single-word="false"/>
      <style:text-properties style:use-window-font-color="true" loext:opacity="0%" fo:font-size="12pt" fo:font-weight="bold" officeooo:rsid="004234ca" officeooo:paragraph-rsid="004234ca" style:font-size-asian="10.5pt" style:font-weight-asian="bold" style:font-size-complex="12pt" style:font-weight-complex="bold"/>
    </style:style>
    <style:style style:name="P470" style:family="paragraph" style:parent-style-name="Standard">
      <style:paragraph-properties fo:text-align="justify" style:justify-single-word="false"/>
      <style:text-properties style:use-window-font-color="true" loext:opacity="0%" fo:font-size="12pt" fo:font-weight="normal" officeooo:rsid="00c9b649" officeooo:paragraph-rsid="00c9b649" style:font-size-asian="10.5pt" style:font-weight-asian="normal" style:font-size-complex="12pt" style:font-weight-complex="normal"/>
    </style:style>
    <style:style style:name="P471" style:family="paragraph" style:parent-style-name="Standard">
      <style:paragraph-properties fo:text-align="justify" style:justify-single-word="false"/>
      <style:text-properties style:use-window-font-color="true" loext:opacity="0%" fo:font-size="12pt" fo:font-weight="normal" officeooo:rsid="00cb7582" officeooo:paragraph-rsid="00c9b649" style:font-size-asian="10.5pt" style:font-weight-asian="normal" style:font-size-complex="12pt" style:font-weight-complex="normal"/>
    </style:style>
    <style:style style:name="P472" style:family="paragraph" style:parent-style-name="Standard">
      <style:paragraph-properties fo:text-align="justify" style:justify-single-word="false"/>
      <style:text-properties officeooo:paragraph-rsid="00c9b649"/>
    </style:style>
    <style:style style:name="P473" style:family="paragraph" style:parent-style-name="Standard">
      <style:paragraph-properties fo:text-align="justify" style:justify-single-word="false"/>
      <style:text-properties style:use-window-font-color="true" loext:opacity="0%" fo:font-size="12pt" fo:font-weight="normal" officeooo:rsid="00cb7582" officeooo:paragraph-rsid="00cb7582" style:font-size-asian="10.5pt" style:font-weight-asian="normal" style:font-size-complex="12pt" style:font-weight-complex="normal"/>
    </style:style>
    <style:style style:name="P474" style:family="paragraph" style:parent-style-name="Standard">
      <style:paragraph-properties fo:text-align="justify" style:justify-single-word="false"/>
      <style:text-properties style:use-window-font-color="true" loext:opacity="0%" style:font-name="Courier" fo:font-size="12pt" fo:font-weight="normal" officeooo:rsid="00cb7582" officeooo:paragraph-rsid="00cb7582" style:font-size-asian="10.5pt" style:font-weight-asian="normal" style:font-size-complex="12pt" style:font-weight-complex="normal"/>
    </style:style>
    <style:style style:name="P475" style:family="paragraph" style:parent-style-name="Standard">
      <style:paragraph-properties fo:text-align="justify" style:justify-single-word="false"/>
      <style:text-properties officeooo:paragraph-rsid="05f556d4"/>
    </style:style>
    <style:style style:name="P476" style:family="paragraph" style:parent-style-name="Standard">
      <style:paragraph-properties fo:text-align="justify" style:justify-single-word="false"/>
      <style:text-properties style:use-window-font-color="true" loext:opacity="0%" fo:font-size="12pt" fo:font-weight="normal" officeooo:rsid="00cde64f" officeooo:paragraph-rsid="00cde64f" style:font-size-asian="10.5pt" style:font-weight-asian="normal" style:font-size-complex="12pt" style:font-weight-complex="normal"/>
    </style:style>
    <style:style style:name="P477" style:family="paragraph" style:parent-style-name="Standard">
      <style:paragraph-properties fo:text-align="justify" style:justify-single-word="false"/>
      <style:text-properties officeooo:paragraph-rsid="00cb7582"/>
    </style:style>
    <style:style style:name="P478" style:family="paragraph" style:parent-style-name="Standard">
      <style:paragraph-properties fo:text-align="justify" style:justify-single-word="false"/>
      <style:text-properties style:use-window-font-color="true" loext:opacity="0%" fo:font-size="12pt" fo:font-weight="normal" officeooo:rsid="00cb7582" officeooo:paragraph-rsid="05f556d4" style:font-size-asian="10.5pt" style:font-weight-asian="normal" style:font-size-complex="12pt" style:font-weight-complex="normal"/>
    </style:style>
    <style:style style:name="P479" style:family="paragraph" style:parent-style-name="Standard">
      <style:paragraph-properties fo:text-align="justify" style:justify-single-word="false"/>
      <style:text-properties style:use-window-font-color="true" loext:opacity="0%" fo:font-size="12pt" fo:font-weight="normal" officeooo:rsid="00cd2d87" officeooo:paragraph-rsid="00cd2d87" style:font-size-asian="10.5pt" style:font-weight-asian="normal" style:font-size-complex="12pt" style:font-weight-complex="normal"/>
    </style:style>
    <style:style style:name="P480" style:family="paragraph" style:parent-style-name="Standard">
      <style:paragraph-properties fo:text-align="justify" style:justify-single-word="false"/>
      <style:text-properties officeooo:paragraph-rsid="00cd2d87"/>
    </style:style>
    <style:style style:name="P481" style:family="paragraph" style:parent-style-name="Standard">
      <style:paragraph-properties fo:text-align="justify" style:justify-single-word="false"/>
      <style:text-properties officeooo:paragraph-rsid="00cde64f"/>
    </style:style>
    <style:style style:name="P482" style:family="paragraph" style:parent-style-name="Standard">
      <style:paragraph-properties fo:text-align="justify" style:justify-single-word="false"/>
      <style:text-properties style:use-window-font-color="true" loext:opacity="0%" fo:font-size="12pt" fo:font-style="italic" fo:font-weight="normal" officeooo:rsid="00cb7582" officeooo:paragraph-rsid="05f556d4" style:font-size-asian="10.5pt" style:font-style-asian="italic" style:font-weight-asian="normal" style:font-size-complex="12pt" style:font-style-complex="italic" style:font-weight-complex="normal"/>
    </style:style>
    <style:style style:name="P483" style:family="paragraph" style:parent-style-name="Standard">
      <style:paragraph-properties fo:text-align="justify" style:justify-single-word="false"/>
      <style:text-properties officeooo:paragraph-rsid="05f81997"/>
    </style:style>
    <style:style style:name="P484" style:family="paragraph" style:parent-style-name="Standard">
      <style:paragraph-properties fo:text-align="justify" style:justify-single-word="false"/>
      <style:text-properties style:use-window-font-color="true" loext:opacity="0%" fo:font-size="12pt" fo:font-style="normal" fo:font-weight="normal" officeooo:rsid="00d25178" officeooo:paragraph-rsid="00cde64f" style:font-size-asian="10.5pt" style:font-style-asian="normal" style:font-weight-asian="normal" style:font-size-complex="12pt" style:font-style-complex="normal" style:font-weight-complex="normal"/>
    </style:style>
    <style:style style:name="P485" style:family="paragraph" style:parent-style-name="Standard">
      <style:paragraph-properties fo:text-align="justify" style:justify-single-word="false"/>
      <style:text-properties officeooo:paragraph-rsid="00d484ca"/>
    </style:style>
    <style:style style:name="P486" style:family="paragraph" style:parent-style-name="Standard">
      <style:paragraph-properties fo:text-align="justify" style:justify-single-word="false"/>
      <style:text-properties style:use-window-font-color="true" loext:opacity="0%" fo:font-size="12pt" fo:font-style="normal" fo:font-weight="normal" officeooo:rsid="00d56067" officeooo:paragraph-rsid="00d484ca" style:font-size-asian="10.5pt" style:font-style-asian="normal" style:font-weight-asian="normal" style:font-size-complex="12pt" style:font-style-complex="normal" style:font-weight-complex="normal"/>
    </style:style>
    <style:style style:name="P487" style:family="paragraph" style:parent-style-name="Table_20_Contents">
      <style:paragraph-properties fo:text-align="left" style:justify-single-word="false"/>
      <style:text-properties style:font-name="Courier" fo:font-size="12pt" officeooo:rsid="00d6fe4f" officeooo:paragraph-rsid="00d6fe4f" style:font-size-asian="10.5pt" style:font-size-complex="12pt"/>
    </style:style>
    <style:style style:name="P488" style:family="paragraph" style:parent-style-name="Table_20_Contents">
      <style:paragraph-properties fo:text-align="justify" style:justify-single-word="false"/>
      <style:text-properties fo:font-size="12pt" officeooo:rsid="00d6fe4f" officeooo:paragraph-rsid="00d6fe4f" style:font-size-asian="10.5pt" style:font-size-complex="12pt"/>
    </style:style>
    <style:style style:name="P489" style:family="paragraph" style:parent-style-name="Table_20_Contents">
      <style:paragraph-properties fo:text-align="justify" style:justify-single-word="false"/>
      <style:text-properties fo:font-size="12pt" officeooo:rsid="00d885d1" officeooo:paragraph-rsid="00d885d1" style:font-size-asian="10.5pt" style:font-size-complex="12pt"/>
    </style:style>
    <style:style style:name="P490" style:family="paragraph" style:parent-style-name="Standard">
      <style:paragraph-properties fo:text-align="justify" style:justify-single-word="false"/>
      <style:text-properties style:use-window-font-color="true" loext:opacity="0%" fo:font-size="12pt" fo:font-style="normal" fo:font-weight="normal" officeooo:rsid="00d484ca" officeooo:paragraph-rsid="00d484ca" style:font-size-asian="10.5pt" style:font-style-asian="normal" style:font-weight-asian="normal" style:font-size-complex="12pt" style:font-style-complex="normal" style:font-weight-complex="normal"/>
    </style:style>
    <style:style style:name="P491" style:family="paragraph" style:parent-style-name="Table_20_Contents">
      <style:paragraph-properties fo:text-align="center" style:justify-single-word="false"/>
      <style:text-properties officeooo:paragraph-rsid="00d6fe4f"/>
    </style:style>
    <style:style style:name="P492" style:family="paragraph" style:parent-style-name="Table_20_Contents">
      <style:paragraph-properties fo:text-align="center" style:justify-single-word="false"/>
      <style:text-properties style:use-window-font-color="true" loext:opacity="0%" fo:font-size="12pt" fo:font-weight="normal" officeooo:rsid="00da0b1c" officeooo:paragraph-rsid="00d6fe4f" style:font-size-asian="10.5pt" style:font-weight-asian="normal" style:font-size-complex="12pt" style:font-weight-complex="normal"/>
    </style:style>
    <style:style style:name="P493" style:family="paragraph" style:parent-style-name="Table_20_Contents">
      <style:paragraph-properties fo:text-align="justify" style:justify-single-word="false"/>
      <style:text-properties officeooo:paragraph-rsid="00dd62ac"/>
    </style:style>
    <style:style style:name="P494" style:family="paragraph" style:parent-style-name="Table_20_Contents">
      <style:paragraph-properties fo:text-align="justify" style:justify-single-word="false"/>
      <style:text-properties style:use-window-font-color="true" loext:opacity="0%" fo:font-size="12pt" fo:font-weight="normal" officeooo:rsid="00dd62ac" officeooo:paragraph-rsid="00dd62ac" style:font-size-asian="10.5pt" style:font-weight-asian="normal" style:font-size-complex="12pt" style:font-weight-complex="normal"/>
    </style:style>
    <style:style style:name="P495" style:family="paragraph" style:parent-style-name="Table_20_Contents">
      <style:paragraph-properties fo:text-align="justify" style:justify-single-word="false"/>
      <style:text-properties fo:font-size="12pt" officeooo:rsid="00dd62ac" officeooo:paragraph-rsid="00dd62ac" style:font-size-asian="10.5pt" style:font-size-complex="12pt"/>
    </style:style>
    <style:style style:name="P496" style:family="paragraph" style:parent-style-name="Table_20_Contents">
      <style:paragraph-properties fo:text-align="justify" style:justify-single-word="false"/>
      <style:text-properties style:use-window-font-color="true" loext:opacity="0%" fo:font-size="12pt" fo:font-weight="normal" officeooo:rsid="00da0b1c" officeooo:paragraph-rsid="00d6fe4f" style:font-size-asian="10.5pt" style:font-weight-asian="normal" style:font-size-complex="12pt" style:font-weight-complex="normal"/>
    </style:style>
    <style:style style:name="P497" style:family="paragraph" style:parent-style-name="Table_20_Contents">
      <style:paragraph-properties fo:text-align="justify" style:justify-single-word="false"/>
      <style:text-properties style:use-window-font-color="true" loext:opacity="0%" fo:font-size="12pt" fo:font-weight="normal" officeooo:rsid="00ded1b7" officeooo:paragraph-rsid="00ded1b7" style:font-size-asian="10.5pt" style:font-weight-asian="normal" style:font-size-complex="12pt" style:font-weight-complex="normal"/>
    </style:style>
    <style:style style:name="P498" style:family="paragraph" style:parent-style-name="Table_20_Contents">
      <style:paragraph-properties fo:text-align="center" style:justify-single-word="false"/>
      <style:text-properties fo:font-size="12pt" fo:font-weight="bold" officeooo:rsid="00ded1b7" officeooo:paragraph-rsid="00ded1b7" style:font-size-asian="10.5pt" style:font-weight-asian="bold" style:font-size-complex="12pt" style:font-weight-complex="bold"/>
    </style:style>
    <style:style style:name="P499" style:family="paragraph" style:parent-style-name="Table_20_Contents">
      <style:paragraph-properties fo:text-align="left" style:justify-single-word="false"/>
      <style:text-properties officeooo:paragraph-rsid="00d6fe4f"/>
    </style:style>
    <style:style style:name="P500" style:family="paragraph" style:parent-style-name="Table_20_Contents">
      <style:paragraph-properties fo:text-align="justify" style:justify-single-word="false"/>
      <style:text-properties fo:font-size="12pt" officeooo:rsid="00ded1b7" officeooo:paragraph-rsid="00ded1b7" style:font-size-asian="10.5pt" style:font-size-complex="12pt"/>
    </style:style>
    <style:style style:name="P501" style:family="paragraph" style:parent-style-name="Table_20_Contents">
      <style:paragraph-properties fo:text-align="left" style:justify-single-word="false"/>
      <style:text-properties fo:font-size="12pt" officeooo:rsid="00ded1b7" officeooo:paragraph-rsid="00ded1b7" style:font-size-asian="10.5pt" style:font-size-complex="12pt"/>
    </style:style>
    <style:style style:name="P502" style:family="paragraph" style:parent-style-name="Standard">
      <style:paragraph-properties fo:text-align="center" style:justify-single-word="false"/>
      <style:text-properties style:use-window-font-color="true" loext:opacity="0%" fo:font-size="12pt" fo:font-weight="bold" officeooo:rsid="00ded1b7" officeooo:paragraph-rsid="00ded1b7" style:font-size-asian="12pt" style:font-weight-asian="bold" style:font-size-complex="12pt" style:font-weight-complex="bold"/>
    </style:style>
    <style:style style:name="P503" style:family="paragraph" style:parent-style-name="Standard">
      <style:paragraph-properties fo:text-align="center" style:justify-single-word="false"/>
      <style:text-properties style:use-window-font-color="true" loext:opacity="0%" fo:font-size="13pt" fo:font-weight="bold" officeooo:rsid="057f15ab" officeooo:paragraph-rsid="00efed78" style:font-size-asian="13pt" style:font-weight-asian="bold" style:font-size-complex="13pt" style:font-weight-complex="bold"/>
    </style:style>
    <style:style style:name="P504" style:family="paragraph" style:parent-style-name="Standard">
      <style:paragraph-properties fo:text-align="center" style:justify-single-word="false"/>
      <style:text-properties officeooo:paragraph-rsid="00efed78"/>
    </style:style>
    <style:style style:name="P505" style:family="paragraph" style:parent-style-name="Standard">
      <style:paragraph-properties fo:text-align="justify" style:justify-single-word="false"/>
      <style:text-properties style:use-window-font-color="true" loext:opacity="0%" fo:font-size="12pt" fo:font-weight="normal" officeooo:rsid="00e05881" officeooo:paragraph-rsid="00e05881" style:font-size-asian="10.5pt" style:font-weight-asian="normal" style:font-size-complex="12pt" style:font-weight-complex="normal"/>
    </style:style>
    <style:style style:name="P506" style:family="paragraph" style:parent-style-name="Footnote">
      <style:text-properties officeooo:paragraph-rsid="05b62ce2"/>
    </style:style>
    <style:style style:name="P507" style:family="paragraph" style:parent-style-name="Standard">
      <style:paragraph-properties fo:margin-left="0in" fo:margin-right="0in" style:line-height-at-least="0.198in" fo:text-indent="0in" style:auto-text-indent="false"/>
      <style:text-properties officeooo:paragraph-rsid="00e1c521"/>
    </style:style>
    <style:style style:name="P50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e1c521" fo:background-color="#ffffff" style:font-size-asian="11pt" style:font-size-complex="11pt"/>
    </style:style>
    <style:style style:name="P509" style:family="paragraph" style:parent-style-name="Table_20_Contents">
      <style:paragraph-properties fo:text-align="right" style:justify-single-word="false"/>
      <style:text-properties fo:color="#00a933" loext:opacity="100%" style:font-name="Courier" fo:font-size="10pt" fo:font-style="italic" officeooo:rsid="00e421e5" officeooo:paragraph-rsid="057f15ab" style:font-size-asian="10pt" style:font-style-asian="italic" style:font-size-complex="10pt" style:font-style-complex="italic"/>
    </style:style>
    <style:style style:name="P510" style:family="paragraph" style:parent-style-name="Table_20_Contents">
      <style:paragraph-properties fo:text-align="justify" style:justify-single-word="false"/>
      <style:text-properties style:use-window-font-color="true" loext:opacity="0%" fo:font-size="12pt" fo:font-weight="normal" officeooo:rsid="00e30425" officeooo:paragraph-rsid="00d6fe4f" style:font-size-asian="10.5pt" style:font-weight-asian="normal" style:font-size-complex="12pt" style:font-weight-complex="normal"/>
    </style:style>
    <style:style style:name="P511" style:family="paragraph" style:parent-style-name="Standard">
      <style:paragraph-properties fo:text-align="justify" style:justify-single-word="false"/>
      <style:text-properties officeooo:paragraph-rsid="064c7e2d"/>
    </style:style>
    <style:style style:name="P512" style:family="paragraph" style:parent-style-name="Standard">
      <style:paragraph-properties fo:text-align="justify" style:justify-single-word="false"/>
      <style:text-properties officeooo:paragraph-rsid="00e05881"/>
    </style:style>
    <style:style style:name="P513" style:family="paragraph" style:parent-style-name="Standard">
      <style:paragraph-properties fo:text-align="justify" style:justify-single-word="false"/>
      <style:text-properties style:use-window-font-color="true" loext:opacity="0%" fo:font-size="12pt" fo:font-weight="normal" officeooo:rsid="00e30425" officeooo:paragraph-rsid="00e30425" style:font-size-asian="10.5pt" style:font-weight-asian="normal" style:font-size-complex="12pt" style:font-weight-complex="normal"/>
    </style:style>
    <style:style style:name="P514" style:family="paragraph" style:parent-style-name="Table_20_Contents">
      <style:paragraph-properties fo:text-align="justify" style:justify-single-word="false"/>
      <style:text-properties officeooo:paragraph-rsid="05f89624"/>
    </style:style>
    <style:style style:name="P515" style:family="paragraph" style:parent-style-name="Standard">
      <style:paragraph-properties fo:text-align="justify" style:justify-single-word="false"/>
      <style:text-properties fo:color="#000000" loext:opacity="100%" style:font-name="Courier" fo:font-size="10.5pt" fo:font-weight="normal" fo:background-color="#ffffff" style:font-size-asian="10.5pt" style:font-size-complex="12pt"/>
    </style:style>
    <style:style style:name="P516"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fo:background-color="#ffffff"/>
    </style:style>
    <style:style style:name="P517" style:family="paragraph" style:parent-style-name="Table_20_Contents">
      <style:paragraph-properties fo:text-align="justify" style:justify-single-word="false"/>
      <style:text-properties officeooo:paragraph-rsid="00d6fe4f"/>
    </style:style>
    <style:style style:name="P518" style:family="paragraph" style:parent-style-name="Standard">
      <style:paragraph-properties fo:text-align="justify" style:justify-single-word="false"/>
      <style:text-properties style:use-window-font-color="true" loext:opacity="0%" fo:font-size="12pt" fo:font-weight="normal" officeooo:rsid="00e421e5" officeooo:paragraph-rsid="00e421e5" style:font-size-asian="10.5pt" style:font-weight-asian="normal" style:font-size-complex="12pt" style:font-weight-complex="normal"/>
    </style:style>
    <style:style style:name="P519" style:family="paragraph" style:parent-style-name="Table_20_Contents">
      <style:paragraph-properties fo:text-align="justify" style:justify-single-word="false"/>
      <style:text-properties officeooo:paragraph-rsid="0652db70"/>
    </style:style>
    <style:style style:name="P52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e821ba" fo:background-color="#ffffff" style:font-size-asian="11pt" style:font-size-complex="11pt"/>
    </style:style>
    <style:style style:name="P521" style:family="paragraph" style:parent-style-name="Standard">
      <style:paragraph-properties fo:margin-left="0in" fo:margin-right="0in" style:line-height-at-least="0.198in" fo:text-indent="0in" style:auto-text-indent="false"/>
      <style:text-properties officeooo:paragraph-rsid="00e821ba"/>
    </style:style>
    <style:style style:name="P522" style:family="paragraph" style:parent-style-name="Standard">
      <style:paragraph-properties fo:margin-left="0in" fo:margin-right="0in" style:line-height-at-least="0.198in" fo:text-indent="0in" style:auto-text-indent="false"/>
      <style:text-properties style:font-name="Courier" fo:font-size="11pt" officeooo:paragraph-rsid="00e821ba" style:font-size-asian="11pt" style:font-size-complex="11pt"/>
    </style:style>
    <style:style style:name="P523" style:family="paragraph" style:parent-style-name="Standard">
      <style:paragraph-properties fo:text-align="center" style:justify-single-word="false"/>
      <style:text-properties style:use-window-font-color="true" loext:opacity="0%" fo:font-size="12pt" fo:font-weight="bold" officeooo:rsid="00e821ba" officeooo:paragraph-rsid="00e821ba" style:font-size-asian="12pt" style:font-weight-asian="bold" style:font-size-complex="12pt" style:font-weight-complex="bold"/>
    </style:style>
    <style:style style:name="P524" style:family="paragraph" style:parent-style-name="Standard">
      <style:paragraph-properties fo:text-align="center" style:justify-single-word="false"/>
      <style:text-properties style:use-window-font-color="true" loext:opacity="0%" fo:font-size="12pt" fo:font-weight="normal" officeooo:rsid="00e821ba" officeooo:paragraph-rsid="00e821ba" style:font-size-asian="12pt" style:font-weight-asian="normal" style:font-size-complex="12pt" style:font-weight-complex="normal"/>
    </style:style>
    <style:style style:name="P525" style:family="paragraph" style:parent-style-name="Standard">
      <style:paragraph-properties fo:text-align="justify" style:justify-single-word="false"/>
      <style:text-properties style:use-window-font-color="true" loext:opacity="0%" fo:font-size="12pt" fo:font-style="normal" fo:font-weight="normal" officeooo:rsid="00ec89f5" officeooo:paragraph-rsid="00ec89f5" style:font-size-asian="12pt" style:font-style-asian="normal" style:font-weight-asian="normal" style:font-size-complex="12pt" style:font-style-complex="normal" style:font-weight-complex="normal"/>
    </style:style>
    <style:style style:name="P526" style:family="paragraph" style:parent-style-name="Table_20_Contents">
      <style:paragraph-properties fo:text-align="left" style:justify-single-word="false"/>
      <style:text-properties officeooo:paragraph-rsid="00ec89f5"/>
    </style:style>
    <style:style style:name="P527" style:family="paragraph" style:parent-style-name="Table_20_Contents">
      <style:paragraph-properties fo:text-align="left" style:justify-single-word="false"/>
      <style:text-properties officeooo:paragraph-rsid="00ee8290"/>
    </style:style>
    <style:style style:name="P528" style:family="paragraph" style:parent-style-name="Standard">
      <style:paragraph-properties fo:text-align="justify" style:justify-single-word="false"/>
      <style:text-properties style:use-window-font-color="true" loext:opacity="0%" fo:font-size="12pt" fo:font-style="normal" fo:font-weight="normal" officeooo:rsid="00f325ca" officeooo:paragraph-rsid="00f168f3"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justify" style:justify-single-word="false"/>
      <style:text-properties officeooo:paragraph-rsid="00f168f3"/>
    </style:style>
    <style:style style:name="P530" style:family="paragraph" style:parent-style-name="Standard">
      <style:paragraph-properties fo:text-align="justify" style:justify-single-word="false"/>
      <style:text-properties style:use-window-font-color="true" loext:opacity="0%" fo:font-size="12pt" fo:font-style="normal" fo:font-weight="normal" officeooo:rsid="00f168f3" officeooo:paragraph-rsid="00f168f3"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center" style:justify-single-word="false"/>
      <style:text-properties officeooo:paragraph-rsid="05b62ce2"/>
    </style:style>
    <style:style style:name="P532" style:family="paragraph" style:parent-style-name="Footnote">
      <style:text-properties officeooo:paragraph-rsid="05b7ad61"/>
    </style:style>
    <style:style style:name="P533" style:family="paragraph" style:parent-style-name="Standard">
      <style:paragraph-properties fo:text-align="justify" style:justify-single-word="false"/>
      <style:text-properties fo:color="#000000" loext:opacity="100%" style:font-name="Courier" fo:font-size="12pt" fo:font-weight="normal" fo:background-color="#ffffff" style:font-size-asian="12pt" style:font-size-complex="12pt"/>
    </style:style>
    <style:style style:name="P534" style:family="paragraph" style:parent-style-name="Standard">
      <style:paragraph-properties fo:margin-left="0in" fo:margin-right="0in" style:line-height-at-least="0.198in" fo:text-indent="0in" style:auto-text-indent="false"/>
      <style:text-properties fo:color="#000000" loext:opacity="100%" style:font-name="Courier" fo:font-size="12pt" fo:font-weight="normal" fo:background-color="#ffffff" style:font-size-asian="12pt" style:font-size-complex="12pt"/>
    </style:style>
    <style:style style:name="P535" style:family="paragraph" style:parent-style-name="Standard">
      <style:paragraph-properties style:line-height-at-least="0.198in"/>
      <style:text-properties style:font-name="Courier" fo:font-size="12pt" style:font-size-asian="12pt" style:font-size-complex="12pt"/>
    </style:style>
    <style:style style:name="P536" style:family="paragraph" style:parent-style-name="Standard">
      <style:paragraph-properties fo:margin-left="0in" fo:margin-right="0in" style:line-height-at-least="0.198in" fo:text-indent="0in" style:auto-text-indent="false"/>
      <style:text-properties style:font-name="Courier" fo:font-size="12pt" style:font-size-asian="12pt" style:font-size-complex="12pt"/>
    </style:style>
    <style:style style:name="P537" style:family="paragraph" style:parent-style-name="Standard">
      <style:paragraph-properties fo:margin-left="0in" fo:margin-right="0in" style:line-height-at-least="0.198in" fo:text-align="left" style:justify-single-word="false" fo:text-indent="0in" style:auto-text-indent="false"/>
      <style:text-properties fo:color="#00a933" loext:opacity="100%" style:font-name="Courier" fo:font-size="10pt" fo:font-style="italic" fo:font-weight="normal" officeooo:rsid="00f168f3" officeooo:paragraph-rsid="00f671b3" fo:background-color="#ffffff" style:font-size-asian="10pt" style:font-style-asian="italic" style:font-size-complex="10pt" style:font-style-complex="italic"/>
    </style:style>
    <style:style style:name="P538" style:family="paragraph" style:parent-style-name="Standard">
      <style:paragraph-properties fo:margin-left="0in" fo:margin-right="0in" style:line-height-at-least="0.198in" fo:text-align="left" style:justify-single-word="false" fo:text-indent="0in" style:auto-text-indent="false"/>
      <style:text-properties fo:color="#00a933" loext:opacity="100%" style:font-name="Courier" fo:font-size="10pt" fo:font-style="italic" fo:font-weight="normal" officeooo:rsid="00f671b3" officeooo:paragraph-rsid="00f671b3" fo:background-color="#ffffff" style:font-size-asian="10pt" style:font-style-asian="italic" style:font-size-complex="10pt" style:font-style-complex="italic"/>
    </style:style>
    <style:style style:name="P539" style:family="paragraph" style:parent-style-name="Standard">
      <style:paragraph-properties fo:text-align="justify" style:justify-single-word="false"/>
      <style:text-properties style:use-window-font-color="true" loext:opacity="0%" fo:font-size="12pt" fo:font-style="normal" fo:font-weight="normal" officeooo:rsid="00f8688c" officeooo:paragraph-rsid="00ec89f5"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justify" style:justify-single-word="false"/>
      <style:text-properties style:use-window-font-color="true" loext:opacity="0%" fo:font-size="12pt" fo:font-style="normal" fo:font-weight="normal" officeooo:rsid="00f8688c" officeooo:paragraph-rsid="00f168f3" style:font-size-asian="12pt" style:font-style-asian="normal" style:font-weight-asian="normal" style:font-size-complex="12pt" style:font-style-complex="normal" style:font-weight-complex="normal"/>
    </style:style>
    <style:style style:name="P54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f8688c" fo:background-color="#ffffff" style:font-size-asian="11pt" style:font-size-complex="11pt"/>
    </style:style>
    <style:style style:name="P542" style:family="paragraph" style:parent-style-name="Standard">
      <style:paragraph-properties fo:margin-left="0in" fo:margin-right="0in" style:line-height-at-least="0.198in" fo:text-indent="0in" style:auto-text-indent="false"/>
      <style:text-properties officeooo:paragraph-rsid="00f8688c"/>
    </style:style>
    <style:style style:name="P543" style:family="paragraph" style:parent-style-name="Standard">
      <style:paragraph-properties fo:margin-left="0in" fo:margin-right="0in" style:line-height-at-least="0.198in" fo:text-indent="0in" style:auto-text-indent="false"/>
      <style:text-properties style:font-name="Courier" fo:font-size="11pt" officeooo:paragraph-rsid="00f8688c" style:font-size-asian="11pt" style:font-size-complex="11pt"/>
    </style:style>
    <style:style style:name="P544" style:family="paragraph" style:parent-style-name="Standard">
      <style:paragraph-properties fo:text-align="center" style:justify-single-word="false"/>
      <style:text-properties style:use-window-font-color="true" loext:opacity="0%" fo:font-size="12pt" fo:font-weight="bold" officeooo:rsid="00f8688c" officeooo:paragraph-rsid="00f8688c" style:font-size-asian="12pt" style:font-weight-asian="bold" style:font-size-complex="12pt" style:font-weight-complex="bold"/>
    </style:style>
    <style:style style:name="P545" style:family="paragraph" style:parent-style-name="Standard">
      <style:paragraph-properties fo:text-align="center" style:justify-single-word="false"/>
      <style:text-properties style:use-window-font-color="true" loext:opacity="0%" fo:font-size="12pt" fo:font-weight="bold" officeooo:rsid="004234ca" officeooo:paragraph-rsid="004234ca" style:font-size-asian="12pt" style:font-weight-asian="bold" style:font-size-complex="12pt" style:font-weight-complex="bold"/>
    </style:style>
    <style:style style:name="P546" style:family="paragraph" style:parent-style-name="Standard">
      <style:text-properties style:use-window-font-color="true" loext:opacity="0%" fo:font-size="12pt" fo:font-style="italic" fo:font-weight="normal" officeooo:rsid="00fa4156" style:font-size-asian="12pt" style:font-style-asian="italic" style:font-weight-asian="normal" style:font-size-complex="12pt" style:font-style-complex="italic" style:font-weight-complex="normal"/>
    </style:style>
    <style:style style:name="P547" style:family="paragraph" style:parent-style-name="Standard">
      <style:paragraph-properties fo:text-align="left" style:justify-single-word="false"/>
      <style:text-properties style:use-window-font-color="true" loext:opacity="0%" fo:font-size="12pt" fo:font-style="normal" fo:font-weight="normal" officeooo:rsid="00fa4156" officeooo:paragraph-rsid="00fa4156" style:font-size-asian="12pt" style:font-style-asian="normal" style:font-weight-asian="normal" style:font-size-complex="12pt" style:font-style-complex="normal" style:font-weight-complex="normal"/>
    </style:style>
    <style:style style:name="P548" style:family="paragraph" style:parent-style-name="Table_20_Contents">
      <style:paragraph-properties fo:text-align="left" style:justify-single-word="false"/>
      <style:text-properties officeooo:paragraph-rsid="00fa68fd"/>
    </style:style>
    <style:style style:name="P549" style:family="paragraph" style:parent-style-name="Table_20_Contents">
      <style:paragraph-properties fo:text-align="left" style:justify-single-word="false"/>
      <style:text-properties fo:color="#808080" loext:opacity="100%" officeooo:paragraph-rsid="00fa68fd"/>
    </style:style>
    <style:style style:name="P550" style:family="paragraph" style:parent-style-name="Standard">
      <style:paragraph-properties fo:text-align="justify" style:justify-single-word="false"/>
      <style:text-properties officeooo:paragraph-rsid="00fa4156"/>
    </style:style>
    <style:style style:name="P551" style:family="paragraph" style:parent-style-name="Standard">
      <style:paragraph-properties fo:text-align="justify" style:justify-single-word="false"/>
      <style:text-properties style:use-window-font-color="true" loext:opacity="0%" fo:font-size="12pt" fo:font-style="normal" fo:font-weight="normal" officeooo:rsid="01001765" officeooo:paragraph-rsid="01001765" style:font-size-asian="12pt" style:font-style-asian="normal" style:font-weight-asian="normal" style:font-size-complex="12pt" style:font-style-complex="normal" style:font-weight-complex="normal"/>
    </style:style>
    <style:style style:name="P552" style:family="paragraph" style:parent-style-name="Standard">
      <style:paragraph-properties fo:text-align="center" style:justify-single-word="false"/>
      <style:text-properties officeooo:paragraph-rsid="05b7ad61"/>
    </style:style>
    <style:style style:name="P553" style:family="paragraph" style:parent-style-name="Standard">
      <style:paragraph-properties fo:text-align="justify" style:justify-single-word="false"/>
      <style:text-properties officeooo:paragraph-rsid="01001765"/>
    </style:style>
    <style:style style:name="P554" style:family="paragraph" style:parent-style-name="Standard">
      <style:paragraph-properties fo:text-align="justify" style:justify-single-word="false"/>
      <style:text-properties fo:color="#000000" loext:opacity="100%" style:font-name="Courier" fo:font-size="10.5pt" fo:font-weight="normal" fo:background-color="#ffffff" style:font-size-asian="12pt" style:font-size-complex="12pt"/>
    </style:style>
    <style:style style:name="P555" style:family="paragraph" style:parent-style-name="Standard">
      <style:paragraph-properties style:line-height-at-least="0.198in"/>
      <style:text-properties style:font-name="Courier"/>
    </style:style>
    <style:style style:name="P556"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rsid="0101256a" officeooo:paragraph-rsid="0101256a" fo:background-color="#ffffff" style:font-size-asian="10pt" style:font-style-asian="italic" style:font-size-complex="10pt" style:font-style-complex="italic"/>
    </style:style>
    <style:style style:name="P557" style:family="paragraph" style:parent-style-name="Standard">
      <style:paragraph-properties fo:text-align="justify" style:justify-single-word="false"/>
      <style:text-properties officeooo:paragraph-rsid="05f8af45"/>
    </style:style>
    <style:style style:name="P558" style:family="paragraph" style:parent-style-name="Standard">
      <style:paragraph-properties fo:text-align="justify" style:justify-single-word="false"/>
      <style:text-properties style:use-window-font-color="true" loext:opacity="0%" fo:font-size="12pt" fo:font-style="normal" fo:font-weight="normal" officeooo:rsid="0102da09" officeooo:paragraph-rsid="05f8af45" style:font-size-asian="12pt" style:font-style-asian="normal" style:font-weight-asian="normal" style:font-size-complex="12pt" style:font-style-complex="normal" style:font-weight-complex="normal"/>
    </style:style>
    <style:style style:name="P55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057a38" fo:background-color="#ffffff" style:font-size-asian="11pt" style:font-size-complex="11pt"/>
    </style:style>
    <style:style style:name="P560" style:family="paragraph" style:parent-style-name="Standard">
      <style:paragraph-properties fo:margin-left="0in" fo:margin-right="0in" style:line-height-at-least="0.198in" fo:text-indent="0in" style:auto-text-indent="false"/>
      <style:text-properties style:font-name="Courier" fo:font-size="11pt" officeooo:paragraph-rsid="01057a38" style:font-size-asian="11pt" style:font-size-complex="11pt"/>
    </style:style>
    <style:style style:name="P561" style:family="paragraph" style:parent-style-name="Standard">
      <style:paragraph-properties fo:margin-left="0in" fo:margin-right="0in" style:line-height-at-least="0.198in" fo:text-indent="0in" style:auto-text-indent="false"/>
      <style:text-properties officeooo:paragraph-rsid="01057a38"/>
    </style:style>
    <style:style style:name="P562" style:family="paragraph" style:parent-style-name="Standard">
      <style:paragraph-properties fo:text-align="center" style:justify-single-word="false"/>
      <style:text-properties style:use-window-font-color="true" loext:opacity="0%" fo:font-size="12pt" fo:font-style="normal" fo:font-weight="bold" officeooo:rsid="01057a38" officeooo:paragraph-rsid="01057a38" style:font-size-asian="12pt" style:font-style-asian="normal" style:font-weight-asian="bold" style:font-size-complex="12pt" style:font-style-complex="normal" style:font-weight-complex="bold"/>
    </style:style>
    <style:style style:name="P563" style:family="paragraph" style:parent-style-name="Standard">
      <style:paragraph-properties fo:text-align="justify" style:justify-single-word="false"/>
      <style:text-properties style:use-window-font-color="true" loext:opacity="0%" fo:font-size="12pt" fo:font-style="italic" fo:font-weight="normal" officeooo:rsid="0109504b" officeooo:paragraph-rsid="0109504b" style:font-size-asian="12pt" style:font-style-asian="italic" style:font-weight-asian="normal" style:font-size-complex="12pt" style:font-style-complex="italic" style:font-weight-complex="normal"/>
    </style:style>
    <style:style style:name="P564" style:family="paragraph" style:parent-style-name="Standard">
      <style:text-properties officeooo:paragraph-rsid="05fa8e50"/>
    </style:style>
    <style:style style:name="P565" style:family="paragraph" style:parent-style-name="Standard">
      <style:paragraph-properties fo:text-align="justify" style:justify-single-word="false"/>
      <style:text-properties style:use-window-font-color="true" loext:opacity="0%" fo:font-size="12pt" fo:font-style="italic" fo:font-weight="normal" officeooo:rsid="0108ab3e" officeooo:paragraph-rsid="0108ab3e" style:font-size-asian="12pt" style:font-style-asian="italic" style:font-weight-asian="normal" style:font-size-complex="12pt" style:font-style-complex="italic" style:font-weight-complex="normal"/>
    </style:style>
    <style:style style:name="P566" style:family="paragraph" style:parent-style-name="Standard">
      <style:paragraph-properties fo:text-align="justify" style:justify-single-word="false"/>
      <style:text-properties style:use-window-font-color="true" loext:opacity="0%" fo:font-size="12pt" fo:font-style="normal" fo:font-weight="normal" officeooo:rsid="0109504b" officeooo:paragraph-rsid="0109504b" style:font-size-asian="12pt" style:font-style-asian="normal" style:font-weight-asian="normal" style:font-size-complex="12pt" style:font-style-complex="normal" style:font-weight-complex="normal"/>
    </style:style>
    <style:style style:name="P567" style:family="paragraph" style:parent-style-name="Table_20_Contents">
      <style:paragraph-properties fo:text-align="left" style:justify-single-word="false"/>
      <style:text-properties officeooo:paragraph-rsid="0109504b"/>
    </style:style>
    <style:style style:name="P568" style:family="paragraph" style:parent-style-name="Table_20_Contents">
      <style:paragraph-properties fo:text-align="left" style:justify-single-word="false"/>
      <style:text-properties fo:font-weight="bold" officeooo:paragraph-rsid="0109504b" style:font-weight-asian="bold" style:font-weight-complex="bold"/>
    </style:style>
    <style:style style:name="P569" style:family="paragraph" style:parent-style-name="Table_20_Contents">
      <style:paragraph-properties fo:text-align="left" style:justify-single-word="false"/>
      <style:text-properties fo:color="#808080" loext:opacity="100%" officeooo:paragraph-rsid="0109504b"/>
    </style:style>
    <style:style style:name="P570" style:family="paragraph" style:parent-style-name="Standard">
      <style:paragraph-properties fo:text-align="justify" style:justify-single-word="false"/>
      <style:text-properties style:use-window-font-color="true" loext:opacity="0%" fo:font-size="12pt" fo:font-style="normal" fo:font-weight="normal" officeooo:rsid="010cb3de" officeooo:paragraph-rsid="010cb3de"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justify" style:justify-single-word="false"/>
      <style:text-properties officeooo:paragraph-rsid="010cb3de"/>
    </style:style>
    <style:style style:name="P572" style:family="paragraph" style:parent-style-name="Standard">
      <style:paragraph-properties fo:text-align="justify" style:justify-single-word="false"/>
      <style:text-properties style:use-window-font-color="true" loext:opacity="0%" fo:font-size="12pt" fo:font-style="normal" fo:font-weight="normal" officeooo:rsid="0109504b" officeooo:paragraph-rsid="010b6cf7" style:font-size-asian="12pt" style:font-style-asian="normal" style:font-weight-asian="normal" style:font-size-complex="12pt" style:font-style-complex="normal" style:font-weight-complex="normal"/>
    </style:style>
    <style:style style:name="P573" style:family="paragraph" style:parent-style-name="Table_20_Contents">
      <style:paragraph-properties fo:text-align="left" style:justify-single-word="false"/>
      <style:text-properties officeooo:paragraph-rsid="064c7e2d"/>
    </style:style>
    <style:style style:name="P574" style:family="paragraph" style:parent-style-name="Table_20_Contents">
      <style:paragraph-properties fo:text-align="left" style:justify-single-word="false"/>
      <style:text-properties fo:font-weight="bold" officeooo:paragraph-rsid="010cb3de" style:font-weight-asian="bold" style:font-weight-complex="bold"/>
    </style:style>
    <style:style style:name="P575" style:family="paragraph" style:parent-style-name="Table_20_Contents">
      <style:paragraph-properties fo:text-align="left" style:justify-single-word="false"/>
      <style:text-properties officeooo:paragraph-rsid="010cb3de"/>
    </style:style>
    <style:style style:name="P576" style:family="paragraph" style:parent-style-name="Standard">
      <style:paragraph-properties fo:text-align="justify" style:justify-single-word="false"/>
      <style:text-properties style:use-window-font-color="true" loext:opacity="0%" fo:font-size="12pt" fo:font-style="normal" fo:font-weight="normal" officeooo:rsid="010cb3de" officeooo:paragraph-rsid="05faf81f" style:font-size-asian="12pt" style:font-style-asian="normal" style:font-weight-asian="normal" style:font-size-complex="12pt" style:font-style-complex="normal" style:font-weight-complex="normal"/>
    </style:style>
    <style:style style:name="P577" style:family="paragraph" style:parent-style-name="Standard">
      <style:paragraph-properties fo:text-align="justify" style:justify-single-word="false"/>
      <style:text-properties officeooo:paragraph-rsid="05faf81f"/>
    </style:style>
    <style:style style:name="P578" style:family="paragraph" style:parent-style-name="Standard">
      <style:paragraph-properties fo:text-align="justify" style:justify-single-word="false"/>
      <style:text-properties style:use-window-font-color="true" loext:opacity="0%" fo:font-size="12pt" fo:font-style="normal" fo:font-weight="normal" officeooo:rsid="0109504b" officeooo:paragraph-rsid="010cb3de" style:font-size-asian="12pt" style:font-style-asian="normal" style:font-weight-asian="normal" style:font-size-complex="12pt" style:font-style-complex="normal" style:font-weight-complex="normal"/>
    </style:style>
    <style:style style:name="P579" style:family="paragraph" style:parent-style-name="Table_20_Contents">
      <style:paragraph-properties fo:text-align="left" style:justify-single-word="false"/>
      <style:text-properties fo:color="#808080" loext:opacity="100%" officeooo:paragraph-rsid="05f8af45"/>
    </style:style>
    <style:style style:name="P580" style:family="paragraph" style:parent-style-name="Standard">
      <style:paragraph-properties fo:text-align="justify" style:justify-single-word="false"/>
      <style:text-properties style:use-window-font-color="true" loext:opacity="0%" fo:font-size="12pt" fo:font-style="normal" fo:font-weight="normal" officeooo:rsid="05faf81f" officeooo:paragraph-rsid="05faf81f"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justify" style:justify-single-word="false"/>
      <style:text-properties style:use-window-font-color="true" loext:opacity="0%" fo:font-size="12pt" fo:font-weight="bold" officeooo:rsid="010fe99e" officeooo:paragraph-rsid="010fe99e" style:font-size-asian="12pt" style:font-weight-asian="bold" style:font-size-complex="12pt" style:font-weight-complex="bold"/>
    </style:style>
    <style:style style:name="P582" style:family="paragraph" style:parent-style-name="Table_20_Contents">
      <style:paragraph-properties fo:text-align="right" style:justify-single-word="false"/>
      <style:text-properties fo:color="#00a933" loext:opacity="100%" style:font-name="Courier" fo:font-size="10pt" fo:font-style="italic" officeooo:rsid="0112c389" officeooo:paragraph-rsid="0112c389" style:font-size-asian="10pt" style:font-style-asian="italic" style:font-size-complex="10pt" style:font-style-complex="italic"/>
    </style:style>
    <style:style style:name="P583" style:family="paragraph" style:parent-style-name="Standard">
      <style:paragraph-properties fo:text-align="justify" style:justify-single-word="false"/>
      <style:text-properties officeooo:paragraph-rsid="064dcd8a"/>
    </style:style>
    <style:style style:name="P584" style:family="paragraph" style:parent-style-name="Standard">
      <style:paragraph-properties fo:text-align="justify" style:justify-single-word="false"/>
      <style:text-properties style:use-window-font-color="true" loext:opacity="0%" fo:font-size="12pt" fo:font-style="normal" fo:font-weight="normal" officeooo:rsid="05faf81f" officeooo:paragraph-rsid="064dcd8a" style:font-size-asian="12pt" style:font-style-asian="normal" style:font-weight-asian="normal" style:font-size-complex="12pt" style:font-style-complex="normal" style:font-weight-complex="normal"/>
    </style:style>
    <style:style style:name="P58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13dd65" fo:background-color="#ffffff" style:font-size-asian="11pt" style:font-size-complex="11pt"/>
    </style:style>
    <style:style style:name="P58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144937" fo:background-color="#ffffff" style:font-size-asian="11pt" style:font-size-complex="11pt"/>
    </style:style>
    <style:style style:name="P587" style:family="paragraph" style:parent-style-name="Standard">
      <style:paragraph-properties fo:margin-left="0in" fo:margin-right="0in" style:line-height-at-least="0.198in" fo:text-indent="0in" style:auto-text-indent="false"/>
      <style:text-properties officeooo:paragraph-rsid="0113dd65"/>
    </style:style>
    <style:style style:name="P588" style:family="paragraph" style:parent-style-name="Standard">
      <style:paragraph-properties style:line-height-at-least="0.198in"/>
      <style:text-properties fo:color="#000000" loext:opacity="100%" style:font-name="Courier" fo:font-size="11pt" fo:font-weight="normal" officeooo:paragraph-rsid="01144937" fo:background-color="#ffffff" style:font-size-asian="11pt" style:font-size-complex="11pt"/>
    </style:style>
    <style:style style:name="P589"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officeooo:paragraph-rsid="05fc4595" fo:background-color="#ffffff" style:font-size-asian="11pt" style:font-size-complex="11pt"/>
    </style:style>
    <style:style style:name="P590"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officeooo:paragraph-rsid="05fc4595" fo:background-color="#ffffff"/>
    </style:style>
    <style:style style:name="P591" style:family="paragraph" style:parent-style-name="Standard">
      <style:paragraph-properties fo:margin-left="0in" fo:margin-right="0in" style:line-height-at-least="0.198in" fo:text-indent="0in" style:auto-text-indent="false"/>
      <style:text-properties style:font-name="Courier" fo:font-size="11pt" officeooo:paragraph-rsid="01144937" style:font-size-asian="11pt" style:font-size-complex="11pt"/>
    </style:style>
    <style:style style:name="P592" style:family="paragraph" style:parent-style-name="Standard">
      <style:paragraph-properties fo:margin-left="0in" fo:margin-right="0in" style:line-height-at-least="0.198in" fo:text-indent="0in" style:auto-text-indent="false"/>
      <style:text-properties style:font-name="Courier" fo:font-size="11pt" officeooo:paragraph-rsid="0113dd65" style:font-size-asian="11pt" style:font-size-complex="11pt"/>
    </style:style>
    <style:style style:name="P593" style:family="paragraph" style:parent-style-name="Standard">
      <style:paragraph-properties fo:text-align="center" style:justify-single-word="false"/>
      <style:text-properties style:use-window-font-color="true" loext:opacity="0%" fo:font-size="12pt" fo:font-weight="bold" officeooo:rsid="0113dd65" officeooo:paragraph-rsid="0113dd65" style:font-size-asian="12pt" style:font-weight-asian="bold" style:font-size-complex="12pt" style:font-weight-complex="bold"/>
    </style:style>
    <style:style style:name="P594" style:family="paragraph" style:parent-style-name="Standard">
      <style:paragraph-properties fo:text-align="justify" style:justify-single-word="false"/>
      <style:text-properties style:use-window-font-color="true" loext:opacity="0%" fo:font-size="12pt" fo:font-weight="bold" officeooo:rsid="004234ca" officeooo:paragraph-rsid="004234ca" style:font-size-asian="12pt" style:font-weight-asian="bold" style:font-size-complex="12pt" style:font-weight-complex="bold"/>
    </style:style>
    <style:style style:name="P595" style:family="paragraph" style:parent-style-name="Standard">
      <style:paragraph-properties fo:text-align="justify" style:justify-single-word="false"/>
      <style:text-properties style:use-window-font-color="true" loext:opacity="0%" fo:font-size="12pt" fo:font-style="normal" fo:font-weight="normal" officeooo:rsid="0117a751" officeooo:paragraph-rsid="0119273d" style:font-size-asian="12pt" style:font-style-asian="normal" style:font-weight-asian="normal" style:font-size-complex="12pt" style:font-style-complex="normal" style:font-weight-complex="normal"/>
    </style:style>
    <style:style style:name="P596" style:family="paragraph" style:parent-style-name="Table_20_Contents">
      <style:paragraph-properties fo:text-align="left" style:justify-single-word="false"/>
      <style:text-properties officeooo:paragraph-rsid="0119273d"/>
    </style:style>
    <style:style style:name="P597" style:family="paragraph" style:parent-style-name="Standard">
      <style:paragraph-properties fo:text-align="justify" style:justify-single-word="false"/>
      <style:text-properties style:use-window-font-color="true" loext:opacity="0%" fo:font-size="12pt" fo:font-style="normal" fo:font-weight="normal" officeooo:rsid="0118f63b" officeooo:paragraph-rsid="0119273d"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justify" style:justify-single-word="false"/>
      <style:text-properties officeooo:paragraph-rsid="05fc4595"/>
    </style:style>
    <style:style style:name="P599" style:family="paragraph" style:parent-style-name="Standard">
      <style:paragraph-properties fo:text-align="justify" style:justify-single-word="false"/>
      <style:text-properties style:use-window-font-color="true" loext:opacity="0%" fo:font-size="12pt" fo:font-style="normal" fo:font-weight="normal" officeooo:rsid="011c0737" officeooo:paragraph-rsid="011c0737"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justify" style:justify-single-word="false"/>
      <style:text-properties style:use-window-font-color="true" loext:opacity="0%" fo:font-size="12pt" fo:font-style="normal" fo:font-weight="normal" officeooo:rsid="011e8299" officeooo:paragraph-rsid="05bba027"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justify" style:justify-single-word="false"/>
      <style:text-properties officeooo:paragraph-rsid="05bba027"/>
    </style:style>
    <style:style style:name="P602" style:family="paragraph" style:parent-style-name="Standard">
      <style:paragraph-properties fo:text-align="center" style:justify-single-word="false"/>
      <style:text-properties officeooo:paragraph-rsid="05bba027"/>
    </style:style>
    <style:style style:name="P603" style:family="paragraph" style:parent-style-name="Standard">
      <style:paragraph-properties fo:text-align="justify" style:justify-single-word="false"/>
      <style:text-properties style:use-window-font-color="true" loext:opacity="0%" fo:font-size="12pt" fo:font-style="normal" fo:font-weight="normal" officeooo:rsid="011e8299" officeooo:paragraph-rsid="011e8299" style:font-size-asian="12pt" style:font-style-asian="normal" style:font-weight-asian="normal" style:font-size-complex="12pt" style:font-style-complex="normal" style:font-weight-complex="normal"/>
    </style:style>
    <style:style style:name="P60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1f437c" fo:background-color="#ffffff" style:font-size-asian="11pt" style:font-size-complex="11pt"/>
    </style:style>
    <style:style style:name="P605" style:family="paragraph" style:parent-style-name="Standard">
      <style:paragraph-properties style:line-height-at-least="0.198in"/>
      <style:text-properties fo:color="#000000" loext:opacity="100%" style:font-name="Courier" fo:font-size="11pt" fo:font-weight="normal" fo:background-color="#ffffff" style:font-size-asian="11pt" style:font-size-complex="11pt"/>
    </style:style>
    <style:style style:name="P606" style:family="paragraph" style:parent-style-name="Table_20_Contents">
      <style:paragraph-properties fo:text-align="justify" style:justify-single-word="false"/>
      <style:text-properties fo:color="#00a933" loext:opacity="100%" style:font-name="Courier" fo:font-size="10pt" fo:font-style="italic" officeooo:rsid="011f437c" officeooo:paragraph-rsid="0122c420" style:font-size-asian="10pt" style:font-style-asian="italic" style:font-size-complex="10pt" style:font-style-complex="italic"/>
    </style:style>
    <style:style style:name="P607" style:family="paragraph" style:parent-style-name="Table_20_Contents">
      <style:paragraph-properties fo:text-align="justify" style:justify-single-word="false"/>
      <style:text-properties fo:color="#00a933" loext:opacity="100%" style:font-name="Courier" fo:font-size="10pt" fo:font-style="italic" officeooo:rsid="0122c420" officeooo:paragraph-rsid="0122c420" style:font-size-asian="10pt" style:font-style-asian="italic" style:font-size-complex="10pt" style:font-style-complex="italic"/>
    </style:style>
    <style:style style:name="P608" style:family="paragraph" style:parent-style-name="Standard">
      <style:paragraph-properties fo:text-align="justify" style:justify-single-word="false"/>
      <style:text-properties officeooo:paragraph-rsid="064f6759"/>
    </style:style>
    <style:style style:name="P609" style:family="paragraph" style:parent-style-name="Standard">
      <style:paragraph-properties fo:text-align="justify" style:justify-single-word="false"/>
      <style:text-properties style:use-window-font-color="true" loext:opacity="0%" fo:font-size="12pt" fo:font-style="normal" fo:font-weight="normal" officeooo:rsid="011f7990" officeooo:paragraph-rsid="011e8299" style:font-size-asian="12pt" style:font-style-asian="normal" style:font-weight-asian="normal" style:font-size-complex="12pt" style:font-style-complex="normal" style:font-weight-complex="normal"/>
    </style:style>
    <style:style style:name="P610" style:family="paragraph" style:parent-style-name="Standard">
      <style:text-properties style:use-window-font-color="true" loext:opacity="0%" fo:font-style="normal" fo:font-weight="normal" style:font-style-asian="normal" style:font-weight-asian="normal" style:font-style-complex="normal" style:font-weight-complex="normal"/>
    </style:style>
    <style:style style:name="P611" style:family="paragraph" style:parent-style-name="Standard">
      <style:paragraph-properties fo:text-align="justify" style:justify-single-word="false"/>
      <style:text-properties style:use-window-font-color="true" loext:opacity="0%" fo:font-size="12pt" fo:font-style="normal" fo:font-weight="normal" officeooo:rsid="01253863" officeooo:paragraph-rsid="01253863"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justify" style:justify-single-word="false"/>
      <style:text-properties officeooo:paragraph-rsid="05fea3cf"/>
    </style:style>
    <style:style style:name="P613" style:family="paragraph" style:parent-style-name="Footnote">
      <style:text-properties officeooo:paragraph-rsid="05bc4405"/>
    </style:style>
    <style:style style:name="P614" style:family="paragraph" style:parent-style-name="Standard">
      <style:paragraph-properties fo:text-align="justify" style:justify-single-word="false"/>
      <style:text-properties style:use-window-font-color="true" loext:opacity="0%" fo:font-size="12pt" fo:font-style="normal" fo:font-weight="normal" officeooo:rsid="01253863" officeooo:paragraph-rsid="05fea3cf" style:font-size-asian="12pt" style:font-style-asian="normal" style:font-weight-asian="normal" style:font-size-complex="12pt" style:font-style-complex="normal" style:font-weight-complex="normal"/>
    </style:style>
    <style:style style:name="P615" style:family="paragraph" style:parent-style-name="Standard">
      <style:paragraph-properties fo:margin-left="0in" fo:margin-right="0in" style:line-height-at-least="0.198in" fo:text-indent="0in" style:auto-text-indent="false"/>
      <style:text-properties officeooo:paragraph-rsid="01277941"/>
    </style:style>
    <style:style style:name="P61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277941" fo:background-color="#ffffff" style:font-size-asian="11pt" style:font-size-complex="11pt"/>
    </style:style>
    <style:style style:name="P617" style:family="paragraph" style:parent-style-name="Standard">
      <style:paragraph-properties fo:margin-left="0in" fo:margin-right="0in" style:line-height-at-least="0.198in" fo:text-indent="0in" style:auto-text-indent="false"/>
      <style:text-properties fo:color="#00a933" loext:opacity="100%" style:font-name="Courier" fo:font-size="10pt" fo:font-style="italic" fo:font-weight="normal" officeooo:paragraph-rsid="012f4038" fo:background-color="#ffffff" style:font-size-asian="10pt" style:font-style-asian="italic" style:font-size-complex="10pt" style:font-style-complex="italic"/>
    </style:style>
    <style:style style:name="P618"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paragraph-rsid="012f4038" fo:background-color="#ffffff" style:font-size-asian="10pt" style:font-style-asian="italic" style:font-size-complex="10pt" style:font-style-complex="italic"/>
    </style:style>
    <style:style style:name="P619" style:family="paragraph" style:parent-style-name="Standard">
      <style:paragraph-properties fo:text-align="justify" style:justify-single-word="false"/>
      <style:text-properties style:use-window-font-color="true" loext:opacity="0%" fo:font-size="12pt" fo:font-style="normal" fo:font-weight="normal" officeooo:rsid="01277941" officeooo:paragraph-rsid="01277941"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justify" style:justify-single-word="false"/>
      <style:text-properties officeooo:paragraph-rsid="064fad1d"/>
    </style:style>
    <style:style style:name="P621" style:family="paragraph" style:parent-style-name="Standard">
      <style:paragraph-properties fo:text-align="justify" style:justify-single-word="false"/>
      <style:text-properties style:use-window-font-color="true" loext:opacity="0%" fo:font-size="12pt" fo:font-style="normal" fo:font-weight="normal" officeooo:rsid="01277941" officeooo:paragraph-rsid="0128b7ea" style:font-size-asian="12pt" style:font-style-asian="normal" style:font-weight-asian="normal" style:font-size-complex="12pt" style:font-style-complex="normal" style:font-weight-complex="normal"/>
    </style:style>
    <style:style style:name="P622" style:family="paragraph" style:parent-style-name="Standard">
      <style:paragraph-properties fo:margin-left="0in" fo:margin-right="0in" style:line-height-at-least="0.198in" fo:text-indent="0in" style:auto-text-indent="false"/>
      <style:text-properties style:font-name="Courier"/>
    </style:style>
    <style:style style:name="P623"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5bc4405" officeooo:paragraph-rsid="05bc4405" fo:background-color="#ffffff" style:font-size-asian="10pt" style:font-style-asian="italic" style:font-size-complex="10pt" style:font-style-complex="italic"/>
    </style:style>
    <style:style style:name="P624" style:family="paragraph" style:parent-style-name="Standard">
      <style:paragraph-properties fo:text-align="justify" style:justify-single-word="false"/>
      <style:text-properties style:use-window-font-color="true" loext:opacity="0%" fo:font-size="12pt" fo:font-style="normal" fo:font-weight="normal" officeooo:rsid="012af0c6" officeooo:paragraph-rsid="01253863" style:font-size-asian="12pt" style:font-style-asian="normal" style:font-weight-asian="normal" style:font-size-complex="12pt" style:font-style-complex="normal" style:font-weight-complex="normal"/>
    </style:style>
    <style:style style:name="P625" style:family="paragraph" style:parent-style-name="Standard">
      <style:paragraph-properties fo:text-align="justify" style:justify-single-word="false"/>
      <style:text-properties officeooo:paragraph-rsid="01253863"/>
    </style:style>
    <style:style style:name="P62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2cc852" fo:background-color="#ffffff" style:font-size-asian="11pt" style:font-size-complex="11pt"/>
    </style:style>
    <style:style style:name="P627" style:family="paragraph" style:parent-style-name="Standard">
      <style:paragraph-properties fo:margin-left="0in" fo:margin-right="0in" style:line-height-at-least="0.198in" fo:text-indent="0in" style:auto-text-indent="false"/>
      <style:text-properties officeooo:paragraph-rsid="012cc852"/>
    </style:style>
    <style:style style:name="P628" style:family="paragraph" style:parent-style-name="Standard">
      <style:paragraph-properties fo:margin-left="0in" fo:margin-right="0in" style:line-height-at-least="0.198in" fo:text-indent="0in" style:auto-text-indent="false"/>
      <style:text-properties style:font-name="Courier" fo:font-size="11pt" officeooo:paragraph-rsid="012cc852" style:font-size-asian="11pt" style:font-size-complex="11pt"/>
    </style:style>
    <style:style style:name="P629" style:family="paragraph" style:parent-style-name="Standard">
      <style:paragraph-properties fo:text-align="center" style:justify-single-word="false"/>
      <style:text-properties style:use-window-font-color="true" loext:opacity="0%" fo:font-size="12pt" fo:font-style="normal" fo:font-weight="normal" officeooo:rsid="012cc852" officeooo:paragraph-rsid="012cc852" style:font-size-asian="12pt" style:font-style-asian="normal" style:font-weight-asian="normal" style:font-size-complex="12pt" style:font-style-complex="normal" style:font-weight-complex="normal"/>
    </style:style>
    <style:style style:name="P630" style:family="paragraph" style:parent-style-name="Standard">
      <style:paragraph-properties fo:text-align="center" style:justify-single-word="false"/>
      <style:text-properties style:use-window-font-color="true" loext:opacity="0%" fo:font-size="12pt" fo:font-style="normal" fo:font-weight="bold" officeooo:rsid="012cc852" officeooo:paragraph-rsid="012cc852" style:font-size-asian="12pt" style:font-style-asian="normal" style:font-weight-asian="bold" style:font-size-complex="12pt" style:font-style-complex="normal" style:font-weight-complex="bold"/>
    </style:style>
    <style:style style:name="P631" style:family="paragraph" style:parent-style-name="Standard">
      <style:paragraph-properties fo:text-align="justify" style:justify-single-word="false"/>
      <style:text-properties style:use-window-font-color="true" loext:opacity="0%" fo:font-size="12pt" fo:font-style="normal" fo:font-weight="normal" officeooo:rsid="01338523" officeooo:paragraph-rsid="01338523" style:font-size-asian="12pt" style:font-style-asian="normal" style:font-weight-asian="normal" style:font-size-complex="12pt" style:font-style-complex="normal" style:font-weight-complex="normal"/>
    </style:style>
    <style:style style:name="P632" style:family="paragraph" style:parent-style-name="Table_20_Contents">
      <style:paragraph-properties fo:text-align="left" style:justify-single-word="false"/>
      <style:text-properties officeooo:paragraph-rsid="01338523"/>
    </style:style>
    <style:style style:name="P633" style:family="paragraph" style:parent-style-name="Table_20_Contents">
      <style:paragraph-properties fo:text-align="left" style:justify-single-word="false"/>
      <style:text-properties fo:color="#808080" loext:opacity="100%" officeooo:paragraph-rsid="01338523"/>
    </style:style>
    <style:style style:name="P634" style:family="paragraph" style:parent-style-name="Standard">
      <style:paragraph-properties fo:text-align="justify" style:justify-single-word="false"/>
      <style:text-properties style:use-window-font-color="true" loext:opacity="0%" fo:font-size="12pt" fo:font-style="normal" fo:font-weight="normal" officeooo:rsid="0128b7ea" officeooo:paragraph-rsid="01253863" style:font-size-asian="12pt" style:font-style-asian="normal" style:font-weight-asian="normal" style:font-size-complex="12pt" style:font-style-complex="normal" style:font-weight-complex="normal"/>
    </style:style>
    <style:style style:name="P635" style:family="paragraph" style:parent-style-name="Standard">
      <style:paragraph-properties fo:text-align="justify" style:justify-single-word="false"/>
      <style:text-properties style:use-window-font-color="true" loext:opacity="0%" fo:font-size="12pt" fo:font-style="normal" fo:font-weight="normal" officeooo:rsid="01338523" officeooo:paragraph-rsid="01253863" style:font-size-asian="12pt" style:font-style-asian="normal" style:font-weight-asian="normal" style:font-size-complex="12pt" style:font-style-complex="normal" style:font-weight-complex="normal"/>
    </style:style>
    <style:style style:name="P636" style:family="paragraph" style:parent-style-name="Standard">
      <style:paragraph-properties fo:text-align="justify" style:justify-single-word="false"/>
      <style:text-properties style:use-window-font-color="true" loext:opacity="0%" fo:font-size="12pt" fo:font-style="normal" fo:font-weight="normal" officeooo:rsid="013503fa" officeooo:paragraph-rsid="01253863" style:font-size-asian="12pt" style:font-style-asian="normal" style:font-weight-asian="normal" style:font-size-complex="12pt" style:font-style-complex="normal" style:font-weight-complex="normal"/>
    </style:style>
    <style:style style:name="P637" style:family="paragraph" style:parent-style-name="Standard">
      <style:paragraph-properties fo:text-align="center" style:justify-single-word="false"/>
      <style:text-properties style:use-window-font-color="true" loext:opacity="0%" fo:font-size="13pt" fo:font-style="normal" fo:font-weight="bold" officeooo:rsid="013533f3" officeooo:paragraph-rsid="013533f3" style:font-size-asian="13pt" style:font-style-asian="normal" style:font-weight-asian="bold" style:font-size-complex="13pt" style:font-style-complex="normal" style:font-weight-complex="bold"/>
    </style:style>
    <style:style style:name="P638" style:family="paragraph" style:parent-style-name="Standard">
      <style:paragraph-properties fo:text-align="justify" style:justify-single-word="false"/>
      <style:text-properties style:use-window-font-color="true" loext:opacity="0%" fo:font-size="12pt" fo:font-style="normal" fo:font-weight="normal" officeooo:rsid="01356828" officeooo:paragraph-rsid="01356828"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in" fo:margin-right="0in" style:line-height-at-least="0.198in" fo:text-indent="0in" style:auto-text-indent="false"/>
      <style:text-properties style:font-name="Courier" fo:font-size="11pt" officeooo:paragraph-rsid="01358de8" style:font-size-asian="11pt" style:font-size-complex="11pt"/>
    </style:style>
    <style:style style:name="P64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358de8" fo:background-color="#ffffff" style:font-size-asian="11pt" style:font-size-complex="11pt"/>
    </style:style>
    <style:style style:name="P641"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1358de8" officeooo:paragraph-rsid="01358de8" fo:background-color="#ffffff" style:font-size-asian="10pt" style:font-style-asian="italic" style:font-size-complex="10pt" style:font-style-complex="italic"/>
    </style:style>
    <style:style style:name="P642" style:family="paragraph" style:parent-style-name="Standard">
      <style:paragraph-properties fo:text-align="justify" style:justify-single-word="false"/>
      <style:text-properties officeooo:paragraph-rsid="0600a38c"/>
    </style:style>
    <style:style style:name="P643" style:family="paragraph" style:parent-style-name="Standard">
      <style:paragraph-properties fo:text-align="justify" style:justify-single-word="false"/>
      <style:text-properties style:use-window-font-color="true" loext:opacity="0%" fo:font-size="12pt" fo:font-style="normal" fo:font-weight="normal" officeooo:rsid="01399f13" officeooo:paragraph-rsid="01399f13" style:font-size-asian="10.5pt" style:font-style-asian="normal" style:font-weight-asian="normal" style:font-size-complex="12pt" style:font-style-complex="normal" style:font-weight-complex="normal"/>
    </style:style>
    <style:style style:name="P644" style:family="paragraph" style:parent-style-name="Standard">
      <style:paragraph-properties fo:text-align="justify" style:justify-single-word="false"/>
      <style:text-properties officeooo:paragraph-rsid="0652db70"/>
    </style:style>
    <style:style style:name="P64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3a7368" fo:background-color="#ffffff" style:font-size-asian="11pt" style:font-size-complex="11pt"/>
    </style:style>
    <style:style style:name="P646" style:family="paragraph" style:parent-style-name="Standard">
      <style:paragraph-properties fo:margin-left="0in" fo:margin-right="0in" style:line-height-at-least="0.198in" fo:text-indent="0in" style:auto-text-indent="false"/>
      <style:text-properties officeooo:paragraph-rsid="013a7368"/>
    </style:style>
    <style:style style:name="P647" style:family="paragraph" style:parent-style-name="Standard">
      <style:paragraph-properties fo:margin-left="0in" fo:margin-right="0in" style:line-height-at-least="0.198in" fo:text-indent="0in" style:auto-text-indent="false"/>
      <style:text-properties style:font-name="Courier" fo:font-size="11pt" officeooo:paragraph-rsid="013a7368" style:font-size-asian="11pt" style:font-size-complex="11pt"/>
    </style:style>
    <style:style style:name="P648"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13a7368" fo:background-color="#ffffff" style:font-size-asian="11pt" style:font-size-complex="11pt"/>
    </style:style>
    <style:style style:name="P64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3b5b36" fo:background-color="#ffffff" style:font-size-asian="11pt" style:font-size-complex="11pt"/>
    </style:style>
    <style:style style:name="P650" style:family="paragraph" style:parent-style-name="Standard">
      <style:paragraph-properties fo:text-align="center" style:justify-single-word="false"/>
      <style:text-properties fo:font-weight="bold" style:font-weight-asian="bold" style:font-weight-complex="bold"/>
    </style:style>
    <style:style style:name="P651" style:family="paragraph" style:parent-style-name="Table_20_Contents">
      <style:paragraph-properties fo:text-align="left" style:justify-single-word="false"/>
      <style:text-properties officeooo:paragraph-rsid="0141e877"/>
    </style:style>
    <style:style style:name="P652" style:family="paragraph" style:parent-style-name="Table_20_Contents">
      <style:paragraph-properties fo:text-align="left" style:justify-single-word="false"/>
      <style:text-properties officeooo:paragraph-rsid="0143c2c3"/>
    </style:style>
    <style:style style:name="P653" style:family="paragraph" style:parent-style-name="Table_20_Contents">
      <style:paragraph-properties fo:text-align="left" style:justify-single-word="false"/>
      <style:text-properties fo:color="#808080" loext:opacity="100%" officeooo:paragraph-rsid="0143c2c3"/>
    </style:style>
    <style:style style:name="P654" style:family="paragraph" style:parent-style-name="Standard">
      <style:paragraph-properties fo:text-align="justify" style:justify-single-word="false"/>
      <style:text-properties officeooo:paragraph-rsid="0145bd4c"/>
    </style:style>
    <style:style style:name="P655" style:family="paragraph" style:parent-style-name="Standard">
      <style:paragraph-properties fo:text-align="justify" style:justify-single-word="false"/>
      <style:text-properties officeooo:rsid="0145bd4c" officeooo:paragraph-rsid="0145bd4c"/>
    </style:style>
    <style:style style:name="P656" style:family="paragraph" style:parent-style-name="Standard">
      <style:text-properties officeooo:paragraph-rsid="0145bd4c"/>
    </style:style>
    <style:style style:name="P65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481392" fo:background-color="#ffffff" style:font-size-asian="11pt" style:font-size-complex="11pt"/>
    </style:style>
    <style:style style:name="P658" style:family="paragraph" style:parent-style-name="Standard">
      <style:text-properties officeooo:rsid="01481392" officeooo:paragraph-rsid="0145bd4c"/>
    </style:style>
    <style:style style:name="P659" style:family="paragraph" style:parent-style-name="Standard">
      <style:text-properties fo:color="#000000" loext:opacity="100%" style:font-name="Courier" fo:font-size="10.5pt" fo:font-weight="normal" officeooo:paragraph-rsid="0145bd4c" fo:background-color="#ffffff"/>
    </style:style>
    <style:style style:name="P660" style:family="paragraph" style:parent-style-name="Standard">
      <style:text-properties officeooo:rsid="0602c287" officeooo:paragraph-rsid="0602c287"/>
    </style:style>
    <style:style style:name="P661" style:family="paragraph" style:parent-style-name="Table_20_Contents">
      <style:paragraph-properties fo:text-align="left" style:justify-single-word="false"/>
      <style:text-properties officeooo:paragraph-rsid="0602c287"/>
    </style:style>
    <style:style style:name="P662" style:family="paragraph" style:parent-style-name="Table_20_Contents">
      <style:paragraph-properties fo:text-align="left" style:justify-single-word="false"/>
      <style:text-properties fo:color="#808080" loext:opacity="100%" officeooo:paragraph-rsid="0602c287"/>
    </style:style>
    <style:style style:name="P663" style:family="paragraph" style:parent-style-name="Standard">
      <style:paragraph-properties fo:text-align="justify" style:justify-single-word="false"/>
      <style:text-properties officeooo:rsid="0602c287" officeooo:paragraph-rsid="0602c287"/>
    </style:style>
    <style:style style:name="P664" style:family="paragraph" style:parent-style-name="Standard">
      <style:paragraph-properties fo:text-align="center" style:justify-single-word="false"/>
      <style:text-properties officeooo:paragraph-rsid="014ad20f"/>
    </style:style>
    <style:style style:name="P665" style:family="paragraph" style:parent-style-name="Standard">
      <style:text-properties officeooo:paragraph-rsid="05bddc78"/>
    </style:style>
    <style:style style:name="P666" style:family="paragraph" style:parent-style-name="Standard">
      <style:text-properties officeooo:rsid="014b901e" officeooo:paragraph-rsid="014b901e"/>
    </style:style>
    <style:style style:name="P667" style:family="paragraph" style:parent-style-name="Standard">
      <style:text-properties officeooo:paragraph-rsid="014b901e"/>
    </style:style>
    <style:style style:name="P668" style:family="paragraph" style:parent-style-name="Standard">
      <style:paragraph-properties fo:text-align="justify" style:justify-single-word="false"/>
      <style:text-properties officeooo:paragraph-rsid="05bddc78"/>
    </style:style>
    <style:style style:name="P669" style:family="paragraph" style:parent-style-name="Standard">
      <style:paragraph-properties fo:text-align="justify" style:justify-single-word="false"/>
      <style:text-properties fo:font-style="italic" officeooo:rsid="014b901e" officeooo:paragraph-rsid="05bddc78" style:font-style-asian="italic" style:font-style-complex="italic"/>
    </style:style>
    <style:style style:name="P670" style:family="paragraph" style:parent-style-name="Standard">
      <style:paragraph-properties fo:text-align="justify" style:justify-single-word="false"/>
      <style:text-properties officeooo:rsid="014d78b2" officeooo:paragraph-rsid="014d78b2"/>
    </style:style>
    <style:style style:name="P671" style:family="paragraph" style:parent-style-name="Footnote">
      <style:text-properties officeooo:rsid="014d78b2" officeooo:paragraph-rsid="05bddc78"/>
    </style:style>
    <style:style style:name="P672" style:family="paragraph" style:parent-style-name="Table_20_Contents">
      <style:paragraph-properties fo:text-align="right" style:justify-single-word="false"/>
      <style:text-properties officeooo:paragraph-rsid="014d78b2"/>
    </style:style>
    <style:style style:name="P673" style:family="paragraph" style:parent-style-name="Table_20_Contents">
      <style:paragraph-properties fo:text-align="right" style:justify-single-word="false"/>
      <style:text-properties fo:color="#00a933" loext:opacity="100%" style:font-name="Courier" fo:font-size="10pt" fo:font-style="italic" officeooo:rsid="014d78b2" officeooo:paragraph-rsid="014d78b2" style:font-size-asian="10pt" style:font-style-asian="italic" style:font-size-complex="10pt" style:font-style-complex="italic"/>
    </style:style>
    <style:style style:name="P674" style:family="paragraph" style:parent-style-name="Standard">
      <style:paragraph-properties fo:text-align="justify" style:justify-single-word="false"/>
      <style:text-properties officeooo:paragraph-rsid="014eafbe"/>
    </style:style>
    <style:style style:name="P675" style:family="paragraph" style:parent-style-name="Standard">
      <style:paragraph-properties fo:text-align="justify" style:justify-single-word="false"/>
      <style:text-properties officeooo:rsid="014eafbe" officeooo:paragraph-rsid="014eafbe"/>
    </style:style>
    <style:style style:name="P676" style:family="paragraph" style:parent-style-name="Standard">
      <style:paragraph-properties fo:text-align="justify" style:justify-single-word="false"/>
      <style:text-properties style:font-name="Courier" officeooo:rsid="014eafbe" officeooo:paragraph-rsid="014eafbe"/>
    </style:style>
    <style:style style:name="P677" style:family="paragraph" style:parent-style-name="Standard">
      <style:paragraph-properties fo:text-align="justify" style:justify-single-word="false"/>
      <style:text-properties officeooo:paragraph-rsid="0602df15"/>
    </style:style>
    <style:style style:name="P678" style:family="paragraph" style:parent-style-name="Footnote">
      <style:text-properties officeooo:paragraph-rsid="05bddc78"/>
    </style:style>
    <style:style style:name="P679" style:family="paragraph" style:parent-style-name="Standard">
      <style:paragraph-properties fo:text-align="justify" style:justify-single-word="false"/>
      <style:text-properties officeooo:rsid="0154816e" officeooo:paragraph-rsid="0154816e"/>
    </style:style>
    <style:style style:name="P680" style:family="paragraph" style:parent-style-name="Table_20_Contents">
      <style:paragraph-properties fo:text-align="right" style:justify-single-word="false"/>
      <style:text-properties fo:color="#00a933" loext:opacity="100%" style:font-name="Courier" fo:font-size="10pt" fo:font-style="italic" officeooo:rsid="0154816e" officeooo:paragraph-rsid="0154816e" style:font-size-asian="10pt" style:font-style-asian="italic" style:font-size-complex="10pt" style:font-style-complex="italic"/>
    </style:style>
    <style:style style:name="P68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6030c6" fo:background-color="#ffffff" style:font-size-asian="11pt" style:font-size-complex="11pt"/>
    </style:style>
    <style:style style:name="P682" style:family="paragraph" style:parent-style-name="Standard">
      <style:paragraph-properties fo:margin-left="0in" fo:margin-right="0in" style:line-height-at-least="0.198in" fo:text-indent="0in" style:auto-text-indent="false"/>
      <style:text-properties officeooo:paragraph-rsid="016030c6"/>
    </style:style>
    <style:style style:name="P68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617fbf" fo:background-color="#ffffff" style:font-size-asian="11pt" style:font-size-complex="11pt"/>
    </style:style>
    <style:style style:name="P684" style:family="paragraph" style:parent-style-name="Standard">
      <style:paragraph-properties fo:margin-left="0in" fo:margin-right="0in" style:line-height-at-least="0.198in" fo:text-indent="0in" style:auto-text-indent="false"/>
      <style:text-properties style:font-name="Courier" fo:font-size="11pt" officeooo:paragraph-rsid="016030c6" style:font-size-asian="11pt" style:font-size-complex="11pt"/>
    </style:style>
    <style:style style:name="P685" style:family="paragraph" style:parent-style-name="Standard">
      <style:paragraph-properties fo:text-align="center" style:justify-single-word="false"/>
      <style:text-properties fo:font-weight="bold" officeooo:rsid="0158d5ae" officeooo:paragraph-rsid="0158d5ae" style:font-weight-asian="bold" style:font-weight-complex="bold"/>
    </style:style>
    <style:style style:name="P686" style:family="paragraph" style:parent-style-name="Standard">
      <style:paragraph-properties fo:text-align="justify" style:justify-single-word="false"/>
      <style:text-properties fo:font-style="italic" fo:font-weight="normal" officeooo:rsid="0161b9c0" officeooo:paragraph-rsid="0161b9c0" style:font-style-asian="italic" style:font-weight-asian="normal" style:font-style-complex="italic" style:font-weight-complex="normal"/>
    </style:style>
    <style:style style:name="P687" style:family="paragraph" style:parent-style-name="Standard">
      <style:paragraph-properties fo:text-align="justify" style:justify-single-word="false"/>
      <style:text-properties officeooo:paragraph-rsid="0161b9c0"/>
    </style:style>
    <style:style style:name="P688" style:family="paragraph" style:parent-style-name="Standard">
      <style:paragraph-properties fo:text-align="justify" style:justify-single-word="false"/>
      <style:text-properties fo:font-weight="normal" officeooo:rsid="01631615" officeooo:paragraph-rsid="01631615" style:font-weight-asian="normal" style:font-weight-complex="normal"/>
    </style:style>
    <style:style style:name="P689" style:family="paragraph" style:parent-style-name="Table_20_Contents">
      <style:paragraph-properties fo:text-align="left" style:justify-single-word="false"/>
      <style:text-properties officeooo:paragraph-rsid="0163381e"/>
    </style:style>
    <style:style style:name="P690" style:family="paragraph" style:parent-style-name="Standard">
      <style:paragraph-properties fo:text-align="justify" style:justify-single-word="false"/>
      <style:text-properties officeooo:rsid="0158d5ae" officeooo:paragraph-rsid="0158d5ae"/>
    </style:style>
    <style:style style:name="P691" style:family="paragraph" style:parent-style-name="Standard">
      <style:paragraph-properties fo:margin-left="0in" fo:margin-right="0in" style:line-height-at-least="0.198in" fo:text-align="justify" style:justify-single-word="false" fo:text-indent="0in" style:auto-text-indent="false"/>
      <style:text-properties officeooo:paragraph-rsid="0158d5ae"/>
    </style:style>
    <style:style style:name="P692" style:family="paragraph" style:parent-style-name="Standard">
      <style:paragraph-properties fo:text-align="justify" style:justify-single-word="false"/>
      <style:text-properties officeooo:rsid="015d9d3f" officeooo:paragraph-rsid="0163da48"/>
    </style:style>
    <style:style style:name="P69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58d5ae" fo:background-color="#ffffff" style:font-size-asian="11pt" style:font-size-complex="11pt"/>
    </style:style>
    <style:style style:name="P694" style:family="paragraph" style:parent-style-name="Standard">
      <style:paragraph-properties fo:margin-left="0in" fo:margin-right="0in" style:line-height-at-least="0.198in" fo:text-align="justify" style:justify-single-word="false" fo:text-indent="0in" style:auto-text-indent="false"/>
      <style:text-properties fo:font-size="12pt" officeooo:rsid="0158d5ae" officeooo:paragraph-rsid="0158d5ae" style:font-size-asian="12pt" style:font-size-complex="12pt"/>
    </style:style>
    <style:style style:name="P695" style:family="paragraph" style:parent-style-name="Standard">
      <style:paragraph-properties fo:text-align="center" style:justify-single-word="false"/>
      <style:text-properties officeooo:paragraph-rsid="0164e1dc"/>
    </style:style>
    <style:style style:name="P696" style:family="paragraph" style:parent-style-name="Standard">
      <style:paragraph-properties style:line-height-at-least="0.198in" fo:text-align="right" style:justify-single-word="false"/>
      <style:text-properties fo:color="#00a933" loext:opacity="100%" style:font-name="Courier" fo:font-size="10pt" fo:font-style="italic" officeooo:rsid="01538dae" officeooo:paragraph-rsid="01538dae" style:font-size-asian="10pt" style:font-style-asian="italic" style:font-size-complex="10pt" style:font-style-complex="italic"/>
    </style:style>
    <style:style style:name="P697" style:family="paragraph" style:parent-style-name="Standard">
      <style:paragraph-properties fo:text-align="justify" style:justify-single-word="false"/>
      <style:text-properties officeooo:rsid="0165cc96" officeooo:paragraph-rsid="0652db70"/>
    </style:style>
    <style:style style:name="P698" style:family="paragraph" style:parent-style-name="Standard">
      <style:paragraph-properties fo:text-align="justify" style:justify-single-word="false"/>
      <style:text-properties fo:color="#000000" loext:opacity="100%" style:font-name="Courier" fo:font-size="11pt" fo:font-weight="normal" officeooo:rsid="0154816e" officeooo:paragraph-rsid="0154816e" fo:background-color="#ffffff" style:font-size-asian="11pt" style:font-size-complex="11pt"/>
    </style:style>
    <style:style style:name="P69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65cc96" fo:background-color="#ffffff" style:font-size-asian="11pt" style:font-size-complex="11pt"/>
    </style:style>
    <style:style style:name="P700" style:family="paragraph" style:parent-style-name="Standard">
      <style:paragraph-properties fo:margin-left="0in" fo:margin-right="0in" style:line-height-at-least="0.198in" fo:text-indent="0in" style:auto-text-indent="false"/>
      <style:text-properties style:font-name="Courier" fo:font-size="11pt" officeooo:paragraph-rsid="0165cc96" style:font-size-asian="11pt" style:font-size-complex="11pt"/>
    </style:style>
    <style:style style:name="P701" style:family="paragraph" style:parent-style-name="Standard">
      <style:paragraph-properties fo:text-align="center" style:justify-single-word="false"/>
      <style:text-properties fo:font-weight="bold" officeooo:rsid="0165cc96" officeooo:paragraph-rsid="0165cc96" style:font-weight-asian="bold" style:font-weight-complex="bold"/>
    </style:style>
    <style:style style:name="P702" style:family="paragraph" style:parent-style-name="Standard">
      <style:paragraph-properties fo:text-align="justify" style:justify-single-word="false"/>
      <style:text-properties officeooo:rsid="016728ad" officeooo:paragraph-rsid="016728ad"/>
    </style:style>
    <style:style style:name="P703" style:family="paragraph" style:parent-style-name="Table_20_Contents">
      <style:paragraph-properties fo:text-align="left" style:justify-single-word="false"/>
      <style:text-properties officeooo:paragraph-rsid="016728ad"/>
    </style:style>
    <style:style style:name="P704" style:family="paragraph" style:parent-style-name="Standard">
      <style:paragraph-properties fo:text-align="justify" style:justify-single-word="false"/>
      <style:text-properties officeooo:paragraph-rsid="0604571b"/>
    </style:style>
    <style:style style:name="P705" style:family="paragraph" style:parent-style-name="Standard">
      <style:paragraph-properties fo:text-align="justify" style:justify-single-word="false"/>
      <style:text-properties officeooo:rsid="0169cb5f" officeooo:paragraph-rsid="0604571b"/>
    </style:style>
    <style:style style:name="P706"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16a1b68" officeooo:paragraph-rsid="016a1b68" fo:background-color="#ffffff" style:font-size-asian="10pt" style:font-style-asian="italic" style:font-size-complex="10pt" style:font-style-complex="italic"/>
    </style:style>
    <style:style style:name="P707" style:family="paragraph" style:parent-style-name="Standard">
      <style:paragraph-properties fo:text-align="justify" style:justify-single-word="false"/>
      <style:text-properties officeooo:rsid="016b1e19" officeooo:paragraph-rsid="016b1e19"/>
    </style:style>
    <style:style style:name="P708" style:family="paragraph" style:parent-style-name="Table_20_Contents">
      <style:paragraph-properties fo:text-align="justify" style:justify-single-word="false"/>
      <style:text-properties officeooo:rsid="016b1e19" officeooo:paragraph-rsid="016b1e19"/>
    </style:style>
    <style:style style:name="P709" style:family="paragraph" style:parent-style-name="Standard">
      <style:paragraph-properties fo:text-align="center" style:justify-single-word="false"/>
      <style:text-properties officeooo:paragraph-rsid="016a47dc"/>
    </style:style>
    <style:style style:name="P710" style:family="paragraph" style:parent-style-name="Standard">
      <style:paragraph-properties fo:text-align="justify" style:justify-single-word="false"/>
      <style:text-properties officeooo:rsid="015e0dc3" officeooo:paragraph-rsid="015e0dc3"/>
    </style:style>
    <style:style style:name="P711" style:family="paragraph" style:parent-style-name="Standard">
      <style:paragraph-properties fo:text-align="justify" style:justify-single-word="false"/>
      <style:text-properties officeooo:paragraph-rsid="016a47dc"/>
    </style:style>
    <style:style style:name="P712" style:family="paragraph" style:parent-style-name="Standard">
      <style:paragraph-properties fo:text-align="justify" style:justify-single-word="false"/>
      <style:text-properties officeooo:rsid="016e719c" officeooo:paragraph-rsid="016e719c"/>
    </style:style>
    <style:style style:name="P713" style:family="paragraph" style:parent-style-name="Table_20_Contents">
      <style:paragraph-properties fo:text-align="right" style:justify-single-word="false"/>
      <style:text-properties fo:color="#00a933" loext:opacity="100%" style:font-name="Courier" fo:font-size="10pt" fo:font-style="italic" officeooo:rsid="01704bb8" officeooo:paragraph-rsid="01704bb8" style:font-size-asian="10pt" style:font-style-asian="italic" style:font-size-complex="10pt" style:font-style-complex="italic"/>
    </style:style>
    <style:style style:name="P714" style:family="paragraph" style:parent-style-name="Table_20_Contents">
      <style:paragraph-properties fo:text-align="right" style:justify-single-word="false"/>
      <style:text-properties fo:color="#00a933" loext:opacity="100%" style:font-name="Courier" fo:font-size="10pt" fo:font-style="italic" officeooo:rsid="01756d51" officeooo:paragraph-rsid="01756d51" style:font-size-asian="10pt" style:font-style-asian="italic" style:font-size-complex="10pt" style:font-style-complex="italic"/>
    </style:style>
    <style:style style:name="P715" style:family="paragraph" style:parent-style-name="Standard">
      <style:paragraph-properties fo:text-align="justify" style:justify-single-word="false"/>
      <style:text-properties officeooo:rsid="0187a7cc" officeooo:paragraph-rsid="0187a7cc"/>
    </style:style>
    <style:style style:name="P716" style:family="paragraph" style:parent-style-name="Table_20_Contents">
      <style:paragraph-properties fo:text-align="right" style:justify-single-word="false"/>
      <style:text-properties fo:color="#00a933" loext:opacity="100%" style:font-name="Courier" fo:font-size="10pt" fo:font-style="italic" officeooo:rsid="01889011" officeooo:paragraph-rsid="01889011" style:font-size-asian="10pt" style:font-style-asian="italic" style:font-size-complex="10pt" style:font-style-complex="italic"/>
    </style:style>
    <style:style style:name="P717" style:family="paragraph" style:parent-style-name="Standard">
      <style:paragraph-properties fo:text-align="justify" style:justify-single-word="false"/>
      <style:text-properties officeooo:rsid="01756d51" officeooo:paragraph-rsid="0187a7cc"/>
    </style:style>
    <style:style style:name="P718" style:family="paragraph" style:parent-style-name="Standard">
      <style:paragraph-properties fo:text-align="justify" style:justify-single-word="false"/>
      <style:text-properties officeooo:rsid="01797bc5" officeooo:paragraph-rsid="01797bc5"/>
    </style:style>
    <style:style style:name="P719" style:family="paragraph" style:parent-style-name="Standard">
      <style:paragraph-properties fo:text-align="justify" style:justify-single-word="false"/>
      <style:text-properties officeooo:rsid="01756d51" officeooo:paragraph-rsid="01756d51"/>
    </style:style>
    <style:style style:name="P720" style:family="paragraph" style:parent-style-name="Standard">
      <style:paragraph-properties fo:text-align="justify" style:justify-single-word="false"/>
      <style:text-properties officeooo:rsid="0175de49" officeooo:paragraph-rsid="016a47dc"/>
    </style:style>
    <style:style style:name="P721" style:family="paragraph" style:parent-style-name="Standard">
      <style:paragraph-properties fo:text-align="center" style:justify-single-word="false"/>
      <style:text-properties officeooo:paragraph-rsid="01896f84"/>
    </style:style>
    <style:style style:name="P722" style:family="paragraph" style:parent-style-name="Standard">
      <style:paragraph-properties fo:text-align="justify" style:justify-single-word="false"/>
      <style:text-properties officeooo:paragraph-rsid="01797bc5"/>
    </style:style>
    <style:style style:name="P72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8fd676" fo:background-color="#ffffff" style:font-size-asian="11pt" style:font-size-complex="11pt"/>
    </style:style>
    <style:style style:name="P724" style:family="paragraph" style:parent-style-name="Standard">
      <style:paragraph-properties fo:margin-top="0in" fo:margin-bottom="0.1965in" style:contextual-spacing="false" style:line-height-at-least="0.198in"/>
      <style:text-properties style:font-name="Courier" fo:font-size="11pt" style:font-size-asian="11pt" style:font-size-complex="11pt"/>
    </style:style>
    <style:style style:name="P725" style:family="paragraph" style:parent-style-name="Standard">
      <style:paragraph-properties fo:margin-left="0in" fo:margin-right="0in" style:line-height-at-least="0.198in" fo:text-indent="0in" style:auto-text-indent="false"/>
      <style:text-properties officeooo:paragraph-rsid="018fd676"/>
    </style:style>
    <style:style style:name="P726"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18fd676" fo:background-color="#ffffff" style:font-size-asian="11pt" style:font-size-complex="11pt"/>
    </style:style>
    <style:style style:name="P727" style:family="paragraph" style:parent-style-name="Standard">
      <style:paragraph-properties fo:margin-left="0in" fo:margin-right="0in" style:line-height-at-least="0.198in" fo:text-indent="0in" style:auto-text-indent="false"/>
      <style:text-properties style:font-name="Courier" fo:font-size="11pt" officeooo:paragraph-rsid="018fd676" style:font-size-asian="11pt" style:font-size-complex="11pt"/>
    </style:style>
    <style:style style:name="P728" style:family="paragraph" style:parent-style-name="Standard">
      <style:text-properties officeooo:rsid="01921f0a"/>
    </style:style>
    <style:style style:name="P729" style:family="paragraph" style:parent-style-name="Standard">
      <style:paragraph-properties fo:text-align="justify" style:justify-single-word="false"/>
      <style:text-properties officeooo:rsid="0192643e" officeooo:paragraph-rsid="0192643e"/>
    </style:style>
    <style:style style:name="P730" style:family="paragraph" style:parent-style-name="Table_20_Contents">
      <style:paragraph-properties fo:text-align="left" style:justify-single-word="false"/>
      <style:text-properties officeooo:paragraph-rsid="0192cbd7"/>
    </style:style>
    <style:style style:name="P731" style:family="paragraph" style:parent-style-name="Table_20_Contents">
      <style:paragraph-properties fo:text-align="left" style:justify-single-word="false"/>
      <style:text-properties officeooo:paragraph-rsid="0193d207"/>
    </style:style>
    <style:style style:name="P732" style:family="paragraph" style:parent-style-name="Table_20_Contents">
      <style:paragraph-properties fo:text-align="left" style:justify-single-word="false"/>
      <style:text-properties fo:color="#808080" loext:opacity="100%" officeooo:paragraph-rsid="0193d207" fo:background-color="transparent"/>
    </style:style>
    <style:style style:name="P733" style:family="paragraph" style:parent-style-name="Standard">
      <style:paragraph-properties fo:text-align="justify" style:justify-single-word="false"/>
      <style:text-properties officeooo:paragraph-rsid="0192643e"/>
    </style:style>
    <style:style style:name="P734" style:family="paragraph" style:parent-style-name="Standard">
      <style:paragraph-properties fo:text-align="justify" style:justify-single-word="false"/>
      <style:text-properties fo:font-size="12pt" officeooo:rsid="0192643e" officeooo:paragraph-rsid="0192643e" style:font-size-asian="12pt" style:font-size-complex="12pt"/>
    </style:style>
    <style:style style:name="P735" style:family="paragraph" style:parent-style-name="Standard">
      <style:paragraph-properties fo:text-align="justify" style:justify-single-word="false"/>
      <style:text-properties fo:font-size="12pt" officeooo:rsid="0196f577" officeooo:paragraph-rsid="0196f577" style:font-size-asian="12pt" style:font-size-complex="12pt"/>
    </style:style>
    <style:style style:name="P736" style:family="paragraph" style:parent-style-name="Standard">
      <style:paragraph-properties fo:text-align="justify" style:justify-single-word="false"/>
      <style:text-properties officeooo:rsid="0196f577" officeooo:paragraph-rsid="0196f577"/>
    </style:style>
    <style:style style:name="P737" style:family="paragraph" style:parent-style-name="Standard">
      <style:paragraph-properties fo:text-align="center" style:justify-single-word="false"/>
      <style:text-properties officeooo:rsid="0198bb73" officeooo:paragraph-rsid="0198bb73"/>
    </style:style>
    <style:style style:name="P738" style:family="paragraph" style:parent-style-name="Table_20_Contents">
      <style:paragraph-properties fo:text-align="justify" style:justify-single-word="false"/>
      <style:text-properties officeooo:paragraph-rsid="0198bb73"/>
    </style:style>
    <style:style style:name="P739" style:family="paragraph" style:parent-style-name="Standard">
      <style:paragraph-properties fo:text-align="justify" style:justify-single-word="false"/>
      <style:text-properties officeooo:rsid="0198bb73" officeooo:paragraph-rsid="0198bb73"/>
    </style:style>
    <style:style style:name="P740" style:family="paragraph" style:parent-style-name="Table_20_Contents">
      <style:paragraph-properties fo:text-align="justify" style:justify-single-word="false"/>
      <style:text-properties officeooo:rsid="0198bb73" officeooo:paragraph-rsid="058c0a60"/>
    </style:style>
    <style:style style:name="P741" style:family="paragraph" style:parent-style-name="Standard">
      <style:paragraph-properties fo:text-align="justify" style:justify-single-word="false"/>
      <style:text-properties officeooo:paragraph-rsid="019aebcb"/>
    </style:style>
    <style:style style:name="P742" style:family="paragraph" style:parent-style-name="Standard">
      <style:paragraph-properties fo:text-align="justify" style:justify-single-word="false"/>
      <style:text-properties officeooo:rsid="019aebcb" officeooo:paragraph-rsid="019aebcb"/>
    </style:style>
    <style:style style:name="P743" style:family="paragraph" style:parent-style-name="Standard">
      <style:paragraph-properties fo:text-align="justify" style:justify-single-word="false"/>
      <style:text-properties officeooo:paragraph-rsid="01b4f984"/>
    </style:style>
    <style:style style:name="P744" style:family="paragraph" style:parent-style-name="Standard">
      <style:paragraph-properties fo:text-align="justify" style:justify-single-word="false"/>
      <style:text-properties officeooo:rsid="01b4f984" officeooo:paragraph-rsid="01b4f984"/>
    </style:style>
    <style:style style:name="P745" style:family="paragraph" style:parent-style-name="Standard">
      <style:paragraph-properties style:line-height-at-least="0.198in" fo:text-align="right" style:justify-single-word="false"/>
      <style:text-properties fo:color="#00a933" loext:opacity="100%" style:font-name="Courier" fo:font-size="10pt" fo:font-style="italic" officeooo:rsid="01b4f984" officeooo:paragraph-rsid="01b4f984" style:font-size-asian="10pt" style:font-style-asian="italic" style:font-size-complex="10pt" style:font-style-complex="italic"/>
    </style:style>
    <style:style style:name="P746" style:family="paragraph" style:parent-style-name="Standard">
      <style:paragraph-properties fo:text-align="justify" style:justify-single-word="false"/>
      <style:text-properties fo:color="#ff0000" loext:opacity="100%" fo:font-weight="bold" officeooo:rsid="01b91b76" officeooo:paragraph-rsid="01b4f984" style:font-weight-asian="bold" style:font-weight-complex="bold"/>
    </style:style>
    <style:style style:name="P747" style:family="paragraph" style:parent-style-name="Standard">
      <style:paragraph-properties fo:text-align="justify" style:justify-single-word="false"/>
      <style:text-properties officeooo:rsid="019d4d95" officeooo:paragraph-rsid="06061d1a"/>
    </style:style>
    <style:style style:name="P74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9f1f96" fo:background-color="#ffffff" style:font-size-asian="11pt" style:font-size-complex="11pt"/>
    </style:style>
    <style:style style:name="P749" style:family="paragraph" style:parent-style-name="Standard">
      <style:paragraph-properties fo:margin-left="0in" fo:margin-right="0in" style:line-height-at-least="0.198in" fo:text-indent="0in" style:auto-text-indent="false"/>
      <style:text-properties style:font-name="Courier" fo:font-size="11pt" officeooo:paragraph-rsid="019f1f96" style:font-size-asian="11pt" style:font-size-complex="11pt"/>
    </style:style>
    <style:style style:name="P750" style:family="paragraph" style:parent-style-name="Standard">
      <style:paragraph-properties fo:text-align="center" style:justify-single-word="false"/>
      <style:text-properties fo:font-weight="bold" officeooo:rsid="019f8482" officeooo:paragraph-rsid="019f8482" style:font-weight-asian="bold" style:font-weight-complex="bold"/>
    </style:style>
    <style:style style:name="P751" style:family="paragraph" style:parent-style-name="Standard">
      <style:paragraph-properties fo:text-align="justify" style:justify-single-word="false"/>
      <style:text-properties officeooo:rsid="019f8482" officeooo:paragraph-rsid="019f8482"/>
    </style:style>
    <style:style style:name="P752" style:family="paragraph" style:parent-style-name="Table_20_Contents">
      <style:paragraph-properties fo:text-align="left" style:justify-single-word="false"/>
      <style:text-properties officeooo:paragraph-rsid="019f8482"/>
    </style:style>
    <style:style style:name="P753" style:family="paragraph" style:parent-style-name="Standard">
      <style:paragraph-properties fo:text-align="justify" style:justify-single-word="false"/>
      <style:text-properties officeooo:rsid="01a03263" officeooo:paragraph-rsid="01a03263"/>
    </style:style>
    <style:style style:name="P754" style:family="paragraph" style:parent-style-name="Standard">
      <style:paragraph-properties fo:text-align="justify" style:justify-single-word="false"/>
      <style:text-properties officeooo:rsid="019f8482" officeooo:paragraph-rsid="01a03263"/>
    </style:style>
    <style:style style:name="P755" style:family="paragraph" style:parent-style-name="Table_20_Contents">
      <style:paragraph-properties fo:text-align="left" style:justify-single-word="false"/>
      <style:text-properties officeooo:paragraph-rsid="01a03263"/>
    </style:style>
    <style:style style:name="P756" style:family="paragraph" style:parent-style-name="Standard">
      <style:paragraph-properties fo:text-align="justify" style:justify-single-word="false"/>
      <style:text-properties officeooo:rsid="01a1bca2" officeooo:paragraph-rsid="01a1bca2"/>
    </style:style>
    <style:style style:name="P757" style:family="paragraph" style:parent-style-name="Standard">
      <style:paragraph-properties fo:text-align="justify" style:justify-single-word="false"/>
      <style:text-properties officeooo:rsid="019f8482" officeooo:paragraph-rsid="01a1bca2"/>
    </style:style>
    <style:style style:name="P758" style:family="paragraph" style:parent-style-name="Table_20_Contents">
      <style:paragraph-properties fo:text-align="left" style:justify-single-word="false"/>
      <style:text-properties officeooo:paragraph-rsid="01a1bca2"/>
    </style:style>
    <style:style style:name="P759" style:family="paragraph" style:parent-style-name="Standard">
      <style:paragraph-properties fo:text-align="justify" style:justify-single-word="false"/>
      <style:text-properties officeooo:paragraph-rsid="01a22808"/>
    </style:style>
    <style:style style:name="P760" style:family="paragraph" style:parent-style-name="Standard">
      <style:paragraph-properties fo:text-align="justify" style:justify-single-word="false"/>
      <style:text-properties officeooo:rsid="01a22808" officeooo:paragraph-rsid="01a22808"/>
    </style:style>
    <style:style style:name="P761" style:family="paragraph" style:parent-style-name="Standard">
      <style:paragraph-properties fo:text-align="justify" style:justify-single-word="false"/>
      <style:text-properties officeooo:rsid="01a5826a" officeooo:paragraph-rsid="01a5826a"/>
    </style:style>
    <style:style style:name="P762" style:family="paragraph" style:parent-style-name="Standard">
      <style:paragraph-properties fo:text-align="justify" style:justify-single-word="false"/>
      <style:text-properties fo:color="#000000" loext:opacity="100%" style:font-name="Courier" fo:font-size="10.5pt" fo:font-weight="normal" officeooo:rsid="01a5826a" officeooo:paragraph-rsid="01a5826a" fo:background-color="#ffffff"/>
    </style:style>
    <style:style style:name="P763" style:family="paragraph" style:parent-style-name="Standard">
      <style:paragraph-properties style:line-height-at-least="0.198in"/>
      <style:text-properties style:font-name="Courier" fo:font-size="10pt" style:font-size-asian="10pt" style:font-size-complex="10pt"/>
    </style:style>
    <style:style style:name="P764" style:family="paragraph" style:parent-style-name="Standard">
      <style:paragraph-properties fo:margin-left="0in" fo:margin-right="0in" style:line-height-at-least="0.198in" fo:text-indent="0in" style:auto-text-indent="false"/>
      <style:text-properties fo:font-size="10pt" style:font-size-asian="10pt" style:font-size-complex="10pt"/>
    </style:style>
    <style:style style:name="P765" style:family="paragraph" style:parent-style-name="Standard">
      <style:paragraph-properties fo:text-align="justify" style:justify-single-word="false"/>
      <style:text-properties style:font-name="Courier" officeooo:rsid="01a5826a" officeooo:paragraph-rsid="01a5826a"/>
    </style:style>
    <style:style style:name="P766" style:family="paragraph" style:parent-style-name="Standard">
      <style:paragraph-properties fo:text-align="justify" style:justify-single-word="false"/>
      <style:text-properties officeooo:rsid="01a5f79f" officeooo:paragraph-rsid="01a5f79f"/>
    </style:style>
    <style:style style:name="P767" style:family="paragraph" style:parent-style-name="Table_20_Contents">
      <style:paragraph-properties fo:text-align="left" style:justify-single-word="false"/>
      <style:text-properties officeooo:paragraph-rsid="01a5f79f"/>
    </style:style>
    <style:style style:name="P768" style:family="paragraph" style:parent-style-name="Table_20_Contents">
      <style:paragraph-properties fo:text-align="left" style:justify-single-word="false"/>
      <style:text-properties fo:font-weight="bold" officeooo:paragraph-rsid="01a5f79f" style:font-weight-asian="bold" style:font-weight-complex="bold"/>
    </style:style>
    <style:style style:name="P769" style:family="paragraph" style:parent-style-name="Standard">
      <style:paragraph-properties fo:text-align="justify" style:justify-single-word="false"/>
      <style:text-properties officeooo:paragraph-rsid="01a5f79f"/>
    </style:style>
    <style:style style:name="P77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a8e048" fo:background-color="#ffffff" style:font-size-asian="11pt" style:font-size-complex="11pt"/>
    </style:style>
    <style:style style:name="P771" style:family="paragraph" style:parent-style-name="Standard">
      <style:paragraph-properties fo:margin-left="0in" fo:margin-right="0in" style:line-height-at-least="0.198in" fo:text-indent="0in" style:auto-text-indent="false"/>
      <style:text-properties style:font-name="Courier" fo:font-size="11pt" officeooo:paragraph-rsid="01a8e048" style:font-size-asian="11pt" style:font-size-complex="11pt"/>
    </style:style>
    <style:style style:name="P772" style:family="paragraph" style:parent-style-name="Standard">
      <style:paragraph-properties fo:margin-left="0in" fo:margin-right="0in" style:line-height-at-least="0.198in" fo:text-indent="0in" style:auto-text-indent="false"/>
      <style:text-properties fo:color="#a31515" loext:opacity="100%" style:font-name="Courier" fo:font-size="11pt" fo:font-weight="normal" officeooo:paragraph-rsid="01a8e048" fo:background-color="#ffffff" style:font-size-asian="11pt" style:font-size-complex="11pt"/>
    </style:style>
    <style:style style:name="P773" style:family="paragraph" style:parent-style-name="Standard">
      <style:paragraph-properties fo:text-align="center" style:justify-single-word="false"/>
      <style:text-properties fo:font-weight="bold" officeooo:rsid="01a8e048" officeooo:paragraph-rsid="01a8e048" style:font-weight-asian="bold" style:font-weight-complex="bold"/>
    </style:style>
    <style:style style:name="P774" style:family="paragraph" style:parent-style-name="Standard">
      <style:paragraph-properties fo:text-align="justify" style:justify-single-word="false"/>
      <style:text-properties officeooo:rsid="01a99ad0" officeooo:paragraph-rsid="01a99ad0"/>
    </style:style>
    <style:style style:name="P775" style:family="paragraph" style:parent-style-name="Table_20_Contents">
      <style:paragraph-properties fo:text-align="left" style:justify-single-word="false"/>
      <style:text-properties officeooo:paragraph-rsid="01a99ad0"/>
    </style:style>
    <style:style style:name="P776" style:family="paragraph" style:parent-style-name="Table_20_Contents">
      <style:paragraph-properties fo:text-align="left" style:justify-single-word="false"/>
      <style:text-properties officeooo:paragraph-rsid="01a99ad0" fo:background-color="#ff0000"/>
    </style:style>
    <style:style style:name="P777" style:family="paragraph" style:parent-style-name="Table_20_Contents">
      <style:paragraph-properties fo:text-align="left" style:justify-single-word="false"/>
      <style:text-properties fo:font-weight="bold" officeooo:paragraph-rsid="01a99ad0" style:font-weight-asian="bold" style:font-weight-complex="bold"/>
    </style:style>
    <style:style style:name="P778" style:family="paragraph" style:parent-style-name="Standard">
      <style:paragraph-properties fo:margin-left="0in" fo:margin-right="0in" style:line-height-at-least="0.198in" fo:text-align="justify" style:justify-single-word="false" fo:text-indent="0in" style:auto-text-indent="false"/>
      <style:text-properties officeooo:rsid="01a99ad0" officeooo:paragraph-rsid="01a8e048"/>
    </style:style>
    <style:style style:name="P779" style:family="paragraph" style:parent-style-name="Standard">
      <style:paragraph-properties fo:margin-left="0in" fo:margin-right="0in" style:line-height-at-least="0.198in" fo:text-align="justify" style:justify-single-word="false" fo:text-indent="0in" style:auto-text-indent="false"/>
      <style:text-properties officeooo:paragraph-rsid="01a8e048"/>
    </style:style>
    <style:style style:name="P780" style:family="paragraph" style:parent-style-name="Standard">
      <style:paragraph-properties fo:text-align="center" style:justify-single-word="false"/>
      <style:text-properties officeooo:rsid="01ad44c8" officeooo:paragraph-rsid="01ad44c8"/>
    </style:style>
    <style:style style:name="P781" style:family="paragraph" style:parent-style-name="Standard">
      <style:paragraph-properties fo:text-align="justify" style:justify-single-word="false"/>
      <style:text-properties officeooo:paragraph-rsid="0609d4ee"/>
    </style:style>
    <style:style style:name="P782" style:family="paragraph" style:parent-style-name="Table_20_Contents">
      <style:paragraph-properties fo:text-align="right" style:justify-single-word="false"/>
      <style:text-properties fo:color="#00a933" loext:opacity="100%" style:font-name="Courier" fo:font-size="10pt" fo:font-style="italic" officeooo:rsid="01af33e7" officeooo:paragraph-rsid="01af33e7" style:font-size-asian="10pt" style:font-style-asian="italic" style:font-size-complex="10pt" style:font-style-complex="italic"/>
    </style:style>
    <style:style style:name="P78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b0178d" fo:background-color="#ffffff" style:font-size-asian="11pt" style:font-size-complex="11pt"/>
    </style:style>
    <style:style style:name="P784" style:family="paragraph" style:parent-style-name="Standard">
      <style:paragraph-properties fo:margin-left="0in" fo:margin-right="0in" style:line-height-at-least="0.198in" fo:text-indent="0in" style:auto-text-indent="false"/>
      <style:text-properties style:font-name="Courier" fo:font-size="11pt" officeooo:paragraph-rsid="01b0178d" style:font-size-asian="11pt" style:font-size-complex="11pt"/>
    </style:style>
    <style:style style:name="P785" style:family="paragraph" style:parent-style-name="Horizontal_20_Line">
      <style:text-properties style:font-name="Courier" fo:font-size="11pt" style:font-size-asian="11pt" style:font-size-complex="11pt"/>
    </style:style>
    <style:style style:name="P786" style:family="paragraph" style:parent-style-name="Standard">
      <style:paragraph-properties fo:text-align="center" style:justify-single-word="false"/>
      <style:text-properties fo:font-weight="bold" officeooo:rsid="01aff935" officeooo:paragraph-rsid="01aff935" style:font-weight-asian="bold" style:font-weight-complex="bold"/>
    </style:style>
    <style:style style:name="P787" style:family="paragraph" style:parent-style-name="Standard">
      <style:paragraph-properties fo:text-align="justify" style:justify-single-word="false"/>
      <style:text-properties officeooo:rsid="01b1e4e8" officeooo:paragraph-rsid="01b1e4e8"/>
    </style:style>
    <style:style style:name="P788" style:family="paragraph" style:parent-style-name="Standard">
      <style:paragraph-properties fo:text-align="justify" style:justify-single-word="false"/>
      <style:text-properties officeooo:rsid="0609d4ee" officeooo:paragraph-rsid="0609d4ee"/>
    </style:style>
    <style:style style:name="P789" style:family="paragraph" style:parent-style-name="Table_20_Contents">
      <style:paragraph-properties fo:text-align="left" style:justify-single-word="false"/>
      <style:text-properties officeooo:paragraph-rsid="01b1e4e8"/>
    </style:style>
    <style:style style:name="P790" style:family="paragraph" style:parent-style-name="Table_20_Contents">
      <style:paragraph-properties fo:text-align="left" style:justify-single-word="false"/>
      <style:text-properties officeooo:paragraph-rsid="01b1fc8a"/>
    </style:style>
    <style:style style:name="P791" style:family="paragraph" style:parent-style-name="Table_20_Contents">
      <style:paragraph-properties fo:text-align="left" style:justify-single-word="false"/>
      <style:text-properties officeooo:paragraph-rsid="01b2b81f"/>
    </style:style>
    <style:style style:name="P792" style:family="paragraph" style:parent-style-name="Standard">
      <style:paragraph-properties fo:text-align="center" style:justify-single-word="false"/>
      <style:text-properties officeooo:paragraph-rsid="01b2e0de"/>
    </style:style>
    <style:style style:name="P793" style:family="paragraph" style:parent-style-name="Standard">
      <style:paragraph-properties fo:text-align="center" style:justify-single-word="false" fo:break-before="page"/>
      <style:text-properties style:use-window-font-color="true" loext:opacity="0%" fo:font-size="18pt" fo:font-weight="bold" officeooo:rsid="004234ca" officeooo:paragraph-rsid="004234ca" style:font-size-asian="18pt" style:font-weight-asian="bold" style:font-size-complex="18pt" style:font-weight-complex="bold"/>
    </style:style>
    <style:style style:name="P794" style:family="paragraph" style:parent-style-name="Standard">
      <style:paragraph-properties fo:text-align="justify" style:justify-single-word="false"/>
      <style:text-properties officeooo:rsid="01d0be57" officeooo:paragraph-rsid="01d0be57"/>
    </style:style>
    <style:style style:name="P795" style:family="paragraph" style:parent-style-name="Standard">
      <style:paragraph-properties fo:text-align="justify" style:justify-single-word="false"/>
      <style:text-properties officeooo:rsid="01ce2bba" officeooo:paragraph-rsid="01ce2bba"/>
    </style:style>
    <style:style style:name="P796" style:family="paragraph" style:parent-style-name="Table_20_Contents">
      <style:text-properties officeooo:rsid="01cff43b" officeooo:paragraph-rsid="01cff43b"/>
    </style:style>
    <style:style style:name="P797" style:family="paragraph" style:parent-style-name="Table_20_Contents">
      <style:text-properties style:font-name="Courier" officeooo:rsid="01cff43b" officeooo:paragraph-rsid="01cff43b"/>
    </style:style>
    <style:style style:name="P798" style:family="paragraph" style:parent-style-name="Standard">
      <style:text-properties officeooo:rsid="01ce2bba" officeooo:paragraph-rsid="01ce2bba"/>
    </style:style>
    <style:style style:name="P799" style:family="paragraph" style:parent-style-name="Standard">
      <style:paragraph-properties fo:text-align="center" style:justify-single-word="false"/>
      <style:text-properties officeooo:rsid="01cff43b" officeooo:paragraph-rsid="01cff43b"/>
    </style:style>
    <style:style style:name="P800" style:family="paragraph" style:parent-style-name="Standard">
      <style:text-properties officeooo:rsid="01b84c79" officeooo:paragraph-rsid="01b84c79"/>
    </style:style>
    <style:style style:name="P801" style:family="paragraph" style:parent-style-name="Standard">
      <style:paragraph-properties fo:text-align="justify" style:justify-single-word="false"/>
      <style:text-properties officeooo:paragraph-rsid="01d0be57"/>
    </style:style>
    <style:style style:name="P802" style:family="paragraph" style:parent-style-name="Table_20_Contents">
      <style:text-properties style:font-name="Courier" fo:font-size="11pt" style:font-size-asian="11pt" style:font-size-complex="11pt"/>
    </style:style>
    <style:style style:name="P803" style:family="paragraph" style:parent-style-name="Standard">
      <style:text-properties officeooo:rsid="01d0be57" officeooo:paragraph-rsid="01d0be57"/>
    </style:style>
    <style:style style:name="P804" style:family="paragraph" style:parent-style-name="Standard">
      <style:paragraph-properties fo:text-align="center" style:justify-single-word="false"/>
      <style:text-properties fo:font-size="13pt" fo:font-weight="bold" officeooo:rsid="05c0b03c" officeooo:paragraph-rsid="05c0b03c" style:font-size-asian="13pt" style:font-weight-asian="bold" style:font-size-complex="13pt" style:font-weight-complex="bold"/>
    </style:style>
    <style:style style:name="P80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f84992" fo:background-color="#ffffff" style:font-size-asian="11pt" style:font-size-complex="11pt"/>
    </style:style>
    <style:style style:name="P806" style:family="paragraph" style:parent-style-name="Standard">
      <style:paragraph-properties fo:margin-left="0in" fo:margin-right="0in" style:line-height-at-least="0.198in" fo:text-indent="0in" style:auto-text-indent="false"/>
      <style:text-properties style:font-name="Courier" fo:font-size="11pt" officeooo:paragraph-rsid="01f84992" style:font-size-asian="11pt" style:font-size-complex="11pt"/>
    </style:style>
    <style:style style:name="P807" style:family="paragraph" style:parent-style-name="Standard">
      <style:paragraph-properties fo:margin-left="0in" fo:margin-right="0in" style:line-height-at-least="0.198in" fo:text-indent="0in" style:auto-text-indent="false"/>
      <style:text-properties officeooo:paragraph-rsid="01f84992"/>
    </style:style>
    <style:style style:name="P808" style:family="paragraph" style:parent-style-name="Standard">
      <style:paragraph-properties fo:text-align="center" style:justify-single-word="false"/>
      <style:text-properties fo:font-weight="bold" officeooo:rsid="01f84992" officeooo:paragraph-rsid="01f84992" style:font-weight-asian="bold" style:font-weight-complex="bold"/>
    </style:style>
    <style:style style:name="P809"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810" style:family="paragraph" style:parent-style-name="Standard">
      <style:paragraph-properties fo:text-align="justify" style:justify-single-word="false"/>
      <style:text-properties officeooo:paragraph-rsid="01fcf65d"/>
    </style:style>
    <style:style style:name="P811" style:family="paragraph" style:parent-style-name="Standard">
      <style:paragraph-properties fo:text-align="justify" style:justify-single-word="false"/>
      <style:text-properties fo:font-weight="normal" officeooo:rsid="01fcf65d" officeooo:paragraph-rsid="01fcf65d" style:font-weight-asian="normal" style:font-weight-complex="normal"/>
    </style:style>
    <style:style style:name="P812" style:family="paragraph" style:parent-style-name="Table_20_Contents">
      <style:paragraph-properties fo:text-align="left" style:justify-single-word="false"/>
      <style:text-properties officeooo:paragraph-rsid="01fcf65d"/>
    </style:style>
    <style:style style:name="P813" style:family="paragraph" style:parent-style-name="Table_20_Contents">
      <style:paragraph-properties fo:text-align="left" style:justify-single-word="false"/>
      <style:text-properties officeooo:paragraph-rsid="0200a8d0"/>
    </style:style>
    <style:style style:name="P814" style:family="paragraph" style:parent-style-name="Table_20_Contents">
      <style:paragraph-properties fo:text-align="left" style:justify-single-word="false"/>
      <style:text-properties officeooo:paragraph-rsid="0200aa45"/>
    </style:style>
    <style:style style:name="P815" style:family="paragraph" style:parent-style-name="Table_20_Contents">
      <style:paragraph-properties fo:text-align="left" style:justify-single-word="false"/>
      <style:text-properties officeooo:paragraph-rsid="02009d38"/>
    </style:style>
    <style:style style:name="P816" style:family="paragraph" style:parent-style-name="Table_20_Contents">
      <style:paragraph-properties fo:text-align="left" style:justify-single-word="false"/>
      <style:text-properties officeooo:rsid="02014fe9" officeooo:paragraph-rsid="02014fe9"/>
    </style:style>
    <style:style style:name="P817" style:family="paragraph" style:parent-style-name="Standard">
      <style:paragraph-properties fo:text-align="justify" style:justify-single-word="false"/>
      <style:text-properties fo:font-weight="normal" officeooo:rsid="0202e39d" officeooo:paragraph-rsid="0202e39d" style:font-weight-asian="normal" style:font-weight-complex="normal"/>
    </style:style>
    <style:style style:name="P818" style:family="paragraph" style:parent-style-name="Standard">
      <style:paragraph-properties fo:text-align="justify" style:justify-single-word="false"/>
      <style:text-properties fo:font-weight="normal" officeooo:rsid="01fcf65d" officeooo:paragraph-rsid="0202e39d" style:font-weight-asian="normal" style:font-weight-complex="normal"/>
    </style:style>
    <style:style style:name="P819" style:family="paragraph" style:parent-style-name="Table_20_Contents">
      <style:paragraph-properties fo:text-align="left" style:justify-single-word="false"/>
      <style:text-properties officeooo:paragraph-rsid="0202e39d"/>
    </style:style>
    <style:style style:name="P820" style:family="paragraph" style:parent-style-name="Table_20_Contents">
      <style:paragraph-properties fo:text-align="left" style:justify-single-word="false"/>
      <style:text-properties officeooo:rsid="02014fe9" officeooo:paragraph-rsid="0202e39d"/>
    </style:style>
    <style:style style:name="P821" style:family="paragraph" style:parent-style-name="Table_20_Contents">
      <style:paragraph-properties fo:text-align="left" style:justify-single-word="false"/>
      <style:text-properties officeooo:paragraph-rsid="0203eb31"/>
    </style:style>
    <style:style style:name="P822" style:family="paragraph" style:parent-style-name="Standard">
      <style:paragraph-properties fo:text-align="justify" style:justify-single-word="false"/>
      <style:text-properties fo:font-weight="normal" officeooo:rsid="060b7a35" officeooo:paragraph-rsid="01d0be57" style:font-weight-asian="normal" style:font-weight-complex="normal"/>
    </style:style>
    <style:style style:name="P823" style:family="paragraph" style:parent-style-name="Standard">
      <style:paragraph-properties fo:text-align="justify" style:justify-single-word="false"/>
      <style:text-properties fo:font-weight="normal" officeooo:rsid="020530b1" officeooo:paragraph-rsid="020530b1" style:font-weight-asian="normal" style:font-weight-complex="normal"/>
    </style:style>
    <style:style style:name="P824" style:family="paragraph" style:parent-style-name="Table_20_Contents">
      <style:paragraph-properties fo:text-align="left" style:justify-single-word="false"/>
      <style:text-properties officeooo:paragraph-rsid="02068fea"/>
    </style:style>
    <style:style style:name="P825" style:family="paragraph" style:parent-style-name="Table_20_Contents">
      <style:paragraph-properties fo:text-align="left" style:justify-single-word="false"/>
      <style:text-properties fo:font-weight="bold" officeooo:paragraph-rsid="02068fea" style:font-weight-asian="bold" style:font-weight-complex="bold"/>
    </style:style>
    <style:style style:name="P826" style:family="paragraph" style:parent-style-name="Table_20_Contents">
      <style:paragraph-properties fo:text-align="left" style:justify-single-word="false"/>
      <style:text-properties officeooo:paragraph-rsid="02071abb"/>
    </style:style>
    <style:style style:name="P827" style:family="paragraph" style:parent-style-name="Table_20_Contents">
      <style:paragraph-properties fo:text-align="left" style:justify-single-word="false"/>
      <style:text-properties fo:font-weight="bold" officeooo:paragraph-rsid="02071abb" style:font-weight-asian="bold" style:font-weight-complex="bold"/>
    </style:style>
    <style:style style:name="P828" style:family="paragraph" style:parent-style-name="Table_20_Contents">
      <style:paragraph-properties fo:text-align="left" style:justify-single-word="false"/>
      <style:text-properties officeooo:paragraph-rsid="02092ad3"/>
    </style:style>
    <style:style style:name="P829" style:family="paragraph" style:parent-style-name="Table_20_Contents">
      <style:paragraph-properties fo:text-align="left" style:justify-single-word="false"/>
      <style:text-properties officeooo:rsid="02092ad3" officeooo:paragraph-rsid="02092ad3"/>
    </style:style>
    <style:style style:name="P830" style:family="paragraph" style:parent-style-name="Table_20_Contents">
      <style:paragraph-properties fo:text-align="left" style:justify-single-word="false"/>
      <style:text-properties officeooo:paragraph-rsid="020acc06"/>
    </style:style>
    <style:style style:name="P831" style:family="paragraph" style:parent-style-name="Standard">
      <style:paragraph-properties fo:text-align="justify" style:justify-single-word="false"/>
      <style:text-properties fo:font-weight="normal" officeooo:rsid="020530b1" officeooo:paragraph-rsid="01d0be57" style:font-weight-asian="normal" style:font-weight-complex="normal"/>
    </style:style>
    <style:style style:name="P832" style:family="paragraph" style:parent-style-name="Standard">
      <style:paragraph-properties fo:text-align="justify" style:justify-single-word="false"/>
      <style:text-properties fo:font-weight="normal" officeooo:rsid="020c3a58" officeooo:paragraph-rsid="020acc06" style:font-weight-asian="normal" style:font-weight-complex="normal"/>
    </style:style>
    <style:style style:name="P833" style:family="paragraph" style:parent-style-name="Standard">
      <style:paragraph-properties fo:text-align="justify" style:justify-single-word="false"/>
      <style:text-properties fo:font-weight="normal" officeooo:rsid="0218344b" officeooo:paragraph-rsid="020acc06" style:font-weight-asian="normal" style:font-weight-complex="normal"/>
    </style:style>
    <style:style style:name="P834" style:family="paragraph" style:parent-style-name="Standard">
      <style:paragraph-properties fo:text-align="center" style:justify-single-word="false"/>
      <style:text-properties officeooo:paragraph-rsid="05c0b03c"/>
    </style:style>
    <style:style style:name="P83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d67391" fo:background-color="#ffffff" style:font-size-asian="11pt" style:font-size-complex="11pt"/>
    </style:style>
    <style:style style:name="P836" style:family="paragraph" style:parent-style-name="Standard">
      <style:paragraph-properties fo:margin-left="0in" fo:margin-right="0in" style:line-height-at-least="0.198in" fo:text-indent="0in" style:auto-text-indent="false"/>
      <style:text-properties style:font-name="Courier" fo:font-size="11pt" officeooo:paragraph-rsid="01d67391" style:font-size-asian="11pt" style:font-size-complex="11pt"/>
    </style:style>
    <style:style style:name="P837" style:family="paragraph" style:parent-style-name="Standard">
      <style:paragraph-properties fo:margin-left="0in" fo:margin-right="0in" style:line-height-at-least="0.198in" fo:text-indent="0in" style:auto-text-indent="false"/>
      <style:text-properties fo:color="#a31515" loext:opacity="100%" style:font-name="Courier" fo:font-size="11pt" fo:font-weight="normal" officeooo:paragraph-rsid="01d67391" fo:background-color="#ffffff" style:font-size-asian="11pt" style:font-size-complex="11pt"/>
    </style:style>
    <style:style style:name="P838" style:family="paragraph" style:parent-style-name="Standard">
      <style:paragraph-properties fo:margin-left="0in" fo:margin-right="0in" style:line-height-at-least="0.198in" fo:text-indent="0in" style:auto-text-indent="false"/>
      <style:text-properties style:font-name="Courier" fo:font-size="11pt" officeooo:paragraph-rsid="01d84ea7" style:font-size-asian="11pt" style:font-size-complex="11pt"/>
    </style:style>
    <style:style style:name="P83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d84ea7" fo:background-color="#ffffff" style:font-size-asian="11pt" style:font-size-complex="11pt"/>
    </style:style>
    <style:style style:name="P840" style:family="paragraph" style:parent-style-name="Standard">
      <style:paragraph-properties fo:text-align="center" style:justify-single-word="false"/>
      <style:text-properties fo:font-weight="bold" officeooo:rsid="01d67391" officeooo:paragraph-rsid="01d67391" style:font-weight-asian="bold" style:font-weight-complex="bold"/>
    </style:style>
    <style:style style:name="P841" style:family="paragraph" style:parent-style-name="Standard">
      <style:text-properties officeooo:rsid="01b84c79"/>
    </style:style>
    <style:style style:name="P842" style:family="paragraph" style:parent-style-name="Standard">
      <style:text-properties officeooo:rsid="01dfe85d" officeooo:paragraph-rsid="01dfe85d"/>
    </style:style>
    <style:style style:name="P843" style:family="paragraph" style:parent-style-name="Table_20_Contents">
      <style:paragraph-properties fo:text-align="left" style:justify-single-word="false"/>
      <style:text-properties officeooo:paragraph-rsid="01dd6031"/>
    </style:style>
    <style:style style:name="P844" style:family="paragraph" style:parent-style-name="Table_20_Contents">
      <style:paragraph-properties fo:text-align="left" style:justify-single-word="false"/>
      <style:text-properties fo:font-weight="bold" officeooo:paragraph-rsid="01dd6031" style:font-weight-asian="bold" style:font-weight-complex="bold"/>
    </style:style>
    <style:style style:name="P845" style:family="paragraph" style:parent-style-name="Standard">
      <style:paragraph-properties fo:text-align="justify" style:justify-single-word="false"/>
      <style:text-properties officeooo:paragraph-rsid="01dfe85d"/>
    </style:style>
    <style:style style:name="P846" style:family="paragraph" style:parent-style-name="Standard">
      <style:paragraph-properties fo:text-align="center" style:justify-single-word="false"/>
      <style:text-properties officeooo:paragraph-rsid="01f2fa8e"/>
    </style:style>
    <style:style style:name="P847" style:family="paragraph" style:parent-style-name="Standard">
      <style:paragraph-properties fo:text-align="center" style:justify-single-word="false"/>
      <style:text-properties officeooo:paragraph-rsid="004234ca"/>
    </style:style>
    <style:style style:name="P848" style:family="paragraph" style:parent-style-name="Standard">
      <style:paragraph-properties fo:text-align="justify" style:justify-single-word="false"/>
      <style:text-properties style:use-window-font-color="true" loext:opacity="0%" fo:font-size="12pt" fo:font-weight="normal" officeooo:rsid="021d89a4" officeooo:paragraph-rsid="021d89a4" style:font-size-asian="12pt" style:font-weight-asian="normal" style:font-size-complex="12pt" style:font-weight-complex="normal"/>
    </style:style>
    <style:style style:name="P849" style:family="paragraph" style:parent-style-name="Footnote">
      <style:text-properties officeooo:paragraph-rsid="05c33274"/>
    </style:style>
    <style:style style:name="P850" style:family="paragraph" style:parent-style-name="Standard">
      <style:paragraph-properties fo:margin-left="0in" fo:margin-right="0in" style:line-height-at-least="0.198in" fo:text-indent="0in" style:auto-text-indent="false"/>
      <style:text-properties fo:font-size="11pt" style:font-size-asian="11pt" style:font-size-complex="11pt"/>
    </style:style>
    <style:style style:name="P851" style:family="paragraph" style:parent-style-name="Standard">
      <style:paragraph-properties fo:margin-left="0in" fo:margin-right="0in" style:line-height-at-least="0.198in" fo:text-indent="0in" style:auto-text-indent="false"/>
      <style:text-properties fo:color="#008000" loext:opacity="100%" style:font-name="Courier" fo:font-size="11pt" fo:font-weight="normal" fo:background-color="#ffffff" style:font-size-asian="11pt" style:font-size-complex="11pt"/>
    </style:style>
    <style:style style:name="P852" style:family="paragraph" style:parent-style-name="Standard">
      <style:paragraph-properties fo:margin-left="0in" fo:margin-right="0in" style:line-height-at-least="0.198in" fo:text-indent="0in" style:auto-text-indent="false"/>
      <style:text-properties fo:font-size="11pt" officeooo:paragraph-rsid="022a9937" style:font-size-asian="11pt" style:font-size-complex="11pt"/>
    </style:style>
    <style:style style:name="P853" style:family="paragraph" style:parent-style-name="Standard">
      <style:paragraph-properties fo:margin-left="0in" fo:margin-right="0in" style:line-height-at-least="0.198in" fo:text-indent="0in" style:auto-text-indent="false"/>
      <style:text-properties fo:font-size="11pt" officeooo:paragraph-rsid="021ff551" style:font-size-asian="11pt" style:font-size-complex="11pt"/>
    </style:style>
    <style:style style:name="P854" style:family="paragraph" style:parent-style-name="Standard">
      <style:paragraph-properties fo:margin-left="0in" fo:margin-right="0in" style:line-height-at-least="0.198in" fo:text-indent="0in" style:auto-text-indent="false"/>
      <style:text-properties officeooo:paragraph-rsid="022a9937"/>
    </style:style>
    <style:style style:name="P855" style:family="paragraph" style:parent-style-name="Standard">
      <style:paragraph-properties style:line-height-at-least="0.198in"/>
      <style:text-properties fo:color="#000000" loext:opacity="100%" style:font-name="Courier" fo:font-size="10.5pt" fo:font-weight="normal" fo:background-color="#ffffff"/>
    </style:style>
    <style:style style:name="P856" style:family="paragraph" style:parent-style-name="Table_20_Contents">
      <style:paragraph-properties fo:text-align="right" style:justify-single-word="false"/>
      <style:text-properties fo:color="#00a933" loext:opacity="100%" style:font-name="Courier" fo:font-size="10pt" fo:font-style="italic" officeooo:rsid="022a9937" officeooo:paragraph-rsid="022a9937" style:font-size-asian="10pt" style:font-style-asian="italic" style:font-size-complex="10pt" style:font-style-complex="italic"/>
    </style:style>
    <style:style style:name="P857" style:family="paragraph" style:parent-style-name="Standard">
      <style:paragraph-properties fo:text-align="justify" style:justify-single-word="false"/>
      <style:text-properties officeooo:paragraph-rsid="004234ca"/>
    </style:style>
    <style:style style:name="P858" style:family="paragraph" style:parent-style-name="Standard">
      <style:paragraph-properties fo:text-align="justify" style:justify-single-word="false"/>
      <style:text-properties style:use-window-font-color="true" loext:opacity="0%" fo:font-size="12pt" fo:font-weight="normal" officeooo:rsid="021ff551" officeooo:paragraph-rsid="004234ca" style:font-size-asian="12pt" style:font-weight-asian="normal" style:font-size-complex="12pt" style:font-weight-complex="normal"/>
    </style:style>
    <style:style style:name="P859" style:family="paragraph" style:parent-style-name="Standard">
      <style:paragraph-properties fo:text-align="justify" style:justify-single-word="false"/>
      <style:text-properties style:use-window-font-color="true" loext:opacity="0%" fo:font-size="12pt" fo:font-weight="normal" officeooo:rsid="02277eb9" officeooo:paragraph-rsid="02277eb9" style:font-size-asian="12pt" style:font-weight-asian="normal" style:font-size-complex="12pt" style:font-weight-complex="normal"/>
    </style:style>
    <style:style style:name="P860" style:family="paragraph" style:parent-style-name="Standard">
      <style:paragraph-properties fo:text-align="justify" style:justify-single-word="false"/>
      <style:text-properties style:use-window-font-color="true" loext:opacity="0%" style:font-name="Courier" fo:font-size="12pt" fo:font-weight="normal" officeooo:rsid="004234ca" officeooo:paragraph-rsid="004234ca" style:font-size-asian="12pt" style:font-weight-asian="normal" style:font-size-complex="12pt" style:font-weight-complex="normal"/>
    </style:style>
    <style:style style:name="P861" style:family="paragraph" style:parent-style-name="Standard">
      <style:paragraph-properties fo:text-align="justify" style:justify-single-word="false"/>
      <style:text-properties style:use-window-font-color="true" loext:opacity="0%" fo:font-size="12pt" fo:font-weight="normal" officeooo:rsid="02347946" officeooo:paragraph-rsid="004234ca" style:font-size-asian="12pt" style:font-weight-asian="normal" style:font-size-complex="12pt" style:font-weight-complex="normal"/>
    </style:style>
    <style:style style:name="P86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37127f" fo:background-color="#ffffff" style:font-size-asian="11pt" style:font-size-complex="11pt"/>
    </style:style>
    <style:style style:name="P863" style:family="paragraph" style:parent-style-name="Standard">
      <style:paragraph-properties fo:margin-left="0in" fo:margin-right="0in" style:line-height-at-least="0.198in" fo:text-indent="0in" style:auto-text-indent="false"/>
      <style:text-properties officeooo:paragraph-rsid="0237127f"/>
    </style:style>
    <style:style style:name="P864" style:family="paragraph" style:parent-style-name="Standard">
      <style:paragraph-properties fo:margin-left="0in" fo:margin-right="0in" style:line-height-at-least="0.198in" fo:text-indent="0in" style:auto-text-indent="false"/>
      <style:text-properties style:font-name="Courier" fo:font-size="11pt" officeooo:paragraph-rsid="0237127f" style:font-size-asian="11pt" style:font-size-complex="11pt"/>
    </style:style>
    <style:style style:name="P865" style:family="paragraph" style:parent-style-name="Standard">
      <style:paragraph-properties fo:text-align="center" style:justify-single-word="false"/>
      <style:text-properties style:use-window-font-color="true" loext:opacity="0%" fo:font-size="12pt" fo:font-weight="bold" officeooo:rsid="0235b911" officeooo:paragraph-rsid="0235b911" style:font-size-asian="12pt" style:font-weight-asian="bold" style:font-size-complex="12pt" style:font-weight-complex="bold"/>
    </style:style>
    <style:style style:name="P866" style:family="paragraph" style:parent-style-name="Standard">
      <style:paragraph-properties fo:text-align="justify" style:justify-single-word="false"/>
      <style:text-properties style:use-window-font-color="true" loext:opacity="0%" fo:font-size="12pt" fo:font-weight="normal" officeooo:rsid="0237127f" officeooo:paragraph-rsid="0237127f" style:font-size-asian="12pt" style:font-weight-asian="normal" style:font-size-complex="12pt" style:font-weight-complex="normal"/>
    </style:style>
    <style:style style:name="P867" style:family="paragraph" style:parent-style-name="Table_20_Contents">
      <style:paragraph-properties fo:text-align="left" style:justify-single-word="false"/>
      <style:text-properties officeooo:paragraph-rsid="02382a2a"/>
    </style:style>
    <style:style style:name="P868" style:family="paragraph" style:parent-style-name="Standard">
      <style:paragraph-properties fo:text-align="justify" style:justify-single-word="false"/>
      <style:text-properties officeooo:paragraph-rsid="0237127f"/>
    </style:style>
    <style:style style:name="P869" style:family="paragraph" style:parent-style-name="Standard">
      <style:paragraph-properties fo:text-align="justify" style:justify-single-word="false"/>
      <style:text-properties style:use-window-font-color="true" loext:opacity="0%" fo:font-size="12pt" fo:font-weight="normal" officeooo:rsid="024358ba" officeooo:paragraph-rsid="02ce6f9e" style:font-size-asian="12pt" style:font-weight-asian="normal" style:font-size-complex="12pt" style:font-weight-complex="normal"/>
    </style:style>
    <style:style style:name="P870" style:family="paragraph" style:parent-style-name="Standard">
      <style:paragraph-properties fo:text-align="center" style:justify-single-word="false"/>
      <style:text-properties style:use-window-font-color="true" loext:opacity="0%" fo:font-size="13pt" fo:font-weight="bold" officeooo:rsid="02ce6f9e" officeooo:paragraph-rsid="02ce6f9e" style:font-size-asian="13pt" style:font-weight-asian="bold" style:font-size-complex="13pt" style:font-weight-complex="bold"/>
    </style:style>
    <style:style style:name="P871" style:family="paragraph" style:parent-style-name="Standard">
      <style:paragraph-properties fo:text-align="justify" style:justify-single-word="false"/>
      <style:text-properties officeooo:paragraph-rsid="0610c70a"/>
    </style:style>
    <style:style style:name="P872" style:family="paragraph" style:parent-style-name="Standard">
      <style:paragraph-properties fo:margin-left="0in" fo:margin-right="0in" style:line-height-at-least="0.198in" fo:text-indent="0in" style:auto-text-indent="false"/>
      <style:text-properties officeooo:paragraph-rsid="02451ca2"/>
    </style:style>
    <style:style style:name="P873" style:family="paragraph" style:parent-style-name="Standard">
      <style:paragraph-properties fo:margin-left="0in" fo:margin-right="0in" style:line-height-at-least="0.198in" fo:text-indent="0in" style:auto-text-indent="false"/>
      <style:text-properties officeooo:paragraph-rsid="0257a30c"/>
    </style:style>
    <style:style style:name="P874" style:family="paragraph" style:parent-style-name="Standard">
      <style:paragraph-properties fo:margin-left="0in" fo:margin-right="0in" style:line-height-at-least="0.198in" fo:text-indent="0in" style:auto-text-indent="false"/>
      <style:text-properties fo:color="#000000" loext:opacity="100%" style:font-name="Courier" fo:font-size="11pt" fo:font-style="italic" fo:font-weight="normal" officeooo:paragraph-rsid="0257a30c" fo:background-color="#ffffff" style:font-size-asian="11pt" style:font-style-asian="italic" style:font-size-complex="11pt" style:font-style-complex="italic"/>
    </style:style>
    <style:style style:name="P875" style:family="paragraph" style:parent-style-name="Standard">
      <style:paragraph-properties fo:margin-left="0in" fo:margin-right="0in" style:line-height-at-least="0.198in" fo:text-align="left" style:justify-single-word="false" fo:text-indent="0in" style:auto-text-indent="false"/>
      <style:text-properties fo:color="#00a933" loext:opacity="100%" style:font-name="Courier" fo:font-size="10pt" fo:font-style="italic" officeooo:paragraph-rsid="025a4186" style:font-size-asian="10pt" style:font-style-asian="italic" style:font-size-complex="10pt" style:font-style-complex="italic"/>
    </style:style>
    <style:style style:name="P876"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officeooo:paragraph-rsid="025a4186" style:font-size-asian="10pt" style:font-style-asian="italic" style:font-size-complex="10pt" style:font-style-complex="italic"/>
    </style:style>
    <style:style style:name="P877" style:family="paragraph" style:parent-style-name="Standard">
      <style:paragraph-properties fo:text-align="justify" style:justify-single-word="false"/>
      <style:text-properties style:use-window-font-color="true" loext:opacity="0%" fo:font-size="12pt" fo:font-weight="normal" officeooo:rsid="024358ba" officeooo:paragraph-rsid="024358ba" style:font-size-asian="12pt" style:font-weight-asian="normal" style:font-size-complex="12pt" style:font-weight-complex="normal"/>
    </style:style>
    <style:style style:name="P878" style:family="paragraph" style:parent-style-name="Standard">
      <style:paragraph-properties fo:text-align="justify" style:justify-single-word="false"/>
      <style:text-properties officeooo:paragraph-rsid="024358ba"/>
    </style:style>
    <style:style style:name="P879" style:family="paragraph" style:parent-style-name="Standard">
      <style:paragraph-properties fo:text-align="justify" style:justify-single-word="false"/>
      <style:text-properties style:use-window-font-color="true" loext:opacity="0%" fo:font-size="12pt" fo:font-weight="normal" officeooo:rsid="02522c01" officeooo:paragraph-rsid="02522c01" style:font-size-asian="12pt" style:font-weight-asian="normal" style:font-size-complex="12pt" style:font-weight-complex="normal"/>
    </style:style>
    <style:style style:name="P880" style:family="paragraph" style:parent-style-name="Standard">
      <style:paragraph-properties fo:text-align="justify" style:justify-single-word="false"/>
      <style:text-properties style:use-window-font-color="true" loext:opacity="0%" fo:font-size="12pt" fo:font-weight="normal" officeooo:rsid="004234ca" officeooo:paragraph-rsid="024358ba" style:font-size-asian="12pt" style:font-weight-asian="normal" style:font-size-complex="12pt" style:font-weight-complex="normal"/>
    </style:style>
    <style:style style:name="P881" style:family="paragraph" style:parent-style-name="Standard">
      <style:paragraph-properties fo:text-align="justify" style:justify-single-word="false"/>
      <style:text-properties style:use-window-font-color="true" loext:opacity="0%" fo:font-size="12pt" fo:font-weight="normal" officeooo:rsid="004234ca" officeooo:paragraph-rsid="004234ca" style:font-size-asian="12pt" style:font-weight-asian="normal" style:font-size-complex="12pt" style:font-weight-complex="normal"/>
    </style:style>
    <style:style style:name="P882" style:family="paragraph" style:parent-style-name="Standard">
      <style:paragraph-properties fo:text-align="justify" style:justify-single-word="false"/>
      <style:text-properties officeooo:paragraph-rsid="025c19d6"/>
    </style:style>
    <style:style style:name="P883" style:family="paragraph" style:parent-style-name="Footnote">
      <style:text-properties officeooo:paragraph-rsid="025d0175"/>
    </style:style>
    <style:style style:name="P884" style:family="paragraph" style:parent-style-name="Standard">
      <style:paragraph-properties fo:text-align="justify" style:justify-single-word="false"/>
      <style:text-properties style:use-window-font-color="true" loext:opacity="0%" fo:font-size="12pt" fo:font-weight="normal" officeooo:rsid="0257a30c" officeooo:paragraph-rsid="025c19d6" style:font-size-asian="12pt" style:font-weight-asian="normal" style:font-size-complex="12pt" style:font-weight-complex="normal"/>
    </style:style>
    <style:style style:name="P88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5e9da4" fo:background-color="#ffffff" style:font-size-asian="11pt" style:font-size-complex="11pt"/>
    </style:style>
    <style:style style:name="P886" style:family="paragraph" style:parent-style-name="Standard">
      <style:paragraph-properties fo:margin-left="0in" fo:margin-right="0in" style:line-height-at-least="0.198in" fo:text-indent="0in" style:auto-text-indent="false"/>
      <style:text-properties style:font-name="Courier" fo:font-size="11pt" officeooo:paragraph-rsid="025e9da4" style:font-size-asian="11pt" style:font-size-complex="11pt"/>
    </style:style>
    <style:style style:name="P887" style:family="paragraph" style:parent-style-name="Standard">
      <style:paragraph-properties fo:text-align="center" style:justify-single-word="false"/>
      <style:text-properties style:use-window-font-color="true" loext:opacity="0%" fo:font-size="12pt" fo:font-weight="bold" officeooo:rsid="0260e4fa" officeooo:paragraph-rsid="0260e4fa" style:font-size-asian="12pt" style:font-weight-asian="bold" style:font-size-complex="12pt" style:font-weight-complex="bold"/>
    </style:style>
    <style:style style:name="P888" style:family="paragraph" style:parent-style-name="Standard">
      <style:text-properties style:font-name="Liberation Serif" fo:font-style="italic" style:font-style-asian="italic" style:font-style-complex="italic"/>
    </style:style>
    <style:style style:name="P889" style:family="paragraph" style:parent-style-name="Standard">
      <style:paragraph-properties fo:text-align="justify" style:justify-single-word="false"/>
      <style:text-properties style:use-window-font-color="true" loext:opacity="0%" fo:font-size="12pt" fo:font-weight="normal" officeooo:rsid="02639801" officeooo:paragraph-rsid="02639801" style:font-size-asian="12pt" style:font-weight-asian="normal" style:font-size-complex="12pt" style:font-weight-complex="normal"/>
    </style:style>
    <style:style style:name="P890" style:family="paragraph" style:parent-style-name="Table_20_Contents">
      <style:paragraph-properties fo:text-align="left" style:justify-single-word="false"/>
      <style:text-properties officeooo:paragraph-rsid="02639801"/>
    </style:style>
    <style:style style:name="P891" style:family="paragraph" style:parent-style-name="Standard">
      <style:paragraph-properties fo:text-align="justify" style:justify-single-word="false"/>
      <style:text-properties style:use-window-font-color="true" loext:opacity="0%" fo:font-size="12pt" fo:font-weight="normal" officeooo:rsid="02641976" officeooo:paragraph-rsid="02641976" style:font-size-asian="12pt" style:font-weight-asian="normal" style:font-size-complex="12pt" style:font-weight-complex="normal"/>
    </style:style>
    <style:style style:name="P892" style:family="paragraph" style:parent-style-name="Standard">
      <style:paragraph-properties fo:text-align="justify" style:justify-single-word="false"/>
      <style:text-properties style:use-window-font-color="true" loext:opacity="0%" fo:font-size="12pt" fo:font-weight="normal" officeooo:rsid="02639801" officeooo:paragraph-rsid="02641976" style:font-size-asian="12pt" style:font-weight-asian="normal" style:font-size-complex="12pt" style:font-weight-complex="normal"/>
    </style:style>
    <style:style style:name="P893" style:family="paragraph" style:parent-style-name="Table_20_Contents">
      <style:paragraph-properties fo:text-align="left" style:justify-single-word="false"/>
      <style:text-properties officeooo:paragraph-rsid="02641976"/>
    </style:style>
    <style:style style:name="P894" style:family="paragraph" style:parent-style-name="Standard">
      <style:paragraph-properties fo:text-align="justify" style:justify-single-word="false"/>
      <style:text-properties officeooo:paragraph-rsid="026a14c7"/>
    </style:style>
    <style:style style:name="P895" style:family="paragraph" style:parent-style-name="Standard">
      <style:paragraph-properties fo:text-align="justify" style:justify-single-word="false"/>
      <style:text-properties style:use-window-font-color="true" loext:opacity="0%" fo:font-size="12pt" fo:font-weight="normal" officeooo:rsid="027c98fc" officeooo:paragraph-rsid="027ef75d" style:font-size-asian="12pt" style:font-weight-asian="normal" style:font-size-complex="12pt" style:font-weight-complex="normal"/>
    </style:style>
    <style:style style:name="P896" style:family="paragraph" style:parent-style-name="Standard">
      <style:paragraph-properties fo:text-align="justify" style:justify-single-word="false"/>
      <style:text-properties style:use-window-font-color="true" loext:opacity="0%" fo:font-size="12pt" fo:font-weight="normal" officeooo:rsid="026bf97e" officeooo:paragraph-rsid="026bf97e" style:font-size-asian="12pt" style:font-weight-asian="normal" style:font-size-complex="12pt" style:font-weight-complex="normal"/>
    </style:style>
    <style:style style:name="P897" style:family="paragraph" style:parent-style-name="Standard">
      <style:paragraph-properties fo:text-align="center" style:justify-single-word="false"/>
      <style:text-properties fo:font-weight="bold" officeooo:rsid="02784aa5" officeooo:paragraph-rsid="02784aa5" style:font-weight-asian="bold" style:font-weight-complex="bold"/>
    </style:style>
    <style:style style:name="P898" style:family="paragraph" style:parent-style-name="Standard">
      <style:paragraph-properties fo:text-align="center" style:justify-single-word="false"/>
      <style:text-properties fo:font-weight="bold" officeooo:rsid="02885e13" officeooo:paragraph-rsid="02885e13" style:font-weight-asian="bold" style:font-weight-complex="bold"/>
    </style:style>
    <style:style style:name="P899" style:family="paragraph" style:parent-style-name="Standard">
      <style:paragraph-properties fo:text-align="justify" style:justify-single-word="false"/>
      <style:text-properties officeooo:paragraph-rsid="027ef75d"/>
    </style:style>
    <style:style style:name="P900" style:family="paragraph" style:parent-style-name="Standard">
      <style:paragraph-properties fo:text-align="justify" style:justify-single-word="false"/>
      <style:text-properties officeooo:paragraph-rsid="02885e13"/>
    </style:style>
    <style:style style:name="P901" style:family="paragraph" style:parent-style-name="Table_20_Contents">
      <style:paragraph-properties fo:text-align="left" style:justify-single-word="false"/>
      <style:text-properties officeooo:rsid="026dde6a" officeooo:paragraph-rsid="026dde6a" style:font-size-asian="12pt"/>
    </style:style>
    <style:style style:name="P902" style:family="paragraph" style:parent-style-name="Table_20_Contents">
      <style:paragraph-properties fo:text-align="left" style:justify-single-word="false"/>
      <style:text-properties fo:font-size="12pt" officeooo:rsid="026de9ca" officeooo:paragraph-rsid="026de9ca" style:font-size-asian="12pt" style:font-size-complex="12pt"/>
    </style:style>
    <style:style style:name="P903" style:family="paragraph" style:parent-style-name="Standard">
      <style:paragraph-properties fo:text-align="justify" style:justify-single-word="false"/>
      <style:text-properties officeooo:rsid="02885e13" officeooo:paragraph-rsid="02885e13"/>
    </style:style>
    <style:style style:name="P904" style:family="paragraph" style:parent-style-name="Table_20_Contents">
      <style:paragraph-properties fo:text-align="left" style:justify-single-word="false"/>
      <style:text-properties fo:font-size="12pt" officeooo:rsid="02885e13" officeooo:paragraph-rsid="02885e13" style:font-size-asian="12pt" style:font-size-complex="12pt"/>
    </style:style>
    <style:style style:name="P905" style:family="paragraph" style:parent-style-name="Standard">
      <style:paragraph-properties fo:text-align="justify" style:justify-single-word="false"/>
      <style:text-properties style:use-window-font-color="true" loext:opacity="0%" fo:font-size="12pt" fo:font-weight="normal" officeooo:rsid="026bf97e" officeooo:paragraph-rsid="026dde6a" style:font-size-asian="12pt" style:font-weight-asian="normal" style:font-size-complex="12pt" style:font-weight-complex="normal"/>
    </style:style>
    <style:style style:name="P906" style:family="paragraph" style:parent-style-name="Standard">
      <style:paragraph-properties fo:text-align="center" style:justify-single-word="false"/>
      <style:text-properties style:use-window-font-color="true" loext:opacity="0%" fo:font-size="12pt" fo:font-weight="bold" officeooo:rsid="02796c36" officeooo:paragraph-rsid="050c6687" style:font-size-asian="12pt" style:font-weight-asian="bold" style:font-size-complex="12pt" style:font-weight-complex="bold"/>
    </style:style>
    <style:style style:name="P907" style:family="paragraph" style:parent-style-name="Standard">
      <style:paragraph-properties fo:text-align="justify" style:justify-single-word="false"/>
      <style:text-properties style:use-window-font-color="true" loext:opacity="0%" fo:font-size="12pt" fo:font-weight="normal" officeooo:rsid="0287a386" officeooo:paragraph-rsid="027ef75d" style:font-size-asian="12pt" style:font-weight-asian="normal" style:font-size-complex="12pt" style:font-weight-complex="normal"/>
    </style:style>
    <style:style style:name="P908" style:family="paragraph" style:parent-style-name="Standard">
      <style:paragraph-properties fo:text-align="justify" style:justify-single-word="false"/>
      <style:text-properties style:use-window-font-color="true" loext:opacity="0%" fo:font-size="12pt" fo:font-weight="normal" officeooo:rsid="026fef28" officeooo:paragraph-rsid="026fef28" style:font-size-asian="12pt" style:font-weight-asian="normal" style:font-size-complex="12pt" style:font-weight-complex="normal"/>
    </style:style>
    <style:style style:name="P909" style:family="paragraph" style:parent-style-name="Standard">
      <style:paragraph-properties fo:text-align="center" style:justify-single-word="false"/>
      <style:text-properties fo:font-weight="bold" officeooo:rsid="0287a386" officeooo:paragraph-rsid="0287a386" style:font-weight-asian="bold" style:font-weight-complex="bold"/>
    </style:style>
    <style:style style:name="P910" style:family="paragraph" style:parent-style-name="Table_20_Contents">
      <style:paragraph-properties fo:text-align="center" style:justify-single-word="false"/>
      <style:text-properties fo:font-size="12pt" fo:font-weight="bold" officeooo:rsid="0287a386" officeooo:paragraph-rsid="0287a386" style:font-size-asian="12pt" style:font-weight-asian="bold" style:font-size-complex="12pt" style:font-weight-complex="bold"/>
    </style:style>
    <style:style style:name="P911" style:family="paragraph" style:parent-style-name="Standard">
      <style:paragraph-properties fo:text-align="justify" style:justify-single-word="false"/>
      <style:text-properties officeooo:paragraph-rsid="026dde6a"/>
    </style:style>
    <style:style style:name="P912" style:family="paragraph" style:parent-style-name="Standard">
      <style:paragraph-properties fo:text-align="center" style:justify-single-word="false"/>
      <style:text-properties officeooo:paragraph-rsid="026dde6a"/>
    </style:style>
    <style:style style:name="P913" style:family="paragraph" style:parent-style-name="Standard">
      <style:paragraph-properties fo:text-align="center" style:justify-single-word="false"/>
      <style:text-properties officeooo:paragraph-rsid="028a0249"/>
    </style:style>
    <style:style style:name="P914" style:family="paragraph" style:parent-style-name="Table_20_Contents">
      <style:paragraph-properties fo:text-align="center" style:justify-single-word="false"/>
      <style:text-properties fo:font-size="12pt" officeooo:rsid="028a0249" officeooo:paragraph-rsid="028a0249" style:font-size-asian="12pt" style:font-size-complex="12pt"/>
    </style:style>
    <style:style style:name="P915" style:family="paragraph" style:parent-style-name="Standard">
      <style:paragraph-properties fo:text-align="center" style:justify-single-word="false"/>
      <style:text-properties style:use-window-font-color="true" loext:opacity="0%" fo:font-size="12pt" fo:font-weight="bold" officeooo:rsid="02796c36" officeooo:paragraph-rsid="02796c36" style:font-size-asian="12pt" style:font-weight-asian="bold" style:font-size-complex="12pt" style:font-weight-complex="bold"/>
    </style:style>
    <style:style style:name="P916" style:family="paragraph" style:parent-style-name="Standard">
      <style:paragraph-properties fo:text-align="justify" style:justify-single-word="false"/>
      <style:text-properties officeooo:paragraph-rsid="028774ae"/>
    </style:style>
    <style:style style:name="P917" style:family="paragraph" style:parent-style-name="Standard">
      <style:paragraph-properties fo:text-align="justify" style:justify-single-word="false"/>
      <style:text-properties style:use-window-font-color="true" loext:opacity="0%" fo:font-size="12pt" fo:font-weight="normal" officeooo:rsid="028f7d91" officeooo:paragraph-rsid="028774ae" style:font-size-asian="12pt" style:font-weight-asian="normal" style:font-size-complex="12pt" style:font-weight-complex="normal"/>
    </style:style>
    <style:style style:name="P918" style:family="paragraph" style:parent-style-name="Table_20_Contents">
      <style:paragraph-properties fo:text-align="left" style:justify-single-word="false"/>
      <style:text-properties officeooo:paragraph-rsid="0290ba99"/>
    </style:style>
    <style:style style:name="P919" style:family="paragraph" style:parent-style-name="Standard">
      <style:paragraph-properties fo:text-align="justify" style:justify-single-word="false"/>
      <style:text-properties officeooo:paragraph-rsid="0290ba99"/>
    </style:style>
    <style:style style:name="P920" style:family="paragraph" style:parent-style-name="Standard">
      <style:paragraph-properties fo:text-align="justify" style:justify-single-word="false"/>
      <style:text-properties officeooo:paragraph-rsid="0611f0d3"/>
    </style:style>
    <style:style style:name="P921" style:family="paragraph" style:parent-style-name="Table_20_Contents">
      <style:paragraph-properties fo:text-align="left" style:justify-single-word="false"/>
      <style:text-properties officeooo:paragraph-rsid="0292d643"/>
    </style:style>
    <style:style style:name="P922" style:family="paragraph" style:parent-style-name="Standard">
      <style:paragraph-properties fo:text-align="justify" style:justify-single-word="false"/>
      <style:text-properties officeooo:paragraph-rsid="0292d643"/>
    </style:style>
    <style:style style:name="P92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960507" fo:background-color="#ffffff" style:font-size-asian="11pt" style:font-size-complex="11pt"/>
    </style:style>
    <style:style style:name="P924" style:family="paragraph" style:parent-style-name="Standard">
      <style:paragraph-properties fo:margin-left="0in" fo:margin-right="0in" style:line-height-at-least="0.198in" fo:text-indent="0in" style:auto-text-indent="false"/>
      <style:text-properties style:font-name="Courier" fo:font-size="11pt" officeooo:paragraph-rsid="02960507" style:font-size-asian="11pt" style:font-size-complex="11pt"/>
    </style:style>
    <style:style style:name="P925" style:family="paragraph" style:parent-style-name="Standard">
      <style:paragraph-properties fo:text-align="center" style:justify-single-word="false"/>
      <style:text-properties style:use-window-font-color="true" loext:opacity="0%" fo:font-size="12pt" fo:font-weight="normal" officeooo:rsid="02960507" officeooo:paragraph-rsid="02960507" style:font-size-asian="12pt" style:font-weight-asian="normal" style:font-size-complex="12pt" style:font-weight-complex="normal"/>
    </style:style>
    <style:style style:name="P926" style:family="paragraph" style:parent-style-name="Standard">
      <style:text-properties officeooo:paragraph-rsid="0611f0d3"/>
    </style:style>
    <style:style style:name="P927" style:family="paragraph" style:parent-style-name="Standard">
      <style:paragraph-properties fo:text-align="justify" style:justify-single-word="false"/>
      <style:text-properties style:use-window-font-color="true" loext:opacity="0%" fo:font-size="12pt" fo:font-weight="normal" officeooo:rsid="0611f0d3" officeooo:paragraph-rsid="029cad96" style:font-size-asian="12pt" style:font-weight-asian="normal" style:font-size-complex="12pt" style:font-weight-complex="normal"/>
    </style:style>
    <style:style style:name="P928" style:family="paragraph" style:parent-style-name="Standard">
      <style:paragraph-properties fo:text-align="justify" style:justify-single-word="false"/>
      <style:text-properties style:use-window-font-color="true" loext:opacity="0%" fo:font-size="12pt" fo:font-weight="normal" officeooo:rsid="029cad96" officeooo:paragraph-rsid="029cad96" style:font-size-asian="12pt" style:font-weight-asian="normal" style:font-size-complex="12pt" style:font-weight-complex="normal"/>
    </style:style>
    <style:style style:name="P929" style:family="paragraph" style:parent-style-name="Table_20_Contents">
      <style:paragraph-properties fo:text-align="left" style:justify-single-word="false"/>
      <style:text-properties officeooo:paragraph-rsid="029cad96"/>
    </style:style>
    <style:style style:name="P930" style:family="paragraph" style:parent-style-name="Standard">
      <style:paragraph-properties fo:text-align="justify" style:justify-single-word="false"/>
      <style:text-properties officeooo:paragraph-rsid="029cad96"/>
    </style:style>
    <style:style style:name="P931" style:family="paragraph" style:parent-style-name="Standard">
      <style:paragraph-properties fo:text-align="justify" style:justify-single-word="false"/>
      <style:text-properties style:use-window-font-color="true" loext:opacity="0%" fo:font-size="12pt" fo:font-weight="normal" officeooo:rsid="029e428b" officeooo:paragraph-rsid="029e428b" style:font-size-asian="12pt" style:font-weight-asian="normal" style:font-size-complex="12pt" style:font-weight-complex="normal"/>
    </style:style>
    <style:style style:name="P932" style:family="paragraph" style:parent-style-name="Standard">
      <style:paragraph-properties fo:text-align="center" style:justify-single-word="false"/>
      <style:text-properties style:use-window-font-color="true" loext:opacity="0%" fo:font-size="13pt" fo:font-weight="bold" officeooo:rsid="05c5146f" officeooo:paragraph-rsid="05c5146f" style:font-size-asian="13pt" style:font-weight-asian="bold" style:font-size-complex="13pt" style:font-weight-complex="bold"/>
    </style:style>
    <style:style style:name="P933" style:family="paragraph" style:parent-style-name="Standard">
      <style:paragraph-properties fo:text-align="justify" style:justify-single-word="false"/>
      <style:text-properties officeooo:paragraph-rsid="029e428b"/>
    </style:style>
    <style:style style:name="P934" style:family="paragraph" style:parent-style-name="Footnote">
      <style:text-properties officeooo:paragraph-rsid="05c5146f"/>
    </style:style>
    <style:style style:name="P935" style:family="paragraph" style:parent-style-name="Standard">
      <style:paragraph-properties style:line-height-at-least="0.198in" fo:text-align="left" style:justify-single-word="false"/>
      <style:text-properties style:font-name="Courier" fo:font-size="11pt" style:font-size-asian="11pt" style:font-size-complex="11pt"/>
    </style:style>
    <style:style style:name="P936" style:family="paragraph" style:parent-style-name="Standard">
      <style:paragraph-properties fo:margin-left="0in" fo:margin-right="0in" style:line-height-at-least="0.198in" fo:text-align="left" style:justify-single-word="false" fo:text-indent="0in" style:auto-text-indent="false"/>
      <style:text-properties fo:color="#000000" loext:opacity="100%" style:font-name="Courier" fo:font-size="11pt" fo:font-weight="normal" officeooo:paragraph-rsid="029fc584" fo:background-color="#ffffff" style:font-size-asian="11pt" style:font-size-complex="11pt"/>
    </style:style>
    <style:style style:name="P937" style:family="paragraph" style:parent-style-name="Standard">
      <style:paragraph-properties fo:margin-left="0in" fo:margin-right="0in" style:line-height-at-least="0.198in" fo:text-align="left" style:justify-single-word="false" fo:text-indent="0in" style:auto-text-indent="false"/>
      <style:text-properties fo:color="#000000" loext:opacity="100%" style:font-name="Courier" fo:font-size="11pt" fo:font-weight="normal" officeooo:paragraph-rsid="02a094bc" fo:background-color="#ffffff" style:font-size-asian="11pt" style:font-size-complex="11pt"/>
    </style:style>
    <style:style style:name="P938" style:family="paragraph" style:parent-style-name="Standard">
      <style:paragraph-properties fo:margin-left="0in" fo:margin-right="0in" style:line-height-at-least="0.198in" fo:text-align="left" style:justify-single-word="false" fo:text-indent="0in" style:auto-text-indent="false"/>
      <style:text-properties style:font-name="Courier" fo:font-size="11pt" officeooo:paragraph-rsid="02a094bc" style:font-size-asian="11pt" style:font-size-complex="11pt"/>
    </style:style>
    <style:style style:name="P939"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29fc584" officeooo:paragraph-rsid="029fc584" fo:background-color="#ffffff" style:font-size-asian="10pt" style:font-style-asian="italic" style:font-size-complex="10pt" style:font-style-complex="italic"/>
    </style:style>
    <style:style style:name="P940" style:family="paragraph" style:parent-style-name="Standard">
      <style:paragraph-properties fo:text-align="justify" style:justify-single-word="false"/>
      <style:text-properties style:use-window-font-color="true" loext:opacity="0%" fo:font-size="12pt" fo:font-weight="normal" officeooo:rsid="02a68573" officeooo:paragraph-rsid="029e428b" style:font-size-asian="12pt" style:font-weight-asian="normal" style:font-size-complex="12pt" style:font-weight-complex="normal"/>
    </style:style>
    <style:style style:name="P941" style:family="paragraph" style:parent-style-name="Standard">
      <style:paragraph-properties fo:text-align="justify" style:justify-single-word="false"/>
      <style:text-properties style:use-window-font-color="true" loext:opacity="0%" fo:font-size="12pt" fo:font-weight="normal" officeooo:rsid="026bf97e" officeooo:paragraph-rsid="029e428b" style:font-size-asian="12pt" style:font-weight-asian="normal" style:font-size-complex="12pt" style:font-weight-complex="normal"/>
    </style:style>
    <style:style style:name="P94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ab67ae" fo:background-color="#ffffff" style:font-size-asian="11pt" style:font-size-complex="11pt"/>
    </style:style>
    <style:style style:name="P943" style:family="paragraph" style:parent-style-name="Standard">
      <style:paragraph-properties fo:margin-left="0in" fo:margin-right="0in" style:line-height-at-least="0.198in" fo:text-indent="0in" style:auto-text-indent="false"/>
      <style:text-properties style:font-name="Courier" fo:font-size="11pt" officeooo:paragraph-rsid="02ab67ae" style:font-size-asian="11pt" style:font-size-complex="11pt"/>
    </style:style>
    <style:style style:name="P944" style:family="paragraph" style:parent-style-name="Standard">
      <style:paragraph-properties fo:margin-left="0in" fo:margin-right="0in" style:line-height-at-least="0.198in" fo:text-indent="0in" style:auto-text-indent="false"/>
      <style:text-properties officeooo:paragraph-rsid="02ab67ae"/>
    </style:style>
    <style:style style:name="P945" style:family="paragraph" style:parent-style-name="Standard">
      <style:paragraph-properties fo:text-align="center" style:justify-single-word="false"/>
      <style:text-properties style:use-window-font-color="true" loext:opacity="0%" fo:font-size="12pt" fo:font-weight="bold" officeooo:rsid="02ab67ae" officeooo:paragraph-rsid="02ab67ae" style:font-size-asian="12pt" style:font-weight-asian="bold" style:font-size-complex="12pt" style:font-weight-complex="bold"/>
    </style:style>
    <style:style style:name="P946" style:family="paragraph" style:parent-style-name="Standard">
      <style:paragraph-properties fo:text-align="justify" style:justify-single-word="false"/>
      <style:text-properties style:use-window-font-color="true" loext:opacity="0%" fo:font-size="12pt" fo:font-weight="normal" officeooo:rsid="02ad7aee" officeooo:paragraph-rsid="02ad7aee" style:font-size-asian="12pt" style:font-weight-asian="normal" style:font-size-complex="12pt" style:font-weight-complex="normal"/>
    </style:style>
    <style:style style:name="P947" style:family="paragraph" style:parent-style-name="Standard">
      <style:paragraph-properties fo:text-align="justify" style:justify-single-word="false"/>
      <style:text-properties style:use-window-font-color="true" loext:opacity="0%" fo:font-size="12pt" fo:font-weight="normal" officeooo:rsid="02af02ca" officeooo:paragraph-rsid="02af02ca" style:font-size-asian="12pt" style:font-weight-asian="normal" style:font-size-complex="12pt" style:font-weight-complex="normal"/>
    </style:style>
    <style:style style:name="P948" style:family="paragraph" style:parent-style-name="Table_20_Contents">
      <style:paragraph-properties fo:text-align="left" style:justify-single-word="false"/>
      <style:text-properties officeooo:paragraph-rsid="02afda80"/>
    </style:style>
    <style:style style:name="P949" style:family="paragraph" style:parent-style-name="Standard">
      <style:paragraph-properties fo:text-align="justify" style:justify-single-word="false"/>
      <style:text-properties officeooo:paragraph-rsid="02b20e7b"/>
    </style:style>
    <style:style style:name="P95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b35c54" fo:background-color="#ffffff" style:font-size-asian="11pt" style:font-size-complex="11pt"/>
    </style:style>
    <style:style style:name="P951" style:family="paragraph" style:parent-style-name="Standard">
      <style:paragraph-properties fo:margin-left="0in" fo:margin-right="0in" style:line-height-at-least="0.198in" fo:text-indent="0in" style:auto-text-indent="false"/>
      <style:text-properties style:font-name="Courier" fo:font-size="11pt" officeooo:paragraph-rsid="02b35c54" style:font-size-asian="11pt" style:font-size-complex="11pt"/>
    </style:style>
    <style:style style:name="P952" style:family="paragraph" style:parent-style-name="Standard">
      <style:paragraph-properties fo:margin-left="0in" fo:margin-right="0in" style:line-height-at-least="0.198in" fo:text-indent="0in" style:auto-text-indent="false"/>
      <style:text-properties style:font-name="Courier" fo:font-size="11pt" fo:font-weight="normal" officeooo:paragraph-rsid="02b35c54" style:font-size-asian="11pt" style:font-weight-asian="normal" style:font-size-complex="11pt" style:font-weight-complex="normal"/>
    </style:style>
    <style:style style:name="P95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b35c54" fo:background-color="#ffffff" style:font-size-asian="11pt" style:font-weight-asian="normal" style:font-size-complex="11pt" style:font-weight-complex="normal"/>
    </style:style>
    <style:style style:name="P95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b42860" fo:background-color="#ffffff" style:font-size-asian="11pt" style:font-weight-asian="normal" style:font-size-complex="11pt" style:font-weight-complex="normal"/>
    </style:style>
    <style:style style:name="P955" style:family="paragraph" style:parent-style-name="Standard">
      <style:paragraph-properties fo:text-align="center" style:justify-single-word="false"/>
      <style:text-properties style:use-window-font-color="true" loext:opacity="0%" fo:font-size="12pt" fo:font-weight="bold" officeooo:rsid="02b35c54" officeooo:paragraph-rsid="02b35c54" style:font-size-asian="12pt" style:font-weight-asian="bold" style:font-size-complex="12pt" style:font-weight-complex="bold"/>
    </style:style>
    <style:style style:name="P956" style:family="paragraph" style:parent-style-name="Standard">
      <style:paragraph-properties fo:text-align="justify" style:justify-single-word="false"/>
      <style:text-properties officeooo:paragraph-rsid="02b53a3f"/>
    </style:style>
    <style:style style:name="P957" style:family="paragraph" style:parent-style-name="Standard">
      <style:paragraph-properties fo:text-align="justify" style:justify-single-word="false"/>
      <style:text-properties style:use-window-font-color="true" loext:opacity="0%" fo:font-size="12pt" fo:font-weight="normal" officeooo:rsid="02b53a3f" officeooo:paragraph-rsid="02b53a3f" style:font-size-asian="12pt" style:font-weight-asian="normal" style:font-size-complex="12pt" style:font-weight-complex="normal"/>
    </style:style>
    <style:style style:name="P958" style:family="paragraph" style:parent-style-name="Table_20_Contents">
      <style:paragraph-properties fo:text-align="left" style:justify-single-word="false"/>
      <style:text-properties officeooo:paragraph-rsid="02b6a5ac"/>
    </style:style>
    <style:style style:name="P959" style:family="paragraph" style:parent-style-name="Standard">
      <style:paragraph-properties fo:text-align="justify" style:justify-single-word="false"/>
      <style:text-properties style:use-window-font-color="true" loext:opacity="0%" fo:font-size="12pt" fo:font-weight="normal" officeooo:rsid="0613b84a" officeooo:paragraph-rsid="02b53a3f" style:font-size-asian="12pt" style:font-weight-asian="normal" style:font-size-complex="12pt" style:font-weight-complex="normal"/>
    </style:style>
    <style:style style:name="P960" style:family="paragraph" style:parent-style-name="Standard" style:list-style-name="L12">
      <style:paragraph-properties fo:text-align="justify" style:justify-single-word="false"/>
      <style:text-properties officeooo:paragraph-rsid="06141440"/>
    </style:style>
    <style:style style:name="P961" style:family="paragraph" style:parent-style-name="Standard" style:list-style-name="L12">
      <style:paragraph-properties fo:text-align="justify" style:justify-single-word="false"/>
      <style:text-properties style:use-window-font-color="true" loext:opacity="0%" fo:font-size="12pt" fo:font-weight="normal" officeooo:rsid="0613b84a" officeooo:paragraph-rsid="06141440" style:font-size-asian="12pt" style:font-weight-asian="normal" style:font-size-complex="12pt" style:font-weight-complex="normal"/>
    </style:style>
    <style:style style:name="P962" style:family="paragraph" style:parent-style-name="Standard" style:list-style-name="L13">
      <style:paragraph-properties fo:text-align="justify" style:justify-single-word="false"/>
      <style:text-properties style:use-window-font-color="true" loext:opacity="0%" fo:font-size="12pt" fo:font-weight="normal" officeooo:rsid="0613b84a" officeooo:paragraph-rsid="02b53a3f" style:font-size-asian="12pt" style:font-weight-asian="normal" style:font-size-complex="12pt" style:font-weight-complex="normal"/>
    </style:style>
    <style:style style:name="P963" style:family="paragraph" style:parent-style-name="Standard">
      <style:paragraph-properties fo:text-align="justify" style:justify-single-word="false"/>
      <style:text-properties officeooo:paragraph-rsid="02baf09e"/>
    </style:style>
    <style:style style:name="P964" style:family="paragraph" style:parent-style-name="Standard">
      <style:paragraph-properties fo:text-align="center" style:justify-single-word="false"/>
      <style:text-properties officeooo:paragraph-rsid="02bfb96c"/>
    </style:style>
    <style:style style:name="P965" style:family="paragraph" style:parent-style-name="Standard">
      <style:paragraph-properties fo:text-align="justify" style:justify-single-word="false"/>
      <style:text-properties officeooo:paragraph-rsid="0615836b"/>
    </style:style>
    <style:style style:name="P966" style:family="paragraph" style:parent-style-name="Footnote">
      <style:text-properties officeooo:rsid="02bc6aac" officeooo:paragraph-rsid="02bc6aac"/>
    </style:style>
    <style:style style:name="P967" style:family="paragraph" style:parent-style-name="Standard">
      <style:paragraph-properties fo:text-align="justify" style:justify-single-word="false"/>
      <style:text-properties style:use-window-font-color="true" loext:opacity="0%" fo:font-size="12pt" fo:font-weight="normal" officeooo:rsid="02baf09e" officeooo:paragraph-rsid="02baf09e" style:font-size-asian="12pt" style:font-weight-asian="normal" style:font-size-complex="12pt" style:font-weight-complex="normal"/>
    </style:style>
    <style:style style:name="P968" style:family="paragraph" style:parent-style-name="Standard">
      <style:paragraph-properties fo:margin-left="0in" fo:margin-right="0in" style:line-height-at-least="0.198in" fo:text-indent="0in" style:auto-text-indent="false"/>
      <style:text-properties style:font-name="Courier" fo:font-size="11pt" officeooo:paragraph-rsid="02bcf73c" style:font-size-asian="11pt" style:font-size-complex="11pt"/>
    </style:style>
    <style:style style:name="P96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bcf73c" fo:background-color="#ffffff" style:font-size-asian="11pt" style:font-size-complex="11pt"/>
    </style:style>
    <style:style style:name="P970"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2be5c9b" officeooo:paragraph-rsid="02be5c9b" fo:background-color="#ffffff" style:font-size-asian="10pt" style:font-style-asian="italic" style:font-size-complex="10pt" style:font-style-complex="italic"/>
    </style:style>
    <style:style style:name="P971" style:family="paragraph" style:parent-style-name="Standard">
      <style:paragraph-properties fo:text-align="justify" style:justify-single-word="false"/>
      <style:text-properties style:use-window-font-color="true" loext:opacity="0%" fo:font-size="12pt" fo:font-weight="normal" officeooo:rsid="02bb1f82" officeooo:paragraph-rsid="02bb1f82" style:font-size-asian="12pt" style:font-weight-asian="normal" style:font-size-complex="12pt" style:font-weight-complex="normal"/>
    </style:style>
    <style:style style:name="P972" style:family="paragraph" style:parent-style-name="Table_20_Contents">
      <style:paragraph-properties fo:text-align="justify" style:justify-single-word="false"/>
      <style:text-properties fo:font-size="12pt" officeooo:paragraph-rsid="02bb1f82" style:font-size-asian="12pt" style:font-size-complex="12pt"/>
    </style:style>
    <style:style style:name="P973" style:family="paragraph" style:parent-style-name="Table_20_Contents">
      <style:paragraph-properties fo:text-align="justify" style:justify-single-word="false"/>
      <style:text-properties fo:color="#808080" loext:opacity="100%" fo:font-size="12pt" fo:font-weight="normal" officeooo:paragraph-rsid="02bb1f82" style:font-size-asian="12pt" style:font-weight-asian="normal" style:font-size-complex="12pt" style:font-weight-complex="normal"/>
    </style:style>
    <style:style style:name="P974" style:family="paragraph" style:parent-style-name="Standard">
      <style:paragraph-properties fo:text-align="justify" style:justify-single-word="false"/>
      <style:text-properties style:use-window-font-color="true" loext:opacity="0%" fo:font-size="12pt" fo:font-weight="normal" officeooo:rsid="02c4acb4" officeooo:paragraph-rsid="02c4acb4" style:font-size-asian="12pt" style:font-weight-asian="normal" style:font-size-complex="12pt" style:font-weight-complex="normal"/>
    </style:style>
    <style:style style:name="P975" style:family="paragraph" style:parent-style-name="Table_20_Contents">
      <style:paragraph-properties fo:text-align="justify" style:justify-single-word="false"/>
      <style:text-properties style:font-name="Courier" fo:font-size="12pt" style:font-size-asian="12pt" style:font-size-complex="12pt"/>
    </style:style>
    <style:style style:name="P976" style:family="paragraph" style:parent-style-name="Table_20_Contents">
      <style:paragraph-properties fo:text-align="justify" style:justify-single-word="false"/>
      <style:text-properties fo:font-size="12pt" officeooo:rsid="02c4acb4" officeooo:paragraph-rsid="02c4acb4" style:font-size-asian="12pt" style:font-size-complex="12pt"/>
    </style:style>
    <style:style style:name="P977" style:family="paragraph" style:parent-style-name="Standard">
      <style:paragraph-properties fo:text-align="justify" style:justify-single-word="false"/>
      <style:text-properties style:use-window-font-color="true" loext:opacity="0%" fo:font-size="12pt" fo:font-weight="normal" officeooo:rsid="02c61f6c" officeooo:paragraph-rsid="02c61f6c" style:font-size-asian="12pt" style:font-weight-asian="normal" style:font-size-complex="12pt" style:font-weight-complex="normal"/>
    </style:style>
    <style:style style:name="P978" style:family="paragraph" style:parent-style-name="Table_20_Contents">
      <style:paragraph-properties fo:text-align="center" style:justify-single-word="false"/>
    </style:style>
    <style:style style:name="P979" style:family="paragraph" style:parent-style-name="Standard">
      <style:paragraph-properties fo:text-align="justify" style:justify-single-word="false"/>
      <style:text-properties style:use-window-font-color="true" loext:opacity="0%" fo:font-size="12pt" fo:font-weight="normal" officeooo:rsid="02c8b0ec" officeooo:paragraph-rsid="02c8b0ec" style:font-size-asian="12pt" style:font-weight-asian="normal" style:font-size-complex="12pt" style:font-weight-complex="normal"/>
    </style:style>
    <style:style style:name="P980" style:family="paragraph" style:parent-style-name="Standard">
      <style:paragraph-properties fo:text-align="justify" style:justify-single-word="false"/>
      <style:text-properties fo:color="#000000" loext:opacity="100%" style:font-name="Courier" fo:font-size="11pt" fo:font-weight="normal" officeooo:rsid="02c8b0ec" officeooo:paragraph-rsid="02c8b0ec" style:font-size-asian="11pt" style:font-weight-asian="normal" style:font-size-complex="11pt" style:font-weight-complex="normal"/>
    </style:style>
    <style:style style:name="P981" style:family="paragraph" style:parent-style-name="Standard">
      <style:paragraph-properties fo:text-align="justify" style:justify-single-word="false"/>
      <style:text-properties style:use-window-font-color="true" loext:opacity="0%" style:font-name="Courier" fo:font-size="11pt" fo:font-weight="normal" officeooo:rsid="02c8b0ec" officeooo:paragraph-rsid="02c8b0ec" style:font-size-asian="11pt" style:font-weight-asian="normal" style:font-size-complex="11pt" style:font-weight-complex="normal"/>
    </style:style>
    <style:style style:name="P982" style:family="paragraph" style:parent-style-name="Standard">
      <style:paragraph-properties fo:text-align="justify" style:justify-single-word="false"/>
      <style:text-properties fo:color="#008000" loext:opacity="100%" style:font-name="Courier" fo:font-size="11pt" fo:font-weight="normal" officeooo:rsid="02c8b0ec" officeooo:paragraph-rsid="02c8b0ec" fo:background-color="#ffffff" style:font-size-asian="11pt" style:font-weight-asian="normal" style:font-size-complex="11pt" style:font-weight-complex="normal"/>
    </style:style>
    <style:style style:name="P983" style:family="paragraph" style:parent-style-name="Table_20_Contents">
      <style:paragraph-properties fo:text-align="justify" style:justify-single-word="false"/>
      <style:text-properties fo:font-size="12pt" officeooo:paragraph-rsid="02c91c66" style:font-size-asian="12pt" style:font-size-complex="12pt"/>
    </style:style>
    <style:style style:name="P984" style:family="paragraph" style:parent-style-name="Standard">
      <style:paragraph-properties fo:text-align="justify" style:justify-single-word="false"/>
      <style:text-properties style:use-window-font-color="true" loext:opacity="0%" fo:font-size="12pt" fo:font-weight="normal" officeooo:rsid="02c8b0ec" officeooo:paragraph-rsid="0615836b" style:font-size-asian="12pt" style:font-weight-asian="normal" style:font-size-complex="12pt" style:font-weight-complex="normal"/>
    </style:style>
    <style:style style:name="P985" style:family="paragraph" style:parent-style-name="Standard">
      <style:paragraph-properties fo:text-align="justify" style:justify-single-word="false"/>
      <style:text-properties style:use-window-font-color="true" loext:opacity="0%" fo:font-size="12pt" fo:font-weight="normal" officeooo:rsid="02cb85ce" officeooo:paragraph-rsid="02cb85ce" style:font-size-asian="12pt" style:font-weight-asian="normal" style:font-size-complex="12pt" style:font-weight-complex="normal"/>
    </style:style>
    <style:style style:name="P986" style:family="paragraph" style:parent-style-name="Standard">
      <style:paragraph-properties fo:text-align="center" style:justify-single-word="false"/>
      <style:text-properties style:use-window-font-color="true" loext:opacity="0%" fo:font-size="18pt" fo:font-weight="bold" officeooo:rsid="004234ca" officeooo:paragraph-rsid="02d3bd36" style:font-size-asian="18pt" style:font-weight-asian="bold" style:font-size-complex="18pt" style:font-weight-complex="bold"/>
    </style:style>
    <style:style style:name="P987" style:family="paragraph" style:parent-style-name="Standard">
      <style:paragraph-properties fo:text-align="justify" style:justify-single-word="false"/>
      <style:text-properties style:use-window-font-color="true" loext:opacity="0%" fo:font-size="12pt" fo:font-weight="normal" officeooo:rsid="02df987a" officeooo:paragraph-rsid="02df987a" style:font-size-asian="12pt" style:font-weight-asian="normal" style:font-size-complex="12pt" style:font-weight-complex="normal"/>
    </style:style>
    <style:style style:name="P988" style:family="paragraph" style:parent-style-name="Table_20_Contents">
      <style:paragraph-properties fo:text-align="justify" style:justify-single-word="false"/>
      <style:text-properties fo:font-size="12pt" officeooo:rsid="02df987a" officeooo:paragraph-rsid="02df987a" style:font-size-asian="12pt" style:font-size-complex="12pt"/>
    </style:style>
    <style:style style:name="P989" style:family="paragraph" style:parent-style-name="Table_20_Contents">
      <style:paragraph-properties fo:text-align="justify" style:justify-single-word="false"/>
      <style:text-properties style:font-name="Courier" fo:font-size="12pt" officeooo:paragraph-rsid="02e04e87" style:font-size-asian="12pt" style:font-size-complex="12pt"/>
    </style:style>
    <style:style style:name="P990" style:family="paragraph" style:parent-style-name="Table_20_Contents">
      <style:paragraph-properties fo:text-align="justify" style:justify-single-word="false"/>
      <style:text-properties fo:font-size="12pt" officeooo:rsid="02e04e87" officeooo:paragraph-rsid="02e04e87" style:font-size-asian="12pt" style:font-size-complex="12pt"/>
    </style:style>
    <style:style style:name="P991" style:family="paragraph" style:parent-style-name="Table_20_Contents">
      <style:paragraph-properties fo:text-align="center" style:justify-single-word="false"/>
      <style:text-properties officeooo:rsid="050c6687" officeooo:paragraph-rsid="050c6687"/>
    </style:style>
    <style:style style:name="P992" style:family="paragraph" style:parent-style-name="Table_20_Contents">
      <style:paragraph-properties fo:text-align="justify" style:justify-single-word="false"/>
      <style:text-properties officeooo:paragraph-rsid="0618a981"/>
    </style:style>
    <style:style style:name="P993" style:family="paragraph" style:parent-style-name="Footnote">
      <style:text-properties officeooo:paragraph-rsid="05c896c6"/>
    </style:style>
    <style:style style:name="P994" style:family="paragraph" style:parent-style-name="Table_20_Contents">
      <style:paragraph-properties fo:text-align="justify" style:justify-single-word="false"/>
      <style:text-properties style:use-window-font-color="true" loext:opacity="0%" fo:font-size="12pt" fo:font-weight="normal" officeooo:rsid="02e21b4e" style:font-size-asian="12pt" style:font-weight-asian="normal" style:font-size-complex="12pt" style:font-weight-complex="normal"/>
    </style:style>
    <style:style style:name="P99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e21b4e" fo:background-color="#ffffff" style:font-size-asian="11pt" style:font-size-complex="11pt"/>
    </style:style>
    <style:style style:name="P996" style:family="paragraph" style:parent-style-name="Standard">
      <style:paragraph-properties fo:margin-left="0in" fo:margin-right="0in" style:line-height-at-least="0.198in" fo:text-indent="0in" style:auto-text-indent="false"/>
      <style:text-properties fo:color="#008000" loext:opacity="100%" style:font-name="Courier" fo:font-size="11pt" fo:font-weight="normal" officeooo:paragraph-rsid="02e21b4e" fo:background-color="#ffffff" style:font-size-asian="11pt" style:font-size-complex="11pt"/>
    </style:style>
    <style:style style:name="P997" style:family="paragraph" style:parent-style-name="Standard">
      <style:paragraph-properties fo:margin-left="0in" fo:margin-right="0in" style:line-height-at-least="0.198in" fo:text-indent="0in" style:auto-text-indent="false"/>
      <style:text-properties officeooo:paragraph-rsid="02e21b4e"/>
    </style:style>
    <style:style style:name="P998" style:family="paragraph" style:parent-style-name="Table_20_Contents">
      <style:paragraph-properties fo:text-align="justify" style:justify-single-word="false"/>
      <style:text-properties style:use-window-font-color="true" loext:opacity="0%" fo:font-size="12pt" fo:font-weight="normal" officeooo:rsid="02e4a7f1" officeooo:paragraph-rsid="02e4a7f1" style:font-size-asian="12pt" style:font-weight-asian="normal" style:font-size-complex="12pt" style:font-weight-complex="normal"/>
    </style:style>
    <style:style style:name="P999" style:family="paragraph" style:parent-style-name="Table_20_Heading">
      <style:text-properties officeooo:rsid="02e4a7f1" officeooo:paragraph-rsid="02e4a7f1"/>
    </style:style>
    <style:style style:name="P1000" style:family="paragraph" style:parent-style-name="Table_20_Contents">
      <style:paragraph-properties fo:text-align="justify" style:justify-single-word="false"/>
      <style:text-properties officeooo:paragraph-rsid="05ca6118"/>
    </style:style>
    <style:style style:name="P1001" style:family="paragraph" style:parent-style-name="Standard">
      <style:paragraph-properties fo:text-align="justify" style:justify-single-word="false"/>
      <style:text-properties style:use-window-font-color="true" loext:opacity="0%" fo:font-size="12pt" fo:font-weight="normal" officeooo:rsid="02e5b8c6" officeooo:paragraph-rsid="02e5b8c6" style:font-size-asian="12pt" style:font-weight-asian="normal" style:font-size-complex="12pt" style:font-weight-complex="normal"/>
    </style:style>
    <style:style style:name="P1002" style:family="paragraph" style:parent-style-name="Table_20_Contents">
      <style:paragraph-properties fo:text-align="center" style:justify-single-word="false"/>
      <style:text-properties officeooo:paragraph-rsid="05ca6118"/>
    </style:style>
    <style:style style:name="P1003" style:family="paragraph" style:parent-style-name="Standard">
      <style:text-properties style:font-name="Liberation Serif"/>
    </style:style>
    <style:style style:name="P1004" style:family="paragraph" style:parent-style-name="Footnote">
      <style:text-properties officeooo:paragraph-rsid="05ca6118"/>
    </style:style>
    <style:style style:name="P1005" style:family="paragraph" style:parent-style-name="Standard">
      <style:paragraph-properties fo:text-align="justify" style:justify-single-word="false"/>
      <style:text-properties style:use-window-font-color="true" loext:opacity="0%" fo:font-size="12pt" fo:font-weight="normal" officeooo:rsid="02e64bd8" officeooo:paragraph-rsid="02e64bd8" style:font-size-asian="12pt" style:font-weight-asian="normal" style:font-size-complex="12pt" style:font-weight-complex="normal"/>
    </style:style>
    <style:style style:name="P1006"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2e6bf85" officeooo:paragraph-rsid="02ece2f4" fo:background-color="#ffffff" style:font-size-asian="10pt" style:font-style-asian="italic" style:font-size-complex="10pt" style:font-style-complex="italic"/>
    </style:style>
    <style:style style:name="P1007" style:family="paragraph" style:parent-style-name="Table_20_Contents">
      <style:paragraph-properties fo:text-align="justify" style:justify-single-word="false"/>
      <style:text-properties officeooo:paragraph-rsid="02ec659c"/>
    </style:style>
    <style:style style:name="P100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f093a5" fo:background-color="#ffffff" style:font-size-asian="11pt" style:font-size-complex="11pt"/>
    </style:style>
    <style:style style:name="P1009" style:family="paragraph" style:parent-style-name="Standard">
      <style:paragraph-properties fo:margin-left="0in" fo:margin-right="0in" style:line-height-at-least="0.198in" fo:text-indent="0in" style:auto-text-indent="false"/>
      <style:text-properties style:font-name="Courier" fo:font-size="11pt" officeooo:paragraph-rsid="02f093a5" style:font-size-asian="11pt" style:font-size-complex="11pt"/>
    </style:style>
    <style:style style:name="P1010" style:family="paragraph" style:parent-style-name="Standard">
      <style:paragraph-properties fo:text-align="center" style:justify-single-word="false"/>
      <style:text-properties style:use-window-font-color="true" loext:opacity="0%" fo:font-size="12pt" fo:font-weight="bold" officeooo:rsid="02f093a5" officeooo:paragraph-rsid="02f093a5" style:font-size-asian="12pt" style:font-weight-asian="bold" style:font-size-complex="12pt" style:font-weight-complex="bold"/>
    </style:style>
    <style:style style:name="P1011" style:family="paragraph" style:parent-style-name="Standard">
      <style:paragraph-properties fo:text-align="justify" style:justify-single-word="false"/>
      <style:text-properties style:use-window-font-color="true" loext:opacity="0%" fo:font-size="12pt" fo:font-weight="normal" officeooo:rsid="02f3045e" officeooo:paragraph-rsid="02f3045e" style:font-size-asian="10.5pt" style:font-weight-asian="normal" style:font-size-complex="12pt" style:font-weight-complex="normal"/>
    </style:style>
    <style:style style:name="P1012" style:family="paragraph" style:parent-style-name="Table_20_Contents">
      <style:paragraph-properties fo:text-align="justify" style:justify-single-word="false"/>
      <style:text-properties fo:font-size="12pt" officeooo:paragraph-rsid="02f3045e" style:font-size-asian="12pt" style:font-size-complex="12pt"/>
    </style:style>
    <style:style style:name="P1013" style:family="paragraph" style:parent-style-name="Standard" style:list-style-name="L14">
      <style:text-properties officeooo:paragraph-rsid="06198769"/>
    </style:style>
    <style:style style:name="P1014" style:family="paragraph" style:parent-style-name="Standard">
      <style:text-properties style:use-window-font-color="true" loext:opacity="0%" style:font-name="Liberation Serif" fo:font-size="12pt" fo:font-weight="normal" officeooo:rsid="02f3045e" style:font-size-asian="10.5pt" style:font-weight-asian="normal" style:font-size-complex="12pt" style:font-weight-complex="normal"/>
    </style:style>
    <style:style style:name="P101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f5430c" fo:background-color="#ffffff" style:font-size-asian="11pt" style:font-size-complex="11pt"/>
    </style:style>
    <style:style style:name="P101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fc7d75" fo:background-color="#ffffff" style:font-size-asian="11pt" style:font-size-complex="11pt"/>
    </style:style>
    <style:style style:name="P101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f5430c" fo:background-color="#ffffff"/>
    </style:style>
    <style:style style:name="P101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fe4b38" fo:background-color="#ffffff" style:font-size-asian="11pt" style:font-size-complex="11pt"/>
    </style:style>
    <style:style style:name="P1019" style:family="paragraph" style:parent-style-name="Standard">
      <style:paragraph-properties fo:margin-left="0in" fo:margin-right="0in" style:line-height-at-least="0.198in" fo:text-indent="0in" style:auto-text-indent="false"/>
      <style:text-properties style:font-name="Courier" fo:font-size="11pt" officeooo:paragraph-rsid="02f5430c" style:font-size-asian="11pt" style:font-size-complex="11pt"/>
    </style:style>
    <style:style style:name="P1020" style:family="paragraph" style:parent-style-name="Standard">
      <style:paragraph-properties fo:text-align="center" style:justify-single-word="false"/>
      <style:text-properties style:use-window-font-color="true" loext:opacity="0%" fo:font-size="12pt" fo:font-weight="bold" officeooo:rsid="02f5430c" officeooo:paragraph-rsid="02f5430c" style:font-size-asian="10.5pt" style:font-weight-asian="bold" style:font-size-complex="12pt" style:font-weight-complex="bold"/>
    </style:style>
    <style:style style:name="P1021" style:family="paragraph" style:parent-style-name="Standard">
      <style:paragraph-properties fo:text-align="justify" style:justify-single-word="false"/>
      <style:text-properties style:use-window-font-color="true" loext:opacity="0%" fo:font-size="12pt" fo:font-weight="normal" officeooo:rsid="0303d6d8" officeooo:paragraph-rsid="0303d6d8" style:font-size-asian="10.5pt" style:font-weight-asian="normal" style:font-size-complex="12pt" style:font-weight-complex="normal"/>
    </style:style>
    <style:style style:name="P1022" style:family="paragraph" style:parent-style-name="Standard">
      <style:paragraph-properties fo:text-align="justify" style:justify-single-word="false"/>
      <style:text-properties officeooo:paragraph-rsid="0303d6d8"/>
    </style:style>
    <style:style style:name="P1023" style:family="paragraph" style:parent-style-name="Standard">
      <style:paragraph-properties fo:text-align="justify" style:justify-single-word="false"/>
      <style:text-properties style:use-window-font-color="true" loext:opacity="0%" fo:font-size="12pt" fo:font-weight="normal" officeooo:rsid="0302e7e4" officeooo:paragraph-rsid="0303d6d8" style:font-size-asian="10.5pt" style:font-weight-asian="normal" style:font-size-complex="12pt" style:font-weight-complex="normal"/>
    </style:style>
    <style:style style:name="P1024" style:family="paragraph" style:parent-style-name="Table_20_Contents">
      <style:paragraph-properties fo:text-align="justify" style:justify-single-word="false"/>
      <style:text-properties officeooo:paragraph-rsid="0303d6d8"/>
    </style:style>
    <style:style style:name="P1025" style:family="paragraph" style:parent-style-name="Table_20_Contents">
      <style:paragraph-properties fo:text-align="justify" style:justify-single-word="false"/>
      <style:text-properties fo:font-size="12pt" officeooo:paragraph-rsid="0303d6d8" style:font-size-asian="12pt" style:font-size-complex="12pt"/>
    </style:style>
    <style:style style:name="P1026" style:family="paragraph" style:parent-style-name="Table_20_Contents">
      <style:paragraph-properties fo:text-align="justify" style:justify-single-word="false"/>
      <style:text-properties fo:font-size="12pt" fo:font-weight="bold" officeooo:paragraph-rsid="0303d6d8" style:font-size-asian="12pt" style:font-weight-asian="bold" style:font-size-complex="12pt" style:font-weight-complex="bold"/>
    </style:style>
    <style:style style:name="P1027" style:family="paragraph" style:parent-style-name="Standard">
      <style:paragraph-properties fo:text-align="justify" style:justify-single-word="false"/>
      <style:text-properties style:use-window-font-color="true" loext:opacity="0%" fo:font-size="12pt" fo:font-weight="normal" officeooo:rsid="0306f702" officeooo:paragraph-rsid="0302e7e4" style:font-size-asian="10.5pt" style:font-weight-asian="normal" style:font-size-complex="12pt" style:font-weight-complex="normal"/>
    </style:style>
    <style:style style:name="P1028" style:family="paragraph" style:parent-style-name="Standard">
      <style:paragraph-properties fo:text-align="justify" style:justify-single-word="false"/>
      <style:text-properties officeooo:paragraph-rsid="0302e7e4"/>
    </style:style>
    <style:style style:name="P1029" style:family="paragraph" style:parent-style-name="Standard">
      <style:paragraph-properties fo:text-align="justify" style:justify-single-word="false"/>
      <style:text-properties officeooo:paragraph-rsid="061af88b"/>
    </style:style>
    <style:style style:name="P1030" style:family="paragraph" style:parent-style-name="Standard">
      <style:paragraph-properties fo:text-align="center" style:justify-single-word="false"/>
      <style:text-properties officeooo:paragraph-rsid="030f2e60"/>
    </style:style>
    <style:style style:name="P1031" style:family="paragraph" style:parent-style-name="Standard">
      <style:paragraph-properties fo:text-align="justify" style:justify-single-word="false"/>
      <style:text-properties style:use-window-font-color="true" loext:opacity="0%" fo:font-size="12pt" fo:font-weight="normal" officeooo:rsid="0315c937" officeooo:paragraph-rsid="030ffcf3" style:font-size-asian="10.5pt" style:font-weight-asian="normal" style:font-size-complex="12pt" style:font-weight-complex="normal"/>
    </style:style>
    <style:style style:name="P1032" style:family="paragraph" style:parent-style-name="Standard">
      <style:paragraph-properties fo:text-align="justify" style:justify-single-word="false"/>
      <style:text-properties officeooo:paragraph-rsid="030ffcf3"/>
    </style:style>
    <style:style style:name="P1033" style:family="paragraph" style:parent-style-name="Standard">
      <style:paragraph-properties fo:text-align="justify" style:justify-single-word="false"/>
      <style:text-properties style:use-window-font-color="true" loext:opacity="0%" fo:font-size="12pt" fo:font-weight="normal" officeooo:rsid="03013f59" officeooo:paragraph-rsid="03013f59" style:font-size-asian="10.5pt" style:font-weight-asian="normal" style:font-size-complex="12pt" style:font-weight-complex="normal"/>
    </style:style>
    <style:style style:name="P1034" style:family="paragraph" style:parent-style-name="Table_20_Contents">
      <style:paragraph-properties fo:text-align="right" style:justify-single-word="false"/>
      <style:text-properties fo:color="#00a933" loext:opacity="100%" style:font-name="Courier" fo:font-size="11pt" fo:font-style="italic" officeooo:rsid="0311739b" officeooo:paragraph-rsid="0311739b" style:font-size-asian="11pt" style:font-style-asian="italic" style:font-size-complex="11pt" style:font-style-complex="italic"/>
    </style:style>
    <style:style style:name="P1035" style:family="paragraph" style:parent-style-name="Footnote">
      <style:text-properties officeooo:rsid="030ffcf3" officeooo:paragraph-rsid="05ca6118"/>
    </style:style>
    <style:style style:name="P1036" style:family="paragraph" style:parent-style-name="Footnote">
      <style:text-properties officeooo:rsid="0315c937" officeooo:paragraph-rsid="0315c937"/>
    </style:style>
    <style:style style:name="P103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197a41" fo:background-color="#ffffff" style:font-size-asian="11pt" style:font-size-complex="11pt"/>
    </style:style>
    <style:style style:name="P1038" style:family="paragraph" style:parent-style-name="Standard">
      <style:paragraph-properties fo:margin-left="0in" fo:margin-right="0in" style:line-height-at-least="0.198in" fo:text-indent="0in" style:auto-text-indent="false"/>
      <style:text-properties officeooo:paragraph-rsid="03197a41"/>
    </style:style>
    <style:style style:name="P1039" style:family="paragraph" style:parent-style-name="Standard">
      <style:paragraph-properties fo:margin-left="0in" fo:margin-right="0in" style:line-height-at-least="0.198in" fo:text-indent="0in" style:auto-text-indent="false"/>
      <style:text-properties style:font-name="Courier" fo:font-size="11pt" officeooo:paragraph-rsid="03197a41" style:font-size-asian="11pt" style:font-size-complex="11pt"/>
    </style:style>
    <style:style style:name="P104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1b0bb4" fo:background-color="#ffffff" style:font-size-asian="11pt" style:font-size-complex="11pt"/>
    </style:style>
    <style:style style:name="P1041" style:family="paragraph" style:parent-style-name="Standard">
      <style:paragraph-properties fo:text-align="center" style:justify-single-word="false"/>
      <style:text-properties style:use-window-font-color="true" loext:opacity="0%" fo:font-size="12pt" fo:font-weight="bold" officeooo:rsid="0318b321" officeooo:paragraph-rsid="0318b321" style:font-size-asian="10.5pt" style:font-weight-asian="bold" style:font-size-complex="12pt" style:font-weight-complex="bold"/>
    </style:style>
    <style:style style:name="P1042" style:family="paragraph" style:parent-style-name="Standard">
      <style:text-properties style:use-window-font-color="true" loext:opacity="0%" fo:font-size="12pt" fo:font-weight="normal" officeooo:rsid="031c7a4f" style:font-size-asian="10.5pt" style:font-weight-asian="normal" style:font-size-complex="12pt" style:font-weight-complex="normal"/>
    </style:style>
    <style:style style:name="P1043" style:family="paragraph" style:parent-style-name="Standard">
      <style:paragraph-properties fo:text-align="justify" style:justify-single-word="false"/>
      <style:text-properties officeooo:paragraph-rsid="031d40cd"/>
    </style:style>
    <style:style style:name="P1044" style:family="paragraph" style:parent-style-name="Standard">
      <style:paragraph-properties fo:text-align="justify" style:justify-single-word="false"/>
      <style:text-properties style:use-window-font-color="true" loext:opacity="0%" fo:font-size="12pt" fo:font-weight="normal" officeooo:rsid="031d40cd" officeooo:paragraph-rsid="031d40cd" style:font-size-asian="10.5pt" style:font-weight-asian="normal" style:font-size-complex="12pt" style:font-weight-complex="normal"/>
    </style:style>
    <style:style style:name="P1045" style:family="paragraph" style:parent-style-name="Table_20_Contents">
      <style:paragraph-properties fo:text-align="right" style:justify-single-word="false"/>
      <style:text-properties fo:color="#00a933" loext:opacity="100%" style:font-name="Courier" fo:font-size="10pt" fo:font-style="italic" officeooo:rsid="031d40cd" officeooo:paragraph-rsid="031d40cd" style:font-size-asian="10pt" style:font-style-asian="italic" style:font-size-complex="10pt" style:font-style-complex="italic"/>
    </style:style>
    <style:style style:name="P1046" style:family="paragraph" style:parent-style-name="Standard">
      <style:paragraph-properties fo:text-align="justify" style:justify-single-word="false"/>
      <style:text-properties officeooo:paragraph-rsid="031e576c"/>
    </style:style>
    <style:style style:name="P1047" style:family="paragraph" style:parent-style-name="Standard">
      <style:paragraph-properties fo:text-align="justify" style:justify-single-word="false"/>
      <style:text-properties officeooo:paragraph-rsid="031f1c80"/>
    </style:style>
    <style:style style:name="P1048" style:family="paragraph" style:parent-style-name="Standard">
      <style:paragraph-properties fo:text-align="justify" style:justify-single-word="false"/>
      <style:text-properties style:use-window-font-color="true" loext:opacity="0%" fo:font-size="12pt" fo:font-weight="normal" officeooo:rsid="0318b321" officeooo:paragraph-rsid="031e576c" style:font-size-asian="10.5pt" style:font-weight-asian="normal" style:font-size-complex="12pt" style:font-weight-complex="normal"/>
    </style:style>
    <style:style style:name="P1049" style:family="paragraph" style:parent-style-name="Standard">
      <style:paragraph-properties fo:text-align="justify" style:justify-single-word="false"/>
      <style:text-properties style:use-window-font-color="true" loext:opacity="0%" fo:font-size="12pt" fo:font-weight="normal" officeooo:rsid="0318b321" officeooo:paragraph-rsid="0318b321" style:font-size-asian="10.5pt" style:font-weight-asian="normal" style:font-size-complex="12pt" style:font-weight-complex="normal"/>
    </style:style>
    <style:style style:name="P1050" style:family="paragraph" style:parent-style-name="Table_20_Contents">
      <style:paragraph-properties fo:text-align="justify" style:justify-single-word="false"/>
      <style:text-properties officeooo:paragraph-rsid="0318b321"/>
    </style:style>
    <style:style style:name="P1051" style:family="paragraph" style:parent-style-name="Table_20_Contents">
      <style:paragraph-properties fo:text-align="justify" style:justify-single-word="false"/>
      <style:text-properties officeooo:rsid="0318b321" officeooo:paragraph-rsid="0318b321"/>
    </style:style>
    <style:style style:name="P1052" style:family="paragraph" style:parent-style-name="Standard">
      <style:paragraph-properties fo:text-align="justify" style:justify-single-word="false"/>
      <style:text-properties style:use-window-font-color="true" loext:opacity="0%" fo:font-size="12pt" fo:font-style="italic" fo:font-weight="normal" officeooo:rsid="0318b321" officeooo:paragraph-rsid="0318b321" style:font-size-asian="10.5pt" style:font-style-asian="italic" style:font-weight-asian="normal" style:font-size-complex="12pt" style:font-style-complex="italic" style:font-weight-complex="normal"/>
    </style:style>
    <style:style style:name="P1053" style:family="paragraph" style:parent-style-name="Table_20_Contents">
      <style:paragraph-properties fo:text-align="justify" style:justify-single-word="false"/>
      <style:text-properties officeooo:rsid="0318b321" officeooo:paragraph-rsid="0318b321" style:font-size-asian="12pt"/>
    </style:style>
    <style:style style:name="P1054" style:family="paragraph" style:parent-style-name="Standard">
      <style:paragraph-properties fo:text-align="center" style:justify-single-word="false"/>
      <style:text-properties style:use-window-font-color="true" loext:opacity="0%" fo:font-size="18pt" fo:font-weight="bold" officeooo:rsid="004234ca" officeooo:paragraph-rsid="022d4881" style:font-size-asian="18pt" style:font-weight-asian="bold" style:font-size-complex="18pt" style:font-weight-complex="bold"/>
    </style:style>
    <style:style style:name="P1055" style:family="paragraph" style:parent-style-name="Standard">
      <style:paragraph-properties fo:text-align="justify" style:justify-single-word="false"/>
      <style:text-properties style:use-window-font-color="true" loext:opacity="0%" fo:font-size="12pt" fo:font-weight="normal" officeooo:rsid="0331283c" officeooo:paragraph-rsid="0331283c" style:font-size-asian="10.5pt" style:font-weight-asian="normal" style:font-size-complex="12pt" style:font-weight-complex="normal"/>
    </style:style>
    <style:style style:name="P1056" style:family="paragraph" style:parent-style-name="Standard">
      <style:paragraph-properties fo:text-align="justify" style:justify-single-word="false"/>
      <style:text-properties officeooo:paragraph-rsid="0331283c"/>
    </style:style>
    <style:style style:name="P1057" style:family="paragraph" style:parent-style-name="Standard">
      <style:paragraph-properties fo:text-align="center" style:justify-single-word="false"/>
      <style:text-properties style:use-window-font-color="true" loext:opacity="0%" fo:font-size="13pt" fo:font-weight="bold" officeooo:rsid="03438345" officeooo:paragraph-rsid="05a8edf2" style:font-size-asian="13pt" style:font-weight-asian="bold" style:font-size-complex="13pt" style:font-weight-complex="bold"/>
    </style:style>
    <style:style style:name="P1058" style:family="paragraph" style:parent-style-name="Standard">
      <style:paragraph-properties fo:text-align="justify" style:justify-single-word="false"/>
      <style:text-properties officeooo:paragraph-rsid="061ededb"/>
    </style:style>
    <style:style style:name="P1059" style:family="paragraph" style:parent-style-name="Footnote">
      <style:text-properties officeooo:paragraph-rsid="05ccc8ae"/>
    </style:style>
    <style:style style:name="P1060" style:family="paragraph" style:parent-style-name="Standard">
      <style:paragraph-properties fo:text-align="justify" style:justify-single-word="false"/>
      <style:text-properties style:use-window-font-color="true" loext:opacity="0%" style:font-name="Courier" fo:font-size="12pt" fo:font-weight="normal" officeooo:rsid="0331283c" officeooo:paragraph-rsid="061ededb" style:font-size-asian="10.5pt" style:font-weight-asian="normal" style:font-size-complex="12pt" style:font-weight-complex="normal"/>
    </style:style>
    <style:style style:name="P1061" style:family="paragraph" style:parent-style-name="Standard">
      <style:paragraph-properties fo:text-align="justify" style:justify-single-word="false"/>
      <style:text-properties style:use-window-font-color="true" loext:opacity="0%" fo:font-size="12pt" fo:font-weight="normal" officeooo:rsid="0331283c" officeooo:paragraph-rsid="061ededb" style:font-size-asian="10.5pt" style:font-weight-asian="normal" style:font-size-complex="12pt" style:font-weight-complex="normal"/>
    </style:style>
    <style:style style:name="P1062" style:family="paragraph" style:parent-style-name="Standard">
      <style:paragraph-properties fo:text-align="justify" style:justify-single-word="false"/>
      <style:text-properties style:use-window-font-color="true" loext:opacity="0%" fo:font-size="12pt" fo:font-weight="normal" officeooo:rsid="035e1d00" officeooo:paragraph-rsid="035e1d00" style:font-size-asian="10.5pt" style:font-weight-asian="normal" style:font-size-complex="12pt" style:font-weight-complex="normal"/>
    </style:style>
    <style:style style:name="P1063" style:family="paragraph" style:parent-style-name="Standard">
      <style:paragraph-properties fo:text-align="justify" style:justify-single-word="false"/>
      <style:text-properties style:use-window-font-color="true" loext:opacity="0%" style:font-name="Courier" fo:font-size="12pt" fo:font-weight="normal" officeooo:rsid="0331283c" officeooo:paragraph-rsid="0331283c" style:font-size-asian="10.5pt" style:font-weight-asian="normal" style:font-size-complex="12pt" style:font-weight-complex="normal"/>
    </style:style>
    <style:style style:name="P1064" style:family="paragraph" style:parent-style-name="Standard">
      <style:paragraph-properties fo:text-align="center" style:justify-single-word="false"/>
      <style:text-properties style:use-window-font-color="true" loext:opacity="0%" fo:font-size="12pt" fo:font-weight="bold" officeooo:rsid="004234ca" officeooo:paragraph-rsid="022d4881" style:font-size-asian="10.5pt" style:font-weight-asian="bold" style:font-size-complex="12pt" style:font-weight-complex="bold"/>
    </style:style>
    <style:style style:name="P1065" style:family="paragraph" style:parent-style-name="Standard">
      <style:paragraph-properties fo:text-align="justify" style:justify-single-word="false"/>
      <style:text-properties officeooo:paragraph-rsid="03330fb0"/>
    </style:style>
    <style:style style:name="P1066" style:family="paragraph" style:parent-style-name="Standard">
      <style:paragraph-properties fo:text-align="justify" style:justify-single-word="false"/>
      <style:text-properties style:use-window-font-color="true" loext:opacity="0%" fo:font-size="12pt" fo:font-weight="normal" officeooo:rsid="03341c6e" officeooo:paragraph-rsid="03341c6e" style:font-size-asian="10.5pt" style:font-weight-asian="normal" style:font-size-complex="12pt" style:font-weight-complex="normal"/>
    </style:style>
    <style:style style:name="P1067" style:family="paragraph" style:parent-style-name="Standard">
      <style:paragraph-properties fo:margin-left="0in" fo:margin-right="0in" style:line-height-at-least="0.198in" fo:text-indent="0in" style:auto-text-indent="false"/>
      <style:text-properties officeooo:paragraph-rsid="03473369"/>
    </style:style>
    <style:style style:name="P1068" style:family="paragraph" style:parent-style-name="Table_20_Contents">
      <style:paragraph-properties fo:text-align="right" style:justify-single-word="false"/>
      <style:text-properties fo:color="#00a933" loext:opacity="100%" style:font-name="Courier" fo:font-size="10pt" fo:font-style="italic" officeooo:rsid="0334af00" officeooo:paragraph-rsid="035d78d6" style:font-size-asian="10pt" style:font-style-asian="italic" style:font-size-complex="10pt" style:font-style-complex="italic"/>
    </style:style>
    <style:style style:name="P1069" style:family="paragraph" style:parent-style-name="Table_20_Contents">
      <style:paragraph-properties fo:text-align="left" style:justify-single-word="false"/>
      <style:text-properties fo:color="#00a933" loext:opacity="100%" style:font-name="Courier" fo:font-size="10pt" officeooo:paragraph-rsid="035d78d6" style:font-size-asian="10pt" style:font-size-complex="10pt"/>
    </style:style>
    <style:style style:name="P1070" style:family="paragraph" style:parent-style-name="Table_20_Contents">
      <style:paragraph-properties fo:text-align="right" style:justify-single-word="false"/>
      <style:text-properties fo:color="#00a933" loext:opacity="100%" style:font-name="Courier" fo:font-size="10pt" fo:font-style="italic" officeooo:rsid="035d78d6" officeooo:paragraph-rsid="035d78d6" style:font-size-asian="10pt" style:font-style-asian="italic" style:font-size-complex="10pt" style:font-style-complex="italic"/>
    </style:style>
    <style:style style:name="P1071" style:family="paragraph" style:parent-style-name="Standard">
      <style:paragraph-properties fo:text-align="justify" style:justify-single-word="false"/>
      <style:text-properties style:use-window-font-color="true" loext:opacity="0%" fo:font-size="12pt" fo:font-weight="normal" officeooo:rsid="034c6816" officeooo:paragraph-rsid="0331283c" style:font-size-asian="10.5pt" style:font-weight-asian="normal" style:font-size-complex="12pt" style:font-weight-complex="normal"/>
    </style:style>
    <style:style style:name="P1072" style:family="paragraph" style:parent-style-name="Standard">
      <style:paragraph-properties fo:text-align="justify" style:justify-single-word="false"/>
      <style:text-properties style:use-window-font-color="true" loext:opacity="0%" fo:font-size="12pt" fo:font-weight="normal" officeooo:rsid="034c6816" officeooo:paragraph-rsid="034c6816" style:font-size-asian="10.5pt" style:font-weight-asian="normal" style:font-size-complex="12pt" style:font-weight-complex="normal"/>
    </style:style>
    <style:style style:name="P1073" style:family="paragraph" style:parent-style-name="Standard">
      <style:paragraph-properties fo:margin-left="0in" fo:margin-right="0in" style:line-height-at-least="0.198in" fo:text-indent="0in" style:auto-text-indent="false"/>
      <style:text-properties style:font-name="Courier" fo:font-size="10.5pt"/>
    </style:style>
    <style:style style:name="P1074" style:family="paragraph" style:parent-style-name="Standard">
      <style:paragraph-properties fo:text-align="justify" style:justify-single-word="false"/>
      <style:text-properties style:use-window-font-color="true" loext:opacity="0%" fo:font-size="12pt" fo:font-weight="normal" officeooo:rsid="034d37e7" officeooo:paragraph-rsid="0331283c" style:font-size-asian="10.5pt" style:font-weight-asian="normal" style:font-size-complex="12pt" style:font-weight-complex="normal"/>
    </style:style>
    <style:style style:name="P1075" style:family="paragraph" style:parent-style-name="Standard">
      <style:paragraph-properties fo:text-align="justify" style:justify-single-word="false"/>
      <style:text-properties style:use-window-font-color="true" loext:opacity="0%" fo:font-size="12pt" fo:font-weight="normal" officeooo:rsid="034f5561" officeooo:paragraph-rsid="034f5561" style:font-size-asian="10.5pt" style:font-weight-asian="normal" style:font-size-complex="12pt" style:font-weight-complex="normal"/>
    </style:style>
    <style:style style:name="P1076" style:family="paragraph" style:parent-style-name="Standard">
      <style:paragraph-properties fo:text-align="justify" style:justify-single-word="false"/>
      <style:text-properties fo:color="#000000" loext:opacity="100%" style:font-name="Courier" fo:font-size="11pt" fo:font-weight="normal" officeooo:rsid="034f5561" officeooo:paragraph-rsid="034fecee" fo:background-color="#ffffff" style:font-size-asian="11pt" style:font-weight-asian="normal" style:font-size-complex="11pt" style:font-weight-complex="normal"/>
    </style:style>
    <style:style style:name="P107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56a342" fo:background-color="#ffffff" style:font-size-asian="11pt" style:font-size-complex="11pt"/>
    </style:style>
    <style:style style:name="P1078" style:family="paragraph" style:parent-style-name="Standard">
      <style:paragraph-properties fo:margin-left="0in" fo:margin-right="0in" style:line-height-at-least="0.198in" fo:text-indent="0in" style:auto-text-indent="false"/>
      <style:text-properties officeooo:paragraph-rsid="0356a342"/>
    </style:style>
    <style:style style:name="P1079" style:family="paragraph" style:parent-style-name="Standard">
      <style:paragraph-properties fo:margin-left="0in" fo:margin-right="0in" style:line-height-at-least="0.198in" fo:text-indent="0in" style:auto-text-indent="false"/>
      <style:text-properties style:font-name="Courier" fo:font-size="11pt" officeooo:paragraph-rsid="0356a342" style:font-size-asian="11pt" style:font-size-complex="11pt"/>
    </style:style>
    <style:style style:name="P1080" style:family="paragraph" style:parent-style-name="Standard">
      <style:paragraph-properties style:line-height-at-least="0.198in"/>
      <style:text-properties style:font-name="Courier" fo:font-size="11pt" officeooo:paragraph-rsid="0356a342" style:font-size-asian="11pt" style:font-size-complex="11pt"/>
    </style:style>
    <style:style style:name="P1081" style:family="paragraph" style:parent-style-name="Standard">
      <style:paragraph-properties fo:margin-left="0in" fo:margin-right="0in" style:line-height-at-least="0.198in" fo:text-indent="0in" style:auto-text-indent="false"/>
      <style:text-properties fo:color="#000000" loext:opacity="100%" fo:font-size="11pt" fo:font-weight="normal" officeooo:paragraph-rsid="0356a342" style:font-size-asian="11pt" style:font-size-complex="11pt"/>
    </style:style>
    <style:style style:name="P1082" style:family="paragraph" style:parent-style-name="Standard">
      <style:paragraph-properties fo:text-align="center" style:justify-single-word="false"/>
      <style:text-properties style:use-window-font-color="true" loext:opacity="0%" fo:font-size="12pt" fo:font-weight="bold" officeooo:rsid="03558cf3" officeooo:paragraph-rsid="03558cf3" style:font-size-asian="10.5pt" style:font-weight-asian="bold" style:font-size-complex="12pt" style:font-weight-complex="bold"/>
    </style:style>
    <style:style style:name="P1083" style:family="paragraph" style:parent-style-name="Standard">
      <style:paragraph-properties fo:text-align="justify" style:justify-single-word="false"/>
      <style:text-properties style:use-window-font-color="true" loext:opacity="0%" fo:font-size="12pt" fo:font-weight="normal" officeooo:rsid="0363286b" officeooo:paragraph-rsid="0363286b" style:font-size-asian="10.5pt" style:font-weight-asian="normal" style:font-size-complex="12pt" style:font-weight-complex="normal"/>
    </style:style>
    <style:style style:name="P1084" style:family="paragraph" style:parent-style-name="Standard">
      <style:paragraph-properties fo:text-align="justify" style:justify-single-word="false"/>
      <style:text-properties officeooo:paragraph-rsid="0364778a"/>
    </style:style>
    <style:style style:name="P1085" style:family="paragraph" style:parent-style-name="Standard">
      <style:paragraph-properties fo:text-align="justify" style:justify-single-word="false"/>
      <style:text-properties style:use-window-font-color="true" loext:opacity="0%" fo:font-size="12pt" fo:font-weight="normal" officeooo:rsid="0364778a" officeooo:paragraph-rsid="0364778a" style:font-size-asian="10.5pt" style:font-weight-asian="normal" style:font-size-complex="12pt" style:font-weight-complex="normal"/>
    </style:style>
    <style:style style:name="P1086" style:family="paragraph" style:parent-style-name="Footnote">
      <style:text-properties officeooo:paragraph-rsid="0364d7fd"/>
    </style:style>
    <style:style style:name="P1087" style:family="paragraph" style:parent-style-name="Standard">
      <style:paragraph-properties fo:text-align="justify" style:justify-single-word="false"/>
      <style:text-properties style:use-window-font-color="true" loext:opacity="0%" fo:font-size="12pt" fo:font-weight="normal" officeooo:rsid="0364d7fd" officeooo:paragraph-rsid="0364778a" style:font-size-asian="10.5pt" style:font-weight-asian="normal" style:font-size-complex="12pt" style:font-weight-complex="normal"/>
    </style:style>
    <style:style style:name="P1088" style:family="paragraph" style:parent-style-name="Standard">
      <style:paragraph-properties fo:text-align="justify" style:justify-single-word="false"/>
      <style:text-properties style:use-window-font-color="true" loext:opacity="0%" fo:font-size="12pt" fo:font-weight="normal" officeooo:rsid="0365ad7d" officeooo:paragraph-rsid="0365ad7d" style:font-size-asian="10.5pt" style:font-weight-asian="normal" style:font-size-complex="12pt" style:font-weight-complex="normal"/>
    </style:style>
    <style:style style:name="P1089" style:family="paragraph" style:parent-style-name="Table_20_Contents">
      <style:paragraph-properties fo:text-align="justify" style:justify-single-word="false"/>
      <style:text-properties fo:font-size="12pt" officeooo:paragraph-rsid="0365ad7d" style:font-size-asian="12pt" style:font-size-complex="12pt"/>
    </style:style>
    <style:style style:name="P1090" style:family="paragraph" style:parent-style-name="Standard">
      <style:paragraph-properties fo:text-align="center" style:justify-single-word="false"/>
      <style:text-properties style:use-window-font-color="true" loext:opacity="0%" fo:font-size="13pt" fo:font-weight="bold" officeooo:rsid="059bfa11" officeooo:paragraph-rsid="05a8edf2" style:font-size-asian="13pt" style:font-weight-asian="bold" style:font-size-complex="13pt" style:font-weight-complex="bold"/>
    </style:style>
    <style:style style:name="P1091" style:family="paragraph" style:parent-style-name="Standard">
      <style:paragraph-properties fo:text-align="justify" style:justify-single-word="false"/>
      <style:text-properties officeooo:paragraph-rsid="036a5eb4"/>
    </style:style>
    <style:style style:name="P1092" style:family="paragraph" style:parent-style-name="Standard">
      <style:paragraph-properties fo:text-align="justify" style:justify-single-word="false"/>
      <style:text-properties style:use-window-font-color="true" loext:opacity="0%" fo:font-size="12pt" fo:font-weight="normal" officeooo:rsid="036a5eb4" officeooo:paragraph-rsid="036a5eb4" style:font-size-asian="10.5pt" style:font-weight-asian="normal" style:font-size-complex="12pt" style:font-weight-complex="normal"/>
    </style:style>
    <style:style style:name="P1093" style:family="paragraph" style:parent-style-name="Standard">
      <style:paragraph-properties fo:text-align="justify" style:justify-single-word="false"/>
      <style:text-properties style:use-window-font-color="true" loext:opacity="0%" fo:font-size="12pt" fo:font-weight="normal" officeooo:rsid="036bd6e9" officeooo:paragraph-rsid="036bd6e9" style:font-size-asian="10.5pt" style:font-weight-asian="normal" style:font-size-complex="12pt" style:font-weight-complex="normal"/>
    </style:style>
    <style:style style:name="P1094" style:family="paragraph" style:parent-style-name="Standard">
      <style:paragraph-properties fo:text-align="justify" style:justify-single-word="false"/>
      <style:text-properties style:use-window-font-color="true" loext:opacity="0%" style:font-name="Courier" fo:font-size="12pt" fo:font-weight="normal" officeooo:rsid="036bd6e9" officeooo:paragraph-rsid="036bd6e9" style:font-size-asian="10.5pt" style:font-weight-asian="normal" style:font-size-complex="12pt" style:font-weight-complex="normal"/>
    </style:style>
    <style:style style:name="P1095" style:family="paragraph" style:parent-style-name="Standard">
      <style:paragraph-properties fo:text-align="justify" style:justify-single-word="false"/>
      <style:text-properties style:use-window-font-color="true" loext:opacity="0%" fo:font-size="12pt" fo:font-weight="normal" officeooo:rsid="036bd6e9" officeooo:paragraph-rsid="036a5eb4" style:font-size-asian="10.5pt" style:font-weight-asian="normal" style:font-size-complex="12pt" style:font-weight-complex="normal"/>
    </style:style>
    <style:style style:name="P1096" style:family="paragraph" style:parent-style-name="Standard">
      <style:paragraph-properties fo:text-align="justify" style:justify-single-word="false"/>
      <style:text-properties style:use-window-font-color="true" loext:opacity="0%" fo:font-size="12pt" fo:font-weight="normal" officeooo:rsid="036bd6e9" officeooo:paragraph-rsid="06216f4a" style:font-size-asian="10.5pt" style:font-weight-asian="normal" style:font-size-complex="12pt" style:font-weight-complex="normal"/>
    </style:style>
    <style:style style:name="P1097" style:family="paragraph" style:parent-style-name="Standard">
      <style:paragraph-properties fo:text-align="justify" style:justify-single-word="false"/>
      <style:text-properties style:use-window-font-color="true" loext:opacity="0%" style:font-name="Liberation Serif" fo:font-size="12pt" fo:font-weight="normal" officeooo:rsid="036dc8db" officeooo:paragraph-rsid="036dc8db" style:font-size-asian="10.5pt" style:font-weight-asian="normal" style:font-size-complex="12pt" style:font-weight-complex="normal"/>
    </style:style>
    <style:style style:name="P1098"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officeooo:rsid="036dc8db" officeooo:paragraph-rsid="036dc8db" style:font-size-asian="10pt" style:font-style-asian="italic" style:font-size-complex="10pt" style:font-style-complex="italic"/>
    </style:style>
    <style:style style:name="P1099" style:family="paragraph" style:parent-style-name="Standard">
      <style:paragraph-properties fo:text-align="justify" style:justify-single-word="false"/>
      <style:text-properties officeooo:paragraph-rsid="0371ef97"/>
    </style:style>
    <style:style style:name="P1100" style:family="paragraph" style:parent-style-name="Standard">
      <style:paragraph-properties fo:text-align="justify" style:justify-single-word="false"/>
      <style:text-properties style:use-window-font-color="true" loext:opacity="0%" style:font-name="Liberation Serif" fo:font-size="12pt" fo:font-weight="normal" officeooo:rsid="03746ba0" officeooo:paragraph-rsid="0371ef97" style:font-size-asian="10.5pt" style:font-weight-asian="normal" style:font-size-complex="12pt" style:font-weight-complex="normal"/>
    </style:style>
    <style:style style:name="P1101" style:family="paragraph" style:parent-style-name="Standard">
      <style:paragraph-properties fo:text-align="justify" style:justify-single-word="false"/>
      <style:text-properties officeooo:paragraph-rsid="06216f4a"/>
    </style:style>
    <style:style style:name="P1102" style:family="paragraph" style:parent-style-name="Standard">
      <style:paragraph-properties fo:text-align="justify" style:justify-single-word="false"/>
      <style:text-properties style:use-window-font-color="true" loext:opacity="0%" style:font-name="Liberation Serif" fo:font-size="12pt" fo:font-weight="normal" officeooo:rsid="03748988" officeooo:paragraph-rsid="03748988" style:font-size-asian="10.5pt" style:font-weight-asian="normal" style:font-size-complex="12pt" style:font-weight-complex="normal"/>
    </style:style>
    <style:style style:name="P1103" style:family="paragraph" style:parent-style-name="Standard">
      <style:paragraph-properties fo:text-align="justify" style:justify-single-word="false"/>
      <style:text-properties style:use-window-font-color="true" loext:opacity="0%" style:font-name="Liberation Serif" fo:font-size="12pt" fo:font-weight="normal" officeooo:rsid="03759cf4" officeooo:paragraph-rsid="0371ef97" style:font-size-asian="10.5pt" style:font-weight-asian="normal" style:font-size-complex="12pt" style:font-weight-complex="normal"/>
    </style:style>
    <style:style style:name="P1104" style:family="paragraph" style:parent-style-name="Standard">
      <style:paragraph-properties fo:text-align="justify" style:justify-single-word="false"/>
      <style:text-properties style:use-window-font-color="true" loext:opacity="0%" style:font-name="Liberation Serif" fo:font-size="12pt" fo:font-weight="normal" officeooo:rsid="0376f3eb" officeooo:paragraph-rsid="0371ef97" style:font-size-asian="10.5pt" style:font-weight-asian="normal" style:font-size-complex="12pt" style:font-weight-complex="normal"/>
    </style:style>
    <style:style style:name="P110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791af4" fo:background-color="#ffffff" style:font-size-asian="11pt" style:font-size-complex="11pt"/>
    </style:style>
    <style:style style:name="P1106" style:family="paragraph" style:parent-style-name="Standard">
      <style:paragraph-properties fo:margin-left="0in" fo:margin-right="0in" style:line-height-at-least="0.198in" fo:text-indent="0in" style:auto-text-indent="false"/>
      <style:text-properties officeooo:paragraph-rsid="03791af4"/>
    </style:style>
    <style:style style:name="P1107" style:family="paragraph" style:parent-style-name="Standard">
      <style:paragraph-properties fo:margin-left="0in" fo:margin-right="0in" style:line-height-at-least="0.198in" fo:text-indent="0in" style:auto-text-indent="false"/>
      <style:text-properties officeooo:paragraph-rsid="037b9772"/>
    </style:style>
    <style:style style:name="P110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7b9772" fo:background-color="#ffffff" style:font-size-asian="11pt" style:font-size-complex="11pt"/>
    </style:style>
    <style:style style:name="P1109" style:family="paragraph" style:parent-style-name="Standard">
      <style:paragraph-properties fo:margin-left="0in" fo:margin-right="0in" style:line-height-at-least="0.198in" fo:text-indent="0in" style:auto-text-indent="false"/>
      <style:text-properties style:font-name="Courier" fo:font-size="11pt" officeooo:paragraph-rsid="03791af4" style:font-size-asian="11pt" style:font-size-complex="11pt"/>
    </style:style>
    <style:style style:name="P1110" style:family="paragraph" style:parent-style-name="Text_20_body">
      <style:paragraph-properties fo:text-align="center" style:justify-single-word="false"/>
      <style:text-properties fo:font-weight="bold" officeooo:rsid="03791af4" officeooo:paragraph-rsid="03791af4" style:font-weight-asian="bold" style:font-weight-complex="bold"/>
    </style:style>
    <style:style style:name="P1111" style:family="paragraph" style:parent-style-name="Standard">
      <style:paragraph-properties fo:text-align="justify" style:justify-single-word="false"/>
      <style:text-properties officeooo:paragraph-rsid="03818ed6"/>
    </style:style>
    <style:style style:name="P1112" style:family="paragraph" style:parent-style-name="Standard">
      <style:text-properties officeooo:rsid="038a0378" officeooo:paragraph-rsid="038a0378"/>
    </style:style>
    <style:style style:name="P1113" style:family="paragraph" style:parent-style-name="Table_20_Contents">
      <style:paragraph-properties fo:text-align="justify" style:justify-single-word="false"/>
      <style:text-properties fo:font-size="12pt" officeooo:paragraph-rsid="038a880b" style:font-size-asian="12pt" style:font-size-complex="12pt"/>
    </style:style>
    <style:style style:name="P1114" style:family="paragraph" style:parent-style-name="Table_20_Contents">
      <style:paragraph-properties fo:text-align="justify" style:justify-single-word="false"/>
      <style:text-properties fo:font-size="12pt" officeooo:paragraph-rsid="038b9a56" style:font-size-asian="12pt" style:font-size-complex="12pt"/>
    </style:style>
    <style:style style:name="P1115" style:family="paragraph" style:parent-style-name="Standard">
      <style:text-properties officeooo:rsid="038ecc87" officeooo:paragraph-rsid="038ecc87"/>
    </style:style>
    <style:style style:name="P1116" style:family="paragraph" style:parent-style-name="Standard">
      <style:paragraph-properties fo:text-align="justify" style:justify-single-word="false"/>
      <style:text-properties officeooo:rsid="038ecc87" officeooo:paragraph-rsid="06216f4a"/>
    </style:style>
    <style:style style:name="P1117" style:family="paragraph" style:parent-style-name="Standard">
      <style:paragraph-properties fo:margin-left="0in" fo:margin-right="0in" style:line-height-at-least="0.198in" fo:text-indent="0in" style:auto-text-indent="false"/>
      <style:text-properties officeooo:paragraph-rsid="038ecc87"/>
    </style:style>
    <style:style style:name="P111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8ecc87" fo:background-color="#ffffff" style:font-size-asian="11pt" style:font-size-complex="11pt"/>
    </style:style>
    <style:style style:name="P1119" style:family="paragraph" style:parent-style-name="Standard">
      <style:paragraph-properties fo:margin-left="0in" fo:margin-right="0in" style:line-height-at-least="0.198in" fo:text-indent="0in" style:auto-text-indent="false"/>
      <style:text-properties fo:color="#000000" loext:opacity="100%" style:font-name="Liberation Serif" fo:font-size="12pt" fo:font-weight="normal" officeooo:rsid="038ecc87" officeooo:paragraph-rsid="038ecc87" fo:background-color="#ffffff" style:font-size-asian="10.5pt" style:font-size-complex="12pt"/>
    </style:style>
    <style:style style:name="P1120" style:family="paragraph" style:parent-style-name="Standard">
      <style:paragraph-properties fo:text-align="justify" style:justify-single-word="false"/>
      <style:text-properties fo:color="#000000" loext:opacity="100%" style:font-name="Liberation Serif" fo:font-size="12pt" fo:font-weight="normal" officeooo:rsid="03931870" officeooo:paragraph-rsid="03818ed6" fo:background-color="#ffffff" style:font-size-asian="10.5pt" style:font-size-complex="12pt"/>
    </style:style>
    <style:style style:name="P1121" style:family="paragraph" style:parent-style-name="Standard">
      <style:paragraph-properties fo:text-align="center" style:justify-single-word="false"/>
      <style:text-properties style:use-window-font-color="true" loext:opacity="0%" fo:font-size="13pt" fo:font-weight="bold" officeooo:rsid="03438345" officeooo:paragraph-rsid="05a8edf2" style:font-size-asian="13pt" style:font-size-complex="13pt"/>
    </style:style>
    <style:style style:name="P1122" style:family="paragraph" style:parent-style-name="Standard">
      <style:paragraph-properties fo:text-align="justify" style:justify-single-word="false"/>
      <style:text-properties officeooo:paragraph-rsid="0622a628"/>
    </style:style>
    <style:style style:name="P1123" style:family="paragraph" style:parent-style-name="Standard">
      <style:paragraph-properties fo:text-align="justify" style:justify-single-word="false"/>
      <style:text-properties officeooo:paragraph-rsid="039de500"/>
    </style:style>
    <style:style style:name="P1124" style:family="paragraph" style:parent-style-name="Standard">
      <style:paragraph-properties fo:text-align="justify" style:justify-single-word="false"/>
      <style:text-properties fo:color="#000000" loext:opacity="100%" style:font-name="Liberation Serif" fo:font-size="12pt" fo:font-weight="normal" officeooo:rsid="039de500" officeooo:paragraph-rsid="039de500" fo:background-color="#ffffff" style:font-size-asian="10.5pt" style:font-size-complex="12pt"/>
    </style:style>
    <style:style style:name="P1125" style:family="paragraph" style:parent-style-name="Standard">
      <style:paragraph-properties fo:text-align="center" style:justify-single-word="false"/>
      <style:text-properties style:use-window-font-color="true" loext:opacity="0%" fo:font-size="13pt" fo:font-weight="bold" officeooo:rsid="004234ca" officeooo:paragraph-rsid="022d4881" style:font-size-asian="11.3500003814697pt" style:font-weight-asian="bold" style:font-size-complex="13pt" style:font-weight-complex="bold"/>
    </style:style>
    <style:style style:name="P1126" style:family="paragraph" style:parent-style-name="Standard">
      <style:paragraph-properties fo:text-align="justify" style:justify-single-word="false"/>
      <style:text-properties style:use-window-font-color="true" loext:opacity="0%" fo:font-size="12pt" fo:font-weight="normal" officeooo:rsid="039ebd98" officeooo:paragraph-rsid="039ebd98" style:font-size-asian="10.5pt" style:font-weight-asian="normal" style:font-size-complex="12pt" style:font-weight-complex="normal"/>
    </style:style>
    <style:style style:name="P1127" style:family="paragraph" style:parent-style-name="Standard">
      <style:paragraph-properties fo:text-align="justify" style:justify-single-word="false"/>
      <style:text-properties style:use-window-font-color="true" loext:opacity="0%" fo:font-size="12pt" fo:font-weight="normal" officeooo:rsid="039f8e49" officeooo:paragraph-rsid="039f8e49" style:font-size-asian="10.5pt" style:font-weight-asian="normal" style:font-size-complex="12pt" style:font-weight-complex="normal"/>
    </style:style>
    <style:style style:name="P1128" style:family="paragraph" style:parent-style-name="Standard">
      <style:paragraph-properties fo:text-align="left" style:justify-single-word="false"/>
      <style:text-properties style:use-window-font-color="true" loext:opacity="0%" style:font-name="Courier" fo:font-size="12pt" fo:font-weight="normal" officeooo:rsid="039f8e49" officeooo:paragraph-rsid="039f8e49" style:font-size-asian="10.5pt" style:font-weight-asian="normal" style:font-size-complex="12pt" style:font-weight-complex="normal"/>
    </style:style>
    <style:style style:name="P1129" style:family="paragraph" style:parent-style-name="Standard">
      <style:paragraph-properties fo:text-align="justify" style:justify-single-word="false"/>
      <style:text-properties style:use-window-font-color="true" loext:opacity="0%" fo:font-size="12pt" fo:font-weight="normal" officeooo:rsid="03a0b32f" officeooo:paragraph-rsid="03a0b32f" style:font-size-asian="10.5pt" style:font-weight-asian="normal" style:font-size-complex="12pt" style:font-weight-complex="normal"/>
    </style:style>
    <style:style style:name="P1130"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3a10de7" officeooo:paragraph-rsid="03a10de7" fo:background-color="#ffffff" style:font-size-asian="10pt" style:font-style-asian="italic" style:font-size-complex="10pt" style:font-style-complex="italic"/>
    </style:style>
    <style:style style:name="P1131" style:family="paragraph" style:parent-style-name="Standard">
      <style:paragraph-properties fo:text-align="left" style:justify-single-word="false"/>
      <style:text-properties officeooo:paragraph-rsid="039f8e49"/>
    </style:style>
    <style:style style:name="P1132" style:family="paragraph" style:parent-style-name="Standard">
      <style:paragraph-properties fo:text-align="justify" style:justify-single-word="false"/>
      <style:text-properties style:use-window-font-color="true" loext:opacity="0%" fo:font-size="12pt" fo:font-weight="normal" officeooo:rsid="03a3ed91" officeooo:paragraph-rsid="03a3ed91" style:font-size-asian="10.5pt" style:font-weight-asian="normal" style:font-size-complex="12pt" style:font-weight-complex="normal"/>
    </style:style>
    <style:style style:name="P1133" style:family="paragraph" style:parent-style-name="Standard">
      <style:paragraph-properties fo:text-align="left" style:justify-single-word="false"/>
      <style:text-properties style:use-window-font-color="true" loext:opacity="0%" fo:font-size="12pt" fo:font-weight="normal" officeooo:rsid="03a40cfa" officeooo:paragraph-rsid="039f8e49" style:font-size-asian="10.5pt" style:font-weight-asian="normal" style:font-size-complex="12pt" style:font-weight-complex="normal"/>
    </style:style>
    <style:style style:name="P1134" style:family="paragraph" style:parent-style-name="Standard">
      <style:paragraph-properties fo:text-align="left" style:justify-single-word="false"/>
      <style:text-properties officeooo:paragraph-rsid="0652db70"/>
    </style:style>
    <style:style style:name="P113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a41113" fo:background-color="#ffffff" style:font-size-asian="11pt" style:font-size-complex="11pt"/>
    </style:style>
    <style:style style:name="P1136" style:family="paragraph" style:parent-style-name="Standard">
      <style:paragraph-properties fo:margin-left="0in" fo:margin-right="0in" style:line-height-at-least="0.198in" fo:text-indent="0in" style:auto-text-indent="false"/>
      <style:text-properties style:font-name="Courier" fo:font-size="11pt" officeooo:paragraph-rsid="03a41113" style:font-size-asian="11pt" style:font-size-complex="11pt"/>
    </style:style>
    <style:style style:name="P1137" style:family="paragraph" style:parent-style-name="Standard">
      <style:paragraph-properties fo:margin-left="0in" fo:margin-right="0in" style:line-height-at-least="0.198in" fo:text-indent="0in" style:auto-text-indent="false"/>
      <style:text-properties officeooo:paragraph-rsid="03a41113"/>
    </style:style>
    <style:style style:name="P1138" style:family="paragraph" style:parent-style-name="Standard">
      <style:paragraph-properties fo:text-align="center" style:justify-single-word="false"/>
      <style:text-properties style:use-window-font-color="true" loext:opacity="0%" fo:font-size="12pt" fo:font-weight="bold" officeooo:rsid="03a41113" officeooo:paragraph-rsid="03a41113" style:font-size-asian="10.5pt" style:font-weight-asian="bold" style:font-size-complex="12pt" style:font-weight-complex="bold"/>
    </style:style>
    <style:style style:name="P1139" style:family="paragraph" style:parent-style-name="Standard">
      <style:paragraph-properties fo:text-align="justify" style:justify-single-word="false"/>
      <style:text-properties style:use-window-font-color="true" loext:opacity="0%" fo:font-size="12pt" fo:font-style="normal" fo:font-weight="normal" officeooo:rsid="03ab4ac8" officeooo:paragraph-rsid="03ab4ac8" style:font-size-asian="10.5pt" style:font-style-asian="normal" style:font-weight-asian="normal" style:font-size-complex="12pt" style:font-style-complex="normal" style:font-weight-complex="normal"/>
    </style:style>
    <style:style style:name="P1140" style:family="paragraph" style:parent-style-name="Table_20_Contents">
      <style:paragraph-properties fo:text-align="justify" style:justify-single-word="false"/>
      <style:text-properties fo:font-size="12pt" officeooo:paragraph-rsid="03ab4ac8" style:font-size-asian="12pt" style:font-size-complex="12pt"/>
    </style:style>
    <style:style style:name="P1141" style:family="paragraph" style:parent-style-name="Table_20_Contents">
      <style:paragraph-properties fo:text-align="justify" style:justify-single-word="false"/>
      <style:text-properties fo:font-size="12pt" officeooo:paragraph-rsid="03ac52e9" style:font-size-asian="12pt" style:font-size-complex="12pt"/>
    </style:style>
    <style:style style:name="P1142" style:family="paragraph" style:parent-style-name="Standard">
      <style:paragraph-properties fo:text-align="justify" style:justify-single-word="false"/>
      <style:text-properties officeooo:paragraph-rsid="03ab4ac8"/>
    </style:style>
    <style:style style:name="P1143" style:family="paragraph" style:parent-style-name="Standard">
      <style:paragraph-properties fo:text-align="justify" style:justify-single-word="false"/>
      <style:text-properties style:use-window-font-color="true" loext:opacity="0%" fo:font-size="12pt" fo:font-style="normal" fo:font-weight="normal" officeooo:rsid="03b433e2" officeooo:paragraph-rsid="03b433e2" style:font-size-asian="10.5pt" style:font-style-asian="normal" style:font-weight-asian="normal" style:font-size-complex="12pt" style:font-style-complex="normal" style:font-weight-complex="normal"/>
    </style:style>
    <style:style style:name="P1144" style:family="paragraph" style:parent-style-name="Standard">
      <style:paragraph-properties fo:text-align="justify" style:justify-single-word="false"/>
      <style:text-properties style:use-window-font-color="true" loext:opacity="0%" fo:font-size="12pt" fo:font-style="normal" fo:font-weight="normal" officeooo:rsid="03af5d23" officeooo:paragraph-rsid="03b433e2" style:font-size-asian="10.5pt" style:font-style-asian="normal" style:font-weight-asian="normal" style:font-size-complex="12pt" style:font-style-complex="normal" style:font-weight-complex="normal"/>
    </style:style>
    <style:style style:name="P1145" style:family="paragraph" style:parent-style-name="Standard">
      <style:paragraph-properties fo:text-align="justify" style:justify-single-word="false"/>
      <style:text-properties style:use-window-font-color="true" loext:opacity="0%" style:font-name="Courier" fo:font-size="12pt" fo:font-weight="normal" officeooo:rsid="039f8e49" officeooo:paragraph-rsid="03b433e2" style:font-size-asian="10.5pt" style:font-weight-asian="normal" style:font-size-complex="12pt" style:font-weight-complex="normal"/>
    </style:style>
    <style:style style:name="P1146" style:family="paragraph" style:parent-style-name="Standard">
      <style:paragraph-properties fo:text-align="justify" style:justify-single-word="false"/>
      <style:text-properties style:use-window-font-color="true" loext:opacity="0%" fo:font-size="12pt" fo:font-style="normal" fo:font-weight="normal" officeooo:rsid="03b5032c" officeooo:paragraph-rsid="03b5032c" style:font-size-asian="10.5pt" style:font-style-asian="normal" style:font-weight-asian="normal" style:font-size-complex="12pt" style:font-style-complex="normal" style:font-weight-complex="normal"/>
    </style:style>
    <style:style style:name="P1147" style:family="paragraph" style:parent-style-name="Standard">
      <style:paragraph-properties fo:text-align="justify" style:justify-single-word="false"/>
      <style:text-properties style:use-window-font-color="true" loext:opacity="0%" fo:font-size="12pt" fo:font-style="normal" fo:font-weight="normal" officeooo:rsid="03b880f5" officeooo:paragraph-rsid="0623e8b1" style:font-size-asian="10.5pt" style:font-style-asian="normal" style:font-weight-asian="normal" style:font-size-complex="12pt" style:font-style-complex="normal" style:font-weight-complex="normal"/>
    </style:style>
    <style:style style:name="P1148" style:family="paragraph" style:parent-style-name="Standard">
      <style:paragraph-properties fo:text-align="justify" style:justify-single-word="false"/>
      <style:text-properties style:use-window-font-color="true" loext:opacity="0%" fo:font-size="12pt" fo:font-style="normal" fo:font-weight="normal" officeooo:rsid="03b880f5" officeooo:paragraph-rsid="03b880f5" style:font-size-asian="10.5pt" style:font-style-asian="normal" style:font-weight-asian="normal" style:font-size-complex="12pt" style:font-style-complex="normal" style:font-weight-complex="normal"/>
    </style:style>
    <style:style style:name="P1149" style:family="paragraph" style:parent-style-name="Standard">
      <style:paragraph-properties fo:text-align="justify" style:justify-single-word="false"/>
      <style:text-properties officeooo:paragraph-rsid="03b433e2"/>
    </style:style>
    <style:style style:name="P1150" style:family="paragraph" style:parent-style-name="Standard">
      <style:paragraph-properties fo:text-align="justify" style:justify-single-word="false"/>
      <style:text-properties style:use-window-font-color="true" loext:opacity="0%" fo:font-size="12pt" fo:font-style="normal" fo:font-weight="normal" officeooo:rsid="03b8ecb3" officeooo:paragraph-rsid="03b8ecb3" style:font-size-asian="10.5pt" style:font-style-asian="normal" style:font-weight-asian="normal" style:font-size-complex="12pt" style:font-style-complex="normal" style:font-weight-complex="normal"/>
    </style:style>
    <style:style style:name="P1151" style:family="paragraph" style:parent-style-name="Standard">
      <style:paragraph-properties fo:text-align="justify" style:justify-single-word="false"/>
      <style:text-properties style:use-window-font-color="true" loext:opacity="0%" fo:font-size="12pt" fo:font-style="normal" fo:font-weight="normal" officeooo:rsid="03b97dd7" officeooo:paragraph-rsid="0623e8b1" style:font-size-asian="10.5pt" style:font-style-asian="normal" style:font-weight-asian="normal" style:font-size-complex="12pt" style:font-style-complex="normal" style:font-weight-complex="normal"/>
    </style:style>
    <style:style style:name="P1152" style:family="paragraph" style:parent-style-name="Standard">
      <style:paragraph-properties fo:text-align="justify" style:justify-single-word="false"/>
      <style:text-properties officeooo:paragraph-rsid="0623e8b1"/>
    </style:style>
    <style:style style:name="P115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beac9b" fo:background-color="#ffffff" style:font-size-asian="11pt" style:font-size-complex="11pt"/>
    </style:style>
    <style:style style:name="P115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c0e7bb" fo:background-color="#ffffff" style:font-size-asian="11pt" style:font-size-complex="11pt"/>
    </style:style>
    <style:style style:name="P1155" style:family="paragraph" style:parent-style-name="Standard">
      <style:paragraph-properties fo:margin-left="0in" fo:margin-right="0in" style:line-height-at-least="0.198in" fo:text-indent="0in" style:auto-text-indent="false"/>
      <style:text-properties officeooo:paragraph-rsid="03beac9b"/>
    </style:style>
    <style:style style:name="P115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bfbf51" fo:background-color="#ffffff" style:font-size-asian="11pt" style:font-size-complex="11pt"/>
    </style:style>
    <style:style style:name="P1157" style:family="paragraph" style:parent-style-name="Standard">
      <style:paragraph-properties fo:margin-left="0in" fo:margin-right="0in" style:line-height-at-least="0.198in" fo:text-indent="0in" style:auto-text-indent="false"/>
      <style:text-properties style:font-name="Courier" fo:font-size="11pt" officeooo:paragraph-rsid="03beac9b" style:font-size-asian="11pt" style:font-size-complex="11pt"/>
    </style:style>
    <style:style style:name="P1158" style:family="paragraph" style:parent-style-name="Standard">
      <style:paragraph-properties fo:text-align="center" style:justify-single-word="false"/>
      <style:text-properties style:use-window-font-color="true" loext:opacity="0%" fo:font-size="12pt" fo:font-style="normal" fo:font-weight="bold" officeooo:rsid="03beac9b" officeooo:paragraph-rsid="03beac9b" style:font-size-asian="10.5pt" style:font-style-asian="normal" style:font-weight-asian="bold" style:font-size-complex="12pt" style:font-style-complex="normal" style:font-weight-complex="bold"/>
    </style:style>
    <style:style style:name="P1159" style:family="paragraph" style:parent-style-name="Standard">
      <style:paragraph-properties fo:text-align="justify" style:justify-single-word="false"/>
      <style:text-properties style:use-window-font-color="true" loext:opacity="0%" fo:font-size="12pt" fo:font-style="normal" fo:font-weight="normal" officeooo:rsid="03c2eb3e" officeooo:paragraph-rsid="03c2eb3e" style:font-size-asian="10.5pt" style:font-style-asian="normal" style:font-weight-asian="normal" style:font-size-complex="12pt" style:font-style-complex="normal" style:font-weight-complex="normal"/>
    </style:style>
    <style:style style:name="P1160" style:family="paragraph" style:parent-style-name="Table_20_Contents">
      <style:paragraph-properties fo:text-align="justify" style:justify-single-word="false"/>
      <style:text-properties fo:font-size="12pt" officeooo:paragraph-rsid="03c2eb3e" style:font-size-asian="12pt" style:font-size-complex="12pt"/>
    </style:style>
    <style:style style:name="P1161" style:family="paragraph" style:parent-style-name="Standard">
      <style:paragraph-properties fo:text-align="justify" style:justify-single-word="false"/>
      <style:text-properties officeooo:paragraph-rsid="03c2eb3e"/>
    </style:style>
    <style:style style:name="P1162" style:family="paragraph" style:parent-style-name="Standard">
      <style:paragraph-properties fo:text-align="justify" style:justify-single-word="false"/>
      <style:text-properties style:use-window-font-color="true" loext:opacity="0%" fo:font-size="12pt" fo:font-weight="normal" officeooo:rsid="00679be2" officeooo:paragraph-rsid="00679be2" style:font-size-asian="10.5pt" style:font-weight-asian="normal" style:font-size-complex="12pt" style:font-weight-complex="normal"/>
    </style:style>
    <style:style style:name="P1163" style:family="paragraph" style:parent-style-name="Standard">
      <style:paragraph-properties fo:text-align="center" style:justify-single-word="false"/>
      <style:text-properties style:use-window-font-color="true" loext:opacity="0%" fo:font-size="13pt" fo:font-weight="bold" officeooo:rsid="05ccc8ae" officeooo:paragraph-rsid="05ccc8ae" style:font-size-asian="13pt" style:font-weight-asian="bold" style:font-size-complex="13pt" style:font-weight-complex="bold"/>
    </style:style>
    <style:style style:name="P1164" style:family="paragraph" style:parent-style-name="Standard">
      <style:paragraph-properties fo:text-align="justify" style:justify-single-word="false"/>
      <style:text-properties style:use-window-font-color="true" loext:opacity="0%" fo:font-size="12pt" fo:font-weight="normal" officeooo:rsid="03c71af2" officeooo:paragraph-rsid="03c71af2" style:font-size-asian="10.5pt" style:font-weight-asian="normal" style:font-size-complex="12pt" style:font-weight-complex="normal"/>
    </style:style>
    <style:style style:name="P1165" style:family="paragraph" style:parent-style-name="Standard">
      <style:paragraph-properties fo:text-align="justify" style:justify-single-word="false"/>
      <style:text-properties officeooo:paragraph-rsid="03c71af2"/>
    </style:style>
    <style:style style:name="P1166" style:family="paragraph" style:parent-style-name="Table_20_Contents">
      <style:paragraph-properties fo:text-align="right" style:justify-single-word="false"/>
      <style:text-properties fo:color="#00a933" loext:opacity="100%" style:font-name="Courier" fo:font-size="10pt" fo:font-style="italic" officeooo:rsid="03c71af2" officeooo:paragraph-rsid="03c71af2" style:font-size-asian="10pt" style:font-style-asian="italic" style:font-size-complex="10pt" style:font-style-complex="italic"/>
    </style:style>
    <style:style style:name="P1167" style:family="paragraph" style:parent-style-name="Standard">
      <style:paragraph-properties fo:text-align="justify" style:justify-single-word="false"/>
      <style:text-properties officeooo:paragraph-rsid="0625d97e"/>
    </style:style>
    <style:style style:name="P1168" style:family="paragraph" style:parent-style-name="Standard">
      <style:paragraph-properties fo:text-align="justify" style:justify-single-word="false"/>
      <style:text-properties style:use-window-font-color="true" loext:opacity="0%" fo:font-size="12pt" fo:font-weight="normal" officeooo:rsid="03c8f2de" officeooo:paragraph-rsid="03c8f2de" style:font-size-asian="10.5pt" style:font-weight-asian="normal" style:font-size-complex="12pt" style:font-weight-complex="normal"/>
    </style:style>
    <style:style style:name="P1169" style:family="paragraph" style:parent-style-name="Standard">
      <style:paragraph-properties fo:text-align="justify" style:justify-single-word="false"/>
      <style:text-properties fo:color="#0000ff" loext:opacity="100%" style:font-name="Courier" fo:font-size="11pt" fo:font-weight="normal" fo:background-color="#ffffff" style:font-size-asian="9.60000038146973pt" style:font-size-complex="11pt"/>
    </style:style>
    <style:style style:name="P1170" style:family="paragraph" style:parent-style-name="Standard">
      <style:paragraph-properties fo:text-align="justify" style:justify-single-word="false"/>
      <style:text-properties style:use-window-font-color="true" loext:opacity="0%" fo:font-size="12pt" fo:font-weight="normal" officeooo:rsid="03ce5603" officeooo:paragraph-rsid="03ce5603" style:font-size-asian="10.5pt" style:font-weight-asian="normal" style:font-size-complex="12pt" style:font-weight-complex="normal"/>
    </style:style>
    <style:style style:name="P117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ce5603" fo:background-color="#ffffff" style:font-size-asian="11pt" style:font-size-complex="11pt"/>
    </style:style>
    <style:style style:name="P1172" style:family="paragraph" style:parent-style-name="Table_20_Contents">
      <style:paragraph-properties fo:text-align="justify" style:justify-single-word="false"/>
      <style:text-properties fo:font-size="12pt" officeooo:rsid="03ce5603" officeooo:paragraph-rsid="03ce5603" style:font-size-asian="10.5pt" style:font-size-complex="12pt"/>
    </style:style>
    <style:style style:name="P1173" style:family="paragraph" style:parent-style-name="Standard">
      <style:paragraph-properties fo:margin-left="0in" fo:margin-right="0in" style:line-height-at-least="0.198in" fo:text-align="center" style:justify-single-word="false" fo:text-indent="0in" style:auto-text-indent="false"/>
      <style:text-properties officeooo:paragraph-rsid="03ce5603"/>
    </style:style>
    <style:style style:name="P117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cfc68a" fo:background-color="#ffffff" style:font-size-asian="11pt" style:font-size-complex="11pt"/>
    </style:style>
    <style:style style:name="P1175" style:family="paragraph" style:parent-style-name="Standard">
      <style:paragraph-properties fo:margin-left="0in" fo:margin-right="0in" style:line-height-at-least="0.198in" fo:text-indent="0in" style:auto-text-indent="false"/>
      <style:text-properties style:font-name="Courier" fo:font-size="11pt" officeooo:paragraph-rsid="03cfc68a" style:font-size-asian="11pt" style:font-size-complex="11pt"/>
    </style:style>
    <style:style style:name="P1176" style:family="paragraph" style:parent-style-name="Standard">
      <style:paragraph-properties fo:margin-left="0in" fo:margin-right="0in" style:line-height-at-least="0.198in" fo:text-indent="0in" style:auto-text-indent="false"/>
      <style:text-properties style:use-window-font-color="true" loext:opacity="0%" style:font-name="Courier" fo:font-size="10pt" fo:font-weight="normal" officeooo:rsid="03cfc68a" officeooo:paragraph-rsid="03cfc68a" fo:background-color="#ffffff" style:font-size-asian="10pt" style:font-size-complex="10pt"/>
    </style:style>
    <style:style style:name="P1177" style:family="paragraph" style:parent-style-name="Standard">
      <style:paragraph-properties fo:margin-left="0in" fo:margin-right="0in" style:line-height-at-least="0.198in" fo:text-indent="0in" style:auto-text-indent="false"/>
      <style:text-properties officeooo:paragraph-rsid="03cfc68a"/>
    </style:style>
    <style:style style:name="P1178" style:family="paragraph" style:parent-style-name="Standard">
      <style:paragraph-properties fo:text-align="center" style:justify-single-word="false"/>
      <style:text-properties style:use-window-font-color="true" loext:opacity="0%" fo:font-size="12pt" fo:font-weight="bold" officeooo:rsid="03cfc68a" officeooo:paragraph-rsid="03cfc68a" style:font-size-asian="10.5pt" style:font-weight-asian="bold" style:font-size-complex="12pt" style:font-weight-complex="bold"/>
    </style:style>
    <style:style style:name="P1179" style:family="paragraph" style:parent-style-name="Standard">
      <style:paragraph-properties fo:text-align="justify" style:justify-single-word="false"/>
      <style:text-properties style:use-window-font-color="true" loext:opacity="0%" fo:font-size="12pt" fo:font-weight="normal" officeooo:rsid="03d4694e" officeooo:paragraph-rsid="03d4694e" style:font-size-asian="10.5pt" style:font-weight-asian="normal" style:font-size-complex="12pt" style:font-weight-complex="normal"/>
    </style:style>
    <style:style style:name="P1180" style:family="paragraph" style:parent-style-name="Table_20_Contents">
      <style:paragraph-properties fo:text-align="justify" style:justify-single-word="false"/>
      <style:text-properties fo:font-size="12pt" officeooo:paragraph-rsid="03d4694e" style:font-size-asian="12pt" style:font-size-complex="12pt"/>
    </style:style>
    <style:style style:name="P1181" style:family="paragraph" style:parent-style-name="Standard">
      <style:paragraph-properties fo:text-align="justify" style:justify-single-word="false"/>
      <style:text-properties style:use-window-font-color="true" loext:opacity="0%" fo:font-size="12pt" fo:font-weight="normal" officeooo:rsid="03e1f5ec" officeooo:paragraph-rsid="03e1f5ec" style:font-size-asian="10.5pt" style:font-weight-asian="normal" style:font-size-complex="12pt" style:font-weight-complex="normal"/>
    </style:style>
    <style:style style:name="P1182" style:family="paragraph" style:parent-style-name="Standard">
      <style:paragraph-properties fo:text-align="justify" style:justify-single-word="false"/>
      <style:text-properties officeooo:paragraph-rsid="03e1f5ec"/>
    </style:style>
    <style:style style:name="P1183" style:family="paragraph" style:parent-style-name="Standard">
      <style:paragraph-properties fo:text-align="justify" style:justify-single-word="false"/>
      <style:text-properties style:use-window-font-color="true" loext:opacity="0%" fo:font-size="12pt" fo:font-weight="normal" officeooo:rsid="0625d97e" officeooo:paragraph-rsid="03e1f5ec" style:font-size-asian="10.5pt" style:font-weight-asian="normal" style:font-size-complex="12pt" style:font-weight-complex="normal"/>
    </style:style>
    <style:style style:name="P1184" style:family="paragraph" style:parent-style-name="Table_20_Contents">
      <style:paragraph-properties fo:text-align="justify" style:justify-single-word="false"/>
      <style:text-properties fo:font-size="12pt" officeooo:paragraph-rsid="03dcb6ad" style:font-size-asian="12pt" style:font-size-complex="12pt"/>
    </style:style>
    <style:style style:name="P1185" style:family="paragraph" style:parent-style-name="Standard">
      <style:paragraph-properties fo:text-align="justify" style:justify-single-word="false"/>
      <style:text-properties style:use-window-font-color="true" loext:opacity="0%" fo:font-size="12pt" fo:font-weight="normal" officeooo:rsid="03dcb6ad" officeooo:paragraph-rsid="03dcb6ad" style:font-size-asian="10.5pt" style:font-weight-asian="normal" style:font-size-complex="12pt" style:font-weight-complex="normal"/>
    </style:style>
    <style:style style:name="P1186" style:family="paragraph" style:parent-style-name="Standard">
      <style:paragraph-properties fo:text-align="justify" style:justify-single-word="false"/>
      <style:text-properties officeooo:paragraph-rsid="03df6987"/>
    </style:style>
    <style:style style:name="P1187" style:family="paragraph" style:parent-style-name="Standard">
      <style:paragraph-properties fo:text-align="justify" style:justify-single-word="false"/>
      <style:text-properties style:use-window-font-color="true" loext:opacity="0%" fo:font-size="12pt" fo:font-weight="normal" officeooo:rsid="03df6987" officeooo:paragraph-rsid="03df6987" style:font-size-asian="10.5pt" style:font-weight-asian="normal" style:font-size-complex="12pt" style:font-weight-complex="normal"/>
    </style:style>
    <style:style style:name="P1188" style:family="paragraph" style:parent-style-name="Standard">
      <style:paragraph-properties fo:text-align="justify" style:justify-single-word="false"/>
      <style:text-properties style:use-window-font-color="true" loext:opacity="0%" style:font-name="Courier" fo:font-size="11pt" fo:font-weight="normal" officeooo:rsid="03cf5d6c" officeooo:paragraph-rsid="03cf5d6c" style:font-size-asian="11pt" style:font-weight-asian="normal" style:font-size-complex="11pt" style:font-weight-complex="normal"/>
    </style:style>
    <style:style style:name="P1189" style:family="paragraph" style:parent-style-name="Table_20_Contents">
      <style:paragraph-properties fo:text-align="justify" style:justify-single-word="false"/>
      <style:text-properties fo:font-size="12pt" officeooo:rsid="03df6987" officeooo:paragraph-rsid="03df6987" style:font-size-asian="10.5pt" style:font-size-complex="12pt"/>
    </style:style>
    <style:style style:name="P1190" style:family="paragraph" style:parent-style-name="Table_20_Contents">
      <style:paragraph-properties fo:text-align="left" style:justify-single-word="false"/>
      <style:text-properties fo:font-size="12pt" officeooo:paragraph-rsid="03df6987" style:font-size-asian="10.5pt" style:font-size-complex="12pt"/>
    </style:style>
    <style:style style:name="P1191" style:family="paragraph" style:parent-style-name="Table_20_Contents">
      <style:paragraph-properties fo:text-align="left" style:justify-single-word="false"/>
      <style:text-properties fo:font-size="12pt" officeooo:rsid="03df6987" officeooo:paragraph-rsid="03df6987" style:font-size-asian="10.5pt" style:font-size-complex="12pt"/>
    </style:style>
    <style:style style:name="P1192" style:family="paragraph" style:parent-style-name="Standard">
      <style:paragraph-properties fo:text-align="center" style:justify-single-word="false"/>
      <style:text-properties style:use-window-font-color="true" loext:opacity="0%" fo:font-size="12pt" fo:font-weight="normal" officeooo:rsid="03e1ef08" officeooo:paragraph-rsid="03e1ef08" style:font-size-asian="10.5pt" style:font-weight-asian="normal" style:font-size-complex="12pt" style:font-weight-complex="normal"/>
    </style:style>
    <style:style style:name="P1193" style:family="paragraph" style:parent-style-name="Standard">
      <style:paragraph-properties fo:text-align="center" style:justify-single-word="false"/>
      <style:text-properties officeooo:paragraph-rsid="03dcb6ad"/>
    </style:style>
    <style:style style:name="P1194" style:family="paragraph" style:parent-style-name="Standard">
      <style:paragraph-properties fo:text-align="justify" style:justify-single-word="false"/>
      <style:text-properties style:use-window-font-color="true" loext:opacity="0%" fo:font-size="12pt" fo:font-weight="normal" officeooo:rsid="03e91847" officeooo:paragraph-rsid="03e91847" style:font-size-asian="10.5pt" style:font-weight-asian="normal" style:font-size-complex="12pt" style:font-weight-complex="normal"/>
    </style:style>
    <style:style style:name="P119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eaea7d" fo:background-color="#ffffff" style:font-size-asian="11pt" style:font-size-complex="11pt"/>
    </style:style>
    <style:style style:name="P1196" style:family="paragraph" style:parent-style-name="Standard">
      <style:paragraph-properties fo:margin-left="0in" fo:margin-right="0in" style:line-height-at-least="0.198in" fo:text-indent="0in" style:auto-text-indent="false"/>
      <style:text-properties officeooo:paragraph-rsid="03eaea7d"/>
    </style:style>
    <style:style style:name="P1197" style:family="paragraph" style:parent-style-name="Standard">
      <style:paragraph-properties style:line-height-at-least="0.198in" fo:text-align="right" style:justify-single-word="false"/>
      <style:text-properties fo:color="#3faf46" loext:opacity="100%" style:font-name="Courier" fo:font-size="10pt" fo:font-style="italic" officeooo:rsid="03e939e5" officeooo:paragraph-rsid="03e939e5" style:font-size-asian="10pt" style:font-style-asian="italic" style:font-size-complex="10pt" style:font-style-complex="italic"/>
    </style:style>
    <style:style style:name="P1198" style:family="paragraph" style:parent-style-name="Standard">
      <style:paragraph-properties fo:text-align="justify" style:justify-single-word="false"/>
      <style:text-properties style:use-window-font-color="true" loext:opacity="0%" fo:font-size="12pt" fo:font-weight="normal" officeooo:rsid="03ecc8ff" officeooo:paragraph-rsid="03e1ef08" style:font-size-asian="10.5pt" style:font-weight-asian="normal" style:font-size-complex="12pt" style:font-weight-complex="normal"/>
    </style:style>
    <style:style style:name="P119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3f1fccc" fo:background-color="#ffffff" style:font-size-asian="11pt" style:font-size-complex="11pt"/>
    </style:style>
    <style:style style:name="P1200" style:family="paragraph" style:parent-style-name="Standard">
      <style:paragraph-properties fo:margin-left="0in" fo:margin-right="0in" style:line-height-at-least="0.198in" fo:text-indent="0in" style:auto-text-indent="false"/>
      <style:text-properties style:font-name="Courier" fo:font-size="11pt" officeooo:paragraph-rsid="03f1fccc" style:font-size-asian="11pt" style:font-size-complex="11pt"/>
    </style:style>
    <style:style style:name="P1201" style:family="paragraph" style:parent-style-name="Standard">
      <style:paragraph-properties fo:text-align="center" style:justify-single-word="false"/>
      <style:text-properties style:use-window-font-color="true" loext:opacity="0%" fo:font-size="12pt" fo:font-weight="bold" officeooo:rsid="03f1fccc" officeooo:paragraph-rsid="03f1fccc" style:font-size-asian="10.5pt" style:font-weight-asian="bold" style:font-size-complex="12pt" style:font-weight-complex="bold"/>
    </style:style>
    <style:style style:name="P1202" style:family="paragraph" style:parent-style-name="Standard">
      <style:paragraph-properties fo:text-align="justify" style:justify-single-word="false"/>
      <style:text-properties style:use-window-font-color="true" loext:opacity="0%" fo:font-size="12pt" fo:font-weight="normal" officeooo:rsid="03f1fccc" officeooo:paragraph-rsid="03f1fccc" style:font-size-asian="10.5pt" style:font-weight-asian="normal" style:font-size-complex="12pt" style:font-weight-complex="normal"/>
    </style:style>
    <style:style style:name="P1203" style:family="paragraph" style:parent-style-name="Standard">
      <style:paragraph-properties fo:text-align="justify" style:justify-single-word="false"/>
      <style:text-properties style:use-window-font-color="true" loext:opacity="0%" fo:font-size="12pt" fo:font-weight="normal" officeooo:rsid="03f6fea7" officeooo:paragraph-rsid="03f6fea7" style:font-size-asian="10.5pt" style:font-weight-asian="normal" style:font-size-complex="12pt" style:font-weight-complex="normal"/>
    </style:style>
    <style:style style:name="P1204" style:family="paragraph" style:parent-style-name="Table_20_Contents">
      <style:paragraph-properties fo:text-align="justify" style:justify-single-word="false"/>
      <style:text-properties fo:font-size="12pt" officeooo:paragraph-rsid="03f6fea7" style:font-size-asian="12pt" style:font-size-complex="12pt"/>
    </style:style>
    <style:style style:name="P1205" style:family="paragraph" style:parent-style-name="Standard">
      <style:paragraph-properties fo:text-align="justify" style:justify-single-word="false"/>
      <style:text-properties officeooo:paragraph-rsid="03e1ef08"/>
    </style:style>
    <style:style style:name="P1206" style:family="paragraph" style:parent-style-name="Standard">
      <style:paragraph-properties fo:text-align="justify" style:justify-single-word="false"/>
      <style:text-properties style:use-window-font-color="true" loext:opacity="0%" fo:font-size="12pt" fo:font-weight="normal" officeooo:rsid="03f6fea7" officeooo:paragraph-rsid="03e1ef08" style:font-size-asian="10.5pt" style:font-weight-asian="normal" style:font-size-complex="12pt" style:font-weight-complex="normal"/>
    </style:style>
    <style:style style:name="P1207" style:family="paragraph" style:parent-style-name="Table_20_Contents">
      <style:paragraph-properties fo:text-align="justify" style:justify-single-word="false"/>
      <style:text-properties fo:font-size="12pt" officeooo:paragraph-rsid="03f8aebe" style:font-size-asian="12pt" style:font-size-complex="12pt"/>
    </style:style>
    <style:style style:name="P1208" style:family="paragraph" style:parent-style-name="Table_20_Contents">
      <style:paragraph-properties fo:text-align="justify" style:justify-single-word="false"/>
      <style:text-properties fo:font-size="12pt" officeooo:rsid="03f8aebe" officeooo:paragraph-rsid="03f8aebe" style:font-size-asian="12pt" style:font-size-complex="12pt"/>
    </style:style>
    <style:style style:name="P1209" style:family="paragraph" style:parent-style-name="Standard">
      <style:paragraph-properties fo:text-align="justify" style:justify-single-word="false"/>
      <style:text-properties style:use-window-font-color="true" loext:opacity="0%" fo:font-size="12pt" fo:font-weight="normal" officeooo:rsid="03f6fea7" officeooo:paragraph-rsid="03f8aebe" style:font-size-asian="10.5pt" style:font-weight-asian="normal" style:font-size-complex="12pt" style:font-weight-complex="normal"/>
    </style:style>
    <style:style style:name="P1210" style:family="paragraph" style:parent-style-name="Standard">
      <style:paragraph-properties fo:text-align="justify" style:justify-single-word="false"/>
      <style:text-properties style:use-window-font-color="true" loext:opacity="0%" fo:font-size="12pt" fo:font-weight="normal" officeooo:rsid="03f9f6d2" officeooo:paragraph-rsid="03f9f6d2" style:font-size-asian="10.5pt" style:font-weight-asian="normal" style:font-size-complex="12pt" style:font-weight-complex="normal"/>
    </style:style>
    <style:style style:name="P1211" style:family="paragraph" style:parent-style-name="Standard">
      <style:paragraph-properties fo:text-align="justify" style:justify-single-word="false"/>
      <style:text-properties fo:color="#000000" loext:opacity="100%" style:font-name="Courier" fo:font-size="11pt" fo:font-weight="normal" officeooo:rsid="03f9f6d2" officeooo:paragraph-rsid="03f9f6d2" fo:background-color="#ffffff" style:font-size-asian="11pt" style:font-weight-asian="normal" style:font-size-complex="11pt" style:font-weight-complex="normal"/>
    </style:style>
    <style:style style:name="P1212" style:family="paragraph" style:parent-style-name="Standard">
      <style:paragraph-properties fo:text-align="justify" style:justify-single-word="false"/>
      <style:text-properties style:use-window-font-color="true" loext:opacity="0%" fo:font-size="12pt" fo:font-weight="normal" officeooo:rsid="03fabca9" officeooo:paragraph-rsid="03fabca9" style:font-size-asian="10.5pt" style:font-weight-asian="normal" style:font-size-complex="12pt" style:font-weight-complex="normal"/>
    </style:style>
    <style:style style:name="P1213" style:family="paragraph" style:parent-style-name="Table_20_Contents">
      <style:paragraph-properties fo:text-align="justify" style:justify-single-word="false"/>
      <style:text-properties fo:font-size="12pt" officeooo:paragraph-rsid="03fabca9" style:font-size-asian="12pt" style:font-size-complex="12pt"/>
    </style:style>
    <style:style style:name="P1214" style:family="paragraph" style:parent-style-name="Table_20_Contents">
      <style:paragraph-properties fo:text-align="justify" style:justify-single-word="false"/>
      <style:text-properties fo:font-size="12pt" officeooo:paragraph-rsid="03faf816" style:font-size-asian="12pt" style:font-size-complex="12pt"/>
    </style:style>
    <style:style style:name="P1215" style:family="paragraph" style:parent-style-name="Table_20_Contents">
      <style:paragraph-properties fo:text-align="justify" style:justify-single-word="false"/>
      <style:text-properties fo:font-size="12pt" officeooo:rsid="03fb34dc" officeooo:paragraph-rsid="03fb34dc" style:font-size-asian="12pt" style:font-size-complex="12pt"/>
    </style:style>
    <style:style style:name="P1216" style:family="paragraph" style:parent-style-name="Standard">
      <style:paragraph-properties fo:margin-left="0in" fo:margin-right="0in" style:line-height-at-least="0.198in" fo:text-indent="0in" style:auto-text-indent="false"/>
      <style:text-properties style:use-window-font-color="true" loext:opacity="0%" fo:font-size="12pt" fo:font-weight="normal" officeooo:rsid="03fabca9" style:font-size-asian="10.5pt" style:font-weight-asian="normal" style:font-size-complex="12pt" style:font-weight-complex="normal"/>
    </style:style>
    <style:style style:name="P1217" style:family="paragraph" style:parent-style-name="Standard">
      <style:paragraph-properties fo:margin-left="0in" fo:margin-right="0in" style:line-height-at-least="0.198in" fo:text-indent="0in" style:auto-text-indent="false"/>
      <style:text-properties style:use-window-font-color="true" loext:opacity="0%" fo:font-size="12pt" fo:font-weight="normal" officeooo:rsid="03fc07e1" officeooo:paragraph-rsid="03fb3d96" style:font-size-asian="10.5pt" style:font-weight-asian="normal" style:font-size-complex="12pt" style:font-weight-complex="normal"/>
    </style:style>
    <style:style style:name="P1218" style:family="paragraph" style:parent-style-name="Table_20_Contents">
      <style:paragraph-properties fo:text-align="justify" style:justify-single-word="false"/>
      <style:text-properties fo:font-size="12pt" officeooo:paragraph-rsid="03fc07e1" style:font-size-asian="12pt" style:font-size-complex="12pt"/>
    </style:style>
    <style:style style:name="P1219" style:family="paragraph" style:parent-style-name="Table_20_Contents">
      <style:paragraph-properties fo:text-align="justify" style:justify-single-word="false"/>
      <style:text-properties fo:font-size="12pt" officeooo:rsid="03fc07e1" officeooo:paragraph-rsid="03fc07e1" style:font-size-asian="12pt" style:font-size-complex="12pt"/>
    </style:style>
    <style:style style:name="P1220" style:family="paragraph" style:parent-style-name="Standard">
      <style:paragraph-properties fo:margin-left="0in" fo:margin-right="0in" style:line-height-at-least="0.198in" fo:text-indent="0in" style:auto-text-indent="false"/>
      <style:text-properties officeooo:paragraph-rsid="03fb3d96"/>
    </style:style>
    <style:style style:name="P1221" style:family="paragraph" style:parent-style-name="Standard">
      <style:paragraph-properties fo:text-align="justify" style:justify-single-word="false"/>
      <style:text-properties style:use-window-font-color="true" loext:opacity="0%" fo:font-size="12pt" fo:font-weight="normal" officeooo:rsid="03fcf3b2" officeooo:paragraph-rsid="03fc07e1" style:font-size-asian="10.5pt" style:font-weight-asian="normal" style:font-size-complex="12pt" style:font-weight-complex="normal"/>
    </style:style>
    <style:style style:name="P1222" style:family="paragraph" style:parent-style-name="Table_20_Contents">
      <style:paragraph-properties fo:text-align="justify" style:justify-single-word="false"/>
      <style:text-properties fo:font-size="12pt" officeooo:paragraph-rsid="03fcf3b2" style:font-size-asian="12pt" style:font-size-complex="12pt"/>
    </style:style>
    <style:style style:name="P1223" style:family="paragraph" style:parent-style-name="Table_20_Contents">
      <style:paragraph-properties fo:text-align="justify" style:justify-single-word="false"/>
      <style:text-properties fo:font-size="12pt" officeooo:rsid="03fcf3b2" officeooo:paragraph-rsid="03fcf3b2" style:font-size-asian="12pt" style:font-size-complex="12pt"/>
    </style:style>
    <style:style style:name="P1224" style:family="paragraph" style:parent-style-name="Standard">
      <style:paragraph-properties fo:margin-left="0in" fo:margin-right="0in" style:line-height-at-least="0.198in" fo:text-indent="0in" style:auto-text-indent="false"/>
      <style:text-properties style:use-window-font-color="true" loext:opacity="0%" fo:font-size="12pt" fo:font-weight="normal" officeooo:rsid="03fc07e1" officeooo:paragraph-rsid="03fcf3b2" style:font-size-asian="10.5pt" style:font-weight-asian="normal" style:font-size-complex="12pt" style:font-weight-complex="normal"/>
    </style:style>
    <style:style style:name="P1225" style:family="paragraph" style:parent-style-name="Standard">
      <style:paragraph-properties fo:text-align="justify" style:justify-single-word="false"/>
      <style:text-properties officeooo:paragraph-rsid="03fc07e1"/>
    </style:style>
    <style:style style:name="P1226" style:family="paragraph" style:parent-style-name="Footnote">
      <style:text-properties officeooo:paragraph-rsid="03fcf3b2"/>
    </style:style>
    <style:style style:name="P1227" style:family="paragraph" style:parent-style-name="Standard">
      <style:paragraph-properties fo:text-align="justify" style:justify-single-word="false"/>
      <style:text-properties style:use-window-font-color="true" loext:opacity="0%" fo:font-size="12pt" fo:font-weight="normal" officeooo:rsid="03fc07e1" officeooo:paragraph-rsid="03fc07e1" style:font-size-asian="10.5pt" style:font-weight-asian="normal" style:font-size-complex="12pt" style:font-weight-complex="normal"/>
    </style:style>
    <style:style style:name="P1228" style:family="paragraph" style:parent-style-name="Standard">
      <style:paragraph-properties fo:text-align="justify" style:justify-single-word="false"/>
      <style:text-properties style:use-window-font-color="true" loext:opacity="0%" fo:font-size="12pt" fo:font-weight="normal" officeooo:rsid="0627076d" officeooo:paragraph-rsid="03fc07e1" style:font-size-asian="10.5pt" style:font-weight-asian="normal" style:font-size-complex="12pt" style:font-weight-complex="normal"/>
    </style:style>
    <style:style style:name="P1229" style:family="paragraph" style:parent-style-name="Standard">
      <style:paragraph-properties fo:text-align="justify" style:justify-single-word="false"/>
      <style:text-properties style:use-window-font-color="true" loext:opacity="0%" fo:font-size="12pt" fo:font-weight="normal" officeooo:rsid="03fe8b5d" officeooo:paragraph-rsid="03fe8b5d" style:font-size-asian="10.5pt" style:font-weight-asian="normal" style:font-size-complex="12pt" style:font-weight-complex="normal"/>
    </style:style>
    <style:style style:name="P1230" style:family="paragraph" style:parent-style-name="Table_20_Contents">
      <style:paragraph-properties fo:text-align="center" style:justify-single-word="false"/>
      <style:text-properties fo:font-size="12pt" fo:font-weight="bold" officeooo:rsid="03fe8b5d" officeooo:paragraph-rsid="03fe8b5d" style:font-size-asian="10.5pt" style:font-weight-asian="bold" style:font-size-complex="12pt" style:font-weight-complex="bold"/>
    </style:style>
    <style:style style:name="P1231" style:family="paragraph" style:parent-style-name="Table_20_Contents">
      <style:paragraph-properties fo:text-align="justify" style:justify-single-word="false"/>
      <style:text-properties style:font-name="Courier" fo:font-size="10.5pt" style:font-size-asian="10.5pt" style:font-size-complex="10.5pt"/>
    </style:style>
    <style:style style:name="P1232" style:family="paragraph" style:parent-style-name="Table_20_Contents">
      <style:paragraph-properties fo:text-align="justify" style:justify-single-word="false"/>
      <style:text-properties fo:font-size="12pt" officeooo:rsid="03fe8b5d" officeooo:paragraph-rsid="03fe8b5d" style:font-size-asian="10.5pt" style:font-size-complex="12pt"/>
    </style:style>
    <style:style style:name="P1233" style:family="paragraph" style:parent-style-name="Table_20_Contents">
      <style:paragraph-properties fo:text-align="justify" style:justify-single-word="false"/>
      <style:text-properties style:font-name="Courier" fo:font-size="10.5pt" officeooo:rsid="03fe8b5d" style:font-size-asian="10.5pt" style:font-size-complex="10.5pt"/>
    </style:style>
    <style:style style:name="P1234" style:family="paragraph" style:parent-style-name="Table_20_Contents">
      <style:paragraph-properties fo:text-align="justify" style:justify-single-word="false"/>
      <style:text-properties style:font-name="Courier" fo:font-size="10.5pt" officeooo:rsid="03fe8b5d" officeooo:paragraph-rsid="03fe8b5d" style:font-size-asian="10.5pt" style:font-size-complex="10.5pt"/>
    </style:style>
    <style:style style:name="P1235" style:family="paragraph" style:parent-style-name="Standard">
      <style:paragraph-properties fo:text-align="center" style:justify-single-word="false"/>
      <style:text-properties style:use-window-font-color="true" loext:opacity="0%" fo:font-size="12pt" fo:font-weight="normal" officeooo:rsid="03fe8b5d" officeooo:paragraph-rsid="03fe8b5d" style:font-size-asian="10.5pt" style:font-weight-asian="normal" style:font-size-complex="12pt" style:font-weight-complex="normal"/>
    </style:style>
    <style:style style:name="P1236" style:family="paragraph" style:parent-style-name="Standard">
      <style:paragraph-properties fo:text-align="center" style:justify-single-word="false"/>
      <style:text-properties style:use-window-font-color="true" loext:opacity="0%" fo:font-size="18pt" fo:font-weight="bold" officeooo:rsid="039bb7e6" officeooo:paragraph-rsid="040617f7" style:font-size-asian="18pt" style:font-weight-asian="bold" style:font-size-complex="18pt" style:font-weight-complex="bold"/>
    </style:style>
    <style:style style:name="P1237" style:family="paragraph" style:parent-style-name="Standard">
      <style:paragraph-properties fo:text-align="justify" style:justify-single-word="false"/>
      <style:text-properties style:use-window-font-color="true" loext:opacity="0%" fo:font-size="12pt" fo:font-weight="normal" officeooo:rsid="039bb7e6" officeooo:paragraph-rsid="04007e14" style:font-size-asian="10.5pt" style:font-weight-asian="normal" style:font-size-complex="12pt" style:font-weight-complex="normal"/>
    </style:style>
    <style:style style:name="P1238" style:family="paragraph" style:parent-style-name="Standard">
      <style:paragraph-properties fo:text-align="justify" style:justify-single-word="false"/>
      <style:text-properties officeooo:paragraph-rsid="04078f13"/>
    </style:style>
    <style:style style:name="P1239" style:family="paragraph" style:parent-style-name="Footnote">
      <style:text-properties officeooo:paragraph-rsid="05ceecb0"/>
    </style:style>
    <style:style style:name="P1240" style:family="paragraph" style:parent-style-name="Standard">
      <style:paragraph-properties fo:text-align="justify" style:justify-single-word="false"/>
      <style:text-properties style:use-window-font-color="true" loext:opacity="0%" fo:font-size="12pt" fo:font-weight="normal" officeooo:rsid="0408d068" officeooo:paragraph-rsid="0408d068" style:font-size-asian="10.5pt" style:font-weight-asian="normal" style:font-size-complex="12pt" style:font-weight-complex="normal"/>
    </style:style>
    <style:style style:name="P1241" style:family="paragraph" style:parent-style-name="Standard">
      <style:paragraph-properties fo:text-align="justify" style:justify-single-word="false"/>
      <style:text-properties style:use-window-font-color="true" loext:opacity="0%" fo:font-size="12pt" fo:font-weight="normal" officeooo:rsid="0408d068" officeooo:paragraph-rsid="0408e5ec" style:font-size-asian="10.5pt" style:font-weight-asian="normal" style:font-size-complex="12pt" style:font-weight-complex="normal"/>
    </style:style>
    <style:style style:name="P1242" style:family="paragraph" style:parent-style-name="Table_20_Contents">
      <style:paragraph-properties fo:text-align="justify" style:justify-single-word="false"/>
      <style:text-properties fo:font-size="12pt" officeooo:rsid="040ad14d" officeooo:paragraph-rsid="040ad14d" style:font-size-asian="10.5pt" style:font-size-complex="12pt"/>
    </style:style>
    <style:style style:name="P1243" style:family="paragraph" style:parent-style-name="Standard">
      <style:paragraph-properties fo:text-align="center" style:justify-single-word="false"/>
      <style:text-properties style:use-window-font-color="true" loext:opacity="0%" fo:font-size="12pt" fo:font-weight="normal" officeooo:rsid="05a70ed4" officeooo:paragraph-rsid="05a70ed4" style:font-size-asian="10.5pt" style:font-weight-asian="normal" style:font-size-complex="12pt" style:font-weight-complex="normal"/>
    </style:style>
    <style:style style:name="P1244" style:family="paragraph" style:parent-style-name="Standard">
      <style:paragraph-properties fo:text-align="justify" style:justify-single-word="false"/>
      <style:text-properties style:use-window-font-color="true" loext:opacity="0%" fo:font-size="12pt" fo:font-weight="normal" officeooo:rsid="041c5f13" officeooo:paragraph-rsid="041c5f13" style:font-size-asian="10.5pt" style:font-weight-asian="normal" style:font-size-complex="12pt" style:font-weight-complex="normal"/>
    </style:style>
    <style:style style:name="P1245" style:family="paragraph" style:parent-style-name="Standard">
      <style:paragraph-properties fo:text-align="center" style:justify-single-word="false"/>
      <style:text-properties style:use-window-font-color="true" loext:opacity="0%" fo:font-size="13pt" fo:font-weight="bold" officeooo:rsid="045c450f" officeooo:paragraph-rsid="045c450f" style:font-size-asian="13pt" style:font-weight-asian="bold" style:font-size-complex="13pt" style:font-weight-complex="bold"/>
    </style:style>
    <style:style style:name="P1246" style:family="paragraph" style:parent-style-name="Standard">
      <style:paragraph-properties fo:text-align="justify" style:justify-single-word="false"/>
      <style:text-properties officeooo:paragraph-rsid="041c5f13"/>
    </style:style>
    <style:style style:name="P1247" style:family="paragraph" style:parent-style-name="Standard">
      <style:paragraph-properties fo:text-align="justify" style:justify-single-word="false"/>
      <style:text-properties style:use-window-font-color="true" loext:opacity="0%" fo:font-size="12pt" fo:font-weight="normal" officeooo:rsid="040c01d1" officeooo:paragraph-rsid="040c01d1" style:font-size-asian="10.5pt" style:font-weight-asian="normal" style:font-size-complex="12pt" style:font-weight-complex="normal"/>
    </style:style>
    <style:style style:name="P1248" style:family="paragraph" style:parent-style-name="Table_20_Contents">
      <style:paragraph-properties fo:text-align="justify" style:justify-single-word="false"/>
      <style:text-properties fo:font-size="12pt" officeooo:paragraph-rsid="040df2c9" style:font-size-asian="12pt" style:font-size-complex="12pt"/>
    </style:style>
    <style:style style:name="P1249" style:family="paragraph" style:parent-style-name="Table_20_Contents">
      <style:paragraph-properties fo:text-align="justify" style:justify-single-word="false"/>
      <style:text-properties style:use-window-font-color="true" loext:opacity="0%" fo:font-size="12pt" fo:font-weight="normal" officeooo:rsid="040df2c9" officeooo:paragraph-rsid="040df2c9" style:font-size-asian="10.5pt" style:font-weight-asian="normal" style:font-size-complex="12pt" style:font-weight-complex="normal"/>
    </style:style>
    <style:style style:name="P1250" style:family="paragraph" style:parent-style-name="Standard">
      <style:paragraph-properties fo:text-align="justify" style:justify-single-word="false"/>
      <style:text-properties style:use-window-font-color="true" loext:opacity="0%" fo:font-size="12pt" fo:font-weight="normal" officeooo:rsid="040df2c9" officeooo:paragraph-rsid="04078f13" style:font-size-asian="10.5pt" style:font-weight-asian="normal" style:font-size-complex="12pt" style:font-weight-complex="normal"/>
    </style:style>
    <style:style style:name="P125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223cc7" fo:background-color="#ffffff" style:font-size-asian="11pt" style:font-size-complex="11pt"/>
    </style:style>
    <style:style style:name="P1252" style:family="paragraph" style:parent-style-name="Standard">
      <style:paragraph-properties fo:margin-left="0in" fo:margin-right="0in" style:line-height-at-least="0.198in" fo:text-indent="0in" style:auto-text-indent="false"/>
      <style:text-properties officeooo:paragraph-rsid="04223cc7"/>
    </style:style>
    <style:style style:name="P1253"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4223cc7" fo:background-color="#ffffff" style:font-size-asian="11pt" style:font-size-complex="11pt"/>
    </style:style>
    <style:style style:name="P125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253470" fo:background-color="#ffffff" style:font-size-asian="11pt" style:font-size-complex="11pt"/>
    </style:style>
    <style:style style:name="P1255" style:family="paragraph" style:parent-style-name="Standard">
      <style:paragraph-properties fo:margin-left="0in" fo:margin-right="0in" style:line-height-at-least="0.198in" fo:text-indent="0in" style:auto-text-indent="false"/>
      <style:text-properties officeooo:paragraph-rsid="04253470"/>
    </style:style>
    <style:style style:name="P1256" style:family="paragraph" style:parent-style-name="Standard">
      <style:paragraph-properties fo:margin-left="0in" fo:margin-right="0in" style:line-height-at-least="0.198in" fo:text-indent="0in" style:auto-text-indent="false"/>
      <style:text-properties style:font-name="Courier" fo:font-size="11pt" officeooo:paragraph-rsid="04223cc7" style:font-size-asian="11pt" style:font-size-complex="11pt"/>
    </style:style>
    <style:style style:name="P1257" style:family="paragraph" style:parent-style-name="Standard">
      <style:paragraph-properties fo:text-align="center" style:justify-single-word="false"/>
      <style:text-properties style:use-window-font-color="true" loext:opacity="0%" fo:font-size="12pt" fo:font-weight="normal" officeooo:rsid="04223cc7" officeooo:paragraph-rsid="04223cc7" style:font-size-asian="10.5pt" style:font-weight-asian="normal" style:font-size-complex="12pt" style:font-weight-complex="normal"/>
    </style:style>
    <style:style style:name="P1258" style:family="paragraph" style:parent-style-name="Standard">
      <style:paragraph-properties fo:text-align="justify" style:justify-single-word="false"/>
      <style:text-properties style:use-window-font-color="true" loext:opacity="0%" fo:font-size="12pt" fo:font-weight="normal" officeooo:rsid="04117df0" officeooo:paragraph-rsid="04117df0" style:font-size-asian="10.5pt" style:font-weight-asian="normal" style:font-size-complex="12pt" style:font-weight-complex="normal"/>
    </style:style>
    <style:style style:name="P1259" style:family="paragraph" style:parent-style-name="Standard">
      <style:paragraph-properties fo:text-align="justify" style:justify-single-word="false"/>
      <style:text-properties officeooo:paragraph-rsid="04117df0"/>
    </style:style>
    <style:style style:name="P1260" style:family="paragraph" style:parent-style-name="Standard">
      <style:paragraph-properties fo:text-align="justify" style:justify-single-word="false"/>
      <style:text-properties style:use-window-font-color="true" loext:opacity="0%" fo:font-size="12pt" fo:font-weight="normal" officeooo:rsid="040c01d1" officeooo:paragraph-rsid="04130975" style:font-size-asian="10.5pt" style:font-weight-asian="normal" style:font-size-complex="12pt" style:font-weight-complex="normal"/>
    </style:style>
    <style:style style:name="P1261" style:family="paragraph" style:parent-style-name="Table_20_Contents">
      <style:paragraph-properties fo:text-align="justify" style:justify-single-word="false"/>
      <style:text-properties fo:font-size="12pt" officeooo:paragraph-rsid="04130975" style:font-size-asian="12pt" style:font-size-complex="12pt"/>
    </style:style>
    <style:style style:name="P1262" style:family="paragraph" style:parent-style-name="Table_20_Contents">
      <style:paragraph-properties fo:text-align="justify" style:justify-single-word="false"/>
      <style:text-properties style:use-window-font-color="true" loext:opacity="0%" fo:font-size="12pt" fo:font-weight="normal" officeooo:rsid="04130975" officeooo:paragraph-rsid="04130975" style:font-size-asian="10.5pt" style:font-weight-asian="normal" style:font-size-complex="12pt" style:font-weight-complex="normal"/>
    </style:style>
    <style:style style:name="P1263" style:family="paragraph" style:parent-style-name="Standard">
      <style:paragraph-properties fo:margin-left="0in" fo:margin-right="0in" style:line-height-at-least="0.198in" fo:text-indent="0in" style:auto-text-indent="false"/>
      <style:text-properties officeooo:paragraph-rsid="041486b3"/>
    </style:style>
    <style:style style:name="P1264" style:family="paragraph" style:parent-style-name="Table_20_Contents">
      <style:paragraph-properties fo:text-align="right" style:justify-single-word="false"/>
      <style:text-properties fo:color="#00a933" loext:opacity="100%" style:font-name="Courier" fo:font-size="10pt" fo:font-style="italic" officeooo:rsid="041486b3" officeooo:paragraph-rsid="041486b3" style:font-size-asian="10pt" style:font-style-asian="italic" style:font-size-complex="10pt" style:font-style-complex="italic"/>
    </style:style>
    <style:style style:name="P1265" style:family="paragraph" style:parent-style-name="Standard">
      <style:paragraph-properties fo:text-align="justify" style:justify-single-word="false"/>
      <style:text-properties officeooo:paragraph-rsid="0418adee"/>
    </style:style>
    <style:style style:name="P1266" style:family="paragraph" style:parent-style-name="Standard">
      <style:paragraph-properties fo:text-align="justify" style:justify-single-word="false"/>
      <style:text-properties style:use-window-font-color="true" loext:opacity="0%" fo:font-size="12pt" fo:font-weight="normal" officeooo:rsid="0417088e" officeooo:paragraph-rsid="0418adee" style:font-size-asian="10.5pt" style:font-weight-asian="normal" style:font-size-complex="12pt" style:font-weight-complex="normal"/>
    </style:style>
    <style:style style:name="P1267" style:family="paragraph" style:parent-style-name="Standard">
      <style:paragraph-properties style:line-height-at-least="0.198in" fo:text-align="right" style:justify-single-word="false"/>
      <style:text-properties fo:color="#00a933" loext:opacity="100%" style:font-name="Courier" fo:font-size="10pt" fo:font-style="italic" officeooo:rsid="042e1f59" officeooo:paragraph-rsid="042e1f59" style:font-size-asian="10pt" style:font-style-asian="italic" style:font-size-complex="10pt" style:font-style-complex="italic"/>
    </style:style>
    <style:style style:name="P1268" style:family="paragraph" style:parent-style-name="Standard">
      <style:paragraph-properties fo:text-align="justify" style:justify-single-word="false"/>
      <style:text-properties officeooo:paragraph-rsid="0628ce8a"/>
    </style:style>
    <style:style style:name="P1269" style:family="paragraph" style:parent-style-name="Standard">
      <style:paragraph-properties fo:text-align="justify" style:justify-single-word="false"/>
      <style:text-properties style:use-window-font-color="true" loext:opacity="0%" fo:font-size="12pt" fo:font-weight="normal" officeooo:rsid="04316453" officeooo:paragraph-rsid="04316453" style:font-size-asian="10.5pt" style:font-weight-asian="normal" style:font-size-complex="12pt" style:font-weight-complex="normal"/>
    </style:style>
    <style:style style:name="P1270" style:family="paragraph" style:parent-style-name="Standard">
      <style:paragraph-properties fo:text-align="justify" style:justify-single-word="false"/>
      <style:text-properties style:use-window-font-color="true" loext:opacity="0%" style:font-name="Courier" fo:font-size="12pt" fo:font-weight="normal" officeooo:rsid="04130975" officeooo:paragraph-rsid="0418adee" style:font-size-asian="10.5pt" style:font-weight-asian="normal" style:font-size-complex="12pt" style:font-weight-complex="normal"/>
    </style:style>
    <style:style style:name="P1271" style:family="paragraph" style:parent-style-name="Standard">
      <style:paragraph-properties fo:text-align="center" style:justify-single-word="false"/>
      <style:text-properties officeooo:paragraph-rsid="0418adee"/>
    </style:style>
    <style:style style:name="P1272" style:family="paragraph" style:parent-style-name="Standard">
      <style:paragraph-properties fo:text-align="justify" style:justify-single-word="false"/>
      <style:text-properties style:use-window-font-color="true" loext:opacity="0%" fo:font-size="12pt" fo:font-weight="normal" officeooo:rsid="0432432f" officeooo:paragraph-rsid="0418adee" style:font-size-asian="10.5pt" style:font-weight-asian="normal" style:font-size-complex="12pt" style:font-weight-complex="normal"/>
    </style:style>
    <style:style style:name="P1273" style:family="paragraph" style:parent-style-name="Standard">
      <style:paragraph-properties fo:text-align="justify" style:justify-single-word="false"/>
      <style:text-properties style:use-window-font-color="true" loext:opacity="0%" fo:font-size="12pt" fo:font-weight="normal" officeooo:rsid="0432432f" officeooo:paragraph-rsid="0432432f" style:font-size-asian="10.5pt" style:font-weight-asian="normal" style:font-size-complex="12pt" style:font-weight-complex="normal"/>
    </style:style>
    <style:style style:name="P1274" style:family="paragraph" style:parent-style-name="Standard">
      <style:paragraph-properties fo:margin-left="0in" fo:margin-right="0in" style:line-height-at-least="0.198in" fo:text-indent="0in" style:auto-text-indent="false"/>
      <style:text-properties style:font-name="Courier" fo:font-size="10.5pt" style:font-size-asian="10.5pt" style:font-size-complex="10.5pt"/>
    </style:style>
    <style:style style:name="P1275" style:family="paragraph" style:parent-style-name="Standard">
      <style:paragraph-properties style:line-height-at-least="0.198in"/>
      <style:text-properties style:font-name="Courier" fo:font-size="10.5pt" style:font-size-asian="10.5pt" style:font-size-complex="10.5pt"/>
    </style:style>
    <style:style style:name="P1276" style:family="paragraph" style:parent-style-name="Table_20_Contents">
      <style:paragraph-properties fo:text-align="right" style:justify-single-word="false"/>
      <style:text-properties fo:color="#00a933" loext:opacity="100%" style:font-name="Courier" fo:font-size="10pt" fo:font-style="italic" officeooo:rsid="04337630" officeooo:paragraph-rsid="04337630" style:font-size-asian="10pt" style:font-style-asian="italic" style:font-size-complex="10pt" style:font-style-complex="italic"/>
    </style:style>
    <style:style style:name="P1277" style:family="paragraph" style:parent-style-name="Standard">
      <style:paragraph-properties fo:text-align="justify" style:justify-single-word="false"/>
      <style:text-properties style:use-window-font-color="true" loext:opacity="0%" fo:font-size="12pt" fo:font-weight="normal" officeooo:rsid="043a7912" officeooo:paragraph-rsid="043a7912" style:font-size-asian="10.5pt" style:font-weight-asian="normal" style:font-size-complex="12pt" style:font-weight-complex="normal"/>
    </style:style>
    <style:style style:name="P1278" style:family="paragraph" style:parent-style-name="Standard">
      <style:paragraph-properties fo:margin-left="0in" fo:margin-right="0in" style:line-height-at-least="0.198in" fo:text-indent="0in" style:auto-text-indent="false"/>
      <style:text-properties style:font-name="Courier" fo:font-size="10.5pt" officeooo:paragraph-rsid="043c781f" style:font-size-asian="10.5pt" style:font-size-complex="10.5pt"/>
    </style:style>
    <style:style style:name="P1279" style:family="paragraph" style:parent-style-name="Standard">
      <style:paragraph-properties style:line-height-at-least="0.198in"/>
      <style:text-properties style:font-name="Courier" fo:font-size="11pt" officeooo:paragraph-rsid="043c781f" style:font-size-asian="11pt" style:font-size-complex="11pt"/>
    </style:style>
    <style:style style:name="P1280" style:family="paragraph" style:parent-style-name="Standard">
      <style:paragraph-properties fo:margin-left="0in" fo:margin-right="0in" style:line-height-at-least="0.198in" fo:text-indent="0in" style:auto-text-indent="false"/>
      <style:text-properties officeooo:paragraph-rsid="043c781f"/>
    </style:style>
    <style:style style:name="P1281" style:family="paragraph" style:parent-style-name="Standard">
      <style:paragraph-properties fo:margin-left="0in" fo:margin-right="0in" style:line-height-at-least="0.198in" fo:text-indent="0in" style:auto-text-indent="false"/>
      <style:text-properties style:font-name="Courier" fo:font-size="11pt" officeooo:paragraph-rsid="043c781f" style:font-size-asian="11pt" style:font-size-complex="11pt"/>
    </style:style>
    <style:style style:name="P1282" style:family="paragraph" style:parent-style-name="Table_20_Contents">
      <style:paragraph-properties fo:text-align="right" style:justify-single-word="false"/>
      <style:text-properties fo:color="#00a933" loext:opacity="100%" style:font-name="Courier" fo:font-size="10pt" fo:font-style="italic" officeooo:rsid="04337630" officeooo:paragraph-rsid="043c781f" style:font-size-asian="10pt" style:font-style-asian="italic" style:font-size-complex="10pt" style:font-style-complex="italic"/>
    </style:style>
    <style:style style:name="P1283" style:family="paragraph" style:parent-style-name="Standard">
      <style:paragraph-properties fo:text-align="justify" style:justify-single-word="false"/>
      <style:text-properties style:use-window-font-color="true" loext:opacity="0%" fo:font-size="12pt" fo:font-weight="normal" officeooo:rsid="0432432f" officeooo:paragraph-rsid="043c781f" style:font-size-asian="10.5pt" style:font-weight-asian="normal" style:font-size-complex="12pt" style:font-weight-complex="normal"/>
    </style:style>
    <style:style style:name="P1284" style:family="paragraph" style:parent-style-name="Standard">
      <style:paragraph-properties fo:text-align="justify" style:justify-single-word="false"/>
      <style:text-properties style:use-window-font-color="true" loext:opacity="0%" fo:font-size="12pt" fo:font-weight="normal" officeooo:rsid="044402df" officeooo:paragraph-rsid="0418adee" style:font-size-asian="10.5pt" style:font-weight-asian="normal" style:font-size-complex="12pt" style:font-weight-complex="normal"/>
    </style:style>
    <style:style style:name="P1285" style:family="paragraph" style:parent-style-name="Standard">
      <style:paragraph-properties fo:text-align="justify" style:justify-single-word="false"/>
      <style:text-properties style:use-window-font-color="true" loext:opacity="0%" fo:font-size="12pt" fo:font-weight="normal" officeooo:rsid="04469a7e" officeooo:paragraph-rsid="0418adee" style:font-size-asian="10.5pt" style:font-weight-asian="normal" style:font-size-complex="12pt" style:font-weight-complex="normal"/>
    </style:style>
    <style:style style:name="P1286"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4469a7e" officeooo:paragraph-rsid="04469a7e" fo:background-color="#ffffff" style:font-size-asian="10pt" style:font-style-asian="italic" style:font-size-complex="10pt" style:font-style-complex="italic"/>
    </style:style>
    <style:style style:name="P1287" style:family="paragraph" style:parent-style-name="Standard">
      <style:paragraph-properties fo:text-align="justify" style:justify-single-word="false"/>
      <style:text-properties style:use-window-font-color="true" loext:opacity="0%" fo:font-size="12pt" fo:font-weight="normal" officeooo:rsid="0446fa43" officeooo:paragraph-rsid="0418adee" style:font-size-asian="10.5pt" style:font-weight-asian="normal" style:font-size-complex="12pt" style:font-weight-complex="normal"/>
    </style:style>
    <style:style style:name="P1288" style:family="paragraph" style:parent-style-name="Standard">
      <style:paragraph-properties fo:text-align="justify" style:justify-single-word="false"/>
      <style:text-properties officeooo:paragraph-rsid="044bdf88"/>
    </style:style>
    <style:style style:name="P1289" style:family="paragraph" style:parent-style-name="Standard">
      <style:paragraph-properties fo:text-align="justify" style:justify-single-word="false"/>
      <style:text-properties style:use-window-font-color="true" loext:opacity="0%" fo:font-size="12pt" fo:font-weight="normal" officeooo:rsid="0446fa43" officeooo:paragraph-rsid="0446fa43" style:font-size-asian="10.5pt" style:font-weight-asian="normal" style:font-size-complex="12pt" style:font-weight-complex="normal"/>
    </style:style>
    <style:style style:name="P1290" style:family="paragraph" style:parent-style-name="Table_20_Contents">
      <style:paragraph-properties fo:text-align="justify" style:justify-single-word="false"/>
      <style:text-properties fo:font-size="12pt" officeooo:paragraph-rsid="0446fa43" style:font-size-asian="12pt" style:font-size-complex="12pt"/>
    </style:style>
    <style:style style:name="P1291" style:family="paragraph" style:parent-style-name="Table_20_Contents">
      <style:paragraph-properties fo:text-align="justify" style:justify-single-word="false"/>
      <style:text-properties fo:font-size="12pt" officeooo:paragraph-rsid="0447596b" style:font-size-asian="12pt" style:font-size-complex="12pt"/>
    </style:style>
    <style:style style:name="P1292" style:family="paragraph" style:parent-style-name="Standard">
      <style:paragraph-properties fo:text-align="justify" style:justify-single-word="false"/>
      <style:text-properties style:use-window-font-color="true" loext:opacity="0%" fo:font-size="12pt" fo:font-weight="normal" officeooo:rsid="044bdf88" officeooo:paragraph-rsid="044bdf88" style:font-size-asian="10.5pt" style:font-weight-asian="normal" style:font-size-complex="12pt" style:font-weight-complex="normal"/>
    </style:style>
    <style:style style:name="P1293" style:family="paragraph" style:parent-style-name="Standard">
      <style:paragraph-properties fo:text-align="justify" style:justify-single-word="false"/>
      <style:text-properties fo:color="#000000" loext:opacity="100%" style:font-name="Courier" fo:font-size="10.5pt" fo:font-weight="normal" fo:background-color="#ffffff" style:font-size-asian="10.5pt" style:font-size-complex="10.5pt"/>
    </style:style>
    <style:style style:name="P1294" style:family="paragraph" style:parent-style-name="Standard">
      <style:paragraph-properties fo:margin-left="0in" fo:margin-right="0in" style:line-height-at-least="0.198in" fo:text-indent="0in" style:auto-text-indent="false"/>
      <style:text-properties officeooo:paragraph-rsid="044bdf88"/>
    </style:style>
    <style:style style:name="P1295"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fo:background-color="#ffffff" style:font-size-asian="10.5pt" style:font-size-complex="10.5pt"/>
    </style:style>
    <style:style style:name="P1296" style:family="paragraph" style:parent-style-name="Standard">
      <style:paragraph-properties fo:text-align="justify" style:justify-single-word="false"/>
      <style:text-properties style:use-window-font-color="true" loext:opacity="0%" style:font-name="Liberation Serif" fo:font-size="12pt" fo:font-weight="normal" officeooo:rsid="044bdf88" officeooo:paragraph-rsid="0418adee" style:font-size-asian="10.5pt" style:font-weight-asian="normal" style:font-size-complex="12pt" style:font-weight-complex="normal"/>
    </style:style>
    <style:style style:name="P1297" style:family="paragraph" style:parent-style-name="Standard">
      <style:paragraph-properties fo:text-align="justify" style:justify-single-word="false"/>
      <style:text-properties style:font-name="Liberation Serif" officeooo:rsid="04512d12" officeooo:paragraph-rsid="04512d12"/>
    </style:style>
    <style:style style:name="P1298" style:family="paragraph" style:parent-style-name="Standard">
      <style:paragraph-properties fo:text-align="justify" style:justify-single-word="false"/>
      <style:text-properties fo:color="#000000" loext:opacity="100%" style:font-name="Courier" fo:font-size="10.5pt" fo:font-weight="normal" officeooo:rsid="04512d12" officeooo:paragraph-rsid="04512d12" fo:background-color="#ffffff"/>
    </style:style>
    <style:style style:name="P1299" style:family="paragraph" style:parent-style-name="Standard">
      <style:paragraph-properties fo:text-align="justify" style:justify-single-word="false"/>
      <style:text-properties officeooo:paragraph-rsid="04512d12"/>
    </style:style>
    <style:style style:name="P1300" style:family="paragraph" style:parent-style-name="Standard">
      <style:paragraph-properties fo:text-align="justify" style:justify-single-word="false"/>
      <style:text-properties style:font-name="Liberation Serif" officeooo:rsid="04519293" officeooo:paragraph-rsid="04512d12"/>
    </style:style>
    <style:style style:name="P1301" style:family="paragraph" style:parent-style-name="Standard">
      <style:paragraph-properties fo:text-align="justify" style:justify-single-word="false"/>
      <style:text-properties style:font-name="Liberation Serif" officeooo:rsid="04519293" officeooo:paragraph-rsid="04519293"/>
    </style:style>
    <style:style style:name="P1302" style:family="paragraph" style:parent-style-name="Standard">
      <style:paragraph-properties fo:text-align="justify" style:justify-single-word="false"/>
      <style:text-properties fo:color="#000000" loext:opacity="100%" style:font-name="Courier" fo:font-size="10.5pt" fo:font-weight="normal" fo:background-color="#ffffff"/>
    </style:style>
    <style:style style:name="P1303" style:family="paragraph" style:parent-style-name="Standard">
      <style:paragraph-properties fo:text-align="justify" style:justify-single-word="false"/>
      <style:text-properties style:font-name="Liberation Serif" officeooo:rsid="0453e9e5" officeooo:paragraph-rsid="0453e9e5"/>
    </style:style>
    <style:style style:name="P1304" style:family="paragraph" style:parent-style-name="Standard">
      <style:paragraph-properties fo:text-align="justify" style:justify-single-word="false"/>
      <style:text-properties fo:color="#000000" loext:opacity="100%" style:font-name="Courier" fo:font-size="12pt" fo:font-weight="normal" officeooo:rsid="04512d12" officeooo:paragraph-rsid="04512d12" fo:background-color="#ffffff" style:font-size-asian="10.5pt" style:font-size-complex="12pt"/>
    </style:style>
    <style:style style:name="P1305" style:family="paragraph" style:parent-style-name="Table_20_Contents">
      <style:paragraph-properties fo:text-align="justify" style:justify-single-word="false"/>
      <style:text-properties style:font-name="Liberation Serif" officeooo:rsid="0453e9e5" officeooo:paragraph-rsid="0453e9e5"/>
    </style:style>
    <style:style style:name="P1306" style:family="paragraph" style:parent-style-name="Standard">
      <style:paragraph-properties fo:text-align="center" style:justify-single-word="false"/>
      <style:text-properties officeooo:paragraph-rsid="04512d12"/>
    </style:style>
    <style:style style:name="P1307" style:family="paragraph" style:parent-style-name="Standard">
      <style:paragraph-properties fo:text-align="center" style:justify-single-word="false"/>
      <style:text-properties officeooo:paragraph-rsid="045de84c"/>
    </style:style>
    <style:style style:name="P1308" style:family="paragraph" style:parent-style-name="Standard">
      <style:paragraph-properties fo:text-align="justify" style:justify-single-word="false"/>
      <style:text-properties style:font-name="Liberation Serif" officeooo:rsid="045a6b5f" officeooo:paragraph-rsid="04512d12"/>
    </style:style>
    <style:style style:name="P1309" style:family="paragraph" style:parent-style-name="Standard">
      <style:paragraph-properties fo:text-align="justify" style:justify-single-word="false"/>
      <style:text-properties style:font-name="Liberation Serif" officeooo:rsid="045a6b5f" officeooo:paragraph-rsid="045a6b5f"/>
    </style:style>
    <style:style style:name="P1310" style:family="paragraph" style:parent-style-name="Table_20_Contents">
      <style:paragraph-properties fo:text-align="right" style:justify-single-word="false"/>
      <style:text-properties fo:color="#00a933" loext:opacity="100%" style:font-name="Courier" fo:font-size="10pt" fo:font-style="italic" officeooo:rsid="045a6b5f" officeooo:paragraph-rsid="045a6b5f" style:font-size-asian="10pt" style:font-style-asian="italic" style:font-size-complex="10pt" style:font-style-complex="italic"/>
    </style:style>
    <style:style style:name="P1311" style:family="paragraph" style:parent-style-name="Standard">
      <style:paragraph-properties fo:text-align="justify" style:justify-single-word="false"/>
      <style:text-properties style:use-window-font-color="true" loext:opacity="0%" style:font-name="Liberation Serif" fo:font-size="12pt" fo:font-weight="normal" officeooo:rsid="045c450f" officeooo:paragraph-rsid="0418adee" style:font-size-asian="10.5pt" style:font-weight-asian="normal" style:font-size-complex="12pt" style:font-weight-complex="normal"/>
    </style:style>
    <style:style style:name="P1312" style:family="paragraph" style:parent-style-name="Standard">
      <style:paragraph-properties fo:text-align="justify" style:justify-single-word="false"/>
      <style:text-properties style:use-window-font-color="true" loext:opacity="0%" style:font-name="Liberation Serif" fo:font-size="12pt" fo:font-weight="normal" officeooo:rsid="045c450f" officeooo:paragraph-rsid="045c450f" style:font-size-asian="10.5pt" style:font-weight-asian="normal" style:font-size-complex="12pt" style:font-weight-complex="normal"/>
    </style:style>
    <style:style style:name="P1313"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45f85c9" officeooo:paragraph-rsid="045f85c9" fo:background-color="#ffffff" style:font-size-asian="10pt" style:font-style-asian="italic" style:font-size-complex="10pt" style:font-style-complex="italic"/>
    </style:style>
    <style:style style:name="P1314" style:family="paragraph" style:parent-style-name="Standard">
      <style:paragraph-properties fo:text-align="justify" style:justify-single-word="false"/>
      <style:text-properties style:use-window-font-color="true" loext:opacity="0%" style:font-name="Liberation Serif" fo:font-size="12pt" fo:font-weight="normal" officeooo:rsid="045c450f" officeooo:paragraph-rsid="04512d12" style:font-size-asian="10.5pt" style:font-weight-asian="normal" style:font-size-complex="12pt" style:font-weight-complex="normal"/>
    </style:style>
    <style:style style:name="P131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645b28" fo:background-color="#ffffff" style:font-size-asian="11pt" style:font-size-complex="11pt"/>
    </style:style>
    <style:style style:name="P1316" style:family="paragraph" style:parent-style-name="Standard">
      <style:paragraph-properties fo:margin-left="0in" fo:margin-right="0in" style:line-height-at-least="0.198in" fo:text-indent="0in" style:auto-text-indent="false"/>
      <style:text-properties officeooo:paragraph-rsid="04645b28"/>
    </style:style>
    <style:style style:name="P1317" style:family="paragraph" style:parent-style-name="Standard">
      <style:paragraph-properties fo:margin-left="0in" fo:margin-right="0in" style:line-height-at-least="0.198in" fo:text-indent="0in" style:auto-text-indent="false"/>
      <style:text-properties style:font-name="Courier" fo:font-size="11pt" officeooo:paragraph-rsid="04645b28" style:font-size-asian="11pt" style:font-size-complex="11pt"/>
    </style:style>
    <style:style style:name="P131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643682" fo:background-color="#ffffff" style:font-size-asian="11pt" style:font-size-complex="11pt"/>
    </style:style>
    <style:style style:name="P1319" style:family="paragraph" style:parent-style-name="Standard">
      <style:paragraph-properties style:line-height-at-least="0.198in"/>
      <style:text-properties style:use-window-font-color="true" loext:opacity="0%" style:font-name="Courier" fo:font-size="10pt" fo:font-weight="normal" officeooo:rsid="0464bd26" fo:background-color="#ffffff" style:font-size-asian="10pt" style:font-size-complex="10pt"/>
    </style:style>
    <style:style style:name="P1320"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666829" fo:background-color="#ffffff" style:font-size-asian="11pt" style:font-size-complex="11pt"/>
    </style:style>
    <style:style style:name="P1321"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6cf726" fo:background-color="#ffffff" style:font-size-asian="11pt" style:font-size-complex="11pt"/>
    </style:style>
    <style:style style:name="P1322" style:family="paragraph" style:parent-style-name="Standard">
      <style:paragraph-properties fo:margin-left="0in" fo:margin-right="0in" style:line-height-at-least="0.198in" fo:text-indent="0in" style:auto-text-indent="false"/>
      <style:text-properties style:font-name="Courier" fo:font-size="11pt" officeooo:paragraph-rsid="046cf726" style:font-size-asian="11pt" style:font-size-complex="11pt"/>
    </style:style>
    <style:style style:name="P132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7d3da9" fo:background-color="#ffffff" style:font-size-asian="11pt" style:font-size-complex="11pt"/>
    </style:style>
    <style:style style:name="P1324" style:family="paragraph" style:parent-style-name="Standard">
      <style:paragraph-properties fo:text-align="center" style:justify-single-word="false"/>
      <style:text-properties style:use-window-font-color="true" loext:opacity="0%" style:font-name="Liberation Serif" fo:font-size="12pt" fo:font-weight="bold" officeooo:rsid="04645b28" officeooo:paragraph-rsid="04645b28" style:font-size-asian="10.5pt" style:font-weight-asian="bold" style:font-size-complex="12pt" style:font-weight-complex="bold"/>
    </style:style>
    <style:style style:name="P1325" style:family="paragraph" style:parent-style-name="Standard">
      <style:text-properties style:use-window-font-color="true" loext:opacity="0%" style:font-name="Liberation Serif" fo:font-size="12pt" fo:font-weight="normal" officeooo:rsid="04675a41" style:font-size-asian="10.5pt" style:font-weight-asian="normal" style:font-size-complex="12pt" style:font-weight-complex="normal"/>
    </style:style>
    <style:style style:name="P1326" style:family="paragraph" style:parent-style-name="Standard">
      <style:paragraph-properties fo:text-align="justify" style:justify-single-word="false"/>
      <style:text-properties style:use-window-font-color="true" loext:opacity="0%" style:font-name="Liberation Serif" fo:font-size="12pt" fo:font-weight="normal" officeooo:rsid="0468bc79" officeooo:paragraph-rsid="0468bc79" style:font-size-asian="10.5pt" style:font-weight-asian="normal" style:font-size-complex="12pt" style:font-weight-complex="normal"/>
    </style:style>
    <style:style style:name="P1327" style:family="paragraph" style:parent-style-name="Table_20_Contents">
      <style:paragraph-properties fo:text-align="justify" style:justify-single-word="false"/>
      <style:text-properties fo:font-size="12pt" officeooo:paragraph-rsid="0468bc79" style:font-size-asian="12pt" style:font-size-complex="12pt"/>
    </style:style>
    <style:style style:name="P1328" style:family="paragraph" style:parent-style-name="Table_20_Contents">
      <style:paragraph-properties fo:text-align="justify" style:justify-single-word="false"/>
      <style:text-properties style:use-window-font-color="true" loext:opacity="0%" fo:font-size="12pt" fo:font-weight="normal" officeooo:rsid="040df2c9" officeooo:paragraph-rsid="0468bc79" style:font-size-asian="10.5pt" style:font-weight-asian="normal" style:font-size-complex="12pt" style:font-weight-complex="normal"/>
    </style:style>
    <style:style style:name="P1329" style:family="paragraph" style:parent-style-name="Table_20_Contents">
      <style:paragraph-properties fo:text-align="justify" style:justify-single-word="false"/>
      <style:text-properties style:use-window-font-color="true" loext:opacity="0%" fo:font-size="12pt" fo:font-weight="normal" officeooo:rsid="0468bc79" officeooo:paragraph-rsid="0468bc79" style:font-size-asian="10.5pt" style:font-weight-asian="normal" style:font-size-complex="12pt" style:font-weight-complex="normal"/>
    </style:style>
    <style:style style:name="P1330" style:family="paragraph" style:parent-style-name="Standard">
      <style:paragraph-properties fo:text-align="justify" style:justify-single-word="false"/>
      <style:text-properties style:use-window-font-color="true" loext:opacity="0%" style:font-name="Liberation Serif" fo:font-size="12pt" fo:font-weight="normal" officeooo:rsid="046a95e9" officeooo:paragraph-rsid="046a95e9" style:font-size-asian="10.5pt" style:font-weight-asian="normal" style:font-size-complex="12pt" style:font-weight-complex="normal"/>
    </style:style>
    <style:style style:name="P1331" style:family="paragraph" style:parent-style-name="Standard">
      <style:paragraph-properties fo:text-align="justify" style:justify-single-word="false"/>
      <style:text-properties style:use-window-font-color="true" loext:opacity="0%" style:font-name="Liberation Serif" fo:font-size="12pt" fo:font-weight="normal" officeooo:rsid="0468bc79" officeooo:paragraph-rsid="046a95e9" style:font-size-asian="10.5pt" style:font-weight-asian="normal" style:font-size-complex="12pt" style:font-weight-complex="normal"/>
    </style:style>
    <style:style style:name="P1332" style:family="paragraph" style:parent-style-name="Table_20_Contents">
      <style:paragraph-properties fo:text-align="justify" style:justify-single-word="false"/>
      <style:text-properties fo:font-size="12pt" officeooo:paragraph-rsid="046a95e9" style:font-size-asian="12pt" style:font-size-complex="12pt"/>
    </style:style>
    <style:style style:name="P1333" style:family="paragraph" style:parent-style-name="Table_20_Contents">
      <style:paragraph-properties fo:text-align="justify" style:justify-single-word="false"/>
      <style:text-properties style:use-window-font-color="true" loext:opacity="0%" fo:font-size="12pt" fo:font-weight="normal" officeooo:rsid="041c5f13" officeooo:paragraph-rsid="046a95e9" style:font-size-asian="10.5pt" style:font-weight-asian="normal" style:font-size-complex="12pt" style:font-weight-complex="normal"/>
    </style:style>
    <style:style style:name="P1334" style:family="paragraph" style:parent-style-name="Table_20_Contents">
      <style:paragraph-properties fo:text-align="justify" style:justify-single-word="false"/>
      <style:text-properties fo:font-size="12pt" officeooo:paragraph-rsid="046ac175" style:font-size-asian="12pt" style:font-size-complex="12pt"/>
    </style:style>
    <style:style style:name="P1335" style:family="paragraph" style:parent-style-name="Table_20_Contents">
      <style:paragraph-properties fo:text-align="justify" style:justify-single-word="false"/>
      <style:text-properties officeooo:paragraph-rsid="0475e8f6"/>
    </style:style>
    <style:style style:name="P1336" style:family="paragraph" style:parent-style-name="Table_20_Contents">
      <style:paragraph-properties fo:text-align="justify" style:justify-single-word="false"/>
      <style:text-properties fo:font-size="12pt" officeooo:rsid="0475e8f6" officeooo:paragraph-rsid="0475e8f6" style:font-size-asian="12pt" style:font-size-complex="12pt"/>
    </style:style>
    <style:style style:name="P1337" style:family="paragraph" style:parent-style-name="Standard">
      <style:paragraph-properties fo:text-align="justify" style:justify-single-word="false"/>
      <style:text-properties style:use-window-font-color="true" loext:opacity="0%" style:font-name="Liberation Serif" fo:font-size="12pt" fo:font-weight="normal" officeooo:rsid="0476b0a0" officeooo:paragraph-rsid="046a95e9" style:font-size-asian="10.5pt" style:font-weight-asian="normal" style:font-size-complex="12pt" style:font-weight-complex="normal"/>
    </style:style>
    <style:style style:name="P1338" style:family="paragraph" style:parent-style-name="Standard">
      <style:paragraph-properties fo:text-align="justify" style:justify-single-word="false"/>
      <style:text-properties style:use-window-font-color="true" loext:opacity="0%" style:font-name="Liberation Serif" fo:font-size="12pt" fo:font-weight="normal" officeooo:rsid="0476b0a0" officeooo:paragraph-rsid="0476b0a0" style:font-size-asian="10.5pt" style:font-weight-asian="normal" style:font-size-complex="12pt" style:font-weight-complex="normal"/>
    </style:style>
    <style:style style:name="P1339" style:family="paragraph" style:parent-style-name="Standard">
      <style:paragraph-properties fo:margin-left="0in" fo:margin-right="0in" style:line-height-at-least="0.198in" fo:text-indent="0in" style:auto-text-indent="false"/>
      <style:text-properties officeooo:paragraph-rsid="0476b0a0"/>
    </style:style>
    <style:style style:name="P1340" style:family="paragraph" style:parent-style-name="Standard">
      <style:paragraph-properties fo:margin-left="0in" fo:margin-right="0in" style:line-height-at-least="0.198in" fo:text-indent="0in" style:auto-text-indent="false"/>
      <style:text-properties fo:color="#000000" loext:opacity="100%" style:font-name="Courier" fo:font-size="11pt" officeooo:paragraph-rsid="0476b0a0" fo:background-color="#ffffff" style:font-size-asian="11pt" style:font-size-complex="11pt"/>
    </style:style>
    <style:style style:name="P1341" style:family="paragraph" style:parent-style-name="Standard">
      <style:paragraph-properties fo:text-align="justify" style:justify-single-word="false"/>
      <style:text-properties officeooo:paragraph-rsid="0468bc79"/>
    </style:style>
    <style:style style:name="P1342" style:family="paragraph" style:parent-style-name="Standard">
      <style:paragraph-properties fo:text-align="justify" style:justify-single-word="false"/>
      <style:text-properties style:use-window-font-color="true" loext:opacity="0%" style:font-name="Liberation Serif" fo:font-size="12pt" fo:font-weight="normal" officeooo:rsid="0478bd90" officeooo:paragraph-rsid="0468bc79" style:font-size-asian="10.5pt" style:font-weight-asian="normal" style:font-size-complex="12pt" style:font-weight-complex="normal"/>
    </style:style>
    <style:style style:name="P1343" style:family="paragraph" style:parent-style-name="Standard">
      <style:paragraph-properties fo:text-align="justify" style:justify-single-word="false"/>
      <style:text-properties style:use-window-font-color="true" loext:opacity="0%" style:font-name="Liberation Serif" fo:font-size="12pt" fo:font-weight="normal" officeooo:rsid="047b895c" officeooo:paragraph-rsid="047b895c" style:font-size-asian="10.5pt" style:font-weight-asian="normal" style:font-size-complex="12pt" style:font-weight-complex="normal"/>
    </style:style>
    <style:style style:name="P1344" style:family="paragraph" style:parent-style-name="Standard">
      <style:paragraph-properties fo:margin-left="0in" fo:margin-right="0in" style:line-height-at-least="0.198in" fo:text-indent="0in" style:auto-text-indent="false"/>
      <style:text-properties officeooo:paragraph-rsid="047f8dd1"/>
    </style:style>
    <style:style style:name="P134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7f8dd1" fo:background-color="#ffffff" style:font-size-asian="11pt" style:font-size-complex="11pt"/>
    </style:style>
    <style:style style:name="P1346" style:family="paragraph" style:parent-style-name="Standard">
      <style:paragraph-properties fo:text-align="justify" style:justify-single-word="false"/>
      <style:text-properties officeooo:paragraph-rsid="047b895c"/>
    </style:style>
    <style:style style:name="P1347" style:family="paragraph" style:parent-style-name="Standard">
      <style:paragraph-properties fo:text-align="justify" style:justify-single-word="false"/>
      <style:text-properties officeooo:paragraph-rsid="062b59c7"/>
    </style:style>
    <style:style style:name="P1348" style:family="paragraph" style:parent-style-name="Standard">
      <style:paragraph-properties fo:text-align="justify" style:justify-single-word="false"/>
      <style:text-properties style:use-window-font-color="true" loext:opacity="0%" style:font-name="Liberation Serif" fo:font-size="12pt" fo:font-weight="normal" officeooo:rsid="0476b0a0" officeooo:paragraph-rsid="047b895c" style:font-size-asian="10.5pt" style:font-weight-asian="normal" style:font-size-complex="12pt" style:font-weight-complex="normal"/>
    </style:style>
    <style:style style:name="P1349" style:family="paragraph" style:parent-style-name="Standard">
      <style:paragraph-properties fo:text-align="justify" style:justify-single-word="false"/>
      <style:text-properties style:use-window-font-color="true" loext:opacity="0%" style:font-name="Liberation Serif" fo:font-size="12pt" fo:font-style="italic" fo:font-weight="normal" officeooo:rsid="04869436" officeooo:paragraph-rsid="04869436" style:font-size-asian="10.5pt" style:font-style-asian="italic" style:font-weight-asian="normal" style:font-size-complex="12pt" style:font-style-complex="italic" style:font-weight-complex="normal"/>
    </style:style>
    <style:style style:name="P1350" style:family="paragraph" style:parent-style-name="Table_20_Contents">
      <style:paragraph-properties fo:text-align="justify" style:justify-single-word="false"/>
      <style:text-properties fo:font-size="12pt" officeooo:paragraph-rsid="04869436" style:font-size-asian="12pt" style:font-size-complex="12pt"/>
    </style:style>
    <style:style style:name="P1351" style:family="paragraph" style:parent-style-name="Table_20_Contents">
      <style:paragraph-properties fo:text-align="justify" style:justify-single-word="false"/>
      <style:text-properties officeooo:paragraph-rsid="04869436"/>
    </style:style>
    <style:style style:name="P1352" style:family="paragraph" style:parent-style-name="Table_20_Contents">
      <style:paragraph-properties fo:text-align="justify" style:justify-single-word="false"/>
      <style:text-properties style:use-window-font-color="true" loext:opacity="0%" fo:font-size="12pt" fo:font-weight="normal" officeooo:rsid="04869436" officeooo:paragraph-rsid="04869436" style:font-size-asian="10.5pt" style:font-weight-asian="normal" style:font-size-complex="12pt" style:font-weight-complex="normal"/>
    </style:style>
    <style:style style:name="P1353" style:family="paragraph" style:parent-style-name="Standard">
      <style:paragraph-properties fo:text-align="justify" style:justify-single-word="false"/>
      <style:text-properties style:use-window-font-color="true" loext:opacity="0%" style:font-name="Liberation Serif" fo:font-size="12pt" fo:font-weight="normal" officeooo:rsid="0468bc79" officeooo:paragraph-rsid="04869436" style:font-size-asian="10.5pt" style:font-weight-asian="normal" style:font-size-complex="12pt" style:font-weight-complex="normal"/>
    </style:style>
    <style:style style:name="P1354" style:family="paragraph" style:parent-style-name="Table_20_Contents">
      <style:paragraph-properties fo:text-align="justify" style:justify-single-word="false"/>
      <style:text-properties style:use-window-font-color="true" loext:opacity="0%" fo:font-size="12pt" fo:font-weight="bold" officeooo:rsid="04869436" officeooo:paragraph-rsid="04869436" style:font-size-asian="10.5pt" style:font-weight-asian="bold" style:font-size-complex="12pt" style:font-weight-complex="bold"/>
    </style:style>
    <style:style style:name="P1355" style:family="paragraph" style:parent-style-name="Footnote">
      <style:text-properties officeooo:paragraph-rsid="05d0883a"/>
    </style:style>
    <style:style style:name="P1356" style:family="paragraph" style:parent-style-name="Standard">
      <style:paragraph-properties fo:text-align="justify" style:justify-single-word="false"/>
      <style:text-properties style:use-window-font-color="true" loext:opacity="0%" style:font-name="Liberation Serif" fo:font-size="12pt" fo:font-weight="normal" officeooo:rsid="048698e0" officeooo:paragraph-rsid="048698e0" style:font-size-asian="10.5pt" style:font-weight-asian="normal" style:font-size-complex="12pt" style:font-weight-complex="normal"/>
    </style:style>
    <style:style style:name="P1357" style:family="paragraph" style:parent-style-name="Standard">
      <style:paragraph-properties fo:text-align="justify" style:justify-single-word="false"/>
      <style:text-properties style:use-window-font-color="true" loext:opacity="0%" style:font-name="Liberation Serif" fo:font-size="12pt" fo:font-style="italic" fo:font-weight="normal" officeooo:rsid="04869436" officeooo:paragraph-rsid="048698e0" style:font-size-asian="10.5pt" style:font-style-asian="italic" style:font-weight-asian="normal" style:font-size-complex="12pt" style:font-style-complex="italic" style:font-weight-complex="normal"/>
    </style:style>
    <style:style style:name="P1358" style:family="paragraph" style:parent-style-name="Table_20_Contents">
      <style:paragraph-properties fo:text-align="justify" style:justify-single-word="false"/>
      <style:text-properties fo:font-size="12pt" officeooo:paragraph-rsid="048698e0" style:font-size-asian="12pt" style:font-size-complex="12pt"/>
    </style:style>
    <style:style style:name="P1359" style:family="paragraph" style:parent-style-name="Standard">
      <style:paragraph-properties fo:text-align="justify" style:justify-single-word="false"/>
      <style:text-properties style:use-window-font-color="true" loext:opacity="0%" style:font-name="Liberation Serif" fo:font-size="12pt" fo:font-weight="normal" officeooo:rsid="048a9d4c" officeooo:paragraph-rsid="048a9d4c" style:font-size-asian="10.5pt" style:font-weight-asian="normal" style:font-size-complex="12pt" style:font-weight-complex="normal"/>
    </style:style>
    <style:style style:name="P1360" style:family="paragraph" style:parent-style-name="Standard">
      <style:paragraph-properties fo:text-align="center" style:justify-single-word="false"/>
      <style:text-properties officeooo:paragraph-rsid="048a9d4c"/>
    </style:style>
    <style:style style:name="P1361" style:family="paragraph" style:parent-style-name="Footnote">
      <style:text-properties officeooo:paragraph-rsid="062cbacb"/>
    </style:style>
    <style:style style:name="P1362" style:family="paragraph" style:parent-style-name="Standard">
      <style:paragraph-properties fo:text-align="justify" style:justify-single-word="false"/>
      <style:text-properties style:use-window-font-color="true" loext:opacity="0%" style:font-name="Liberation Serif" fo:font-size="12pt" fo:font-weight="normal" officeooo:rsid="048a9d4c" officeooo:paragraph-rsid="047b895c" style:font-size-asian="10.5pt" style:font-weight-asian="normal" style:font-size-complex="12pt" style:font-weight-complex="normal"/>
    </style:style>
    <style:style style:name="P1363" style:family="paragraph" style:parent-style-name="Table_20_Contents">
      <style:paragraph-properties fo:text-align="left" style:justify-single-word="false"/>
      <style:text-properties fo:color="#00a933" loext:opacity="100%" style:font-name="Courier" fo:font-size="10pt" fo:font-style="italic" officeooo:rsid="048b18f8" officeooo:paragraph-rsid="049d0c12" style:font-size-asian="10pt" style:font-style-asian="italic" style:font-size-complex="10pt" style:font-style-complex="italic"/>
    </style:style>
    <style:style style:name="P1364" style:family="paragraph" style:parent-style-name="Standard">
      <style:paragraph-properties fo:text-align="justify" style:justify-single-word="false"/>
      <style:text-properties style:use-window-font-color="true" loext:opacity="0%" style:font-name="Liberation Serif" fo:font-size="12pt" fo:font-weight="normal" officeooo:rsid="048b18f8" officeooo:paragraph-rsid="047b895c" style:font-size-asian="10.5pt" style:font-weight-asian="normal" style:font-size-complex="12pt" style:font-weight-complex="normal"/>
    </style:style>
    <style:style style:name="P1365" style:family="paragraph" style:parent-style-name="Standard" style:list-style-name="L15">
      <style:paragraph-properties fo:text-align="justify" style:justify-single-word="false"/>
      <style:text-properties style:use-window-font-color="true" loext:opacity="0%" style:font-name="Courier" fo:font-size="12pt" fo:font-weight="normal" officeooo:rsid="0468bc79" officeooo:paragraph-rsid="047b895c" style:font-size-asian="10.5pt" style:font-weight-asian="normal" style:font-size-complex="12pt" style:font-weight-complex="normal"/>
    </style:style>
    <style:style style:name="P1366" style:family="paragraph" style:parent-style-name="Standard" style:list-style-name="L16">
      <style:paragraph-properties fo:text-align="justify" style:justify-single-word="false"/>
      <style:text-properties style:use-window-font-color="true" loext:opacity="0%" style:font-name="Courier" fo:font-size="12pt" fo:font-weight="normal" officeooo:rsid="0468bc79" officeooo:paragraph-rsid="047b895c" style:font-size-asian="10.5pt" style:font-weight-asian="normal" style:font-size-complex="12pt" style:font-weight-complex="normal"/>
    </style:style>
    <style:style style:name="P1367" style:family="paragraph" style:parent-style-name="Standard" style:list-style-name="L17">
      <style:paragraph-properties fo:text-align="justify" style:justify-single-word="false"/>
      <style:text-properties style:use-window-font-color="true" loext:opacity="0%" style:font-name="Courier" fo:font-size="12pt" fo:font-weight="normal" officeooo:rsid="0468bc79" officeooo:paragraph-rsid="047b895c" style:font-size-asian="10.5pt" style:font-weight-asian="normal" style:font-size-complex="12pt" style:font-weight-complex="normal"/>
    </style:style>
    <style:style style:name="P1368" style:family="paragraph" style:parent-style-name="Standard" style:list-style-name="L15">
      <style:paragraph-properties fo:text-align="justify" style:justify-single-word="false"/>
      <style:text-properties officeooo:paragraph-rsid="047b895c"/>
    </style:style>
    <style:style style:name="P1369" style:family="paragraph" style:parent-style-name="Standard">
      <style:paragraph-properties fo:text-align="justify" style:justify-single-word="false"/>
      <style:text-properties officeooo:paragraph-rsid="04a41ca8"/>
    </style:style>
    <style:style style:name="P1370" style:family="paragraph" style:parent-style-name="Standard">
      <style:paragraph-properties fo:text-align="justify" style:justify-single-word="false"/>
      <style:text-properties style:use-window-font-color="true" loext:opacity="0%" style:font-name="Liberation Serif" fo:font-size="12pt" fo:font-weight="normal" officeooo:rsid="04a41ca8" officeooo:paragraph-rsid="04a41ca8" style:font-size-asian="10.5pt" style:font-weight-asian="normal" style:font-size-complex="12pt" style:font-weight-complex="normal"/>
    </style:style>
    <style:style style:name="P1371" style:family="paragraph" style:parent-style-name="Table_20_Contents">
      <style:paragraph-properties fo:text-align="center" style:justify-single-word="false"/>
      <style:text-properties style:font-name="Liberation Serif" fo:font-size="12pt" fo:font-weight="bold" officeooo:rsid="0491aab8" officeooo:paragraph-rsid="0491aab8" style:font-size-asian="10.5pt" style:font-weight-asian="bold" style:font-size-complex="12pt" style:font-weight-complex="bold"/>
    </style:style>
    <style:style style:name="P1372" style:family="paragraph" style:parent-style-name="Standard">
      <style:paragraph-properties fo:text-align="left" style:justify-single-word="false"/>
      <style:text-properties style:use-window-font-color="true" loext:opacity="0%" style:font-name="Courier" fo:font-size="12pt" fo:font-weight="normal" officeooo:rsid="0468bc79" officeooo:paragraph-rsid="047b895c" style:font-size-asian="10.5pt" style:font-weight-asian="normal" style:font-size-complex="12pt" style:font-weight-complex="normal"/>
    </style:style>
    <style:style style:name="P1373" style:family="paragraph" style:parent-style-name="Table_20_Contents">
      <style:paragraph-properties fo:text-align="left" style:justify-single-word="false"/>
      <style:text-properties style:font-name="Liberation Serif" fo:font-size="12pt" officeooo:rsid="0491aab8" officeooo:paragraph-rsid="0491aab8" style:font-size-asian="10.5pt" style:font-size-complex="12pt"/>
    </style:style>
    <style:style style:name="P1374" style:family="paragraph" style:parent-style-name="Standard">
      <style:paragraph-properties fo:text-align="left" style:justify-single-word="false"/>
      <style:text-properties officeooo:paragraph-rsid="047b895c"/>
    </style:style>
    <style:style style:name="P1375" style:family="paragraph" style:parent-style-name="Table_20_Contents">
      <style:paragraph-properties fo:text-align="left" style:justify-single-word="false"/>
      <style:text-properties style:font-name="Liberation Serif" fo:font-size="12pt" style:font-size-asian="10.5pt" style:font-size-complex="12pt"/>
    </style:style>
    <style:style style:name="P1376" style:family="paragraph" style:parent-style-name="Standard">
      <style:paragraph-properties fo:text-align="justify" style:justify-single-word="false"/>
      <style:text-properties style:use-window-font-color="true" loext:opacity="0%" style:font-name="Liberation Serif" fo:font-size="12pt" fo:font-weight="normal" officeooo:rsid="0491aab8" officeooo:paragraph-rsid="0491aab8" style:font-size-asian="10.5pt" style:font-weight-asian="normal" style:font-size-complex="12pt" style:font-weight-complex="normal"/>
    </style:style>
    <style:style style:name="P1377" style:family="paragraph" style:parent-style-name="Standard">
      <style:paragraph-properties fo:text-align="center" style:justify-single-word="false"/>
      <style:text-properties style:use-window-font-color="true" loext:opacity="0%" style:font-name="Liberation Serif" fo:font-size="12pt" fo:font-weight="normal" officeooo:rsid="0491aab8" officeooo:paragraph-rsid="0491aab8" style:font-size-asian="10.5pt" style:font-weight-asian="normal" style:font-size-complex="12pt" style:font-weight-complex="normal"/>
    </style:style>
    <style:style style:name="P1378"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2ec7a" officeooo:paragraph-rsid="0492ec7a" style:font-size-asian="10.5pt" style:font-style-asian="normal" style:font-weight-asian="normal" style:font-size-complex="12pt" style:font-style-complex="normal" style:font-weight-complex="normal"/>
    </style:style>
    <style:style style:name="P1379" style:family="paragraph" style:parent-style-name="Standard">
      <style:paragraph-properties fo:text-align="center" style:justify-single-word="false"/>
      <style:text-properties style:use-window-font-color="true" loext:opacity="0%" style:font-name="Liberation Serif" fo:font-size="12pt" fo:font-style="normal" fo:font-weight="bold" officeooo:rsid="0492ec7a" officeooo:paragraph-rsid="0492ec7a" style:font-size-asian="10.5pt" style:font-style-asian="normal" style:font-weight-asian="bold" style:font-size-complex="12pt" style:font-style-complex="normal" style:font-weight-complex="bold"/>
    </style:style>
    <style:style style:name="P1380" style:family="paragraph" style:parent-style-name="Standard">
      <style:paragraph-properties fo:text-align="justify" style:justify-single-word="false"/>
      <style:text-properties officeooo:paragraph-rsid="0492ec7a"/>
    </style:style>
    <style:style style:name="P1381"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492ec7a" officeooo:paragraph-rsid="0492ec7a" style:font-size-asian="10.5pt" style:font-style-asian="normal" style:font-weight-asian="normal" style:font-size-complex="12pt" style:font-style-complex="normal" style:font-weight-complex="normal"/>
    </style:style>
    <style:style style:name="P1382"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2ec7a" officeooo:paragraph-rsid="047b895c" style:font-size-asian="10.5pt" style:font-style-asian="normal" style:font-weight-asian="normal" style:font-size-complex="12pt" style:font-style-complex="normal" style:font-weight-complex="normal"/>
    </style:style>
    <style:style style:name="P1383"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4304c" officeooo:paragraph-rsid="0494304c" style:font-size-asian="10.5pt" style:font-style-asian="normal" style:font-weight-asian="normal" style:font-size-complex="12pt" style:font-style-complex="normal" style:font-weight-complex="normal"/>
    </style:style>
    <style:style style:name="P1384" style:family="paragraph" style:parent-style-name="Standard">
      <style:paragraph-properties fo:margin-left="0in" fo:margin-right="0in" style:line-height-at-least="0.198in" fo:text-indent="0in" style:auto-text-indent="false"/>
      <style:text-properties officeooo:paragraph-rsid="0494304c"/>
    </style:style>
    <style:style style:name="P1385"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94304c" fo:background-color="#ffffff" style:font-size-asian="11pt" style:font-size-complex="11pt"/>
    </style:style>
    <style:style style:name="P1386" style:family="paragraph" style:parent-style-name="Standard">
      <style:paragraph-properties fo:margin-left="0in" fo:margin-right="0in" style:line-height-at-least="0.198in" fo:text-indent="0in" style:auto-text-indent="false"/>
      <style:text-properties style:font-name="Courier" fo:font-size="11pt" officeooo:paragraph-rsid="0494304c" style:font-size-asian="11pt" style:font-size-complex="11pt"/>
    </style:style>
    <style:style style:name="P1387" style:family="paragraph" style:parent-style-name="Standard">
      <style:paragraph-properties fo:text-align="justify" style:justify-single-word="false"/>
      <style:text-properties officeooo:paragraph-rsid="0494304c"/>
    </style:style>
    <style:style style:name="P1388" style:family="paragraph" style:parent-style-name="Standard">
      <style:paragraph-properties fo:text-align="justify" style:justify-single-word="false"/>
      <style:text-properties officeooo:rsid="049621dc" officeooo:paragraph-rsid="049621dc"/>
    </style:style>
    <style:style style:name="P1389"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621dc" officeooo:paragraph-rsid="049621dc" style:font-size-asian="10.5pt" style:font-style-asian="normal" style:font-weight-asian="normal" style:font-size-complex="12pt" style:font-style-complex="normal" style:font-weight-complex="normal"/>
    </style:style>
    <style:style style:name="P1390" style:family="paragraph" style:parent-style-name="Standard">
      <style:paragraph-properties fo:text-align="justify" style:justify-single-word="false"/>
      <style:text-properties style:use-window-font-color="true" loext:opacity="0%" style:font-name="Liberation Serif" fo:font-size="12pt" fo:font-style="italic" fo:font-weight="normal" officeooo:rsid="04869436" officeooo:paragraph-rsid="049621dc" style:font-size-asian="10.5pt" style:font-style-asian="italic" style:font-weight-asian="normal" style:font-size-complex="12pt" style:font-style-complex="italic" style:font-weight-complex="normal"/>
    </style:style>
    <style:style style:name="P1391" style:family="paragraph" style:parent-style-name="Table_20_Contents">
      <style:paragraph-properties fo:text-align="justify" style:justify-single-word="false"/>
      <style:text-properties fo:font-size="12pt" officeooo:paragraph-rsid="049621dc" style:font-size-asian="12pt" style:font-size-complex="12pt"/>
    </style:style>
    <style:style style:name="P1392" style:family="paragraph" style:parent-style-name="Standard">
      <style:paragraph-properties fo:text-align="justify" style:justify-single-word="false"/>
      <style:text-properties officeooo:paragraph-rsid="049621dc"/>
    </style:style>
    <style:style style:name="P1393"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621dc" officeooo:paragraph-rsid="0494304c" style:font-size-asian="10.5pt" style:font-style-asian="normal" style:font-weight-asian="normal" style:font-size-complex="12pt" style:font-style-complex="normal" style:font-weight-complex="normal"/>
    </style:style>
    <style:style style:name="P1394" style:family="paragraph" style:parent-style-name="Standard">
      <style:paragraph-properties fo:text-align="justify" style:justify-single-word="false"/>
      <style:text-properties style:use-window-font-color="true" loext:opacity="0%" style:font-name="Liberation Serif" fo:font-size="12pt" fo:font-style="italic" fo:font-weight="normal" officeooo:rsid="04869436" officeooo:paragraph-rsid="062df657" style:font-size-asian="10.5pt" style:font-style-asian="italic" style:font-weight-asian="normal" style:font-size-complex="12pt" style:font-style-complex="italic" style:font-weight-complex="normal"/>
    </style:style>
    <style:style style:name="P1395" style:family="paragraph" style:parent-style-name="Table_20_Contents">
      <style:paragraph-properties fo:text-align="justify" style:justify-single-word="false"/>
      <style:text-properties fo:font-size="12pt" officeooo:paragraph-rsid="062df657" style:font-size-asian="12pt" style:font-size-complex="12pt"/>
    </style:style>
    <style:style style:name="P1396"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49621dc" officeooo:paragraph-rsid="062df657" style:font-size-asian="10.5pt" style:font-style-asian="normal" style:font-weight-asian="normal" style:font-size-complex="12pt" style:font-style-complex="normal" style:font-weight-complex="normal"/>
    </style:style>
    <style:style style:name="P1397" style:family="paragraph" style:parent-style-name="Standard">
      <style:paragraph-properties fo:text-align="justify" style:justify-single-word="false"/>
      <style:text-properties style:use-window-font-color="true" loext:opacity="0%" style:font-name="Liberation Serif" fo:font-size="12pt" fo:font-style="normal" fo:font-weight="normal" officeooo:rsid="062df657" officeooo:paragraph-rsid="062df657" style:font-size-asian="10.5pt" style:font-style-asian="normal" style:font-weight-asian="normal" style:font-size-complex="12pt" style:font-style-complex="normal" style:font-weight-complex="normal"/>
    </style:style>
    <style:style style:name="P1398" style:family="paragraph" style:parent-style-name="Standard">
      <style:paragraph-properties fo:text-align="justify" style:justify-single-word="false"/>
      <style:text-properties style:use-window-font-color="true" loext:opacity="0%" style:font-name="Liberation Serif" fo:font-size="12pt" fo:font-weight="normal" officeooo:rsid="0468bc79" officeooo:paragraph-rsid="049621dc" style:font-size-asian="10.5pt" style:font-weight-asian="normal" style:font-size-complex="12pt" style:font-weight-complex="normal"/>
    </style:style>
    <style:style style:name="P1399" style:family="paragraph" style:parent-style-name="Standard">
      <style:paragraph-properties fo:text-align="center" style:justify-single-word="false"/>
      <style:text-properties style:use-window-font-color="true" loext:opacity="0%" style:font-name="Liberation Serif" fo:font-size="13pt" fo:font-weight="bold" officeooo:rsid="04aa360a" officeooo:paragraph-rsid="04aa360a" style:font-size-asian="13pt" style:font-weight-asian="bold" style:font-size-complex="13pt" style:font-weight-complex="bold"/>
    </style:style>
    <style:style style:name="P1400" style:family="paragraph" style:parent-style-name="Standard">
      <style:paragraph-properties fo:text-align="justify" style:justify-single-word="false"/>
      <style:text-properties style:use-window-font-color="true" loext:opacity="0%" style:font-name="Liberation Serif" fo:font-size="12pt" fo:font-weight="normal" officeooo:rsid="04abe005" officeooo:paragraph-rsid="062eb447" style:font-size-asian="10.5pt" style:font-weight-asian="normal" style:font-size-complex="12pt" style:font-weight-complex="normal"/>
    </style:style>
    <style:style style:name="P1401" style:family="paragraph" style:parent-style-name="Standard">
      <style:paragraph-properties fo:text-align="justify" style:justify-single-word="false"/>
      <style:text-properties style:use-window-font-color="true" loext:opacity="0%" style:font-name="Liberation Serif" fo:font-size="12pt" fo:font-weight="normal" officeooo:rsid="04abe005" officeooo:paragraph-rsid="04abe005" style:font-size-asian="10.5pt" style:font-weight-asian="normal" style:font-size-complex="12pt" style:font-weight-complex="normal"/>
    </style:style>
    <style:style style:name="P1402" style:family="paragraph" style:parent-style-name="Table_20_Heading">
      <style:text-properties officeooo:rsid="04b5fdef" officeooo:paragraph-rsid="04b5fdef"/>
    </style:style>
    <style:style style:name="P1403" style:family="paragraph" style:parent-style-name="Standard">
      <style:paragraph-properties fo:text-align="center" style:justify-single-word="false"/>
      <style:text-properties officeooo:paragraph-rsid="04b5fdef"/>
    </style:style>
    <style:style style:name="P1404" style:family="paragraph" style:parent-style-name="Standard">
      <style:paragraph-properties fo:text-align="justify" style:justify-single-word="false"/>
      <style:text-properties officeooo:paragraph-rsid="04b5fdef"/>
    </style:style>
    <style:style style:name="P1405" style:family="paragraph" style:parent-style-name="Standard">
      <style:paragraph-properties fo:text-align="justify" style:justify-single-word="false"/>
      <style:text-properties officeooo:paragraph-rsid="04abe005"/>
    </style:style>
    <style:style style:name="P1406" style:family="paragraph" style:parent-style-name="Standard">
      <style:paragraph-properties fo:text-align="left" style:justify-single-word="false"/>
      <style:text-properties officeooo:paragraph-rsid="04b5fdef"/>
    </style:style>
    <style:style style:name="P1407" style:family="paragraph" style:parent-style-name="Standard">
      <style:paragraph-properties fo:text-align="justify" style:justify-single-word="false"/>
      <style:text-properties officeooo:rsid="04b34869" officeooo:paragraph-rsid="04b34869"/>
    </style:style>
    <style:style style:name="P1408" style:family="paragraph" style:parent-style-name="Standard">
      <style:paragraph-properties fo:text-align="justify" style:justify-single-word="false"/>
      <style:text-properties officeooo:paragraph-rsid="04b4cb6b"/>
    </style:style>
    <style:style style:name="P1409" style:family="paragraph" style:parent-style-name="Standard">
      <style:paragraph-properties fo:text-align="justify" style:justify-single-word="false"/>
      <style:text-properties officeooo:rsid="04b4cb6b" officeooo:paragraph-rsid="04b4cb6b"/>
    </style:style>
    <style:style style:name="P1410" style:family="paragraph" style:parent-style-name="Standard">
      <style:paragraph-properties fo:text-align="center" style:justify-single-word="false"/>
      <style:text-properties style:use-window-font-color="true" loext:opacity="0%" style:font-name="Liberation Serif" fo:font-size="12pt" fo:font-weight="normal" officeooo:rsid="04abe005" officeooo:paragraph-rsid="04abe005" style:font-size-asian="10.5pt" style:font-weight-asian="normal" style:font-size-complex="12pt" style:font-weight-complex="normal"/>
    </style:style>
    <style:style style:name="P1411" style:family="paragraph" style:parent-style-name="Table_20_Contents">
      <style:paragraph-properties fo:text-align="left" style:justify-single-word="false"/>
      <style:text-properties fo:color="#00a933" loext:opacity="100%" style:font-name="Courier" fo:font-size="10pt" fo:font-style="italic" officeooo:rsid="04ae6e3e" officeooo:paragraph-rsid="04ae6e3e" style:font-size-asian="10pt" style:font-style-asian="italic" style:font-size-complex="10pt" style:font-style-complex="italic"/>
    </style:style>
    <style:style style:name="P1412" style:family="paragraph" style:parent-style-name="Standard">
      <style:paragraph-properties fo:text-align="justify" style:justify-single-word="false"/>
      <style:text-properties officeooo:paragraph-rsid="04b94cde"/>
    </style:style>
    <style:style style:name="P1413" style:family="paragraph" style:parent-style-name="Standard">
      <style:paragraph-properties fo:text-align="justify" style:justify-single-word="false"/>
      <style:text-properties fo:font-weight="normal" officeooo:rsid="04b94cde" officeooo:paragraph-rsid="04b94cde" style:font-weight-asian="normal" style:font-weight-complex="normal"/>
    </style:style>
    <style:style style:name="P1414" style:family="paragraph" style:parent-style-name="Table_20_Contents">
      <style:paragraph-properties fo:text-align="center" style:justify-single-word="false"/>
      <style:text-properties fo:font-weight="bold" officeooo:rsid="04b94cde" officeooo:paragraph-rsid="04b94cde" style:font-weight-asian="bold" style:font-weight-complex="bold"/>
    </style:style>
    <style:style style:name="P1415" style:family="paragraph" style:parent-style-name="Table_20_Contents">
      <style:paragraph-properties fo:text-align="justify" style:justify-single-word="false"/>
      <style:text-properties officeooo:paragraph-rsid="04b94cde"/>
    </style:style>
    <style:style style:name="P1416" style:family="paragraph" style:parent-style-name="Table_20_Contents">
      <style:paragraph-properties fo:text-align="justify" style:justify-single-word="false"/>
      <style:text-properties officeooo:rsid="04b94cde" officeooo:paragraph-rsid="04b94cde"/>
    </style:style>
    <style:style style:name="P1417" style:family="paragraph" style:parent-style-name="Standard">
      <style:paragraph-properties fo:text-align="center" style:justify-single-word="false"/>
      <style:text-properties fo:font-weight="normal" officeooo:rsid="04b94cde" officeooo:paragraph-rsid="04b94cde" style:font-weight-asian="normal" style:font-weight-complex="normal"/>
    </style:style>
    <style:style style:name="P1418"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rsid="04c5e338" style:font-size-asian="10.5pt" style:font-style-asian="normal" style:font-weight-asian="normal" style:font-size-complex="12pt" style:font-style-complex="normal" style:font-weight-complex="normal"/>
    </style:style>
    <style:style style:name="P1419" style:family="paragraph" style:parent-style-name="Table_20_Contents">
      <style:paragraph-properties fo:text-align="justify" style:justify-single-word="false"/>
      <style:text-properties officeooo:paragraph-rsid="04c58b48"/>
    </style:style>
    <style:style style:name="P1420"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rsid="04c942ad" officeooo:paragraph-rsid="04c942ad" style:font-size-asian="10.5pt" style:font-style-asian="normal" style:font-weight-asian="normal" style:font-size-complex="12pt" style:font-style-complex="normal" style:font-weight-complex="normal"/>
    </style:style>
    <style:style style:name="P1421" style:family="paragraph" style:parent-style-name="Standard">
      <style:paragraph-properties fo:text-align="justify" style:justify-single-word="false"/>
      <style:text-properties fo:color="#000000" loext:opacity="100%" style:font-name="Courier" fo:font-size="11pt" fo:font-style="normal" fo:font-weight="normal" officeooo:rsid="04c942ad" officeooo:paragraph-rsid="04c942ad" fo:background-color="#ffffff" style:font-size-asian="11pt" style:font-style-asian="normal" style:font-weight-asian="normal" style:font-size-complex="11pt" style:font-style-complex="normal" style:font-weight-complex="normal"/>
    </style:style>
    <style:style style:name="P142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c942ad" fo:background-color="#ffffff" style:font-size-asian="11pt" style:font-size-complex="11pt"/>
    </style:style>
    <style:style style:name="P1423"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rsid="04c58b48" officeooo:paragraph-rsid="04c58b48" style:font-size-asian="10.5pt" style:font-style-asian="normal" style:font-weight-asian="normal" style:font-size-complex="12pt" style:font-style-complex="normal" style:font-weight-complex="normal"/>
    </style:style>
    <style:style style:name="P1424" style:family="paragraph" style:parent-style-name="Table_20_Contents">
      <style:paragraph-properties fo:text-align="justify" style:justify-single-word="false"/>
      <style:text-properties fo:font-size="12pt" officeooo:paragraph-rsid="04cc93c3" style:font-size-asian="12pt" style:font-size-complex="12pt"/>
    </style:style>
    <style:style style:name="P1425" style:family="paragraph" style:parent-style-name="Table_20_Contents">
      <style:paragraph-properties fo:text-align="justify" style:justify-single-word="false"/>
      <style:text-properties style:use-window-font-color="true" loext:opacity="0%" fo:font-size="12pt" fo:font-weight="normal" officeooo:rsid="04cc93c3" officeooo:paragraph-rsid="04cc93c3" style:font-size-asian="10.5pt" style:font-weight-asian="normal" style:font-size-complex="12pt" style:font-weight-complex="normal"/>
    </style:style>
    <style:style style:name="P1426" style:family="paragraph" style:parent-style-name="Table_20_Contents">
      <style:paragraph-properties fo:text-align="justify" style:justify-single-word="false"/>
      <style:text-properties style:use-window-font-color="true" loext:opacity="0%" fo:font-size="12pt" fo:font-weight="bold" officeooo:rsid="04cc93c3" officeooo:paragraph-rsid="04cc93c3" style:font-size-asian="10.5pt" style:font-weight-asian="bold" style:font-size-complex="12pt" style:font-weight-complex="bold"/>
    </style:style>
    <style:style style:name="P1427" style:family="paragraph" style:parent-style-name="Standard">
      <style:paragraph-properties fo:margin-left="0in" fo:margin-right="0in" style:line-height-at-least="0.198in" fo:text-align="justify" style:justify-single-word="false" fo:text-indent="0in" style:auto-text-indent="false"/>
    </style:style>
    <style:style style:name="P1428" style:family="paragraph" style:parent-style-name="Standard">
      <style:paragraph-properties fo:margin-left="0in" fo:margin-right="0in" style:line-height-at-least="0.198in" fo:text-align="justify" style:justify-single-word="false" fo:text-indent="0in" style:auto-text-indent="false"/>
      <style:text-properties style:use-window-font-color="true" loext:opacity="0%" style:font-name="Liberation Serif" fo:font-size="12pt" fo:font-style="normal" fo:font-weight="normal" officeooo:rsid="04ce55f9" style:font-size-asian="10.5pt" style:font-style-asian="normal" style:font-weight-asian="normal" style:font-size-complex="12pt" style:font-style-complex="normal" style:font-weight-complex="normal"/>
    </style:style>
    <style:style style:name="P142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d04b2f" fo:background-color="#ffffff" style:font-size-asian="11pt" style:font-size-complex="11pt"/>
    </style:style>
    <style:style style:name="P1430" style:family="paragraph" style:parent-style-name="Standard">
      <style:paragraph-properties fo:margin-left="0in" fo:margin-right="0in" style:line-height-at-least="0.198in" fo:text-indent="0in" style:auto-text-indent="false"/>
      <style:text-properties officeooo:paragraph-rsid="04d04b2f"/>
    </style:style>
    <style:style style:name="P1431" style:family="paragraph" style:parent-style-name="Standard">
      <style:paragraph-properties fo:margin-left="0in" fo:margin-right="0in" style:line-height-at-least="0.198in" fo:text-indent="0in" style:auto-text-indent="false"/>
      <style:text-properties style:font-name="Courier" fo:font-size="11pt" officeooo:paragraph-rsid="04d04b2f" style:font-size-asian="11pt" style:font-size-complex="11pt"/>
    </style:style>
    <style:style style:name="P143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d217ee" fo:background-color="#ffffff" style:font-size-asian="11pt" style:font-size-complex="11pt"/>
    </style:style>
    <style:style style:name="P1433" style:family="paragraph" style:parent-style-name="Standard">
      <style:paragraph-properties fo:text-align="center" style:justify-single-word="false"/>
      <style:text-properties style:use-window-font-color="true" loext:opacity="0%" fo:font-size="12pt" fo:font-weight="bold" officeooo:rsid="04d713c5" officeooo:paragraph-rsid="04d713c5" style:font-size-asian="12pt" style:font-weight-asian="bold" style:font-size-complex="12pt" style:font-weight-complex="bold"/>
    </style:style>
    <style:style style:name="P1434" style:family="paragraph" style:parent-style-name="Standard">
      <style:paragraph-properties fo:text-align="justify" style:justify-single-word="false"/>
      <style:text-properties style:use-window-font-color="true" loext:opacity="0%" fo:font-size="12pt" fo:font-weight="normal" officeooo:rsid="04d86cd2" officeooo:paragraph-rsid="04d86cd2" style:font-size-asian="10.5pt" style:font-weight-asian="normal" style:font-size-complex="12pt" style:font-weight-complex="normal"/>
    </style:style>
    <style:style style:name="P1435" style:family="paragraph" style:parent-style-name="Standard">
      <style:paragraph-properties fo:text-align="justify" style:justify-single-word="false"/>
      <style:text-properties style:use-window-font-color="true" loext:opacity="0%" fo:font-size="12pt" fo:font-weight="normal" officeooo:rsid="04d9f464" officeooo:paragraph-rsid="04d9f464" style:font-size-asian="10.5pt" style:font-weight-asian="normal" style:font-size-complex="12pt" style:font-weight-complex="normal"/>
    </style:style>
    <style:style style:name="P1436" style:family="paragraph" style:parent-style-name="Standard">
      <style:paragraph-properties fo:text-align="justify" style:justify-single-word="false"/>
      <style:text-properties fo:color="#000000" loext:opacity="100%" style:font-name="Courier" fo:font-size="11pt" fo:font-weight="normal" officeooo:rsid="04d9f464" officeooo:paragraph-rsid="04d9f464" fo:background-color="#ffffff" style:font-size-asian="11pt" style:font-weight-asian="normal" style:font-size-complex="11pt" style:font-weight-complex="normal"/>
    </style:style>
    <style:style style:name="P1437"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dc2bf1" fo:background-color="#ffffff" style:font-size-asian="11pt" style:font-size-complex="11pt"/>
    </style:style>
    <style:style style:name="P1438" style:family="paragraph" style:parent-style-name="Standard">
      <style:paragraph-properties fo:text-align="justify" style:justify-single-word="false"/>
      <style:text-properties style:use-window-font-color="true" loext:opacity="0%" style:font-name="Courier" fo:font-size="11pt" fo:font-weight="normal" officeooo:rsid="04d9f464" officeooo:paragraph-rsid="04d9f464" style:font-size-asian="11pt" style:font-weight-asian="normal" style:font-size-complex="11pt" style:font-weight-complex="normal"/>
    </style:style>
    <style:style style:name="P1439" style:family="paragraph" style:parent-style-name="Standard">
      <style:paragraph-properties fo:margin-left="0in" fo:margin-right="0in" style:line-height-at-least="0.198in" fo:text-indent="0in" style:auto-text-indent="false"/>
      <style:text-properties officeooo:paragraph-rsid="062eb447"/>
    </style:style>
    <style:style style:name="P1440" style:family="paragraph" style:parent-style-name="Standard">
      <style:paragraph-properties fo:text-align="justify" style:justify-single-word="false"/>
      <style:text-properties style:use-window-font-color="true" loext:opacity="0%" fo:font-size="12pt" fo:font-weight="normal" officeooo:rsid="04dc2bf1" officeooo:paragraph-rsid="04dc2bf1" style:font-size-asian="10.5pt" style:font-weight-asian="normal" style:font-size-complex="12pt" style:font-weight-complex="normal"/>
    </style:style>
    <style:style style:name="P1441" style:family="paragraph" style:parent-style-name="Table_20_Contents">
      <style:paragraph-properties fo:text-align="justify" style:justify-single-word="false"/>
      <style:text-properties fo:font-size="12pt" officeooo:paragraph-rsid="04dc2bf1" style:font-size-asian="12pt" style:font-size-complex="12pt"/>
    </style:style>
    <style:style style:name="P1442" style:family="paragraph" style:parent-style-name="Table_20_Contents">
      <style:paragraph-properties fo:text-align="justify" style:justify-single-word="false"/>
      <style:text-properties style:use-window-font-color="true" loext:opacity="0%" fo:font-size="12pt" fo:font-weight="normal" officeooo:rsid="04cc93c3" officeooo:paragraph-rsid="04dc2bf1" style:font-size-asian="10.5pt" style:font-weight-asian="normal" style:font-size-complex="12pt" style:font-weight-complex="normal"/>
    </style:style>
    <style:style style:name="P1443" style:family="paragraph" style:parent-style-name="Table_20_Contents">
      <style:paragraph-properties fo:text-align="justify" style:justify-single-word="false"/>
      <style:text-properties style:use-window-font-color="true" loext:opacity="0%" fo:font-size="12pt" fo:font-weight="bold" officeooo:rsid="04cc93c3" officeooo:paragraph-rsid="04dc2bf1" style:font-size-asian="10.5pt" style:font-weight-asian="bold" style:font-size-complex="12pt" style:font-weight-complex="bold"/>
    </style:style>
    <style:style style:name="P1444" style:family="paragraph" style:parent-style-name="Standard">
      <style:paragraph-properties fo:text-align="center" style:justify-single-word="false"/>
      <style:text-properties style:use-window-font-color="true" loext:opacity="0%" fo:font-size="13pt" fo:font-weight="bold" officeooo:rsid="04dd9536" officeooo:paragraph-rsid="04dd9536" style:font-size-asian="13pt" style:font-weight-asian="bold" style:font-size-complex="13pt" style:font-weight-complex="bold"/>
    </style:style>
    <style:style style:name="P1445" style:family="paragraph" style:parent-style-name="Standard">
      <style:paragraph-properties fo:text-align="justify" style:justify-single-word="false"/>
      <style:text-properties style:use-window-font-color="true" loext:opacity="0%" fo:font-size="12pt" fo:font-weight="normal" officeooo:rsid="04d713c5" officeooo:paragraph-rsid="04d713c5" style:font-size-asian="10.5pt" style:font-weight-asian="normal" style:font-size-complex="12pt" style:font-weight-complex="normal"/>
    </style:style>
    <style:style style:name="P1446" style:family="paragraph" style:parent-style-name="Standard">
      <style:paragraph-properties fo:text-align="justify" style:justify-single-word="false"/>
      <style:text-properties style:use-window-font-color="true" loext:opacity="0%" fo:font-size="12pt" fo:font-weight="normal" officeooo:rsid="04dd9536" officeooo:paragraph-rsid="0653be9b" style:font-size-asian="10.5pt" style:font-weight-asian="normal" style:font-size-complex="12pt" style:font-weight-complex="normal"/>
    </style:style>
    <style:style style:name="P1447" style:family="paragraph" style:parent-style-name="Standard">
      <style:paragraph-properties fo:text-align="justify" style:justify-single-word="false"/>
      <style:text-properties style:use-window-font-color="true" loext:opacity="0%" fo:font-size="12pt" fo:font-weight="normal" officeooo:rsid="04dd9536" officeooo:paragraph-rsid="04dd9536" style:font-size-asian="10.5pt" style:font-weight-asian="normal" style:font-size-complex="12pt" style:font-weight-complex="normal"/>
    </style:style>
    <style:style style:name="P1448" style:family="paragraph" style:parent-style-name="Table_20_Contents">
      <style:paragraph-properties fo:text-align="left" style:justify-single-word="false"/>
      <style:text-properties fo:color="#00a933" loext:opacity="100%" style:font-name="Courier" fo:font-size="10pt" fo:font-style="italic" officeooo:rsid="04dd9536" officeooo:paragraph-rsid="04dd9536" style:font-size-asian="10pt" style:font-style-asian="italic" style:font-size-complex="10pt" style:font-style-complex="italic"/>
    </style:style>
    <style:style style:name="P1449" style:family="paragraph" style:parent-style-name="Standard">
      <style:paragraph-properties fo:text-align="justify" style:justify-single-word="false"/>
      <style:text-properties officeooo:paragraph-rsid="04dd9536"/>
    </style:style>
    <style:style style:name="P1450" style:family="paragraph" style:parent-style-name="Standard">
      <style:paragraph-properties fo:text-align="justify" style:justify-single-word="false"/>
      <style:text-properties officeooo:paragraph-rsid="0653be9b"/>
    </style:style>
    <style:style style:name="P1451" style:family="paragraph" style:parent-style-name="Standard">
      <style:paragraph-properties fo:text-align="justify" style:justify-single-word="false"/>
      <style:text-properties fo:color="#000000" loext:opacity="100%" fo:font-size="11pt" fo:font-weight="normal" officeooo:rsid="04d713c5" officeooo:paragraph-rsid="04d713c5" style:font-size-asian="11pt" style:font-weight-asian="normal" style:font-size-complex="11pt" style:font-weight-complex="normal"/>
    </style:style>
    <style:style style:name="P145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dde177" fo:background-color="#ffffff" style:font-size-asian="11pt" style:font-size-complex="11pt"/>
    </style:style>
    <style:style style:name="P1453" style:family="paragraph" style:parent-style-name="Standard">
      <style:paragraph-properties fo:margin-left="0in" fo:margin-right="0in" style:line-height-at-least="0.198in" fo:text-indent="0in" style:auto-text-indent="false"/>
      <style:text-properties officeooo:paragraph-rsid="04dde177"/>
    </style:style>
    <style:style style:name="P145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4de1092" fo:background-color="#ffffff" style:font-size-asian="11pt" style:font-size-complex="11pt"/>
    </style:style>
    <style:style style:name="P1455" style:family="paragraph" style:parent-style-name="Standard">
      <style:paragraph-properties fo:margin-left="0in" fo:margin-right="0in" style:line-height-at-least="0.198in" fo:text-indent="0in" style:auto-text-indent="false"/>
      <style:text-properties style:font-name="Courier" fo:font-size="11pt" officeooo:paragraph-rsid="04dde177" style:font-size-asian="11pt" style:font-size-complex="11pt"/>
    </style:style>
    <style:style style:name="P1456" style:family="paragraph" style:parent-style-name="Standard">
      <style:paragraph-properties fo:text-align="center" style:justify-single-word="false"/>
      <style:text-properties style:use-window-font-color="true" loext:opacity="0%" fo:font-size="12pt" fo:font-weight="bold" officeooo:rsid="04dde177" officeooo:paragraph-rsid="04dde177" style:font-size-asian="10.5pt" style:font-weight-asian="bold" style:font-size-complex="12pt" style:font-weight-complex="bold"/>
    </style:style>
    <style:style style:name="P1457" style:family="paragraph" style:parent-style-name="Standard">
      <style:paragraph-properties fo:text-align="justify" style:justify-single-word="false"/>
      <style:text-properties style:use-window-font-color="true" loext:opacity="0%" fo:font-size="12pt" fo:font-weight="normal" officeooo:rsid="04e44536" officeooo:paragraph-rsid="04e44536" style:font-size-asian="10.5pt" style:font-weight-asian="normal" style:font-size-complex="12pt" style:font-weight-complex="normal"/>
    </style:style>
    <style:style style:name="P1458" style:family="paragraph" style:parent-style-name="Standard">
      <style:paragraph-properties fo:text-align="justify" style:justify-single-word="false"/>
      <style:text-properties officeooo:paragraph-rsid="04e44536"/>
    </style:style>
    <style:style style:name="P1459" style:family="paragraph" style:parent-style-name="Standard">
      <style:paragraph-properties fo:text-align="justify" style:justify-single-word="false"/>
      <style:text-properties style:use-window-font-color="true" loext:opacity="0%" fo:font-size="12pt" fo:font-style="italic" fo:font-weight="normal" officeooo:rsid="04e14462" officeooo:paragraph-rsid="04e14462" style:font-size-asian="10.5pt" style:font-style-asian="italic" style:font-weight-asian="normal" style:font-size-complex="12pt" style:font-style-complex="italic" style:font-weight-complex="normal"/>
    </style:style>
    <style:style style:name="P1460" style:family="paragraph" style:parent-style-name="Table_20_Contents">
      <style:paragraph-properties fo:text-align="justify" style:justify-single-word="false"/>
      <style:text-properties fo:font-size="12pt" officeooo:paragraph-rsid="04e44536" style:font-size-asian="12pt" style:font-size-complex="12pt"/>
    </style:style>
    <style:style style:name="P1461" style:family="paragraph" style:parent-style-name="Standard">
      <style:paragraph-properties fo:text-align="center" style:justify-single-word="false"/>
      <style:text-properties style:use-window-font-color="true" loext:opacity="0%" fo:font-size="18pt" fo:font-weight="bold" officeooo:rsid="00679be2" officeooo:paragraph-rsid="00679be2" style:font-size-asian="18pt" style:font-weight-asian="bold" style:font-size-complex="18pt" style:font-weight-complex="bold"/>
    </style:style>
    <style:style style:name="P1462" style:family="paragraph" style:parent-style-name="Standard">
      <style:paragraph-properties fo:text-align="center" style:justify-single-word="false"/>
      <style:text-properties style:use-window-font-color="true" loext:opacity="0%" fo:font-size="13pt" fo:font-weight="bold" officeooo:rsid="003e126e" officeooo:paragraph-rsid="003c4a46" style:font-size-asian="11.3500003814697pt" style:font-weight-asian="bold" style:font-size-complex="13pt" style:font-weight-complex="bold"/>
    </style:style>
    <style:style style:name="P1463" style:family="paragraph" style:parent-style-name="Standard">
      <style:paragraph-properties fo:text-align="center" style:justify-single-word="false"/>
      <style:text-properties style:use-window-font-color="true" loext:opacity="0%" fo:font-size="13pt" fo:font-weight="bold" officeooo:rsid="00679be2" officeooo:paragraph-rsid="00679be2" style:font-size-asian="13pt" style:font-weight-asian="bold" style:font-size-complex="13pt" style:font-weight-complex="bold"/>
    </style:style>
    <style:style style:name="P1464" style:family="paragraph" style:parent-style-name="Standard">
      <style:paragraph-properties fo:text-align="justify" style:justify-single-word="false"/>
      <style:text-properties officeooo:paragraph-rsid="04efe026"/>
    </style:style>
    <style:style style:name="P1465" style:family="paragraph" style:parent-style-name="Standard">
      <style:paragraph-properties fo:text-align="justify" style:justify-single-word="false"/>
      <style:text-properties officeooo:paragraph-rsid="06330c73"/>
    </style:style>
    <style:style style:name="P1466" style:family="paragraph" style:parent-style-name="Standard">
      <style:paragraph-properties fo:text-align="justify" style:justify-single-word="false"/>
      <style:text-properties officeooo:paragraph-rsid="00679be2"/>
    </style:style>
    <style:style style:name="P1467" style:family="paragraph" style:parent-style-name="Standard">
      <style:paragraph-properties fo:text-align="justify" style:justify-single-word="false"/>
      <style:text-properties style:use-window-font-color="true" loext:opacity="0%" fo:font-size="12pt" fo:font-weight="normal" officeooo:rsid="00679be2" officeooo:paragraph-rsid="04f39b44" style:font-size-asian="10.5pt" style:font-weight-asian="normal" style:font-size-complex="12pt" style:font-weight-complex="normal"/>
    </style:style>
    <style:style style:name="P1468" style:family="paragraph" style:parent-style-name="Standard">
      <style:paragraph-properties fo:text-align="center" style:justify-single-word="false"/>
      <style:text-properties style:use-window-font-color="true" loext:opacity="0%" fo:font-size="12pt" fo:font-weight="bold" officeooo:rsid="04f39b44" officeooo:paragraph-rsid="04f39b44" style:font-size-asian="10.5pt" style:font-weight-asian="bold" style:font-size-complex="12pt" style:font-weight-complex="bold"/>
    </style:style>
    <style:style style:name="P1469" style:family="paragraph" style:parent-style-name="Standard">
      <style:paragraph-properties fo:text-align="center" style:justify-single-word="false"/>
      <style:text-properties style:use-window-font-color="true" loext:opacity="0%" fo:font-size="12pt" fo:font-weight="normal" officeooo:rsid="04f39b44" officeooo:paragraph-rsid="04f39b44" style:font-size-asian="10.5pt" style:font-weight-asian="normal" style:font-size-complex="12pt" style:font-weight-complex="normal"/>
    </style:style>
    <style:style style:name="P1470" style:family="paragraph" style:parent-style-name="Standard">
      <style:paragraph-properties fo:text-align="justify" style:justify-single-word="false"/>
      <style:text-properties officeooo:paragraph-rsid="05191f36"/>
    </style:style>
    <style:style style:name="P1471" style:family="paragraph" style:parent-style-name="Standard">
      <style:paragraph-properties fo:text-align="justify" style:justify-single-word="false"/>
      <style:text-properties style:use-window-font-color="true" loext:opacity="0%" fo:font-size="12pt" fo:font-weight="normal" officeooo:rsid="04efe026" officeooo:paragraph-rsid="04efe026" style:font-size-asian="10.5pt" style:font-weight-asian="normal" style:font-size-complex="12pt" style:font-weight-complex="normal"/>
    </style:style>
    <style:style style:name="P1472" style:family="paragraph" style:parent-style-name="Standard">
      <style:paragraph-properties fo:text-align="justify" style:justify-single-word="false"/>
      <style:text-properties style:use-window-font-color="true" loext:opacity="0%" fo:font-size="12pt" fo:font-weight="normal" officeooo:rsid="04faa6af" officeooo:paragraph-rsid="04efe026" style:font-size-asian="10.5pt" style:font-weight-asian="normal" style:font-size-complex="12pt" style:font-weight-complex="normal"/>
    </style:style>
    <style:style style:name="P1473" style:family="paragraph" style:parent-style-name="Standard">
      <style:paragraph-properties fo:text-align="justify" style:justify-single-word="false"/>
      <style:text-properties style:use-window-font-color="true" loext:opacity="0%" style:font-name="Courier" fo:font-size="12pt" fo:font-weight="normal" officeooo:rsid="04f1516a" officeooo:paragraph-rsid="04efe026" style:font-size-asian="10.5pt" style:font-weight-asian="normal" style:font-size-complex="12pt" style:font-weight-complex="normal"/>
    </style:style>
    <style:style style:name="P1474" style:family="paragraph" style:parent-style-name="Standard">
      <style:paragraph-properties fo:text-align="justify" style:justify-single-word="false"/>
      <style:text-properties fo:font-size="12pt" officeooo:paragraph-rsid="04fcdeb3" style:font-size-asian="10.5pt" style:font-size-complex="12pt"/>
    </style:style>
    <style:style style:name="P1475" style:family="paragraph" style:parent-style-name="Footnote">
      <style:text-properties officeooo:paragraph-rsid="04fe7958"/>
    </style:style>
    <style:style style:name="P1476" style:family="paragraph" style:parent-style-name="Standard">
      <style:text-properties officeooo:paragraph-rsid="05015177"/>
    </style:style>
    <style:style style:name="P1477" style:family="paragraph" style:parent-style-name="Standard">
      <style:paragraph-properties fo:text-align="justify" style:justify-single-word="false"/>
      <style:text-properties officeooo:paragraph-rsid="04fcdeb3"/>
    </style:style>
    <style:style style:name="P1478" style:family="paragraph" style:parent-style-name="Standard">
      <style:paragraph-properties fo:text-align="justify" style:justify-single-word="false"/>
      <style:text-properties fo:font-size="10pt" officeooo:paragraph-rsid="05015177" style:font-size-asian="10pt" style:font-size-complex="10pt"/>
    </style:style>
    <style:style style:name="P1479" style:family="paragraph" style:parent-style-name="Standard">
      <style:paragraph-properties fo:text-align="justify" style:justify-single-word="false"/>
      <style:text-properties fo:font-size="12pt" fo:font-weight="normal" officeooo:paragraph-rsid="04fcdeb3" style:font-size-asian="10.5pt" style:font-weight-asian="normal" style:font-size-complex="12pt" style:font-weight-complex="normal"/>
    </style:style>
    <style:style style:name="P1480" style:family="paragraph" style:parent-style-name="Standard">
      <style:text-properties officeooo:paragraph-rsid="04fcdeb3"/>
    </style:style>
    <style:style style:name="P1481" style:family="paragraph" style:parent-style-name="Standard">
      <style:text-properties officeooo:paragraph-rsid="05016649"/>
    </style:style>
    <style:style style:name="P1482" style:family="paragraph" style:parent-style-name="Footnote">
      <style:text-properties officeooo:rsid="05030086" officeooo:paragraph-rsid="05030086"/>
    </style:style>
    <style:style style:name="P1483" style:family="paragraph" style:parent-style-name="Standard">
      <style:paragraph-properties fo:text-align="center" style:justify-single-word="false"/>
      <style:text-properties style:use-window-font-color="true" loext:opacity="0%" fo:font-size="12pt" fo:font-weight="normal" officeooo:rsid="050c6687" officeooo:paragraph-rsid="050c6687" style:font-size-asian="10.5pt" style:font-weight-asian="normal" style:font-size-complex="12pt" style:font-weight-complex="normal"/>
    </style:style>
    <style:style style:name="P1484" style:family="paragraph" style:parent-style-name="Footnote">
      <style:text-properties officeooo:paragraph-rsid="05d246e3"/>
    </style:style>
    <style:style style:name="P1485" style:family="paragraph" style:parent-style-name="Standard">
      <style:paragraph-properties fo:text-align="justify" style:justify-single-word="false"/>
      <style:text-properties style:use-window-font-color="true" loext:opacity="0%" fo:font-size="12pt" fo:font-weight="normal" officeooo:rsid="0519c312" officeooo:paragraph-rsid="0519c312" style:font-size-asian="10.5pt" style:font-weight-asian="normal" style:font-size-complex="12pt" style:font-weight-complex="normal"/>
    </style:style>
    <style:style style:name="P1486" style:family="paragraph" style:parent-style-name="Table_20_Contents">
      <style:paragraph-properties fo:text-align="right" style:justify-single-word="false"/>
      <style:text-properties fo:color="#00a933" loext:opacity="100%" style:font-name="Courier" fo:font-size="10pt" fo:font-style="italic" officeooo:rsid="0519c312" officeooo:paragraph-rsid="051b9c1d" style:font-size-asian="10pt" style:font-style-asian="italic" style:font-size-complex="10pt" style:font-style-complex="italic"/>
    </style:style>
    <style:style style:name="P1487" style:family="paragraph" style:parent-style-name="Standard">
      <style:paragraph-properties fo:text-align="justify" style:justify-single-word="false"/>
      <style:text-properties style:use-window-font-color="true" loext:opacity="0%" fo:font-size="12pt" fo:font-weight="normal" officeooo:rsid="0519c312" officeooo:paragraph-rsid="04efe026" style:font-size-asian="10.5pt" style:font-weight-asian="normal" style:font-size-complex="12pt" style:font-weight-complex="normal"/>
    </style:style>
    <style:style style:name="P148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51fa640" fo:background-color="#ffffff" style:font-size-asian="11pt" style:font-size-complex="11pt"/>
    </style:style>
    <style:style style:name="P1489" style:family="paragraph" style:parent-style-name="Standard">
      <style:paragraph-properties fo:margin-left="0in" fo:margin-right="0in" style:line-height-at-least="0.198in" fo:text-indent="0in" style:auto-text-indent="false"/>
      <style:text-properties style:font-name="Courier" fo:font-size="11pt" officeooo:paragraph-rsid="051fa640" style:font-size-asian="11pt" style:font-size-complex="11pt"/>
    </style:style>
    <style:style style:name="P1490" style:family="paragraph" style:parent-style-name="Standard">
      <style:paragraph-properties fo:text-align="center" style:justify-single-word="false"/>
      <style:text-properties style:use-window-font-color="true" loext:opacity="0%" fo:font-size="12pt" fo:font-weight="normal" officeooo:rsid="051f5ae3" officeooo:paragraph-rsid="051f5ae3" style:font-size-asian="10.5pt" style:font-weight-asian="normal" style:font-size-complex="12pt" style:font-weight-complex="normal"/>
    </style:style>
    <style:style style:name="P1491" style:family="paragraph" style:parent-style-name="Standard" style:list-style-name="L18">
      <style:text-properties officeooo:paragraph-rsid="06333722"/>
    </style:style>
    <style:style style:name="P1492" style:family="paragraph" style:parent-style-name="Standard">
      <style:text-properties style:use-window-font-color="true" loext:opacity="0%" fo:font-size="12pt" fo:font-weight="normal" officeooo:rsid="05253d8c" style:font-size-asian="10.5pt" style:font-weight-asian="normal" style:font-size-complex="12pt" style:font-weight-complex="normal"/>
    </style:style>
    <style:style style:name="P1493" style:family="paragraph" style:parent-style-name="Standard">
      <style:paragraph-properties fo:text-align="justify" style:justify-single-word="false"/>
      <style:text-properties style:use-window-font-color="true" loext:opacity="0%" fo:font-size="12pt" fo:font-weight="normal" officeooo:rsid="05253d8c" officeooo:paragraph-rsid="05253d8c" style:font-size-asian="10.5pt" style:font-weight-asian="normal" style:font-size-complex="12pt" style:font-weight-complex="normal"/>
    </style:style>
    <style:style style:name="P1494" style:family="paragraph" style:parent-style-name="Table_20_Contents">
      <style:paragraph-properties fo:text-align="justify" style:justify-single-word="false"/>
      <style:text-properties fo:font-size="12pt" officeooo:paragraph-rsid="05253d8c" style:font-size-asian="12pt" style:font-size-complex="12pt"/>
    </style:style>
    <style:style style:name="P1495" style:family="paragraph" style:parent-style-name="Table_20_Contents">
      <style:paragraph-properties fo:text-align="justify" style:justify-single-word="false"/>
      <style:text-properties style:use-window-font-color="true" loext:opacity="0%" fo:font-size="12pt" fo:font-weight="normal" officeooo:rsid="05253d8c" officeooo:paragraph-rsid="05253d8c" style:font-size-asian="10.5pt" style:font-weight-asian="normal" style:font-size-complex="12pt" style:font-weight-complex="normal"/>
    </style:style>
    <style:style style:name="P1496" style:family="paragraph" style:parent-style-name="Standard">
      <style:paragraph-properties fo:text-align="justify" style:justify-single-word="false"/>
      <style:text-properties officeooo:paragraph-rsid="0526d0dc"/>
    </style:style>
    <style:style style:name="P1497" style:family="paragraph" style:parent-style-name="Standard">
      <style:paragraph-properties fo:text-align="justify" style:justify-single-word="false"/>
      <style:text-properties style:use-window-font-color="true" loext:opacity="0%" fo:font-size="12pt" fo:font-weight="normal" officeooo:rsid="0526d0dc" officeooo:paragraph-rsid="0526d0dc" style:font-size-asian="10.5pt" style:font-weight-asian="normal" style:font-size-complex="12pt" style:font-weight-complex="normal"/>
    </style:style>
    <style:style style:name="P1498" style:family="paragraph" style:parent-style-name="Table_20_Contents">
      <style:paragraph-properties fo:text-align="justify" style:justify-single-word="false"/>
      <style:text-properties fo:font-size="12pt" officeooo:paragraph-rsid="0526d0dc" style:font-size-asian="12pt" style:font-size-complex="12pt"/>
    </style:style>
    <style:style style:name="P1499" style:family="paragraph" style:parent-style-name="Table_20_Contents">
      <style:paragraph-properties fo:text-align="justify" style:justify-single-word="false"/>
      <style:text-properties style:use-window-font-color="true" loext:opacity="0%" fo:font-size="12pt" fo:font-weight="normal" officeooo:rsid="0526d0dc" officeooo:paragraph-rsid="0526d0dc" style:font-size-asian="10.5pt" style:font-weight-asian="normal" style:font-size-complex="12pt" style:font-weight-complex="normal"/>
    </style:style>
    <style:style style:name="P1500" style:family="paragraph" style:parent-style-name="Table_20_Contents">
      <style:paragraph-properties fo:text-align="justify" style:justify-single-word="false"/>
      <style:text-properties fo:color="#808080" loext:opacity="100%" fo:font-size="12pt" fo:font-weight="normal" officeooo:rsid="0526d0dc" officeooo:paragraph-rsid="0526d0dc" style:font-size-asian="10.5pt" style:font-weight-asian="normal" style:font-size-complex="12pt" style:font-weight-complex="normal"/>
    </style:style>
    <style:style style:name="P1501" style:family="paragraph" style:parent-style-name="Standard">
      <style:paragraph-properties fo:text-align="justify" style:justify-single-word="false"/>
      <style:text-properties officeooo:paragraph-rsid="05271256"/>
    </style:style>
    <style:style style:name="P1502"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5271256" fo:background-color="#ffffff" style:font-size-asian="11pt" style:font-size-complex="11pt"/>
    </style:style>
    <style:style style:name="P1503" style:family="paragraph" style:parent-style-name="Standard">
      <style:paragraph-properties fo:margin-left="0in" fo:margin-right="0in" style:line-height-at-least="0.198in" fo:text-indent="0in" style:auto-text-indent="false"/>
      <style:text-properties style:font-name="Courier" fo:font-size="11pt" officeooo:paragraph-rsid="05271256" style:font-size-asian="11pt" style:font-size-complex="11pt"/>
    </style:style>
    <style:style style:name="P1504" style:family="paragraph" style:parent-style-name="Standard">
      <style:paragraph-properties fo:margin-left="0in" fo:margin-right="0in" style:line-height-at-least="0.198in" fo:text-indent="0in" style:auto-text-indent="false"/>
      <style:text-properties fo:color="#a31515" loext:opacity="100%" style:font-name="Courier" fo:font-size="11pt" fo:font-weight="normal" fo:background-color="#ffffff" style:font-size-asian="11pt" style:font-size-complex="11pt"/>
    </style:style>
    <style:style style:name="P1505" style:family="paragraph" style:parent-style-name="Standard">
      <style:paragraph-properties fo:margin-left="0in" fo:margin-right="0in" style:line-height-at-least="0.198in" fo:text-indent="0in" style:auto-text-indent="false"/>
      <style:text-properties officeooo:paragraph-rsid="05271256"/>
    </style:style>
    <style:style style:name="P1506" style:family="paragraph" style:parent-style-name="Standard">
      <style:paragraph-properties fo:text-align="center" style:justify-single-word="false"/>
      <style:text-properties style:use-window-font-color="true" loext:opacity="0%" fo:font-size="12pt" fo:font-weight="bold" officeooo:rsid="0528f74c" officeooo:paragraph-rsid="0528f74c" style:font-size-asian="10.5pt" style:font-weight-asian="bold" style:font-size-complex="12pt" style:font-weight-complex="bold"/>
    </style:style>
    <style:style style:name="P150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508" style:family="paragraph" style:parent-style-name="Standard" style:list-style-name="L19">
      <style:text-properties officeooo:paragraph-rsid="063349e2"/>
    </style:style>
    <style:style style:name="P1509" style:family="paragraph" style:parent-style-name="Standard" style:list-style-name="L20">
      <style:text-properties fo:font-size="12pt" fo:font-style="italic" fo:font-weight="normal" style:font-size-asian="12pt" style:font-style-asian="italic" style:font-weight-asian="normal" style:font-size-complex="12pt" style:font-style-complex="italic" style:font-weight-complex="normal"/>
    </style:style>
    <style:style style:name="P1510" style:family="paragraph" style:parent-style-name="Standard">
      <style:text-properties fo:font-size="12pt" fo:font-style="italic" style:font-size-asian="12pt" style:font-style-asian="italic" style:font-size-complex="12pt" style:font-style-complex="italic"/>
    </style:style>
    <style:style style:name="P1511" style:family="paragraph" style:parent-style-name="Standard">
      <style:text-properties fo:font-size="12pt" fo:font-style="normal" officeooo:rsid="063349e2" officeooo:paragraph-rsid="063349e2" style:font-size-asian="12pt" style:font-style-asian="normal" style:font-size-complex="12pt" style:font-style-complex="normal"/>
    </style:style>
    <style:style style:name="P1512" style:family="paragraph" style:parent-style-name="Table_20_Contents">
      <style:paragraph-properties fo:text-align="justify" style:justify-single-word="false"/>
      <style:text-properties fo:font-size="12pt" officeooo:paragraph-rsid="063349e2" style:font-size-asian="12pt" style:font-size-complex="12pt"/>
    </style:style>
    <style:style style:name="P1513" style:family="paragraph" style:parent-style-name="Standard">
      <style:paragraph-properties fo:text-align="justify" style:justify-single-word="false"/>
      <style:text-properties style:use-window-font-color="true" loext:opacity="0%" fo:font-size="12pt" fo:font-weight="normal" officeooo:rsid="05512e8d" officeooo:paragraph-rsid="05512e8d" style:font-size-asian="12pt" style:font-weight-asian="normal" style:font-size-complex="12pt" style:font-weight-complex="normal"/>
    </style:style>
    <style:style style:name="P1514" style:family="paragraph" style:parent-style-name="Standard">
      <style:paragraph-properties fo:text-align="justify" style:justify-single-word="false"/>
      <style:text-properties officeooo:paragraph-rsid="05512e8d"/>
    </style:style>
    <style:style style:name="P1515" style:family="paragraph" style:parent-style-name="Standard">
      <style:paragraph-properties fo:text-align="justify" style:justify-single-word="false"/>
      <style:text-properties officeooo:paragraph-rsid="063349e2"/>
    </style:style>
    <style:style style:name="P1516" style:family="paragraph" style:parent-style-name="Standard">
      <style:text-properties fo:font-size="12pt" style:font-size-asian="12pt" style:font-size-complex="12pt"/>
    </style:style>
    <style:style style:name="P1517" style:family="paragraph" style:parent-style-name="Standard">
      <style:paragraph-properties fo:text-align="justify" style:justify-single-word="false"/>
      <style:text-properties style:use-window-font-color="true" loext:opacity="0%" fo:font-size="12pt" fo:font-weight="normal" officeooo:rsid="05513024" officeooo:paragraph-rsid="05513024" style:font-size-asian="12pt" style:font-weight-asian="normal" style:font-size-complex="12pt" style:font-weight-complex="normal"/>
    </style:style>
    <style:style style:name="P1518" style:family="paragraph" style:parent-style-name="Table_20_Contents">
      <style:paragraph-properties fo:text-align="justify" style:justify-single-word="false"/>
      <style:text-properties fo:font-size="12pt" officeooo:paragraph-rsid="05513024" style:font-size-asian="12pt" style:font-size-complex="12pt"/>
    </style:style>
    <style:style style:name="P1519" style:family="paragraph" style:parent-style-name="Preformatted_20_Text">
      <style:paragraph-properties fo:text-align="justify" style:justify-single-word="false"/>
      <style:text-properties style:use-window-font-color="true" loext:opacity="0%" fo:font-size="12pt" fo:font-weight="normal" officeooo:rsid="05513024" officeooo:paragraph-rsid="05513024" style:font-size-asian="10.5pt" style:font-weight-asian="normal" style:font-size-complex="12pt" style:font-weight-complex="normal"/>
    </style:style>
    <style:style style:name="P1520" style:family="paragraph" style:parent-style-name="Preformatted_20_Text">
      <style:paragraph-properties fo:text-align="justify" style:justify-single-word="false" fo:orphans="0" fo:widows="0"/>
      <style:text-properties fo:font-size="12pt" fo:font-weight="normal" officeooo:rsid="05513024" style:font-size-asian="10.5pt" style:font-weight-asian="normal" style:font-size-complex="12pt" style:font-weight-complex="normal"/>
    </style:style>
    <style:style style:name="P1521" style:family="paragraph" style:parent-style-name="Preformatted_20_Text">
      <style:paragraph-properties fo:margin-top="0in" fo:margin-bottom="0.1965in" style:contextual-spacing="false" fo:text-align="justify" style:justify-single-word="false" fo:orphans="0" fo:widows="0"/>
      <style:text-properties fo:font-size="12pt" fo:font-weight="normal" officeooo:rsid="05513024" style:font-size-asian="10.5pt" style:font-weight-asian="normal" style:font-size-complex="12pt" style:font-weight-complex="normal"/>
    </style:style>
    <style:style style:name="P1522" style:family="paragraph" style:parent-style-name="Table_20_Contents">
      <style:paragraph-properties fo:text-align="justify" style:justify-single-word="false"/>
      <style:text-properties fo:font-size="12pt" officeooo:paragraph-rsid="055629b2" style:font-size-asian="12pt" style:font-size-complex="12pt"/>
    </style:style>
    <style:style style:name="P1523" style:family="paragraph" style:parent-style-name="Table_20_Contents">
      <style:paragraph-properties fo:margin-top="0in" fo:margin-bottom="0.1965in" style:contextual-spacing="false" fo:text-align="justify" style:justify-single-word="false"/>
      <style:text-properties fo:font-size="12pt" officeooo:paragraph-rsid="06337b79" style:font-size-asian="12pt" style:font-size-complex="12pt"/>
    </style:style>
    <style:style style:name="P1524" style:family="paragraph" style:parent-style-name="Preformatted_20_Text">
      <style:paragraph-properties fo:text-align="justify" style:justify-single-word="false"/>
      <style:text-properties style:use-window-font-color="true" loext:opacity="0%" fo:font-size="10pt" fo:font-weight="normal" officeooo:paragraph-rsid="055629b2" style:font-size-asian="10pt" style:font-weight-asian="normal" style:font-size-complex="10pt" style:font-weight-complex="normal"/>
    </style:style>
    <style:style style:name="P1525" style:family="paragraph" style:parent-style-name="Preformatted_20_Text">
      <style:paragraph-properties fo:text-align="justify" style:justify-single-word="false" fo:orphans="0" fo:widows="0"/>
      <style:text-properties style:use-window-font-color="true" loext:opacity="0%" fo:font-size="10pt" style:font-size-asian="10pt" style:font-size-complex="10pt"/>
    </style:style>
    <style:style style:name="P1526" style:family="paragraph" style:parent-style-name="Preformatted_20_Text">
      <style:paragraph-properties fo:margin-top="0in" fo:margin-bottom="0.1965in" style:contextual-spacing="false" fo:text-align="justify" style:justify-single-word="false" fo:orphans="0" fo:widows="0"/>
      <style:text-properties style:use-window-font-color="true" loext:opacity="0%" fo:font-size="10pt" style:font-size-asian="10pt" style:font-size-complex="10pt"/>
    </style:style>
    <style:style style:name="P1527" style:family="paragraph" style:parent-style-name="Standard">
      <style:text-properties officeooo:paragraph-rsid="06337b79"/>
    </style:style>
    <style:style style:name="P1528" style:family="paragraph" style:parent-style-name="Standard">
      <style:text-properties style:font-name="Liberation Serif" officeooo:paragraph-rsid="06337b79"/>
    </style:style>
    <style:style style:name="P1529" style:family="paragraph" style:parent-style-name="Standard">
      <style:text-properties style:font-name="Liberation Serif" fo:font-weight="normal" officeooo:paragraph-rsid="06337b79" style:font-weight-asian="normal" style:font-weight-complex="normal"/>
    </style:style>
    <style:style style:name="P1530" style:family="paragraph" style:parent-style-name="Text_20_body" style:list-style-name="L21">
      <style:paragraph-properties fo:margin-top="0in" fo:margin-bottom="0in" style:contextual-spacing="false"/>
      <style:text-properties officeooo:paragraph-rsid="06337b79"/>
    </style:style>
    <style:style style:name="P1531" style:family="paragraph" style:parent-style-name="Text_20_body" style:list-style-name="L21">
      <style:text-properties officeooo:paragraph-rsid="06337b79"/>
    </style:style>
    <style:style style:name="P1532" style:family="paragraph" style:parent-style-name="Text_20_body">
      <style:text-properties style:font-name="Liberation Serif" fo:font-weight="normal" style:font-weight-asian="normal" style:font-weight-complex="normal"/>
    </style:style>
    <style:style style:name="P1533" style:family="paragraph" style:parent-style-name="Standard">
      <style:text-properties officeooo:rsid="0634c71d" officeooo:paragraph-rsid="0634c71d"/>
    </style:style>
    <style:style style:name="P1534" style:family="paragraph" style:parent-style-name="Preformatted_20_Text">
      <style:text-properties fo:color="#808080" loext:opacity="100%"/>
    </style:style>
    <style:style style:name="P1535" style:family="paragraph" style:parent-style-name="Preformatted_20_Text">
      <style:paragraph-properties fo:margin-top="0in" fo:margin-bottom="0.1965in" style:contextual-spacing="false"/>
    </style:style>
    <style:style style:name="P1536" style:family="paragraph" style:parent-style-name="Standard">
      <style:text-properties officeooo:paragraph-rsid="0634c71d"/>
    </style:style>
    <style:style style:name="P1537" style:family="paragraph" style:parent-style-name="Standard">
      <style:paragraph-properties fo:text-align="justify" style:justify-single-word="false"/>
      <style:text-properties style:use-window-font-color="true" loext:opacity="0%" fo:font-size="12pt" fo:font-style="normal" fo:font-weight="normal" officeooo:rsid="05a1a320" officeooo:paragraph-rsid="022df83a" style:font-size-asian="10.5pt" style:font-style-asian="normal" style:font-weight-asian="normal" style:font-size-complex="12pt" style:font-style-complex="normal" style:font-weight-complex="normal"/>
    </style:style>
    <style:style style:name="P1538" style:family="paragraph" style:parent-style-name="Standard">
      <style:paragraph-properties fo:text-align="center" style:justify-single-word="false"/>
      <style:text-properties style:use-window-font-color="true" loext:opacity="0%" fo:font-size="13pt" fo:font-style="normal" fo:font-weight="bold" officeooo:rsid="05a1a320" officeooo:paragraph-rsid="022df83a" style:font-size-asian="13pt" style:font-style-asian="normal" style:font-weight-asian="bold" style:font-size-complex="13pt" style:font-style-complex="normal" style:font-weight-complex="bold"/>
    </style:style>
    <style:style style:name="P1539" style:family="paragraph" style:parent-style-name="Standard">
      <style:paragraph-properties fo:text-align="center" style:justify-single-word="false"/>
      <style:text-properties officeooo:paragraph-rsid="022df83a"/>
    </style:style>
    <style:style style:name="P1540" style:family="paragraph" style:parent-style-name="Standard">
      <style:paragraph-properties fo:text-align="justify" style:justify-single-word="false"/>
      <style:text-properties style:use-window-font-color="true" loext:opacity="0%" fo:font-size="12pt" fo:font-style="normal" fo:font-weight="normal" officeooo:rsid="01338523" officeooo:paragraph-rsid="022df83a" style:font-size-asian="12pt" style:font-style-asian="normal" style:font-weight-asian="normal" style:font-size-complex="12pt" style:font-style-complex="normal" style:font-weight-complex="normal"/>
    </style:style>
    <style:style style:name="P1541" style:family="paragraph" style:parent-style-name="Standard">
      <style:paragraph-properties fo:text-align="justify" style:justify-single-word="false"/>
      <style:text-properties fo:color="#000000" loext:opacity="100%" style:font-name="Courier" fo:font-size="11pt" fo:font-weight="normal" officeooo:paragraph-rsid="022df83a" fo:background-color="#ffffff" style:font-size-asian="11pt" style:font-size-complex="11pt"/>
    </style:style>
    <style:style style:name="P1542" style:family="paragraph" style:parent-style-name="Standard">
      <style:paragraph-properties style:line-height-at-least="0.198in"/>
      <style:text-properties style:font-name="Courier" fo:font-size="11pt" officeooo:paragraph-rsid="022df83a" style:font-size-asian="11pt" style:font-size-complex="11pt"/>
    </style:style>
    <style:style style:name="P154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22df83a" fo:background-color="#ffffff" style:font-size-asian="11pt" style:font-size-complex="11pt"/>
    </style:style>
    <style:style style:name="P1544" style:family="paragraph" style:parent-style-name="Standard">
      <style:paragraph-properties fo:margin-left="0in" fo:margin-right="0in" style:line-height-at-least="0.198in" fo:text-indent="0in" style:auto-text-indent="false"/>
      <style:text-properties fo:color="#0000ff" loext:opacity="100%" style:font-name="Courier" fo:font-size="11pt" fo:font-weight="normal" officeooo:paragraph-rsid="022df83a" fo:background-color="#ffffff" style:font-size-asian="11pt" style:font-size-complex="11pt"/>
    </style:style>
    <style:style style:name="P1545" style:family="paragraph" style:parent-style-name="Standard">
      <style:paragraph-properties fo:margin-left="0in" fo:margin-right="0in" style:line-height-at-least="0.198in" fo:text-indent="0in" style:auto-text-indent="false"/>
      <style:text-properties style:font-name="Courier" fo:font-size="11pt" officeooo:paragraph-rsid="022df83a" style:font-size-asian="11pt" style:font-size-complex="11pt"/>
    </style:style>
    <style:style style:name="P1546" style:family="paragraph" style:parent-style-name="Standard">
      <style:paragraph-properties fo:text-align="justify" style:justify-single-word="false"/>
      <style:text-properties officeooo:paragraph-rsid="022df83a"/>
    </style:style>
    <style:style style:name="P1547" style:family="paragraph" style:parent-style-name="Footnote">
      <style:text-properties officeooo:rsid="05512e8d" officeooo:paragraph-rsid="05d2724f"/>
    </style:style>
    <style:style style:name="P1548" style:family="paragraph" style:parent-style-name="Table_20_Contents">
      <style:paragraph-properties fo:text-align="justify" style:justify-single-word="false"/>
      <style:text-properties officeooo:paragraph-rsid="022df83a"/>
    </style:style>
    <style:style style:name="P1549" style:family="paragraph" style:parent-style-name="Table_20_Contents">
      <style:paragraph-properties fo:text-align="justify" style:justify-single-word="false"/>
      <style:text-properties fo:font-size="12pt" officeooo:paragraph-rsid="022df83a" style:font-size-asian="12pt" style:font-size-complex="12pt"/>
    </style:style>
    <style:style style:name="P1550" style:family="paragraph" style:parent-style-name="Standard">
      <style:paragraph-properties fo:text-align="center" style:justify-single-word="false"/>
      <style:text-properties style:use-window-font-color="true" loext:opacity="0%" fo:font-size="12pt" fo:font-style="normal" fo:font-weight="normal" officeooo:rsid="013503fa" officeooo:paragraph-rsid="022df83a" style:font-size-asian="12pt" style:font-style-asian="normal" style:font-weight-asian="normal" style:font-size-complex="12pt" style:font-style-complex="normal" style:font-weight-complex="normal"/>
    </style:style>
    <style:style style:name="P1551" style:family="paragraph" style:parent-style-name="Standard">
      <style:paragraph-properties fo:text-align="center" style:justify-single-word="false"/>
      <style:text-properties style:use-window-font-color="true" loext:opacity="0%" fo:font-size="13pt" fo:font-weight="bold" officeooo:rsid="017aa9d8" officeooo:paragraph-rsid="017aa9d8" style:font-size-asian="13pt" style:font-weight-asian="bold" style:font-size-complex="13pt" style:font-weight-complex="bold"/>
    </style:style>
    <style:style style:name="P1552" style:family="paragraph" style:parent-style-name="Standard">
      <style:paragraph-properties fo:text-align="justify" style:justify-single-word="false"/>
      <style:text-properties officeooo:paragraph-rsid="017c3590"/>
    </style:style>
    <style:style style:name="P1553"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7c3590" fo:background-color="#ffffff" style:font-size-asian="11pt" style:font-size-complex="11pt"/>
    </style:style>
    <style:style style:name="P1554"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7fdf02" fo:background-color="#ffffff" style:font-size-asian="11pt" style:font-size-complex="11pt"/>
    </style:style>
    <style:style style:name="P1555" style:family="paragraph" style:parent-style-name="Standard">
      <style:paragraph-properties fo:margin-left="0in" fo:margin-right="0in" style:line-height-at-least="0.198in" fo:text-indent="0in" style:auto-text-indent="false"/>
      <style:text-properties style:font-name="Courier" fo:font-size="11pt" officeooo:paragraph-rsid="017c3590" style:font-size-asian="11pt" style:font-size-complex="11pt"/>
    </style:style>
    <style:style style:name="P155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17c5b97" fo:background-color="#ffffff" style:font-size-asian="11pt" style:font-size-complex="11pt"/>
    </style:style>
    <style:style style:name="P1557" style:family="paragraph" style:parent-style-name="Standard">
      <style:paragraph-properties fo:text-align="center" style:justify-single-word="false"/>
      <style:text-properties style:use-window-font-color="true" loext:opacity="0%" fo:font-size="12pt" fo:font-weight="bold" officeooo:rsid="017c3590" officeooo:paragraph-rsid="017c3590" style:font-size-asian="12pt" style:font-weight-asian="bold" style:font-size-complex="12pt" style:font-weight-complex="bold"/>
    </style:style>
    <style:style style:name="P1558" style:family="paragraph" style:parent-style-name="Standard">
      <style:paragraph-properties fo:text-align="center" style:justify-single-word="false"/>
      <style:text-properties style:use-window-font-color="true" loext:opacity="0%" fo:font-size="12pt" fo:font-weight="normal" officeooo:rsid="017c3590" officeooo:paragraph-rsid="017c3590" style:font-size-asian="12pt" style:font-weight-asian="normal" style:font-size-complex="12pt" style:font-weight-complex="normal"/>
    </style:style>
    <style:style style:name="P1559" style:family="paragraph" style:parent-style-name="Standard">
      <style:paragraph-properties fo:text-align="justify" style:justify-single-word="false"/>
      <style:text-properties style:use-window-font-color="true" loext:opacity="0%" fo:font-size="12pt" fo:font-style="italic" fo:font-weight="normal" officeooo:rsid="0180c90c" officeooo:paragraph-rsid="0180c90c" style:font-size-asian="12pt" style:font-style-asian="italic" style:font-weight-asian="normal" style:font-size-complex="12pt" style:font-style-complex="italic" style:font-weight-complex="normal"/>
    </style:style>
    <style:style style:name="P1560" style:family="paragraph" style:parent-style-name="Standard">
      <style:paragraph-properties fo:text-align="justify" style:justify-single-word="false"/>
      <style:text-properties officeooo:paragraph-rsid="01824fe3"/>
    </style:style>
    <style:style style:name="P1561" style:family="paragraph" style:parent-style-name="Standard">
      <style:paragraph-properties fo:text-align="justify" style:justify-single-word="false"/>
      <style:text-properties style:use-window-font-color="true" loext:opacity="0%" fo:font-size="12pt" fo:font-style="normal" fo:font-weight="normal" officeooo:rsid="01824fe3" officeooo:paragraph-rsid="01824fe3" style:font-size-asian="12pt" style:font-style-asian="normal" style:font-weight-asian="normal" style:font-size-complex="12pt" style:font-style-complex="normal" style:font-weight-complex="normal"/>
    </style:style>
    <style:style style:name="P1562" style:family="paragraph" style:parent-style-name="Table_20_Contents">
      <style:paragraph-properties fo:text-align="left" style:justify-single-word="false"/>
      <style:text-properties officeooo:paragraph-rsid="01824fe3"/>
    </style:style>
    <style:style style:name="P1563" style:family="paragraph" style:parent-style-name="Standard">
      <style:paragraph-properties fo:text-align="justify" style:justify-single-word="false"/>
      <style:text-properties officeooo:paragraph-rsid="06377f47"/>
    </style:style>
    <style:style style:name="P1564" style:family="paragraph" style:parent-style-name="Standard">
      <style:paragraph-properties fo:text-align="justify" style:justify-single-word="false"/>
      <style:text-properties style:use-window-font-color="true" loext:opacity="0%" fo:font-size="12pt" fo:font-style="normal" fo:font-weight="normal" officeooo:rsid="01824fe3" officeooo:paragraph-rsid="01828479" style:font-size-asian="12pt" style:font-style-asian="normal" style:font-weight-asian="normal" style:font-size-complex="12pt" style:font-style-complex="normal" style:font-weight-complex="normal"/>
    </style:style>
    <style:style style:name="P1565" style:family="paragraph" style:parent-style-name="Table_20_Contents">
      <style:paragraph-properties fo:text-align="left" style:justify-single-word="false"/>
      <style:text-properties officeooo:paragraph-rsid="01828479"/>
    </style:style>
    <style:style style:name="P1566" style:family="paragraph" style:parent-style-name="Standard">
      <style:paragraph-properties fo:text-align="justify" style:justify-single-word="false"/>
      <style:text-properties style:use-window-font-color="true" loext:opacity="0%" fo:font-size="12pt" fo:font-style="normal" fo:font-weight="normal" officeooo:rsid="01828479" officeooo:paragraph-rsid="01828479" style:font-size-asian="12pt" style:font-style-asian="normal" style:font-weight-asian="normal" style:font-size-complex="12pt" style:font-style-complex="normal" style:font-weight-complex="normal"/>
    </style:style>
    <style:style style:name="P1567" style:family="paragraph" style:parent-style-name="Table_20_Contents">
      <style:paragraph-properties fo:text-align="left" style:justify-single-word="false"/>
      <style:text-properties fo:font-weight="bold" officeooo:paragraph-rsid="01828479" style:font-weight-asian="bold" style:font-weight-complex="bold"/>
    </style:style>
    <style:style style:name="P1568" style:family="paragraph" style:parent-style-name="Standard">
      <style:paragraph-properties fo:text-align="justify" style:justify-single-word="false"/>
      <style:text-properties style:use-window-font-color="true" loext:opacity="0%" fo:font-size="12pt" fo:font-style="normal" fo:font-weight="normal" officeooo:rsid="0183d559" officeooo:paragraph-rsid="01824fe3" style:font-size-asian="12pt" style:font-style-asian="normal" style:font-weight-asian="normal" style:font-size-complex="12pt" style:font-style-complex="normal" style:font-weight-complex="normal"/>
    </style:style>
    <style:style style:name="P1569" style:family="paragraph" style:parent-style-name="Standard">
      <style:paragraph-properties fo:text-align="center" style:justify-single-word="false"/>
      <style:text-properties fo:font-size="13pt" fo:font-weight="bold" officeooo:rsid="01eba202" officeooo:paragraph-rsid="01eba202" style:font-size-asian="13pt" style:font-weight-asian="bold" style:font-size-complex="13pt" style:font-weight-complex="bold"/>
    </style:style>
    <style:style style:name="P1570" style:family="paragraph" style:parent-style-name="Standard">
      <style:paragraph-properties fo:text-align="justify" style:justify-single-word="false"/>
      <style:text-properties officeooo:rsid="015e0dc3" officeooo:paragraph-rsid="01cd8668"/>
    </style:style>
    <style:style style:name="P1571" style:family="paragraph" style:parent-style-name="Standard">
      <style:paragraph-properties fo:text-align="justify" style:justify-single-word="false"/>
      <style:text-properties officeooo:rsid="01b2e0de" officeooo:paragraph-rsid="01cd8668"/>
    </style:style>
    <style:style style:name="P1572" style:family="paragraph" style:parent-style-name="Standard">
      <style:paragraph-properties fo:text-align="center" style:justify-single-word="false"/>
      <style:text-properties fo:font-weight="bold" officeooo:rsid="01b30794" officeooo:paragraph-rsid="01cd8668" style:font-weight-asian="bold" style:font-weight-complex="bold"/>
    </style:style>
    <style:style style:name="P1573" style:family="paragraph" style:parent-style-name="Table_20_Contents">
      <style:paragraph-properties fo:text-align="center" style:justify-single-word="false"/>
      <style:text-properties fo:font-weight="bold" officeooo:rsid="01b30794" officeooo:paragraph-rsid="01cd8668" style:font-weight-asian="bold" style:font-weight-complex="bold"/>
    </style:style>
    <style:style style:name="P1574" style:family="paragraph" style:parent-style-name="Standard">
      <style:paragraph-properties fo:text-align="justify" style:justify-single-word="false"/>
      <style:text-properties style:font-name="Courier" officeooo:rsid="015e0dc3" officeooo:paragraph-rsid="01cd8668"/>
    </style:style>
    <style:style style:name="P1575" style:family="paragraph" style:parent-style-name="Table_20_Contents">
      <style:paragraph-properties fo:text-align="justify" style:justify-single-word="false"/>
      <style:text-properties officeooo:rsid="01bcea3e" officeooo:paragraph-rsid="01cd8668"/>
    </style:style>
    <style:style style:name="P1576" style:family="paragraph" style:parent-style-name="Table_20_Contents">
      <style:paragraph-properties fo:text-align="justify" style:justify-single-word="false"/>
      <style:text-properties officeooo:rsid="01bd3875" officeooo:paragraph-rsid="01cd8668"/>
    </style:style>
    <style:style style:name="P1577" style:family="paragraph" style:parent-style-name="Standard">
      <style:paragraph-properties fo:text-align="justify" style:justify-single-word="false"/>
      <style:text-properties style:font-name="Courier" officeooo:rsid="01ec8755" officeooo:paragraph-rsid="01ec8755"/>
    </style:style>
    <style:style style:name="P1578" style:family="paragraph" style:parent-style-name="Table_20_Contents">
      <style:paragraph-properties fo:text-align="justify" style:justify-single-word="false"/>
      <style:text-properties officeooo:rsid="01ec8755" officeooo:paragraph-rsid="01ec8755"/>
    </style:style>
    <style:style style:name="P1579" style:family="paragraph" style:parent-style-name="Standard">
      <style:paragraph-properties fo:text-align="left" style:justify-single-word="false"/>
      <style:text-properties style:font-name="Courier" officeooo:rsid="01ec8755" officeooo:paragraph-rsid="01ec8755"/>
    </style:style>
    <style:style style:name="P1580" style:family="paragraph" style:parent-style-name="Standard">
      <style:paragraph-properties fo:text-align="center" style:justify-single-word="false"/>
      <style:text-properties officeooo:rsid="01b30794" officeooo:paragraph-rsid="01cd8668"/>
    </style:style>
    <style:style style:name="P1581" style:family="paragraph" style:parent-style-name="Standard">
      <style:paragraph-properties fo:text-align="center" style:justify-single-word="false"/>
      <style:text-properties fo:font-size="13pt" fo:font-weight="bold" officeooo:rsid="01c0d699" officeooo:paragraph-rsid="01cd8668" style:font-size-asian="13pt" style:font-weight-asian="bold" style:font-size-complex="13pt" style:font-weight-complex="bold"/>
    </style:style>
    <style:style style:name="P1582" style:family="paragraph" style:parent-style-name="Standard">
      <style:paragraph-properties fo:text-align="justify" style:justify-single-word="false"/>
      <style:text-properties fo:font-size="12pt" fo:font-weight="bold" officeooo:rsid="01c0d699" officeooo:paragraph-rsid="01cd8668" style:font-size-asian="10.5pt" style:font-weight-asian="bold" style:font-size-complex="12pt" style:font-weight-complex="bold"/>
    </style:style>
    <style:style style:name="P1583" style:family="paragraph" style:parent-style-name="Standard">
      <style:paragraph-properties fo:text-align="justify" style:justify-single-word="false"/>
      <style:text-properties fo:font-size="12pt" fo:font-weight="normal" officeooo:rsid="023dee52" officeooo:paragraph-rsid="023dee52" style:font-size-asian="10.5pt" style:font-weight-asian="normal" style:font-size-complex="12pt" style:font-weight-complex="normal"/>
    </style:style>
    <style:style style:name="P1584" style:family="paragraph" style:parent-style-name="Standard">
      <style:paragraph-properties fo:text-align="justify" style:justify-single-word="false"/>
      <style:text-properties officeooo:paragraph-rsid="023dee52"/>
    </style:style>
    <style:style style:name="P1585" style:family="paragraph" style:parent-style-name="Standard">
      <style:paragraph-properties fo:text-align="justify" style:justify-single-word="false"/>
      <style:text-properties fo:font-size="12pt" fo:font-weight="normal" officeooo:rsid="01c0ff5f" officeooo:paragraph-rsid="01cd8668" style:font-size-asian="10.5pt" style:font-weight-asian="normal" style:font-size-complex="12pt" style:font-weight-complex="normal"/>
    </style:style>
    <style:style style:name="P1586" style:family="paragraph" style:parent-style-name="Table_20_Contents">
      <style:paragraph-properties fo:text-align="justify" style:justify-single-word="false"/>
      <style:text-properties style:font-name="Courier" fo:font-size="12pt" officeooo:paragraph-rsid="01cd8668" style:font-size-asian="10.5pt" style:font-size-complex="12pt"/>
    </style:style>
    <style:style style:name="P1587" style:family="paragraph" style:parent-style-name="Table_20_Contents">
      <style:paragraph-properties fo:text-align="left" style:justify-single-word="false"/>
      <style:text-properties fo:font-size="12pt" officeooo:rsid="01c3cdf8" officeooo:paragraph-rsid="01cd8668" style:font-size-asian="10.5pt" style:font-size-complex="12pt"/>
    </style:style>
    <style:style style:name="P1588" style:family="paragraph" style:parent-style-name="Table_20_Contents">
      <style:paragraph-properties fo:text-align="justify" style:justify-single-word="false"/>
      <style:text-properties fo:font-size="12pt" officeooo:rsid="01c3cdf8" officeooo:paragraph-rsid="01cd8668" style:font-size-asian="10.5pt" style:font-size-complex="12pt"/>
    </style:style>
    <style:style style:name="P1589" style:family="paragraph" style:parent-style-name="Standard">
      <style:paragraph-properties fo:text-align="center" style:justify-single-word="false"/>
      <style:text-properties fo:font-size="12pt" fo:font-weight="normal" officeooo:rsid="01c0ff5f" officeooo:paragraph-rsid="01cd8668" style:font-size-asian="10.5pt" style:font-weight-asian="normal" style:font-size-complex="12pt" style:font-weight-complex="normal"/>
    </style:style>
    <style:style style:name="P1590" style:family="paragraph" style:parent-style-name="Standard">
      <style:paragraph-properties fo:text-align="justify" style:justify-single-word="false"/>
      <style:text-properties fo:font-size="12pt" fo:font-weight="normal" officeooo:rsid="01c54836" officeooo:paragraph-rsid="01cd8668" style:font-size-asian="10.5pt" style:font-weight-asian="normal" style:font-size-complex="12pt" style:font-weight-complex="normal"/>
    </style:style>
    <style:style style:name="P1591" style:family="paragraph" style:parent-style-name="Table_20_Contents">
      <style:paragraph-properties fo:text-align="justify" style:justify-single-word="false"/>
      <style:text-properties fo:font-size="12pt" fo:font-style="italic" officeooo:rsid="01c54836" officeooo:paragraph-rsid="01cd8668" style:font-size-asian="10.5pt" style:font-style-asian="italic" style:font-size-complex="12pt" style:font-style-complex="italic"/>
    </style:style>
    <style:style style:name="P1592" style:family="paragraph" style:parent-style-name="Table_20_Contents">
      <style:paragraph-properties fo:text-align="justify" style:justify-single-word="false"/>
      <style:text-properties fo:font-size="12pt" officeooo:rsid="01c54836" officeooo:paragraph-rsid="01cd8668" style:font-size-asian="10.5pt" style:font-size-complex="12pt"/>
    </style:style>
    <style:style style:name="P1593" style:family="paragraph" style:parent-style-name="Standard">
      <style:paragraph-properties fo:text-align="center" style:justify-single-word="false"/>
      <style:text-properties fo:font-size="12pt" fo:font-weight="bold" officeooo:rsid="01f0e3c1" officeooo:paragraph-rsid="01f0e3c1" style:font-size-asian="10.5pt" style:font-weight-asian="bold" style:font-size-complex="12pt" style:font-weight-complex="bold"/>
    </style:style>
    <style:style style:name="P1594" style:family="paragraph" style:parent-style-name="Standard">
      <style:paragraph-properties fo:text-align="justify" style:justify-single-word="false"/>
      <style:text-properties officeooo:paragraph-rsid="01cd8668"/>
    </style:style>
    <style:style style:name="P1595" style:family="paragraph" style:parent-style-name="Standard">
      <style:paragraph-properties fo:text-align="justify" style:justify-single-word="false"/>
      <style:text-properties officeooo:paragraph-rsid="023a4e67"/>
    </style:style>
    <style:style style:name="P1596" style:family="paragraph" style:parent-style-name="Standard">
      <style:paragraph-properties fo:text-align="justify" style:justify-single-word="false"/>
      <style:text-properties style:use-window-font-color="true" loext:opacity="0%" fo:font-size="12pt" fo:font-style="normal" fo:font-weight="normal" officeooo:rsid="023a4e67" officeooo:paragraph-rsid="023a4e67" style:font-size-asian="12pt" style:font-style-asian="normal" style:font-weight-asian="normal" style:font-size-complex="12pt" style:font-style-complex="normal" style:font-weight-complex="normal"/>
    </style:style>
    <style:style style:name="P1597"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1e38303" fo:background-color="#ffffff"/>
    </style:style>
    <style:style style:name="P1598" style:family="paragraph" style:parent-style-name="Standard">
      <style:paragraph-properties fo:text-align="center" style:justify-single-word="false"/>
      <style:text-properties fo:font-size="13pt" fo:font-weight="bold" officeooo:paragraph-rsid="01eba202"/>
    </style:style>
    <style:style style:name="P1599" style:family="paragraph" style:parent-style-name="Table_20_Contents">
      <style:paragraph-properties fo:text-align="justify" style:justify-single-word="false"/>
      <style:text-properties style:font-name="COURIER" officeooo:rsid="01f037da" officeooo:paragraph-rsid="01f037da"/>
    </style:style>
    <style:style style:name="P1600" style:family="paragraph" style:parent-style-name="Table_20_Contents">
      <style:paragraph-properties fo:text-align="justify" style:justify-single-word="false"/>
      <style:text-properties officeooo:rsid="01f0e3c1" officeooo:paragraph-rsid="01f0e3c1"/>
    </style:style>
    <style:style style:name="P1601" style:family="paragraph" style:parent-style-name="Table_20_Contents">
      <style:paragraph-properties fo:text-align="justify" style:justify-single-word="false"/>
      <style:text-properties style:font-name="COURIER"/>
    </style:style>
    <style:style style:name="P1602" style:family="paragraph" style:parent-style-name="Table_20_Contents">
      <style:paragraph-properties fo:text-align="justify" style:justify-single-word="false"/>
      <style:text-properties style:font-name="COURIER" officeooo:rsid="01f0e3c1" officeooo:paragraph-rsid="01f0e3c1"/>
    </style:style>
    <style:style style:name="P1603" style:family="paragraph" style:parent-style-name="Table_20_Contents">
      <style:paragraph-properties fo:text-align="left" style:justify-single-word="false"/>
      <style:text-properties style:font-name="COURIER"/>
    </style:style>
    <style:style style:name="P1604" style:family="paragraph" style:parent-style-name="Standard">
      <style:paragraph-properties fo:text-align="justify" style:justify-single-word="false"/>
      <style:text-properties officeooo:rsid="01b2e0de" officeooo:paragraph-rsid="01eee3a0"/>
    </style:style>
    <style:style style:name="P1605" style:family="paragraph" style:parent-style-name="Standard">
      <style:paragraph-properties fo:text-align="center" style:justify-single-word="false"/>
      <style:text-properties officeooo:rsid="01f0e3c1" officeooo:paragraph-rsid="01f0e3c1"/>
    </style:style>
    <style:style style:name="P1606" style:family="paragraph" style:parent-style-name="Standard">
      <style:paragraph-properties fo:text-align="justify" style:justify-single-word="false"/>
      <style:text-properties officeooo:rsid="01f0e3c1" officeooo:paragraph-rsid="01f0e3c1"/>
    </style:style>
    <style:style style:name="P1607" style:family="paragraph" style:parent-style-name="Standard">
      <style:paragraph-properties fo:text-align="center" style:justify-single-word="false"/>
      <style:text-properties officeooo:rsid="032f231e" officeooo:paragraph-rsid="032f231e"/>
    </style:style>
    <style:style style:name="P1608" style:family="paragraph" style:parent-style-name="Standard">
      <style:paragraph-properties fo:text-align="center" style:justify-single-word="false"/>
      <style:text-properties style:use-window-font-color="true" loext:opacity="0%" fo:font-size="13pt" fo:font-weight="bold" officeooo:rsid="032f231e" officeooo:paragraph-rsid="032f231e" style:font-size-asian="13pt" style:font-weight-asian="bold" style:font-size-complex="13pt" style:font-weight-complex="bold"/>
    </style:style>
    <style:style style:name="P1609" style:family="paragraph" style:parent-style-name="Standard">
      <style:paragraph-properties fo:text-align="justify" style:justify-single-word="false"/>
      <style:text-properties style:use-window-font-color="true" loext:opacity="0%" fo:font-size="12pt" fo:font-weight="normal" officeooo:rsid="0325c609" officeooo:paragraph-rsid="032f231e" style:font-size-asian="10.5pt" style:font-weight-asian="normal" style:font-size-complex="12pt" style:font-weight-complex="normal"/>
    </style:style>
    <style:style style:name="P1610" style:family="paragraph" style:parent-style-name="Standard">
      <style:paragraph-properties fo:text-align="justify" style:justify-single-word="false"/>
      <style:text-properties style:use-window-font-color="true" loext:opacity="0%" fo:font-size="12pt" fo:font-weight="normal" officeooo:rsid="0316d1dc" officeooo:paragraph-rsid="032f231e" style:font-size-asian="10.5pt" style:font-weight-asian="normal" style:font-size-complex="12pt" style:font-weight-complex="normal"/>
    </style:style>
    <style:style style:name="P1611" style:family="paragraph" style:parent-style-name="Standard">
      <style:paragraph-properties fo:text-align="center" style:justify-single-word="false"/>
      <style:text-properties style:use-window-font-color="true" loext:opacity="0%" fo:font-size="12pt" fo:font-weight="bold" officeooo:rsid="0328d555" officeooo:paragraph-rsid="032f231e" style:font-size-asian="10.5pt" style:font-weight-asian="bold" style:font-size-complex="12pt" style:font-weight-complex="bold"/>
    </style:style>
    <style:style style:name="P1612" style:family="paragraph" style:parent-style-name="Standard">
      <style:paragraph-properties fo:text-align="center" style:justify-single-word="false"/>
      <style:text-properties style:use-window-font-color="true" loext:opacity="0%" fo:font-size="12pt" fo:font-weight="normal" officeooo:rsid="0328d555" officeooo:paragraph-rsid="032f231e" style:font-size-asian="10.5pt" style:font-weight-asian="normal" style:font-size-complex="12pt" style:font-weight-complex="normal"/>
    </style:style>
    <style:style style:name="P1613" style:family="paragraph" style:parent-style-name="Standard">
      <style:paragraph-properties fo:text-align="justify" style:justify-single-word="false"/>
      <style:text-properties style:use-window-font-color="true" loext:opacity="0%" fo:font-size="12pt" fo:font-weight="normal" officeooo:rsid="0323359f" officeooo:paragraph-rsid="032f231e" style:font-size-asian="10.5pt" style:font-weight-asian="normal" style:font-size-complex="12pt" style:font-weight-complex="normal"/>
    </style:style>
    <style:style style:name="P1614" style:family="paragraph" style:parent-style-name="Table_20_Contents">
      <style:paragraph-properties fo:text-align="center" style:justify-single-word="false"/>
      <style:text-properties fo:font-weight="bold" officeooo:rsid="0547626d" officeooo:paragraph-rsid="0547626d" style:font-weight-asian="bold" style:font-weight-complex="bold"/>
    </style:style>
    <style:style style:name="P1615" style:family="paragraph" style:parent-style-name="Table_20_Contents">
      <style:text-properties officeooo:paragraph-rsid="032f231e"/>
    </style:style>
    <style:style style:name="P1616" style:family="paragraph" style:parent-style-name="Standard">
      <style:paragraph-properties fo:text-align="center" style:justify-single-word="false"/>
      <style:text-properties style:use-window-font-color="true" loext:opacity="0%" fo:font-size="12pt" fo:font-weight="normal" officeooo:rsid="032a4727" officeooo:paragraph-rsid="032f231e" style:font-size-asian="10.5pt" style:font-weight-asian="normal" style:font-size-complex="12pt" style:font-weight-complex="normal"/>
    </style:style>
    <style:style style:name="P1617" style:family="paragraph" style:parent-style-name="Standard">
      <style:paragraph-properties fo:text-align="justify" style:justify-single-word="false"/>
      <style:text-properties style:use-window-font-color="true" loext:opacity="0%" fo:font-size="12pt" fo:font-weight="normal" officeooo:rsid="032bfdcb" officeooo:paragraph-rsid="032f231e" style:font-size-asian="10.5pt" style:font-weight-asian="normal" style:font-size-complex="12pt" style:font-weight-complex="normal"/>
    </style:style>
    <style:style style:name="P1618" style:family="paragraph" style:parent-style-name="Table_20_Heading">
      <style:text-properties officeooo:paragraph-rsid="032f231e"/>
    </style:style>
    <style:style style:name="P1619" style:family="paragraph" style:parent-style-name="Table_20_Contents">
      <style:paragraph-properties fo:text-align="left" style:justify-single-word="false"/>
      <style:text-properties officeooo:paragraph-rsid="032f231e"/>
    </style:style>
    <style:style style:name="P1620" style:family="paragraph" style:parent-style-name="Table_20_Contents">
      <style:text-properties style:font-name="Liberation Serif" fo:font-weight="normal" officeooo:paragraph-rsid="032f231e" style:font-weight-asian="normal" style:font-weight-complex="normal"/>
    </style:style>
    <style:style style:name="P1621" style:family="paragraph" style:parent-style-name="Standard">
      <style:paragraph-properties fo:text-align="center" style:justify-single-word="false"/>
      <style:text-properties style:use-window-font-color="true" loext:opacity="0%" fo:font-size="12pt" fo:font-weight="normal" officeooo:rsid="032f231e" officeooo:paragraph-rsid="032f231e" style:font-size-asian="10.5pt" style:font-weight-asian="normal" style:font-size-complex="12pt" style:font-weight-complex="normal"/>
    </style:style>
    <style:style style:name="P1622" style:family="paragraph" style:parent-style-name="Standard">
      <style:paragraph-properties fo:text-align="center" style:justify-single-word="false"/>
      <style:text-properties style:use-window-font-color="true" loext:opacity="0%" fo:font-size="13pt" fo:font-weight="bold" officeooo:rsid="04e82d3b" officeooo:paragraph-rsid="04ed3355" style:font-size-asian="13pt" style:font-weight-asian="bold" style:font-size-complex="13pt" style:font-weight-complex="bold"/>
    </style:style>
    <style:style style:name="P1623" style:family="paragraph" style:parent-style-name="Table_20_Heading">
      <style:text-properties officeooo:paragraph-rsid="04ed3355"/>
    </style:style>
    <style:style style:name="P1624" style:family="paragraph" style:parent-style-name="Table_20_Contents">
      <style:text-properties officeooo:paragraph-rsid="04ed3355"/>
    </style:style>
    <style:style style:name="P1625" style:family="paragraph" style:parent-style-name="Table_20_Contents">
      <style:text-properties style:font-name="Liberation Serif" fo:font-weight="normal" officeooo:paragraph-rsid="04ed3355" style:font-weight-asian="normal" style:font-weight-complex="normal"/>
    </style:style>
    <style:style style:name="P1626" style:family="paragraph" style:parent-style-name="Standard">
      <style:paragraph-properties fo:text-align="justify" style:justify-single-word="false"/>
      <style:text-properties style:use-window-font-color="true" loext:opacity="0%" fo:font-size="12pt" fo:font-weight="normal" officeooo:rsid="04ed3355" officeooo:paragraph-rsid="04ed3355" style:font-size-asian="10.5pt" style:font-weight-asian="normal" style:font-size-complex="12pt" style:font-weight-complex="normal"/>
    </style:style>
    <style:style style:name="P1627" style:family="paragraph" style:parent-style-name="Standard">
      <style:paragraph-properties fo:text-align="center" style:justify-single-word="false"/>
      <style:text-properties style:use-window-font-color="true" loext:opacity="0%" fo:font-size="12pt" fo:font-weight="bold" officeooo:rsid="050c7e9e" officeooo:paragraph-rsid="050c7e9e" style:font-size-asian="10.5pt" style:font-weight-asian="bold" style:font-size-complex="12pt" style:font-weight-complex="bold"/>
    </style:style>
    <style:style style:name="P1628" style:family="paragraph" style:parent-style-name="Standard">
      <style:paragraph-properties fo:text-align="justify" style:justify-single-word="false"/>
      <style:text-properties style:use-window-font-color="true" loext:opacity="0%" fo:font-size="12pt" fo:font-weight="normal" officeooo:rsid="039bb7e6" officeooo:paragraph-rsid="04ed3355" style:font-size-asian="10.5pt" style:font-weight-asian="normal" style:font-size-complex="12pt" style:font-weight-complex="normal"/>
    </style:style>
    <style:style style:name="P1629" style:family="paragraph" style:parent-style-name="Standard">
      <style:paragraph-properties fo:text-align="center" style:justify-single-word="false"/>
      <style:text-properties style:use-window-font-color="true" loext:opacity="0%" fo:font-size="18pt" fo:font-weight="bold" officeooo:rsid="039bb7e6" officeooo:paragraph-rsid="04ed3355" style:font-size-asian="18pt" style:font-weight-asian="bold" style:font-size-complex="18pt" style:font-weight-complex="bold"/>
    </style:style>
    <style:style style:name="P1630" style:family="paragraph" style:parent-style-name="Standard">
      <style:paragraph-properties fo:text-align="center" style:justify-single-word="false"/>
      <style:text-properties style:use-window-font-color="true" loext:opacity="0%" fo:font-size="14pt" fo:font-weight="bold" officeooo:rsid="005312bc" officeooo:paragraph-rsid="005312bc" style:font-size-asian="14pt" style:font-weight-asian="bold" style:font-size-complex="14pt" style:font-weight-complex="bold"/>
    </style:style>
    <style:style style:name="P1631" style:family="paragraph" style:parent-style-name="Standard">
      <style:paragraph-properties fo:text-align="center" style:justify-single-word="false"/>
      <style:text-properties style:use-window-font-color="true" loext:opacity="0%" fo:font-size="18pt" fo:font-weight="bold" officeooo:rsid="005312bc" officeooo:paragraph-rsid="005312bc" style:font-size-asian="18pt" style:font-weight-asian="bold" style:font-size-complex="18pt" style:font-weight-complex="bold"/>
    </style:style>
    <style:style style:name="P1632" style:family="paragraph" style:parent-style-name="Standard">
      <style:paragraph-properties fo:text-align="left" style:justify-single-word="false"/>
      <style:text-properties style:use-window-font-color="true" loext:opacity="0%" fo:font-size="12pt" fo:font-weight="normal" officeooo:rsid="005312bc" officeooo:paragraph-rsid="05a70ed4" style:font-size-asian="10.5pt" style:font-weight-asian="normal" style:font-size-complex="12pt" style:font-weight-complex="normal"/>
    </style:style>
    <style:style style:name="P1633" style:family="paragraph" style:parent-style-name="Standard">
      <style:paragraph-properties fo:text-align="left" style:justify-single-word="false"/>
      <style:text-properties style:use-window-font-color="true" loext:opacity="0%" fo:font-size="12pt" fo:font-weight="normal" officeooo:rsid="05a517e3" officeooo:paragraph-rsid="05a70ed4" style:font-size-asian="10.5pt" style:font-weight-asian="normal" style:font-size-complex="12pt" style:font-weight-complex="normal"/>
    </style:style>
    <style:style style:name="P1634" style:family="paragraph" style:parent-style-name="Standard">
      <style:paragraph-properties fo:text-align="left" style:justify-single-word="false"/>
      <style:text-properties officeooo:paragraph-rsid="05a70ed4"/>
    </style:style>
    <style:style style:name="P1635" style:family="paragraph" style:parent-style-name="Standard">
      <style:paragraph-properties fo:text-align="left" style:justify-single-word="false"/>
      <style:text-properties style:use-window-font-color="true" loext:opacity="0%" fo:font-size="12pt" fo:font-weight="normal" officeooo:rsid="005490a8" officeooo:paragraph-rsid="05a70ed4" style:font-size-asian="10.5pt" style:font-weight-asian="normal" style:font-size-complex="12pt" style:font-weight-complex="normal"/>
    </style:style>
    <style:style style:name="P1636" style:family="paragraph" style:parent-style-name="Standard">
      <style:paragraph-properties fo:text-align="left" style:justify-single-word="false"/>
      <style:text-properties style:use-window-font-color="true" loext:opacity="0%" fo:font-size="12pt" fo:font-weight="normal" officeooo:rsid="0089112b" officeooo:paragraph-rsid="05a70ed4" style:font-size-asian="10.5pt" style:font-weight-asian="normal" style:font-size-complex="12pt" style:font-weight-complex="normal"/>
    </style:style>
    <style:style style:name="P1637" style:family="paragraph" style:parent-style-name="Standard">
      <style:paragraph-properties fo:text-align="left" style:justify-single-word="false"/>
      <style:text-properties style:use-window-font-color="true" loext:opacity="0%" fo:font-size="12pt" fo:font-weight="normal" officeooo:rsid="009050c3" officeooo:paragraph-rsid="05a70ed4" style:font-size-asian="10.5pt" style:font-weight-asian="normal" style:font-size-complex="12pt" style:font-weight-complex="normal"/>
    </style:style>
    <style:style style:name="P1638" style:family="paragraph" style:parent-style-name="Standard">
      <style:paragraph-properties fo:text-align="left" style:justify-single-word="false"/>
      <style:text-properties style:use-window-font-color="true" loext:opacity="0%" fo:font-size="12pt" fo:font-weight="normal" officeooo:rsid="00a796b2" officeooo:paragraph-rsid="05a70ed4" style:font-size-asian="10.5pt" style:font-weight-asian="normal" style:font-size-complex="12pt" style:font-weight-complex="normal"/>
    </style:style>
    <style:style style:name="P1639" style:family="paragraph" style:parent-style-name="Table_20_Contents">
      <style:paragraph-properties fo:text-align="left" style:justify-single-word="false"/>
      <style:text-properties officeooo:paragraph-rsid="05a70ed4"/>
    </style:style>
    <style:style style:name="P1640" style:family="paragraph" style:parent-style-name="Standard">
      <style:paragraph-properties fo:text-align="left" style:justify-single-word="false"/>
      <style:text-properties style:use-window-font-color="true" loext:opacity="0%" fo:font-size="12pt" fo:font-weight="bold" officeooo:rsid="00ded1b7" officeooo:paragraph-rsid="05a70ed4" style:font-size-asian="12pt" style:font-weight-asian="bold" style:font-size-complex="12pt" style:font-weight-complex="bold"/>
    </style:style>
    <style:style style:name="P1641" style:family="paragraph" style:parent-style-name="Standard">
      <style:paragraph-properties fo:text-align="left" style:justify-single-word="false"/>
      <style:text-properties style:use-window-font-color="true" loext:opacity="0%" fo:font-size="12pt" fo:font-weight="bold" officeooo:rsid="02796c36" officeooo:paragraph-rsid="05a70ed4" style:font-size-asian="12pt" style:font-weight-asian="bold" style:font-size-complex="12pt" style:font-weight-complex="bold"/>
    </style:style>
    <style:style style:name="P1642" style:family="paragraph" style:parent-style-name="Table_20_Contents">
      <style:paragraph-properties fo:text-align="left" style:justify-single-word="false"/>
      <style:text-properties officeooo:rsid="050c6687" officeooo:paragraph-rsid="05a70ed4"/>
    </style:style>
    <style:style style:name="P1643" style:family="paragraph" style:parent-style-name="Standard">
      <style:paragraph-properties fo:margin-left="0in" fo:margin-right="0in" style:line-height-at-least="0.198in" fo:text-align="left" style:justify-single-word="false" fo:text-indent="0in" style:auto-text-indent="false"/>
      <style:text-properties officeooo:paragraph-rsid="05a70ed4"/>
    </style:style>
    <style:style style:name="P1644" style:family="paragraph" style:parent-style-name="Standard">
      <style:paragraph-properties fo:text-align="left" style:justify-single-word="false"/>
      <style:text-properties style:use-window-font-color="true" loext:opacity="0%" fo:font-size="12pt" fo:font-weight="normal" officeooo:rsid="03e1ef08" officeooo:paragraph-rsid="05a70ed4" style:font-size-asian="10.5pt" style:font-weight-asian="normal" style:font-size-complex="12pt" style:font-weight-complex="normal"/>
    </style:style>
    <style:style style:name="P1645" style:family="paragraph" style:parent-style-name="Standard">
      <style:paragraph-properties fo:text-align="left" style:justify-single-word="false"/>
      <style:text-properties style:use-window-font-color="true" loext:opacity="0%" fo:font-size="12pt" fo:font-weight="normal" officeooo:rsid="03fe8b5d" officeooo:paragraph-rsid="05a70ed4" style:font-size-asian="10.5pt" style:font-weight-asian="normal" style:font-size-complex="12pt" style:font-weight-complex="normal"/>
    </style:style>
    <style:style style:name="P1646" style:family="paragraph" style:parent-style-name="Standard">
      <style:paragraph-properties fo:text-align="left" style:justify-single-word="false"/>
      <style:text-properties style:use-window-font-color="true" loext:opacity="0%" fo:font-size="12pt" fo:font-weight="normal" officeooo:rsid="05a70ed4" officeooo:paragraph-rsid="05a70ed4" style:font-size-asian="10.5pt" style:font-weight-asian="normal" style:font-size-complex="12pt" style:font-weight-complex="normal"/>
    </style:style>
    <style:style style:name="P1647" style:family="paragraph" style:parent-style-name="Standard">
      <style:paragraph-properties fo:text-align="left" style:justify-single-word="false"/>
      <style:text-properties style:use-window-font-color="true" loext:opacity="0%" style:font-name="Liberation Serif" fo:font-size="12pt" fo:font-weight="normal" officeooo:rsid="0491aab8" officeooo:paragraph-rsid="05a70ed4" style:font-size-asian="10.5pt" style:font-weight-asian="normal" style:font-size-complex="12pt" style:font-weight-complex="normal"/>
    </style:style>
    <style:style style:name="P1648" style:family="paragraph" style:parent-style-name="Standard">
      <style:paragraph-properties fo:text-align="left" style:justify-single-word="false"/>
      <style:text-properties style:use-window-font-color="true" loext:opacity="0%" style:font-name="Liberation Serif" fo:font-size="12pt" fo:font-style="normal" fo:font-weight="normal" officeooo:rsid="0492ec7a" officeooo:paragraph-rsid="05a70ed4" style:font-size-asian="10.5pt" style:font-style-asian="normal" style:font-weight-asian="normal" style:font-size-complex="12pt" style:font-style-complex="normal" style:font-weight-complex="normal"/>
    </style:style>
    <style:style style:name="P1649" style:family="paragraph" style:parent-style-name="Standard">
      <style:paragraph-properties fo:text-align="left" style:justify-single-word="false"/>
      <style:text-properties style:use-window-font-color="true" loext:opacity="0%" style:font-name="Liberation Serif" fo:font-size="12pt" fo:font-weight="normal" officeooo:rsid="04abe005" officeooo:paragraph-rsid="05a70ed4" style:font-size-asian="10.5pt" style:font-weight-asian="normal" style:font-size-complex="12pt" style:font-weight-complex="normal"/>
    </style:style>
    <style:style style:name="P1650" style:family="paragraph" style:parent-style-name="Standard">
      <style:paragraph-properties fo:text-align="left" style:justify-single-word="false"/>
      <style:text-properties fo:font-weight="normal" officeooo:rsid="04b94cde" officeooo:paragraph-rsid="05a70ed4" style:font-weight-asian="normal" style:font-weight-complex="normal"/>
    </style:style>
    <style:style style:name="P1651" style:family="paragraph" style:parent-style-name="Standard">
      <style:paragraph-properties fo:text-align="left" style:justify-single-word="false"/>
      <style:text-properties style:use-window-font-color="true" loext:opacity="0%" fo:font-size="12pt" fo:font-weight="normal" officeooo:rsid="050c6687" officeooo:paragraph-rsid="05a70ed4" style:font-size-asian="10.5pt" style:font-weight-asian="normal" style:font-size-complex="12pt" style:font-weight-complex="normal"/>
    </style:style>
    <style:style style:name="P1652" style:family="paragraph" style:parent-style-name="Standard">
      <style:paragraph-properties fo:text-align="left" style:justify-single-word="false"/>
      <style:text-properties officeooo:rsid="01b30794" officeooo:paragraph-rsid="05a70ed4"/>
    </style:style>
    <style:style style:name="P1653" style:family="paragraph" style:parent-style-name="Standard">
      <style:paragraph-properties fo:text-align="left" style:justify-single-word="false"/>
      <style:text-properties fo:font-size="12pt" fo:font-weight="normal" officeooo:rsid="01c0ff5f" officeooo:paragraph-rsid="05a70ed4" style:font-size-asian="10.5pt" style:font-weight-asian="normal" style:font-size-complex="12pt" style:font-weight-complex="normal"/>
    </style:style>
    <style:style style:name="P1654" style:family="paragraph" style:parent-style-name="Standard">
      <style:paragraph-properties fo:text-align="left" style:justify-single-word="false"/>
      <style:text-properties fo:font-size="12pt" fo:font-weight="bold" officeooo:rsid="01f0e3c1" officeooo:paragraph-rsid="05a70ed4" style:font-size-asian="10.5pt" style:font-weight-asian="bold" style:font-size-complex="12pt" style:font-weight-complex="bold"/>
    </style:style>
    <style:style style:name="P1655" style:family="paragraph" style:parent-style-name="Standard">
      <style:paragraph-properties fo:text-align="left" style:justify-single-word="false"/>
      <style:text-properties officeooo:rsid="01f0e3c1" officeooo:paragraph-rsid="05a70ed4"/>
    </style:style>
    <style:style style:name="P1656" style:family="paragraph" style:parent-style-name="Standard">
      <style:paragraph-properties fo:text-align="left" style:justify-single-word="false"/>
      <style:text-properties style:use-window-font-color="true" loext:opacity="0%" fo:font-size="12pt" fo:font-weight="normal" officeooo:rsid="032a4727" officeooo:paragraph-rsid="05a70ed4" style:font-size-asian="10.5pt" style:font-weight-asian="normal" style:font-size-complex="12pt" style:font-weight-complex="normal"/>
    </style:style>
    <style:style style:name="P1657" style:family="paragraph" style:parent-style-name="Standard">
      <style:paragraph-properties fo:text-align="left" style:justify-single-word="false"/>
      <style:text-properties style:use-window-font-color="true" loext:opacity="0%" fo:font-size="12pt" fo:font-weight="normal" officeooo:rsid="032f231e" officeooo:paragraph-rsid="05a70ed4" style:font-size-asian="10.5pt" style:font-weight-asian="normal" style:font-size-complex="12pt" style:font-weight-complex="normal"/>
    </style:style>
    <style:style style:name="P1658" style:family="paragraph" style:parent-style-name="Standard">
      <style:paragraph-properties fo:text-align="left" style:justify-single-word="false"/>
      <style:text-properties style:use-window-font-color="true" loext:opacity="0%" fo:font-size="12pt" fo:font-weight="bold" officeooo:rsid="050c7e9e" officeooo:paragraph-rsid="05a70ed4" style:font-size-asian="10.5pt" style:font-weight-asian="bold" style:font-size-complex="12pt" style:font-weight-complex="bold"/>
    </style:style>
    <style:style style:name="P1659" style:family="paragraph" style:parent-style-name="Standard">
      <style:paragraph-properties fo:text-align="left" style:justify-single-word="false"/>
      <style:text-properties style:use-window-font-color="true" loext:opacity="0%" fo:font-size="12pt" fo:font-weight="normal" officeooo:rsid="032f231e" officeooo:paragraph-rsid="050d172a" style:font-size-asian="10.5pt" style:font-weight-asian="normal" style:font-size-complex="12pt" style:font-weight-complex="normal"/>
    </style:style>
    <style:style style:name="P1660" style:family="paragraph" style:parent-style-name="Standard">
      <style:paragraph-properties fo:text-align="center" style:justify-single-word="false"/>
      <style:text-properties style:use-window-font-color="true" loext:opacity="0%" fo:font-size="12pt" fo:font-weight="bold" officeooo:rsid="005312bc" officeooo:paragraph-rsid="005312bc" style:font-size-asian="10.5pt" style:font-weight-asian="bold" style:font-size-complex="12pt" style:font-weight-complex="bold"/>
    </style:style>
    <style:style style:name="P1661" style:family="paragraph" style:parent-style-name="Standard">
      <style:paragraph-properties fo:text-align="justify" style:justify-single-word="false"/>
      <style:text-properties style:use-window-font-color="true" loext:opacity="0%" fo:font-size="12pt" fo:font-weight="bold" officeooo:rsid="005312bc" officeooo:paragraph-rsid="05142ac3" style:font-size-asian="10.5pt" style:font-weight-asian="bold" style:font-size-complex="12pt" style:font-weight-complex="bold"/>
    </style:style>
    <style:style style:name="P1662" style:family="paragraph" style:parent-style-name="Standard">
      <style:paragraph-properties fo:text-align="justify" style:justify-single-word="false"/>
      <style:text-properties style:use-window-font-color="true" loext:opacity="0%" fo:font-size="12pt" fo:font-weight="bold" officeooo:rsid="005312bc" officeooo:paragraph-rsid="050908a6" style:font-size-asian="10.5pt" style:font-weight-asian="bold" style:font-size-complex="12pt" style:font-weight-complex="bold"/>
    </style:style>
    <style:style style:name="P1663" style:family="paragraph" style:parent-style-name="Standard">
      <style:paragraph-properties fo:text-align="justify" style:justify-single-word="false"/>
      <style:text-properties fo:font-size="14pt" fo:font-weight="bold" officeooo:rsid="04e6de64" officeooo:paragraph-rsid="050908a6" style:font-size-asian="14pt" style:font-weight-asian="bold" style:font-size-complex="14pt" style:font-weight-complex="bold"/>
    </style:style>
    <style:style style:name="T1" style:family="text">
      <style:text-properties officeooo:rsid="381f241e"/>
    </style:style>
    <style:style style:name="T2" style:family="text">
      <style:text-properties officeooo:rsid="0638ca50"/>
    </style:style>
    <style:style style:name="T3" style:family="text">
      <style:text-properties fo:font-size="16pt" officeooo:rsid="381fa95b" style:font-size-asian="16pt" style:font-size-complex="16pt"/>
    </style:style>
    <style:style style:name="T4" style:family="text">
      <style:text-properties fo:font-size="16pt" officeooo:rsid="0023b133" style:font-size-asian="16pt" style:font-size-complex="16pt"/>
    </style:style>
    <style:style style:name="T5" style:family="text">
      <style:text-properties fo:font-size="16pt" officeooo:rsid="0638ca50" style:font-size-asian="16pt" style:font-size-complex="16pt"/>
    </style:style>
    <style:style style:name="T6" style:family="text">
      <style:text-properties fo:font-size="13pt" officeooo:rsid="0023b133" style:font-size-asian="13pt" style:font-size-complex="13pt"/>
    </style:style>
    <style:style style:name="T7" style:family="text">
      <style:text-properties officeooo:rsid="0bd95cea"/>
    </style:style>
    <style:style style:name="T8" style:family="text">
      <style:text-properties officeooo:rsid="00433ec1"/>
    </style:style>
    <style:style style:name="T9" style:family="text">
      <style:text-properties officeooo:rsid="022fd930"/>
    </style:style>
    <style:style style:name="T10" style:family="text">
      <style:text-properties officeooo:rsid="05a8edf2"/>
    </style:style>
    <style:style style:name="T11" style:family="text">
      <style:text-properties officeooo:rsid="00052d9c"/>
    </style:style>
    <style:style style:name="T12" style:family="text">
      <style:text-properties officeooo:rsid="0219f66e"/>
    </style:style>
    <style:style style:name="T13" style:family="text">
      <style:text-properties fo:font-size="13pt" style:font-size-asian="13pt" style:font-size-complex="13pt"/>
    </style:style>
    <style:style style:name="T14" style:family="text">
      <style:text-properties style:font-name="Courier" fo:font-size="13pt" style:font-size-asian="13pt" style:font-size-complex="13pt"/>
    </style:style>
    <style:style style:name="T15" style:family="text">
      <style:text-properties fo:font-size="13pt" officeooo:rsid="05b1c80e" style:font-size-asian="13pt" style:font-size-complex="13pt"/>
    </style:style>
    <style:style style:name="T16" style:family="text">
      <style:text-properties fo:font-weight="normal" officeooo:rsid="006d0dae" style:font-weight-asian="normal" style:font-weight-complex="normal"/>
    </style:style>
    <style:style style:name="T17" style:family="text">
      <style:text-properties fo:font-weight="normal" officeooo:rsid="00052d9c" style:font-weight-asian="normal" style:font-weight-complex="normal"/>
    </style:style>
    <style:style style:name="T18" style:family="text">
      <style:text-properties fo:font-weight="normal" officeooo:rsid="0219f66e" style:font-weight-asian="normal" style:font-weight-complex="normal"/>
    </style:style>
    <style:style style:name="T19" style:family="text">
      <style:text-properties fo:font-weight="normal" officeooo:rsid="02ae708c" style:font-weight-asian="normal" style:font-weight-complex="normal"/>
    </style:style>
    <style:style style:name="T20" style:family="text">
      <style:text-properties fo:font-weight="normal" officeooo:rsid="00433ec1" style:font-weight-asian="normal" style:font-weight-complex="normal"/>
    </style:style>
    <style:style style:name="T21" style:family="text">
      <style:text-properties fo:font-size="13pt" fo:font-weight="normal" officeooo:rsid="006d0dae" style:font-size-asian="13pt" style:font-weight-asian="normal" style:font-size-complex="13pt" style:font-weight-complex="normal"/>
    </style:style>
    <style:style style:name="T22" style:family="text">
      <style:text-properties officeooo:rsid="064c45af"/>
    </style:style>
    <style:style style:name="T23" style:family="text">
      <style:text-properties officeooo:rsid="022e43de"/>
    </style:style>
    <style:style style:name="T24" style:family="text">
      <style:text-properties style:font-name="Courier" officeooo:rsid="0219f66e"/>
    </style:style>
    <style:style style:name="T25" style:family="text">
      <style:text-properties style:font-name="Courier" officeooo:rsid="022e43de"/>
    </style:style>
    <style:style style:name="T26" style:family="text">
      <style:text-properties style:use-window-font-color="true" loext:opacity="0%" officeooo:rsid="057bb34d"/>
    </style:style>
    <style:style style:name="T27" style:family="text">
      <style:text-properties style:use-window-font-color="true" loext:opacity="0%" officeooo:rsid="011e5481"/>
    </style:style>
    <style:style style:name="T28" style:family="text">
      <style:text-properties style:use-window-font-color="true" loext:opacity="0%" fo:font-size="13pt" fo:font-weight="normal" officeooo:rsid="011e5481" style:font-size-asian="13pt" style:font-weight-asian="normal" style:font-size-complex="13pt" style:font-weight-complex="normal"/>
    </style:style>
    <style:style style:name="T29" style:family="text">
      <style:text-properties style:font-name="Courier" fo:font-size="13pt" fo:font-weight="normal" officeooo:rsid="022e43de" style:font-size-asian="13pt" style:font-weight-asian="normal" style:font-size-complex="13pt" style:font-weight-complex="normal"/>
    </style:style>
    <style:style style:name="T30" style:family="text">
      <style:text-properties style:use-window-font-color="true" loext:opacity="0%" fo:font-size="13pt" fo:font-weight="normal" officeooo:rsid="05f8af45" style:font-size-asian="13pt" style:font-weight-asian="normal" style:font-size-complex="13pt" style:font-weight-complex="normal"/>
    </style:style>
    <style:style style:name="T31" style:family="text">
      <style:text-properties fo:font-weight="normal" officeooo:rsid="064c45af" style:font-weight-asian="normal" style:font-weight-complex="normal"/>
    </style:style>
    <style:style style:name="T32" style:family="text">
      <style:text-properties fo:font-weight="normal" officeooo:rsid="022e43de" style:font-weight-asian="normal" style:font-weight-complex="normal"/>
    </style:style>
    <style:style style:name="T33" style:family="text">
      <style:text-properties style:font-name="Courier" fo:font-weight="normal" officeooo:rsid="022e43de" style:font-weight-asian="normal" style:font-weight-complex="normal"/>
    </style:style>
    <style:style style:name="T34" style:family="text">
      <style:text-properties style:use-window-font-color="true" loext:opacity="0%" fo:font-size="13pt" fo:font-style="normal" fo:font-weight="normal" officeooo:rsid="0584881b" style:font-size-asian="13pt" style:font-style-asian="normal" style:font-weight-asian="normal" style:font-size-complex="13pt" style:font-style-complex="normal" style:font-weight-complex="normal"/>
    </style:style>
    <style:style style:name="T35" style:family="text">
      <style:text-properties style:use-window-font-color="true" loext:opacity="0%" fo:font-size="13pt" fo:font-style="normal" fo:font-weight="normal" officeooo:rsid="013533f3" style:font-size-asian="13pt" style:font-style-asian="normal" style:font-weight-asian="normal" style:font-size-complex="13pt" style:font-style-complex="normal" style:font-weight-complex="normal"/>
    </style:style>
    <style:style style:name="T36" style:family="text">
      <style:text-properties style:use-window-font-color="true" loext:opacity="0%" fo:font-size="13pt" fo:font-style="normal" fo:font-weight="normal" officeooo:rsid="05bf9719" style:font-size-asian="13pt" style:font-style-asian="normal" style:font-weight-asian="normal" style:font-size-complex="13pt" style:font-style-complex="normal" style:font-weight-complex="normal"/>
    </style:style>
    <style:style style:name="T37" style:family="text">
      <style:text-properties style:use-window-font-color="true" loext:opacity="0%" fo:font-size="13pt" fo:font-style="normal" fo:font-weight="normal" officeooo:rsid="05fefd4f" style:font-size-asian="13pt" style:font-style-asian="normal" style:font-weight-asian="normal" style:font-size-complex="13pt" style:font-style-complex="normal" style:font-weight-complex="normal"/>
    </style:style>
    <style:style style:name="T38" style:family="text">
      <style:text-properties style:use-window-font-color="true" loext:opacity="0%" fo:font-size="13pt" fo:font-style="normal" fo:font-weight="normal" officeooo:rsid="05f68247" style:font-size-asian="13pt" style:font-style-asian="normal" style:font-weight-asian="normal" style:font-size-complex="13pt" style:font-style-complex="normal" style:font-weight-complex="normal"/>
    </style:style>
    <style:style style:name="T39" style:family="text">
      <style:text-properties officeooo:rsid="021b494b"/>
    </style:style>
    <style:style style:name="T40" style:family="text">
      <style:text-properties fo:font-weight="normal" officeooo:rsid="021b494b" style:font-weight-asian="normal" style:font-weight-complex="normal"/>
    </style:style>
    <style:style style:name="T41" style:family="text">
      <style:text-properties style:use-window-font-color="true" loext:opacity="0%" fo:font-size="13pt" fo:font-weight="normal" officeooo:rsid="02ce6f9e" style:font-size-asian="13pt" style:font-weight-asian="normal" style:font-size-complex="13pt" style:font-weight-complex="normal"/>
    </style:style>
    <style:style style:name="T42" style:family="text">
      <style:text-properties style:use-window-font-color="true" loext:opacity="0%" fo:font-size="13pt" fo:font-weight="normal" officeooo:rsid="05c6a7ac" style:font-size-asian="13pt" style:font-weight-asian="normal" style:font-size-complex="13pt" style:font-weight-complex="normal"/>
    </style:style>
    <style:style style:name="T43" style:family="text">
      <style:text-properties style:use-window-font-color="true" loext:opacity="0%" fo:font-size="13pt" fo:font-weight="normal" officeooo:rsid="0610c70a" style:font-size-asian="13pt" style:font-weight-asian="normal" style:font-size-complex="13pt" style:font-weight-complex="normal"/>
    </style:style>
    <style:style style:name="T44" style:family="text">
      <style:text-properties fo:font-size="13pt" fo:font-weight="bold" style:font-size-asian="13pt" style:font-weight-asian="bold" style:font-size-complex="13pt" style:font-weight-complex="bold"/>
    </style:style>
    <style:style style:name="T45" style:family="text">
      <style:text-properties officeooo:rsid="02d54aa5"/>
    </style:style>
    <style:style style:name="T46" style:family="text">
      <style:text-properties style:use-window-font-color="true" loext:opacity="0%" fo:font-size="13pt" fo:font-weight="normal" officeooo:rsid="030f2e60" style:font-size-asian="13pt" style:font-weight-asian="normal" style:font-size-complex="13pt" style:font-weight-complex="normal"/>
    </style:style>
    <style:style style:name="T47" style:family="text">
      <style:text-properties officeooo:rsid="02d6aa2d"/>
    </style:style>
    <style:style style:name="T48" style:family="text">
      <style:text-properties officeooo:rsid="053e7be2"/>
    </style:style>
    <style:style style:name="T49" style:family="text">
      <style:text-properties officeooo:rsid="061e3f21"/>
    </style:style>
    <style:style style:name="T50" style:family="text">
      <style:text-properties style:use-window-font-color="true" loext:opacity="0%" fo:font-weight="normal" officeooo:rsid="059bfa11" style:font-weight-asian="normal" style:font-weight-complex="normal"/>
    </style:style>
    <style:style style:name="T51" style:family="text">
      <style:text-properties style:use-window-font-color="true" loext:opacity="0%" fo:font-weight="normal" officeooo:rsid="0345ea21" style:font-weight-asian="normal" style:font-weight-complex="normal"/>
    </style:style>
    <style:style style:name="T52" style:family="text">
      <style:text-properties style:use-window-font-color="true" loext:opacity="0%" style:font-name="Courier" fo:font-weight="normal" officeooo:rsid="03438345" style:font-weight-asian="normal" style:font-weight-complex="normal"/>
    </style:style>
    <style:style style:name="T53" style:family="text">
      <style:text-properties style:use-window-font-color="true" loext:opacity="0%" style:font-name="Courier" fo:font-weight="normal" officeooo:rsid="03450b33" style:font-weight-asian="normal" style:font-weight-complex="normal"/>
    </style:style>
    <style:style style:name="T54" style:family="text">
      <style:text-properties style:use-window-font-color="true" loext:opacity="0%" fo:font-weight="normal" officeooo:rsid="0368d6c9" style:font-weight-asian="normal" style:font-weight-complex="normal"/>
    </style:style>
    <style:style style:name="T55" style:family="text">
      <style:text-properties style:use-window-font-color="true" loext:opacity="0%" style:font-name="Courier" fo:font-weight="normal" officeooo:rsid="059bfa11" style:font-weight-asian="normal" style:font-weight-complex="normal"/>
    </style:style>
    <style:style style:name="T56" style:family="text">
      <style:text-properties style:use-window-font-color="true" loext:opacity="0%" style:font-name="Courier" fo:font-weight="normal" officeooo:rsid="0368d6c9" style:font-weight-asian="normal" style:font-weight-complex="normal"/>
    </style:style>
    <style:style style:name="T57" style:family="text">
      <style:text-properties style:use-window-font-color="true" loext:opacity="0%" fo:font-weight="normal" officeooo:rsid="0398501c" style:font-weight-asian="normal" style:font-weight-complex="normal"/>
    </style:style>
    <style:style style:name="T58" style:family="text">
      <style:text-properties style:use-window-font-color="true" loext:opacity="0%" fo:font-weight="normal" officeooo:rsid="059cd2b4" style:font-weight-asian="normal" style:font-weight-complex="normal"/>
    </style:style>
    <style:style style:name="T59" style:family="text">
      <style:text-properties style:use-window-font-color="true" loext:opacity="0%" fo:font-weight="normal" officeooo:rsid="03add424" style:font-weight-asian="normal" style:font-weight-complex="normal"/>
    </style:style>
    <style:style style:name="T60" style:family="text">
      <style:text-properties officeooo:rsid="024ca763"/>
    </style:style>
    <style:style style:name="T61" style:family="text">
      <style:text-properties style:use-window-font-color="true" loext:opacity="0%" fo:font-size="13pt" fo:font-weight="normal" officeooo:rsid="03dcb6ad" style:font-size-asian="13pt" style:font-weight-asian="normal" style:font-size-complex="13pt" style:font-weight-complex="normal"/>
    </style:style>
    <style:style style:name="T62" style:family="text">
      <style:text-properties style:use-window-font-color="true" loext:opacity="0%" style:font-name="Courier" fo:font-size="13pt" fo:font-weight="normal" officeooo:rsid="03450b33" style:font-size-asian="13pt" style:font-weight-asian="normal" style:font-size-complex="13pt" style:font-weight-complex="normal"/>
    </style:style>
    <style:style style:name="T63" style:family="text">
      <style:text-properties officeooo:rsid="0543519c"/>
    </style:style>
    <style:style style:name="T64" style:family="text">
      <style:text-properties fo:font-weight="normal" officeooo:rsid="02d6aa2d" style:font-weight-asian="normal" style:font-weight-complex="normal"/>
    </style:style>
    <style:style style:name="T65" style:family="text">
      <style:text-properties fo:font-weight="normal" officeooo:rsid="05a47c7f" style:font-weight-asian="normal" style:font-weight-complex="normal"/>
    </style:style>
    <style:style style:name="T66" style:family="text">
      <style:text-properties fo:font-weight="normal" officeooo:rsid="05a8edf2" style:font-weight-asian="normal" style:font-weight-complex="normal"/>
    </style:style>
    <style:style style:name="T67" style:family="text">
      <style:text-properties officeooo:rsid="05a47c7f"/>
    </style:style>
    <style:style style:name="T68" style:family="text">
      <style:text-properties fo:font-style="italic" style:font-style-asian="italic" style:font-style-complex="italic"/>
    </style:style>
    <style:style style:name="T69" style:family="text">
      <style:text-properties officeooo:rsid="05d5759c"/>
    </style:style>
    <style:style style:name="T70" style:family="text">
      <style:text-properties style:use-window-font-color="true" loext:opacity="0%"/>
    </style:style>
    <style:style style:name="T71" style:family="text">
      <style:text-properties style:use-window-font-color="true" loext:opacity="0%" officeooo:rsid="000d9af3"/>
    </style:style>
    <style:style style:name="T72" style:family="text">
      <style:text-properties style:use-window-font-color="true" loext:opacity="0%" officeooo:rsid="05b9c6c9"/>
    </style:style>
    <style:style style:name="T73" style:family="text">
      <style:text-properties fo:color="#ff0000" loext:opacity="100%"/>
    </style:style>
    <style:style style:name="T74" style:family="text">
      <style:text-properties officeooo:rsid="000d9af3"/>
    </style:style>
    <style:style style:name="T75" style:family="text">
      <style:text-properties style:font-name="Courier"/>
    </style:style>
    <style:style style:name="T76" style:family="text">
      <style:text-properties officeooo:rsid="063c7762"/>
    </style:style>
    <style:style style:name="T77" style:family="text">
      <style:text-properties fo:font-weight="normal" officeooo:rsid="14c4e220" style:font-weight-asian="normal" style:font-weight-complex="normal"/>
    </style:style>
    <style:style style:name="T78" style:family="text">
      <style:text-properties fo:color="#000080" loext:opacity="100%" style:text-underline-style="solid" style:text-underline-width="auto" style:text-underline-color="font-color" fo:font-weight="normal" officeooo:rsid="14c4e220" style:font-weight-asian="normal" style:font-weight-complex="normal"/>
    </style:style>
    <style:style style:name="T79" style:family="text">
      <style:text-properties fo:font-weight="normal" officeooo:rsid="05c1c7fd" style:font-weight-asian="normal" style:font-weight-complex="normal"/>
    </style:style>
    <style:style style:name="T80" style:family="text">
      <style:text-properties officeooo:rsid="14c4e220"/>
    </style:style>
    <style:style style:name="T81" style:family="text">
      <style:text-properties fo:color="#000080" loext:opacity="100%" style:text-underline-style="solid" style:text-underline-width="auto" style:text-underline-color="font-color" officeooo:rsid="14c4e220"/>
    </style:style>
    <style:style style:name="T82" style:family="text">
      <style:text-properties officeooo:rsid="05c1c7fd"/>
    </style:style>
    <style:style style:name="T83" style:family="text">
      <style:text-properties style:use-window-font-color="true" loext:opacity="0%" fo:font-size="12pt" fo:font-weight="normal" officeooo:rsid="05c1c7fd" style:font-size-asian="10.5pt" style:font-weight-asian="normal" style:font-size-complex="12pt" style:font-weight-complex="normal"/>
    </style:style>
    <style:style style:name="T84" style:family="text">
      <style:text-properties style:use-window-font-color="true" loext:opacity="0%" style:font-name="Courier" fo:font-size="12pt" fo:font-weight="normal" officeooo:rsid="05c1c7fd" style:font-size-asian="10.5pt" style:font-weight-asian="normal" style:font-size-complex="12pt" style:font-weight-complex="normal"/>
    </style:style>
    <style:style style:name="T85" style:family="text">
      <style:text-properties style:use-window-font-color="true" loext:opacity="0%" fo:font-size="12pt" fo:font-weight="normal" officeooo:rsid="063c7762" style:font-size-asian="10.5pt" style:font-weight-asian="normal" style:font-size-complex="12pt" style:font-weight-complex="normal"/>
    </style:style>
    <style:style style:name="T86" style:family="text">
      <style:text-properties style:use-window-font-color="true" loext:opacity="0%" fo:font-size="12pt" fo:font-weight="normal" officeooo:rsid="05c2428c" style:font-size-asian="10.5pt" style:font-weight-asian="normal" style:font-size-complex="12pt" style:font-weight-complex="normal"/>
    </style:style>
    <style:style style:name="T87" style:family="text">
      <style:text-properties fo:font-weight="normal" officeooo:rsid="05c2428c" style:font-weight-asian="normal" style:font-weight-complex="normal"/>
    </style:style>
    <style:style style:name="T88" style:family="text">
      <style:text-properties fo:color="#729fcf" loext:opacity="100%" fo:font-weight="bold" style:font-weight-asian="bold" style:font-weight-complex="bold"/>
    </style:style>
    <style:style style:name="T89" style:family="text">
      <style:text-properties officeooo:rsid="05c2428c"/>
    </style:style>
    <style:style style:name="T90" style:family="text">
      <style:text-properties fo:font-weight="bold" style:font-weight-asian="bold" style:font-weight-complex="bold"/>
    </style:style>
    <style:style style:name="T91" style:family="text">
      <style:text-properties fo:font-weight="normal" officeooo:rsid="05c3f1a8" style:font-weight-asian="normal" style:font-weight-complex="normal"/>
    </style:style>
    <style:style style:name="T92" style:family="text">
      <style:text-properties officeooo:rsid="05c3f1a8"/>
    </style:style>
    <style:style style:name="T93" style:family="text">
      <style:text-properties style:use-window-font-color="true" loext:opacity="0%" style:font-name="Courier" fo:font-size="12pt" fo:font-weight="normal" officeooo:rsid="05c3f1a8" style:font-size-asian="10.5pt" style:font-weight-asian="normal" style:font-size-complex="12pt" style:font-weight-complex="normal"/>
    </style:style>
    <style:style style:name="T94" style:family="text">
      <style:text-properties style:use-window-font-color="true" loext:opacity="0%" fo:font-size="13pt" fo:font-weight="bold" officeooo:rsid="05b05131" style:font-size-asian="13pt" style:font-weight-asian="bold" style:font-size-complex="13pt" style:font-weight-complex="bold"/>
    </style:style>
    <style:style style:name="T95" style:family="text">
      <style:text-properties style:use-window-font-color="true" loext:opacity="0%" style:font-name="Courier" fo:font-size="13pt" fo:font-weight="bold" officeooo:rsid="05b05131" style:font-size-asian="13pt" style:font-weight-asian="bold" style:font-size-complex="13pt" style:font-weight-complex="bold"/>
    </style:style>
    <style:style style:name="T96" style:family="text">
      <style:text-properties style:use-window-font-color="true" loext:opacity="0%" fo:font-size="12pt" fo:font-weight="normal" officeooo:rsid="05c423df" style:font-size-asian="10.5pt" style:font-weight-asian="normal" style:font-size-complex="12pt" style:font-weight-complex="normal"/>
    </style:style>
    <style:style style:name="T97" style:family="text">
      <style:text-properties style:use-window-font-color="true" loext:opacity="0%" style:font-name="Courier" fo:font-size="12pt" fo:font-weight="normal" officeooo:rsid="05c423df" style:font-size-asian="10.5pt" style:font-weight-asian="normal" style:font-size-complex="12pt" style:font-weight-complex="normal"/>
    </style:style>
    <style:style style:name="T98" style:family="text">
      <style:text-properties officeooo:rsid="05cb84bd"/>
    </style:style>
    <style:style style:name="T99" style:family="text">
      <style:text-properties style:font-name="Courier" officeooo:rsid="05cb84bd"/>
    </style:style>
    <style:style style:name="T100" style:family="text">
      <style:text-properties officeooo:rsid="063e2038"/>
    </style:style>
    <style:style style:name="T101" style:family="text">
      <style:text-properties fo:color="#0000ff" loext:opacity="100%" fo:font-weight="normal" fo:background-color="#ffffff" loext:char-shading-value="0"/>
    </style:style>
    <style:style style:name="T102" style:family="text">
      <style:text-properties fo:color="#a31515" loext:opacity="100%" fo:font-weight="normal" fo:background-color="#ffffff" loext:char-shading-value="0"/>
    </style:style>
    <style:style style:name="T103" style:family="text">
      <style:text-properties fo:color="#0000ff" loext:opacity="100%" style:font-name="Courier" fo:font-size="11pt" fo:font-weight="normal" fo:background-color="#ffffff" loext:char-shading-value="0" style:font-size-asian="11pt" style:font-size-complex="11pt"/>
    </style:style>
    <style:style style:name="T104" style:family="text">
      <style:text-properties fo:color="#000000" loext:opacity="100%" style:font-name="Courier" fo:font-size="11pt" fo:font-weight="normal" fo:background-color="#ffffff" loext:char-shading-value="0" style:font-size-asian="11pt" style:font-size-complex="11pt"/>
    </style:style>
    <style:style style:name="T105" style:family="text">
      <style:text-properties fo:color="#800080" loext:opacity="100%" style:font-name="Courier" fo:font-size="11pt" fo:font-weight="normal" fo:background-color="#ffffff" loext:char-shading-value="0" style:font-size-asian="11pt" style:font-size-complex="11pt"/>
    </style:style>
    <style:style style:name="T106" style:family="text">
      <style:text-properties fo:color="#000000" loext:opacity="100%" style:font-name="Courier" fo:font-size="11pt" fo:font-style="italic" fo:font-weight="normal" fo:background-color="#ffffff" loext:char-shading-value="0" style:font-size-asian="11pt" style:font-style-asian="italic" style:font-size-complex="11pt" style:font-style-complex="italic"/>
    </style:style>
    <style:style style:name="T107" style:family="text">
      <style:text-properties fo:font-style="italic" officeooo:rsid="05c7d565" style:font-style-asian="italic" style:font-style-complex="italic"/>
    </style:style>
    <style:style style:name="T108" style:family="text">
      <style:text-properties style:use-window-font-color="true" loext:opacity="0%" fo:font-size="12pt" fo:font-weight="normal" officeooo:rsid="05c7d565" style:font-size-asian="10.5pt" style:font-weight-asian="normal" style:font-size-complex="12pt" style:font-weight-complex="normal"/>
    </style:style>
    <style:style style:name="T109" style:family="text">
      <style:text-properties style:use-window-font-color="true" loext:opacity="0%" fo:font-size="12pt" fo:font-weight="normal" officeooo:rsid="063e2038" style:font-size-asian="10.5pt" style:font-weight-asian="normal" style:font-size-complex="12pt" style:font-weight-complex="normal"/>
    </style:style>
    <style:style style:name="T110" style:family="text">
      <style:text-properties style:use-window-font-color="true" loext:opacity="0%" fo:font-size="12pt" fo:font-weight="normal" officeooo:rsid="05c9cbc4" style:font-size-asian="10.5pt" style:font-weight-asian="normal" style:font-size-complex="12pt" style:font-weight-complex="normal"/>
    </style:style>
    <style:style style:name="T111" style:family="text">
      <style:text-properties officeooo:rsid="05d1e05b"/>
    </style:style>
    <style:style style:name="T112" style:family="text">
      <style:text-properties style:font-name="Courier" officeooo:rsid="05d1e05b"/>
    </style:style>
    <style:style style:name="T113" style:family="text">
      <style:text-properties fo:font-size="10pt" officeooo:rsid="05cb84bd" style:font-size-asian="10pt" style:font-size-complex="10pt"/>
    </style:style>
    <style:style style:name="T114" style:family="text">
      <style:text-properties fo:font-size="10pt" officeooo:rsid="063e2038" style:font-size-asian="10pt" style:font-size-complex="10pt"/>
    </style:style>
    <style:style style:name="T115" style:family="text">
      <style:text-properties fo:color="#0000ff" loext:opacity="100%"/>
    </style:style>
    <style:style style:name="T116" style:family="text">
      <style:text-properties fo:color="#a31515" loext:opacity="100%"/>
    </style:style>
    <style:style style:name="T117" style:family="text">
      <style:text-properties fo:font-style="italic" officeooo:rsid="05d1e05b" style:font-style-asian="italic" style:font-style-complex="italic"/>
    </style:style>
    <style:style style:name="T118" style:family="text">
      <style:text-properties style:use-window-font-color="true" loext:opacity="0%" fo:font-size="12pt" fo:font-weight="normal" officeooo:rsid="05cf0919" style:font-size-asian="10.5pt" style:font-weight-asian="normal" style:font-size-complex="12pt" style:font-weight-complex="normal"/>
    </style:style>
    <style:style style:name="T119" style:family="text">
      <style:text-properties fo:color="#008000" loext:opacity="100%"/>
    </style:style>
    <style:style style:name="T120" style:family="text">
      <style:text-properties style:use-window-font-color="true" loext:opacity="0%" fo:font-size="12pt" fo:font-weight="normal" officeooo:rsid="05d1e05b" style:font-size-asian="10.5pt" style:font-weight-asian="normal" style:font-size-complex="12pt" style:font-weight-complex="normal"/>
    </style:style>
    <style:style style:name="T121" style:family="text">
      <style:text-properties style:use-window-font-color="true" loext:opacity="0%" fo:font-size="12pt" fo:font-weight="normal" officeooo:rsid="05d31a9e" style:font-size-asian="10.5pt" style:font-weight-asian="normal" style:font-size-complex="12pt" style:font-weight-complex="normal"/>
    </style:style>
    <style:style style:name="T122" style:family="text">
      <style:text-properties style:use-window-font-color="true" loext:opacity="0%" fo:font-size="10pt" officeooo:rsid="05d48597" style:font-size-asian="10pt" style:font-size-complex="10pt"/>
    </style:style>
    <style:style style:name="T123" style:family="text">
      <style:text-properties style:use-window-font-color="true" loext:opacity="0%" fo:font-size="10pt" fo:font-weight="normal" officeooo:rsid="05d48597" fo:background-color="#ffffff" loext:char-shading-value="0" style:font-size-asian="10pt" style:font-size-complex="10pt"/>
    </style:style>
    <style:style style:name="T124" style:family="text">
      <style:text-properties fo:color="#000000" loext:opacity="100%" fo:font-weight="normal" fo:background-color="#ffffff" loext:char-shading-value="0"/>
    </style:style>
    <style:style style:name="T125" style:family="text">
      <style:text-properties style:use-window-font-color="true" loext:opacity="0%" style:font-name="Courier" fo:font-size="10pt" fo:font-weight="normal" officeooo:rsid="05d48597" fo:background-color="#ffffff" loext:char-shading-value="0" style:font-size-asian="10pt" style:font-size-complex="10pt"/>
    </style:style>
    <style:style style:name="T126" style:family="text">
      <style:text-properties fo:color="#800080" loext:opacity="100%"/>
    </style:style>
    <style:style style:name="T127" style:family="text">
      <style:text-properties fo:color="#098658" loext:opacity="100%"/>
    </style:style>
    <style:style style:name="T128" style:family="text">
      <style:text-properties fo:color="#098658" loext:opacity="100%" style:font-name="Courier" fo:font-size="11pt" fo:font-weight="normal" fo:background-color="#ffffff" loext:char-shading-value="0" style:font-size-asian="11pt" style:font-size-complex="11pt"/>
    </style:style>
    <style:style style:name="T129" style:family="text">
      <style:text-properties style:use-window-font-color="true" loext:opacity="0%" fo:font-size="12pt" fo:font-weight="normal" officeooo:rsid="05d61464" style:font-size-asian="10.5pt" style:font-weight-asian="normal" style:font-size-complex="12pt" style:font-weight-complex="normal"/>
    </style:style>
    <style:style style:name="T130" style:family="text">
      <style:text-properties style:use-window-font-color="true" loext:opacity="0%" style:font-name="Courier" fo:font-size="12pt" fo:font-weight="normal" officeooo:rsid="05d802db" style:font-size-asian="10.5pt" style:font-weight-asian="normal" style:font-size-complex="12pt" style:font-weight-complex="normal"/>
    </style:style>
    <style:style style:name="T131" style:family="text">
      <style:text-properties fo:font-weight="normal" officeooo:rsid="05d802db" style:font-weight-asian="normal" style:font-weight-complex="normal"/>
    </style:style>
    <style:style style:name="T132" style:family="text">
      <style:text-properties officeooo:rsid="05d802db"/>
    </style:style>
    <style:style style:name="T133" style:family="text">
      <style:text-properties style:use-window-font-color="true" loext:opacity="0%" fo:font-size="12pt" fo:font-weight="normal" officeooo:rsid="05d802db" style:font-size-asian="10.5pt" style:font-weight-asian="normal" style:font-size-complex="12pt" style:font-weight-complex="normal"/>
    </style:style>
    <style:style style:name="T134" style:family="text">
      <style:text-properties style:use-window-font-color="true" loext:opacity="0%" fo:font-size="13pt" fo:font-weight="bold" officeooo:rsid="05b060e5" style:font-size-asian="13pt" style:font-weight-asian="bold" style:font-size-complex="13pt" style:font-weight-complex="bold"/>
    </style:style>
    <style:style style:name="T135" style:family="text">
      <style:text-properties officeooo:rsid="05d8782f"/>
    </style:style>
    <style:style style:name="T136" style:family="text">
      <style:text-properties officeooo:rsid="05e11ccb"/>
    </style:style>
    <style:style style:name="T137" style:family="text">
      <style:text-properties style:font-name="Courier" officeooo:rsid="05e11ccb"/>
    </style:style>
    <style:style style:name="T138" style:family="text">
      <style:text-properties officeooo:rsid="05da4d49"/>
    </style:style>
    <style:style style:name="T139" style:family="text">
      <style:text-properties style:use-window-font-color="true" loext:opacity="0%" fo:font-size="12pt" fo:font-weight="normal" officeooo:rsid="05e11ccb" style:font-size-asian="10.5pt" style:font-weight-asian="normal" style:font-size-complex="12pt" style:font-weight-complex="normal"/>
    </style:style>
    <style:style style:name="T140" style:family="text">
      <style:text-properties style:font-name="Courier" officeooo:rsid="05e30381"/>
    </style:style>
    <style:style style:name="T141" style:family="text">
      <style:text-properties fo:font-size="10pt" officeooo:rsid="063fba02" style:font-size-asian="10pt" style:font-size-complex="10pt"/>
    </style:style>
    <style:style style:name="T142" style:family="text">
      <style:text-properties officeooo:rsid="05e30381"/>
    </style:style>
    <style:style style:name="T143" style:family="text">
      <style:text-properties fo:font-size="10pt" officeooo:rsid="05e11ccb" style:font-size-asian="10pt" style:font-size-complex="10pt"/>
    </style:style>
    <style:style style:name="T144" style:family="text">
      <style:text-properties officeooo:rsid="063fba02"/>
    </style:style>
    <style:style style:name="T145" style:family="text">
      <style:text-properties style:font-name="Courier" fo:font-size="10pt" officeooo:rsid="05e30381" style:font-size-asian="10pt" style:font-size-complex="10pt"/>
    </style:style>
    <style:style style:name="T146" style:family="text">
      <style:text-properties style:use-window-font-color="true" loext:opacity="0%" fo:font-size="12pt" fo:font-weight="normal" officeooo:rsid="05e4c70c" style:font-size-asian="10.5pt" style:font-weight-asian="normal" style:font-size-complex="12pt" style:font-weight-complex="normal"/>
    </style:style>
    <style:style style:name="T147" style:family="text">
      <style:text-properties style:use-window-font-color="true" loext:opacity="0%" fo:font-size="12pt" fo:font-style="italic" fo:font-weight="normal" officeooo:rsid="05e4c70c" style:font-size-asian="10.5pt" style:font-style-asian="italic" style:font-weight-asian="normal" style:font-size-complex="12pt" style:font-style-complex="italic" style:font-weight-complex="normal"/>
    </style:style>
    <style:style style:name="T148" style:family="text">
      <style:text-properties style:use-window-font-color="true" loext:opacity="0%" fo:font-size="12pt" fo:font-weight="normal" officeooo:rsid="063fba02" style:font-size-asian="10.5pt" style:font-weight-asian="normal" style:font-size-complex="12pt" style:font-weight-complex="normal"/>
    </style:style>
    <style:style style:name="T149" style:family="text">
      <style:text-properties fo:font-size="12pt" officeooo:rsid="05e7230c" style:font-size-asian="10.5pt" style:font-size-complex="12pt"/>
    </style:style>
    <style:style style:name="T150" style:family="text">
      <style:text-properties fo:font-size="12pt" officeooo:rsid="05e8f561" style:font-size-asian="10.5pt" style:font-size-complex="12pt"/>
    </style:style>
    <style:style style:name="T151" style:family="text">
      <style:text-properties officeooo:rsid="05eb9853"/>
    </style:style>
    <style:style style:name="T152" style:family="text">
      <style:text-properties style:use-window-font-color="true" loext:opacity="0%" fo:font-size="12pt" fo:font-weight="normal" officeooo:rsid="05ee483e" style:font-size-asian="10.5pt" style:font-weight-asian="normal" style:font-size-complex="12pt" style:font-weight-complex="normal"/>
    </style:style>
    <style:style style:name="T153" style:family="text">
      <style:text-properties officeooo:rsid="05ee483e"/>
    </style:style>
    <style:style style:name="T154" style:family="text">
      <style:text-properties officeooo:rsid="05d96717"/>
    </style:style>
    <style:style style:name="T155" style:family="text">
      <style:text-properties style:use-window-font-color="true" loext:opacity="0%" fo:font-size="12pt" fo:font-weight="normal" officeooo:rsid="05eefd66" style:font-size-asian="10.5pt" style:font-weight-asian="normal" style:font-size-complex="12pt" style:font-weight-complex="normal"/>
    </style:style>
    <style:style style:name="T156" style:family="text">
      <style:text-properties style:use-window-font-color="true" loext:opacity="0%" fo:font-size="10pt" officeooo:rsid="05efae2f" style:font-size-asian="10pt" style:font-size-complex="10pt"/>
    </style:style>
    <style:style style:name="T157" style:family="text">
      <style:text-properties style:use-window-font-color="true" loext:opacity="0%" fo:font-size="10pt" officeooo:rsid="05f0d78f" style:font-size-asian="10pt" style:font-size-complex="10pt"/>
    </style:style>
    <style:style style:name="T158" style:family="text">
      <style:text-properties style:use-window-font-color="true" loext:opacity="0%" fo:font-size="10pt" fo:font-weight="normal" officeooo:rsid="05f0d78f" fo:background-color="#ffffff" loext:char-shading-value="0" style:font-size-asian="10pt" style:font-size-complex="10pt"/>
    </style:style>
    <style:style style:name="T159" style:family="text">
      <style:text-properties style:use-window-font-color="true" loext:opacity="0%" fo:font-size="10pt" fo:font-weight="normal" officeooo:rsid="05efae2f" fo:background-color="#ffffff" loext:char-shading-value="0" style:font-size-asian="10pt" style:font-size-complex="10pt"/>
    </style:style>
    <style:style style:name="T160" style:family="text">
      <style:text-properties style:use-window-font-color="true" loext:opacity="0%" style:font-name="Courier" fo:font-size="10pt" fo:font-weight="normal" officeooo:rsid="05f0d78f" fo:background-color="#ffffff" loext:char-shading-value="0" style:font-size-asian="10pt" style:font-size-complex="10pt"/>
    </style:style>
    <style:style style:name="T161" style:family="text">
      <style:text-properties style:use-window-font-color="true" loext:opacity="0%" style:font-name="Courier" fo:font-size="10pt" fo:font-weight="normal" officeooo:rsid="05efae2f" fo:background-color="#ffffff" loext:char-shading-value="0" style:font-size-asian="10pt" style:font-size-complex="10pt"/>
    </style:style>
    <style:style style:name="T162" style:family="text">
      <style:text-properties style:use-window-font-color="true" loext:opacity="0%" fo:font-size="12pt" fo:font-style="italic" fo:font-weight="normal" officeooo:rsid="05f75b53" style:font-size-asian="10.5pt" style:font-style-asian="italic" style:font-weight-asian="normal" style:font-size-complex="12pt" style:font-style-complex="italic" style:font-weight-complex="normal"/>
    </style:style>
    <style:style style:name="T163" style:family="text">
      <style:text-properties style:use-window-font-color="true" loext:opacity="0%" style:font-name="Courier" fo:font-size="12pt" fo:font-style="italic" fo:font-weight="normal" officeooo:rsid="05f75b53" style:font-size-asian="10.5pt" style:font-style-asian="italic" style:font-weight-asian="normal" style:font-size-complex="12pt" style:font-style-complex="italic" style:font-weight-complex="normal"/>
    </style:style>
    <style:style style:name="T164" style:family="text">
      <style:text-properties style:use-window-font-color="true" loext:opacity="0%" fo:font-size="12pt" fo:font-weight="normal" officeooo:rsid="05f75b53" style:font-size-asian="10.5pt" style:font-weight-asian="normal" style:font-size-complex="12pt" style:font-weight-complex="normal"/>
    </style:style>
    <style:style style:name="T165" style:family="text">
      <style:text-properties fo:font-weight="normal" officeooo:rsid="05f75b53" style:font-weight-asian="normal" style:font-weight-complex="normal"/>
    </style:style>
    <style:style style:name="T166" style:family="text">
      <style:text-properties style:use-window-font-color="true" loext:opacity="0%" fo:font-size="12pt" fo:font-weight="normal" officeooo:rsid="05fafb16" style:font-size-asian="10.5pt" style:font-weight-asian="normal" style:font-size-complex="12pt" style:font-weight-complex="normal"/>
    </style:style>
    <style:style style:name="T167" style:family="text">
      <style:text-properties style:use-window-font-color="true" loext:opacity="0%" fo:font-size="12pt" fo:font-weight="normal" officeooo:rsid="05d96717" style:font-size-asian="10.5pt" style:font-weight-asian="normal" style:font-size-complex="12pt" style:font-weight-complex="normal"/>
    </style:style>
    <style:style style:name="T168" style:family="text">
      <style:text-properties officeooo:rsid="05fddd34"/>
    </style:style>
    <style:style style:name="T169" style:family="text">
      <style:text-properties officeooo:rsid="063fd130"/>
    </style:style>
    <style:style style:name="T170" style:family="text">
      <style:text-properties fo:font-weight="normal" officeooo:rsid="05fc90e1" style:font-weight-asian="normal" style:font-weight-complex="normal"/>
    </style:style>
    <style:style style:name="T171" style:family="text">
      <style:text-properties style:use-window-font-color="true" loext:opacity="0%" style:font-name="Courier" fo:font-size="12pt" fo:font-weight="normal" officeooo:rsid="05fafb16" style:font-size-asian="10.5pt" style:font-weight-asian="normal" style:font-size-complex="12pt" style:font-weight-complex="normal"/>
    </style:style>
    <style:style style:name="T172" style:family="text">
      <style:text-properties style:use-window-font-color="true" loext:opacity="0%" fo:font-size="12pt" officeooo:rsid="05fafb16" style:font-size-asian="10.5pt" style:font-size-complex="12pt"/>
    </style:style>
    <style:style style:name="T173" style:family="text">
      <style:text-properties officeooo:rsid="05641da3"/>
    </style:style>
    <style:style style:name="T174" style:family="text">
      <style:text-properties officeooo:rsid="056397f7"/>
    </style:style>
    <style:style style:name="T175" style:family="text">
      <style:text-properties officeooo:rsid="05b060e5"/>
    </style:style>
    <style:style style:name="T176" style:family="text">
      <style:text-properties style:use-window-font-color="true" loext:opacity="0%" fo:font-size="12pt" fo:font-weight="normal" officeooo:rsid="06085fe7" style:font-size-asian="10.5pt" style:font-weight-asian="normal" style:font-size-complex="12pt" style:font-weight-complex="normal"/>
    </style:style>
    <style:style style:name="T177" style:family="text">
      <style:text-properties style:use-window-font-color="true" loext:opacity="0%" style:font-name="Courier" fo:font-size="12pt" fo:font-weight="normal" officeooo:rsid="05f55eb8" style:font-size-asian="10.5pt" style:font-weight-asian="normal" style:font-size-complex="12pt" style:font-weight-complex="normal"/>
    </style:style>
    <style:style style:name="T178" style:family="text">
      <style:text-properties officeooo:rsid="060e38e0"/>
    </style:style>
    <style:style style:name="T179" style:family="text">
      <style:text-properties style:font-name="Courier" fo:font-size="10pt" officeooo:rsid="060a25bc" style:font-size-asian="10pt" style:font-size-complex="10pt"/>
    </style:style>
    <style:style style:name="T180" style:family="text">
      <style:text-properties fo:font-size="10pt" officeooo:rsid="060e38e0" style:font-size-asian="10pt" style:font-size-complex="10pt"/>
    </style:style>
    <style:style style:name="T181" style:family="text">
      <style:text-properties fo:font-weight="normal" officeooo:rsid="06085fe7" style:font-weight-asian="normal" style:font-weight-complex="normal"/>
    </style:style>
    <style:style style:name="T182" style:family="text">
      <style:text-properties fo:color="#277fff" loext:opacity="100%"/>
    </style:style>
    <style:style style:name="T183" style:family="text">
      <style:text-properties style:use-window-font-color="true" loext:opacity="0%" fo:font-size="12pt" fo:font-style="italic" fo:font-weight="normal" officeooo:rsid="06085fe7" style:font-size-asian="10.5pt" style:font-style-asian="italic" style:font-weight-asian="normal" style:font-size-complex="12pt" style:font-style-complex="italic" style:font-weight-complex="normal"/>
    </style:style>
    <style:style style:name="T184" style:family="text">
      <style:text-properties officeooo:rsid="060a25bc"/>
    </style:style>
    <style:style style:name="T185" style:family="text">
      <style:text-properties style:font-name="Courier" officeooo:rsid="060a25bc"/>
    </style:style>
    <style:style style:name="T186" style:family="text">
      <style:text-properties officeooo:rsid="05dc53d6"/>
    </style:style>
    <style:style style:name="T187" style:family="text">
      <style:text-properties style:use-window-font-color="true" loext:opacity="0%" fo:font-size="12pt" fo:font-weight="normal" officeooo:rsid="05dc53d6" style:font-size-asian="10.5pt" style:font-weight-asian="normal" style:font-size-complex="12pt" style:font-weight-complex="normal"/>
    </style:style>
    <style:style style:name="T188" style:family="text">
      <style:text-properties fo:font-weight="normal" officeooo:rsid="060b7a77" style:font-weight-asian="normal" style:font-weight-complex="normal"/>
    </style:style>
    <style:style style:name="T189" style:family="text">
      <style:text-properties style:use-window-font-color="true" loext:opacity="0%" fo:font-size="12pt" fo:font-weight="normal" officeooo:rsid="0609b137" style:font-size-asian="10.5pt" style:font-weight-asian="normal" style:font-size-complex="12pt" style:font-weight-complex="normal"/>
    </style:style>
    <style:style style:name="T190" style:family="text">
      <style:text-properties officeooo:rsid="0609b137"/>
    </style:style>
    <style:style style:name="T191" style:family="text">
      <style:text-properties style:use-window-font-color="true" loext:opacity="0%" fo:font-size="12pt" fo:font-weight="normal" officeooo:rsid="060cd6fd" style:font-size-asian="10.5pt" style:font-weight-asian="normal" style:font-size-complex="12pt" style:font-weight-complex="normal"/>
    </style:style>
    <style:style style:name="T192" style:family="text">
      <style:text-properties officeooo:rsid="060cd6fd"/>
    </style:style>
    <style:style style:name="T193" style:family="text">
      <style:text-properties style:use-window-font-color="true" loext:opacity="0%" fo:font-size="12pt" fo:font-weight="normal" style:font-size-asian="10.5pt" style:font-weight-asian="normal" style:font-size-complex="12pt" style:font-weight-complex="normal"/>
    </style:style>
    <style:style style:name="T194" style:family="text">
      <style:text-properties style:use-window-font-color="true" loext:opacity="0%" fo:font-size="12pt" fo:font-weight="normal" officeooo:rsid="064106a7" style:font-size-asian="10.5pt" style:font-weight-asian="normal" style:font-size-complex="12pt" style:font-weight-complex="normal"/>
    </style:style>
    <style:style style:name="T195" style:family="text">
      <style:text-properties officeooo:rsid="064106a7"/>
    </style:style>
    <style:style style:name="T196" style:family="text">
      <style:text-properties fo:font-size="12pt" officeooo:rsid="0612e2ce" style:font-size-asian="10.5pt" style:font-size-complex="12pt"/>
    </style:style>
    <style:style style:name="T197" style:family="text">
      <style:text-properties fo:font-size="12pt" officeooo:rsid="05dc53d6" style:font-size-asian="10.5pt" style:font-size-complex="12pt"/>
    </style:style>
    <style:style style:name="T198" style:family="text">
      <style:text-properties fo:font-size="12pt" fo:font-style="italic" officeooo:rsid="0612e2ce" style:font-size-asian="10.5pt" style:font-style-asian="italic" style:font-size-complex="12pt" style:font-style-complex="italic"/>
    </style:style>
    <style:style style:name="T199" style:family="text">
      <style:text-properties officeooo:rsid="0612e2ce"/>
    </style:style>
    <style:style style:name="T200" style:family="text">
      <style:text-properties style:font-name="Courier" officeooo:rsid="0612e2ce"/>
    </style:style>
    <style:style style:name="T201" style:family="text">
      <style:text-properties fo:font-size="10pt" officeooo:rsid="0612e2ce" style:font-size-asian="10pt" style:font-size-complex="10pt"/>
    </style:style>
    <style:style style:name="T202" style:family="text">
      <style:text-properties fo:font-weight="normal" officeooo:rsid="06136785" style:font-weight-asian="normal" style:font-weight-complex="normal"/>
    </style:style>
    <style:style style:name="T203" style:family="text">
      <style:text-properties fo:font-weight="normal" officeooo:rsid="0612e2ce" style:font-weight-asian="normal" style:font-weight-complex="normal"/>
    </style:style>
    <style:style style:name="T204" style:family="text">
      <style:text-properties officeooo:rsid="0565b7fc"/>
    </style:style>
    <style:style style:name="T205" style:family="text">
      <style:text-properties style:font-name="Courier" officeooo:rsid="05b22025"/>
    </style:style>
    <style:style style:name="T206" style:family="text">
      <style:text-properties fo:font-size="12pt" officeooo:rsid="06421fbc" style:font-size-asian="10.5pt" style:font-size-complex="12pt"/>
    </style:style>
    <style:style style:name="T207" style:family="text">
      <style:text-properties fo:font-size="12pt" officeooo:rsid="06175bf4" style:font-size-asian="10.5pt" style:font-size-complex="12pt"/>
    </style:style>
    <style:style style:name="T208" style:family="text">
      <style:text-properties officeooo:rsid="0617ed76"/>
    </style:style>
    <style:style style:name="T209" style:family="text">
      <style:text-properties officeooo:rsid="05deaac4"/>
    </style:style>
    <style:style style:name="T210" style:family="text">
      <style:text-properties style:font-name="Courier" fo:font-size="10pt" officeooo:rsid="0612e2ce" style:font-size-asian="10pt" style:font-size-complex="10pt"/>
    </style:style>
    <style:style style:name="T211" style:family="text">
      <style:text-properties fo:font-size="12pt" officeooo:rsid="05deaac4" style:font-size-asian="10.5pt" style:font-size-complex="12pt"/>
    </style:style>
    <style:style style:name="T212" style:family="text">
      <style:text-properties fo:color="#008000" loext:opacity="100%" fo:font-weight="normal" fo:background-color="#ffffff" loext:char-shading-value="0"/>
    </style:style>
    <style:style style:name="T213" style:family="text">
      <style:text-properties style:use-window-font-color="true" loext:opacity="0%" fo:font-size="10pt" officeooo:rsid="061ceb4d" style:font-size-asian="10pt" style:font-size-complex="10pt"/>
    </style:style>
    <style:style style:name="T214" style:family="text">
      <style:text-properties style:use-window-font-color="true" loext:opacity="0%" style:font-name="Courier" fo:font-size="10pt" fo:font-weight="normal" officeooo:rsid="061ceb4d" fo:background-color="#ffffff" loext:char-shading-value="0" style:font-size-asian="10pt" style:font-size-complex="10pt"/>
    </style:style>
    <style:style style:name="T215" style:family="text">
      <style:text-properties style:use-window-font-color="true" loext:opacity="0%" fo:font-size="10pt" fo:font-weight="normal" officeooo:rsid="061ceb4d" fo:background-color="#ffffff" loext:char-shading-value="0" style:font-size-asian="10pt" style:font-size-complex="10pt"/>
    </style:style>
    <style:style style:name="T216" style:family="text">
      <style:text-properties fo:color="#800080" loext:opacity="100%" fo:font-weight="normal" fo:background-color="#ffffff" loext:char-shading-value="0"/>
    </style:style>
    <style:style style:name="T217" style:family="text">
      <style:text-properties officeooo:rsid="061ceb4d"/>
    </style:style>
    <style:style style:name="T218" style:family="text">
      <style:text-properties fo:color="#0000ff" loext:opacity="100%" fo:font-size="10pt" officeooo:rsid="061dc808" style:font-size-asian="10pt" style:font-size-complex="10pt"/>
    </style:style>
    <style:style style:name="T219" style:family="text">
      <style:text-properties fo:color="#0000ff" loext:opacity="100%" officeooo:rsid="061dc808"/>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style:font-name="Courier" fo:font-style="italic" fo:font-weight="normal" style:font-style-asian="italic" style:font-weight-asian="normal" style:font-style-complex="italic" style:font-weight-complex="normal"/>
    </style:style>
    <style:style style:name="T222" style:family="text">
      <style:text-properties style:font-name="Courier" officeooo:rsid="05deaac4"/>
    </style:style>
    <style:style style:name="T223" style:family="text">
      <style:text-properties fo:font-style="italic" fo:font-weight="normal" officeooo:rsid="05deaac4" style:font-style-asian="italic" style:font-weight-asian="normal" style:font-style-complex="italic" style:font-weight-complex="normal"/>
    </style:style>
    <style:style style:name="T224" style:family="text">
      <style:text-properties fo:font-size="12pt" officeooo:rsid="06225041" style:font-size-asian="10.5pt" style:font-size-complex="12pt"/>
    </style:style>
    <style:style style:name="T225" style:family="text">
      <style:text-properties fo:font-size="12pt" officeooo:rsid="05dfcc56" style:font-size-asian="10.5pt" style:font-size-complex="12pt"/>
    </style:style>
    <style:style style:name="T226" style:family="text">
      <style:text-properties style:font-name="Courier" fo:font-size="12pt" fo:font-style="normal" officeooo:rsid="06222278" style:font-size-asian="10.5pt" style:font-style-asian="normal" style:font-size-complex="12pt" style:font-style-complex="normal"/>
    </style:style>
    <style:style style:name="T227" style:family="text">
      <style:text-properties officeooo:rsid="06242800"/>
    </style:style>
    <style:style style:name="T228" style:family="text">
      <style:text-properties officeooo:rsid="06421fbc"/>
    </style:style>
    <style:style style:name="T229" style:family="text">
      <style:text-properties style:font-name="Liberation Serif"/>
    </style:style>
    <style:style style:name="T230" style:family="text">
      <style:text-properties fo:font-weight="normal" style:font-weight-asian="normal" style:font-weight-complex="normal"/>
    </style:style>
    <style:style style:name="T231" style:family="text">
      <style:text-properties officeooo:rsid="0569da53"/>
    </style:style>
    <style:style style:name="T232" style:family="text">
      <style:text-properties officeooo:rsid="05b15143"/>
    </style:style>
    <style:style style:name="T233" style:family="text">
      <style:text-properties fo:font-size="12pt" officeooo:rsid="05b22025" style:font-size-asian="10.5pt" style:font-size-complex="12pt"/>
    </style:style>
    <style:style style:name="T234" style:family="text">
      <style:text-properties style:font-name="Courier" fo:font-size="12pt" officeooo:rsid="05b22025" style:font-size-asian="10.5pt" style:font-size-complex="12pt"/>
    </style:style>
    <style:style style:name="T235" style:family="text">
      <style:text-properties fo:font-size="12pt" fo:font-weight="normal" officeooo:rsid="05b22025" style:font-size-asian="10.5pt" style:font-weight-asian="normal" style:font-size-complex="12pt" style:font-weight-complex="normal"/>
    </style:style>
    <style:style style:name="T236" style:family="text">
      <style:text-properties style:font-name="Courier" fo:font-weight="normal" style:font-weight-asian="normal" style:font-weight-complex="normal"/>
    </style:style>
    <style:style style:name="T237" style:family="text">
      <style:text-properties officeooo:rsid="05b22025"/>
    </style:style>
    <style:style style:name="T238" style:family="text">
      <style:text-properties officeooo:rsid="062acf06"/>
    </style:style>
    <style:style style:name="T239" style:family="text">
      <style:text-properties style:font-name="Courier" fo:font-size="10pt" officeooo:rsid="0626b0c7" style:font-size-asian="10pt" style:font-size-complex="10pt"/>
    </style:style>
    <style:style style:name="T240" style:family="text">
      <style:text-properties officeooo:rsid="0626b0c7"/>
    </style:style>
    <style:style style:name="T241" style:family="text">
      <style:text-properties officeooo:rsid="0566c0a1"/>
    </style:style>
    <style:style style:name="T242" style:family="text">
      <style:text-properties fo:font-size="12pt" officeooo:rsid="062b738e" style:font-size-asian="10.5pt" style:font-size-complex="12pt"/>
    </style:style>
    <style:style style:name="T243" style:family="text">
      <style:text-properties fo:font-size="12pt" officeooo:rsid="062d6a30" style:font-size-asian="10.5pt" style:font-size-complex="12pt"/>
    </style:style>
    <style:style style:name="T244" style:family="text">
      <style:text-properties fo:font-size="12pt" officeooo:rsid="062e9f36" style:font-size-asian="10.5pt" style:font-size-complex="12pt"/>
    </style:style>
    <style:style style:name="T245" style:family="text">
      <style:text-properties fo:font-size="12pt" officeooo:rsid="0630df7a" style:font-size-asian="10.5pt" style:font-size-complex="12pt"/>
    </style:style>
    <style:style style:name="T246" style:family="text">
      <style:text-properties officeooo:rsid="0630df7a"/>
    </style:style>
    <style:style style:name="T247" style:family="text">
      <style:text-properties style:font-name="Courier" officeooo:rsid="0630df7a"/>
    </style:style>
    <style:style style:name="T248" style:family="text">
      <style:text-properties fo:font-size="10pt" officeooo:rsid="0630df7a" style:font-size-asian="10pt" style:font-size-complex="10pt"/>
    </style:style>
    <style:style style:name="T249" style:family="text">
      <style:text-properties fo:font-size="12pt" officeooo:rsid="06318473" style:font-size-asian="10.5pt" style:font-size-complex="12pt"/>
    </style:style>
    <style:style style:name="T250" style:family="text">
      <style:text-properties fo:font-size="12pt" fo:font-style="italic" officeooo:rsid="06318473" style:font-size-asian="10.5pt" style:font-style-asian="italic" style:font-size-complex="12pt" style:font-style-complex="italic"/>
    </style:style>
    <style:style style:name="T251" style:family="text">
      <style:text-properties fo:font-size="12pt" officeooo:rsid="05e161af" style:font-size-asian="10.5pt" style:font-size-complex="12pt"/>
    </style:style>
    <style:style style:name="T252" style:family="text">
      <style:text-properties style:use-window-font-color="true" loext:opacity="0%" fo:font-size="12pt" fo:font-weight="normal" officeooo:rsid="06339574" style:font-size-asian="10.5pt" style:font-weight-asian="normal" style:font-size-complex="12pt" style:font-weight-complex="normal"/>
    </style:style>
    <style:style style:name="T253" style:family="text">
      <style:text-properties officeooo:rsid="06339574"/>
    </style:style>
    <style:style style:name="T254" style:family="text">
      <style:text-properties style:font-name="Courier" fo:font-size="10pt" officeooo:rsid="0630df7a" style:font-size-asian="10pt" style:font-size-complex="10pt"/>
    </style:style>
    <style:style style:name="T255" style:family="text">
      <style:text-properties fo:font-weight="normal" officeooo:rsid="06339574" style:font-weight-asian="normal" style:font-weight-complex="normal"/>
    </style:style>
    <style:style style:name="T256" style:family="text">
      <style:text-properties fo:color="#05a1f7" loext:opacity="100%"/>
    </style:style>
    <style:style style:name="T257" style:family="text">
      <style:text-properties fo:color="#277fff" loext:opacity="100%" fo:font-weight="bold"/>
    </style:style>
    <style:style style:name="T258" style:family="text">
      <style:text-properties fo:color="#05a1f7" loext:opacity="100%" fo:font-weight="bold"/>
    </style:style>
    <style:style style:name="T259" style:family="text">
      <style:text-properties style:use-window-font-color="true" loext:opacity="0%" fo:font-size="13pt" fo:font-weight="bold" officeooo:rsid="05675553" style:font-size-asian="13pt" style:font-weight-asian="bold" style:font-size-complex="13pt" style:font-weight-complex="bold"/>
    </style:style>
    <style:style style:name="T260" style:family="text">
      <style:text-properties style:use-window-font-color="true" loext:opacity="0%" fo:font-size="13pt" fo:font-weight="bold" officeooo:rsid="05b15143" style:font-size-asian="13pt" style:font-weight-asian="bold" style:font-size-complex="13pt" style:font-weight-complex="bold"/>
    </style:style>
    <style:style style:name="T261" style:family="text">
      <style:text-properties style:use-window-font-color="true" loext:opacity="0%" fo:font-size="13pt" fo:font-weight="bold" officeooo:rsid="05b1c80e" style:font-size-asian="13pt" style:font-weight-asian="bold" style:font-size-complex="13pt" style:font-weight-complex="bold"/>
    </style:style>
    <style:style style:name="T262" style:family="text">
      <style:text-properties style:use-window-font-color="true" loext:opacity="0%" fo:font-size="13pt" fo:font-weight="bold" officeooo:rsid="063629a8" style:font-size-asian="13pt" style:font-weight-asian="bold" style:font-size-complex="13pt" style:font-weight-complex="bold"/>
    </style:style>
    <style:style style:name="T263" style:family="text">
      <style:text-properties style:use-window-font-color="true" loext:opacity="0%" style:font-name="Courier" fo:font-size="13pt" fo:font-weight="bold" officeooo:rsid="05b1c80e" style:font-size-asian="13pt" style:font-weight-asian="bold" style:font-size-complex="13pt" style:font-weight-complex="bold"/>
    </style:style>
    <style:style style:name="T264" style:family="text">
      <style:text-properties style:use-window-font-color="true" loext:opacity="0%" style:font-name="Courier" fo:font-size="12pt" fo:font-weight="normal" officeooo:rsid="06339574" style:font-size-asian="10.5pt" style:font-weight-asian="normal" style:font-size-complex="12pt" style:font-weight-complex="normal"/>
    </style:style>
    <style:style style:name="T265" style:family="text">
      <style:text-properties officeooo:rsid="0010f254"/>
    </style:style>
    <style:style style:name="T266" style:family="text">
      <style:text-properties fo:font-size="10pt" officeooo:rsid="0010f254" style:font-size-asian="10pt" style:font-size-complex="10pt"/>
    </style:style>
    <style:style style:name="T267" style:family="text">
      <style:text-properties fo:color="#0000ff" loext:opacity="100%" style:font-name="Courier" fo:font-size="10.5pt" fo:font-weight="normal" fo:background-color="#ffffff" loext:char-shading-value="0"/>
    </style:style>
    <style:style style:name="T268" style:family="text">
      <style:text-properties fo:color="#000000" loext:opacity="100%" style:font-name="Courier" fo:font-size="10.5pt" fo:font-weight="normal" fo:background-color="#ffffff" loext:char-shading-value="0"/>
    </style:style>
    <style:style style:name="T269" style:family="text">
      <style:text-properties fo:color="#800080" loext:opacity="100%" style:font-name="Courier" fo:font-size="10.5pt" fo:font-weight="normal" fo:background-color="#ffffff" loext:char-shading-value="0"/>
    </style:style>
    <style:style style:name="T270" style:family="text">
      <style:text-properties fo:color="#000000" loext:opacity="100%" style:font-name="Courier" fo:font-size="10.5pt" fo:font-style="italic" fo:font-weight="normal" fo:background-color="#ffffff" loext:char-shading-value="0" style:font-style-asian="italic" style:font-style-complex="italic"/>
    </style:style>
    <style:style style:name="T271" style:family="text">
      <style:text-properties style:use-window-font-color="true" loext:opacity="0%" fo:font-size="12pt" fo:font-weight="normal" officeooo:rsid="000f6efa" style:font-size-asian="10.5pt" style:font-weight-asian="normal" style:font-size-complex="12pt" style:font-weight-complex="normal"/>
    </style:style>
    <style:style style:name="T272" style:family="text">
      <style:text-properties style:use-window-font-color="true" loext:opacity="0%" fo:font-size="12pt" fo:font-weight="normal" officeooo:rsid="06421fbc" style:font-size-asian="10.5pt" style:font-weight-asian="normal" style:font-size-complex="12pt" style:font-weight-complex="normal"/>
    </style:style>
    <style:style style:name="T273" style:family="text">
      <style:text-properties style:use-window-font-color="true" loext:opacity="0%" style:font-name="Courier" fo:font-size="12pt" fo:font-style="normal" fo:font-weight="normal" officeooo:rsid="06222278" style:font-size-asian="10.5pt" style:font-style-asian="normal" style:font-weight-asian="normal" style:font-size-complex="12pt" style:font-style-complex="normal" style:font-weight-complex="normal"/>
    </style:style>
    <style:style style:name="T274" style:family="text">
      <style:text-properties style:use-window-font-color="true" loext:opacity="0%" fo:font-size="12pt" fo:font-style="italic" fo:font-weight="normal" officeooo:rsid="000f6efa" style:font-size-asian="10.5pt" style:font-style-asian="italic" style:font-weight-asian="normal" style:font-size-complex="12pt" style:font-style-complex="italic" style:font-weight-complex="normal"/>
    </style:style>
    <style:style style:name="T275" style:family="text">
      <style:text-properties style:use-window-font-color="true" loext:opacity="0%" fo:font-size="12pt" fo:font-weight="normal" officeooo:rsid="0010d2a8" style:font-size-asian="10.5pt" style:font-weight-asian="normal" style:font-size-complex="12pt" style:font-weight-complex="normal"/>
    </style:style>
    <style:style style:name="T276" style:family="text">
      <style:text-properties style:use-window-font-color="true" loext:opacity="0%" fo:font-size="12pt" fo:font-style="italic" fo:font-weight="normal" officeooo:rsid="0010d2a8" style:font-size-asian="10.5pt" style:font-style-asian="italic" style:font-weight-asian="normal" style:font-size-complex="12pt" style:font-style-complex="italic" style:font-weight-complex="normal"/>
    </style:style>
    <style:style style:name="T277" style:family="text">
      <style:text-properties officeooo:rsid="0010d2a8"/>
    </style:style>
    <style:style style:name="T278" style:family="text">
      <style:text-properties style:font-name="Courier" fo:font-style="normal" officeooo:rsid="06222278" style:font-style-asian="normal" style:font-style-complex="normal"/>
    </style:style>
    <style:style style:name="T279" style:family="text">
      <style:text-properties style:use-window-font-color="true" loext:opacity="0%" fo:font-size="12pt" fo:font-weight="normal" officeooo:rsid="0643734d" style:font-size-asian="10.5pt" style:font-weight-asian="normal" style:font-size-complex="12pt" style:font-weight-complex="normal"/>
    </style:style>
    <style:style style:name="T280" style:family="text">
      <style:text-properties style:use-window-font-color="true" loext:opacity="0%" fo:font-size="12pt" fo:font-weight="normal" officeooo:rsid="001484f1" style:font-size-asian="10.5pt" style:font-weight-asian="normal" style:font-size-complex="12pt" style:font-weight-complex="normal"/>
    </style:style>
    <style:style style:name="T281" style:family="text">
      <style:text-properties style:use-window-font-color="true" loext:opacity="0%" fo:font-size="12pt" fo:font-weight="normal" officeooo:rsid="056b3794" style:font-size-asian="10.5pt" style:font-weight-asian="normal" style:font-size-complex="12pt" style:font-weight-complex="normal"/>
    </style:style>
    <style:style style:name="T282" style:family="text">
      <style:text-properties style:use-window-font-color="true" loext:opacity="0%" fo:font-size="10pt" officeooo:rsid="0013a84b" style:font-size-asian="10pt" style:font-size-complex="10pt"/>
    </style:style>
    <style:style style:name="T283" style:family="text">
      <style:text-properties fo:color="#000000" loext:opacity="100%"/>
    </style:style>
    <style:style style:name="T284" style:family="text">
      <style:text-properties style:use-window-font-color="true" loext:opacity="0%" style:font-name="Courier" fo:font-size="10pt" fo:font-weight="normal" officeooo:rsid="0013a84b" fo:background-color="#ffffff" loext:char-shading-value="0" style:font-size-asian="10pt" style:font-size-complex="10pt"/>
    </style:style>
    <style:style style:name="T285" style:family="text">
      <style:text-properties style:use-window-font-color="true" loext:opacity="0%" style:font-name="Courier" fo:font-size="10pt" officeooo:rsid="0013a84b" style:font-size-asian="10pt" style:font-size-complex="10pt"/>
    </style:style>
    <style:style style:name="T286" style:family="text">
      <style:text-properties fo:color="#a31515" loext:opacity="100%" style:font-name="Courier"/>
    </style:style>
    <style:style style:name="T287" style:family="text">
      <style:text-properties style:use-window-font-color="true" loext:opacity="0%" fo:font-size="10pt" fo:font-weight="normal" officeooo:rsid="0013a84b" fo:background-color="#ffffff" loext:char-shading-value="0" style:font-size-asian="10pt" style:font-size-complex="10pt"/>
    </style:style>
    <style:style style:name="T288" style:family="text">
      <style:text-properties fo:color="#000000" loext:opacity="100%" fo:font-size="10.5pt" fo:font-weight="normal" fo:background-color="#ffffff" loext:char-shading-value="0"/>
    </style:style>
    <style:style style:name="T289" style:family="text">
      <style:text-properties style:font-name="Courier" fo:font-style="italic" style:font-style-asian="italic" style:font-style-complex="italic"/>
    </style:style>
    <style:style style:name="T290" style:family="text">
      <style:text-properties style:font-name="Courier" officeooo:rsid="0010f254"/>
    </style:style>
    <style:style style:name="T291" style:family="text">
      <style:text-properties fo:font-weight="normal" officeooo:rsid="001671c2" style:font-weight-asian="normal" style:font-weight-complex="normal"/>
    </style:style>
    <style:style style:name="T292" style:family="text">
      <style:text-properties officeooo:rsid="0643734d"/>
    </style:style>
    <style:style style:name="T293" style:family="text">
      <style:text-properties officeooo:rsid="00198ce1"/>
    </style:style>
    <style:style style:name="T294" style:family="text">
      <style:text-properties style:font-name="Courier" officeooo:rsid="00198ce1"/>
    </style:style>
    <style:style style:name="T295" style:family="text">
      <style:text-properties style:use-window-font-color="true" loext:opacity="0%" fo:font-size="10pt" officeooo:rsid="001b117c" style:font-size-asian="10pt" style:font-size-complex="10pt"/>
    </style:style>
    <style:style style:name="T296" style:family="text">
      <style:text-properties style:use-window-font-color="true" loext:opacity="0%" fo:font-size="10pt" officeooo:rsid="002383ca" style:font-size-asian="10pt" style:font-size-complex="10pt"/>
    </style:style>
    <style:style style:name="T297" style:family="text">
      <style:text-properties style:use-window-font-color="true" loext:opacity="0%" fo:font-size="10pt" officeooo:rsid="00208937" style:font-size-asian="10pt" style:font-size-complex="10pt"/>
    </style:style>
    <style:style style:name="T298" style:family="text">
      <style:text-properties style:use-window-font-color="true" loext:opacity="0%" fo:font-size="10pt" fo:font-weight="normal" officeooo:rsid="00208937" fo:background-color="#ffffff" loext:char-shading-value="0" style:font-size-asian="10pt" style:font-size-complex="10pt"/>
    </style:style>
    <style:style style:name="T299" style:family="text">
      <style:text-properties style:use-window-font-color="true" loext:opacity="0%" fo:font-size="10pt" fo:font-weight="normal" officeooo:rsid="002383ca" fo:background-color="#ffffff" loext:char-shading-value="0" style:font-size-asian="10pt" style:font-size-complex="10pt"/>
    </style:style>
    <style:style style:name="T300" style:family="text">
      <style:text-properties style:use-window-font-color="true" loext:opacity="0%" fo:font-size="10pt" fo:font-weight="normal" officeooo:rsid="001b117c" fo:background-color="#ffffff" loext:char-shading-value="0" style:font-size-asian="10pt" style:font-size-complex="10pt"/>
    </style:style>
    <style:style style:name="T301" style:family="text">
      <style:text-properties style:use-window-font-color="true" loext:opacity="0%" fo:font-size="12pt" fo:font-style="normal" fo:font-weight="normal" officeooo:rsid="0643734d" style:font-size-asian="10.5pt" style:font-style-asian="normal" style:font-weight-asian="normal" style:font-size-complex="12pt" style:font-style-complex="normal" style:font-weight-complex="normal"/>
    </style:style>
    <style:style style:name="T302" style:family="text">
      <style:text-properties style:use-window-font-color="true" loext:opacity="0%" fo:font-size="12pt" fo:font-style="normal" fo:font-weight="normal" officeooo:rsid="0025691e" style:font-size-asian="10.5pt" style:font-style-asian="normal" style:font-weight-asian="normal" style:font-size-complex="12pt" style:font-style-complex="normal" style:font-weight-complex="normal"/>
    </style:style>
    <style:style style:name="T303" style:family="text">
      <style:text-properties style:use-window-font-color="true" loext:opacity="0%" style:font-name="Courier" fo:font-size="12pt" fo:font-style="normal" fo:font-weight="normal" officeooo:rsid="001484f1" style:font-size-asian="10.5pt" style:font-style-asian="normal" style:font-weight-asian="normal" style:font-size-complex="12pt" style:font-style-complex="normal" style:font-weight-complex="normal"/>
    </style:style>
    <style:style style:name="T304" style:family="text">
      <style:text-properties fo:font-weight="normal" officeooo:rsid="002bfee3" style:font-weight-asian="normal" style:font-weight-complex="normal"/>
    </style:style>
    <style:style style:name="T305" style:family="text">
      <style:text-properties style:use-window-font-color="true" loext:opacity="0%" fo:font-size="12pt" fo:font-weight="normal" officeooo:rsid="002bfee3" style:font-size-asian="10.5pt" style:font-weight-asian="normal" style:font-size-complex="12pt" style:font-weight-complex="normal"/>
    </style:style>
    <style:style style:name="T306" style:family="text">
      <style:text-properties style:use-window-font-color="true" loext:opacity="0%" fo:font-size="12pt" fo:font-weight="normal" officeooo:rsid="05e8e2a2" style:font-size-asian="10.5pt" style:font-weight-asian="normal" style:font-size-complex="12pt" style:font-weight-complex="normal"/>
    </style:style>
    <style:style style:name="T307" style:family="text">
      <style:text-properties style:use-window-font-color="true" loext:opacity="0%" fo:font-size="12pt" fo:font-weight="normal" officeooo:rsid="002cef4f" style:font-size-asian="10.5pt" style:font-weight-asian="normal" style:font-size-complex="12pt" style:font-weight-complex="normal"/>
    </style:style>
    <style:style style:name="T308" style:family="text">
      <style:text-properties style:use-window-font-color="true" loext:opacity="0%" fo:font-size="12pt" fo:font-weight="normal" officeooo:rsid="002ecd91" style:font-size-asian="10.5pt" style:font-weight-asian="normal" style:font-size-complex="12pt" style:font-weight-complex="normal"/>
    </style:style>
    <style:style style:name="T309" style:family="text">
      <style:text-properties style:use-window-font-color="true" loext:opacity="0%" fo:font-size="12pt" fo:font-weight="normal" officeooo:rsid="002d5b15" style:font-size-asian="10.5pt" style:font-weight-asian="normal" style:font-size-complex="12pt" style:font-weight-complex="normal"/>
    </style:style>
    <style:style style:name="T310" style:family="text">
      <style:text-properties style:use-window-font-color="true" loext:opacity="0%" fo:font-size="12pt" fo:font-weight="normal" officeooo:rsid="002da870" style:font-size-asian="10.5pt" style:font-weight-asian="normal" style:font-size-complex="12pt" style:font-weight-complex="normal"/>
    </style:style>
    <style:style style:name="T311" style:family="text">
      <style:text-properties fo:color="#0000ff" loext:opacity="100%" fo:font-size="11pt" style:font-size-asian="11pt" style:font-size-complex="11pt"/>
    </style:style>
    <style:style style:name="T312" style:family="text">
      <style:text-properties fo:font-size="11pt" style:font-size-asian="11pt" style:font-size-complex="11pt"/>
    </style:style>
    <style:style style:name="T313" style:family="text">
      <style:text-properties fo:color="#098658" loext:opacity="100%" fo:font-size="11pt" style:font-size-asian="11pt" style:font-size-complex="11pt"/>
    </style:style>
    <style:style style:name="T314" style:family="text">
      <style:text-properties fo:color="#cd3131" loext:opacity="100%"/>
    </style:style>
    <style:style style:name="T315" style:family="text">
      <style:text-properties officeooo:rsid="056c39ce"/>
    </style:style>
    <style:style style:name="T316" style:family="text">
      <style:text-properties officeooo:rsid="05b1c80e"/>
    </style:style>
    <style:style style:name="T317" style:family="text">
      <style:text-properties style:use-window-font-color="true" loext:opacity="0%" fo:font-size="12pt" fo:font-weight="normal" officeooo:rsid="0046de2f" style:font-size-asian="10.5pt" style:font-weight-asian="normal" style:font-size-complex="12pt" style:font-weight-complex="normal"/>
    </style:style>
    <style:style style:name="T318" style:family="text">
      <style:text-properties style:use-window-font-color="true" loext:opacity="0%" style:font-name="Courier" fo:font-size="12pt" fo:font-weight="normal" officeooo:rsid="0046de2f" style:font-size-asian="10.5pt" style:font-weight-asian="normal" style:font-size-complex="12pt" style:font-weight-complex="normal"/>
    </style:style>
    <style:style style:name="T319" style:family="text">
      <style:text-properties officeooo:rsid="0046de2f"/>
    </style:style>
    <style:style style:name="T320" style:family="text">
      <style:text-properties style:font-name="Courier" officeooo:rsid="0046de2f"/>
    </style:style>
    <style:style style:name="T321" style:family="text">
      <style:text-properties fo:font-size="10pt" officeooo:rsid="0046de2f" style:font-size-asian="10pt" style:font-size-complex="10pt"/>
    </style:style>
    <style:style style:name="T322" style:family="text">
      <style:text-properties style:use-window-font-color="true" loext:opacity="0%" fo:font-size="12pt" fo:font-style="italic" fo:font-weight="normal" officeooo:rsid="0046de2f" style:font-size-asian="10.5pt" style:font-style-asian="italic" style:font-weight-asian="normal" style:font-size-complex="12pt" style:font-style-complex="italic" style:font-weight-complex="normal"/>
    </style:style>
    <style:style style:name="T323" style:family="text">
      <style:text-properties fo:color="#00a933" loext:opacity="100%" style:font-name="Courier" fo:font-size="10pt" fo:font-style="italic" style:font-size-asian="10pt" style:font-style-asian="italic" style:font-size-complex="10pt" style:font-style-complex="italic"/>
    </style:style>
    <style:style style:name="T324" style:family="text">
      <style:text-properties fo:font-size="12pt" officeooo:rsid="0046de2f" style:font-size-asian="10.5pt" style:font-size-complex="12pt"/>
    </style:style>
    <style:style style:name="T325" style:family="text">
      <style:text-properties fo:color="#00a933" loext:opacity="100%" style:font-name="Courier" fo:font-size="10pt" fo:font-style="italic" officeooo:rsid="0046de2f" style:font-size-asian="10pt" style:font-style-asian="italic" style:font-size-complex="10pt" style:font-style-complex="italic"/>
    </style:style>
    <style:style style:name="T326" style:family="text">
      <style:text-properties style:use-window-font-color="true" loext:opacity="0%" fo:font-size="12pt" fo:font-weight="normal" officeooo:rsid="004af6da" style:font-size-asian="10.5pt" style:font-weight-asian="normal" style:font-size-complex="12pt" style:font-weight-complex="normal"/>
    </style:style>
    <style:style style:name="T327" style:family="text">
      <style:text-properties style:use-window-font-color="true" loext:opacity="0%" fo:font-size="12pt" fo:font-weight="normal" officeooo:rsid="05eadeb5" style:font-size-asian="10.5pt" style:font-weight-asian="normal" style:font-size-complex="12pt" style:font-weight-complex="normal"/>
    </style:style>
    <style:style style:name="T328" style:family="text">
      <style:text-properties style:use-window-font-color="true" loext:opacity="0%" fo:font-size="12pt" fo:font-weight="normal" officeooo:rsid="004bc497" style:font-size-asian="10.5pt" style:font-weight-asian="normal" style:font-size-complex="12pt" style:font-weight-complex="normal"/>
    </style:style>
    <style:style style:name="T329" style:family="text">
      <style:text-properties style:use-window-font-color="true" loext:opacity="0%" fo:font-size="12pt" fo:font-weight="normal" officeooo:rsid="004d37d9" style:font-size-asian="10.5pt" style:font-weight-asian="normal" style:font-size-complex="12pt" style:font-weight-complex="normal"/>
    </style:style>
    <style:style style:name="T330" style:family="text">
      <style:text-properties fo:font-size="12pt" officeooo:rsid="004d37d9" style:font-size-asian="10.5pt" style:font-size-complex="12pt"/>
    </style:style>
    <style:style style:name="T331" style:family="text">
      <style:text-properties style:use-window-font-color="true" loext:opacity="0%" fo:font-size="12pt" fo:font-weight="bold" officeooo:rsid="004d37d9" style:font-size-asian="10.5pt" style:font-weight-asian="bold" style:font-size-complex="12pt" style:font-weight-complex="bold"/>
    </style:style>
    <style:style style:name="T332" style:family="text">
      <style:text-properties style:use-window-font-color="true" loext:opacity="0%" fo:font-size="12pt" fo:font-weight="bold" officeooo:rsid="05a517e3" style:font-size-asian="10.5pt" style:font-weight-asian="bold" style:font-size-complex="12pt" style:font-weight-complex="bold"/>
    </style:style>
    <style:style style:name="T333" style:family="text">
      <style:text-properties style:use-window-font-color="true" loext:opacity="0%" fo:font-size="10pt" officeooo:rsid="004d37d9" style:font-size-asian="10pt" style:font-size-complex="10pt"/>
    </style:style>
    <style:style style:name="T334" style:family="text">
      <style:text-properties style:use-window-font-color="true" loext:opacity="0%" fo:font-size="10pt" fo:font-weight="normal" officeooo:rsid="004d37d9" fo:background-color="#ffffff" loext:char-shading-value="0" style:font-size-asian="10pt" style:font-size-complex="10pt"/>
    </style:style>
    <style:style style:name="T335" style:family="text">
      <style:text-properties fo:color="#098658" loext:opacity="100%" fo:font-weight="normal" fo:background-color="#ffffff" loext:char-shading-value="0"/>
    </style:style>
    <style:style style:name="T336" style:family="text">
      <style:text-properties style:use-window-font-color="true" loext:opacity="0%" style:font-name="Courier" fo:font-size="10pt" fo:font-weight="normal" officeooo:rsid="004d37d9" fo:background-color="#ffffff" loext:char-shading-value="0" style:font-size-asian="10pt" style:font-size-complex="10pt"/>
    </style:style>
    <style:style style:name="T337" style:family="text">
      <style:text-properties officeooo:rsid="05eadeb5"/>
    </style:style>
    <style:style style:name="T338" style:family="text">
      <style:text-properties officeooo:rsid="14c4e220" style:font-size-asian="12pt"/>
    </style:style>
    <style:style style:name="T339" style:family="text">
      <style:text-properties fo:color="#000080" loext:opacity="100%" style:text-underline-style="solid" style:text-underline-width="auto" style:text-underline-color="font-color" officeooo:rsid="14c4e220" style:font-size-asian="12pt"/>
    </style:style>
    <style:style style:name="T340" style:family="text">
      <style:text-properties fo:color="#000080" loext:opacity="100%" style:text-underline-style="solid" style:text-underline-width="auto" style:text-underline-color="font-color" officeooo:rsid="005312bc" style:font-size-asian="12pt"/>
    </style:style>
    <style:style style:name="T341" style:family="text">
      <style:text-properties officeooo:rsid="005312bc" style:font-size-asian="12pt"/>
    </style:style>
    <style:style style:name="T342" style:family="text">
      <style:text-properties fo:color="#000080" loext:opacity="100%" style:text-underline-style="solid" style:text-underline-width="auto" style:text-underline-color="font-color"/>
    </style:style>
    <style:style style:name="T343" style:family="text">
      <style:text-properties officeooo:rsid="005312bc"/>
    </style:style>
    <style:style style:name="T344" style:family="text">
      <style:text-properties style:use-window-font-color="true" loext:opacity="0%" fo:font-size="12pt" fo:font-weight="normal" officeooo:rsid="005312bc" style:font-size-asian="10.5pt" style:font-weight-asian="normal" style:font-size-complex="12pt" style:font-weight-complex="normal"/>
    </style:style>
    <style:style style:name="T345" style:family="text">
      <style:text-properties style:use-window-font-color="true" loext:opacity="0%" style:font-name="Courier" fo:font-size="12pt" fo:font-weight="normal" officeooo:rsid="005312bc" style:font-size-asian="10.5pt" style:font-weight-asian="normal" style:font-size-complex="12pt" style:font-weight-complex="normal"/>
    </style:style>
    <style:style style:name="T346" style:family="text">
      <style:text-properties style:use-window-font-color="true" loext:opacity="0%" fo:font-size="12pt" fo:font-weight="normal" officeooo:rsid="0643c394" style:font-size-asian="10.5pt" style:font-weight-asian="normal" style:font-size-complex="12pt" style:font-weight-complex="normal"/>
    </style:style>
    <style:style style:name="T347" style:family="text">
      <style:text-properties officeooo:rsid="003c4a46"/>
    </style:style>
    <style:style style:name="T348" style:family="text">
      <style:text-properties officeooo:rsid="05b9c6c9"/>
    </style:style>
    <style:style style:name="T349" style:family="text">
      <style:text-properties officeooo:rsid="05ec0267"/>
    </style:style>
    <style:style style:name="T350" style:family="text">
      <style:text-properties officeooo:rsid="00548a6f"/>
    </style:style>
    <style:style style:name="T351" style:family="text">
      <style:text-properties style:font-name="Courier" officeooo:rsid="00548a6f"/>
    </style:style>
    <style:style style:name="T352" style:family="text">
      <style:text-properties fo:font-size="10pt" officeooo:rsid="00548a6f" style:font-size-asian="10pt" style:font-size-complex="10pt"/>
    </style:style>
    <style:style style:name="T353" style:family="text">
      <style:text-properties officeooo:rsid="00548a6f" style:font-size-asian="12pt"/>
    </style:style>
    <style:style style:name="T354" style:family="text">
      <style:text-properties officeooo:rsid="0084fe0d"/>
    </style:style>
    <style:style style:name="T355" style:family="text">
      <style:text-properties style:font-name="Courier" fo:font-size="10pt" officeooo:rsid="00548a6f" style:font-size-asian="10pt" style:font-size-complex="10pt"/>
    </style:style>
    <style:style style:name="T356" style:family="text">
      <style:text-properties officeooo:rsid="0055619a"/>
    </style:style>
    <style:style style:name="T357" style:family="text">
      <style:text-properties fo:font-style="italic" officeooo:rsid="0055619a" style:font-style-asian="italic" style:font-style-complex="italic"/>
    </style:style>
    <style:style style:name="T358" style:family="text">
      <style:text-properties officeooo:rsid="0644a38c"/>
    </style:style>
    <style:style style:name="T359" style:family="text">
      <style:text-properties fo:font-size="12pt" officeooo:rsid="0055619a" style:font-size-asian="10.5pt" style:font-size-complex="12pt"/>
    </style:style>
    <style:style style:name="T360" style:family="text">
      <style:text-properties style:font-name="Courier" fo:font-size="12pt" officeooo:rsid="005490a8" style:font-size-asian="10.5pt" style:font-size-complex="12pt"/>
    </style:style>
    <style:style style:name="T361" style:family="text">
      <style:text-properties fo:font-weight="bold" officeooo:rsid="05a70ed4" style:font-weight-asian="bold" style:font-weight-complex="bold"/>
    </style:style>
    <style:style style:name="T362" style:family="text">
      <style:text-properties style:use-window-font-color="true" loext:opacity="0%" fo:font-size="12pt" fo:font-weight="normal" officeooo:rsid="00590aa1" style:font-size-asian="10.5pt" style:font-weight-asian="normal" style:font-size-complex="12pt" style:font-weight-complex="normal"/>
    </style:style>
    <style:style style:name="T363" style:family="text">
      <style:text-properties style:use-window-font-color="true" loext:opacity="0%" fo:font-size="12pt" fo:font-weight="normal" officeooo:rsid="05ec0267" style:font-size-asian="10.5pt" style:font-weight-asian="normal" style:font-size-complex="12pt" style:font-weight-complex="normal"/>
    </style:style>
    <style:style style:name="T364" style:family="text">
      <style:text-properties style:use-window-font-color="true" loext:opacity="0%" fo:font-size="10pt" officeooo:rsid="00590aa1" style:font-size-asian="10pt" style:font-size-complex="10pt"/>
    </style:style>
    <style:style style:name="T365" style:family="text">
      <style:text-properties style:use-window-font-color="true" loext:opacity="0%" fo:font-size="10pt" fo:font-weight="normal" officeooo:rsid="00590aa1" fo:background-color="#ffffff" loext:char-shading-value="0" style:font-size-asian="10pt" style:font-size-complex="10pt"/>
    </style:style>
    <style:style style:name="T366" style:family="text">
      <style:text-properties style:font-name="Courier" officeooo:rsid="0644a38c"/>
    </style:style>
    <style:style style:name="T367" style:family="text">
      <style:text-properties style:use-window-font-color="true" loext:opacity="0%" fo:font-size="12pt" fo:font-weight="normal" officeooo:rsid="0644a38c" style:font-size-asian="10.5pt" style:font-weight-asian="normal" style:font-size-complex="12pt" style:font-weight-complex="normal"/>
    </style:style>
    <style:style style:name="T368" style:family="text">
      <style:text-properties officeooo:rsid="00590aa1" style:font-size-asian="12pt"/>
    </style:style>
    <style:style style:name="T369" style:family="text">
      <style:text-properties officeooo:rsid="00590aa1"/>
    </style:style>
    <style:style style:name="T370" style:family="text">
      <style:text-properties style:font-name="Courier" officeooo:rsid="00590aa1"/>
    </style:style>
    <style:style style:name="T371" style:family="text">
      <style:text-properties style:font-name="Courier" fo:font-size="10pt" officeooo:rsid="00590aa1" style:font-size-asian="10pt" style:font-size-complex="10pt"/>
    </style:style>
    <style:style style:name="T372" style:family="text">
      <style:text-properties fo:font-size="10pt" officeooo:rsid="00590aa1" style:font-size-asian="10pt" style:font-size-complex="10pt"/>
    </style:style>
    <style:style style:name="T373" style:family="text">
      <style:text-properties style:use-window-font-color="true" loext:opacity="0%" fo:font-size="12pt" fo:font-weight="normal" officeooo:rsid="005adeff" style:font-size-asian="10.5pt" style:font-weight-asian="normal" style:font-size-complex="12pt" style:font-weight-complex="normal"/>
    </style:style>
    <style:style style:name="T374" style:family="text">
      <style:text-properties style:use-window-font-color="true" loext:opacity="0%" style:font-name="Courier" fo:font-size="12pt" fo:font-weight="normal" officeooo:rsid="005adeff" style:font-size-asian="10.5pt" style:font-weight-asian="normal" style:font-size-complex="12pt" style:font-weight-complex="normal"/>
    </style:style>
    <style:style style:name="T375" style:family="text">
      <style:text-properties style:use-window-font-color="true" loext:opacity="0%" fo:font-size="12pt" fo:font-style="italic" fo:font-weight="normal" officeooo:rsid="005adeff" style:font-size-asian="10.5pt" style:font-style-asian="italic" style:font-weight-asian="normal" style:font-size-complex="12pt" style:font-style-complex="italic" style:font-weight-complex="normal"/>
    </style:style>
    <style:style style:name="T376" style:family="text">
      <style:text-properties style:use-window-font-color="true" loext:opacity="0%" fo:font-size="12pt" fo:font-style="normal" fo:font-weight="normal" officeooo:rsid="005c1552" style:font-size-asian="10.5pt" style:font-style-asian="normal" style:font-weight-asian="normal" style:font-size-complex="12pt" style:font-style-complex="normal" style:font-weight-complex="normal"/>
    </style:style>
    <style:style style:name="T377" style:family="text">
      <style:text-properties officeooo:rsid="005c5bb7"/>
    </style:style>
    <style:style style:name="T378" style:family="text">
      <style:text-properties officeooo:rsid="00629328"/>
    </style:style>
    <style:style style:name="T379" style:family="text">
      <style:text-properties style:use-window-font-color="true" loext:opacity="0%" fo:font-size="12pt" fo:font-style="normal" fo:font-weight="normal" officeooo:rsid="005c5bb7" style:font-size-asian="10.5pt" style:font-style-asian="normal" style:font-weight-asian="normal" style:font-size-complex="12pt" style:font-style-complex="normal" style:font-weight-complex="normal"/>
    </style:style>
    <style:style style:name="T380" style:family="text">
      <style:text-properties style:use-window-font-color="true" loext:opacity="0%" style:font-name="Courier" fo:font-size="12pt" fo:font-weight="normal" officeooo:rsid="00590aa1" style:font-size-asian="10.5pt" style:font-weight-asian="normal" style:font-size-complex="12pt" style:font-weight-complex="normal"/>
    </style:style>
    <style:style style:name="T381" style:family="text">
      <style:text-properties style:use-window-font-color="true" loext:opacity="0%" fo:font-size="12pt" fo:font-style="normal" fo:font-weight="normal" officeooo:rsid="05ec0267" style:font-size-asian="10.5pt" style:font-style-asian="normal" style:font-weight-asian="normal" style:font-size-complex="12pt" style:font-style-complex="normal" style:font-weight-complex="normal"/>
    </style:style>
    <style:style style:name="T382" style:family="text">
      <style:text-properties style:font-name="Courier" officeooo:rsid="005c5bb7"/>
    </style:style>
    <style:style style:name="T383" style:family="text">
      <style:text-properties fo:font-size="10pt" officeooo:rsid="00629328" style:font-size-asian="10pt" style:font-size-complex="10pt"/>
    </style:style>
    <style:style style:name="T384" style:family="text">
      <style:text-properties style:use-window-font-color="true" loext:opacity="0%" fo:font-size="12pt" fo:font-style="normal" fo:font-weight="normal" officeooo:rsid="005dbda0" style:font-size-asian="10.5pt" style:font-style-asian="normal" style:font-weight-asian="normal" style:font-size-complex="12pt" style:font-style-complex="normal" style:font-weight-complex="normal"/>
    </style:style>
    <style:style style:name="T385" style:family="text">
      <style:text-properties style:use-window-font-color="true" loext:opacity="0%" style:font-name="Courier" fo:font-size="12pt" fo:font-style="normal" fo:font-weight="normal" officeooo:rsid="00590aa1" style:font-size-asian="10.5pt" style:font-style-asian="normal" style:font-weight-asian="normal" style:font-size-complex="12pt" style:font-style-complex="normal" style:font-weight-complex="normal"/>
    </style:style>
    <style:style style:name="T386" style:family="text">
      <style:text-properties style:use-window-font-color="true" loext:opacity="0%" fo:font-size="12pt" fo:font-style="normal" fo:font-weight="normal" officeooo:rsid="048e4e3a" style:font-size-asian="10.5pt" style:font-style-asian="normal" style:font-weight-asian="normal" style:font-size-complex="12pt" style:font-style-complex="normal" style:font-weight-complex="normal"/>
    </style:style>
    <style:style style:name="T387" style:family="text">
      <style:text-properties style:use-window-font-color="true" loext:opacity="0%" fo:font-size="12pt" fo:font-style="normal" fo:font-weight="normal" officeooo:rsid="005ea2e0" style:font-size-asian="10.5pt" style:font-style-asian="normal" style:font-weight-asian="normal" style:font-size-complex="12pt" style:font-style-complex="normal" style:font-weight-complex="normal"/>
    </style:style>
    <style:style style:name="T388" style:family="text">
      <style:text-properties officeooo:rsid="0060705b"/>
    </style:style>
    <style:style style:name="T389" style:family="text">
      <style:text-properties style:font-name="Courier" fo:font-size="10pt" officeooo:rsid="005c5bb7" style:font-size-asian="10pt" style:font-size-complex="10pt"/>
    </style:style>
    <style:style style:name="T390" style:family="text">
      <style:text-properties style:use-window-font-color="true" loext:opacity="0%" fo:font-size="12pt" fo:font-style="italic" fo:font-weight="normal" officeooo:rsid="005ea2e0" style:font-size-asian="10.5pt" style:font-style-asian="italic" style:font-weight-asian="normal" style:font-size-complex="12pt" style:font-style-complex="italic" style:font-weight-complex="normal"/>
    </style:style>
    <style:style style:name="T391" style:family="text">
      <style:text-properties fo:color="#800080" loext:opacity="100%" officeooo:rsid="005ea2e0"/>
    </style:style>
    <style:style style:name="T392" style:family="text">
      <style:text-properties fo:font-style="italic" officeooo:rsid="005ea2e0" style:font-style-asian="italic" style:font-style-complex="italic"/>
    </style:style>
    <style:style style:name="T393" style:family="text">
      <style:text-properties style:use-window-font-color="true" loext:opacity="0%" fo:font-size="12pt" fo:font-style="normal" fo:font-weight="normal" officeooo:rsid="006125ba" style:font-size-asian="10.5pt" style:font-style-asian="normal" style:font-weight-asian="normal" style:font-size-complex="12pt" style:font-style-complex="normal" style:font-weight-complex="normal"/>
    </style:style>
    <style:style style:name="T394" style:family="text">
      <style:text-properties style:use-window-font-color="true" loext:opacity="0%" fo:font-size="12pt" fo:font-style="normal" fo:font-weight="normal" officeooo:rsid="00629328" style:font-size-asian="10.5pt" style:font-style-asian="normal" style:font-weight-asian="normal" style:font-size-complex="12pt" style:font-style-complex="normal" style:font-weight-complex="normal"/>
    </style:style>
    <style:style style:name="T395" style:family="text">
      <style:text-properties officeooo:rsid="00679be2" style:font-size-asian="12pt"/>
    </style:style>
    <style:style style:name="T396" style:family="text">
      <style:text-properties style:use-window-font-color="true" loext:opacity="0%" fo:font-size="12pt" fo:font-style="normal" fo:font-weight="normal" officeooo:rsid="0063981b" style:font-size-asian="10.5pt" style:font-style-asian="normal" style:font-weight-asian="normal" style:font-size-complex="12pt" style:font-style-complex="normal" style:font-weight-complex="normal"/>
    </style:style>
    <style:style style:name="T397" style:family="text">
      <style:text-properties style:use-window-font-color="true" loext:opacity="0%" fo:font-size="10pt" officeooo:rsid="0063981b" style:font-size-asian="10pt" style:font-size-complex="10pt"/>
    </style:style>
    <style:style style:name="T398" style:family="text">
      <style:text-properties style:use-window-font-color="true" loext:opacity="0%" fo:font-size="10pt" officeooo:rsid="006561ab" style:font-size-asian="10pt" style:font-size-complex="10pt"/>
    </style:style>
    <style:style style:name="T399" style:family="text">
      <style:text-properties style:use-window-font-color="true" loext:opacity="0%" fo:font-size="10pt" fo:font-weight="normal" officeooo:rsid="006561ab" fo:background-color="#ffffff" loext:char-shading-value="0" style:font-size-asian="10pt" style:font-size-complex="10pt"/>
    </style:style>
    <style:style style:name="T400" style:family="text">
      <style:text-properties style:use-window-font-color="true" loext:opacity="0%" fo:font-size="10pt" fo:font-weight="normal" officeooo:rsid="0063981b" fo:background-color="#ffffff" loext:char-shading-value="0" style:font-size-asian="10pt" style:font-size-complex="10pt"/>
    </style:style>
    <style:style style:name="T401" style:family="text">
      <style:text-properties style:use-window-font-color="true" loext:opacity="0%" style:font-name="Courier" fo:font-size="10pt" fo:font-weight="normal" officeooo:rsid="006561ab" fo:background-color="#ffffff" loext:char-shading-value="0" style:font-size-asian="10pt" style:font-size-complex="10pt"/>
    </style:style>
    <style:style style:name="T402" style:family="text">
      <style:text-properties style:use-window-font-color="true" loext:opacity="0%" style:font-name="Courier" fo:font-size="10pt" fo:font-weight="normal" officeooo:rsid="0063981b" fo:background-color="#ffffff" loext:char-shading-value="0" style:font-size-asian="10pt" style:font-size-complex="10pt"/>
    </style:style>
    <style:style style:name="T403" style:family="text">
      <style:text-properties fo:color="#a31515" loext:opacity="100%" style:font-name="Courier" fo:font-size="11pt" fo:font-weight="normal" fo:background-color="#ffffff" loext:char-shading-value="0" style:font-size-asian="11pt" style:font-size-complex="11pt"/>
    </style:style>
    <style:style style:name="T404" style:family="text">
      <style:text-properties fo:color="#000000" loext:opacity="100%" style:font-name="Courier" fo:font-size="11pt" fo:font-weight="normal" officeooo:rsid="006561ab" fo:background-color="#ffffff" loext:char-shading-value="0" style:font-size-asian="11pt" style:font-size-complex="11pt"/>
    </style:style>
    <style:style style:name="T405" style:family="text">
      <style:text-properties officeooo:rsid="006561ab"/>
    </style:style>
    <style:style style:name="T406" style:family="text">
      <style:text-properties fo:font-style="italic" fo:font-weight="normal" officeooo:rsid="05ec0267" style:font-style-asian="italic" style:font-weight-asian="normal" style:font-style-complex="italic" style:font-weight-complex="normal"/>
    </style:style>
    <style:style style:name="T407" style:family="text">
      <style:text-properties officeooo:rsid="05ee4532" style:font-size-asian="12pt"/>
    </style:style>
    <style:style style:name="T408" style:family="text">
      <style:text-properties style:font-name="Liberation Serif" officeooo:rsid="0573cdb2"/>
    </style:style>
    <style:style style:name="T409" style:family="text">
      <style:text-properties style:font-name="Liberation Serif" officeooo:rsid="05777a22"/>
    </style:style>
    <style:style style:name="T410" style:family="text">
      <style:text-properties style:font-name="Liberation Serif" officeooo:rsid="05b22025"/>
    </style:style>
    <style:style style:name="T411" style:family="text">
      <style:text-properties style:use-window-font-color="true" loext:opacity="0%" fo:font-size="12pt" fo:font-style="normal" fo:font-weight="normal" officeooo:rsid="0644a38c" style:font-size-asian="10.5pt" style:font-style-asian="normal" style:font-weight-asian="normal" style:font-size-complex="12pt" style:font-style-complex="normal" style:font-weight-complex="normal"/>
    </style:style>
    <style:style style:name="T412" style:family="text">
      <style:text-properties style:use-window-font-color="true" loext:opacity="0%" style:font-name="Courier" fo:font-size="12pt" fo:font-style="normal" fo:font-weight="normal" officeooo:rsid="006b0a6f" style:font-size-asian="10.5pt" style:font-style-asian="normal" style:font-weight-asian="normal" style:font-size-complex="12pt" style:font-style-complex="normal" style:font-weight-complex="normal"/>
    </style:style>
    <style:style style:name="T413" style:family="text">
      <style:text-properties style:use-window-font-color="true" loext:opacity="0%" fo:font-size="12pt" fo:font-style="normal" fo:font-weight="normal" officeooo:rsid="006bfa8d" style:font-size-asian="10.5pt" style:font-style-asian="normal" style:font-weight-asian="normal" style:font-size-complex="12pt" style:font-style-complex="normal" style:font-weight-complex="normal"/>
    </style:style>
    <style:style style:name="T414" style:family="text">
      <style:text-properties style:use-window-font-color="true" loext:opacity="0%" fo:font-size="10pt" officeooo:rsid="006c9a0e" style:font-size-asian="10pt" style:font-size-complex="10pt"/>
    </style:style>
    <style:style style:name="T415" style:family="text">
      <style:text-properties style:use-window-font-color="true" loext:opacity="0%" fo:font-size="10pt" fo:font-weight="normal" officeooo:rsid="006c9a0e" fo:background-color="#ffffff" loext:char-shading-value="0" style:font-size-asian="10pt" style:font-size-complex="10pt"/>
    </style:style>
    <style:style style:name="T416" style:family="text">
      <style:text-properties officeooo:rsid="05b35384"/>
    </style:style>
    <style:style style:name="T417" style:family="text">
      <style:text-properties officeooo:rsid="05ac1a21"/>
    </style:style>
    <style:style style:name="T418" style:family="text">
      <style:text-properties style:font-name="Courier" fo:font-size="10pt" officeooo:rsid="05ac1a21" style:font-size-asian="10pt" style:font-size-complex="10pt"/>
    </style:style>
    <style:style style:name="T419" style:family="text">
      <style:text-properties style:use-window-font-color="true" loext:opacity="0%" fo:font-size="10pt" officeooo:rsid="006f322b" style:font-size-asian="10pt" style:font-size-complex="10pt"/>
    </style:style>
    <style:style style:name="T420" style:family="text">
      <style:text-properties style:use-window-font-color="true" loext:opacity="0%" fo:font-size="10pt" officeooo:rsid="0070ffba" style:font-size-asian="10pt" style:font-size-complex="10pt"/>
    </style:style>
    <style:style style:name="T421" style:family="text">
      <style:text-properties style:use-window-font-color="true" loext:opacity="0%" fo:font-size="10pt" fo:font-weight="normal" officeooo:rsid="0070ffba" fo:background-color="#ffffff" loext:char-shading-value="0" style:font-size-asian="10pt" style:font-size-complex="10pt"/>
    </style:style>
    <style:style style:name="T422" style:family="text">
      <style:text-properties style:use-window-font-color="true" loext:opacity="0%" fo:font-size="10pt" fo:font-weight="normal" officeooo:rsid="006f322b" fo:background-color="#ffffff" loext:char-shading-value="0" style:font-size-asian="10pt" style:font-size-complex="10pt"/>
    </style:style>
    <style:style style:name="T423" style:family="text">
      <style:text-properties style:use-window-font-color="true" loext:opacity="0%" style:font-name="Courier" fo:font-size="10pt" fo:font-weight="normal" officeooo:rsid="0070ffba" fo:background-color="#ffffff" loext:char-shading-value="0" style:font-size-asian="10pt" style:font-size-complex="10pt"/>
    </style:style>
    <style:style style:name="T424" style:family="text">
      <style:text-properties style:use-window-font-color="true" loext:opacity="0%" style:font-name="Courier" fo:font-size="10pt" fo:font-weight="normal" officeooo:rsid="006f322b" fo:background-color="#ffffff" loext:char-shading-value="0" style:font-size-asian="10pt" style:font-size-complex="10pt"/>
    </style:style>
    <style:style style:name="T425" style:family="text">
      <style:text-properties officeooo:rsid="00745936"/>
    </style:style>
    <style:style style:name="T426" style:family="text">
      <style:text-properties officeooo:rsid="064699ee"/>
    </style:style>
    <style:style style:name="T427" style:family="text">
      <style:text-properties officeooo:rsid="00749e5a"/>
    </style:style>
    <style:style style:name="T428" style:family="text">
      <style:text-properties style:use-window-font-color="true" loext:opacity="0%" fo:font-size="12pt" fo:font-style="normal" fo:font-weight="normal" officeooo:rsid="00745936" style:font-size-asian="10.5pt" style:font-style-asian="normal" style:font-weight-asian="normal" style:font-size-complex="12pt" style:font-style-complex="normal" style:font-weight-complex="normal"/>
    </style:style>
    <style:style style:name="T429" style:family="text">
      <style:text-properties style:use-window-font-color="true" loext:opacity="0%" style:font-name="Courier" fo:font-size="12pt" fo:font-style="normal" fo:font-weight="normal" officeooo:rsid="00745936" style:font-size-asian="10.5pt" style:font-style-asian="normal" style:font-weight-asian="normal" style:font-size-complex="12pt" style:font-style-complex="normal" style:font-weight-complex="normal"/>
    </style:style>
    <style:style style:name="T430" style:family="text">
      <style:text-properties style:use-window-font-color="true" loext:opacity="0%" fo:font-size="12pt" fo:font-style="normal" fo:font-weight="normal" officeooo:rsid="064699ee" style:font-size-asian="10.5pt" style:font-style-asian="normal" style:font-weight-asian="normal" style:font-size-complex="12pt" style:font-style-complex="normal" style:font-weight-complex="normal"/>
    </style:style>
    <style:style style:name="T431" style:family="text">
      <style:text-properties style:use-window-font-color="true" loext:opacity="0%" fo:font-size="12pt" fo:font-style="normal" fo:font-weight="normal" officeooo:rsid="00749e5a" style:font-size-asian="10.5pt" style:font-style-asian="normal" style:font-weight-asian="normal" style:font-size-complex="12pt" style:font-style-complex="normal" style:font-weight-complex="normal"/>
    </style:style>
    <style:style style:name="T432" style:family="text">
      <style:text-properties style:use-window-font-color="true" loext:opacity="0%" fo:font-size="12pt" fo:font-style="normal" fo:font-weight="normal" officeooo:rsid="05ac1a21" style:font-size-asian="10.5pt" style:font-style-asian="normal" style:font-weight-asian="normal" style:font-size-complex="12pt" style:font-style-complex="normal" style:font-weight-complex="normal"/>
    </style:style>
    <style:style style:name="T433" style:family="text">
      <style:text-properties officeooo:rsid="05efbbe7"/>
    </style:style>
    <style:style style:name="T434" style:family="text">
      <style:text-properties officeooo:rsid="05794500"/>
    </style:style>
    <style:style style:name="T435" style:family="text">
      <style:text-properties style:use-window-font-color="true" loext:opacity="0%" fo:font-size="12pt" fo:font-style="normal" fo:font-weight="normal" officeooo:rsid="0645b4c0" style:font-size-asian="10.5pt" style:font-style-asian="normal" style:font-weight-asian="normal" style:font-size-complex="12pt" style:font-style-complex="normal" style:font-weight-complex="normal"/>
    </style:style>
    <style:style style:name="T436" style:family="text">
      <style:text-properties officeooo:rsid="0645b4c0"/>
    </style:style>
    <style:style style:name="T437" style:family="text">
      <style:text-properties style:use-window-font-color="true" loext:opacity="0%" style:font-name="Liberation Serif" fo:font-size="12pt" fo:font-style="normal" fo:font-weight="normal" officeooo:rsid="00749e5a" style:font-size-asian="10.5pt" style:font-style-asian="normal" style:font-weight-asian="normal" style:font-size-complex="12pt" style:font-style-complex="normal" style:font-weight-complex="normal"/>
    </style:style>
    <style:style style:name="T438" style:family="text">
      <style:text-properties style:use-window-font-color="true" loext:opacity="0%" fo:font-size="10pt" officeooo:rsid="007ac107" style:font-size-asian="10pt" style:font-size-complex="10pt"/>
    </style:style>
    <style:style style:name="T439" style:family="text">
      <style:text-properties style:use-window-font-color="true" loext:opacity="0%" fo:font-size="10pt" officeooo:rsid="007b1d19" style:font-size-asian="10pt" style:font-size-complex="10pt"/>
    </style:style>
    <style:style style:name="T440" style:family="text">
      <style:text-properties style:use-window-font-color="true" loext:opacity="0%" fo:font-size="10pt" fo:font-weight="normal" officeooo:rsid="007b1d19" fo:background-color="#ffffff" loext:char-shading-value="0" style:font-size-asian="10pt" style:font-size-complex="10pt"/>
    </style:style>
    <style:style style:name="T441" style:family="text">
      <style:text-properties style:use-window-font-color="true" loext:opacity="0%" fo:font-size="10pt" fo:font-weight="normal" officeooo:rsid="007ac107" fo:background-color="#ffffff" loext:char-shading-value="0" style:font-size-asian="10pt" style:font-size-complex="10pt"/>
    </style:style>
    <style:style style:name="T442" style:family="text">
      <style:text-properties style:use-window-font-color="true" loext:opacity="0%" style:font-name="Courier" fo:font-size="10pt" fo:font-weight="normal" officeooo:rsid="007ac107" fo:background-color="#ffffff" loext:char-shading-value="0" style:font-size-asian="10pt" style:font-size-complex="10pt"/>
    </style:style>
    <style:style style:name="T443" style:family="text">
      <style:text-properties style:use-window-font-color="true" loext:opacity="0%" style:font-name="Courier" fo:font-size="10pt" fo:font-weight="normal" officeooo:rsid="007b1d19" fo:background-color="#ffffff" loext:char-shading-value="0" style:font-size-asian="10pt" style:font-size-complex="10pt"/>
    </style:style>
    <style:style style:name="T444" style:family="text">
      <style:text-properties officeooo:rsid="0082f742"/>
    </style:style>
    <style:style style:name="T445" style:family="text">
      <style:text-properties officeooo:rsid="00844827"/>
    </style:style>
    <style:style style:name="T446" style:family="text">
      <style:text-properties officeooo:rsid="06479339"/>
    </style:style>
    <style:style style:name="T447" style:family="text">
      <style:text-properties style:use-window-font-color="true" loext:opacity="0%" fo:font-size="12pt" fo:font-style="normal" fo:font-weight="normal" officeooo:rsid="0082f742" style:font-size-asian="10.5pt" style:font-style-asian="normal" style:font-weight-asian="normal" style:font-size-complex="12pt" style:font-style-complex="normal" style:font-weight-complex="normal"/>
    </style:style>
    <style:style style:name="T448" style:family="text">
      <style:text-properties style:use-window-font-color="true" loext:opacity="0%" style:font-name="Courier" fo:font-size="12pt" fo:font-style="normal" fo:font-weight="normal" officeooo:rsid="0082f742" style:font-size-asian="10.5pt" style:font-style-asian="normal" style:font-weight-asian="normal" style:font-size-complex="12pt" style:font-style-complex="normal" style:font-weight-complex="normal"/>
    </style:style>
    <style:style style:name="T449" style:family="text">
      <style:text-properties officeooo:rsid="0084ce90"/>
    </style:style>
    <style:style style:name="T450" style:family="text">
      <style:text-properties style:use-window-font-color="true" loext:opacity="0%" fo:font-size="12pt" fo:font-style="normal" fo:font-weight="normal" officeooo:rsid="00844827" style:font-size-asian="10.5pt" style:font-style-asian="normal" style:font-weight-asian="normal" style:font-size-complex="12pt" style:font-style-complex="normal" style:font-weight-complex="normal"/>
    </style:style>
    <style:style style:name="T451" style:family="text">
      <style:text-properties officeooo:rsid="06495725"/>
    </style:style>
    <style:style style:name="T452" style:family="text">
      <style:text-properties officeooo:rsid="008824cd"/>
    </style:style>
    <style:style style:name="T453" style:family="text">
      <style:text-properties style:font-name="Courier" officeooo:rsid="008824cd"/>
    </style:style>
    <style:style style:name="T454" style:family="text">
      <style:text-properties fo:font-size="10pt" officeooo:rsid="008824cd" style:font-size-asian="10pt" style:font-size-complex="10pt"/>
    </style:style>
    <style:style style:name="T455" style:family="text">
      <style:text-properties officeooo:rsid="0086be77"/>
    </style:style>
    <style:style style:name="T456" style:family="text">
      <style:text-properties fo:font-size="12pt" style:font-size-asian="10.5pt" style:font-size-complex="12pt"/>
    </style:style>
    <style:style style:name="T457" style:family="text">
      <style:text-properties style:font-name="Courier" fo:font-size="12pt" style:font-size-asian="10.5pt" style:font-size-complex="12pt"/>
    </style:style>
    <style:style style:name="T458" style:family="text">
      <style:text-properties officeooo:rsid="05f1833f"/>
    </style:style>
    <style:style style:name="T459" style:family="text">
      <style:text-properties officeooo:rsid="05b58ab6"/>
    </style:style>
    <style:style style:name="T460" style:family="text">
      <style:text-properties officeooo:rsid="008d613c"/>
    </style:style>
    <style:style style:name="T461" style:family="text">
      <style:text-properties style:font-name="Courier" officeooo:rsid="008d613c"/>
    </style:style>
    <style:style style:name="T462" style:family="text">
      <style:text-properties fo:font-size="10pt" officeooo:rsid="008d613c" style:font-size-asian="10pt" style:font-size-complex="10pt"/>
    </style:style>
    <style:style style:name="T463" style:family="text">
      <style:text-properties officeooo:rsid="008bcb57"/>
    </style:style>
    <style:style style:name="T464" style:family="text">
      <style:text-properties officeooo:rsid="008e64b6"/>
    </style:style>
    <style:style style:name="T465" style:family="text">
      <style:text-properties style:use-window-font-color="true" loext:opacity="0%" fo:font-size="12pt" fo:font-weight="normal" officeooo:rsid="009050c3" style:font-size-asian="10.5pt" style:font-weight-asian="normal" style:font-size-complex="12pt" style:font-weight-complex="normal"/>
    </style:style>
    <style:style style:name="T466" style:family="text">
      <style:text-properties style:use-window-font-color="true" loext:opacity="0%" style:font-name="Courier" fo:font-size="12pt" fo:font-weight="normal" officeooo:rsid="008af08e" style:font-size-asian="10.5pt" style:font-weight-asian="normal" style:font-size-complex="12pt" style:font-weight-complex="normal"/>
    </style:style>
    <style:style style:name="T467" style:family="text">
      <style:text-properties style:use-window-font-color="true" loext:opacity="0%" fo:font-size="12pt" fo:font-weight="normal" officeooo:rsid="05f1833f" style:font-size-asian="10.5pt" style:font-weight-asian="normal" style:font-size-complex="12pt" style:font-weight-complex="normal"/>
    </style:style>
    <style:style style:name="T468" style:family="text">
      <style:text-properties style:use-window-font-color="true" loext:opacity="0%" fo:font-size="12pt" fo:font-weight="normal" officeooo:rsid="05b58ab6" style:font-size-asian="10.5pt" style:font-weight-asian="normal" style:font-size-complex="12pt" style:font-weight-complex="normal"/>
    </style:style>
    <style:style style:name="T469" style:family="text">
      <style:text-properties style:use-window-font-color="true" loext:opacity="0%" fo:font-size="12pt" fo:font-weight="normal" officeooo:rsid="009069f0" style:font-size-asian="10.5pt" style:font-weight-asian="normal" style:font-size-complex="12pt" style:font-weight-complex="normal"/>
    </style:style>
    <style:style style:name="T470" style:family="text">
      <style:text-properties style:use-window-font-color="true" loext:opacity="0%" style:font-name="Courier" fo:font-size="12pt" fo:font-weight="normal" officeooo:rsid="009069f0" style:font-size-asian="10.5pt" style:font-weight-asian="normal" style:font-size-complex="12pt" style:font-weight-complex="normal"/>
    </style:style>
    <style:style style:name="T471" style:family="text">
      <style:text-properties style:use-window-font-color="true" loext:opacity="0%" fo:font-size="12pt" fo:font-weight="normal" officeooo:rsid="00925745" style:font-size-asian="10.5pt" style:font-weight-asian="normal" style:font-size-complex="12pt" style:font-weight-complex="normal"/>
    </style:style>
    <style:style style:name="T472" style:family="text">
      <style:text-properties fo:font-size="12pt" officeooo:rsid="0093fa00" style:font-size-asian="10.5pt" style:font-size-complex="12pt"/>
    </style:style>
    <style:style style:name="T473" style:family="text">
      <style:text-properties style:use-window-font-color="true" loext:opacity="0%" fo:font-size="12pt" fo:font-weight="normal" officeooo:rsid="00950f31" style:font-size-asian="10.5pt" style:font-weight-asian="normal" style:font-size-complex="12pt" style:font-weight-complex="normal"/>
    </style:style>
    <style:style style:name="T474" style:family="text">
      <style:text-properties style:use-window-font-color="true" loext:opacity="0%" fo:font-size="13pt" fo:font-weight="bold" officeooo:rsid="05b58ab6" style:font-size-asian="13pt" style:font-weight-asian="bold" style:font-size-complex="13pt" style:font-weight-complex="bold"/>
    </style:style>
    <style:style style:name="T475" style:family="text">
      <style:text-properties style:use-window-font-color="true" loext:opacity="0%" style:font-name="Courier" fo:font-size="13pt" fo:font-weight="bold" officeooo:rsid="05b58ab6" style:font-size-asian="13pt" style:font-weight-asian="bold" style:font-size-complex="13pt" style:font-weight-complex="bold"/>
    </style:style>
    <style:style style:name="T476" style:family="text">
      <style:text-properties style:use-window-font-color="true" loext:opacity="0%" fo:font-size="12pt" fo:font-weight="normal" officeooo:rsid="009802e9" style:font-size-asian="10.5pt" style:font-weight-asian="normal" style:font-size-complex="12pt" style:font-weight-complex="normal"/>
    </style:style>
    <style:style style:name="T477" style:family="text">
      <style:text-properties style:use-window-font-color="true" loext:opacity="0%" style:font-name="Courier" fo:font-size="12pt" fo:font-weight="normal" officeooo:rsid="00950f31" style:font-size-asian="10.5pt" style:font-weight-asian="normal" style:font-size-complex="12pt" style:font-weight-complex="normal"/>
    </style:style>
    <style:style style:name="T478" style:family="text">
      <style:text-properties officeooo:rsid="009802e9"/>
    </style:style>
    <style:style style:name="T479" style:family="text">
      <style:text-properties style:font-name="Courier" officeooo:rsid="009802e9"/>
    </style:style>
    <style:style style:name="T480" style:family="text">
      <style:text-properties fo:font-size="10pt" officeooo:rsid="009802e9" style:font-size-asian="10pt" style:font-size-complex="10pt"/>
    </style:style>
    <style:style style:name="T481" style:family="text">
      <style:text-properties style:use-window-font-color="true" loext:opacity="0%" fo:font-size="12pt" fo:font-weight="normal" officeooo:rsid="009b2859" style:font-size-asian="10.5pt" style:font-weight-asian="normal" style:font-size-complex="12pt" style:font-weight-complex="normal"/>
    </style:style>
    <style:style style:name="T482" style:family="text">
      <style:text-properties style:use-window-font-color="true" loext:opacity="0%" fo:font-size="10pt" officeooo:rsid="009b2859" style:font-size-asian="10pt" style:font-size-complex="10pt"/>
    </style:style>
    <style:style style:name="T483" style:family="text">
      <style:text-properties style:use-window-font-color="true" loext:opacity="0%" style:font-name="Courier" fo:font-size="10pt" fo:font-weight="normal" officeooo:rsid="009b2859" fo:background-color="#ffffff" loext:char-shading-value="0" style:font-size-asian="10pt" style:font-size-complex="10pt"/>
    </style:style>
    <style:style style:name="T484" style:family="text">
      <style:text-properties officeooo:rsid="009d91c6"/>
    </style:style>
    <style:style style:name="T485" style:family="text">
      <style:text-properties style:use-window-font-color="true" loext:opacity="0%" style:font-name="Courier" fo:font-size="12pt" fo:font-weight="normal" officeooo:rsid="009f315c" style:font-size-asian="10.5pt" style:font-weight-asian="normal" style:font-size-complex="12pt" style:font-weight-complex="normal"/>
    </style:style>
    <style:style style:name="T486" style:family="text">
      <style:text-properties style:use-window-font-color="true" loext:opacity="0%" fo:font-size="12pt" fo:font-weight="normal" officeooo:rsid="009ff374" style:font-size-asian="10.5pt" style:font-weight-asian="normal" style:font-size-complex="12pt" style:font-weight-complex="normal"/>
    </style:style>
    <style:style style:name="T487" style:family="text">
      <style:text-properties style:use-window-font-color="true" loext:opacity="0%" fo:font-size="12pt" fo:font-weight="normal" officeooo:rsid="06495725" style:font-size-asian="10.5pt" style:font-weight-asian="normal" style:font-size-complex="12pt" style:font-weight-complex="normal"/>
    </style:style>
    <style:style style:name="T488" style:family="text">
      <style:text-properties officeooo:rsid="009ff374"/>
    </style:style>
    <style:style style:name="T489" style:family="text">
      <style:text-properties style:font-name="Courier" officeooo:rsid="009ff374"/>
    </style:style>
    <style:style style:name="T490" style:family="text">
      <style:text-properties fo:font-size="10pt" officeooo:rsid="009ff374" style:font-size-asian="10pt" style:font-size-complex="10pt"/>
    </style:style>
    <style:style style:name="T491" style:family="text">
      <style:text-properties style:use-window-font-color="true" loext:opacity="0%" fo:font-size="12pt" fo:font-weight="normal" officeooo:rsid="00a2b02b" style:font-size-asian="10.5pt" style:font-weight-asian="normal" style:font-size-complex="12pt" style:font-weight-complex="normal"/>
    </style:style>
    <style:style style:name="T492" style:family="text">
      <style:text-properties style:use-window-font-color="true" loext:opacity="0%" fo:font-size="12pt" fo:font-weight="normal" officeooo:rsid="009f315c" style:font-size-asian="10.5pt" style:font-weight-asian="normal" style:font-size-complex="12pt" style:font-weight-complex="normal"/>
    </style:style>
    <style:style style:name="T493" style:family="text">
      <style:text-properties officeooo:rsid="00a4848a"/>
    </style:style>
    <style:style style:name="T494" style:family="text">
      <style:text-properties style:font-name="Courier" fo:font-size="10pt" officeooo:rsid="009ff374" style:font-size-asian="10pt" style:font-size-complex="10pt"/>
    </style:style>
    <style:style style:name="T495" style:family="text">
      <style:text-properties fo:font-size="10pt" officeooo:rsid="00a4848a" style:font-size-asian="10pt" style:font-size-complex="10pt"/>
    </style:style>
    <style:style style:name="T496" style:family="text">
      <style:text-properties style:use-window-font-color="true" loext:opacity="0%" fo:font-size="12pt" fo:font-style="italic" fo:font-weight="normal" officeooo:rsid="00a2b02b" style:font-size-asian="10.5pt" style:font-style-asian="italic" style:font-weight-asian="normal" style:font-size-complex="12pt" style:font-style-complex="italic" style:font-weight-complex="normal"/>
    </style:style>
    <style:style style:name="T497" style:family="text">
      <style:text-properties style:use-window-font-color="true" loext:opacity="0%" fo:font-size="12pt" fo:font-weight="normal" officeooo:rsid="00a4dba4" style:font-size-asian="10.5pt" style:font-weight-asian="normal" style:font-size-complex="12pt" style:font-weight-complex="normal"/>
    </style:style>
    <style:style style:name="T498" style:family="text">
      <style:text-properties style:use-window-font-color="true" loext:opacity="0%" style:font-name="Courier" fo:font-size="12pt" fo:font-weight="normal" officeooo:rsid="00a4dba4" style:font-size-asian="10.5pt" style:font-weight-asian="normal" style:font-size-complex="12pt" style:font-weight-complex="normal"/>
    </style:style>
    <style:style style:name="T499" style:family="text">
      <style:text-properties style:use-window-font-color="true" loext:opacity="0%" fo:font-size="12pt" fo:font-weight="normal" officeooo:rsid="064a2a0e" style:font-size-asian="10.5pt" style:font-weight-asian="normal" style:font-size-complex="12pt" style:font-weight-complex="normal"/>
    </style:style>
    <style:style style:name="T500" style:family="text">
      <style:text-properties officeooo:rsid="00a4dba4"/>
    </style:style>
    <style:style style:name="T501" style:family="text">
      <style:text-properties fo:font-size="12pt" officeooo:rsid="00a5c5ac" style:font-size-asian="10.5pt" style:font-size-complex="12pt"/>
    </style:style>
    <style:style style:name="T502" style:family="text">
      <style:text-properties style:use-window-font-color="true" loext:opacity="0%" fo:font-size="12pt" fo:font-weight="bold" officeooo:rsid="00a796b2" style:font-size-asian="10.5pt" style:font-weight-asian="bold" style:font-size-complex="12pt" style:font-weight-complex="bold"/>
    </style:style>
    <style:style style:name="T503" style:family="text">
      <style:text-properties style:use-window-font-color="true" loext:opacity="0%" fo:font-size="12pt" fo:font-weight="bold" officeooo:rsid="05a70ed4" style:font-size-asian="10.5pt" style:font-weight-asian="bold" style:font-size-complex="12pt" style:font-weight-complex="bold"/>
    </style:style>
    <style:style style:name="T504" style:family="text">
      <style:text-properties style:use-window-font-color="true" loext:opacity="0%" fo:font-size="12pt" fo:font-weight="bold" officeooo:rsid="00a94259" style:font-size-asian="10.5pt" style:font-weight-asian="bold" style:font-size-complex="12pt" style:font-weight-complex="bold"/>
    </style:style>
    <style:style style:name="T505" style:family="text">
      <style:text-properties style:use-window-font-color="true" loext:opacity="0%" fo:font-size="12pt" fo:font-weight="normal" officeooo:rsid="00a94259" style:font-size-asian="10.5pt" style:font-weight-asian="normal" style:font-size-complex="12pt" style:font-weight-complex="normal"/>
    </style:style>
    <style:style style:name="T506" style:family="text">
      <style:text-properties fo:font-size="12pt" fo:font-weight="normal" officeooo:rsid="064a2a0e" style:font-size-asian="10.5pt" style:font-weight-asian="normal" style:font-size-complex="12pt" style:font-weight-complex="normal"/>
    </style:style>
    <style:style style:name="T507" style:family="text">
      <style:text-properties style:font-name="Courier" fo:font-size="12pt" fo:font-weight="normal" style:font-size-asian="10.5pt" style:font-weight-asian="normal" style:font-size-complex="12pt" style:font-weight-complex="normal"/>
    </style:style>
    <style:style style:name="T508" style:family="text">
      <style:text-properties fo:font-size="12pt" officeooo:rsid="064a2a0e" style:font-size-asian="10.5pt" style:font-size-complex="12pt"/>
    </style:style>
    <style:style style:name="T509" style:family="text">
      <style:text-properties style:use-window-font-color="true" loext:opacity="0%" fo:font-size="10pt" officeooo:rsid="00aa67f2" style:font-size-asian="10pt" style:font-size-complex="10pt"/>
    </style:style>
    <style:style style:name="T510" style:family="text">
      <style:text-properties style:use-window-font-color="true" loext:opacity="0%" fo:font-size="10pt" officeooo:rsid="00ac582f" style:font-size-asian="10pt" style:font-size-complex="10pt"/>
    </style:style>
    <style:style style:name="T511" style:family="text">
      <style:text-properties style:use-window-font-color="true" loext:opacity="0%" fo:font-size="10pt" fo:font-weight="normal" officeooo:rsid="00aa67f2" fo:background-color="#ffffff" loext:char-shading-value="0" style:font-size-asian="10pt" style:font-size-complex="10pt"/>
    </style:style>
    <style:style style:name="T512" style:family="text">
      <style:text-properties style:use-window-font-color="true" loext:opacity="0%" fo:font-size="10pt" fo:font-weight="normal" officeooo:rsid="00ac582f" fo:background-color="#ffffff" loext:char-shading-value="0" style:font-size-asian="10pt" style:font-size-complex="10pt"/>
    </style:style>
    <style:style style:name="T513" style:family="text">
      <style:text-properties style:use-window-font-color="true" loext:opacity="0%" style:font-name="Courier" fo:font-size="10pt" fo:font-weight="normal" officeooo:rsid="00aa67f2" fo:background-color="#ffffff" loext:char-shading-value="0" style:font-size-asian="10pt" style:font-size-complex="10pt"/>
    </style:style>
    <style:style style:name="T514" style:family="text">
      <style:text-properties style:use-window-font-color="true" loext:opacity="0%" style:font-name="Courier" fo:font-size="10pt" fo:font-weight="normal" officeooo:rsid="00ac582f" fo:background-color="#ffffff" loext:char-shading-value="0" style:font-size-asian="10pt" style:font-size-complex="10pt"/>
    </style:style>
    <style:style style:name="T515" style:family="text">
      <style:text-properties style:use-window-font-color="true" loext:opacity="0%" style:font-name="Courier" fo:font-size="12pt" fo:font-style="italic" fo:font-weight="normal" officeooo:rsid="00b0cc4c" style:font-size-asian="10.5pt" style:font-style-asian="italic" style:font-weight-asian="normal" style:font-size-complex="12pt" style:font-style-complex="italic" style:font-weight-complex="normal"/>
    </style:style>
    <style:style style:name="T516" style:family="text">
      <style:text-properties style:text-underline-style="none" officeooo:rsid="05f1833f"/>
    </style:style>
    <style:style style:name="T517" style:family="text">
      <style:text-properties style:text-underline-style="none"/>
    </style:style>
    <style:style style:name="T518" style:family="text">
      <style:text-properties style:text-underline-style="none" officeooo:rsid="064a2a0e"/>
    </style:style>
    <style:style style:name="T519" style:family="text">
      <style:text-properties officeooo:rsid="00b77755"/>
    </style:style>
    <style:style style:name="T520" style:family="text">
      <style:text-properties style:use-window-font-color="true" loext:opacity="0%" fo:font-size="12pt" fo:font-style="normal" style:text-underline-style="none" fo:font-weight="normal" officeooo:rsid="00ba86af" style:font-size-asian="10.5pt" style:font-style-asian="normal" style:font-weight-asian="normal" style:font-size-complex="12pt" style:font-style-complex="normal" style:font-weight-complex="normal"/>
    </style:style>
    <style:style style:name="T521" style:family="text">
      <style:text-properties style:use-window-font-color="true" loext:opacity="0%" style:font-name="Courier" fo:font-size="12pt" fo:font-style="normal" style:text-underline-style="none" fo:font-weight="normal" officeooo:rsid="00ba86af" style:font-size-asian="10.5pt" style:font-style-asian="normal" style:font-weight-asian="normal" style:font-size-complex="12pt" style:font-style-complex="normal" style:font-weight-complex="normal"/>
    </style:style>
    <style:style style:name="T522" style:family="text">
      <style:text-properties style:use-window-font-color="true" loext:opacity="0%" fo:font-size="12pt" fo:font-style="normal" style:text-underline-style="none" fo:font-weight="normal" officeooo:rsid="064a2a0e" style:font-size-asian="10.5pt" style:font-style-asian="normal" style:font-weight-asian="normal" style:font-size-complex="12pt" style:font-style-complex="normal" style:font-weight-complex="normal"/>
    </style:style>
    <style:style style:name="T523" style:family="text">
      <style:text-properties officeooo:rsid="00ba86af"/>
    </style:style>
    <style:style style:name="T524" style:family="text">
      <style:text-properties style:font-name="Courier" officeooo:rsid="00ba86af"/>
    </style:style>
    <style:style style:name="T525" style:family="text">
      <style:text-properties fo:font-size="10pt" officeooo:rsid="00ba86af" style:font-size-asian="10pt" style:font-size-complex="10pt"/>
    </style:style>
    <style:style style:name="T526" style:family="text">
      <style:text-properties officeooo:rsid="00bb9449"/>
    </style:style>
    <style:style style:name="T527" style:family="text">
      <style:text-properties style:use-window-font-color="true" loext:opacity="0%" fo:font-size="12pt" fo:font-style="normal" style:text-underline-style="none" fo:font-weight="normal" officeooo:rsid="00bcdc9d" style:font-size-asian="10.5pt" style:font-style-asian="normal" style:font-weight-asian="normal" style:font-size-complex="12pt" style:font-style-complex="normal" style:font-weight-complex="normal"/>
    </style:style>
    <style:style style:name="T528" style:family="text">
      <style:text-properties style:use-window-font-color="true" loext:opacity="0%" fo:font-size="12pt" fo:font-style="normal" style:text-underline-style="none" fo:font-weight="normal" officeooo:rsid="064a56fe" style:font-size-asian="10.5pt" style:font-style-asian="normal" style:font-weight-asian="normal" style:font-size-complex="12pt" style:font-style-complex="normal" style:font-weight-complex="normal"/>
    </style:style>
    <style:style style:name="T529" style:family="text">
      <style:text-properties style:use-window-font-color="true" loext:opacity="0%" fo:font-size="12pt" fo:font-style="normal" style:text-underline-style="none" fo:font-weight="normal" officeooo:rsid="05f193db" style:font-size-asian="10.5pt" style:font-style-asian="normal" style:font-weight-asian="normal" style:font-size-complex="12pt" style:font-style-complex="normal" style:font-weight-complex="normal"/>
    </style:style>
    <style:style style:name="T530" style:family="text">
      <style:text-properties style:use-window-font-color="true" loext:opacity="0%" style:font-name="Courier" fo:font-size="12pt" fo:font-style="normal" style:text-underline-style="none" fo:font-weight="normal" officeooo:rsid="00bcdc9d" style:font-size-asian="10.5pt" style:font-style-asian="normal" style:font-weight-asian="normal" style:font-size-complex="12pt" style:font-style-complex="normal" style:font-weight-complex="normal"/>
    </style:style>
    <style:style style:name="T531" style:family="text">
      <style:text-properties style:use-window-font-color="true" loext:opacity="0%" style:font-name="Courier" fo:font-size="12pt" fo:font-style="normal" style:text-underline-style="none" fo:font-weight="normal" officeooo:rsid="064a56fe" style:font-size-asian="10.5pt" style:font-style-asian="normal" style:font-weight-asian="normal" style:font-size-complex="12pt" style:font-style-complex="normal" style:font-weight-complex="normal"/>
    </style:style>
    <style:style style:name="T532" style:family="text">
      <style:text-properties style:use-window-font-color="true" loext:opacity="0%" fo:font-size="12pt" fo:font-weight="normal" officeooo:rsid="00bce9e2" style:font-size-asian="10.5pt" style:font-weight-asian="normal" style:font-size-complex="12pt" style:font-weight-complex="normal"/>
    </style:style>
    <style:style style:name="T533" style:family="text">
      <style:text-properties style:use-window-font-color="true" loext:opacity="0%" style:font-name="Courier" fo:font-size="12pt" fo:font-weight="normal" officeooo:rsid="00bce9e2" style:font-size-asian="10.5pt" style:font-weight-asian="normal" style:font-size-complex="12pt" style:font-weight-complex="normal"/>
    </style:style>
    <style:style style:name="T534" style:family="text">
      <style:text-properties officeooo:rsid="00bce9e2"/>
    </style:style>
    <style:style style:name="T535" style:family="text">
      <style:text-properties style:font-name="Courier" fo:font-size="10pt" officeooo:rsid="00ba86af" style:font-size-asian="10pt" style:font-size-complex="10pt"/>
    </style:style>
    <style:style style:name="T536" style:family="text">
      <style:text-properties fo:font-size="10pt" officeooo:rsid="00bce9e2" style:font-size-asian="10pt" style:font-size-complex="10pt"/>
    </style:style>
    <style:style style:name="T537" style:family="text">
      <style:text-properties style:use-window-font-color="true" loext:opacity="0%" fo:font-size="12pt" fo:font-weight="normal" officeooo:rsid="05f24998" style:font-size-asian="10.5pt" style:font-weight-asian="normal" style:font-size-complex="12pt" style:font-weight-complex="normal"/>
    </style:style>
    <style:style style:name="T538" style:family="text">
      <style:text-properties style:use-window-font-color="true" loext:opacity="0%" fo:font-size="12pt" fo:font-weight="normal" officeooo:rsid="00bd277d" style:font-size-asian="10.5pt" style:font-weight-asian="normal" style:font-size-complex="12pt" style:font-weight-complex="normal"/>
    </style:style>
    <style:style style:name="T539" style:family="text">
      <style:text-properties style:use-window-font-color="true" loext:opacity="0%" style:font-name="Courier" fo:font-size="12pt" fo:font-weight="normal" officeooo:rsid="00c1c2d4" style:font-size-asian="10.5pt" style:font-weight-asian="normal" style:font-size-complex="12pt" style:font-weight-complex="normal"/>
    </style:style>
    <style:style style:name="T540" style:family="text">
      <style:text-properties officeooo:rsid="00c75c2c"/>
    </style:style>
    <style:style style:name="T541" style:family="text">
      <style:text-properties style:font-name="Courier" officeooo:rsid="00c75c2c"/>
    </style:style>
    <style:style style:name="T542" style:family="text">
      <style:text-properties style:font-name="Courier" fo:font-size="10pt" officeooo:rsid="00c75c2c" style:font-size-asian="10pt" style:font-size-complex="10pt"/>
    </style:style>
    <style:style style:name="T543" style:family="text">
      <style:text-properties style:use-window-font-color="true" loext:opacity="0%" style:font-name="Courier" fo:font-size="12pt" fo:font-weight="normal" officeooo:rsid="00c55d05" style:font-size-asian="10.5pt" style:font-weight-asian="normal" style:font-size-complex="12pt" style:font-weight-complex="normal"/>
    </style:style>
    <style:style style:name="T544" style:family="text">
      <style:text-properties style:use-window-font-color="true" loext:opacity="0%" fo:font-size="10pt" officeooo:rsid="00bea428" style:font-size-asian="10pt" style:font-size-complex="10pt"/>
    </style:style>
    <style:style style:name="T545" style:family="text">
      <style:text-properties style:use-window-font-color="true" loext:opacity="0%" fo:font-size="10pt" officeooo:rsid="00c082c0" style:font-size-asian="10pt" style:font-size-complex="10pt"/>
    </style:style>
    <style:style style:name="T546" style:family="text">
      <style:text-properties style:use-window-font-color="true" loext:opacity="0%" style:font-name="Courier" fo:font-size="10pt" fo:font-weight="normal" officeooo:rsid="00c082c0" fo:background-color="#ffffff" loext:char-shading-value="0" style:font-size-asian="10pt" style:font-size-complex="10pt"/>
    </style:style>
    <style:style style:name="T547" style:family="text">
      <style:text-properties style:use-window-font-color="true" loext:opacity="0%" style:font-name="Courier" fo:font-size="10pt" fo:font-weight="normal" officeooo:rsid="00bea428" fo:background-color="#ffffff" loext:char-shading-value="0" style:font-size-asian="10pt" style:font-size-complex="10pt"/>
    </style:style>
    <style:style style:name="T548" style:family="text">
      <style:text-properties style:use-window-font-color="true" loext:opacity="0%" fo:font-size="10pt" fo:font-weight="normal" officeooo:rsid="00bea428" fo:background-color="#ffffff" loext:char-shading-value="0" style:font-size-asian="10pt" style:font-size-complex="10pt"/>
    </style:style>
    <style:style style:name="T549" style:family="text">
      <style:text-properties style:use-window-font-color="true" loext:opacity="0%" fo:font-size="10pt" fo:font-weight="normal" officeooo:rsid="00c082c0" fo:background-color="#ffffff" loext:char-shading-value="0" style:font-size-asian="10pt" style:font-size-complex="10pt"/>
    </style:style>
    <style:style style:name="T550" style:family="text">
      <style:text-properties officeooo:rsid="05f402ae"/>
    </style:style>
    <style:style style:name="T551" style:family="text">
      <style:text-properties fo:font-style="normal" style:text-underline-style="none" fo:font-weight="normal" officeooo:rsid="05f402ae" style:font-style-asian="normal" style:font-weight-asian="normal" style:font-style-complex="normal" style:font-weight-complex="normal"/>
    </style:style>
    <style:style style:name="T552" style:family="text">
      <style:text-properties officeooo:rsid="00c8e883"/>
    </style:style>
    <style:style style:name="T553" style:family="text">
      <style:text-properties officeooo:rsid="011d25c0"/>
    </style:style>
    <style:style style:name="T554" style:family="text">
      <style:text-properties style:font-name="Courier" officeooo:rsid="011d25c0"/>
    </style:style>
    <style:style style:name="T555" style:family="text">
      <style:text-properties style:font-name="Courier" officeooo:rsid="022df83a"/>
    </style:style>
    <style:style style:name="T556" style:family="text">
      <style:text-properties officeooo:rsid="057bb34d"/>
    </style:style>
    <style:style style:name="T557" style:family="text">
      <style:text-properties officeooo:rsid="00cb4349"/>
    </style:style>
    <style:style style:name="T558" style:family="text">
      <style:text-properties officeooo:rsid="00cb7582"/>
    </style:style>
    <style:style style:name="T559" style:family="text">
      <style:text-properties style:use-window-font-color="true" loext:opacity="0%" fo:font-size="12pt" fo:font-weight="normal" officeooo:rsid="00cb7582" style:font-size-asian="10.5pt" style:font-weight-asian="normal" style:font-size-complex="12pt" style:font-weight-complex="normal"/>
    </style:style>
    <style:style style:name="T560" style:family="text">
      <style:text-properties style:use-window-font-color="true" loext:opacity="0%" style:font-name="Courier" fo:font-size="12pt" fo:font-weight="normal" officeooo:rsid="00cb7582" style:font-size-asian="10.5pt" style:font-weight-asian="normal" style:font-size-complex="12pt" style:font-weight-complex="normal"/>
    </style:style>
    <style:style style:name="T561" style:family="text">
      <style:text-properties style:font-name="Courier" officeooo:rsid="00cb7582"/>
    </style:style>
    <style:style style:name="T562" style:family="text">
      <style:text-properties style:use-window-font-color="true" loext:opacity="0%" fo:font-size="12pt" fo:font-weight="normal" officeooo:rsid="00cbb224" style:font-size-asian="10.5pt" style:font-weight-asian="normal" style:font-size-complex="12pt" style:font-weight-complex="normal"/>
    </style:style>
    <style:style style:name="T563" style:family="text">
      <style:text-properties style:use-window-font-color="true" loext:opacity="0%" fo:font-size="12pt" fo:font-weight="normal" officeooo:rsid="00cde64f" style:font-size-asian="10.5pt" style:font-weight-asian="normal" style:font-size-complex="12pt" style:font-weight-complex="normal"/>
    </style:style>
    <style:style style:name="T564" style:family="text">
      <style:text-properties style:use-window-font-color="true" loext:opacity="0%" fo:font-size="12pt" fo:font-style="italic" fo:font-weight="normal" officeooo:rsid="00cb7582" style:font-size-asian="10.5pt" style:font-style-asian="italic" style:font-weight-asian="normal" style:font-size-complex="12pt" style:font-style-complex="italic" style:font-weight-complex="normal"/>
    </style:style>
    <style:style style:name="T565" style:family="text">
      <style:text-properties style:use-window-font-color="true" loext:opacity="0%" style:font-name="Courier" fo:font-size="12pt" fo:font-weight="normal" officeooo:rsid="00cd2d87" style:font-size-asian="10.5pt" style:font-weight-asian="normal" style:font-size-complex="12pt" style:font-weight-complex="normal"/>
    </style:style>
    <style:style style:name="T566" style:family="text">
      <style:text-properties style:use-window-font-color="true" loext:opacity="0%" style:font-name="Courier" fo:font-size="11pt" fo:font-weight="normal" officeooo:rsid="00cb7582" style:font-size-asian="11pt" style:font-weight-asian="normal" style:font-size-complex="11pt" style:font-weight-complex="normal"/>
    </style:style>
    <style:style style:name="T567" style:family="text">
      <style:text-properties style:use-window-font-color="true" loext:opacity="0%" style:font-name="Courier" fo:font-size="11pt" fo:font-weight="normal" officeooo:rsid="00cd2d87" style:font-size-asian="11pt" style:font-weight-asian="normal" style:font-size-complex="11pt" style:font-weight-complex="normal"/>
    </style:style>
    <style:style style:name="T568" style:family="text">
      <style:text-properties style:use-window-font-color="true" loext:opacity="0%" fo:font-size="12pt" fo:font-weight="normal" officeooo:rsid="05f81997" style:font-size-asian="10.5pt" style:font-weight-asian="normal" style:font-size-complex="12pt" style:font-weight-complex="normal"/>
    </style:style>
    <style:style style:name="T569" style:family="text">
      <style:text-properties style:use-window-font-color="true" loext:opacity="0%" style:font-name="Courier" fo:font-size="12pt" fo:font-weight="normal" officeooo:rsid="00cde64f" style:font-size-asian="12pt" style:font-weight-asian="normal" style:font-size-complex="12pt" style:font-weight-complex="normal"/>
    </style:style>
    <style:style style:name="T570" style:family="text">
      <style:text-properties style:use-window-font-color="true" loext:opacity="0%" style:font-name="Courier" fo:font-size="12pt" fo:font-weight="normal" officeooo:rsid="00cb7582" style:font-size-asian="12pt" style:font-weight-asian="normal" style:font-size-complex="12pt" style:font-weight-complex="normal"/>
    </style:style>
    <style:style style:name="T571" style:family="text">
      <style:text-properties style:use-window-font-color="true" loext:opacity="0%" fo:font-size="12pt" fo:font-style="normal" fo:font-weight="normal" officeooo:rsid="00cb7582" style:font-size-asian="10.5pt" style:font-style-asian="normal" style:font-weight-asian="normal" style:font-size-complex="12pt" style:font-style-complex="normal" style:font-weight-complex="normal"/>
    </style:style>
    <style:style style:name="T572" style:family="text">
      <style:text-properties officeooo:rsid="00d25178"/>
    </style:style>
    <style:style style:name="T573" style:family="text">
      <style:text-properties style:font-name="Courier" fo:font-size="10pt" officeooo:rsid="00cb7582" style:font-size-asian="10pt" style:font-size-complex="10pt"/>
    </style:style>
    <style:style style:name="T574" style:family="text">
      <style:text-properties fo:font-size="10pt" officeooo:rsid="00cb7582" style:font-size-asian="10pt" style:font-size-complex="10pt"/>
    </style:style>
    <style:style style:name="T575" style:family="text">
      <style:text-properties style:use-window-font-color="true" loext:opacity="0%" fo:font-size="12pt" fo:font-style="normal" fo:font-weight="normal" officeooo:rsid="00d484ca" style:font-size-asian="10.5pt" style:font-style-asian="normal" style:font-weight-asian="normal" style:font-size-complex="12pt" style:font-style-complex="normal" style:font-weight-complex="normal"/>
    </style:style>
    <style:style style:name="T576" style:family="text">
      <style:text-properties style:use-window-font-color="true" loext:opacity="0%" fo:font-size="12pt" fo:font-style="normal" fo:font-weight="normal" officeooo:rsid="00d56067" style:font-size-asian="10.5pt" style:font-style-asian="normal" style:font-weight-asian="normal" style:font-size-complex="12pt" style:font-style-complex="normal" style:font-weight-complex="normal"/>
    </style:style>
    <style:style style:name="T577" style:family="text">
      <style:text-properties officeooo:rsid="00d78daf"/>
    </style:style>
    <style:style style:name="T578" style:family="text">
      <style:text-properties officeooo:rsid="00d885d1"/>
    </style:style>
    <style:style style:name="T579" style:family="text">
      <style:text-properties style:use-window-font-color="true" loext:opacity="0%" fo:font-size="12pt" fo:font-weight="bold" officeooo:rsid="00da0b1c" style:font-size-asian="10.5pt" style:font-weight-asian="bold" style:font-size-complex="12pt" style:font-weight-complex="bold"/>
    </style:style>
    <style:style style:name="T580" style:family="text">
      <style:text-properties style:use-window-font-color="true" loext:opacity="0%" fo:font-size="12pt" fo:font-weight="normal" officeooo:rsid="00da0b1c" style:font-size-asian="10.5pt" style:font-weight-asian="normal" style:font-size-complex="12pt" style:font-weight-complex="normal"/>
    </style:style>
    <style:style style:name="T581" style:family="text">
      <style:text-properties style:font-name="Courier" fo:font-size="12pt" officeooo:rsid="00d6fe4f" style:font-size-asian="10.5pt" style:font-size-complex="12pt"/>
    </style:style>
    <style:style style:name="T582" style:family="text">
      <style:text-properties style:use-window-font-color="true" loext:opacity="0%" fo:font-size="12pt" fo:font-weight="normal" officeooo:rsid="00dd62ac" style:font-size-asian="10.5pt" style:font-weight-asian="normal" style:font-size-complex="12pt" style:font-weight-complex="normal"/>
    </style:style>
    <style:style style:name="T583" style:family="text">
      <style:text-properties style:use-window-font-color="true" loext:opacity="0%" fo:font-size="12pt" fo:font-weight="normal" officeooo:rsid="00de20d8" style:font-size-asian="10.5pt" style:font-weight-asian="normal" style:font-size-complex="12pt" style:font-weight-complex="normal"/>
    </style:style>
    <style:style style:name="T584" style:family="text">
      <style:text-properties officeooo:rsid="05f81997"/>
    </style:style>
    <style:style style:name="T585" style:family="text">
      <style:text-properties fo:font-size="12pt" officeooo:rsid="00ded1b7" style:font-size-asian="10.5pt" style:font-size-complex="12pt"/>
    </style:style>
    <style:style style:name="T586" style:family="text">
      <style:text-properties officeooo:rsid="05a70ed4"/>
    </style:style>
    <style:style style:name="T587" style:family="text">
      <style:text-properties style:use-window-font-color="true" loext:opacity="0%" fo:font-size="13pt" fo:font-weight="bold" officeooo:rsid="057f15ab" style:font-size-asian="13pt" style:font-weight-asian="bold" style:font-size-complex="13pt" style:font-weight-complex="bold"/>
    </style:style>
    <style:style style:name="T588" style:family="text">
      <style:text-properties style:use-window-font-color="true" loext:opacity="0%" style:font-name="Courier" fo:font-size="13pt" fo:font-weight="bold" officeooo:rsid="00efed78" style:font-size-asian="13pt" style:font-weight-asian="bold" style:font-size-complex="13pt" style:font-weight-complex="bold"/>
    </style:style>
    <style:style style:name="T589" style:family="text">
      <style:text-properties officeooo:rsid="05f89624"/>
    </style:style>
    <style:style style:name="T590" style:family="text">
      <style:text-properties officeooo:rsid="00fc822f"/>
    </style:style>
    <style:style style:name="T591" style:family="text">
      <style:text-properties style:font-name="Courier" officeooo:rsid="00fc822f"/>
    </style:style>
    <style:style style:name="T592" style:family="text">
      <style:text-properties officeooo:rsid="00e27346"/>
    </style:style>
    <style:style style:name="T593" style:family="text">
      <style:text-properties officeooo:rsid="00e05881"/>
    </style:style>
    <style:style style:name="T594" style:family="text">
      <style:text-properties style:font-name="Courier" officeooo:rsid="00e05881"/>
    </style:style>
    <style:style style:name="T595" style:family="text">
      <style:text-properties fo:font-size="10pt" officeooo:rsid="00e05881" style:font-size-asian="10pt" style:font-size-complex="10pt"/>
    </style:style>
    <style:style style:name="T596" style:family="text">
      <style:text-properties officeooo:rsid="057f15ab"/>
    </style:style>
    <style:style style:name="T597" style:family="text">
      <style:text-properties style:use-window-font-color="true" loext:opacity="0%" fo:font-size="12pt" fo:font-weight="normal" officeooo:rsid="00e30425" style:font-size-asian="10.5pt" style:font-weight-asian="normal" style:font-size-complex="12pt" style:font-weight-complex="normal"/>
    </style:style>
    <style:style style:name="T598" style:family="text">
      <style:text-properties style:use-window-font-color="true" loext:opacity="0%" style:font-name="Courier" fo:font-size="12pt" fo:font-weight="normal" officeooo:rsid="00fc822f" style:font-size-asian="10.5pt" style:font-weight-asian="normal" style:font-size-complex="12pt" style:font-weight-complex="normal"/>
    </style:style>
    <style:style style:name="T599" style:family="text">
      <style:text-properties style:use-window-font-color="true" loext:opacity="0%" fo:font-size="12pt" fo:font-weight="normal" officeooo:rsid="064c7e2d" style:font-size-asian="10.5pt" style:font-weight-asian="normal" style:font-size-complex="12pt" style:font-weight-complex="normal"/>
    </style:style>
    <style:style style:name="T600" style:family="text">
      <style:text-properties style:use-window-font-color="true" loext:opacity="0%" fo:font-size="12pt" fo:font-weight="normal" officeooo:rsid="00e421e5" style:font-size-asian="10.5pt" style:font-weight-asian="normal" style:font-size-complex="12pt" style:font-weight-complex="normal"/>
    </style:style>
    <style:style style:name="T601" style:family="text">
      <style:text-properties style:use-window-font-color="true" loext:opacity="0%" fo:font-size="12pt" fo:font-weight="normal" officeooo:rsid="05f89624" style:font-size-asian="10.5pt" style:font-weight-asian="normal" style:font-size-complex="12pt" style:font-weight-complex="normal"/>
    </style:style>
    <style:style style:name="T602" style:family="text">
      <style:text-properties fo:color="#800080" loext:opacity="100%" style:font-name="Courier" fo:font-size="12pt" fo:font-weight="normal" fo:background-color="#ffffff" loext:char-shading-value="0" style:font-size-asian="12pt" style:font-size-complex="12pt"/>
    </style:style>
    <style:style style:name="T603" style:family="text">
      <style:text-properties fo:color="#000000" loext:opacity="100%" style:font-name="Courier" fo:font-size="12pt" fo:font-weight="normal" fo:background-color="#ffffff" loext:char-shading-value="0" style:font-size-asian="12pt" style:font-size-complex="12pt"/>
    </style:style>
    <style:style style:name="T604" style:family="text">
      <style:text-properties fo:color="#0000ff" loext:opacity="100%" style:font-name="Courier" fo:font-size="12pt" fo:font-weight="normal" fo:background-color="#ffffff" loext:char-shading-value="0" style:font-size-asian="10.5pt" style:font-size-complex="12pt"/>
    </style:style>
    <style:style style:name="T605" style:family="text">
      <style:text-properties style:use-window-font-color="true" loext:opacity="0%" style:font-name="Courier" fo:font-size="12pt" fo:font-weight="normal" officeooo:rsid="00e421e5" style:font-size-asian="10.5pt" style:font-weight-asian="normal" style:font-size-complex="12pt" style:font-weight-complex="normal"/>
    </style:style>
    <style:style style:name="T606" style:family="text">
      <style:text-properties style:use-window-font-color="true" loext:opacity="0%" fo:font-size="10pt" officeooo:rsid="00e821ba" style:font-size-asian="10pt" style:font-size-complex="10pt"/>
    </style:style>
    <style:style style:name="T607" style:family="text">
      <style:text-properties style:use-window-font-color="true" loext:opacity="0%" fo:font-size="10pt" officeooo:rsid="00e89291" style:font-size-asian="10pt" style:font-size-complex="10pt"/>
    </style:style>
    <style:style style:name="T608" style:family="text">
      <style:text-properties style:use-window-font-color="true" loext:opacity="0%" style:font-name="Courier" fo:font-size="10pt" fo:font-weight="normal" officeooo:rsid="00e89291" fo:background-color="#ffffff" loext:char-shading-value="0" style:font-size-asian="10pt" style:font-size-complex="10pt"/>
    </style:style>
    <style:style style:name="T609" style:family="text">
      <style:text-properties style:use-window-font-color="true" loext:opacity="0%" style:font-name="Courier" fo:font-size="10pt" fo:font-weight="normal" officeooo:rsid="00e821ba" fo:background-color="#ffffff" loext:char-shading-value="0" style:font-size-asian="10pt" style:font-size-complex="10pt"/>
    </style:style>
    <style:style style:name="T610" style:family="text">
      <style:text-properties style:use-window-font-color="true" loext:opacity="0%" fo:font-size="10pt" fo:font-weight="normal" officeooo:rsid="00e821ba" fo:background-color="#ffffff" loext:char-shading-value="0" style:font-size-asian="10pt" style:font-size-complex="10pt"/>
    </style:style>
    <style:style style:name="T611" style:family="text">
      <style:text-properties style:use-window-font-color="true" loext:opacity="0%" fo:font-size="10pt" fo:font-weight="normal" officeooo:rsid="00e89291" fo:background-color="#ffffff" loext:char-shading-value="0" style:font-size-asian="10pt" style:font-size-complex="10pt"/>
    </style:style>
    <style:style style:name="T612" style:family="text">
      <style:text-properties fo:font-style="italic" fo:font-weight="normal" officeooo:rsid="05f89624" style:font-style-asian="italic" style:font-weight-asian="normal" style:font-style-complex="italic" style:font-weight-complex="normal"/>
    </style:style>
    <style:style style:name="T613" style:family="text">
      <style:text-properties officeooo:rsid="00ec89f5"/>
    </style:style>
    <style:style style:name="T614" style:family="text">
      <style:text-properties officeooo:rsid="00ee8290"/>
    </style:style>
    <style:style style:name="T615" style:family="text">
      <style:text-properties style:use-window-font-color="true" loext:opacity="0%" fo:font-size="12pt" fo:font-style="normal" fo:font-weight="normal" officeooo:rsid="00f325ca" style:font-size-asian="12pt" style:font-style-asian="normal" style:font-weight-asian="normal" style:font-size-complex="12pt" style:font-style-complex="normal" style:font-weight-complex="normal"/>
    </style:style>
    <style:style style:name="T616" style:family="text">
      <style:text-properties style:use-window-font-color="true" loext:opacity="0%" style:font-name="Courier" fo:font-size="12pt" fo:font-style="normal" fo:font-weight="normal" officeooo:rsid="00f325ca" style:font-size-asian="12pt" style:font-style-asian="normal" style:font-weight-asian="normal" style:font-size-complex="12pt" style:font-style-complex="normal" style:font-weight-complex="normal"/>
    </style:style>
    <style:style style:name="T617" style:family="text">
      <style:text-properties style:use-window-font-color="true" loext:opacity="0%" style:font-name="Liberation Serif" fo:font-size="12pt" fo:font-style="normal" fo:font-weight="normal" officeooo:rsid="00f325ca" style:font-size-asian="12pt" style:font-style-asian="normal" style:font-weight-asian="normal" style:font-size-complex="12pt" style:font-style-complex="normal" style:font-weight-complex="normal"/>
    </style:style>
    <style:style style:name="T618" style:family="text">
      <style:text-properties fo:font-size="13pt" fo:font-weight="bold" officeooo:rsid="057f15ab" style:font-size-asian="13pt" style:font-weight-asian="bold" style:font-size-complex="13pt" style:font-weight-complex="bold"/>
    </style:style>
    <style:style style:name="T619" style:family="text">
      <style:text-properties fo:font-size="13pt" fo:font-weight="bold" officeooo:rsid="05b62ce2" style:font-size-asian="13pt" style:font-weight-asian="bold" style:font-size-complex="13pt" style:font-weight-complex="bold"/>
    </style:style>
    <style:style style:name="T620" style:family="text">
      <style:text-properties fo:font-size="13pt" fo:font-weight="bold" officeooo:rsid="05f8af45" style:font-size-asian="13pt" style:font-weight-asian="bold" style:font-size-complex="13pt" style:font-weight-complex="bold"/>
    </style:style>
    <style:style style:name="T621" style:family="text">
      <style:text-properties style:font-name="Courier" fo:font-size="13pt" fo:font-weight="bold" officeooo:rsid="05b62ce2" style:font-size-asian="13pt" style:font-weight-asian="bold" style:font-size-complex="13pt" style:font-weight-complex="bold"/>
    </style:style>
    <style:style style:name="T622" style:family="text">
      <style:text-properties officeooo:rsid="00f325ca"/>
    </style:style>
    <style:style style:name="T623" style:family="text">
      <style:text-properties officeooo:rsid="064c7e2d"/>
    </style:style>
    <style:style style:name="T624" style:family="text">
      <style:text-properties officeooo:rsid="00f796d0"/>
    </style:style>
    <style:style style:name="T625" style:family="text">
      <style:text-properties officeooo:rsid="00fdabde"/>
    </style:style>
    <style:style style:name="T626" style:family="text">
      <style:text-properties style:font-name="Courier" officeooo:rsid="00f325ca"/>
    </style:style>
    <style:style style:name="T627" style:family="text">
      <style:text-properties fo:font-size="10pt" officeooo:rsid="00f325ca" style:font-size-asian="10pt" style:font-size-complex="10pt"/>
    </style:style>
    <style:style style:name="T628" style:family="text">
      <style:text-properties fo:color="#0000ff" loext:opacity="100%" style:font-name="Courier" fo:font-size="12pt" fo:font-weight="normal" fo:background-color="#ffffff" loext:char-shading-value="0" style:font-size-asian="12pt" style:font-size-complex="12pt"/>
    </style:style>
    <style:style style:name="T629" style:family="text">
      <style:text-properties officeooo:rsid="00f671b3"/>
    </style:style>
    <style:style style:name="T630" style:family="text">
      <style:text-properties style:use-window-font-color="true" loext:opacity="0%" fo:font-size="12pt" fo:font-style="normal" fo:font-weight="normal" officeooo:rsid="00f8688c" style:font-size-asian="12pt" style:font-style-asian="normal" style:font-weight-asian="normal" style:font-size-complex="12pt" style:font-style-complex="normal" style:font-weight-complex="normal"/>
    </style:style>
    <style:style style:name="T631" style:family="text">
      <style:text-properties style:use-window-font-color="true" loext:opacity="0%" style:font-name="Courier" fo:font-size="12pt" fo:font-style="normal" fo:font-weight="normal" officeooo:rsid="00f168f3" style:font-size-asian="12pt" style:font-style-asian="normal" style:font-weight-asian="normal" style:font-size-complex="12pt" style:font-style-complex="normal" style:font-weight-complex="normal"/>
    </style:style>
    <style:style style:name="T632" style:family="text">
      <style:text-properties style:use-window-font-color="true" loext:opacity="0%" fo:font-size="10pt" officeooo:rsid="00f8688c" style:font-size-asian="10pt" style:font-size-complex="10pt"/>
    </style:style>
    <style:style style:name="T633" style:family="text">
      <style:text-properties style:use-window-font-color="true" loext:opacity="0%" fo:font-size="10pt" officeooo:rsid="00f8ee74" style:font-size-asian="10pt" style:font-size-complex="10pt"/>
    </style:style>
    <style:style style:name="T634" style:family="text">
      <style:text-properties style:use-window-font-color="true" loext:opacity="0%" style:font-name="Courier" fo:font-size="10pt" fo:font-weight="normal" officeooo:rsid="00f8ee74" fo:background-color="#ffffff" loext:char-shading-value="0" style:font-size-asian="10pt" style:font-size-complex="10pt"/>
    </style:style>
    <style:style style:name="T635" style:family="text">
      <style:text-properties style:use-window-font-color="true" loext:opacity="0%" style:font-name="Courier" fo:font-size="10pt" fo:font-weight="normal" officeooo:rsid="00f8688c" fo:background-color="#ffffff" loext:char-shading-value="0" style:font-size-asian="10pt" style:font-size-complex="10pt"/>
    </style:style>
    <style:style style:name="T636" style:family="text">
      <style:text-properties style:use-window-font-color="true" loext:opacity="0%" fo:font-size="10pt" fo:font-weight="normal" officeooo:rsid="00f8ee74" fo:background-color="#ffffff" loext:char-shading-value="0" style:font-size-asian="10pt" style:font-size-complex="10pt"/>
    </style:style>
    <style:style style:name="T637" style:family="text">
      <style:text-properties style:use-window-font-color="true" loext:opacity="0%" fo:font-size="10pt" fo:font-weight="normal" officeooo:rsid="00f8688c" fo:background-color="#ffffff" loext:char-shading-value="0" style:font-size-asian="10pt" style:font-size-complex="10pt"/>
    </style:style>
    <style:style style:name="T638" style:family="text">
      <style:text-properties officeooo:rsid="05f8af45"/>
    </style:style>
    <style:style style:name="T639" style:family="text">
      <style:text-properties officeooo:rsid="00fa68fd"/>
    </style:style>
    <style:style style:name="T640" style:family="text">
      <style:text-properties style:use-window-font-color="true" loext:opacity="0%" fo:font-size="12pt" fo:font-style="normal" fo:font-weight="normal" officeooo:rsid="00fa4156" style:font-size-asian="12pt" style:font-style-asian="normal" style:font-weight-asian="normal" style:font-size-complex="12pt" style:font-style-complex="normal" style:font-weight-complex="normal"/>
    </style:style>
    <style:style style:name="T641" style:family="text">
      <style:text-properties style:use-window-font-color="true" loext:opacity="0%" style:font-name="Courier" fo:font-size="12pt" fo:font-style="normal" fo:font-weight="normal" officeooo:rsid="00fa4156" style:font-size-asian="12pt" style:font-style-asian="normal" style:font-weight-asian="normal" style:font-size-complex="12pt" style:font-style-complex="normal" style:font-weight-complex="normal"/>
    </style:style>
    <style:style style:name="T642" style:family="text">
      <style:text-properties fo:font-size="13pt" fo:font-weight="bold" officeooo:rsid="05b7ad61" style:font-size-asian="13pt" style:font-weight-asian="bold" style:font-size-complex="13pt" style:font-weight-complex="bold"/>
    </style:style>
    <style:style style:name="T643" style:family="text">
      <style:text-properties style:font-name="Courier" fo:font-size="13pt" fo:font-weight="bold" officeooo:rsid="05b7ad61" style:font-size-asian="13pt" style:font-weight-asian="bold" style:font-size-complex="13pt" style:font-weight-complex="bold"/>
    </style:style>
    <style:style style:name="T644" style:family="text">
      <style:text-properties style:use-window-font-color="true" loext:opacity="0%" fo:font-size="12pt" fo:font-style="normal" fo:font-weight="normal" officeooo:rsid="01001765" style:font-size-asian="12pt" style:font-style-asian="normal" style:font-weight-asian="normal" style:font-size-complex="12pt" style:font-style-complex="normal" style:font-weight-complex="normal"/>
    </style:style>
    <style:style style:name="T645" style:family="text">
      <style:text-properties style:use-window-font-color="true" loext:opacity="0%" style:font-name="Courier" fo:font-size="12pt" fo:font-style="normal" fo:font-weight="normal" officeooo:rsid="00ec89f5" style:font-size-asian="12pt" style:font-style-asian="normal" style:font-weight-asian="normal" style:font-size-complex="12pt" style:font-style-complex="normal" style:font-weight-complex="normal"/>
    </style:style>
    <style:style style:name="T646" style:family="text">
      <style:text-properties officeooo:rsid="0104f322"/>
    </style:style>
    <style:style style:name="T647" style:family="text">
      <style:text-properties style:font-name="Courier" officeooo:rsid="0104f322"/>
    </style:style>
    <style:style style:name="T648" style:family="text">
      <style:text-properties style:use-window-font-color="true" loext:opacity="0%" fo:font-size="12pt" fo:font-style="normal" fo:font-weight="normal" officeooo:rsid="064c7e2d" style:font-size-asian="12pt" style:font-style-asian="normal" style:font-weight-asian="normal" style:font-size-complex="12pt" style:font-style-complex="normal" style:font-weight-complex="normal"/>
    </style:style>
    <style:style style:name="T649" style:family="text">
      <style:text-properties style:use-window-font-color="true" loext:opacity="0%" fo:font-size="12pt" fo:font-style="normal" fo:font-weight="normal" officeooo:rsid="0102da09" style:font-size-asian="12pt" style:font-style-asian="normal" style:font-weight-asian="normal" style:font-size-complex="12pt" style:font-style-complex="normal" style:font-weight-complex="normal"/>
    </style:style>
    <style:style style:name="T650" style:family="text">
      <style:text-properties style:use-window-font-color="true" loext:opacity="0%" fo:font-size="12pt" fo:font-style="normal" fo:font-weight="normal" officeooo:rsid="05f8af45" style:font-size-asian="12pt" style:font-style-asian="normal" style:font-weight-asian="normal" style:font-size-complex="12pt" style:font-style-complex="normal" style:font-weight-complex="normal"/>
    </style:style>
    <style:style style:name="T651" style:family="text">
      <style:text-properties style:use-window-font-color="true" loext:opacity="0%" fo:font-size="10pt" officeooo:rsid="01057a38" style:font-size-asian="10pt" style:font-size-complex="10pt"/>
    </style:style>
    <style:style style:name="T652" style:family="text">
      <style:text-properties style:use-window-font-color="true" loext:opacity="0%" fo:font-size="10pt" fo:font-weight="normal" officeooo:rsid="01057a38" fo:background-color="#ffffff" loext:char-shading-value="0" style:font-size-asian="10pt" style:font-size-complex="10pt"/>
    </style:style>
    <style:style style:name="T653" style:family="text">
      <style:text-properties style:use-window-font-color="true" loext:opacity="0%" style:font-name="Courier" fo:font-size="10pt" fo:font-weight="normal" officeooo:rsid="010b147e" fo:background-color="#ffffff" loext:char-shading-value="0" style:font-size-asian="10pt" style:font-size-complex="10pt"/>
    </style:style>
    <style:style style:name="T654" style:family="text">
      <style:text-properties style:use-window-font-color="true" loext:opacity="0%" style:font-name="Courier" fo:font-size="10pt" fo:font-weight="normal" officeooo:rsid="01057a38" fo:background-color="#ffffff" loext:char-shading-value="0" style:font-size-asian="10pt" style:font-size-complex="10pt"/>
    </style:style>
    <style:style style:name="T655" style:family="text">
      <style:text-properties style:use-window-font-color="true" loext:opacity="0%" fo:font-size="10pt" officeooo:rsid="010b147e" style:font-size-asian="10pt" style:font-size-complex="10pt"/>
    </style:style>
    <style:style style:name="T656" style:family="text">
      <style:text-properties style:use-window-font-color="true" loext:opacity="0%" fo:font-size="10pt" fo:font-weight="normal" officeooo:rsid="010b147e" fo:background-color="#ffffff" loext:char-shading-value="0" style:font-size-asian="10pt" style:font-size-complex="10pt"/>
    </style:style>
    <style:style style:name="T657" style:family="text">
      <style:text-properties officeooo:rsid="0106b391"/>
    </style:style>
    <style:style style:name="T658" style:family="text">
      <style:text-properties style:use-window-font-color="true" loext:opacity="0%" fo:font-size="12pt" fo:font-style="italic" fo:font-weight="normal" officeooo:rsid="0109504b" style:font-size-asian="12pt" style:font-style-asian="italic" style:font-weight-asian="normal" style:font-size-complex="12pt" style:font-style-complex="italic" style:font-weight-complex="normal"/>
    </style:style>
    <style:style style:name="T659" style:family="text">
      <style:text-properties style:use-window-font-color="true" loext:opacity="0%" style:font-name="Courier" fo:font-size="12pt" fo:font-style="italic" fo:font-weight="normal" officeooo:rsid="0109504b" style:font-size-asian="12pt" style:font-style-asian="italic" style:font-weight-asian="normal" style:font-size-complex="12pt" style:font-style-complex="italic" style:font-weight-complex="normal"/>
    </style:style>
    <style:style style:name="T660" style:family="text">
      <style:text-properties officeooo:rsid="0109504b"/>
    </style:style>
    <style:style style:name="T661" style:family="text">
      <style:text-properties style:use-window-font-color="true" loext:opacity="0%" fo:font-size="12pt" fo:font-style="normal" fo:font-weight="normal" officeooo:rsid="010cb3de" style:font-size-asian="12pt" style:font-style-asian="normal" style:font-weight-asian="normal" style:font-size-complex="12pt" style:font-style-complex="normal" style:font-weight-complex="normal"/>
    </style:style>
    <style:style style:name="T662" style:family="text">
      <style:text-properties style:use-window-font-color="true" loext:opacity="0%" style:font-name="Courier" fo:font-size="12pt" fo:font-style="normal" fo:font-weight="normal" officeooo:rsid="010cb3de" style:font-size-asian="12pt" style:font-style-asian="normal" style:font-weight-asian="normal" style:font-size-complex="12pt" style:font-style-complex="normal" style:font-weight-complex="normal"/>
    </style:style>
    <style:style style:name="T663" style:family="text">
      <style:text-properties officeooo:rsid="010cb3de"/>
    </style:style>
    <style:style style:name="T664" style:family="text">
      <style:text-properties style:use-window-font-color="true" loext:opacity="0%" fo:font-size="12pt" fo:font-style="normal" fo:font-weight="normal" officeooo:rsid="05faf81f" style:font-size-asian="12pt" style:font-style-asian="normal" style:font-weight-asian="normal" style:font-size-complex="12pt" style:font-style-complex="normal" style:font-weight-complex="normal"/>
    </style:style>
    <style:style style:name="T665" style:family="text">
      <style:text-properties officeooo:rsid="010d835f"/>
    </style:style>
    <style:style style:name="T666" style:family="text">
      <style:text-properties style:use-window-font-color="true" loext:opacity="0%" style:font-name="Liberation Serif" fo:font-size="12pt" fo:font-style="normal" fo:font-weight="normal" officeooo:rsid="05faf81f" style:font-size-asian="12pt" style:font-style-asian="normal" style:font-weight-asian="normal" style:font-size-complex="12pt" style:font-style-complex="normal" style:font-weight-complex="normal"/>
    </style:style>
    <style:style style:name="T667" style:family="text">
      <style:text-properties style:use-window-font-color="true" loext:opacity="0%" style:font-name="Courier" fo:font-size="12pt" fo:font-style="normal" fo:font-weight="normal" officeooo:rsid="05faf81f" style:font-size-asian="12pt" style:font-style-asian="normal" style:font-weight-asian="normal" style:font-size-complex="12pt" style:font-style-complex="normal" style:font-weight-complex="normal"/>
    </style:style>
    <style:style style:name="T668" style:family="text">
      <style:text-properties style:use-window-font-color="true" loext:opacity="0%" fo:font-size="12pt" fo:font-style="italic" fo:font-weight="normal" officeooo:rsid="05faf81f" style:font-size-asian="12pt" style:font-style-asian="italic" style:font-weight-asian="normal" style:font-size-complex="12pt" style:font-style-complex="italic" style:font-weight-complex="normal"/>
    </style:style>
    <style:style style:name="T669" style:family="text">
      <style:text-properties style:use-window-font-color="true" loext:opacity="0%" fo:font-size="12pt" fo:font-style="normal" fo:font-weight="normal" officeooo:rsid="064dcd8a" style:font-size-asian="12pt" style:font-style-asian="normal" style:font-weight-asian="normal" style:font-size-complex="12pt" style:font-style-complex="normal" style:font-weight-complex="normal"/>
    </style:style>
    <style:style style:name="T670" style:family="text">
      <style:text-properties style:use-window-font-color="true" loext:opacity="0%" style:font-name="Courier" fo:font-size="12pt" fo:font-style="normal" fo:font-weight="normal" officeooo:rsid="010d835f" style:font-size-asian="12pt" style:font-style-asian="normal" style:font-weight-asian="normal" style:font-size-complex="12pt" style:font-style-complex="normal" style:font-weight-complex="normal"/>
    </style:style>
    <style:style style:name="T671" style:family="text">
      <style:text-properties style:use-window-font-color="true" loext:opacity="0%" style:font-name="Courier" fo:font-size="12pt" fo:font-style="normal" fo:font-weight="normal" officeooo:rsid="011031bd" style:font-size-asian="12pt" style:font-style-asian="normal" style:font-weight-asian="normal" style:font-size-complex="12pt" style:font-style-complex="normal" style:font-weight-complex="normal"/>
    </style:style>
    <style:style style:name="T672" style:family="text">
      <style:text-properties officeooo:rsid="011031bd"/>
    </style:style>
    <style:style style:name="T673" style:family="text">
      <style:text-properties style:font-name="Courier" fo:font-size="10pt" officeooo:rsid="011031bd" style:font-size-asian="10pt" style:font-size-complex="10pt"/>
    </style:style>
    <style:style style:name="T674" style:family="text">
      <style:text-properties fo:font-size="10pt" officeooo:rsid="011031bd" style:font-size-asian="10pt" style:font-size-complex="10pt"/>
    </style:style>
    <style:style style:name="T675" style:family="text">
      <style:text-properties style:font-name="Courier" officeooo:rsid="011031bd"/>
    </style:style>
    <style:style style:name="T676" style:family="text">
      <style:text-properties style:use-window-font-color="true" loext:opacity="0%" style:font-name="Courier" fo:font-size="12pt" fo:font-style="normal" fo:font-weight="normal" officeooo:rsid="01113381" style:font-size-asian="12pt" style:font-style-asian="normal" style:font-weight-asian="normal" style:font-size-complex="12pt" style:font-style-complex="normal" style:font-weight-complex="normal"/>
    </style:style>
    <style:style style:name="T677" style:family="text">
      <style:text-properties officeooo:rsid="01113381"/>
    </style:style>
    <style:style style:name="T678" style:family="text">
      <style:text-properties officeooo:rsid="057fae8d"/>
    </style:style>
    <style:style style:name="T679" style:family="text">
      <style:text-properties style:use-window-font-color="true" loext:opacity="0%" fo:font-size="10pt" officeooo:rsid="0113dd65" style:font-size-asian="10pt" style:font-size-complex="10pt"/>
    </style:style>
    <style:style style:name="T680" style:family="text">
      <style:text-properties fo:color="#098658" loext:opacity="100%" officeooo:rsid="01144937"/>
    </style:style>
    <style:style style:name="T681" style:family="text">
      <style:text-properties style:use-window-font-color="true" loext:opacity="0%" fo:font-size="10pt" officeooo:rsid="01144937" style:font-size-asian="10pt" style:font-size-complex="10pt"/>
    </style:style>
    <style:style style:name="T682" style:family="text">
      <style:text-properties fo:color="#a31515" loext:opacity="100%" officeooo:rsid="057fae8d"/>
    </style:style>
    <style:style style:name="T683" style:family="text">
      <style:text-properties style:use-window-font-color="true" loext:opacity="0%" style:font-name="Courier" fo:font-size="10pt" fo:font-weight="normal" officeooo:rsid="0113dd65" fo:background-color="#ffffff" loext:char-shading-value="0" style:font-size-asian="10pt" style:font-size-complex="10pt"/>
    </style:style>
    <style:style style:name="T684" style:family="text">
      <style:text-properties style:use-window-font-color="true" loext:opacity="0%" fo:font-size="10pt" officeooo:rsid="05fc4595" style:font-size-asian="10pt" style:font-size-complex="10pt"/>
    </style:style>
    <style:style style:name="T685" style:family="text">
      <style:text-properties style:use-window-font-color="true" loext:opacity="0%" fo:font-size="10pt" fo:font-weight="normal" officeooo:rsid="01144937" fo:background-color="#ffffff" loext:char-shading-value="0" style:font-size-asian="10pt" style:font-size-complex="10pt"/>
    </style:style>
    <style:style style:name="T686" style:family="text">
      <style:text-properties style:use-window-font-color="true" loext:opacity="0%" fo:font-size="10pt" fo:font-weight="normal" officeooo:rsid="0113dd65" fo:background-color="#ffffff" loext:char-shading-value="0" style:font-size-asian="10pt" style:font-size-complex="10pt"/>
    </style:style>
    <style:style style:name="T687" style:family="text">
      <style:text-properties officeooo:rsid="011854b9"/>
    </style:style>
    <style:style style:name="T688" style:family="text">
      <style:text-properties officeooo:rsid="0118f63b"/>
    </style:style>
    <style:style style:name="T689" style:family="text">
      <style:text-properties officeooo:rsid="022df83a"/>
    </style:style>
    <style:style style:name="T690" style:family="text">
      <style:text-properties style:use-window-font-color="true" loext:opacity="0%" fo:font-size="12pt" fo:font-style="normal" fo:font-weight="normal" officeooo:rsid="011e8299" style:font-size-asian="12pt" style:font-style-asian="normal" style:font-weight-asian="normal" style:font-size-complex="12pt" style:font-style-complex="normal" style:font-weight-complex="normal"/>
    </style:style>
    <style:style style:name="T691" style:family="text">
      <style:text-properties style:use-window-font-color="true" loext:opacity="0%" style:font-name="Courier" fo:font-size="12pt" fo:font-style="normal" fo:font-weight="normal" officeooo:rsid="011e8299" style:font-size-asian="12pt" style:font-style-asian="normal" style:font-weight-asian="normal" style:font-size-complex="12pt" style:font-style-complex="normal" style:font-weight-complex="normal"/>
    </style:style>
    <style:style style:name="T692" style:family="text">
      <style:text-properties style:use-window-font-color="true" loext:opacity="0%" fo:font-size="13pt" fo:font-style="normal" fo:font-weight="bold" officeooo:rsid="05bba027" style:font-size-asian="13pt" style:font-style-asian="normal" style:font-weight-asian="bold" style:font-size-complex="13pt" style:font-style-complex="normal" style:font-weight-complex="bold"/>
    </style:style>
    <style:style style:name="T693" style:family="text">
      <style:text-properties style:use-window-font-color="true" loext:opacity="0%" style:font-name="Courier" fo:font-size="13pt" fo:font-style="normal" fo:font-weight="bold" officeooo:rsid="05bba027" style:font-size-asian="13pt" style:font-style-asian="normal" style:font-weight-asian="bold" style:font-size-complex="13pt" style:font-style-complex="normal" style:font-weight-complex="bold"/>
    </style:style>
    <style:style style:name="T694" style:family="text">
      <style:text-properties style:use-window-font-color="true" loext:opacity="0%" fo:font-size="12pt" fo:font-style="normal" fo:font-weight="normal" officeooo:rsid="011e5481" style:font-size-asian="12pt" style:font-style-asian="normal" style:font-weight-asian="normal" style:font-size-complex="12pt" style:font-style-complex="normal" style:font-weight-complex="normal"/>
    </style:style>
    <style:style style:name="T695" style:family="text">
      <style:text-properties style:use-window-font-color="true" loext:opacity="0%" fo:font-size="12pt" fo:font-style="normal" fo:font-weight="normal" officeooo:rsid="05fd787b" style:font-size-asian="12pt" style:font-style-asian="normal" style:font-weight-asian="normal" style:font-size-complex="12pt" style:font-style-complex="normal" style:font-weight-complex="normal"/>
    </style:style>
    <style:style style:name="T696" style:family="text">
      <style:text-properties officeooo:rsid="011e8299"/>
    </style:style>
    <style:style style:name="T697" style:family="text">
      <style:text-properties style:font-name="Courier" officeooo:rsid="011e8299"/>
    </style:style>
    <style:style style:name="T698" style:family="text">
      <style:text-properties fo:font-size="10pt" officeooo:rsid="011e8299" style:font-size-asian="10pt" style:font-size-complex="10pt"/>
    </style:style>
    <style:style style:name="T699" style:family="text">
      <style:text-properties fo:color="#000000" loext:opacity="100%" style:font-name="Courier" fo:font-size="11pt" fo:font-style="italic" style:text-underline-style="none" fo:font-weight="normal" fo:background-color="#ffffff" loext:char-shading-value="0" style:font-size-asian="11pt" style:font-style-asian="italic" style:font-size-complex="11pt" style:font-style-complex="italic"/>
    </style:style>
    <style:style style:name="T700" style:family="text">
      <style:text-properties officeooo:rsid="0122c420"/>
    </style:style>
    <style:style style:name="T701" style:family="text">
      <style:text-properties officeooo:rsid="064f6759"/>
    </style:style>
    <style:style style:name="T702" style:family="text">
      <style:text-properties style:use-window-font-color="true" loext:opacity="0%" fo:font-size="12pt" fo:font-style="normal" fo:font-weight="normal" officeooo:rsid="064f6759" style:font-size-asian="12pt" style:font-style-asian="normal" style:font-weight-asian="normal" style:font-size-complex="12pt" style:font-style-complex="normal" style:font-weight-complex="normal"/>
    </style:style>
    <style:style style:name="T703" style:family="text">
      <style:text-properties style:use-window-font-color="true" loext:opacity="0%" fo:font-size="12pt" fo:font-style="normal" fo:font-weight="normal" officeooo:rsid="011f7990" style:font-size-asian="12pt" style:font-style-asian="normal" style:font-weight-asian="normal" style:font-size-complex="12pt" style:font-style-complex="normal" style:font-weight-complex="normal"/>
    </style:style>
    <style:style style:name="T704" style:family="text">
      <style:text-properties fo:color="#008000" loext:opacity="100%" officeooo:rsid="011fae54"/>
    </style:style>
    <style:style style:name="T705" style:family="text">
      <style:text-properties fo:font-style="normal" officeooo:rsid="0122c420" style:font-size-asian="12pt" style:font-style-asian="normal" style:font-weight-asian="normal" style:font-size-complex="12pt" style:font-style-complex="normal" style:font-weight-complex="normal"/>
    </style:style>
    <style:style style:name="T706" style:family="text">
      <style:text-properties fo:color="#800080" loext:opacity="100%" style:font-name="Courier" fo:font-size="11pt" fo:background-color="#ffffff" loext:char-shading-value="0" style:font-size-asian="11pt" style:font-size-complex="11pt"/>
    </style:style>
    <style:style style:name="T707" style:family="text">
      <style:text-properties fo:color="#000000" loext:opacity="100%" style:font-name="Courier" fo:font-size="11pt" fo:background-color="#ffffff" loext:char-shading-value="0" style:font-size-asian="11pt" style:font-size-complex="11pt"/>
    </style:style>
    <style:style style:name="T708" style:family="text">
      <style:text-properties fo:color="#0000ff" loext:opacity="100%" style:font-name="Courier" fo:font-size="11pt" fo:background-color="#ffffff" loext:char-shading-value="0" style:font-size-asian="11pt" style:font-size-complex="11pt"/>
    </style:style>
    <style:style style:name="T709" style:family="text">
      <style:text-properties style:use-window-font-color="true" loext:opacity="0%" fo:font-size="13pt" fo:font-style="normal" fo:font-weight="bold" officeooo:rsid="05bc4405" style:font-size-asian="13pt" style:font-style-asian="normal" style:font-weight-asian="bold" style:font-size-complex="13pt" style:font-style-complex="normal" style:font-weight-complex="bold"/>
    </style:style>
    <style:style style:name="T710" style:family="text">
      <style:text-properties style:use-window-font-color="true" loext:opacity="0%" fo:font-size="12pt" fo:font-style="normal" fo:font-weight="normal" officeooo:rsid="01253863" style:font-size-asian="12pt" style:font-style-asian="normal" style:font-weight-asian="normal" style:font-size-complex="12pt" style:font-style-complex="normal" style:font-weight-complex="normal"/>
    </style:style>
    <style:style style:name="T711" style:family="text">
      <style:text-properties officeooo:rsid="01265958"/>
    </style:style>
    <style:style style:name="T712" style:family="text">
      <style:text-properties style:font-name="Courier" fo:font-size="10pt" officeooo:rsid="011e8299" style:font-size-asian="10pt" style:font-size-complex="10pt"/>
    </style:style>
    <style:style style:name="T713" style:family="text">
      <style:text-properties fo:font-size="10pt" officeooo:rsid="01265958" style:font-size-asian="10pt" style:font-size-complex="10pt"/>
    </style:style>
    <style:style style:name="T714" style:family="text">
      <style:text-properties officeooo:rsid="01277941"/>
    </style:style>
    <style:style style:name="T715" style:family="text">
      <style:text-properties style:font-name="Courier" officeooo:rsid="01277941"/>
    </style:style>
    <style:style style:name="T716" style:family="text">
      <style:text-properties style:font-name="Courier" fo:font-size="10pt" officeooo:rsid="01277941" style:font-size-asian="10pt" style:font-size-complex="10pt"/>
    </style:style>
    <style:style style:name="T717" style:family="text">
      <style:text-properties officeooo:rsid="05bc4405"/>
    </style:style>
    <style:style style:name="T718" style:family="text">
      <style:text-properties fo:color="#0000ff" loext:opacity="100%" style:font-name="Courier" fo:font-size="11pt" fo:font-weight="normal" officeooo:rsid="01277941" fo:background-color="#ffffff" loext:char-shading-value="0" style:font-size-asian="11pt" style:font-size-complex="11pt"/>
    </style:style>
    <style:style style:name="T719" style:family="text">
      <style:text-properties officeooo:rsid="012f4038"/>
    </style:style>
    <style:style style:name="T720" style:family="text">
      <style:text-properties style:use-window-font-color="true" loext:opacity="0%" fo:font-size="12pt" fo:font-style="normal" fo:font-weight="normal" officeooo:rsid="0128b7ea" style:font-size-asian="12pt" style:font-style-asian="normal" style:font-weight-asian="normal" style:font-size-complex="12pt" style:font-style-complex="normal" style:font-weight-complex="normal"/>
    </style:style>
    <style:style style:name="T721" style:family="text">
      <style:text-properties officeooo:rsid="0128b7ea"/>
    </style:style>
    <style:style style:name="T722" style:family="text">
      <style:text-properties style:use-window-font-color="true" loext:opacity="0%" fo:font-size="12pt" fo:font-style="normal" fo:font-weight="normal" officeooo:rsid="064fad1d" style:font-size-asian="12pt" style:font-style-asian="normal" style:font-weight-asian="normal" style:font-size-complex="12pt" style:font-style-complex="normal" style:font-weight-complex="normal"/>
    </style:style>
    <style:style style:name="T723" style:family="text">
      <style:text-properties fo:color="#0000ff" loext:opacity="100%" fo:font-size="11pt" fo:font-weight="normal" fo:background-color="#ffffff" loext:char-shading-value="0" style:font-size-asian="11pt" style:font-size-complex="11pt"/>
    </style:style>
    <style:style style:name="T724" style:family="text">
      <style:text-properties fo:color="#000000" loext:opacity="100%" fo:font-size="11pt" fo:font-weight="normal" fo:background-color="#ffffff" loext:char-shading-value="0" style:font-size-asian="11pt" style:font-size-complex="11pt"/>
    </style:style>
    <style:style style:name="T725" style:family="text">
      <style:text-properties fo:color="#800080" loext:opacity="100%" fo:font-size="11pt" fo:font-weight="normal" fo:background-color="#ffffff" loext:char-shading-value="0" style:font-size-asian="11pt" style:font-size-complex="11pt"/>
    </style:style>
    <style:style style:name="T726" style:family="text">
      <style:text-properties fo:color="#000000" loext:opacity="100%" fo:font-size="11pt" fo:font-style="italic" fo:font-weight="normal" fo:background-color="#ffffff" loext:char-shading-value="0" style:font-size-asian="11pt" style:font-style-asian="italic" style:font-size-complex="11pt" style:font-style-complex="italic"/>
    </style:style>
    <style:style style:name="T727" style:family="text">
      <style:text-properties style:use-window-font-color="true" loext:opacity="0%" fo:font-size="10pt" officeooo:rsid="012cc852" style:font-size-asian="10pt" style:font-size-complex="10pt"/>
    </style:style>
    <style:style style:name="T728" style:family="text">
      <style:text-properties style:use-window-font-color="true" loext:opacity="0%" style:font-name="Courier" fo:font-size="10pt" fo:font-weight="normal" officeooo:rsid="012cc852" fo:background-color="#ffffff" loext:char-shading-value="0" style:font-size-asian="10pt" style:font-size-complex="10pt"/>
    </style:style>
    <style:style style:name="T729" style:family="text">
      <style:text-properties style:use-window-font-color="true" loext:opacity="0%" fo:font-size="10pt" fo:font-weight="normal" officeooo:rsid="012cc852" fo:background-color="#ffffff" loext:char-shading-value="0" style:font-size-asian="10pt" style:font-size-complex="10pt"/>
    </style:style>
    <style:style style:name="T730" style:family="text">
      <style:text-properties fo:font-weight="bold" officeooo:rsid="0130508c" style:font-weight-asian="bold" style:font-weight-complex="bold"/>
    </style:style>
    <style:style style:name="T731" style:family="text">
      <style:text-properties style:font-name="Liberation Serif" fo:font-style="italic" fo:font-weight="normal" style:font-style-asian="italic" style:font-weight-asian="normal" style:font-style-complex="italic" style:font-weight-complex="normal"/>
    </style:style>
    <style:style style:name="T732" style:family="text">
      <style:text-properties officeooo:rsid="01338523"/>
    </style:style>
    <style:style style:name="T733" style:family="text">
      <style:text-properties officeooo:rsid="05feabd2"/>
    </style:style>
    <style:style style:name="T734" style:family="text">
      <style:text-properties style:use-window-font-color="true" loext:opacity="0%" style:font-name="Courier" fo:font-size="12pt" fo:font-style="normal" fo:font-weight="normal" officeooo:rsid="0128b7ea" style:font-size-asian="12pt" style:font-style-asian="normal" style:font-weight-asian="normal" style:font-size-complex="12pt" style:font-style-complex="normal" style:font-weight-complex="normal"/>
    </style:style>
    <style:style style:name="T735" style:family="text">
      <style:text-properties officeooo:rsid="0584881b"/>
    </style:style>
    <style:style style:name="T736" style:family="text">
      <style:text-properties officeooo:rsid="05fefd4f"/>
    </style:style>
    <style:style style:name="T737" style:family="text">
      <style:text-properties style:font-name="Courier" officeooo:rsid="01356828"/>
    </style:style>
    <style:style style:name="T738" style:family="text">
      <style:text-properties officeooo:rsid="01356828"/>
    </style:style>
    <style:style style:name="T739" style:family="text">
      <style:text-properties fo:font-size="10pt" officeooo:rsid="01356828" style:font-size-asian="10pt" style:font-size-complex="10pt"/>
    </style:style>
    <style:style style:name="T740" style:family="text">
      <style:text-properties officeooo:rsid="0600a38c"/>
    </style:style>
    <style:style style:name="T741" style:family="text">
      <style:text-properties fo:color="#000000" loext:opacity="100%" fo:font-style="italic" fo:font-weight="normal" fo:background-color="#ffffff" loext:char-shading-value="0" style:font-style-asian="italic" style:font-style-complex="italic"/>
    </style:style>
    <style:style style:name="T742" style:family="text">
      <style:text-properties style:use-window-font-color="true" loext:opacity="0%" fo:font-size="12pt" fo:font-style="normal" fo:font-weight="normal" officeooo:rsid="01381643" style:font-size-asian="10.5pt" style:font-style-asian="normal" style:font-weight-asian="normal" style:font-size-complex="12pt" style:font-style-complex="normal" style:font-weight-complex="normal"/>
    </style:style>
    <style:style style:name="T743" style:family="text">
      <style:text-properties style:use-window-font-color="true" loext:opacity="0%" style:font-name="Courier" fo:font-size="12pt" fo:font-style="normal" fo:font-weight="normal" officeooo:rsid="01356828" style:font-size-asian="10.5pt" style:font-style-asian="normal" style:font-weight-asian="normal" style:font-size-complex="12pt" style:font-style-complex="normal" style:font-weight-complex="normal"/>
    </style:style>
    <style:style style:name="T744" style:family="text">
      <style:text-properties style:use-window-font-color="true" loext:opacity="0%" fo:font-size="12pt" fo:font-style="normal" fo:font-weight="normal" officeooo:rsid="01399f13" style:font-size-asian="10.5pt" style:font-style-asian="normal" style:font-weight-asian="normal" style:font-size-complex="12pt" style:font-style-complex="normal" style:font-weight-complex="normal"/>
    </style:style>
    <style:style style:name="T745" style:family="text">
      <style:text-properties style:use-window-font-color="true" loext:opacity="0%" style:font-name="Courier" fo:font-size="12pt" fo:font-style="normal" fo:font-weight="normal" officeooo:rsid="01399f13" style:font-size-asian="10.5pt" style:font-style-asian="normal" style:font-weight-asian="normal" style:font-size-complex="12pt" style:font-style-complex="normal" style:font-weight-complex="normal"/>
    </style:style>
    <style:style style:name="T746" style:family="text">
      <style:text-properties style:use-window-font-color="true" loext:opacity="0%" fo:font-size="10pt" officeooo:rsid="013a7368" style:font-size-asian="10pt" style:font-size-complex="10pt"/>
    </style:style>
    <style:style style:name="T747" style:family="text">
      <style:text-properties style:use-window-font-color="true" loext:opacity="0%" fo:font-size="10pt" officeooo:rsid="013b5b36" style:font-size-asian="10pt" style:font-size-complex="10pt"/>
    </style:style>
    <style:style style:name="T748" style:family="text">
      <style:text-properties style:use-window-font-color="true" loext:opacity="0%" style:font-name="Courier" fo:font-size="10pt" fo:font-weight="normal" officeooo:rsid="013a7368" fo:background-color="#ffffff" loext:char-shading-value="0" style:font-size-asian="10pt" style:font-size-complex="10pt"/>
    </style:style>
    <style:style style:name="T749" style:family="text">
      <style:text-properties style:use-window-font-color="true" loext:opacity="0%" style:font-name="Courier" fo:font-size="10pt" fo:font-weight="normal" officeooo:rsid="013b5b36" fo:background-color="#ffffff" loext:char-shading-value="0" style:font-size-asian="10pt" style:font-size-complex="10pt"/>
    </style:style>
    <style:style style:name="T750" style:family="text">
      <style:text-properties style:use-window-font-color="true" loext:opacity="0%" fo:font-size="10pt" fo:font-weight="normal" officeooo:rsid="013a7368" fo:background-color="#ffffff" loext:char-shading-value="0" style:font-size-asian="10pt" style:font-size-complex="10pt"/>
    </style:style>
    <style:style style:name="T751" style:family="text">
      <style:text-properties style:use-window-font-color="true" loext:opacity="0%" fo:font-size="10pt" fo:font-weight="normal" officeooo:rsid="013b5b36" fo:background-color="#ffffff" loext:char-shading-value="0" style:font-size-asian="10pt" style:font-size-complex="10pt"/>
    </style:style>
    <style:style style:name="T752" style:family="text">
      <style:text-properties officeooo:rsid="0141e877"/>
    </style:style>
    <style:style style:name="T753" style:family="text">
      <style:text-properties officeooo:rsid="0143c2c3"/>
    </style:style>
    <style:style style:name="T754" style:family="text">
      <style:text-properties officeooo:rsid="01452b4c"/>
    </style:style>
    <style:style style:name="T755" style:family="text">
      <style:text-properties officeooo:rsid="0145bd4c"/>
    </style:style>
    <style:style style:name="T756" style:family="text">
      <style:text-properties style:font-name="Courier" officeooo:rsid="0145bd4c"/>
    </style:style>
    <style:style style:name="T757" style:family="text">
      <style:text-properties style:font-name="Liberation Serif" officeooo:rsid="0145bd4c"/>
    </style:style>
    <style:style style:name="T758" style:family="text">
      <style:text-properties officeooo:rsid="0602c287"/>
    </style:style>
    <style:style style:name="T759" style:family="text">
      <style:text-properties fo:font-size="13pt" fo:font-weight="bold" officeooo:rsid="0585ed2e" style:font-size-asian="13pt" style:font-weight-asian="bold" style:font-size-complex="13pt" style:font-weight-complex="bold"/>
    </style:style>
    <style:style style:name="T760" style:family="text">
      <style:text-properties fo:font-size="13pt" fo:font-weight="bold" officeooo:rsid="05bddc78" style:font-size-asian="13pt" style:font-weight-asian="bold" style:font-size-complex="13pt" style:font-weight-complex="bold"/>
    </style:style>
    <style:style style:name="T761" style:family="text">
      <style:text-properties fo:font-size="13pt" fo:font-weight="bold" officeooo:rsid="014ad20f" style:font-size-asian="13pt" style:font-weight-asian="bold" style:font-size-complex="13pt" style:font-weight-complex="bold"/>
    </style:style>
    <style:style style:name="T762" style:family="text">
      <style:text-properties style:font-name="Courier" fo:font-size="13pt" fo:font-weight="bold" officeooo:rsid="05bddc78" style:font-size-asian="13pt" style:font-weight-asian="bold" style:font-size-complex="13pt" style:font-weight-complex="bold"/>
    </style:style>
    <style:style style:name="T763" style:family="text">
      <style:text-properties officeooo:rsid="014b901e"/>
    </style:style>
    <style:style style:name="T764" style:family="text">
      <style:text-properties style:font-name="Courier" officeooo:rsid="014b901e"/>
    </style:style>
    <style:style style:name="T765" style:family="text">
      <style:text-properties officeooo:rsid="0602df15"/>
    </style:style>
    <style:style style:name="T766" style:family="text">
      <style:text-properties fo:color="#00a933" loext:opacity="100%" style:font-name="Courier" officeooo:rsid="014b901e"/>
    </style:style>
    <style:style style:name="T767" style:family="text">
      <style:text-properties fo:font-style="italic" officeooo:rsid="014b901e" style:font-style-asian="italic" style:font-style-complex="italic"/>
    </style:style>
    <style:style style:name="T768" style:family="text">
      <style:text-properties officeooo:rsid="014c9e78"/>
    </style:style>
    <style:style style:name="T769" style:family="text">
      <style:text-properties officeooo:rsid="014ca385"/>
    </style:style>
    <style:style style:name="T770" style:family="text">
      <style:text-properties fo:color="#0000ff" loext:opacity="100%" fo:font-style="italic" style:font-style-asian="italic" style:font-style-complex="italic"/>
    </style:style>
    <style:style style:name="T771" style:family="text">
      <style:text-properties fo:color="#00a933" loext:opacity="100%" style:font-name="Courier" fo:font-size="10pt" fo:font-style="italic" officeooo:rsid="014d78b2" style:font-size-asian="10pt" style:font-style-asian="italic" style:font-size-complex="10pt" style:font-style-complex="italic"/>
    </style:style>
    <style:style style:name="T772" style:family="text">
      <style:text-properties fo:color="#00a933" loext:opacity="100%" style:font-name="Courier" fo:font-size="10pt" fo:font-style="italic" officeooo:rsid="014de91d" style:font-size-asian="10pt" style:font-style-asian="italic" style:font-size-complex="10pt" style:font-style-complex="italic"/>
    </style:style>
    <style:style style:name="T773" style:family="text">
      <style:text-properties officeooo:rsid="014de91d"/>
    </style:style>
    <style:style style:name="T774" style:family="text">
      <style:text-properties officeooo:rsid="014eafbe"/>
    </style:style>
    <style:style style:name="T775" style:family="text">
      <style:text-properties style:font-name="Courier" officeooo:rsid="014eafbe"/>
    </style:style>
    <style:style style:name="T776" style:family="text">
      <style:text-properties officeooo:rsid="015301eb"/>
    </style:style>
    <style:style style:name="T777" style:family="text">
      <style:text-properties fo:color="#800080" loext:opacity="100%" style:font-name="Courier"/>
    </style:style>
    <style:style style:name="T778" style:family="text">
      <style:text-properties style:font-name="Courier" officeooo:rsid="0154816e"/>
    </style:style>
    <style:style style:name="T779" style:family="text">
      <style:text-properties officeooo:rsid="0154816e"/>
    </style:style>
    <style:style style:name="T780" style:family="text">
      <style:text-properties style:font-name="Courier" fo:font-size="10pt" officeooo:rsid="014d78b2" style:font-size-asian="10pt" style:font-size-complex="10pt"/>
    </style:style>
    <style:style style:name="T781" style:family="text">
      <style:text-properties fo:font-size="10pt" officeooo:rsid="014d78b2" style:font-size-asian="10pt" style:font-size-complex="10pt"/>
    </style:style>
    <style:style style:name="T782" style:family="text">
      <style:text-properties officeooo:rsid="0585ed2e"/>
    </style:style>
    <style:style style:name="T783" style:family="text">
      <style:text-properties officeooo:rsid="015664de"/>
    </style:style>
    <style:style style:name="T784" style:family="text">
      <style:text-properties officeooo:rsid="015839de"/>
    </style:style>
    <style:style style:name="T785" style:family="text">
      <style:text-properties style:use-window-font-color="true" loext:opacity="0%" fo:font-size="10pt" officeooo:rsid="016030c6" style:font-size-asian="10pt" style:font-size-complex="10pt"/>
    </style:style>
    <style:style style:name="T786" style:family="text">
      <style:text-properties style:use-window-font-color="true" loext:opacity="0%" style:font-name="Courier" fo:font-size="10pt" fo:font-weight="normal" officeooo:rsid="016030c6" fo:background-color="#ffffff" loext:char-shading-value="0" style:font-size-asian="10pt" style:font-size-complex="10pt"/>
    </style:style>
    <style:style style:name="T787" style:family="text">
      <style:text-properties style:use-window-font-color="true" loext:opacity="0%" fo:font-size="10pt" fo:font-weight="normal" officeooo:rsid="016030c6" fo:background-color="#ffffff" loext:char-shading-value="0" style:font-size-asian="10pt" style:font-size-complex="10pt"/>
    </style:style>
    <style:style style:name="T788" style:family="text">
      <style:text-properties fo:font-weight="normal" officeooo:rsid="01631615" style:font-weight-asian="normal" style:font-weight-complex="normal"/>
    </style:style>
    <style:style style:name="T789" style:family="text">
      <style:text-properties fo:font-weight="normal" officeooo:rsid="0602df15" style:font-weight-asian="normal" style:font-weight-complex="normal"/>
    </style:style>
    <style:style style:name="T790" style:family="text">
      <style:text-properties fo:font-weight="normal" officeooo:rsid="0163da48" style:font-weight-asian="normal" style:font-weight-complex="normal"/>
    </style:style>
    <style:style style:name="T791" style:family="text">
      <style:text-properties style:font-name="Courier" fo:font-style="normal" fo:font-weight="normal" officeooo:rsid="01631615" style:font-style-asian="normal" style:font-weight-asian="normal" style:font-style-complex="normal" style:font-weight-complex="normal"/>
    </style:style>
    <style:style style:name="T792" style:family="text">
      <style:text-properties officeooo:rsid="0163da48"/>
    </style:style>
    <style:style style:name="T793" style:family="text">
      <style:text-properties officeooo:rsid="0163381e"/>
    </style:style>
    <style:style style:name="T794" style:family="text">
      <style:text-properties officeooo:rsid="05d78254"/>
    </style:style>
    <style:style style:name="T795" style:family="text">
      <style:text-properties fo:font-size="12pt" officeooo:rsid="0158d5ae" style:font-size-asian="12pt" style:font-size-complex="12pt"/>
    </style:style>
    <style:style style:name="T796" style:family="text">
      <style:text-properties style:font-name="Liberation Serif" fo:font-size="12pt" officeooo:rsid="0158d5ae" style:font-size-asian="12pt" style:font-size-complex="12pt"/>
    </style:style>
    <style:style style:name="T797" style:family="text">
      <style:text-properties fo:font-size="12pt" officeooo:rsid="015b17a4" style:font-size-asian="12pt" style:font-size-complex="12pt"/>
    </style:style>
    <style:style style:name="T798" style:family="text">
      <style:text-properties fo:font-size="12pt" officeooo:rsid="0602df15" style:font-size-asian="12pt" style:font-size-complex="12pt"/>
    </style:style>
    <style:style style:name="T799" style:family="text">
      <style:text-properties fo:font-size="13pt" fo:font-weight="bold" officeooo:rsid="05872abe" style:font-size-asian="13pt" style:font-weight-asian="bold" style:font-size-complex="13pt" style:font-weight-complex="bold"/>
    </style:style>
    <style:style style:name="T800" style:family="text">
      <style:text-properties fo:font-size="13pt" fo:font-weight="bold" officeooo:rsid="0164e1dc" style:font-size-asian="13pt" style:font-weight-asian="bold" style:font-size-complex="13pt" style:font-weight-complex="bold"/>
    </style:style>
    <style:style style:name="T801" style:family="text">
      <style:text-properties officeooo:rsid="01538dae"/>
    </style:style>
    <style:style style:name="T802" style:family="text">
      <style:text-properties fo:font-size="10pt" officeooo:rsid="01538dae" style:font-size-asian="10pt" style:font-size-complex="10pt"/>
    </style:style>
    <style:style style:name="T803" style:family="text">
      <style:text-properties officeooo:rsid="0604571b"/>
    </style:style>
    <style:style style:name="T804" style:family="text">
      <style:text-properties style:use-window-font-color="true" loext:opacity="0%" fo:font-size="10pt" officeooo:rsid="0165cc96" style:font-size-asian="10pt" style:font-size-complex="10pt"/>
    </style:style>
    <style:style style:name="T805" style:family="text">
      <style:text-properties style:use-window-font-color="true" loext:opacity="0%" fo:font-size="10pt" fo:font-weight="normal" officeooo:rsid="0165cc96" fo:background-color="#ffffff" loext:char-shading-value="0" style:font-size-asian="10pt" style:font-size-complex="10pt"/>
    </style:style>
    <style:style style:name="T806" style:family="text">
      <style:text-properties officeooo:rsid="016728ad"/>
    </style:style>
    <style:style style:name="T807" style:family="text">
      <style:text-properties style:font-name="Courier" officeooo:rsid="0165cc96"/>
    </style:style>
    <style:style style:name="T808" style:family="text">
      <style:text-properties officeooo:rsid="0169cb5f"/>
    </style:style>
    <style:style style:name="T809" style:family="text">
      <style:text-properties style:font-name="Courier" officeooo:rsid="0169cb5f"/>
    </style:style>
    <style:style style:name="T810" style:family="text">
      <style:text-properties fo:font-size="10pt" officeooo:rsid="0169cb5f" style:font-size-asian="10pt" style:font-size-complex="10pt"/>
    </style:style>
    <style:style style:name="T811" style:family="text">
      <style:text-properties officeooo:rsid="016a47dc"/>
    </style:style>
    <style:style style:name="T812" style:family="text">
      <style:text-properties style:font-name="Courier" officeooo:rsid="016a47dc"/>
    </style:style>
    <style:style style:name="T813" style:family="text">
      <style:text-properties fo:font-style="italic" officeooo:rsid="016a47dc" style:font-style-asian="italic" style:font-style-complex="italic"/>
    </style:style>
    <style:style style:name="T814" style:family="text">
      <style:text-properties officeooo:rsid="016c0f06"/>
    </style:style>
    <style:style style:name="T815" style:family="text">
      <style:text-properties fo:font-weight="bold" officeooo:rsid="016b1e19" style:font-weight-asian="bold" style:font-weight-complex="bold"/>
    </style:style>
    <style:style style:name="T816" style:family="text">
      <style:text-properties officeooo:rsid="016b1e19"/>
    </style:style>
    <style:style style:name="T817" style:family="text">
      <style:text-properties officeooo:rsid="016e719c"/>
    </style:style>
    <style:style style:name="T818" style:family="text">
      <style:text-properties style:font-name="Courier" fo:font-size="10pt" officeooo:rsid="0169cb5f" style:font-size-asian="10pt" style:font-size-complex="10pt"/>
    </style:style>
    <style:style style:name="T819" style:family="text">
      <style:text-properties officeooo:rsid="058955be"/>
    </style:style>
    <style:style style:name="T820" style:family="text">
      <style:text-properties officeooo:rsid="01722f14"/>
    </style:style>
    <style:style style:name="T821" style:family="text">
      <style:text-properties officeooo:rsid="01756d51"/>
    </style:style>
    <style:style style:name="T822" style:family="text">
      <style:text-properties style:font-name="Courier" officeooo:rsid="01756d51"/>
    </style:style>
    <style:style style:name="T823" style:family="text">
      <style:text-properties officeooo:rsid="0175de49"/>
    </style:style>
    <style:style style:name="T824" style:family="text">
      <style:text-properties officeooo:rsid="058a0e5c"/>
    </style:style>
    <style:style style:name="T825" style:family="text">
      <style:text-properties officeooo:rsid="0187a7cc"/>
    </style:style>
    <style:style style:name="T826" style:family="text">
      <style:text-properties officeooo:rsid="01896f84"/>
    </style:style>
    <style:style style:name="T827" style:family="text">
      <style:text-properties style:font-name="Courier" fo:font-size="10pt" officeooo:rsid="01756d51" style:font-size-asian="10pt" style:font-size-complex="10pt"/>
    </style:style>
    <style:style style:name="T828" style:family="text">
      <style:text-properties fo:font-size="10pt" officeooo:rsid="01896f84" style:font-size-asian="10pt" style:font-size-complex="10pt"/>
    </style:style>
    <style:style style:name="T829" style:family="text">
      <style:text-properties fo:font-style="italic" officeooo:rsid="0187a7cc" style:font-style-asian="italic" style:font-style-complex="italic"/>
    </style:style>
    <style:style style:name="T830" style:family="text">
      <style:text-properties officeooo:rsid="058c0a60"/>
    </style:style>
    <style:style style:name="T831" style:family="text">
      <style:text-properties fo:color="#800080" loext:opacity="100%" style:font-name="Courier" officeooo:rsid="016a47dc"/>
    </style:style>
    <style:style style:name="T832" style:family="text">
      <style:text-properties fo:color="#800080" loext:opacity="100%" style:font-name="Courier" officeooo:rsid="01797bc5"/>
    </style:style>
    <style:style style:name="T833" style:family="text">
      <style:text-properties officeooo:rsid="01879486"/>
    </style:style>
    <style:style style:name="T834" style:family="text">
      <style:text-properties fo:color="#800080" loext:opacity="100%" style:font-name="Courier" officeooo:rsid="01862c10"/>
    </style:style>
    <style:style style:name="T835" style:family="text">
      <style:text-properties officeooo:rsid="01797bc5"/>
    </style:style>
    <style:style style:name="T836" style:family="text">
      <style:text-properties style:font-name="Courier" officeooo:rsid="01797bc5"/>
    </style:style>
    <style:style style:name="T837" style:family="text">
      <style:text-properties style:font-name="Courier" officeooo:rsid="01896f84"/>
    </style:style>
    <style:style style:name="T838" style:family="text">
      <style:text-properties fo:font-weight="normal" officeooo:rsid="0652db70" style:font-weight-asian="normal" style:font-weight-complex="normal"/>
    </style:style>
    <style:style style:name="T839" style:family="text">
      <style:text-properties style:font-name="Courier" fo:font-weight="normal" officeooo:rsid="0652db70" style:font-weight-asian="normal" style:font-weight-complex="normal"/>
    </style:style>
    <style:style style:name="T840" style:family="text">
      <style:text-properties style:font-name="Courier" fo:font-weight="normal" officeooo:rsid="01797bc5" style:font-weight-asian="normal" style:font-weight-complex="normal"/>
    </style:style>
    <style:style style:name="T841" style:family="text">
      <style:text-properties officeooo:rsid="0652db70"/>
    </style:style>
    <style:style style:name="T842" style:family="text">
      <style:text-properties style:use-window-font-color="true" loext:opacity="0%" fo:font-size="10pt" officeooo:rsid="018fd676" style:font-size-asian="10pt" style:font-size-complex="10pt"/>
    </style:style>
    <style:style style:name="T843" style:family="text">
      <style:text-properties style:use-window-font-color="true" loext:opacity="0%" style:font-name="Courier" fo:font-size="10pt" fo:font-weight="normal" officeooo:rsid="018fd676" fo:background-color="#ffffff" loext:char-shading-value="0" style:font-size-asian="10pt" style:font-size-complex="10pt"/>
    </style:style>
    <style:style style:name="T844" style:family="text">
      <style:text-properties officeooo:rsid="01901f6d"/>
    </style:style>
    <style:style style:name="T845" style:family="text">
      <style:text-properties style:use-window-font-color="true" loext:opacity="0%" fo:font-size="10pt" fo:font-weight="normal" officeooo:rsid="018fd676" fo:background-color="#ffffff" loext:char-shading-value="0" style:font-size-asian="10pt" style:font-size-complex="10pt"/>
    </style:style>
    <style:style style:name="T846" style:family="text">
      <style:text-properties officeooo:rsid="0192cbd7"/>
    </style:style>
    <style:style style:name="T847" style:family="text">
      <style:text-properties officeooo:rsid="0193d207"/>
    </style:style>
    <style:style style:name="T848" style:family="text">
      <style:text-properties fo:font-size="12pt" officeooo:rsid="0192643e" style:font-size-asian="12pt" style:font-size-complex="12pt"/>
    </style:style>
    <style:style style:name="T849" style:family="text">
      <style:text-properties style:font-name="Courier" fo:font-size="12pt" officeooo:rsid="0192643e" style:font-size-asian="12pt" style:font-size-complex="12pt"/>
    </style:style>
    <style:style style:name="T850" style:family="text">
      <style:text-properties fo:font-size="13pt" fo:font-weight="bold" officeooo:rsid="058c0a60" style:font-size-asian="13pt" style:font-weight-asian="bold" style:font-size-complex="13pt" style:font-weight-complex="bold"/>
    </style:style>
    <style:style style:name="T851" style:family="text">
      <style:text-properties officeooo:rsid="0198bb73"/>
    </style:style>
    <style:style style:name="T852" style:family="text">
      <style:text-properties fo:font-style="italic" officeooo:rsid="0198bb73" style:font-style-asian="italic" style:font-style-complex="italic"/>
    </style:style>
    <style:style style:name="T853" style:family="text">
      <style:text-properties style:font-name="Courier" officeooo:rsid="0198bb73"/>
    </style:style>
    <style:style style:name="T854" style:family="text">
      <style:text-properties officeooo:rsid="019c1470"/>
    </style:style>
    <style:style style:name="T855" style:family="text">
      <style:text-properties officeooo:rsid="0199091d"/>
    </style:style>
    <style:style style:name="T856" style:family="text">
      <style:text-properties officeooo:rsid="06061d1a"/>
    </style:style>
    <style:style style:name="T857" style:family="text">
      <style:text-properties officeooo:rsid="019a8c24"/>
    </style:style>
    <style:style style:name="T858" style:family="text">
      <style:text-properties fo:font-style="italic" officeooo:rsid="019a8c24" style:font-style-asian="italic" style:font-style-complex="italic"/>
    </style:style>
    <style:style style:name="T859" style:family="text">
      <style:text-properties officeooo:rsid="019aebcb"/>
    </style:style>
    <style:style style:name="T860" style:family="text">
      <style:text-properties fo:font-style="italic" officeooo:rsid="019aebcb" style:font-style-asian="italic" style:font-style-complex="italic"/>
    </style:style>
    <style:style style:name="T861" style:family="text">
      <style:text-properties officeooo:rsid="01b4f984"/>
    </style:style>
    <style:style style:name="T862" style:family="text">
      <style:text-properties style:font-name="Courier" officeooo:rsid="01b4f984"/>
    </style:style>
    <style:style style:name="T863" style:family="text">
      <style:text-properties fo:font-size="10pt" officeooo:rsid="01b4f984" style:font-size-asian="10pt" style:font-size-complex="10pt"/>
    </style:style>
    <style:style style:name="T864" style:family="text">
      <style:text-properties style:use-window-font-color="true" loext:opacity="0%" fo:font-size="10pt" officeooo:rsid="019f1f96" style:font-size-asian="10pt" style:font-size-complex="10pt"/>
    </style:style>
    <style:style style:name="T865" style:family="text">
      <style:text-properties style:use-window-font-color="true" loext:opacity="0%" fo:font-size="10pt" fo:font-weight="normal" officeooo:rsid="019f1f96" fo:background-color="#ffffff" loext:char-shading-value="0" style:font-size-asian="10pt" style:font-size-complex="10pt"/>
    </style:style>
    <style:style style:name="T866" style:family="text">
      <style:text-properties officeooo:rsid="019f8482"/>
    </style:style>
    <style:style style:name="T867" style:family="text">
      <style:text-properties officeooo:rsid="01a03263"/>
    </style:style>
    <style:style style:name="T868" style:family="text">
      <style:text-properties fo:background-color="#ff0000" loext:char-shading-value="0"/>
    </style:style>
    <style:style style:name="T869" style:family="text">
      <style:text-properties officeooo:rsid="01a22808"/>
    </style:style>
    <style:style style:name="T870" style:family="text">
      <style:text-properties style:font-name="Courier" officeooo:rsid="01a22808"/>
    </style:style>
    <style:style style:name="T871" style:family="text">
      <style:text-properties fo:color="#0000ff" loext:opacity="100%" fo:font-size="10pt" style:font-size-asian="10pt" style:font-size-complex="10pt"/>
    </style:style>
    <style:style style:name="T872" style:family="text">
      <style:text-properties fo:font-size="10pt" style:font-size-asian="10pt" style:font-size-complex="10pt"/>
    </style:style>
    <style:style style:name="T873" style:family="text">
      <style:text-properties fo:color="#800080" loext:opacity="100%" fo:font-size="10pt" style:font-size-asian="10pt" style:font-size-complex="10pt"/>
    </style:style>
    <style:style style:name="T874" style:family="text">
      <style:text-properties fo:color="#00a933" loext:opacity="100%" fo:font-size="10pt" fo:font-style="italic" style:font-size-asian="10pt" style:font-style-asian="italic" style:font-size-complex="10pt" style:font-style-complex="italic"/>
    </style:style>
    <style:style style:name="T875" style:family="text">
      <style:text-properties fo:color="#00a933" loext:opacity="100%" fo:font-size="10pt" fo:font-style="italic" officeooo:rsid="01a5f79f" style:font-size-asian="10pt" style:font-style-asian="italic" style:font-size-complex="10pt" style:font-style-complex="italic"/>
    </style:style>
    <style:style style:name="T876" style:family="text">
      <style:text-properties fo:color="#000000" loext:opacity="100%" style:font-name="Courier" fo:font-size="10pt" fo:font-weight="normal" fo:background-color="#ffffff" loext:char-shading-value="0" style:font-size-asian="10pt" style:font-size-complex="10pt"/>
    </style:style>
    <style:style style:name="T877" style:family="text">
      <style:text-properties fo:color="#800080" loext:opacity="100%" style:font-name="Courier" fo:font-size="10pt" fo:font-weight="normal" fo:background-color="#ffffff" loext:char-shading-value="0" style:font-size-asian="10pt" style:font-size-complex="10pt"/>
    </style:style>
    <style:style style:name="T878" style:family="text">
      <style:text-properties fo:color="#00a933" loext:opacity="100%" style:font-name="Courier" fo:font-size="10pt" fo:font-style="italic" fo:font-weight="normal" officeooo:rsid="01a5f79f" fo:background-color="#ffffff" loext:char-shading-value="0" style:font-size-asian="10pt" style:font-style-asian="italic" style:font-size-complex="10pt" style:font-style-complex="italic"/>
    </style:style>
    <style:style style:name="T879" style:family="text">
      <style:text-properties fo:color="#000000" loext:opacity="100%" style:font-name="Courier" fo:font-weight="normal" fo:background-color="#ffffff" loext:char-shading-value="0"/>
    </style:style>
    <style:style style:name="T880" style:family="text">
      <style:text-properties fo:color="#800080" loext:opacity="100%" style:font-name="Courier" fo:font-weight="normal" fo:background-color="#ffffff" loext:char-shading-value="0"/>
    </style:style>
    <style:style style:name="T881" style:family="text">
      <style:text-properties fo:color="#00a933" loext:opacity="100%" style:font-name="Courier" fo:font-style="italic" fo:font-weight="normal" officeooo:rsid="01a5f79f" fo:background-color="#ffffff" loext:char-shading-value="0" style:font-style-asian="italic" style:font-style-complex="italic"/>
    </style:style>
    <style:style style:name="T882" style:family="text">
      <style:text-properties style:font-name="Courier" officeooo:rsid="06061d1a"/>
    </style:style>
    <style:style style:name="T883" style:family="text">
      <style:text-properties style:use-window-font-color="true" loext:opacity="0%" fo:font-size="10pt" officeooo:rsid="01a8e048" fo:background-color="transparent" loext:char-shading-value="0" style:font-size-asian="10pt" style:font-size-complex="10pt"/>
    </style:style>
    <style:style style:name="T884" style:family="text">
      <style:text-properties style:use-window-font-color="true" loext:opacity="0%" fo:font-size="10pt" fo:font-weight="normal" officeooo:rsid="01a8e048" fo:background-color="transparent" loext:char-shading-value="0" style:font-size-asian="10pt" style:font-size-complex="10pt"/>
    </style:style>
    <style:style style:name="T885" style:family="text">
      <style:text-properties officeooo:rsid="01a99ad0"/>
    </style:style>
    <style:style style:name="T886" style:family="text">
      <style:text-properties style:font-name="Liberation Serif" officeooo:rsid="01a99ad0"/>
    </style:style>
    <style:style style:name="T887" style:family="text">
      <style:text-properties fo:font-size="13pt" fo:font-weight="bold" officeooo:rsid="058cc0d0" style:font-size-asian="13pt" style:font-weight-asian="bold" style:font-size-complex="13pt" style:font-weight-complex="bold"/>
    </style:style>
    <style:style style:name="T888" style:family="text">
      <style:text-properties fo:font-size="13pt" fo:font-weight="bold" officeooo:rsid="05f556d4" style:font-size-asian="13pt" style:font-weight-asian="bold" style:font-size-complex="13pt" style:font-weight-complex="bold"/>
    </style:style>
    <style:style style:name="T889" style:family="text">
      <style:text-properties officeooo:rsid="01ad44c8"/>
    </style:style>
    <style:style style:name="T890" style:family="text">
      <style:text-properties officeooo:rsid="0609d4ee"/>
    </style:style>
    <style:style style:name="T891" style:family="text">
      <style:text-properties style:font-name="Courier" officeooo:rsid="01aff935"/>
    </style:style>
    <style:style style:name="T892" style:family="text">
      <style:text-properties style:font-name="Courier" officeooo:rsid="01ad44c8"/>
    </style:style>
    <style:style style:name="T893" style:family="text">
      <style:text-properties officeooo:rsid="01aff935"/>
    </style:style>
    <style:style style:name="T894" style:family="text">
      <style:text-properties style:use-window-font-color="true" loext:opacity="0%" fo:font-size="10pt" officeooo:rsid="01b0178d" style:font-size-asian="10pt" style:font-size-complex="10pt"/>
    </style:style>
    <style:style style:name="T895" style:family="text">
      <style:text-properties style:use-window-font-color="true" loext:opacity="0%" fo:font-size="10pt" officeooo:rsid="01b0ab55" style:font-size-asian="10pt" style:font-size-complex="10pt"/>
    </style:style>
    <style:style style:name="T896" style:family="text">
      <style:text-properties fo:color="#800080" loext:opacity="100%" officeooo:rsid="01b0178d"/>
    </style:style>
    <style:style style:name="T897" style:family="text">
      <style:text-properties style:use-window-font-color="true" loext:opacity="0%" fo:font-size="10pt" fo:font-weight="normal" officeooo:rsid="01b0178d" fo:background-color="#ffffff" loext:char-shading-value="0" style:font-size-asian="10pt" style:font-size-complex="10pt"/>
    </style:style>
    <style:style style:name="T898" style:family="text">
      <style:text-properties style:use-window-font-color="true" loext:opacity="0%" fo:font-size="10pt" fo:font-weight="normal" officeooo:rsid="01b0ab55" fo:background-color="#ffffff" loext:char-shading-value="0" style:font-size-asian="10pt" style:font-size-complex="10pt"/>
    </style:style>
    <style:style style:name="T899" style:family="text">
      <style:text-properties officeooo:rsid="01b1e4e8"/>
    </style:style>
    <style:style style:name="T900" style:family="text">
      <style:text-properties officeooo:rsid="01b1fc8a"/>
    </style:style>
    <style:style style:name="T901" style:family="text">
      <style:text-properties officeooo:rsid="01b2b81f"/>
    </style:style>
    <style:style style:name="T902" style:family="text">
      <style:text-properties style:font-name="Courier" officeooo:rsid="0609d4ee"/>
    </style:style>
    <style:style style:name="T903" style:family="text">
      <style:text-properties fo:font-size="12pt" fo:font-weight="normal" officeooo:rsid="01c60c99" style:font-size-asian="10.5pt" style:font-weight-asian="normal" style:font-size-complex="12pt" style:font-weight-complex="normal"/>
    </style:style>
    <style:style style:name="T904" style:family="text">
      <style:text-properties officeooo:rsid="01d0be57"/>
    </style:style>
    <style:style style:name="T905" style:family="text">
      <style:text-properties officeooo:rsid="060b7a35"/>
    </style:style>
    <style:style style:name="T906" style:family="text">
      <style:text-properties fo:font-style="normal" officeooo:rsid="01d0be57" style:font-style-asian="normal" style:font-style-complex="normal"/>
    </style:style>
    <style:style style:name="T907" style:family="text">
      <style:text-properties style:font-name="Courier" officeooo:rsid="01cff43b"/>
    </style:style>
    <style:style style:name="T908" style:family="text">
      <style:text-properties officeooo:rsid="01d2a9e2"/>
    </style:style>
    <style:style style:name="T909" style:family="text">
      <style:text-properties officeooo:rsid="01d3dea5"/>
    </style:style>
    <style:style style:name="T910" style:family="text">
      <style:text-properties officeooo:rsid="01f483e4"/>
    </style:style>
    <style:style style:name="T911" style:family="text">
      <style:text-properties style:use-window-font-color="true" loext:opacity="0%" fo:font-size="10pt" officeooo:rsid="01f84992" style:font-size-asian="10pt" style:font-size-complex="10pt"/>
    </style:style>
    <style:style style:name="T912" style:family="text">
      <style:text-properties style:use-window-font-color="true" loext:opacity="0%" fo:font-size="10pt" fo:font-weight="normal" officeooo:rsid="01f84992" fo:background-color="#ffffff" loext:char-shading-value="0" style:font-size-asian="10pt" style:font-size-complex="10pt"/>
    </style:style>
    <style:style style:name="T913" style:family="text">
      <style:text-properties style:use-window-font-color="true" loext:opacity="0%" style:font-name="Courier" fo:font-size="10pt" fo:font-weight="normal" officeooo:rsid="01f84992" fo:background-color="#ffffff" loext:char-shading-value="0" style:font-size-asian="10pt" style:font-size-complex="10pt"/>
    </style:style>
    <style:style style:name="T914" style:family="text">
      <style:text-properties fo:font-weight="normal" officeooo:rsid="060b7a35" style:font-weight-asian="normal" style:font-weight-complex="normal"/>
    </style:style>
    <style:style style:name="T915" style:family="text">
      <style:text-properties fo:font-weight="normal" officeooo:rsid="01fcf65d" style:font-weight-asian="normal" style:font-weight-complex="normal"/>
    </style:style>
    <style:style style:name="T916" style:family="text">
      <style:text-properties style:font-name="Courier" fo:font-weight="normal" officeooo:rsid="060b7a35" style:font-weight-asian="normal" style:font-weight-complex="normal"/>
    </style:style>
    <style:style style:name="T917" style:family="text">
      <style:text-properties officeooo:rsid="01fcf65d"/>
    </style:style>
    <style:style style:name="T918" style:family="text">
      <style:text-properties officeooo:rsid="0200a8d0"/>
    </style:style>
    <style:style style:name="T919" style:family="text">
      <style:text-properties officeooo:rsid="0200aa45"/>
    </style:style>
    <style:style style:name="T920" style:family="text">
      <style:text-properties officeooo:rsid="01fea5e0"/>
    </style:style>
    <style:style style:name="T921" style:family="text">
      <style:text-properties officeooo:rsid="02009d38"/>
    </style:style>
    <style:style style:name="T922" style:family="text">
      <style:text-properties fo:font-weight="normal" officeooo:rsid="02014fe9" style:font-weight-asian="normal" style:font-weight-complex="normal"/>
    </style:style>
    <style:style style:name="T923" style:family="text">
      <style:text-properties style:font-name="Courier" fo:font-weight="normal" officeooo:rsid="02014fe9" style:font-weight-asian="normal" style:font-weight-complex="normal"/>
    </style:style>
    <style:style style:name="T924" style:family="text">
      <style:text-properties fo:font-weight="normal" officeooo:rsid="0202e39d" style:font-weight-asian="normal" style:font-weight-complex="normal"/>
    </style:style>
    <style:style style:name="T925" style:family="text">
      <style:text-properties officeooo:rsid="0202e39d"/>
    </style:style>
    <style:style style:name="T926" style:family="text">
      <style:text-properties officeooo:rsid="0203eb31"/>
    </style:style>
    <style:style style:name="T927" style:family="text">
      <style:text-properties fo:font-weight="normal" officeooo:rsid="020530b1" style:font-weight-asian="normal" style:font-weight-complex="normal"/>
    </style:style>
    <style:style style:name="T928" style:family="text">
      <style:text-properties fo:font-weight="normal" officeooo:rsid="0209182a" style:font-weight-asian="normal" style:font-weight-complex="normal"/>
    </style:style>
    <style:style style:name="T929" style:family="text">
      <style:text-properties officeooo:rsid="0209182a"/>
    </style:style>
    <style:style style:name="T930" style:family="text">
      <style:text-properties fo:font-weight="bold" officeooo:rsid="02071abb" style:font-weight-asian="bold" style:font-weight-complex="bold"/>
    </style:style>
    <style:style style:name="T931" style:family="text">
      <style:text-properties officeooo:rsid="02077149"/>
    </style:style>
    <style:style style:name="T932" style:family="text">
      <style:text-properties officeooo:rsid="02092ad3"/>
    </style:style>
    <style:style style:name="T933" style:family="text">
      <style:text-properties fo:font-weight="bold" officeooo:rsid="020acc06" style:font-weight-asian="bold" style:font-weight-complex="bold"/>
    </style:style>
    <style:style style:name="T934" style:family="text">
      <style:text-properties officeooo:rsid="020acc06"/>
    </style:style>
    <style:style style:name="T935" style:family="text">
      <style:text-properties fo:font-size="13pt" fo:font-weight="bold" officeooo:rsid="05c0b03c" style:font-size-asian="13pt" style:font-weight-asian="bold" style:font-size-complex="13pt" style:font-weight-complex="bold"/>
    </style:style>
    <style:style style:name="T936" style:family="text">
      <style:text-properties style:font-name="Courier" fo:font-size="13pt" fo:font-weight="bold" officeooo:rsid="05c0b03c" style:font-size-asian="13pt" style:font-weight-asian="bold" style:font-size-complex="13pt" style:font-weight-complex="bold"/>
    </style:style>
    <style:style style:name="T937" style:family="text">
      <style:text-properties officeooo:rsid="060e1e12"/>
    </style:style>
    <style:style style:name="T938" style:family="text">
      <style:text-properties style:use-window-font-color="true" loext:opacity="0%" fo:font-size="10pt" officeooo:rsid="01d67391" style:font-size-asian="10pt" style:font-size-complex="10pt"/>
    </style:style>
    <style:style style:name="T939" style:family="text">
      <style:text-properties style:use-window-font-color="true" loext:opacity="0%" fo:font-size="10pt" officeooo:rsid="01d6b53b" style:font-size-asian="10pt" style:font-size-complex="10pt"/>
    </style:style>
    <style:style style:name="T940" style:family="text">
      <style:text-properties style:use-window-font-color="true" loext:opacity="0%" fo:font-size="10pt" fo:font-weight="normal" officeooo:rsid="01d6b53b" fo:background-color="#ffffff" loext:char-shading-value="0" style:font-size-asian="10pt" style:font-size-complex="10pt"/>
    </style:style>
    <style:style style:name="T941" style:family="text">
      <style:text-properties style:use-window-font-color="true" loext:opacity="0%" fo:font-size="10pt" fo:font-weight="normal" officeooo:rsid="01d67391" fo:background-color="#ffffff" loext:char-shading-value="0" style:font-size-asian="10pt" style:font-size-complex="10pt"/>
    </style:style>
    <style:style style:name="T942" style:family="text">
      <style:text-properties officeooo:rsid="01e04020"/>
    </style:style>
    <style:style style:name="T943" style:family="text">
      <style:text-properties officeooo:rsid="01dd6031"/>
    </style:style>
    <style:style style:name="T944" style:family="text">
      <style:text-properties officeooo:rsid="01ddaaf6"/>
    </style:style>
    <style:style style:name="T945" style:family="text">
      <style:text-properties officeooo:rsid="01dfe85d"/>
    </style:style>
    <style:style style:name="T946" style:family="text">
      <style:text-properties style:font-name="Courier" officeooo:rsid="01dfe85d"/>
    </style:style>
    <style:style style:name="T947" style:family="text">
      <style:text-properties style:font-name="Liberation Serif" officeooo:rsid="01dfe85d"/>
    </style:style>
    <style:style style:name="T948" style:family="text">
      <style:text-properties style:use-window-font-color="true" loext:opacity="0%" fo:font-size="18pt" fo:font-weight="bold" officeooo:rsid="004234ca" style:font-size-asian="18pt" style:font-weight-asian="bold" style:font-size-complex="18pt" style:font-weight-complex="bold"/>
    </style:style>
    <style:style style:name="T949" style:family="text">
      <style:text-properties style:use-window-font-color="true" loext:opacity="0%" fo:font-size="18pt" fo:font-weight="bold" officeooo:rsid="02188917" style:font-size-asian="18pt" style:font-weight-asian="bold" style:font-size-complex="18pt" style:font-weight-complex="bold"/>
    </style:style>
    <style:style style:name="T950" style:family="text">
      <style:text-properties style:use-window-font-color="true" loext:opacity="0%" fo:font-size="18pt" fo:font-weight="bold" officeooo:rsid="064c45af" style:font-size-asian="18pt" style:font-weight-asian="bold" style:font-size-complex="18pt" style:font-weight-complex="bold"/>
    </style:style>
    <style:style style:name="T951" style:family="text">
      <style:text-properties style:use-window-font-color="true" loext:opacity="0%" fo:font-size="18pt" fo:font-weight="bold" officeooo:rsid="022df83a" style:font-size-asian="18pt" style:font-weight-asian="bold" style:font-size-complex="18pt" style:font-weight-complex="bold"/>
    </style:style>
    <style:style style:name="T952" style:family="text">
      <style:text-properties style:use-window-font-color="true" loext:opacity="0%" style:font-name="Courier" fo:font-size="18pt" fo:font-weight="bold" officeooo:rsid="022df83a" style:font-size-asian="18pt" style:font-weight-asian="bold" style:font-size-complex="18pt" style:font-weight-complex="bold"/>
    </style:style>
    <style:style style:name="T953" style:family="text">
      <style:text-properties officeooo:rsid="021fa551"/>
    </style:style>
    <style:style style:name="T954" style:family="text">
      <style:text-properties style:font-name="Courier" officeooo:rsid="021fa551"/>
    </style:style>
    <style:style style:name="T955" style:family="text">
      <style:text-properties fo:font-size="10pt" officeooo:rsid="021fa551" style:font-size-asian="10pt" style:font-size-complex="10pt"/>
    </style:style>
    <style:style style:name="T956" style:family="text">
      <style:text-properties officeooo:rsid="021eea3d"/>
    </style:style>
    <style:style style:name="T957" style:family="text">
      <style:text-properties officeooo:rsid="02239fb4"/>
    </style:style>
    <style:style style:name="T958" style:family="text">
      <style:text-properties officeooo:rsid="02262472"/>
    </style:style>
    <style:style style:name="T959" style:family="text">
      <style:text-properties style:font-name="Courier" fo:font-size="10pt" officeooo:rsid="021fa551" style:font-size-asian="10pt" style:font-size-complex="10pt"/>
    </style:style>
    <style:style style:name="T960" style:family="text">
      <style:text-properties fo:color="#0000ff" loext:opacity="100%" style:font-name="Courier" fo:font-weight="normal" fo:background-color="#ffffff" loext:char-shading-value="0"/>
    </style:style>
    <style:style style:name="T961" style:family="text">
      <style:text-properties fo:color="#000000" loext:opacity="100%" style:font-name="Courier" fo:font-style="italic" fo:font-weight="normal" fo:background-color="#ffffff" loext:char-shading-value="0" style:font-style-asian="italic" style:font-style-complex="italic"/>
    </style:style>
    <style:style style:name="T962" style:family="text">
      <style:text-properties officeooo:rsid="05916a70"/>
    </style:style>
    <style:style style:name="T963" style:family="text">
      <style:text-properties style:use-window-font-color="true" loext:opacity="0%" fo:font-size="12pt" fo:font-weight="normal" officeooo:rsid="004234ca" style:font-size-asian="12pt" style:font-weight-asian="normal" style:font-size-complex="12pt" style:font-weight-complex="normal"/>
    </style:style>
    <style:style style:name="T964" style:family="text">
      <style:text-properties style:use-window-font-color="true" loext:opacity="0%" style:font-name="Courier" fo:font-size="12pt" fo:font-weight="normal" officeooo:rsid="004234ca" style:font-size-asian="12pt" style:font-weight-asian="normal" style:font-size-complex="12pt" style:font-weight-complex="normal"/>
    </style:style>
    <style:style style:name="T965" style:family="text">
      <style:text-properties style:use-window-font-color="true" loext:opacity="0%" fo:font-size="12pt" fo:font-weight="normal" officeooo:rsid="02207799" style:font-size-asian="12pt" style:font-weight-asian="normal" style:font-size-complex="12pt" style:font-weight-complex="normal"/>
    </style:style>
    <style:style style:name="T966" style:family="text">
      <style:text-properties style:use-window-font-color="true" loext:opacity="0%" fo:font-size="12pt" fo:font-weight="normal" officeooo:rsid="0226eb26" style:font-size-asian="12pt" style:font-weight-asian="normal" style:font-size-complex="12pt" style:font-weight-complex="normal"/>
    </style:style>
    <style:style style:name="T967" style:family="text">
      <style:text-properties style:use-window-font-color="true" loext:opacity="0%" fo:font-size="12pt" fo:font-weight="normal" officeooo:rsid="021ff551" style:font-size-asian="12pt" style:font-weight-asian="normal" style:font-size-complex="12pt" style:font-weight-complex="normal"/>
    </style:style>
    <style:style style:name="T968" style:family="text">
      <style:text-properties style:use-window-font-color="true" loext:opacity="0%" fo:font-size="12pt" fo:font-weight="normal" officeooo:rsid="02277eb9" style:font-size-asian="12pt" style:font-weight-asian="normal" style:font-size-complex="12pt" style:font-weight-complex="normal"/>
    </style:style>
    <style:style style:name="T969" style:family="text">
      <style:text-properties style:use-window-font-color="true" loext:opacity="0%" fo:font-size="12pt" fo:font-style="italic" fo:font-weight="normal" officeooo:rsid="02277eb9" style:font-size-asian="12pt" style:font-style-asian="italic" style:font-weight-asian="normal" style:font-size-complex="12pt" style:font-style-complex="italic" style:font-weight-complex="normal"/>
    </style:style>
    <style:style style:name="T970" style:family="text">
      <style:text-properties style:use-window-font-color="true" loext:opacity="0%" fo:font-size="12pt" fo:font-weight="normal" officeooo:rsid="060f0101" style:font-size-asian="12pt" style:font-weight-asian="normal" style:font-size-complex="12pt" style:font-weight-complex="normal"/>
    </style:style>
    <style:style style:name="T971" style:family="text">
      <style:text-properties fo:color="#008000" loext:opacity="100%" fo:font-size="9pt" fo:font-style="italic" style:font-size-asian="9pt" style:font-style-asian="italic" style:font-size-complex="9pt" style:font-style-complex="italic"/>
    </style:style>
    <style:style style:name="T972" style:family="text">
      <style:text-properties fo:color="#008000" loext:opacity="100%" style:font-name="Courier" fo:font-size="10.5pt" fo:font-weight="normal" fo:background-color="#ffffff" loext:char-shading-value="0"/>
    </style:style>
    <style:style style:name="T973" style:family="text">
      <style:text-properties fo:color="#008000" loext:opacity="100%" style:font-name="Courier" fo:font-size="9pt" fo:font-style="italic" fo:font-weight="normal" fo:background-color="#ffffff" loext:char-shading-value="0" style:font-size-asian="9pt" style:font-style-asian="italic" style:font-size-complex="9pt" style:font-style-complex="italic"/>
    </style:style>
    <style:style style:name="T974" style:family="text">
      <style:text-properties style:use-window-font-color="true" loext:opacity="0%" fo:font-size="12pt" fo:font-weight="normal" officeooo:rsid="022c16c8" style:font-size-asian="12pt" style:font-weight-asian="normal" style:font-size-complex="12pt" style:font-weight-complex="normal"/>
    </style:style>
    <style:style style:name="T975" style:family="text">
      <style:text-properties style:use-window-font-color="true" loext:opacity="0%" fo:font-size="12pt" fo:font-weight="normal" officeooo:rsid="02347946" style:font-size-asian="12pt" style:font-weight-asian="normal" style:font-size-complex="12pt" style:font-weight-complex="normal"/>
    </style:style>
    <style:style style:name="T976" style:family="text">
      <style:text-properties style:use-window-font-color="true" loext:opacity="0%" fo:font-size="10pt" officeooo:rsid="0237127f" style:font-size-asian="10pt" style:font-size-complex="10pt"/>
    </style:style>
    <style:style style:name="T977" style:family="text">
      <style:text-properties style:use-window-font-color="true" loext:opacity="0%" style:font-name="Courier" fo:font-size="10pt" fo:font-weight="normal" officeooo:rsid="0237127f" fo:background-color="#ffffff" loext:char-shading-value="0" style:font-size-asian="10pt" style:font-size-complex="10pt"/>
    </style:style>
    <style:style style:name="T978" style:family="text">
      <style:text-properties style:use-window-font-color="true" loext:opacity="0%" fo:font-size="10pt" fo:font-weight="normal" officeooo:rsid="0237127f" fo:background-color="#ffffff" loext:char-shading-value="0" style:font-size-asian="10pt" style:font-size-complex="10pt"/>
    </style:style>
    <style:style style:name="T979" style:family="text">
      <style:text-properties officeooo:rsid="060f0101"/>
    </style:style>
    <style:style style:name="T980" style:family="text">
      <style:text-properties officeooo:rsid="02382a2a"/>
    </style:style>
    <style:style style:name="T981" style:family="text">
      <style:text-properties style:font-name="Courier" officeooo:rsid="02382a2a"/>
    </style:style>
    <style:style style:name="T982" style:family="text">
      <style:text-properties style:use-window-font-color="true" loext:opacity="0%" fo:font-size="12pt" fo:font-weight="normal" officeooo:rsid="0237127f" style:font-size-asian="12pt" style:font-weight-asian="normal" style:font-size-complex="12pt" style:font-weight-complex="normal"/>
    </style:style>
    <style:style style:name="T983" style:family="text">
      <style:text-properties style:use-window-font-color="true" loext:opacity="0%" style:font-name="Courier" fo:font-size="12pt" fo:font-weight="normal" officeooo:rsid="0237127f" style:font-size-asian="12pt" style:font-weight-asian="normal" style:font-size-complex="12pt" style:font-weight-complex="normal"/>
    </style:style>
    <style:style style:name="T984" style:family="text">
      <style:text-properties officeooo:rsid="0591d17f"/>
    </style:style>
    <style:style style:name="T985" style:family="text">
      <style:text-properties officeooo:rsid="05c6a7ac"/>
    </style:style>
    <style:style style:name="T986" style:family="text">
      <style:text-properties officeooo:rsid="0610c70a"/>
    </style:style>
    <style:style style:name="T987" style:family="text">
      <style:text-properties style:font-name="Courier" officeooo:rsid="05c4d992"/>
    </style:style>
    <style:style style:name="T988" style:family="text">
      <style:text-properties style:use-window-font-color="true" loext:opacity="0%" fo:font-size="12pt" fo:font-weight="normal" officeooo:rsid="024358ba" style:font-size-asian="12pt" style:font-weight-asian="normal" style:font-size-complex="12pt" style:font-weight-complex="normal"/>
    </style:style>
    <style:style style:name="T989" style:family="text">
      <style:text-properties style:use-window-font-color="true" loext:opacity="0%" style:font-name="Courier" fo:font-size="12pt" fo:font-weight="normal" officeooo:rsid="024358ba" style:font-size-asian="12pt" style:font-weight-asian="normal" style:font-size-complex="12pt" style:font-weight-complex="normal"/>
    </style:style>
    <style:style style:name="T990" style:family="text">
      <style:text-properties officeooo:rsid="02451ca2"/>
    </style:style>
    <style:style style:name="T991" style:family="text">
      <style:text-properties style:font-name="Courier" officeooo:rsid="02451ca2"/>
    </style:style>
    <style:style style:name="T992" style:family="text">
      <style:text-properties fo:font-size="10pt" officeooo:rsid="02451ca2" style:font-size-asian="10pt" style:font-size-complex="10pt"/>
    </style:style>
    <style:style style:name="T993" style:family="text">
      <style:text-properties officeooo:rsid="0257a30c"/>
    </style:style>
    <style:style style:name="T994" style:family="text">
      <style:text-properties officeooo:rsid="025553b7"/>
    </style:style>
    <style:style style:name="T995" style:family="text">
      <style:text-properties officeooo:rsid="02597184"/>
    </style:style>
    <style:style style:name="T996" style:family="text">
      <style:text-properties style:use-window-font-color="true" loext:opacity="0%" fo:font-size="12pt" fo:font-weight="normal" officeooo:rsid="02518e18" style:font-size-asian="12pt" style:font-weight-asian="normal" style:font-size-complex="12pt" style:font-weight-complex="normal"/>
    </style:style>
    <style:style style:name="T997" style:family="text">
      <style:text-properties style:use-window-font-color="true" loext:opacity="0%" fo:font-size="12pt" fo:font-style="italic" fo:font-weight="normal" officeooo:rsid="02518e18" style:font-size-asian="12pt" style:font-style-asian="italic" style:font-weight-asian="normal" style:font-size-complex="12pt" style:font-style-complex="italic" style:font-weight-complex="normal"/>
    </style:style>
    <style:style style:name="T998" style:family="text">
      <style:text-properties style:use-window-font-color="true" loext:opacity="0%" fo:font-size="12pt" fo:font-weight="normal" officeooo:rsid="02522c01" style:font-size-asian="12pt" style:font-weight-asian="normal" style:font-size-complex="12pt" style:font-weight-complex="normal"/>
    </style:style>
    <style:style style:name="T999" style:family="text">
      <style:text-properties style:use-window-font-color="true" loext:opacity="0%" fo:font-size="12pt" fo:font-weight="normal" officeooo:rsid="0610c70a" style:font-size-asian="12pt" style:font-weight-asian="normal" style:font-size-complex="12pt" style:font-weight-complex="normal"/>
    </style:style>
    <style:style style:name="T1000" style:family="text">
      <style:text-properties style:use-window-font-color="true" loext:opacity="0%" fo:font-size="12pt" fo:font-weight="normal" officeooo:rsid="0253221b" style:font-size-asian="12pt" style:font-weight-asian="normal" style:font-size-complex="12pt" style:font-weight-complex="normal"/>
    </style:style>
    <style:style style:name="T1001" style:family="text">
      <style:text-properties style:use-window-font-color="true" loext:opacity="0%" fo:font-size="12pt" fo:font-weight="normal" officeooo:rsid="0254b257" style:font-size-asian="12pt" style:font-weight-asian="normal" style:font-size-complex="12pt" style:font-weight-complex="normal"/>
    </style:style>
    <style:style style:name="T1002" style:family="text">
      <style:text-properties style:use-window-font-color="true" loext:opacity="0%" fo:font-size="12pt" fo:font-weight="normal" officeooo:rsid="02562ba1" style:font-size-asian="12pt" style:font-weight-asian="normal" style:font-size-complex="12pt" style:font-weight-complex="normal"/>
    </style:style>
    <style:style style:name="T1003" style:family="text">
      <style:text-properties style:use-window-font-color="true" loext:opacity="0%" fo:font-size="12pt" fo:font-weight="normal" officeooo:rsid="0257a30c" style:font-size-asian="12pt" style:font-weight-asian="normal" style:font-size-complex="12pt" style:font-weight-complex="normal"/>
    </style:style>
    <style:style style:name="T1004" style:family="text">
      <style:text-properties officeooo:rsid="025c19d6"/>
    </style:style>
    <style:style style:name="T1005" style:family="text">
      <style:text-properties officeooo:rsid="025c725b"/>
    </style:style>
    <style:style style:name="T1006" style:family="text">
      <style:text-properties officeooo:rsid="025d0175"/>
    </style:style>
    <style:style style:name="T1007" style:family="text">
      <style:text-properties style:font-name="Courier" officeooo:rsid="025c725b"/>
    </style:style>
    <style:style style:name="T1008" style:family="text">
      <style:text-properties style:font-name="Courier" officeooo:rsid="025d0175"/>
    </style:style>
    <style:style style:name="T1009" style:family="text">
      <style:text-properties fo:font-size="10pt" officeooo:rsid="025c725b" style:font-size-asian="10pt" style:font-size-complex="10pt"/>
    </style:style>
    <style:style style:name="T1010" style:family="text">
      <style:text-properties style:use-window-font-color="true" loext:opacity="0%" fo:font-size="12pt" fo:font-weight="normal" officeooo:rsid="025e9da4" style:font-size-asian="12pt" style:font-weight-asian="normal" style:font-size-complex="12pt" style:font-weight-complex="normal"/>
    </style:style>
    <style:style style:name="T1011" style:family="text">
      <style:text-properties style:use-window-font-color="true" loext:opacity="0%" fo:font-size="12pt" fo:font-style="italic" fo:font-weight="normal" officeooo:rsid="0257a30c" style:font-size-asian="12pt" style:font-style-asian="italic" style:font-weight-asian="normal" style:font-size-complex="12pt" style:font-style-complex="italic" style:font-weight-complex="normal"/>
    </style:style>
    <style:style style:name="T1012" style:family="text">
      <style:text-properties style:use-window-font-color="true" loext:opacity="0%" fo:font-size="10pt" officeooo:rsid="025e9da4" style:font-size-asian="10pt" style:font-size-complex="10pt"/>
    </style:style>
    <style:style style:name="T1013" style:family="text">
      <style:text-properties style:use-window-font-color="true" loext:opacity="0%" fo:font-size="10pt" fo:font-weight="normal" officeooo:rsid="025e9da4" fo:background-color="#ffffff" loext:char-shading-value="0" style:font-size-asian="10pt" style:font-size-complex="10pt"/>
    </style:style>
    <style:style style:name="T1014" style:family="text">
      <style:text-properties style:font-name="Liberation Serif" fo:font-style="italic" fo:font-weight="normal" officeooo:rsid="0610c70a" style:font-style-asian="italic" style:font-weight-asian="normal" style:font-style-complex="italic" style:font-weight-complex="normal"/>
    </style:style>
    <style:style style:name="T1015" style:family="text">
      <style:text-properties style:font-name="Liberation Serif" fo:font-style="italic" style:font-style-asian="italic" style:font-style-complex="italic"/>
    </style:style>
    <style:style style:name="T1016" style:family="text">
      <style:text-properties style:use-window-font-color="true" loext:opacity="0%" fo:font-size="12pt" fo:font-weight="normal" officeooo:rsid="02639801" style:font-size-asian="12pt" style:font-weight-asian="normal" style:font-size-complex="12pt" style:font-weight-complex="normal"/>
    </style:style>
    <style:style style:name="T1017" style:family="text">
      <style:text-properties style:use-window-font-color="true" loext:opacity="0%" fo:font-size="12pt" fo:font-weight="normal" officeooo:rsid="02a5d783" style:font-size-asian="12pt" style:font-weight-asian="normal" style:font-size-complex="12pt" style:font-weight-complex="normal"/>
    </style:style>
    <style:style style:name="T1018" style:family="text">
      <style:text-properties officeooo:rsid="02639801"/>
    </style:style>
    <style:style style:name="T1019" style:family="text">
      <style:text-properties style:use-window-font-color="true" loext:opacity="0%" fo:font-size="12pt" fo:font-weight="normal" officeooo:rsid="026a3f27" style:font-size-asian="12pt" style:font-weight-asian="normal" style:font-size-complex="12pt" style:font-weight-complex="normal"/>
    </style:style>
    <style:style style:name="T1020" style:family="text">
      <style:text-properties style:use-window-font-color="true" loext:opacity="0%" fo:font-size="12pt" fo:font-weight="normal" officeooo:rsid="026a14c7" style:font-size-asian="12pt" style:font-weight-asian="normal" style:font-size-complex="12pt" style:font-weight-complex="normal"/>
    </style:style>
    <style:style style:name="T1021" style:family="text">
      <style:text-properties style:use-window-font-color="true" loext:opacity="0%" fo:font-size="12pt" fo:font-style="italic" fo:font-weight="normal" officeooo:rsid="02773c8b" style:font-size-asian="12pt" style:font-style-asian="italic" style:font-weight-asian="normal" style:font-size-complex="12pt" style:font-style-complex="italic" style:font-weight-complex="normal"/>
    </style:style>
    <style:style style:name="T1022" style:family="text">
      <style:text-properties style:use-window-font-color="true" loext:opacity="0%" style:font-name="Courier" fo:font-weight="normal" officeooo:rsid="024358ba" style:font-weight-asian="normal" style:font-weight-complex="normal"/>
    </style:style>
    <style:style style:name="T1023" style:family="text">
      <style:text-properties style:use-window-font-color="true" loext:opacity="0%" fo:font-size="12pt" fo:font-weight="normal" officeooo:rsid="02773c8b" style:font-size-asian="12pt" style:font-weight-asian="normal" style:font-size-complex="12pt" style:font-weight-complex="normal"/>
    </style:style>
    <style:style style:name="T1024" style:family="text">
      <style:text-properties style:use-window-font-color="true" loext:opacity="0%" fo:font-size="12pt" fo:font-style="italic" fo:font-weight="normal" officeooo:rsid="027c2144" style:font-size-asian="12pt" style:font-style-asian="italic" style:font-weight-asian="normal" style:font-size-complex="12pt" style:font-style-complex="italic" style:font-weight-complex="normal"/>
    </style:style>
    <style:style style:name="T1025" style:family="text">
      <style:text-properties fo:font-style="normal" officeooo:rsid="0287a386" style:font-style-asian="normal" style:font-style-complex="normal"/>
    </style:style>
    <style:style style:name="T1026" style:family="text">
      <style:text-properties fo:font-style="italic" officeooo:rsid="0287a386" style:font-style-asian="italic" style:font-style-complex="italic"/>
    </style:style>
    <style:style style:name="T1027" style:family="text">
      <style:text-properties officeooo:rsid="026bf97e"/>
    </style:style>
    <style:style style:name="T1028" style:family="text">
      <style:text-properties officeooo:rsid="0287a386"/>
    </style:style>
    <style:style style:name="T1029" style:family="text">
      <style:text-properties officeooo:rsid="02802239"/>
    </style:style>
    <style:style style:name="T1030" style:family="text">
      <style:text-properties style:use-window-font-color="true" loext:opacity="0%" style:font-name="Liberation Serif" fo:font-size="12pt" fo:font-weight="normal" officeooo:rsid="027c98fc" style:font-size-asian="12pt" style:font-weight-asian="normal" style:font-size-complex="12pt" style:font-weight-complex="normal"/>
    </style:style>
    <style:style style:name="T1031" style:family="text">
      <style:text-properties style:use-window-font-color="true" loext:opacity="0%" fo:font-weight="normal" officeooo:rsid="026dde6a" style:font-weight-asian="normal" style:font-weight-complex="normal"/>
    </style:style>
    <style:style style:name="T1032" style:family="text">
      <style:text-properties style:use-window-font-color="true" loext:opacity="0%" fo:font-weight="normal" officeooo:rsid="026bf97e" style:font-weight-asian="normal" style:font-weight-complex="normal"/>
    </style:style>
    <style:style style:name="T1033" style:family="text">
      <style:text-properties style:use-window-font-color="true" loext:opacity="0%" fo:font-style="italic" fo:font-weight="normal" officeooo:rsid="028a968b" style:font-style-asian="italic" style:font-weight-asian="normal" style:font-style-complex="italic" style:font-weight-complex="normal"/>
    </style:style>
    <style:style style:name="T1034" style:family="text">
      <style:text-properties style:use-window-font-color="true" loext:opacity="0%" fo:font-weight="normal" officeooo:rsid="027b1f08" style:font-weight-asian="normal" style:font-weight-complex="normal"/>
    </style:style>
    <style:style style:name="T1035" style:family="text">
      <style:text-properties fo:font-size="12pt" fo:font-weight="normal" style:font-weight-asian="normal" style:font-size-complex="12pt" style:font-weight-complex="normal"/>
    </style:style>
    <style:style style:name="T1036" style:family="text">
      <style:text-properties fo:font-style="italic" fo:font-weight="normal" officeooo:rsid="0287a386" style:font-style-asian="italic" style:font-weight-asian="normal" style:font-style-complex="italic" style:font-weight-complex="normal"/>
    </style:style>
    <style:style style:name="T1037" style:family="text">
      <style:text-properties style:use-window-font-color="true" loext:opacity="0%" fo:font-size="12pt" fo:font-weight="normal" officeooo:rsid="0287a386" style:font-size-asian="12pt" style:font-weight-asian="normal" style:font-size-complex="12pt" style:font-weight-complex="normal"/>
    </style:style>
    <style:style style:name="T1038" style:family="text">
      <style:text-properties style:use-window-font-color="true" loext:opacity="0%" style:font-name="Courier" fo:font-weight="normal" officeooo:rsid="028a0249" style:font-weight-asian="normal" style:font-weight-complex="normal"/>
    </style:style>
    <style:style style:name="T1039" style:family="text">
      <style:text-properties fo:font-style="normal" fo:font-weight="normal" style:font-style-asian="normal" style:font-weight-asian="normal" style:font-style-complex="normal" style:font-weight-complex="normal"/>
    </style:style>
    <style:style style:name="T1040" style:family="text">
      <style:text-properties fo:font-style="normal" fo:font-weight="normal" officeooo:rsid="028774ae" style:font-style-asian="normal" style:font-weight-asian="normal" style:font-style-complex="normal" style:font-weight-complex="normal"/>
    </style:style>
    <style:style style:name="T1041" style:family="text">
      <style:text-properties style:font-name="Courier" fo:font-style="normal" fo:font-weight="normal" officeooo:rsid="028774ae" style:font-style-asian="normal" style:font-weight-asian="normal" style:font-style-complex="normal" style:font-weight-complex="normal"/>
    </style:style>
    <style:style style:name="T1042" style:family="text">
      <style:text-properties style:use-window-font-color="true" loext:opacity="0%" fo:font-size="12pt" fo:font-weight="normal" officeooo:rsid="028774ae" style:font-size-asian="12pt" style:font-weight-asian="normal" style:font-size-complex="12pt" style:font-weight-complex="normal"/>
    </style:style>
    <style:style style:name="T1043" style:family="text">
      <style:text-properties style:use-window-font-color="true" loext:opacity="0%" fo:font-size="12pt" fo:font-style="italic" fo:font-weight="normal" officeooo:rsid="028774ae" style:font-size-asian="12pt" style:font-style-asian="italic" style:font-weight-asian="normal" style:font-size-complex="12pt" style:font-style-complex="italic" style:font-weight-complex="normal"/>
    </style:style>
    <style:style style:name="T1044" style:family="text">
      <style:text-properties style:use-window-font-color="true" loext:opacity="0%" style:font-name="Courier" fo:font-size="12pt" fo:font-style="normal" fo:font-weight="normal" officeooo:rsid="028774ae" style:font-size-asian="12pt" style:font-style-asian="normal" style:font-weight-asian="normal" style:font-size-complex="12pt" style:font-style-complex="normal" style:font-weight-complex="normal"/>
    </style:style>
    <style:style style:name="T1045" style:family="text">
      <style:text-properties style:use-window-font-color="true" loext:opacity="0%" fo:font-size="12pt" fo:font-weight="normal" officeooo:rsid="028f7d91" style:font-size-asian="12pt" style:font-weight-asian="normal" style:font-size-complex="12pt" style:font-weight-complex="normal"/>
    </style:style>
    <style:style style:name="T1046" style:family="text">
      <style:text-properties style:use-window-font-color="true" loext:opacity="0%" fo:font-size="12pt" fo:font-style="italic" fo:font-weight="normal" officeooo:rsid="028f7d91" style:font-size-asian="12pt" style:font-style-asian="italic" style:font-weight-asian="normal" style:font-size-complex="12pt" style:font-style-complex="italic" style:font-weight-complex="normal"/>
    </style:style>
    <style:style style:name="T1047" style:family="text">
      <style:text-properties style:font-name="Courier" officeooo:rsid="028f7d91"/>
    </style:style>
    <style:style style:name="T1048" style:family="text">
      <style:text-properties fo:font-size="10pt" officeooo:rsid="028f7d91" style:font-size-asian="10pt" style:font-size-complex="10pt"/>
    </style:style>
    <style:style style:name="T1049" style:family="text">
      <style:text-properties fo:font-size="10pt" officeooo:rsid="05938522" style:font-size-asian="10pt" style:font-size-complex="10pt"/>
    </style:style>
    <style:style style:name="T1050" style:family="text">
      <style:text-properties officeooo:rsid="028f7d91"/>
    </style:style>
    <style:style style:name="T1051" style:family="text">
      <style:text-properties style:font-name="Courier" fo:font-size="10pt" officeooo:rsid="028f7d91" style:font-size-asian="10pt" style:font-size-complex="10pt"/>
    </style:style>
    <style:style style:name="T1052" style:family="text">
      <style:text-properties officeooo:rsid="0290ba99"/>
    </style:style>
    <style:style style:name="T1053" style:family="text">
      <style:text-properties style:use-window-font-color="true" loext:opacity="0%" fo:font-size="12pt" fo:font-weight="normal" officeooo:rsid="0290ba99" style:font-size-asian="12pt" style:font-weight-asian="normal" style:font-size-complex="12pt" style:font-weight-complex="normal"/>
    </style:style>
    <style:style style:name="T1054" style:family="text">
      <style:text-properties style:use-window-font-color="true" loext:opacity="0%" fo:font-size="12pt" fo:font-style="italic" fo:font-weight="normal" officeooo:rsid="0290ba99" style:font-size-asian="12pt" style:font-style-asian="italic" style:font-weight-asian="normal" style:font-size-complex="12pt" style:font-style-complex="italic" style:font-weight-complex="normal"/>
    </style:style>
    <style:style style:name="T1055" style:family="text">
      <style:text-properties style:use-window-font-color="true" loext:opacity="0%" style:font-name="Courier" fo:font-size="12pt" fo:font-weight="normal" officeooo:rsid="0290ba99" style:font-size-asian="12pt" style:font-weight-asian="normal" style:font-size-complex="12pt" style:font-weight-complex="normal"/>
    </style:style>
    <style:style style:name="T1056" style:family="text">
      <style:text-properties style:use-window-font-color="true" loext:opacity="0%" style:font-name="Liberation Serif" fo:font-size="12pt" fo:font-weight="normal" officeooo:rsid="0290ba99" style:font-size-asian="12pt" style:font-weight-asian="normal" style:font-size-complex="12pt" style:font-weight-complex="normal"/>
    </style:style>
    <style:style style:name="T1057" style:family="text">
      <style:text-properties style:use-window-font-color="true" loext:opacity="0%" style:font-name="Liberation Serif" fo:font-size="12pt" fo:font-style="italic" fo:font-weight="normal" officeooo:rsid="0290ba99" style:font-size-asian="12pt" style:font-style-asian="italic" style:font-weight-asian="normal" style:font-size-complex="12pt" style:font-style-complex="italic" style:font-weight-complex="normal"/>
    </style:style>
    <style:style style:name="T1058" style:family="text">
      <style:text-properties style:use-window-font-color="true" loext:opacity="0%" style:font-name="Liberation Serif" fo:font-size="12pt" fo:font-style="normal" fo:font-weight="normal" officeooo:rsid="0290ba99" style:font-size-asian="12pt" style:font-style-asian="normal" style:font-weight-asian="normal" style:font-size-complex="12pt" style:font-style-complex="normal" style:font-weight-complex="normal"/>
    </style:style>
    <style:style style:name="T1059" style:family="text">
      <style:text-properties style:use-window-font-color="true" loext:opacity="0%" style:font-name="Liberation Serif" fo:font-size="12pt" fo:font-style="normal" fo:font-weight="normal" officeooo:rsid="0292d643" style:font-size-asian="12pt" style:font-style-asian="normal" style:font-weight-asian="normal" style:font-size-complex="12pt" style:font-style-complex="normal" style:font-weight-complex="normal"/>
    </style:style>
    <style:style style:name="T1060" style:family="text">
      <style:text-properties style:use-window-font-color="true" loext:opacity="0%" style:font-name="Liberation Serif" fo:font-size="12pt" fo:font-style="normal" fo:font-weight="normal" officeooo:rsid="0611f0d3" style:font-size-asian="12pt" style:font-style-asian="normal" style:font-weight-asian="normal" style:font-size-complex="12pt" style:font-style-complex="normal" style:font-weight-complex="normal"/>
    </style:style>
    <style:style style:name="T1061" style:family="text">
      <style:text-properties style:use-window-font-color="true" loext:opacity="0%" fo:font-size="10pt" officeooo:rsid="02960507" style:font-size-asian="10pt" style:font-size-complex="10pt"/>
    </style:style>
    <style:style style:name="T1062" style:family="text">
      <style:text-properties style:use-window-font-color="true" loext:opacity="0%" fo:font-size="10pt" officeooo:rsid="0296771a" style:font-size-asian="10pt" style:font-size-complex="10pt"/>
    </style:style>
    <style:style style:name="T1063" style:family="text">
      <style:text-properties style:use-window-font-color="true" loext:opacity="0%" fo:font-size="10pt" fo:font-weight="normal" officeooo:rsid="0296771a" fo:background-color="#ffffff" loext:char-shading-value="0" style:font-size-asian="10pt" style:font-size-complex="10pt"/>
    </style:style>
    <style:style style:name="T1064" style:family="text">
      <style:text-properties style:use-window-font-color="true" loext:opacity="0%" fo:font-size="10pt" fo:font-weight="normal" officeooo:rsid="02960507" fo:background-color="#ffffff" loext:char-shading-value="0" style:font-size-asian="10pt" style:font-size-complex="10pt"/>
    </style:style>
    <style:style style:name="T1065" style:family="text">
      <style:text-properties officeooo:rsid="029cad96"/>
    </style:style>
    <style:style style:name="T1066" style:family="text">
      <style:text-properties style:use-window-font-color="true" loext:opacity="0%" fo:font-size="12pt" fo:font-weight="normal" officeooo:rsid="0611f0d3" style:font-size-asian="12pt" style:font-weight-asian="normal" style:font-size-complex="12pt" style:font-weight-complex="normal"/>
    </style:style>
    <style:style style:name="T1067" style:family="text">
      <style:text-properties style:use-window-font-color="true" loext:opacity="0%" style:font-name="Courier" fo:font-size="12pt" fo:font-weight="normal" officeooo:rsid="0611f0d3" style:font-size-asian="12pt" style:font-weight-asian="normal" style:font-size-complex="12pt" style:font-weight-complex="normal"/>
    </style:style>
    <style:style style:name="T1068" style:family="text">
      <style:text-properties style:use-window-font-color="true" loext:opacity="0%" fo:font-size="12pt" fo:font-weight="normal" officeooo:rsid="029e428b" style:font-size-asian="12pt" style:font-weight-asian="normal" style:font-size-complex="12pt" style:font-weight-complex="normal"/>
    </style:style>
    <style:style style:name="T1069" style:family="text">
      <style:text-properties style:use-window-font-color="true" loext:opacity="0%" style:font-name="Courier" fo:font-size="12pt" fo:font-weight="normal" officeooo:rsid="029e428b" style:font-size-asian="12pt" style:font-weight-asian="normal" style:font-size-complex="12pt" style:font-weight-complex="normal"/>
    </style:style>
    <style:style style:name="T1070" style:family="text">
      <style:text-properties officeooo:rsid="029e428b"/>
    </style:style>
    <style:style style:name="T1071" style:family="text">
      <style:text-properties style:font-name="Courier" officeooo:rsid="029e428b"/>
    </style:style>
    <style:style style:name="T1072" style:family="text">
      <style:text-properties fo:font-size="10pt" officeooo:rsid="029e428b" style:font-size-asian="10pt" style:font-size-complex="10pt"/>
    </style:style>
    <style:style style:name="T1073" style:family="text">
      <style:text-properties officeooo:rsid="02a094bc"/>
    </style:style>
    <style:style style:name="T1074" style:family="text">
      <style:text-properties officeooo:rsid="02a57b38"/>
    </style:style>
    <style:style style:name="T1075" style:family="text">
      <style:text-properties style:use-window-font-color="true" loext:opacity="0%" fo:font-size="12pt" fo:font-weight="normal" officeooo:rsid="02a68573" style:font-size-asian="12pt" style:font-weight-asian="normal" style:font-size-complex="12pt" style:font-weight-complex="normal"/>
    </style:style>
    <style:style style:name="T1076" style:family="text">
      <style:text-properties style:use-window-font-color="true" loext:opacity="0%" fo:font-size="10pt" officeooo:rsid="02ab67ae" style:font-size-asian="10pt" style:font-size-complex="10pt"/>
    </style:style>
    <style:style style:name="T1077" style:family="text">
      <style:text-properties style:use-window-font-color="true" loext:opacity="0%" fo:font-size="10pt" fo:font-weight="normal" officeooo:rsid="02ab67ae" fo:background-color="#ffffff" loext:char-shading-value="0" style:font-size-asian="10pt" style:font-size-complex="10pt"/>
    </style:style>
    <style:style style:name="T1078" style:family="text">
      <style:text-properties style:use-window-font-color="true" loext:opacity="0%" style:font-name="Courier" fo:font-size="10pt" fo:font-weight="normal" officeooo:rsid="02ab67ae" fo:background-color="#ffffff" loext:char-shading-value="0" style:font-size-asian="10pt" style:font-size-complex="10pt"/>
    </style:style>
    <style:style style:name="T1079" style:family="text">
      <style:text-properties style:use-window-font-color="true" loext:opacity="0%" style:font-name="Liberation Serif" fo:font-size="12pt" fo:font-style="italic" fo:font-weight="normal" officeooo:rsid="02ad8069" style:font-size-asian="12pt" style:font-style-asian="italic" style:font-weight-asian="normal" style:font-size-complex="12pt" style:font-style-complex="italic" style:font-weight-complex="normal"/>
    </style:style>
    <style:style style:name="T1080" style:family="text">
      <style:text-properties style:use-window-font-color="true" loext:opacity="0%" style:font-name="Courier" fo:font-size="12pt" fo:font-style="italic" fo:font-weight="normal" officeooo:rsid="02ad8069" style:font-size-asian="12pt" style:font-style-asian="italic" style:font-weight-asian="normal" style:font-size-complex="12pt" style:font-style-complex="italic" style:font-weight-complex="normal"/>
    </style:style>
    <style:style style:name="T1081" style:family="text">
      <style:text-properties officeooo:rsid="0613b84a"/>
    </style:style>
    <style:style style:name="T1082" style:family="text">
      <style:text-properties officeooo:rsid="02afda80"/>
    </style:style>
    <style:style style:name="T1083" style:family="text">
      <style:text-properties style:use-window-font-color="true" loext:opacity="0%" fo:font-size="12pt" fo:font-weight="normal" officeooo:rsid="0613b84a" style:font-size-asian="12pt" style:font-weight-asian="normal" style:font-size-complex="12pt" style:font-weight-complex="normal"/>
    </style:style>
    <style:style style:name="T1084" style:family="text">
      <style:text-properties style:use-window-font-color="true" loext:opacity="0%" style:font-name="Courier" fo:font-size="12pt" fo:font-weight="normal" officeooo:rsid="02b343a4" style:font-size-asian="12pt" style:font-weight-asian="normal" style:font-size-complex="12pt" style:font-weight-complex="normal"/>
    </style:style>
    <style:style style:name="T1085" style:family="text">
      <style:text-properties style:use-window-font-color="true" loext:opacity="0%" fo:font-size="12pt" fo:font-weight="normal" officeooo:rsid="02b343a4" style:font-size-asian="12pt" style:font-weight-asian="normal" style:font-size-complex="12pt" style:font-weight-complex="normal"/>
    </style:style>
    <style:style style:name="T1086" style:family="text">
      <style:text-properties officeooo:rsid="02b20e7b" style:font-size-asian="12pt"/>
    </style:style>
    <style:style style:name="T1087" style:family="text">
      <style:text-properties style:use-window-font-color="true" loext:opacity="0%" fo:font-size="10pt" officeooo:rsid="02b35c54" style:font-size-asian="10pt" style:font-size-complex="10pt"/>
    </style:style>
    <style:style style:name="T1088" style:family="text">
      <style:text-properties style:use-window-font-color="true" loext:opacity="0%" fo:font-size="10pt" fo:font-weight="normal" officeooo:rsid="02b35c54" fo:background-color="#ffffff" loext:char-shading-value="0" style:font-size-asian="10pt" style:font-size-complex="10pt"/>
    </style:style>
    <style:style style:name="T1089" style:family="text">
      <style:text-properties style:use-window-font-color="true" loext:opacity="0%" fo:font-size="10pt" officeooo:rsid="02b35c54" fo:background-color="#ffffff" loext:char-shading-value="0" style:font-size-asian="10pt" style:font-size-complex="10pt"/>
    </style:style>
    <style:style style:name="T1090" style:family="text">
      <style:text-properties fo:color="#0000ff" loext:opacity="100%" fo:background-color="#ffffff" loext:char-shading-value="0"/>
    </style:style>
    <style:style style:name="T1091" style:family="text">
      <style:text-properties fo:color="#000000" loext:opacity="100%" fo:background-color="#ffffff" loext:char-shading-value="0"/>
    </style:style>
    <style:style style:name="T1092" style:family="text">
      <style:text-properties fo:color="#000000" loext:opacity="100%" fo:font-weight="normal" officeooo:rsid="02b42860" fo:background-color="#ffffff" loext:char-shading-value="0"/>
    </style:style>
    <style:style style:name="T1093" style:family="text">
      <style:text-properties style:use-window-font-color="true" loext:opacity="0%" style:font-name="Courier" fo:font-size="12pt" fo:font-weight="normal" officeooo:rsid="0613b84a" style:font-size-asian="12pt" style:font-weight-asian="normal" style:font-size-complex="12pt" style:font-weight-complex="normal"/>
    </style:style>
    <style:style style:name="T1094" style:family="text">
      <style:text-properties officeooo:rsid="02b6a5ac"/>
    </style:style>
    <style:style style:name="T1095" style:family="text">
      <style:text-properties fo:font-size="13pt" fo:font-weight="bold" officeooo:rsid="0594362b" style:font-size-asian="13pt" style:font-weight-asian="bold" style:font-size-complex="13pt" style:font-weight-complex="bold"/>
    </style:style>
    <style:style style:name="T1096" style:family="text">
      <style:text-properties fo:font-size="13pt" fo:font-weight="bold" officeooo:rsid="05c5146f" style:font-size-asian="13pt" style:font-weight-asian="bold" style:font-size-complex="13pt" style:font-weight-complex="bold"/>
    </style:style>
    <style:style style:name="T1097" style:family="text">
      <style:text-properties fo:font-size="13pt" fo:font-weight="bold" officeooo:rsid="02bfb96c" style:font-size-asian="13pt" style:font-weight-asian="bold" style:font-size-complex="13pt" style:font-weight-complex="bold"/>
    </style:style>
    <style:style style:name="T1098" style:family="text">
      <style:text-properties fo:font-size="13pt" fo:font-weight="bold" officeooo:rsid="02c042f5" style:font-size-asian="13pt" style:font-weight-asian="bold" style:font-size-complex="13pt" style:font-weight-complex="bold"/>
    </style:style>
    <style:style style:name="T1099" style:family="text">
      <style:text-properties style:font-name="Courier" fo:font-size="13pt" fo:font-weight="bold" officeooo:rsid="02c042f5" style:font-size-asian="13pt" style:font-weight-asian="bold" style:font-size-complex="13pt" style:font-weight-complex="bold"/>
    </style:style>
    <style:style style:name="T1100" style:family="text">
      <style:text-properties style:font-name="Courier" officeooo:rsid="02bb1f82"/>
    </style:style>
    <style:style style:name="T1101" style:family="text">
      <style:text-properties officeooo:rsid="02bb1f82"/>
    </style:style>
    <style:style style:name="T1102" style:family="text">
      <style:text-properties style:font-name="Courier" officeooo:rsid="02bc8a6b"/>
    </style:style>
    <style:style style:name="T1103" style:family="text">
      <style:text-properties fo:font-size="10pt" officeooo:rsid="02bb1f82" style:font-size-asian="10pt" style:font-size-complex="10pt"/>
    </style:style>
    <style:style style:name="T1104" style:family="text">
      <style:text-properties officeooo:rsid="02d13523"/>
    </style:style>
    <style:style style:name="T1105" style:family="text">
      <style:text-properties style:use-window-font-color="true" loext:opacity="0%" fo:font-size="12pt" fo:font-weight="normal" officeooo:rsid="02bb1f82" style:font-size-asian="12pt" style:font-weight-asian="normal" style:font-size-complex="12pt" style:font-weight-complex="normal"/>
    </style:style>
    <style:style style:name="T1106" style:family="text">
      <style:text-properties officeooo:rsid="0615836b"/>
    </style:style>
    <style:style style:name="T1107" style:family="text">
      <style:text-properties style:use-window-font-color="true" loext:opacity="0%" fo:font-size="12pt" fo:font-weight="normal" officeooo:rsid="02c91c66" style:font-size-asian="12pt" style:font-weight-asian="normal" style:font-size-complex="12pt" style:font-weight-complex="normal"/>
    </style:style>
    <style:style style:name="T1108" style:family="text">
      <style:text-properties style:use-window-font-color="true" loext:opacity="0%" style:font-name="Courier" fo:font-size="12pt" fo:font-weight="normal" officeooo:rsid="02c91c66" style:font-size-asian="12pt" style:font-weight-asian="normal" style:font-size-complex="12pt" style:font-weight-complex="normal"/>
    </style:style>
    <style:style style:name="T1109" style:family="text">
      <style:text-properties style:use-window-font-color="true" loext:opacity="0%" fo:font-size="12pt" fo:font-weight="normal" officeooo:rsid="02c4acb4" style:font-size-asian="12pt" style:font-weight-asian="normal" style:font-size-complex="12pt" style:font-weight-complex="normal"/>
    </style:style>
    <style:style style:name="T1110" style:family="text">
      <style:text-properties style:use-window-font-color="true" loext:opacity="0%" fo:font-size="12pt" fo:font-weight="normal" officeooo:rsid="02c808dd" style:font-size-asian="12pt" style:font-weight-asian="normal" style:font-size-complex="12pt" style:font-weight-complex="normal"/>
    </style:style>
    <style:style style:name="T1111" style:family="text">
      <style:text-properties style:use-window-font-color="true" loext:opacity="0%" fo:font-size="12pt" fo:font-weight="normal" officeooo:rsid="0615836b" style:font-size-asian="12pt" style:font-weight-asian="normal" style:font-size-complex="12pt" style:font-weight-complex="normal"/>
    </style:style>
    <style:style style:name="T1112" style:family="text">
      <style:text-properties fo:font-size="12pt" officeooo:rsid="02c4acb4" style:font-size-asian="12pt" style:font-size-complex="12pt"/>
    </style:style>
    <style:style style:name="T1113" style:family="text">
      <style:text-properties style:font-name="Courier" fo:font-size="12pt" style:font-size-asian="12pt" style:font-size-complex="12pt"/>
    </style:style>
    <style:style style:name="T1114" style:family="text">
      <style:text-properties style:use-window-font-color="true" loext:opacity="0%" fo:font-size="12pt" fo:font-weight="bold" officeooo:rsid="02c61f6c" style:font-size-asian="12pt" style:font-weight-asian="bold" style:font-size-complex="12pt" style:font-weight-complex="bold"/>
    </style:style>
    <style:style style:name="T1115" style:family="text">
      <style:text-properties style:use-window-font-color="true" loext:opacity="0%" fo:font-size="12pt" fo:font-weight="bold" officeooo:rsid="05a70ed4" style:font-size-asian="12pt" style:font-weight-asian="bold" style:font-size-complex="12pt" style:font-weight-complex="bold"/>
    </style:style>
    <style:style style:name="T1116" style:family="text">
      <style:text-properties style:use-window-font-color="true" loext:opacity="0%" fo:font-size="12pt" fo:font-weight="normal" officeooo:rsid="02c61f6c" style:font-size-asian="12pt" style:font-weight-asian="normal" style:font-size-complex="12pt" style:font-weight-complex="normal"/>
    </style:style>
    <style:style style:name="T1117" style:family="text">
      <style:text-properties fo:color="#a31515" loext:opacity="100%" fo:background-color="#ffffff" loext:char-shading-value="0"/>
    </style:style>
    <style:style style:name="T1118" style:family="text">
      <style:text-properties style:use-window-font-color="true" loext:opacity="0%" fo:font-size="12pt" fo:font-weight="normal" officeooo:rsid="02c8b0ec" style:font-size-asian="12pt" style:font-weight-asian="normal" style:font-size-complex="12pt" style:font-weight-complex="normal"/>
    </style:style>
    <style:style style:name="T1119" style:family="text">
      <style:text-properties style:use-window-font-color="true" loext:opacity="0%" style:font-name="Courier" fo:font-size="12pt" fo:font-weight="normal" officeooo:rsid="02c8b0ec" style:font-size-asian="12pt" style:font-weight-asian="normal" style:font-size-complex="12pt" style:font-weight-complex="normal"/>
    </style:style>
    <style:style style:name="T1120" style:family="text">
      <style:text-properties officeooo:rsid="02c91c66"/>
    </style:style>
    <style:style style:name="T1121" style:family="text">
      <style:text-properties style:font-name="Courier" officeooo:rsid="02c91c66"/>
    </style:style>
    <style:style style:name="T1122" style:family="text">
      <style:text-properties fo:font-size="10pt" officeooo:rsid="02c91c66" style:font-size-asian="10pt" style:font-size-complex="10pt"/>
    </style:style>
    <style:style style:name="T1123" style:family="text">
      <style:text-properties officeooo:rsid="02d3bd36"/>
    </style:style>
    <style:style style:name="T1124" style:family="text">
      <style:text-properties officeooo:rsid="02e04e87"/>
    </style:style>
    <style:style style:name="T1125" style:family="text">
      <style:text-properties officeooo:rsid="02df987a"/>
    </style:style>
    <style:style style:name="T1126" style:family="text">
      <style:text-properties style:use-window-font-color="true" loext:opacity="0%" fo:font-size="12pt" fo:font-weight="bold" officeooo:rsid="02df987a" style:font-size-asian="12pt" style:font-weight-asian="bold" style:font-size-complex="12pt" style:font-weight-complex="bold"/>
    </style:style>
    <style:style style:name="T1127" style:family="text">
      <style:text-properties style:use-window-font-color="true" loext:opacity="0%" fo:font-size="12pt" fo:font-weight="normal" officeooo:rsid="02df987a" style:font-size-asian="12pt" style:font-weight-asian="normal" style:font-size-complex="12pt" style:font-weight-complex="normal"/>
    </style:style>
    <style:style style:name="T1128" style:family="text">
      <style:text-properties style:use-window-font-color="true" loext:opacity="0%" fo:font-size="12pt" fo:font-weight="normal" officeooo:rsid="02e04e87" style:font-size-asian="12pt" style:font-weight-asian="normal" style:font-size-complex="12pt" style:font-weight-complex="normal"/>
    </style:style>
    <style:style style:name="T1129" style:family="text">
      <style:text-properties style:font-name="Courier" fo:font-size="12pt" officeooo:rsid="02e04e87" style:font-size-asian="12pt" style:font-size-complex="12pt"/>
    </style:style>
    <style:style style:name="T1130" style:family="text">
      <style:text-properties style:use-window-font-color="true" loext:opacity="0%" fo:font-size="12pt" fo:font-weight="normal" officeooo:rsid="02e169a9" style:font-size-asian="12pt" style:font-weight-asian="normal" style:font-size-complex="12pt" style:font-weight-complex="normal"/>
    </style:style>
    <style:style style:name="T1131" style:family="text">
      <style:text-properties style:use-window-font-color="true" loext:opacity="0%" fo:font-size="12pt" fo:font-weight="normal" officeooo:rsid="0618a981" style:font-size-asian="12pt" style:font-weight-asian="normal" style:font-size-complex="12pt" style:font-weight-complex="normal"/>
    </style:style>
    <style:style style:name="T1132" style:family="text">
      <style:text-properties style:font-name="Courier" fo:font-size="12pt" officeooo:rsid="02df987a" style:font-size-asian="12pt" style:font-size-complex="12pt"/>
    </style:style>
    <style:style style:name="T1133" style:family="text">
      <style:text-properties style:font-name="Courier" officeooo:rsid="02e04e87"/>
    </style:style>
    <style:style style:name="T1134" style:family="text">
      <style:text-properties fo:font-size="10pt" officeooo:rsid="02e04e87" style:font-size-asian="10pt" style:font-size-complex="10pt"/>
    </style:style>
    <style:style style:name="T1135" style:family="text">
      <style:text-properties style:use-window-font-color="true" loext:opacity="0%" fo:font-size="12pt" fo:font-weight="normal" officeooo:rsid="02e21b4e" style:font-size-asian="12pt" style:font-weight-asian="normal" style:font-size-complex="12pt" style:font-weight-complex="normal"/>
    </style:style>
    <style:style style:name="T1136" style:family="text">
      <style:text-properties officeooo:rsid="02e21b4e"/>
    </style:style>
    <style:style style:name="T1137" style:family="text">
      <style:text-properties style:font-name="Courier" fo:font-size="10pt" officeooo:rsid="02e04e87" style:font-size-asian="10pt" style:font-size-complex="10pt"/>
    </style:style>
    <style:style style:name="T1138" style:family="text">
      <style:text-properties style:use-window-font-color="true" loext:opacity="0%" fo:font-size="12pt" fo:font-weight="normal" officeooo:rsid="02e2da41" style:font-size-asian="12pt" style:font-weight-asian="normal" style:font-size-complex="12pt" style:font-weight-complex="normal"/>
    </style:style>
    <style:style style:name="T1139" style:family="text">
      <style:text-properties fo:color="#008000" loext:opacity="100%" style:font-name="Courier" fo:font-size="11pt" fo:font-weight="normal" fo:background-color="#ffffff" loext:char-shading-value="0" style:font-size-asian="11pt" style:font-size-complex="11pt"/>
    </style:style>
    <style:style style:name="T1140" style:family="text">
      <style:text-properties style:use-window-font-color="true" loext:opacity="0%" fo:font-size="12pt" fo:font-weight="normal" officeooo:rsid="02e4a7f1" style:font-size-asian="12pt" style:font-weight-asian="normal" style:font-size-complex="12pt" style:font-weight-complex="normal"/>
    </style:style>
    <style:style style:name="T1141" style:family="text">
      <style:text-properties style:use-window-font-color="true" loext:opacity="0%" fo:font-size="12pt" fo:font-weight="bold" officeooo:rsid="02e59781" style:font-size-asian="12pt" style:font-weight-asian="bold" style:font-size-complex="12pt" style:font-weight-complex="bold"/>
    </style:style>
    <style:style style:name="T1142" style:family="text">
      <style:text-properties style:use-window-font-color="true" loext:opacity="0%" fo:font-size="12pt" fo:font-weight="normal" officeooo:rsid="02e59781" style:font-size-asian="12pt" style:font-weight-asian="normal" style:font-size-complex="12pt" style:font-weight-complex="normal"/>
    </style:style>
    <style:style style:name="T1143" style:family="text">
      <style:text-properties style:use-window-font-color="true" loext:opacity="0%" fo:font-size="12pt" fo:font-weight="normal" officeooo:rsid="02e5b8c6" style:font-size-asian="12pt" style:font-weight-asian="normal" style:font-size-complex="12pt" style:font-weight-complex="normal"/>
    </style:style>
    <style:style style:name="T1144" style:family="text">
      <style:text-properties style:use-window-font-color="true" loext:opacity="0%" style:font-name="Courier" fo:font-size="12pt" fo:font-weight="normal" officeooo:rsid="02df987a" style:font-size-asian="12pt" style:font-weight-asian="normal" style:font-size-complex="12pt" style:font-weight-complex="normal"/>
    </style:style>
    <style:style style:name="T1145" style:family="text">
      <style:text-properties style:use-window-font-color="true" loext:opacity="0%" fo:font-size="13pt" fo:font-weight="bold" officeooo:rsid="05ca6118" style:font-size-asian="13pt" style:font-weight-asian="bold" style:font-size-complex="13pt" style:font-weight-complex="bold"/>
    </style:style>
    <style:style style:name="T1146" style:family="text">
      <style:text-properties style:use-window-font-color="true" loext:opacity="0%" style:font-name="Courier" fo:font-size="13pt" fo:font-weight="bold" officeooo:rsid="05ca6118" style:font-size-asian="13pt" style:font-weight-asian="bold" style:font-size-complex="13pt" style:font-weight-complex="bold"/>
    </style:style>
    <style:style style:name="T1147" style:family="text">
      <style:text-properties officeooo:rsid="02e64bd8"/>
    </style:style>
    <style:style style:name="T1148" style:family="text">
      <style:text-properties style:font-name="Courier" officeooo:rsid="02e64bd8"/>
    </style:style>
    <style:style style:name="T1149" style:family="text">
      <style:text-properties fo:font-size="10pt" officeooo:rsid="02e64bd8" style:font-size-asian="10pt" style:font-size-complex="10pt"/>
    </style:style>
    <style:style style:name="T1150" style:family="text">
      <style:text-properties fo:color="#000000" loext:opacity="100%" style:font-name="Courier" fo:font-size="11pt" fo:font-style="normal" fo:font-weight="normal" fo:background-color="#ffffff" loext:char-shading-value="0" style:font-size-asian="11pt" style:font-style-asian="normal" style:font-size-complex="11pt" style:font-style-complex="normal"/>
    </style:style>
    <style:style style:name="T1151" style:family="text">
      <style:text-properties officeooo:rsid="02ece2f4"/>
    </style:style>
    <style:style style:name="T1152" style:family="text">
      <style:text-properties officeooo:rsid="059baf75"/>
    </style:style>
    <style:style style:name="T1153" style:family="text">
      <style:text-properties style:use-window-font-color="true" loext:opacity="0%" fo:font-size="12pt" fo:font-weight="normal" officeooo:rsid="02eb45d4" style:font-size-asian="12pt" style:font-weight-asian="normal" style:font-size-complex="12pt" style:font-weight-complex="normal"/>
    </style:style>
    <style:style style:name="T1154" style:family="text">
      <style:text-properties style:use-window-font-color="true" loext:opacity="0%" fo:font-size="12pt" fo:font-weight="normal" officeooo:rsid="02ec607d" style:font-size-asian="12pt" style:font-weight-asian="normal" style:font-size-complex="12pt" style:font-weight-complex="normal"/>
    </style:style>
    <style:style style:name="T1155" style:family="text">
      <style:text-properties style:use-window-font-color="true" loext:opacity="0%" fo:font-size="12pt" fo:font-weight="normal" officeooo:rsid="02f093a5" style:font-size-asian="12pt" style:font-weight-asian="normal" style:font-size-complex="12pt" style:font-weight-complex="normal"/>
    </style:style>
    <style:style style:name="T1156" style:family="text">
      <style:text-properties officeooo:rsid="02f093a5" style:font-size-asian="12pt"/>
    </style:style>
    <style:style style:name="T1157" style:family="text">
      <style:text-properties style:use-window-font-color="true" loext:opacity="0%" fo:font-size="10pt" officeooo:rsid="02f093a5" style:font-size-asian="10pt" style:font-size-complex="10pt"/>
    </style:style>
    <style:style style:name="T1158" style:family="text">
      <style:text-properties style:use-window-font-color="true" loext:opacity="0%" fo:font-size="10pt" fo:font-weight="normal" officeooo:rsid="02f093a5" fo:background-color="#ffffff" loext:char-shading-value="0" style:font-size-asian="10pt" style:font-size-complex="10pt"/>
    </style:style>
    <style:style style:name="T1159" style:family="text">
      <style:text-properties officeooo:rsid="02f3045e"/>
    </style:style>
    <style:style style:name="T1160" style:family="text">
      <style:text-properties style:use-window-font-color="true" loext:opacity="0%" style:font-name="Liberation Serif" fo:font-size="12pt" fo:font-weight="normal" officeooo:rsid="02f46e35" style:font-size-asian="10.5pt" style:font-weight-asian="normal" style:font-size-complex="12pt" style:font-weight-complex="normal"/>
    </style:style>
    <style:style style:name="T1161" style:family="text">
      <style:text-properties officeooo:rsid="02f46e35"/>
    </style:style>
    <style:style style:name="T1162" style:family="text">
      <style:text-properties style:font-name="Liberation Serif" officeooo:rsid="02f46e35"/>
    </style:style>
    <style:style style:name="T1163" style:family="text">
      <style:text-properties style:font-name="Liberation Serif" officeooo:rsid="02f6c4b4"/>
    </style:style>
    <style:style style:name="T1164" style:family="text">
      <style:text-properties style:use-window-font-color="true" loext:opacity="0%" fo:font-size="10pt" officeooo:rsid="02f5430c" style:font-size-asian="10pt" style:font-size-complex="10pt"/>
    </style:style>
    <style:style style:name="T1165" style:family="text">
      <style:text-properties style:use-window-font-color="true" loext:opacity="0%" fo:font-size="10pt" officeooo:rsid="02f6c4b4" style:font-size-asian="10pt" style:font-size-complex="10pt"/>
    </style:style>
    <style:style style:name="T1166" style:family="text">
      <style:text-properties style:use-window-font-color="true" loext:opacity="0%" fo:font-size="10pt" officeooo:rsid="02fc7d75" style:font-size-asian="10pt" style:font-size-complex="10pt"/>
    </style:style>
    <style:style style:name="T1167" style:family="text">
      <style:text-properties style:font-size-asian="11pt" style:font-size-complex="11pt"/>
    </style:style>
    <style:style style:name="T1168" style:family="text">
      <style:text-properties fo:color="#098658" loext:opacity="100%" style:font-size-asian="11pt" style:font-size-complex="11pt"/>
    </style:style>
    <style:style style:name="T1169" style:family="text">
      <style:text-properties officeooo:rsid="02f5430c"/>
    </style:style>
    <style:style style:name="T1170" style:family="text">
      <style:text-properties fo:color="#0000ff" loext:opacity="100%" officeooo:rsid="02f5430c"/>
    </style:style>
    <style:style style:name="T1171" style:family="text">
      <style:text-properties style:use-window-font-color="true" loext:opacity="0%" fo:font-size="10pt" officeooo:rsid="02fe4b38" style:font-size-asian="10pt" style:font-size-complex="10pt"/>
    </style:style>
    <style:style style:name="T1172" style:family="text">
      <style:text-properties style:use-window-font-color="true" loext:opacity="0%" fo:font-size="10pt" fo:font-weight="normal" officeooo:rsid="02f6c4b4" fo:background-color="#ffffff" loext:char-shading-value="0" style:font-size-asian="10pt" style:font-size-complex="10pt"/>
    </style:style>
    <style:style style:name="T1173" style:family="text">
      <style:text-properties style:use-window-font-color="true" loext:opacity="0%" fo:font-size="10pt" fo:font-weight="normal" officeooo:rsid="02fe4b38" fo:background-color="#ffffff" loext:char-shading-value="0" style:font-size-asian="10pt" style:font-size-complex="10pt"/>
    </style:style>
    <style:style style:name="T1174" style:family="text">
      <style:text-properties style:use-window-font-color="true" loext:opacity="0%" fo:font-size="10pt" fo:font-weight="normal" officeooo:rsid="02f5430c" fo:background-color="#ffffff" loext:char-shading-value="0" style:font-size-asian="10pt" style:font-size-complex="10pt"/>
    </style:style>
    <style:style style:name="T1175" style:family="text">
      <style:text-properties style:use-window-font-color="true" loext:opacity="0%" fo:font-size="12pt" fo:font-weight="normal" officeooo:rsid="0303d6d8" style:font-size-asian="10.5pt" style:font-weight-asian="normal" style:font-size-complex="12pt" style:font-weight-complex="normal"/>
    </style:style>
    <style:style style:name="T1176" style:family="text">
      <style:text-properties style:use-window-font-color="true" loext:opacity="0%" style:font-name="Courier" fo:font-size="12pt" fo:font-weight="normal" officeooo:rsid="0303d6d8" style:font-size-asian="10.5pt" style:font-weight-asian="normal" style:font-size-complex="12pt" style:font-weight-complex="normal"/>
    </style:style>
    <style:style style:name="T1177" style:family="text">
      <style:text-properties officeooo:rsid="0303d6d8"/>
    </style:style>
    <style:style style:name="T1178" style:family="text">
      <style:text-properties fo:font-size="12pt" officeooo:rsid="14c4e220" style:font-size-asian="12pt" style:font-size-complex="12pt"/>
    </style:style>
    <style:style style:name="T1179" style:family="text">
      <style:text-properties fo:color="#00a933" loext:opacity="100%" fo:font-size="12pt" style:text-underline-style="solid" style:text-underline-width="auto" style:text-underline-color="font-color" officeooo:rsid="030b856f" fo:background-color="transparent" loext:char-shading-value="0" style:font-size-asian="12pt" style:font-size-complex="12pt"/>
    </style:style>
    <style:style style:name="T1180" style:family="text">
      <style:text-properties fo:color="#00a933" loext:opacity="100%" fo:font-size="12pt" style:text-underline-style="solid" style:text-underline-width="auto" style:text-underline-color="font-color" officeooo:rsid="030c1017" fo:background-color="transparent" loext:char-shading-value="0" style:font-size-asian="12pt" style:font-size-complex="12pt"/>
    </style:style>
    <style:style style:name="T1181" style:family="text">
      <style:text-properties fo:font-size="12pt" officeooo:rsid="0303d6d8" style:font-size-asian="12pt" style:font-size-complex="12pt"/>
    </style:style>
    <style:style style:name="T1182" style:family="text">
      <style:text-properties fo:font-size="12pt" style:font-size-asian="12pt" style:font-size-complex="12pt"/>
    </style:style>
    <style:style style:name="T1183" style:family="text">
      <style:text-properties style:use-window-font-color="true" loext:opacity="0%" fo:font-size="12pt" fo:font-weight="normal" officeooo:rsid="0306f702" style:font-size-asian="10.5pt" style:font-weight-asian="normal" style:font-size-complex="12pt" style:font-weight-complex="normal"/>
    </style:style>
    <style:style style:name="T1184" style:family="text">
      <style:text-properties style:use-window-font-color="true" loext:opacity="0%" style:font-name="Courier" fo:font-size="12pt" fo:font-weight="normal" officeooo:rsid="0302e7e4" style:font-size-asian="10.5pt" style:font-weight-asian="normal" style:font-size-complex="12pt" style:font-weight-complex="normal"/>
    </style:style>
    <style:style style:name="T1185" style:family="text">
      <style:text-properties style:use-window-font-color="true" loext:opacity="0%" style:font-name="Courier" fo:font-size="12pt" fo:font-weight="normal" officeooo:rsid="0306f702" style:font-size-asian="10.5pt" style:font-weight-asian="normal" style:font-size-complex="12pt" style:font-weight-complex="normal"/>
    </style:style>
    <style:style style:name="T1186" style:family="text">
      <style:text-properties officeooo:rsid="0306f702"/>
    </style:style>
    <style:style style:name="T1187" style:family="text">
      <style:text-properties style:font-name="Courier" officeooo:rsid="0306f702"/>
    </style:style>
    <style:style style:name="T1188" style:family="text">
      <style:text-properties fo:font-size="10pt" officeooo:rsid="0306f702" style:font-size-asian="10pt" style:font-size-complex="10pt"/>
    </style:style>
    <style:style style:name="T1189" style:family="text">
      <style:text-properties style:font-name="Courier" fo:font-size="10pt" officeooo:rsid="0306f702" style:font-size-asian="10pt" style:font-size-complex="10pt"/>
    </style:style>
    <style:style style:name="T1190" style:family="text">
      <style:text-properties officeooo:rsid="0302e7e4"/>
    </style:style>
    <style:style style:name="T1191" style:family="text">
      <style:text-properties style:use-window-font-color="true" loext:opacity="0%" fo:font-size="13pt" fo:font-weight="bold" officeooo:rsid="059bfa11" style:font-size-asian="13pt" style:font-weight-asian="bold" style:font-size-complex="13pt" style:font-weight-complex="bold"/>
    </style:style>
    <style:style style:name="T1192" style:family="text">
      <style:text-properties style:use-window-font-color="true" loext:opacity="0%" fo:font-size="13pt" fo:font-weight="bold" officeooo:rsid="030f2e60" style:font-size-asian="13pt" style:font-weight-asian="bold" style:font-size-complex="13pt" style:font-weight-complex="bold"/>
    </style:style>
    <style:style style:name="T1193" style:family="text">
      <style:text-properties style:use-window-font-color="true" loext:opacity="0%" fo:font-size="12pt" fo:font-weight="normal" officeooo:rsid="0315c937" style:font-size-asian="10.5pt" style:font-weight-asian="normal" style:font-size-complex="12pt" style:font-weight-complex="normal"/>
    </style:style>
    <style:style style:name="T1194" style:family="text">
      <style:text-properties style:use-window-font-color="true" loext:opacity="0%" style:font-name="Courier" fo:font-size="12pt" fo:font-weight="normal" officeooo:rsid="0315c937" style:font-size-asian="10.5pt" style:font-weight-asian="normal" style:font-size-complex="12pt" style:font-weight-complex="normal"/>
    </style:style>
    <style:style style:name="T1195" style:family="text">
      <style:text-properties officeooo:rsid="030ffcf3"/>
    </style:style>
    <style:style style:name="T1196" style:family="text">
      <style:text-properties fo:font-size="10pt" officeooo:rsid="030ffcf3" style:font-size-asian="10pt" style:font-size-complex="10pt"/>
    </style:style>
    <style:style style:name="T1197" style:family="text">
      <style:text-properties style:use-window-font-color="true" loext:opacity="0%" fo:font-size="10pt" officeooo:rsid="03197a41" style:font-size-asian="10pt" style:font-size-complex="10pt"/>
    </style:style>
    <style:style style:name="T1198" style:family="text">
      <style:text-properties style:use-window-font-color="true" loext:opacity="0%" style:font-name="Courier" fo:font-size="10pt" fo:font-weight="normal" officeooo:rsid="03197a41" fo:background-color="#ffffff" loext:char-shading-value="0" style:font-size-asian="10pt" style:font-size-complex="10pt"/>
    </style:style>
    <style:style style:name="T1199" style:family="text">
      <style:text-properties style:use-window-font-color="true" loext:opacity="0%" fo:font-size="10pt" fo:font-weight="normal" officeooo:rsid="03197a41" fo:background-color="#ffffff" loext:char-shading-value="0" style:font-size-asian="10pt" style:font-size-complex="10pt"/>
    </style:style>
    <style:style style:name="T1200" style:family="text">
      <style:text-properties style:use-window-font-color="true" loext:opacity="0%" fo:font-size="12pt" fo:font-weight="normal" officeooo:rsid="031d40cd" style:font-size-asian="10.5pt" style:font-weight-asian="normal" style:font-size-complex="12pt" style:font-weight-complex="normal"/>
    </style:style>
    <style:style style:name="T1201" style:family="text">
      <style:text-properties style:use-window-font-color="true" loext:opacity="0%" fo:font-size="12pt" fo:font-weight="normal" officeooo:rsid="061d1025" style:font-size-asian="10.5pt" style:font-weight-asian="normal" style:font-size-complex="12pt" style:font-weight-complex="normal"/>
    </style:style>
    <style:style style:name="T1202" style:family="text">
      <style:text-properties style:use-window-font-color="true" loext:opacity="0%" style:font-name="Courier" fo:font-size="12pt" fo:font-style="normal" fo:font-weight="normal" officeooo:rsid="031bc9f6" style:font-size-asian="10.5pt" style:font-style-asian="normal" style:font-weight-asian="normal" style:font-size-complex="12pt" style:font-style-complex="normal" style:font-weight-complex="normal"/>
    </style:style>
    <style:style style:name="T1203" style:family="text">
      <style:text-properties officeooo:rsid="031d40cd"/>
    </style:style>
    <style:style style:name="T1204" style:family="text">
      <style:text-properties style:font-name="Courier" officeooo:rsid="031d40cd"/>
    </style:style>
    <style:style style:name="T1205" style:family="text">
      <style:text-properties fo:font-size="10pt" officeooo:rsid="031d40cd" style:font-size-asian="10pt" style:font-size-complex="10pt"/>
    </style:style>
    <style:style style:name="T1206" style:family="text">
      <style:text-properties fo:color="#3465a4" loext:opacity="100%" style:font-name="Courier" fo:font-size="11pt" fo:font-weight="normal" fo:background-color="#ffffff" loext:char-shading-value="0" style:font-size-asian="11pt" style:font-size-complex="11pt"/>
    </style:style>
    <style:style style:name="T1207" style:family="text">
      <style:text-properties style:use-window-font-color="true" loext:opacity="0%" fo:font-size="12pt" fo:font-weight="normal" officeooo:rsid="031e576c" style:font-size-asian="10.5pt" style:font-weight-asian="normal" style:font-size-complex="12pt" style:font-weight-complex="normal"/>
    </style:style>
    <style:style style:name="T1208" style:family="text">
      <style:text-properties style:use-window-font-color="true" loext:opacity="0%" style:font-name="Courier" fo:font-size="12pt" fo:font-weight="normal" officeooo:rsid="031e576c" style:font-size-asian="10.5pt" style:font-weight-asian="normal" style:font-size-complex="12pt" style:font-weight-complex="normal"/>
    </style:style>
    <style:style style:name="T1209" style:family="text">
      <style:text-properties style:use-window-font-color="true" loext:opacity="0%" fo:font-size="12pt" fo:font-style="italic" fo:font-weight="normal" officeooo:rsid="031e576c" style:font-size-asian="10.5pt" style:font-style-asian="italic" style:font-weight-asian="normal" style:font-size-complex="12pt" style:font-style-complex="italic" style:font-weight-complex="normal"/>
    </style:style>
    <style:style style:name="T1210" style:family="text">
      <style:text-properties style:use-window-font-color="true" loext:opacity="0%" fo:font-size="12pt" fo:font-weight="normal" officeooo:rsid="031f1c80" style:font-size-asian="10.5pt" style:font-weight-asian="normal" style:font-size-complex="12pt" style:font-weight-complex="normal"/>
    </style:style>
    <style:style style:name="T1211" style:family="text">
      <style:text-properties style:use-window-font-color="true" loext:opacity="0%" fo:font-size="12pt" fo:font-weight="normal" officeooo:rsid="0318b321" style:font-size-asian="10.5pt" style:font-weight-asian="normal" style:font-size-complex="12pt" style:font-weight-complex="normal"/>
    </style:style>
    <style:style style:name="T1212" style:family="text">
      <style:text-properties fo:color="#00a933" loext:opacity="100%" style:text-underline-style="solid" style:text-underline-width="auto" style:text-underline-color="font-color" officeooo:rsid="030b856f" fo:background-color="transparent" loext:char-shading-value="0" style:font-size-asian="12pt"/>
    </style:style>
    <style:style style:name="T1213" style:family="text">
      <style:text-properties fo:color="#00a933" loext:opacity="100%" style:text-underline-style="solid" style:text-underline-width="auto" style:text-underline-color="font-color" officeooo:rsid="030c1017" fo:background-color="transparent" loext:char-shading-value="0" style:font-size-asian="12pt"/>
    </style:style>
    <style:style style:name="T1214" style:family="text">
      <style:text-properties officeooo:rsid="0318b321" style:font-size-asian="12pt"/>
    </style:style>
    <style:style style:name="T1215" style:family="text">
      <style:text-properties fo:color="#00a933" loext:opacity="100%" style:text-underline-style="solid" style:text-underline-width="auto" style:text-underline-color="font-color" officeooo:rsid="030b856f" fo:background-color="transparent" loext:char-shading-value="0"/>
    </style:style>
    <style:style style:name="T1216" style:family="text">
      <style:text-properties fo:color="#00a933" loext:opacity="100%" style:text-underline-style="solid" style:text-underline-width="auto" style:text-underline-color="font-color" officeooo:rsid="030c1017" fo:background-color="transparent" loext:char-shading-value="0"/>
    </style:style>
    <style:style style:name="T1217" style:family="text">
      <style:text-properties officeooo:rsid="0318b321"/>
    </style:style>
    <style:style style:name="T1218" style:family="text">
      <style:text-properties officeooo:rsid="05ca6118"/>
    </style:style>
    <style:style style:name="T1219" style:family="text">
      <style:text-properties officeooo:rsid="061d1025"/>
    </style:style>
    <style:style style:name="T1220" style:family="text">
      <style:text-properties style:use-window-font-color="true" loext:opacity="0%" fo:font-size="12pt" fo:font-weight="normal" officeooo:rsid="05ca6118" style:font-size-asian="10.5pt" style:font-weight-asian="normal" style:font-size-complex="12pt" style:font-weight-complex="normal"/>
    </style:style>
    <style:style style:name="T1221" style:family="text">
      <style:text-properties style:use-window-font-color="true" loext:opacity="0%" style:font-name="Courier" fo:font-size="12pt" fo:font-weight="normal" officeooo:rsid="0318b321" style:font-size-asian="10.5pt" style:font-weight-asian="normal" style:font-size-complex="12pt" style:font-weight-complex="normal"/>
    </style:style>
    <style:style style:name="T1222" style:family="text">
      <style:text-properties officeooo:rsid="053f29f4"/>
    </style:style>
    <style:style style:name="T1223" style:family="text">
      <style:text-properties officeooo:rsid="03438345"/>
    </style:style>
    <style:style style:name="T1224" style:family="text">
      <style:text-properties style:use-window-font-color="true" loext:opacity="0%" fo:font-size="12pt" fo:font-weight="normal" officeooo:rsid="0331283c" style:font-size-asian="10.5pt" style:font-weight-asian="normal" style:font-size-complex="12pt" style:font-weight-complex="normal"/>
    </style:style>
    <style:style style:name="T1225" style:family="text">
      <style:text-properties style:use-window-font-color="true" loext:opacity="0%" style:font-name="Courier" fo:font-size="12pt" fo:font-weight="normal" officeooo:rsid="0331283c" style:font-size-asian="10.5pt" style:font-weight-asian="normal" style:font-size-complex="12pt" style:font-weight-complex="normal"/>
    </style:style>
    <style:style style:name="T1226" style:family="text">
      <style:text-properties officeooo:rsid="059bfa11"/>
    </style:style>
    <style:style style:name="T1227" style:family="text">
      <style:text-properties officeooo:rsid="0345ea21"/>
    </style:style>
    <style:style style:name="T1228" style:family="text">
      <style:text-properties style:font-name="Courier" officeooo:rsid="03450b33"/>
    </style:style>
    <style:style style:name="T1229" style:family="text">
      <style:text-properties officeooo:rsid="03a0b32f"/>
    </style:style>
    <style:style style:name="T1230" style:family="text">
      <style:text-properties style:font-name="Courier" fo:font-size="10pt" officeooo:rsid="0349a6cd" style:font-size-asian="10pt" style:font-size-complex="10pt"/>
    </style:style>
    <style:style style:name="T1231" style:family="text">
      <style:text-properties fo:font-size="10pt" officeooo:rsid="03a0b32f" style:font-size-asian="10pt" style:font-size-complex="10pt"/>
    </style:style>
    <style:style style:name="T1232" style:family="text">
      <style:text-properties officeooo:rsid="035e1d00"/>
    </style:style>
    <style:style style:name="T1233" style:family="text">
      <style:text-properties style:use-window-font-color="true" loext:opacity="0%" fo:font-size="12pt" fo:font-weight="normal" officeooo:rsid="061ededb" style:font-size-asian="10.5pt" style:font-weight-asian="normal" style:font-size-complex="12pt" style:font-weight-complex="normal"/>
    </style:style>
    <style:style style:name="T1234" style:family="text">
      <style:text-properties style:use-window-font-color="true" loext:opacity="0%" fo:font-size="12pt" fo:font-weight="normal" officeooo:rsid="03330fb0" style:font-size-asian="10.5pt" style:font-weight-asian="normal" style:font-size-complex="12pt" style:font-weight-complex="normal"/>
    </style:style>
    <style:style style:name="T1235" style:family="text">
      <style:text-properties style:use-window-font-color="true" loext:opacity="0%" fo:font-size="12pt" fo:font-weight="normal" officeooo:rsid="035eada5" style:font-size-asian="10.5pt" style:font-weight-asian="normal" style:font-size-complex="12pt" style:font-weight-complex="normal"/>
    </style:style>
    <style:style style:name="T1236" style:family="text">
      <style:text-properties style:use-window-font-color="true" loext:opacity="0%" fo:font-size="12pt" fo:font-weight="normal" officeooo:rsid="03341c6e" style:font-size-asian="10.5pt" style:font-weight-asian="normal" style:font-size-complex="12pt" style:font-weight-complex="normal"/>
    </style:style>
    <style:style style:name="T1237" style:family="text">
      <style:text-properties style:use-window-font-color="true" loext:opacity="0%" style:font-name="Courier" fo:font-size="12pt" fo:font-weight="normal" officeooo:rsid="03473369" style:font-size-asian="10.5pt" style:font-weight-asian="normal" style:font-size-complex="12pt" style:font-weight-complex="normal"/>
    </style:style>
    <style:style style:name="T1238" style:family="text">
      <style:text-properties officeooo:rsid="0335b208"/>
    </style:style>
    <style:style style:name="T1239" style:family="text">
      <style:text-properties style:font-name="Courier" fo:font-size="10pt" officeooo:rsid="0335b208" style:font-size-asian="10pt" style:font-size-complex="10pt"/>
    </style:style>
    <style:style style:name="T1240" style:family="text">
      <style:text-properties style:use-window-font-color="true" loext:opacity="0%" fo:font-size="12pt" fo:font-weight="normal" officeooo:rsid="03375bdc" style:font-size-asian="10.5pt" style:font-weight-asian="normal" style:font-size-complex="12pt" style:font-weight-complex="normal"/>
    </style:style>
    <style:style style:name="T1241" style:family="text">
      <style:text-properties fo:font-style="italic" officeooo:rsid="0334af00" style:font-style-asian="italic" style:font-style-complex="italic"/>
    </style:style>
    <style:style style:name="T1242" style:family="text">
      <style:text-properties fo:font-style="italic" officeooo:rsid="035d78d6" style:font-style-asian="italic" style:font-style-complex="italic"/>
    </style:style>
    <style:style style:name="T1243" style:family="text">
      <style:text-properties style:use-window-font-color="true" loext:opacity="0%" fo:font-size="12pt" fo:font-weight="normal" officeooo:rsid="034c6816" style:font-size-asian="10.5pt" style:font-weight-asian="normal" style:font-size-complex="12pt" style:font-weight-complex="normal"/>
    </style:style>
    <style:style style:name="T1244" style:family="text">
      <style:text-properties style:use-window-font-color="true" loext:opacity="0%" fo:font-size="12pt" fo:font-weight="normal" officeooo:rsid="034d37e7" style:font-size-asian="10.5pt" style:font-weight-asian="normal" style:font-size-complex="12pt" style:font-weight-complex="normal"/>
    </style:style>
    <style:style style:name="T1245" style:family="text">
      <style:text-properties style:use-window-font-color="true" loext:opacity="0%" fo:font-size="12pt" fo:font-weight="normal" officeooo:rsid="035802d8" style:font-size-asian="10.5pt" style:font-weight-asian="normal" style:font-size-complex="12pt" style:font-weight-complex="normal"/>
    </style:style>
    <style:style style:name="T1246" style:family="text">
      <style:text-properties style:use-window-font-color="true" loext:opacity="0%" fo:font-size="12pt" fo:font-weight="normal" officeooo:rsid="035a62fe" style:font-size-asian="10.5pt" style:font-weight-asian="normal" style:font-size-complex="12pt" style:font-weight-complex="normal"/>
    </style:style>
    <style:style style:name="T1247" style:family="text">
      <style:text-properties style:use-window-font-color="true" loext:opacity="0%" fo:font-size="12pt" fo:font-weight="normal" officeooo:rsid="035c9d6e" style:font-size-asian="10.5pt" style:font-weight-asian="normal" style:font-size-complex="12pt" style:font-weight-complex="normal"/>
    </style:style>
    <style:style style:name="T1248" style:family="text">
      <style:text-properties style:use-window-font-color="true" loext:opacity="0%" fo:font-size="12pt" fo:font-weight="normal" officeooo:rsid="034fecee" style:font-size-asian="10.5pt" style:font-weight-asian="normal" style:font-size-complex="12pt" style:font-weight-complex="normal"/>
    </style:style>
    <style:style style:name="T1249" style:family="text">
      <style:text-properties style:use-window-font-color="true" loext:opacity="0%" fo:font-size="10pt" officeooo:rsid="0356a342" style:font-size-asian="10pt" style:font-size-complex="10pt"/>
    </style:style>
    <style:style style:name="T1250" style:family="text">
      <style:text-properties style:use-window-font-color="true" loext:opacity="0%" fo:font-size="10pt" officeooo:rsid="0356a342" style:font-size-asian="10pt" style:font-weight-asian="normal" style:font-size-complex="10pt" style:font-weight-complex="normal"/>
    </style:style>
    <style:style style:name="T1251" style:family="text">
      <style:text-properties style:use-window-font-color="true" loext:opacity="0%" style:font-name="Courier" fo:font-size="10pt" fo:font-weight="normal" officeooo:rsid="0356a342" fo:background-color="#ffffff" loext:char-shading-value="0" style:font-size-asian="10pt" style:font-weight-asian="normal" style:font-size-complex="10pt" style:font-weight-complex="normal"/>
    </style:style>
    <style:style style:name="T1252" style:family="text">
      <style:text-properties style:use-window-font-color="true" loext:opacity="0%" fo:font-size="10pt" fo:font-weight="normal" officeooo:rsid="0356a342" fo:background-color="#ffffff" loext:char-shading-value="0" style:font-size-asian="10pt" style:font-weight-asian="normal" style:font-size-complex="10pt" style:font-weight-complex="normal"/>
    </style:style>
    <style:style style:name="T1253" style:family="text">
      <style:text-properties style:use-window-font-color="true" loext:opacity="0%" style:font-name="Courier" fo:font-size="10pt" officeooo:rsid="0356a342" fo:background-color="#ffffff" loext:char-shading-value="0" style:font-size-asian="10pt" style:font-weight-asian="normal" style:font-size-complex="10pt" style:font-weight-complex="normal"/>
    </style:style>
    <style:style style:name="T1254" style:family="text">
      <style:text-properties style:font-name="Courier" fo:background-color="#ffffff" loext:char-shading-value="0"/>
    </style:style>
    <style:style style:name="T1255" style:family="text">
      <style:text-properties style:use-window-font-color="true" loext:opacity="0%" fo:font-size="12pt" fo:font-weight="normal" officeooo:rsid="0364778a" style:font-size-asian="10.5pt" style:font-weight-asian="normal" style:font-size-complex="12pt" style:font-weight-complex="normal"/>
    </style:style>
    <style:style style:name="T1256" style:family="text">
      <style:text-properties style:use-window-font-color="true" loext:opacity="0%" style:font-name="Courier" fo:font-size="12pt" fo:font-style="normal" fo:font-weight="normal" officeooo:rsid="036208b6" style:font-size-asian="10.5pt" style:font-style-asian="normal" style:font-weight-asian="normal" style:font-size-complex="12pt" style:font-style-complex="normal" style:font-weight-complex="normal"/>
    </style:style>
    <style:style style:name="T1257" style:family="text">
      <style:text-properties style:use-window-font-color="true" loext:opacity="0%" fo:font-size="12pt" fo:font-weight="normal" officeooo:rsid="0364d7fd" style:font-size-asian="10.5pt" style:font-weight-asian="normal" style:font-size-complex="12pt" style:font-weight-complex="normal"/>
    </style:style>
    <style:style style:name="T1258" style:family="text">
      <style:text-properties officeooo:rsid="0364d7fd"/>
    </style:style>
    <style:style style:name="T1259" style:family="text">
      <style:text-properties style:font-name="Courier" officeooo:rsid="0364d7fd"/>
    </style:style>
    <style:style style:name="T1260" style:family="text">
      <style:text-properties fo:font-size="10pt" officeooo:rsid="0364d7fd" style:font-size-asian="10pt" style:font-size-complex="10pt"/>
    </style:style>
    <style:style style:name="T1261" style:family="text">
      <style:text-properties style:use-window-font-color="true" loext:opacity="0%" fo:font-size="12pt" fo:font-weight="normal" officeooo:rsid="0397b0de" style:font-size-asian="10.5pt" style:font-weight-asian="normal" style:font-size-complex="12pt" style:font-weight-complex="normal"/>
    </style:style>
    <style:style style:name="T1262" style:family="text">
      <style:text-properties style:use-window-font-color="true" loext:opacity="0%" fo:font-size="12pt" fo:font-style="italic" fo:font-weight="normal" officeooo:rsid="0364d7fd" style:font-size-asian="10.5pt" style:font-style-asian="italic" style:font-weight-asian="normal" style:font-size-complex="12pt" style:font-style-complex="italic" style:font-weight-complex="normal"/>
    </style:style>
    <style:style style:name="T1263" style:family="text">
      <style:text-properties style:use-window-font-color="true" loext:opacity="0%" fo:font-size="12pt" fo:font-style="italic" fo:font-weight="normal" officeooo:rsid="061ededb" style:font-size-asian="10.5pt" style:font-style-asian="italic" style:font-weight-asian="normal" style:font-size-complex="12pt" style:font-style-complex="italic" style:font-weight-complex="normal"/>
    </style:style>
    <style:style style:name="T1264" style:family="text">
      <style:text-properties officeooo:rsid="0365ad7d"/>
    </style:style>
    <style:style style:name="T1265" style:family="text">
      <style:text-properties style:use-window-font-color="true" loext:opacity="0%" style:font-name="Courier" fo:font-size="12pt" fo:font-weight="normal" officeooo:rsid="0364d7fd" style:font-size-asian="10.5pt" style:font-weight-asian="normal" style:font-size-complex="12pt" style:font-weight-complex="normal"/>
    </style:style>
    <style:style style:name="T1266" style:family="text">
      <style:text-properties officeooo:rsid="0368d6c9"/>
    </style:style>
    <style:style style:name="T1267" style:family="text">
      <style:text-properties style:font-name="Courier" officeooo:rsid="0368d6c9"/>
    </style:style>
    <style:style style:name="T1268" style:family="text">
      <style:text-properties style:use-window-font-color="true" loext:opacity="0%" fo:font-size="12pt" fo:font-weight="normal" officeooo:rsid="036a5eb4" style:font-size-asian="10.5pt" style:font-weight-asian="normal" style:font-size-complex="12pt" style:font-weight-complex="normal"/>
    </style:style>
    <style:style style:name="T1269" style:family="text">
      <style:text-properties style:use-window-font-color="true" loext:opacity="0%" style:font-name="Courier" fo:font-size="12pt" fo:font-weight="normal" officeooo:rsid="036a5eb4" style:font-size-asian="10.5pt" style:font-weight-asian="normal" style:font-size-complex="12pt" style:font-weight-complex="normal"/>
    </style:style>
    <style:style style:name="T1270" style:family="text">
      <style:text-properties style:font-name="Courier" fo:font-size="10pt" officeooo:rsid="0364d7fd" style:font-size-asian="10pt" style:font-size-complex="10pt"/>
    </style:style>
    <style:style style:name="T1271" style:family="text">
      <style:text-properties style:use-window-font-color="true" loext:opacity="0%" fo:font-size="12pt" fo:font-weight="normal" officeooo:rsid="036bd6e9" style:font-size-asian="10.5pt" style:font-weight-asian="normal" style:font-size-complex="12pt" style:font-weight-complex="normal"/>
    </style:style>
    <style:style style:name="T1272" style:family="text">
      <style:text-properties officeooo:rsid="036dc8db"/>
    </style:style>
    <style:style style:name="T1273" style:family="text">
      <style:text-properties style:font-name="Courier" officeooo:rsid="036dc8db"/>
    </style:style>
    <style:style style:name="T1274" style:family="text">
      <style:text-properties officeooo:rsid="037079f5"/>
    </style:style>
    <style:style style:name="T1275" style:family="text">
      <style:text-properties style:use-window-font-color="true" loext:opacity="0%" style:font-name="Liberation Serif" fo:font-size="12pt" fo:font-weight="normal" officeooo:rsid="0371ef97" style:font-size-asian="10.5pt" style:font-weight-asian="normal" style:font-size-complex="12pt" style:font-weight-complex="normal"/>
    </style:style>
    <style:style style:name="T1276" style:family="text">
      <style:text-properties style:use-window-font-color="true" loext:opacity="0%" style:font-name="Courier" fo:font-size="12pt" fo:font-weight="normal" officeooo:rsid="036bd6e9" style:font-size-asian="10.5pt" style:font-weight-asian="normal" style:font-size-complex="12pt" style:font-weight-complex="normal"/>
    </style:style>
    <style:style style:name="T1277" style:family="text">
      <style:text-properties style:use-window-font-color="true" loext:opacity="0%" style:font-name="Liberation Serif" fo:font-size="12pt" fo:font-weight="normal" officeooo:rsid="03746ba0" style:font-size-asian="10.5pt" style:font-weight-asian="normal" style:font-size-complex="12pt" style:font-weight-complex="normal"/>
    </style:style>
    <style:style style:name="T1278" style:family="text">
      <style:text-properties style:use-window-font-color="true" loext:opacity="0%" style:font-name="Liberation Serif" fo:font-size="12pt" fo:font-weight="normal" officeooo:rsid="06216f4a" style:font-size-asian="10.5pt" style:font-weight-asian="normal" style:font-size-complex="12pt" style:font-weight-complex="normal"/>
    </style:style>
    <style:style style:name="T1279" style:family="text">
      <style:text-properties style:use-window-font-color="true" loext:opacity="0%" style:font-name="Liberation Serif" fo:font-size="12pt" fo:font-weight="normal" officeooo:rsid="03748988" style:font-size-asian="10.5pt" style:font-weight-asian="normal" style:font-size-complex="12pt" style:font-weight-complex="normal"/>
    </style:style>
    <style:style style:name="T1280" style:family="text">
      <style:text-properties style:use-window-font-color="true" loext:opacity="0%" style:font-name="Liberation Serif" fo:font-size="12pt" fo:font-weight="normal" officeooo:rsid="03759cf4" style:font-size-asian="10.5pt" style:font-weight-asian="normal" style:font-size-complex="12pt" style:font-weight-complex="normal"/>
    </style:style>
    <style:style style:name="T1281" style:family="text">
      <style:text-properties style:use-window-font-color="true" loext:opacity="0%" style:font-name="Liberation Serif" fo:font-size="12pt" fo:font-weight="normal" officeooo:rsid="0376f3eb" style:font-size-asian="10.5pt" style:font-weight-asian="normal" style:font-size-complex="12pt" style:font-weight-complex="normal"/>
    </style:style>
    <style:style style:name="T1282" style:family="text">
      <style:text-properties officeooo:rsid="0376f3eb"/>
    </style:style>
    <style:style style:name="T1283" style:family="text">
      <style:text-properties style:use-window-font-color="true" loext:opacity="0%" fo:font-size="10pt" officeooo:rsid="03791af4" style:font-size-asian="10pt" style:font-size-complex="10pt"/>
    </style:style>
    <style:style style:name="T1284" style:family="text">
      <style:text-properties style:use-window-font-color="true" loext:opacity="0%" style:font-name="Courier" fo:font-size="10pt" fo:font-weight="normal" officeooo:rsid="03791af4" fo:background-color="#ffffff" loext:char-shading-value="0" style:font-size-asian="10pt" style:font-size-complex="10pt"/>
    </style:style>
    <style:style style:name="T1285" style:family="text">
      <style:text-properties style:use-window-font-color="true" loext:opacity="0%" fo:font-size="10pt" fo:font-weight="normal" officeooo:rsid="03791af4" fo:background-color="#ffffff" loext:char-shading-value="0" style:font-size-asian="10pt" style:font-size-complex="10pt"/>
    </style:style>
    <style:style style:name="T1286" style:family="text">
      <style:text-properties style:use-window-font-color="true" loext:opacity="0%" fo:font-size="10pt" officeooo:rsid="037a4c0b" style:font-size-asian="10pt" style:font-size-complex="10pt"/>
    </style:style>
    <style:style style:name="T1287" style:family="text">
      <style:text-properties style:use-window-font-color="true" loext:opacity="0%" fo:font-size="10pt" fo:font-weight="normal" officeooo:rsid="037a4c0b" fo:background-color="#ffffff" loext:char-shading-value="0" style:font-size-asian="10pt" style:font-size-complex="10pt"/>
    </style:style>
    <style:style style:name="T1288" style:family="text">
      <style:text-properties officeooo:rsid="03818ed6"/>
    </style:style>
    <style:style style:name="T1289" style:family="text">
      <style:text-properties officeooo:rsid="06216f4a"/>
    </style:style>
    <style:style style:name="T1290" style:family="text">
      <style:text-properties style:font-name="Courier" fo:font-size="12pt" officeooo:rsid="03818ed6" style:font-size-asian="12pt" style:font-size-complex="12pt"/>
    </style:style>
    <style:style style:name="T1291" style:family="text">
      <style:text-properties fo:color="#000000" loext:opacity="100%" style:font-name="Courier" fo:font-size="12pt" fo:font-weight="normal" fo:background-color="#ffffff" loext:char-shading-value="0" style:font-size-asian="10.5pt" style:font-size-complex="12pt"/>
    </style:style>
    <style:style style:name="T1292" style:family="text">
      <style:text-properties officeooo:rsid="0381dc0a"/>
    </style:style>
    <style:style style:name="T1293" style:family="text">
      <style:text-properties style:font-name="Courier" officeooo:rsid="0381dc0a"/>
    </style:style>
    <style:style style:name="T1294" style:family="text">
      <style:text-properties fo:font-size="10pt" officeooo:rsid="0381dc0a" style:font-size-asian="10pt" style:font-size-complex="10pt"/>
    </style:style>
    <style:style style:name="T1295" style:family="text">
      <style:text-properties style:font-name="Courier" fo:font-size="10pt" officeooo:rsid="0381dc0a" style:font-size-asian="10pt" style:font-size-complex="10pt"/>
    </style:style>
    <style:style style:name="T1296" style:family="text">
      <style:text-properties officeooo:rsid="0386f2c6"/>
    </style:style>
    <style:style style:name="T1297" style:family="text">
      <style:text-properties fo:font-style="italic" officeooo:rsid="0386f2c6" style:font-style-asian="italic" style:font-style-complex="italic"/>
    </style:style>
    <style:style style:name="T1298" style:family="text">
      <style:text-properties officeooo:rsid="0387caf9"/>
    </style:style>
    <style:style style:name="T1299" style:family="text">
      <style:text-properties officeooo:rsid="03880ec9"/>
    </style:style>
    <style:style style:name="T1300" style:family="text">
      <style:text-properties officeooo:rsid="038a880b"/>
    </style:style>
    <style:style style:name="T1301" style:family="text">
      <style:text-properties officeooo:rsid="038b9a56"/>
    </style:style>
    <style:style style:name="T1302" style:family="text">
      <style:text-properties officeooo:rsid="038ecc87"/>
    </style:style>
    <style:style style:name="T1303" style:family="text">
      <style:text-properties style:use-window-font-color="true" loext:opacity="0%" style:font-name="Courier" fo:font-size="11pt" fo:font-weight="normal" officeooo:rsid="03791af4" fo:background-color="#ffffff" loext:char-shading-value="0" style:font-size-asian="11pt" style:font-size-complex="11pt"/>
    </style:style>
    <style:style style:name="T1304" style:family="text">
      <style:text-properties fo:color="#0000ff" loext:opacity="100%" style:font-name="Courier" fo:font-size="11pt" fo:font-weight="normal" officeooo:rsid="038ecc87" fo:background-color="#ffffff" loext:char-shading-value="0" style:font-size-asian="11pt" style:font-size-complex="11pt"/>
    </style:style>
    <style:style style:name="T1305" style:family="text">
      <style:text-properties fo:color="#000000" loext:opacity="100%" style:font-name="Courier" fo:font-size="11pt" fo:font-weight="normal" officeooo:rsid="038ecc87" fo:background-color="#ffffff" loext:char-shading-value="0" style:font-size-asian="11pt" style:font-size-complex="11pt"/>
    </style:style>
    <style:style style:name="T1306" style:family="text">
      <style:text-properties fo:color="#000000" loext:opacity="100%" style:font-name="Liberation Serif" fo:font-size="12pt" fo:font-weight="normal" officeooo:rsid="03931870" fo:background-color="#ffffff" loext:char-shading-value="0" style:font-size-asian="10.5pt" style:font-size-complex="12pt"/>
    </style:style>
    <style:style style:name="T1307" style:family="text">
      <style:text-properties officeooo:rsid="03931870"/>
    </style:style>
    <style:style style:name="T1308" style:family="text">
      <style:text-properties style:font-name="Courier" officeooo:rsid="03931870"/>
    </style:style>
    <style:style style:name="T1309" style:family="text">
      <style:text-properties fo:font-size="10pt" officeooo:rsid="03931870" style:font-size-asian="10pt" style:font-size-complex="10pt"/>
    </style:style>
    <style:style style:name="T1310" style:family="text">
      <style:text-properties fo:color="#000000" loext:opacity="100%" style:font-name="Liberation Serif" fo:font-size="12pt" fo:font-weight="normal" officeooo:rsid="038ecc87" fo:background-color="#ffffff" loext:char-shading-value="0" style:font-size-asian="10.5pt" style:font-size-complex="12pt"/>
    </style:style>
    <style:style style:name="T1311" style:family="text">
      <style:text-properties officeooo:rsid="059bfa11" style:font-weight-asian="bold" style:font-weight-complex="bold"/>
    </style:style>
    <style:style style:name="T1312" style:family="text">
      <style:text-properties officeooo:rsid="05a8edf2" style:font-weight-asian="bold" style:font-weight-complex="bold"/>
    </style:style>
    <style:style style:name="T1313" style:family="text">
      <style:text-properties officeooo:rsid="0345ea21" style:font-weight-asian="bold" style:font-weight-complex="bold"/>
    </style:style>
    <style:style style:name="T1314" style:family="text">
      <style:text-properties officeooo:rsid="0398501c" style:font-weight-asian="bold" style:font-weight-complex="bold"/>
    </style:style>
    <style:style style:name="T1315" style:family="text">
      <style:text-properties officeooo:rsid="0368d6c9" style:font-weight-asian="bold" style:font-weight-complex="bold"/>
    </style:style>
    <style:style style:name="T1316" style:family="text">
      <style:text-properties style:font-name="Courier" style:font-weight-asian="bold" style:font-weight-complex="bold"/>
    </style:style>
    <style:style style:name="T1317" style:family="text">
      <style:text-properties style:font-name="Courier" officeooo:rsid="03450b33" style:font-weight-asian="bold" style:font-weight-complex="bold"/>
    </style:style>
    <style:style style:name="T1318" style:family="text">
      <style:text-properties style:font-name="Courier" officeooo:rsid="0398501c" style:font-weight-asian="bold" style:font-weight-complex="bold"/>
    </style:style>
    <style:style style:name="T1319" style:family="text">
      <style:text-properties fo:color="#000000" loext:opacity="100%" style:font-name="Liberation Serif" fo:font-size="12pt" fo:font-weight="normal" officeooo:rsid="039de500" fo:background-color="#ffffff" loext:char-shading-value="0" style:font-size-asian="10.5pt" style:font-size-complex="12pt"/>
    </style:style>
    <style:style style:name="T1320" style:family="text">
      <style:text-properties style:font-name="Courier" fo:font-size="10pt" officeooo:rsid="03931870" style:font-size-asian="10pt" style:font-size-complex="10pt"/>
    </style:style>
    <style:style style:name="T1321" style:family="text">
      <style:text-properties style:use-window-font-color="true" loext:opacity="0%" fo:font-size="12pt" fo:font-weight="normal" officeooo:rsid="039e0cd3" style:font-size-asian="10.5pt" style:font-weight-asian="normal" style:font-size-complex="12pt" style:font-weight-complex="normal"/>
    </style:style>
    <style:style style:name="T1322" style:family="text">
      <style:text-properties style:use-window-font-color="true" loext:opacity="0%" fo:font-size="12pt" fo:font-weight="normal" officeooo:rsid="0622a628" style:font-size-asian="10.5pt" style:font-weight-asian="normal" style:font-size-complex="12pt" style:font-weight-complex="normal"/>
    </style:style>
    <style:style style:name="T1323" style:family="text">
      <style:text-properties style:use-window-font-color="true" loext:opacity="0%" style:font-name="Courier" fo:font-size="12pt" fo:font-weight="normal" officeooo:rsid="039e0cd3" style:font-size-asian="10.5pt" style:font-weight-asian="normal" style:font-size-complex="12pt" style:font-weight-complex="normal"/>
    </style:style>
    <style:style style:name="T1324" style:family="text">
      <style:text-properties officeooo:rsid="0622a628"/>
    </style:style>
    <style:style style:name="T1325" style:family="text">
      <style:text-properties style:font-name="Courier" officeooo:rsid="03a0b32f"/>
    </style:style>
    <style:style style:name="T1326" style:family="text">
      <style:text-properties officeooo:rsid="03a1f3a2"/>
    </style:style>
    <style:style style:name="T1327" style:family="text">
      <style:text-properties style:use-window-font-color="true" loext:opacity="0%" fo:font-size="12pt" fo:font-weight="normal" officeooo:rsid="03a3ed91" style:font-size-asian="10.5pt" style:font-weight-asian="normal" style:font-size-complex="12pt" style:font-weight-complex="normal"/>
    </style:style>
    <style:style style:name="T1328" style:family="text">
      <style:text-properties style:use-window-font-color="true" loext:opacity="0%" style:font-name="Courier" fo:font-size="12pt" fo:font-weight="normal" officeooo:rsid="039f8e49" style:font-size-asian="10.5pt" style:font-weight-asian="normal" style:font-size-complex="12pt" style:font-weight-complex="normal"/>
    </style:style>
    <style:style style:name="T1329" style:family="text">
      <style:text-properties style:use-window-font-color="true" loext:opacity="0%" fo:font-size="12pt" fo:font-weight="normal" officeooo:rsid="03a40cfa" style:font-size-asian="10.5pt" style:font-weight-asian="normal" style:font-size-complex="12pt" style:font-weight-complex="normal"/>
    </style:style>
    <style:style style:name="T1330" style:family="text">
      <style:text-properties officeooo:rsid="03a40cfa"/>
    </style:style>
    <style:style style:name="T1331" style:family="text">
      <style:text-properties style:use-window-font-color="true" loext:opacity="0%" fo:font-size="10pt" officeooo:rsid="03a41113" style:font-size-asian="10pt" style:font-size-complex="10pt"/>
    </style:style>
    <style:style style:name="T1332" style:family="text">
      <style:text-properties style:use-window-font-color="true" loext:opacity="0%" fo:font-size="10pt" officeooo:rsid="03a4eb17" style:font-size-asian="10pt" style:font-size-complex="10pt"/>
    </style:style>
    <style:style style:name="T1333" style:family="text">
      <style:text-properties style:use-window-font-color="true" loext:opacity="0%" fo:font-size="10pt" fo:font-weight="normal" officeooo:rsid="03a4eb17" fo:background-color="#ffffff" loext:char-shading-value="0" style:font-size-asian="10pt" style:font-size-complex="10pt"/>
    </style:style>
    <style:style style:name="T1334" style:family="text">
      <style:text-properties style:use-window-font-color="true" loext:opacity="0%" fo:font-size="10pt" fo:font-weight="normal" officeooo:rsid="03a41113" fo:background-color="#ffffff" loext:char-shading-value="0" style:font-size-asian="10pt" style:font-size-complex="10pt"/>
    </style:style>
    <style:style style:name="T1335" style:family="text">
      <style:text-properties style:use-window-font-color="true" loext:opacity="0%" style:font-name="Courier" fo:font-size="10pt" fo:font-weight="normal" officeooo:rsid="03a41113" fo:background-color="#ffffff" loext:char-shading-value="0" style:font-size-asian="10pt" style:font-size-complex="10pt"/>
    </style:style>
    <style:style style:name="T1336" style:family="text">
      <style:text-properties style:use-window-font-color="true" loext:opacity="0%" style:font-name="Courier" fo:font-size="10pt" fo:font-weight="normal" officeooo:rsid="03a4eb17" fo:background-color="#ffffff" loext:char-shading-value="0" style:font-size-asian="10pt" style:font-size-complex="10pt"/>
    </style:style>
    <style:style style:name="T1337" style:family="text">
      <style:text-properties officeooo:rsid="03ab4ac8"/>
    </style:style>
    <style:style style:name="T1338" style:family="text">
      <style:text-properties officeooo:rsid="03ac52e9"/>
    </style:style>
    <style:style style:name="T1339" style:family="text">
      <style:text-properties style:use-window-font-color="true" loext:opacity="0%" fo:font-size="12pt" fo:font-style="normal" fo:font-weight="normal" officeooo:rsid="03ab4ac8" style:font-size-asian="10.5pt" style:font-style-asian="normal" style:font-weight-asian="normal" style:font-size-complex="12pt" style:font-style-complex="normal" style:font-weight-complex="normal"/>
    </style:style>
    <style:style style:name="T1340" style:family="text">
      <style:text-properties style:use-window-font-color="true" loext:opacity="0%" style:font-name="Courier" fo:font-size="12pt" fo:font-style="normal" fo:font-weight="normal" officeooo:rsid="03ab4ac8" style:font-size-asian="10.5pt" style:font-style-asian="normal" style:font-weight-asian="normal" style:font-size-complex="12pt" style:font-style-complex="normal" style:font-weight-complex="normal"/>
    </style:style>
    <style:style style:name="T1341" style:family="text">
      <style:text-properties style:use-window-font-color="true" loext:opacity="0%" style:font-name="Liberation Serif" fo:font-size="12pt" fo:font-style="normal" fo:font-weight="normal" officeooo:rsid="03ab4ac8" style:font-size-asian="10.5pt" style:font-style-asian="normal" style:font-weight-asian="normal" style:font-size-complex="12pt" style:font-style-complex="normal" style:font-weight-complex="normal"/>
    </style:style>
    <style:style style:name="T1342" style:family="text">
      <style:text-properties officeooo:rsid="059cd2b4"/>
    </style:style>
    <style:style style:name="T1343" style:family="text">
      <style:text-properties officeooo:rsid="03add424"/>
    </style:style>
    <style:style style:name="T1344" style:family="text">
      <style:text-properties style:font-name="Courier" officeooo:rsid="03add424"/>
    </style:style>
    <style:style style:name="T1345" style:family="text">
      <style:text-properties style:use-window-font-color="true" loext:opacity="0%" fo:font-size="12pt" fo:font-style="normal" fo:font-weight="normal" officeooo:rsid="03aec0c1" style:font-size-asian="10.5pt" style:font-style-asian="normal" style:font-weight-asian="normal" style:font-size-complex="12pt" style:font-style-complex="normal" style:font-weight-complex="normal"/>
    </style:style>
    <style:style style:name="T1346" style:family="text">
      <style:text-properties officeooo:rsid="03aec0c1"/>
    </style:style>
    <style:style style:name="T1347" style:family="text">
      <style:text-properties style:font-name="Courier" officeooo:rsid="03aec0c1"/>
    </style:style>
    <style:style style:name="T1348" style:family="text">
      <style:text-properties fo:font-size="10pt" officeooo:rsid="03aec0c1" style:font-size-asian="10pt" style:font-size-complex="10pt"/>
    </style:style>
    <style:style style:name="T1349" style:family="text">
      <style:text-properties style:use-window-font-color="true" loext:opacity="0%" fo:font-size="12pt" fo:font-style="normal" fo:font-weight="normal" officeooo:rsid="03af5d23" style:font-size-asian="10.5pt" style:font-style-asian="normal" style:font-weight-asian="normal" style:font-size-complex="12pt" style:font-style-complex="normal" style:font-weight-complex="normal"/>
    </style:style>
    <style:style style:name="T1350" style:family="text">
      <style:text-properties style:use-window-font-color="true" loext:opacity="0%" fo:font-size="12pt" fo:font-style="normal" fo:font-weight="normal" officeooo:rsid="03b21d47" style:font-size-asian="10.5pt" style:font-style-asian="normal" style:font-weight-asian="normal" style:font-size-complex="12pt" style:font-style-complex="normal" style:font-weight-complex="normal"/>
    </style:style>
    <style:style style:name="T1351" style:family="text">
      <style:text-properties style:use-window-font-color="true" loext:opacity="0%" fo:font-size="12pt" fo:font-style="normal" fo:font-weight="normal" officeooo:rsid="03b3fbcf" style:font-size-asian="10.5pt" style:font-style-asian="normal" style:font-weight-asian="normal" style:font-size-complex="12pt" style:font-style-complex="normal" style:font-weight-complex="normal"/>
    </style:style>
    <style:style style:name="T1352" style:family="text">
      <style:text-properties style:use-window-font-color="true" loext:opacity="0%" fo:font-size="12pt" fo:font-style="normal" fo:font-weight="normal" officeooo:rsid="03b433e2" style:font-size-asian="10.5pt" style:font-style-asian="normal" style:font-weight-asian="normal" style:font-size-complex="12pt" style:font-style-complex="normal" style:font-weight-complex="normal"/>
    </style:style>
    <style:style style:name="T1353" style:family="text">
      <style:text-properties officeooo:rsid="0623e8b1"/>
    </style:style>
    <style:style style:name="T1354" style:family="text">
      <style:text-properties officeooo:rsid="03b880f5"/>
    </style:style>
    <style:style style:name="T1355" style:family="text">
      <style:text-properties style:font-name="Courier" officeooo:rsid="03b880f5"/>
    </style:style>
    <style:style style:name="T1356" style:family="text">
      <style:text-properties style:use-window-font-color="true" loext:opacity="0%" fo:font-size="12pt" fo:font-style="normal" fo:font-weight="normal" officeooo:rsid="03b8ecb3" style:font-size-asian="10.5pt" style:font-style-asian="normal" style:font-weight-asian="normal" style:font-size-complex="12pt" style:font-style-complex="normal" style:font-weight-complex="normal"/>
    </style:style>
    <style:style style:name="T1357" style:family="text">
      <style:text-properties style:use-window-font-color="true" loext:opacity="0%" fo:font-size="12pt" fo:font-style="normal" fo:font-weight="normal" officeooo:rsid="03b97dd7" style:font-size-asian="10.5pt" style:font-style-asian="normal" style:font-weight-asian="normal" style:font-size-complex="12pt" style:font-style-complex="normal" style:font-weight-complex="normal"/>
    </style:style>
    <style:style style:name="T1358" style:family="text">
      <style:text-properties style:use-window-font-color="true" loext:opacity="0%" fo:font-size="12pt" fo:font-style="normal" fo:font-weight="normal" officeooo:rsid="0652db70" style:font-size-asian="10.5pt" style:font-style-asian="normal" style:font-weight-asian="normal" style:font-size-complex="12pt" style:font-style-complex="normal" style:font-weight-complex="normal"/>
    </style:style>
    <style:style style:name="T1359" style:family="text">
      <style:text-properties style:use-window-font-color="true" loext:opacity="0%" fo:font-size="12pt" fo:font-style="normal" fo:font-weight="normal" officeooo:rsid="0623e8b1" style:font-size-asian="10.5pt" style:font-style-asian="normal" style:font-weight-asian="normal" style:font-size-complex="12pt" style:font-style-complex="normal" style:font-weight-complex="normal"/>
    </style:style>
    <style:style style:name="T1360" style:family="text">
      <style:text-properties style:use-window-font-color="true" loext:opacity="0%" fo:font-size="10pt" officeooo:rsid="03beac9b" style:font-size-asian="10pt" style:font-size-complex="10pt"/>
    </style:style>
    <style:style style:name="T1361" style:family="text">
      <style:text-properties style:use-window-font-color="true" loext:opacity="0%" fo:font-size="10pt" officeooo:rsid="03bfbf51" style:font-size-asian="10pt" style:font-size-complex="10pt"/>
    </style:style>
    <style:style style:name="T1362" style:family="text">
      <style:text-properties style:use-window-font-color="true" loext:opacity="0%" style:font-name="Courier" fo:font-size="10pt" fo:font-weight="normal" officeooo:rsid="03beac9b" fo:background-color="#ffffff" loext:char-shading-value="0" style:font-size-asian="10pt" style:font-size-complex="10pt"/>
    </style:style>
    <style:style style:name="T1363" style:family="text">
      <style:text-properties style:use-window-font-color="true" loext:opacity="0%" style:font-name="Courier" fo:font-size="10pt" fo:font-weight="normal" officeooo:rsid="03bfbf51" fo:background-color="#ffffff" loext:char-shading-value="0" style:font-size-asian="10pt" style:font-size-complex="10pt"/>
    </style:style>
    <style:style style:name="T1364" style:family="text">
      <style:text-properties style:use-window-font-color="true" loext:opacity="0%" fo:font-size="10pt" fo:font-weight="normal" officeooo:rsid="03bfbf51" fo:background-color="#ffffff" loext:char-shading-value="0" style:font-size-asian="10pt" style:font-size-complex="10pt"/>
    </style:style>
    <style:style style:name="T1365" style:family="text">
      <style:text-properties style:use-window-font-color="true" loext:opacity="0%" fo:font-size="10pt" fo:font-weight="normal" officeooo:rsid="03beac9b" fo:background-color="#ffffff" loext:char-shading-value="0" style:font-size-asian="10pt" style:font-size-complex="10pt"/>
    </style:style>
    <style:style style:name="T1366" style:family="text">
      <style:text-properties officeooo:rsid="03c2eb3e"/>
    </style:style>
    <style:style style:name="T1367" style:family="text">
      <style:text-properties style:use-window-font-color="true" loext:opacity="0%" fo:font-size="12pt" fo:font-style="normal" fo:font-weight="normal" officeooo:rsid="03c2eb3e" style:font-size-asian="10.5pt" style:font-style-asian="normal" style:font-weight-asian="normal" style:font-size-complex="12pt" style:font-style-complex="normal" style:font-weight-complex="normal"/>
    </style:style>
    <style:style style:name="T1368" style:family="text">
      <style:text-properties style:use-window-font-color="true" loext:opacity="0%" style:font-name="Courier" fo:font-size="12pt" fo:font-style="normal" fo:font-weight="normal" officeooo:rsid="03c2eb3e" style:font-size-asian="10.5pt" style:font-style-asian="normal" style:font-weight-asian="normal" style:font-size-complex="12pt" style:font-style-complex="normal" style:font-weight-complex="normal"/>
    </style:style>
    <style:style style:name="T1369" style:family="text">
      <style:text-properties officeooo:rsid="022d4881"/>
    </style:style>
    <style:style style:name="T1370" style:family="text">
      <style:text-properties officeooo:rsid="03c3a4ec"/>
    </style:style>
    <style:style style:name="T1371" style:family="text">
      <style:text-properties style:use-window-font-color="true" loext:opacity="0%" fo:font-size="12pt" fo:font-weight="normal" officeooo:rsid="03c71af2" style:font-size-asian="10.5pt" style:font-weight-asian="normal" style:font-size-complex="12pt" style:font-weight-complex="normal"/>
    </style:style>
    <style:style style:name="T1372" style:family="text">
      <style:text-properties style:use-window-font-color="true" loext:opacity="0%" style:font-name="Courier" fo:font-size="12pt" fo:font-weight="normal" officeooo:rsid="03c71af2" style:font-size-asian="10.5pt" style:font-weight-asian="normal" style:font-size-complex="12pt" style:font-weight-complex="normal"/>
    </style:style>
    <style:style style:name="T1373" style:family="text">
      <style:text-properties officeooo:rsid="03c71af2"/>
    </style:style>
    <style:style style:name="T1374" style:family="text">
      <style:text-properties style:font-name="Courier" officeooo:rsid="03c71af2"/>
    </style:style>
    <style:style style:name="T1375" style:family="text">
      <style:text-properties fo:font-size="10pt" officeooo:rsid="03c71af2" style:font-size-asian="10pt" style:font-size-complex="10pt"/>
    </style:style>
    <style:style style:name="T1376" style:family="text">
      <style:text-properties style:use-window-font-color="true" loext:opacity="0%" fo:font-size="12pt" fo:font-weight="normal" officeooo:rsid="0625d97e" style:font-size-asian="10.5pt" style:font-weight-asian="normal" style:font-size-complex="12pt" style:font-weight-complex="normal"/>
    </style:style>
    <style:style style:name="T1377" style:family="text">
      <style:text-properties style:font-name="Courier" fo:font-size="10pt" officeooo:rsid="03c71af2" style:font-size-asian="10pt" style:font-size-complex="10pt"/>
    </style:style>
    <style:style style:name="T1378" style:family="text">
      <style:text-properties officeooo:rsid="03c7d97a"/>
    </style:style>
    <style:style style:name="T1379" style:family="text">
      <style:text-properties officeooo:rsid="059f2d50"/>
    </style:style>
    <style:style style:name="T1380" style:family="text">
      <style:text-properties style:use-window-font-color="true" loext:opacity="0%" fo:font-size="12pt" fo:font-weight="normal" officeooo:rsid="03c8f2de" style:font-size-asian="10.5pt" style:font-weight-asian="normal" style:font-size-complex="12pt" style:font-weight-complex="normal"/>
    </style:style>
    <style:style style:name="T1381" style:family="text">
      <style:text-properties officeooo:rsid="0625d97e"/>
    </style:style>
    <style:style style:name="T1382" style:family="text">
      <style:text-properties officeooo:rsid="03ce5603"/>
    </style:style>
    <style:style style:name="T1383" style:family="text">
      <style:text-properties style:use-window-font-color="true" loext:opacity="0%" fo:font-size="12pt" fo:font-weight="bold" officeooo:rsid="03ce5603" style:font-size-asian="10.5pt" style:font-weight-asian="bold" style:font-size-complex="12pt" style:font-weight-complex="bold"/>
    </style:style>
    <style:style style:name="T1384" style:family="text">
      <style:text-properties style:use-window-font-color="true" loext:opacity="0%" fo:font-size="12pt" fo:font-weight="normal" officeooo:rsid="03ce5603" style:font-size-asian="10.5pt" style:font-weight-asian="normal" style:font-size-complex="12pt" style:font-weight-complex="normal"/>
    </style:style>
    <style:style style:name="T1385" style:family="text">
      <style:text-properties style:use-window-font-color="true" loext:opacity="0%" fo:font-size="12pt" fo:font-weight="normal" officeooo:rsid="03cf5d6c" style:font-size-asian="10.5pt" style:font-weight-asian="normal" style:font-size-complex="12pt" style:font-weight-complex="normal"/>
    </style:style>
    <style:style style:name="T1386" style:family="text">
      <style:text-properties style:use-window-font-color="true" loext:opacity="0%" style:font-name="Courier" fo:font-size="12pt" fo:font-weight="normal" officeooo:rsid="03cf5d6c" style:font-size-asian="10.5pt" style:font-weight-asian="normal" style:font-size-complex="12pt" style:font-weight-complex="normal"/>
    </style:style>
    <style:style style:name="T1387" style:family="text">
      <style:text-properties style:use-window-font-color="true" loext:opacity="0%" fo:font-size="10pt" officeooo:rsid="03cfc68a" style:font-size-asian="10pt" style:font-size-complex="10pt"/>
    </style:style>
    <style:style style:name="T1388" style:family="text">
      <style:text-properties style:use-window-font-color="true" loext:opacity="0%" fo:font-size="10pt" fo:font-weight="normal" officeooo:rsid="03cfc68a" fo:background-color="#ffffff" loext:char-shading-value="0" style:font-size-asian="10pt" style:font-size-complex="10pt"/>
    </style:style>
    <style:style style:name="T1389" style:family="text">
      <style:text-properties style:use-window-font-color="true" loext:opacity="0%" style:font-name="Courier" fo:font-size="10pt" fo:font-weight="normal" officeooo:rsid="03cfc68a" fo:background-color="#ffffff" loext:char-shading-value="0" style:font-size-asian="10pt" style:font-size-complex="10pt"/>
    </style:style>
    <style:style style:name="T1390" style:family="text">
      <style:text-properties fo:font-style="italic" fo:font-weight="normal" officeooo:rsid="0625d97e" style:font-style-asian="italic" style:font-weight-asian="normal" style:font-style-complex="italic" style:font-weight-complex="normal"/>
    </style:style>
    <style:style style:name="T1391" style:family="text">
      <style:text-properties officeooo:rsid="03d4694e"/>
    </style:style>
    <style:style style:name="T1392" style:family="text">
      <style:text-properties style:use-window-font-color="true" loext:opacity="0%" fo:font-size="12pt" fo:font-weight="normal" officeooo:rsid="03e1f5ec" style:font-size-asian="10.5pt" style:font-weight-asian="normal" style:font-size-complex="12pt" style:font-weight-complex="normal"/>
    </style:style>
    <style:style style:name="T1393" style:family="text">
      <style:text-properties officeooo:rsid="03dcb6ad"/>
    </style:style>
    <style:style style:name="T1394" style:family="text">
      <style:text-properties style:use-window-font-color="true" loext:opacity="0%" fo:font-size="12pt" fo:font-weight="normal" officeooo:rsid="03df6987" style:font-size-asian="10.5pt" style:font-weight-asian="normal" style:font-size-complex="12pt" style:font-weight-complex="normal"/>
    </style:style>
    <style:style style:name="T1395" style:family="text">
      <style:text-properties style:use-window-font-color="true" loext:opacity="0%" fo:font-size="12pt" fo:font-weight="normal" officeooo:rsid="03e66ca9" style:font-size-asian="10.5pt" style:font-weight-asian="normal" style:font-size-complex="12pt" style:font-weight-complex="normal"/>
    </style:style>
    <style:style style:name="T1396" style:family="text">
      <style:text-properties officeooo:rsid="03e7580e"/>
    </style:style>
    <style:style style:name="T1397" style:family="text">
      <style:text-properties style:use-window-font-color="true" loext:opacity="0%" fo:font-size="13pt" fo:font-weight="bold" officeooo:rsid="059f2d50" style:font-size-asian="13pt" style:font-weight-asian="bold" style:font-size-complex="13pt" style:font-weight-complex="bold"/>
    </style:style>
    <style:style style:name="T1398" style:family="text">
      <style:text-properties style:use-window-font-color="true" loext:opacity="0%" fo:font-size="13pt" fo:font-weight="bold" officeooo:rsid="05ccc8ae" style:font-size-asian="13pt" style:font-weight-asian="bold" style:font-size-complex="13pt" style:font-weight-complex="bold"/>
    </style:style>
    <style:style style:name="T1399" style:family="text">
      <style:text-properties style:use-window-font-color="true" loext:opacity="0%" fo:font-size="13pt" fo:font-weight="bold" officeooo:rsid="03dcb6ad" style:font-size-asian="13pt" style:font-weight-asian="bold" style:font-size-complex="13pt" style:font-weight-complex="bold"/>
    </style:style>
    <style:style style:name="T1400" style:family="text">
      <style:text-properties style:use-window-font-color="true" loext:opacity="0%" style:font-name="Courier" fo:font-size="13pt" fo:font-weight="bold" officeooo:rsid="05ccc8ae" style:font-size-asian="13pt" style:font-weight-asian="bold" style:font-size-complex="13pt" style:font-weight-complex="bold"/>
    </style:style>
    <style:style style:name="T1401" style:family="text">
      <style:text-properties officeooo:rsid="03eb2fe0"/>
    </style:style>
    <style:style style:name="T1402" style:family="text">
      <style:text-properties style:font-name="Courier" officeooo:rsid="03eb2fe0"/>
    </style:style>
    <style:style style:name="T1403" style:family="text">
      <style:text-properties style:font-name="Courier" fo:font-size="10pt" officeooo:rsid="03eb2fe0" style:font-size-asian="10pt" style:font-size-complex="10pt"/>
    </style:style>
    <style:style style:name="T1404" style:family="text">
      <style:text-properties fo:font-size="10pt" officeooo:rsid="03eb2fe0" style:font-size-asian="10pt" style:font-size-complex="10pt"/>
    </style:style>
    <style:style style:name="T1405" style:family="text">
      <style:text-properties officeooo:rsid="03eaea7d"/>
    </style:style>
    <style:style style:name="T1406" style:family="text">
      <style:text-properties officeooo:rsid="03ebe6b8"/>
    </style:style>
    <style:style style:name="T1407" style:family="text">
      <style:text-properties style:use-window-font-color="true" loext:opacity="0%" fo:font-size="12pt" fo:font-weight="normal" officeooo:rsid="03ecc8ff" style:font-size-asian="10.5pt" style:font-weight-asian="normal" style:font-size-complex="12pt" style:font-weight-complex="normal"/>
    </style:style>
    <style:style style:name="T1408" style:family="text">
      <style:text-properties style:use-window-font-color="true" loext:opacity="0%" style:font-name="Courier" fo:font-size="12pt" fo:font-weight="normal" officeooo:rsid="03e1ef08" style:font-size-asian="10.5pt" style:font-weight-asian="normal" style:font-size-complex="12pt" style:font-weight-complex="normal"/>
    </style:style>
    <style:style style:name="T1409" style:family="text">
      <style:text-properties style:use-window-font-color="true" loext:opacity="0%" fo:font-size="12pt" fo:font-weight="normal" officeooo:rsid="03ee37a9" style:font-size-asian="10.5pt" style:font-weight-asian="normal" style:font-size-complex="12pt" style:font-weight-complex="normal"/>
    </style:style>
    <style:style style:name="T1410" style:family="text">
      <style:text-properties style:use-window-font-color="true" loext:opacity="0%" fo:font-size="10pt" officeooo:rsid="03f1fccc" style:font-size-asian="10pt" style:font-size-complex="10pt"/>
    </style:style>
    <style:style style:name="T1411" style:family="text">
      <style:text-properties style:use-window-font-color="true" loext:opacity="0%" fo:font-size="10pt" fo:font-weight="normal" officeooo:rsid="03f1fccc" fo:background-color="#ffffff" loext:char-shading-value="0" style:font-size-asian="10pt" style:font-size-complex="10pt"/>
    </style:style>
    <style:style style:name="T1412" style:family="text">
      <style:text-properties officeooo:rsid="03f6fea7"/>
    </style:style>
    <style:style style:name="T1413" style:family="text">
      <style:text-properties officeooo:rsid="03f8aebe"/>
    </style:style>
    <style:style style:name="T1414" style:family="text">
      <style:text-properties style:use-window-font-color="true" loext:opacity="0%" fo:font-size="12pt" fo:font-weight="normal" officeooo:rsid="03fabca9" style:font-size-asian="10.5pt" style:font-weight-asian="normal" style:font-size-complex="12pt" style:font-weight-complex="normal"/>
    </style:style>
    <style:style style:name="T1415" style:family="text">
      <style:text-properties officeooo:rsid="03fabca9"/>
    </style:style>
    <style:style style:name="T1416" style:family="text">
      <style:text-properties officeooo:rsid="03faf816"/>
    </style:style>
    <style:style style:name="T1417" style:family="text">
      <style:text-properties style:use-window-font-color="true" loext:opacity="0%" style:font-name="Courier" fo:font-size="12pt" fo:font-weight="normal" officeooo:rsid="03fabca9" style:font-size-asian="10.5pt" style:font-weight-asian="normal" style:font-size-complex="12pt" style:font-weight-complex="normal"/>
    </style:style>
    <style:style style:name="T1418" style:family="text">
      <style:text-properties officeooo:rsid="03fc07e1"/>
    </style:style>
    <style:style style:name="T1419" style:family="text">
      <style:text-properties style:use-window-font-color="true" loext:opacity="0%" fo:font-size="12pt" fo:font-weight="normal" officeooo:rsid="03fc07e1" style:font-size-asian="10.5pt" style:font-weight-asian="normal" style:font-size-complex="12pt" style:font-weight-complex="normal"/>
    </style:style>
    <style:style style:name="T1420" style:family="text">
      <style:text-properties style:use-window-font-color="true" loext:opacity="0%" fo:font-size="12pt" fo:font-weight="normal" officeooo:rsid="03fcf3b2" style:font-size-asian="10.5pt" style:font-weight-asian="normal" style:font-size-complex="12pt" style:font-weight-complex="normal"/>
    </style:style>
    <style:style style:name="T1421" style:family="text">
      <style:text-properties style:use-window-font-color="true" loext:opacity="0%" fo:font-size="12pt" fo:font-weight="normal" officeooo:rsid="0627076d" style:font-size-asian="10.5pt" style:font-weight-asian="normal" style:font-size-complex="12pt" style:font-weight-complex="normal"/>
    </style:style>
    <style:style style:name="T1422" style:family="text">
      <style:text-properties officeooo:rsid="0627076d"/>
    </style:style>
    <style:style style:name="T1423" style:family="text">
      <style:text-properties style:use-window-font-color="true" loext:opacity="0%" fo:font-weight="normal" officeooo:rsid="03fcf3b2" style:font-size-asian="10.5pt" style:font-weight-asian="normal" style:font-weight-complex="normal"/>
    </style:style>
    <style:style style:name="T1424" style:family="text">
      <style:text-properties officeooo:rsid="03fcf3b2"/>
    </style:style>
    <style:style style:name="T1425" style:family="text">
      <style:text-properties style:font-name="Courier" officeooo:rsid="03fcf3b2"/>
    </style:style>
    <style:style style:name="T1426" style:family="text">
      <style:text-properties fo:font-size="10pt" officeooo:rsid="03fcf3b2" style:font-size-asian="10pt" style:font-size-complex="10pt"/>
    </style:style>
    <style:style style:name="T1427" style:family="text">
      <style:text-properties officeooo:rsid="03fe8b5d"/>
    </style:style>
    <style:style style:name="T1428" style:family="text">
      <style:text-properties officeooo:rsid="040617f7"/>
    </style:style>
    <style:style style:name="T1429" style:family="text">
      <style:text-properties officeooo:rsid="04078f13"/>
    </style:style>
    <style:style style:name="T1430" style:family="text">
      <style:text-properties style:use-window-font-color="true" loext:opacity="0%" fo:font-size="12pt" fo:font-weight="normal" officeooo:rsid="04078f13" style:font-size-asian="10.5pt" style:font-weight-asian="normal" style:font-size-complex="12pt" style:font-weight-complex="normal"/>
    </style:style>
    <style:style style:name="T1431" style:family="text">
      <style:text-properties officeooo:rsid="0408496b"/>
    </style:style>
    <style:style style:name="T1432" style:family="text">
      <style:text-properties style:font-name="Courier" officeooo:rsid="0408496b"/>
    </style:style>
    <style:style style:name="T1433" style:family="text">
      <style:text-properties fo:font-size="10pt" officeooo:rsid="0408496b" style:font-size-asian="10pt" style:font-size-complex="10pt"/>
    </style:style>
    <style:style style:name="T1434" style:family="text">
      <style:text-properties style:use-window-font-color="true" loext:opacity="0%" fo:font-size="12pt" fo:font-weight="normal" officeooo:rsid="0408496b" style:font-size-asian="10.5pt" style:font-weight-asian="normal" style:font-size-complex="12pt" style:font-weight-complex="normal"/>
    </style:style>
    <style:style style:name="T1435" style:family="text">
      <style:text-properties style:use-window-font-color="true" loext:opacity="0%" style:font-name="Courier" fo:font-size="12pt" fo:font-weight="normal" officeooo:rsid="0408496b" style:font-size-asian="10.5pt" style:font-weight-asian="normal" style:font-size-complex="12pt" style:font-weight-complex="normal"/>
    </style:style>
    <style:style style:name="T1436" style:family="text">
      <style:text-properties style:use-window-font-color="true" loext:opacity="0%" fo:font-size="12pt" fo:font-weight="normal" officeooo:rsid="040c01d1" style:font-size-asian="10.5pt" style:font-weight-asian="normal" style:font-size-complex="12pt" style:font-weight-complex="normal"/>
    </style:style>
    <style:style style:name="T1437" style:family="text">
      <style:text-properties officeooo:rsid="0408e5ec"/>
    </style:style>
    <style:style style:name="T1438" style:family="text">
      <style:text-properties officeooo:rsid="04093b70"/>
    </style:style>
    <style:style style:name="T1439" style:family="text">
      <style:text-properties officeooo:rsid="040ad14d"/>
    </style:style>
    <style:style style:name="T1440" style:family="text">
      <style:text-properties officeooo:rsid="05a09c0c"/>
    </style:style>
    <style:style style:name="T1441" style:family="text">
      <style:text-properties style:font-name="Courier" officeooo:rsid="05d0883a"/>
    </style:style>
    <style:style style:name="T1442" style:family="text">
      <style:text-properties style:use-window-font-color="true" loext:opacity="0%" fo:font-size="12pt" fo:font-weight="normal" officeooo:rsid="041c5f13" style:font-size-asian="10.5pt" style:font-weight-asian="normal" style:font-size-complex="12pt" style:font-weight-complex="normal"/>
    </style:style>
    <style:style style:name="T1443" style:family="text">
      <style:text-properties style:use-window-font-color="true" loext:opacity="0%" fo:font-weight="normal" officeooo:rsid="040df2c9" style:font-size-asian="10.5pt" style:font-weight-asian="normal" style:font-weight-complex="normal"/>
    </style:style>
    <style:style style:name="T1444" style:family="text">
      <style:text-properties style:use-window-font-color="true" loext:opacity="0%" fo:font-weight="normal" officeooo:rsid="041c5f13" style:font-size-asian="10.5pt" style:font-weight-asian="normal" style:font-weight-complex="normal"/>
    </style:style>
    <style:style style:name="T1445" style:family="text">
      <style:text-properties officeooo:rsid="041e2355"/>
    </style:style>
    <style:style style:name="T1446" style:family="text">
      <style:text-properties style:use-window-font-color="true" loext:opacity="0%" fo:font-size="12pt" fo:font-weight="normal" officeooo:rsid="040df2c9" style:font-size-asian="10.5pt" style:font-weight-asian="normal" style:font-size-complex="12pt" style:font-weight-complex="normal"/>
    </style:style>
    <style:style style:name="T1447" style:family="text">
      <style:text-properties style:use-window-font-color="true" loext:opacity="0%" fo:font-size="12pt" fo:font-weight="normal" officeooo:rsid="040ff102" style:font-size-asian="10.5pt" style:font-weight-asian="normal" style:font-size-complex="12pt" style:font-weight-complex="normal"/>
    </style:style>
    <style:style style:name="T1448" style:family="text">
      <style:text-properties style:use-window-font-color="true" loext:opacity="0%" style:font-name="Courier" fo:font-size="12pt" fo:font-weight="normal" officeooo:rsid="041fb862" style:font-size-asian="10.5pt" style:font-weight-asian="normal" style:font-size-complex="12pt" style:font-weight-complex="normal"/>
    </style:style>
    <style:style style:name="T1449" style:family="text">
      <style:text-properties style:use-window-font-color="true" loext:opacity="0%" fo:font-size="10pt" officeooo:rsid="04223cc7" style:font-size-asian="10pt" style:font-size-complex="10pt"/>
    </style:style>
    <style:style style:name="T1450" style:family="text">
      <style:text-properties style:use-window-font-color="true" loext:opacity="0%" fo:font-size="10pt" officeooo:rsid="0423f6e8" style:font-size-asian="10pt" style:font-size-complex="10pt"/>
    </style:style>
    <style:style style:name="T1451" style:family="text">
      <style:text-properties style:use-window-font-color="true" loext:opacity="0%" style:font-name="Courier" fo:font-size="10pt" fo:font-weight="normal" officeooo:rsid="04223cc7" fo:background-color="#ffffff" loext:char-shading-value="0" style:font-size-asian="10pt" style:font-size-complex="10pt"/>
    </style:style>
    <style:style style:name="T1452" style:family="text">
      <style:text-properties style:use-window-font-color="true" loext:opacity="0%" style:font-name="Courier" fo:font-size="10pt" fo:font-weight="normal" officeooo:rsid="0423f6e8" fo:background-color="#ffffff" loext:char-shading-value="0" style:font-size-asian="10pt" style:font-size-complex="10pt"/>
    </style:style>
    <style:style style:name="T1453" style:family="text">
      <style:text-properties fo:color="#a31515" loext:opacity="100%" officeooo:rsid="044b6aca"/>
    </style:style>
    <style:style style:name="T1454" style:family="text">
      <style:text-properties fo:color="#55308d" loext:opacity="100%"/>
    </style:style>
    <style:style style:name="T1455" style:family="text">
      <style:text-properties fo:color="#55308d" loext:opacity="100%" style:font-name="Courier" fo:font-size="11pt" fo:font-weight="normal" fo:background-color="#ffffff" loext:char-shading-value="0" style:font-size-asian="11pt" style:font-size-complex="11pt"/>
    </style:style>
    <style:style style:name="T1456" style:family="text">
      <style:text-properties style:use-window-font-color="true" loext:opacity="0%" fo:font-size="10pt" fo:font-weight="normal" officeooo:rsid="0423f6e8" fo:background-color="#ffffff" loext:char-shading-value="0" style:font-size-asian="10pt" style:font-size-complex="10pt"/>
    </style:style>
    <style:style style:name="T1457" style:family="text">
      <style:text-properties style:use-window-font-color="true" loext:opacity="0%" fo:font-size="10pt" fo:font-weight="normal" officeooo:rsid="04223cc7" fo:background-color="#ffffff" loext:char-shading-value="0" style:font-size-asian="10pt" style:font-size-complex="10pt"/>
    </style:style>
    <style:style style:name="T1458" style:family="text">
      <style:text-properties style:font-name="Liberation Mono" fo:font-style="italic" fo:font-weight="normal" style:font-style-asian="italic" style:font-weight-asian="normal" style:font-style-complex="italic" style:font-weight-complex="normal"/>
    </style:style>
    <style:style style:name="T1459" style:family="text">
      <style:text-properties style:use-window-font-color="true" loext:opacity="0%" fo:font-size="12pt" fo:font-weight="normal" officeooo:rsid="04117df0" style:font-size-asian="10.5pt" style:font-weight-asian="normal" style:font-size-complex="12pt" style:font-weight-complex="normal"/>
    </style:style>
    <style:style style:name="T1460" style:family="text">
      <style:text-properties style:use-window-font-color="true" loext:opacity="0%" style:font-name="Courier" fo:font-size="12pt" fo:font-weight="normal" officeooo:rsid="04117df0" style:font-size-asian="10.5pt" style:font-weight-asian="normal" style:font-size-complex="12pt" style:font-weight-complex="normal"/>
    </style:style>
    <style:style style:name="T1461" style:family="text">
      <style:text-properties style:use-window-font-color="true" loext:opacity="0%" fo:font-weight="normal" officeooo:rsid="04130975" style:font-size-asian="10.5pt" style:font-weight-asian="normal" style:font-weight-complex="normal"/>
    </style:style>
    <style:style style:name="T1462" style:family="text">
      <style:text-properties officeooo:rsid="0628ce8a"/>
    </style:style>
    <style:style style:name="T1463" style:family="text">
      <style:text-properties officeooo:rsid="04297153"/>
    </style:style>
    <style:style style:name="T1464" style:family="text">
      <style:text-properties officeooo:rsid="042ac6ed"/>
    </style:style>
    <style:style style:name="T1465" style:family="text">
      <style:text-properties style:use-window-font-color="true" loext:opacity="0%" fo:font-size="12pt" fo:font-weight="normal" officeooo:rsid="0408d068" style:font-size-asian="10.5pt" style:font-weight-asian="normal" style:font-size-complex="12pt" style:font-weight-complex="normal"/>
    </style:style>
    <style:style style:name="T1466" style:family="text">
      <style:text-properties style:use-window-font-color="true" loext:opacity="0%" style:font-name="Courier" fo:font-size="12pt" fo:font-weight="normal" officeooo:rsid="04130975" style:font-size-asian="10.5pt" style:font-weight-asian="normal" style:font-size-complex="12pt" style:font-weight-complex="normal"/>
    </style:style>
    <style:style style:name="T1467" style:family="text">
      <style:text-properties officeooo:rsid="0415d4a3"/>
    </style:style>
    <style:style style:name="T1468" style:family="text">
      <style:text-properties style:font-name="Courier" officeooo:rsid="0415d4a3"/>
    </style:style>
    <style:style style:name="T1469" style:family="text">
      <style:text-properties fo:font-size="10pt" officeooo:rsid="0415d4a3" style:font-size-asian="10pt" style:font-size-complex="10pt"/>
    </style:style>
    <style:style style:name="T1470" style:family="text">
      <style:text-properties style:use-window-font-color="true" loext:opacity="0%" fo:font-size="12pt" fo:font-weight="normal" officeooo:rsid="0417088e" style:font-size-asian="10.5pt" style:font-weight-asian="normal" style:font-size-complex="12pt" style:font-weight-complex="normal"/>
    </style:style>
    <style:style style:name="T1471" style:family="text">
      <style:text-properties style:use-window-font-color="true" loext:opacity="0%" style:font-name="Liberation Serif" fo:font-size="12pt" fo:font-weight="normal" officeooo:rsid="0408d068" style:font-size-asian="10.5pt" style:font-weight-asian="normal" style:font-size-complex="12pt" style:font-weight-complex="normal"/>
    </style:style>
    <style:style style:name="T1472" style:family="text">
      <style:text-properties style:use-window-font-color="true" loext:opacity="0%" fo:font-size="12pt" fo:font-weight="normal" officeooo:rsid="0418adee" style:font-size-asian="10.5pt" style:font-weight-asian="normal" style:font-size-complex="12pt" style:font-weight-complex="normal"/>
    </style:style>
    <style:style style:name="T1473" style:family="text">
      <style:text-properties style:use-window-font-color="true" loext:opacity="0%" fo:font-size="12pt" fo:font-weight="normal" officeooo:rsid="042e1f59" style:font-size-asian="10.5pt" style:font-weight-asian="normal" style:font-size-complex="12pt" style:font-weight-complex="normal"/>
    </style:style>
    <style:style style:name="T1474" style:family="text">
      <style:text-properties officeooo:rsid="042e1f59"/>
    </style:style>
    <style:style style:name="T1475" style:family="text">
      <style:text-properties style:font-name="Courier" officeooo:rsid="042e1f59"/>
    </style:style>
    <style:style style:name="T1476" style:family="text">
      <style:text-properties fo:font-size="10pt" officeooo:rsid="042e1f59" style:font-size-asian="10pt" style:font-size-complex="10pt"/>
    </style:style>
    <style:style style:name="T1477" style:family="text">
      <style:text-properties style:use-window-font-color="true" loext:opacity="0%" fo:font-size="12pt" fo:font-weight="normal" officeooo:rsid="04316453" style:font-size-asian="10.5pt" style:font-weight-asian="normal" style:font-size-complex="12pt" style:font-weight-complex="normal"/>
    </style:style>
    <style:style style:name="T1478" style:family="text">
      <style:text-properties style:use-window-font-color="true" loext:opacity="0%" fo:font-size="12pt" fo:font-weight="normal" officeooo:rsid="0628ce8a" style:font-size-asian="10.5pt" style:font-weight-asian="normal" style:font-size-complex="12pt" style:font-weight-complex="normal"/>
    </style:style>
    <style:style style:name="T1479" style:family="text">
      <style:text-properties style:use-window-font-color="true" loext:opacity="0%" fo:font-size="12pt" fo:font-weight="normal" officeooo:rsid="04322e94" style:font-size-asian="10.5pt" style:font-weight-asian="normal" style:font-size-complex="12pt" style:font-weight-complex="normal"/>
    </style:style>
    <style:style style:name="T1480" style:family="text">
      <style:text-properties style:use-window-font-color="true" loext:opacity="0%" fo:font-size="12pt" fo:font-weight="bold" officeooo:rsid="04322e94" style:font-size-asian="10.5pt" style:font-weight-asian="bold" style:font-size-complex="12pt" style:font-weight-complex="bold"/>
    </style:style>
    <style:style style:name="T1481" style:family="text">
      <style:text-properties style:use-window-font-color="true" loext:opacity="0%" fo:font-size="12pt" fo:font-weight="normal" officeooo:rsid="0432432f" style:font-size-asian="10.5pt" style:font-weight-asian="normal" style:font-size-complex="12pt" style:font-weight-complex="normal"/>
    </style:style>
    <style:style style:name="T1482" style:family="text">
      <style:text-properties officeooo:rsid="043bcc54"/>
    </style:style>
    <style:style style:name="T1483" style:family="text">
      <style:text-properties style:font-name="Courier" fo:font-size="10pt" officeooo:rsid="042e1f59" style:font-size-asian="10pt" style:font-size-complex="10pt"/>
    </style:style>
    <style:style style:name="T1484" style:family="text">
      <style:text-properties fo:color="#0000ff" loext:opacity="100%" style:font-name="Courier" fo:font-size="10.5pt" fo:font-weight="normal" fo:background-color="#ffffff" loext:char-shading-value="0" style:font-size-asian="10.5pt" style:font-size-complex="10.5pt"/>
    </style:style>
    <style:style style:name="T1485" style:family="text">
      <style:text-properties fo:color="#000000" loext:opacity="100%" style:font-name="Courier" fo:font-size="10.5pt" fo:font-weight="normal" fo:background-color="#ffffff" loext:char-shading-value="0" style:font-size-asian="10.5pt" style:font-size-complex="10.5pt"/>
    </style:style>
    <style:style style:name="T1486" style:family="text">
      <style:text-properties fo:color="#800080" loext:opacity="100%" style:font-name="Courier" fo:font-size="10.5pt" fo:font-weight="normal" fo:background-color="#ffffff" loext:char-shading-value="0" style:font-size-asian="10.5pt" style:font-size-complex="10.5pt"/>
    </style:style>
    <style:style style:name="T1487" style:family="text">
      <style:text-properties fo:color="#000000" loext:opacity="100%" style:font-name="Courier" fo:font-size="10.5pt" fo:font-style="italic" fo:font-weight="normal" fo:background-color="#ffffff" loext:char-shading-value="0" style:font-size-asian="10.5pt" style:font-style-asian="italic" style:font-size-complex="10.5pt" style:font-style-complex="italic"/>
    </style:style>
    <style:style style:name="T1488" style:family="text">
      <style:text-properties officeooo:rsid="043528a1"/>
    </style:style>
    <style:style style:name="T1489" style:family="text">
      <style:text-properties style:use-window-font-color="true" loext:opacity="0%" fo:font-size="12pt" fo:font-weight="normal" officeooo:rsid="04381242" style:font-size-asian="10.5pt" style:font-weight-asian="normal" style:font-size-complex="12pt" style:font-weight-complex="normal"/>
    </style:style>
    <style:style style:name="T1490" style:family="text">
      <style:text-properties style:use-window-font-color="true" loext:opacity="0%" fo:font-size="12pt" fo:font-weight="normal" officeooo:rsid="043bcc54" style:font-size-asian="10.5pt" style:font-weight-asian="normal" style:font-size-complex="12pt" style:font-weight-complex="normal"/>
    </style:style>
    <style:style style:name="T1491" style:family="text">
      <style:text-properties style:use-window-font-color="true" loext:opacity="0%" fo:font-size="12pt" fo:font-weight="normal" officeooo:rsid="043c781f" style:font-size-asian="10.5pt" style:font-weight-asian="normal" style:font-size-complex="12pt" style:font-weight-complex="normal"/>
    </style:style>
    <style:style style:name="T1492" style:family="text">
      <style:text-properties officeooo:rsid="043c781f"/>
    </style:style>
    <style:style style:name="T1493" style:family="text">
      <style:text-properties style:use-window-font-color="true" loext:opacity="0%" fo:font-size="12pt" fo:font-weight="normal" officeooo:rsid="043f15c5" style:font-size-asian="10.5pt" style:font-weight-asian="normal" style:font-size-complex="12pt" style:font-weight-complex="normal"/>
    </style:style>
    <style:style style:name="T1494" style:family="text">
      <style:text-properties style:use-window-font-color="true" loext:opacity="0%" fo:font-size="12pt" fo:font-weight="normal" officeooo:rsid="043fa81b" style:font-size-asian="10.5pt" style:font-weight-asian="normal" style:font-size-complex="12pt" style:font-weight-complex="normal"/>
    </style:style>
    <style:style style:name="T1495" style:family="text">
      <style:text-properties style:use-window-font-color="true" loext:opacity="0%" fo:font-size="12pt" fo:font-weight="normal" officeooo:rsid="04437267" style:font-size-asian="10.5pt" style:font-weight-asian="normal" style:font-size-complex="12pt" style:font-weight-complex="normal"/>
    </style:style>
    <style:style style:name="T1496" style:family="text">
      <style:text-properties style:use-window-font-color="true" loext:opacity="0%" fo:font-size="12pt" fo:font-weight="normal" officeooo:rsid="044183a2" style:font-size-asian="10.5pt" style:font-weight-asian="normal" style:font-size-complex="12pt" style:font-weight-complex="normal"/>
    </style:style>
    <style:style style:name="T1497" style:family="text">
      <style:text-properties style:use-window-font-color="true" loext:opacity="0%" fo:font-size="12pt" fo:font-weight="normal" officeooo:rsid="044402df" style:font-size-asian="10.5pt" style:font-weight-asian="normal" style:font-size-complex="12pt" style:font-weight-complex="normal"/>
    </style:style>
    <style:style style:name="T1498" style:family="text">
      <style:text-properties style:use-window-font-color="true" loext:opacity="0%" fo:font-size="12pt" fo:font-weight="normal" officeooo:rsid="04469a7e" style:font-size-asian="10.5pt" style:font-weight-asian="normal" style:font-size-complex="12pt" style:font-weight-complex="normal"/>
    </style:style>
    <style:style style:name="T1499" style:family="text">
      <style:text-properties style:use-window-font-color="true" loext:opacity="0%" fo:font-size="12pt" fo:font-weight="normal" officeooo:rsid="044bdf88" style:font-size-asian="10.5pt" style:font-weight-asian="normal" style:font-size-complex="12pt" style:font-weight-complex="normal"/>
    </style:style>
    <style:style style:name="T1500" style:family="text">
      <style:text-properties style:use-window-font-color="true" loext:opacity="0%" style:font-name="Courier" fo:font-size="12pt" fo:font-weight="normal" officeooo:rsid="044bdf88" style:font-size-asian="10.5pt" style:font-weight-asian="normal" style:font-size-complex="12pt" style:font-weight-complex="normal"/>
    </style:style>
    <style:style style:name="T1501" style:family="text">
      <style:text-properties officeooo:rsid="0447f05b"/>
    </style:style>
    <style:style style:name="T1502" style:family="text">
      <style:text-properties officeooo:rsid="0447596b"/>
    </style:style>
    <style:style style:name="T1503" style:family="text">
      <style:text-properties style:use-window-font-color="true" loext:opacity="0%" style:font-name="Liberation Serif" fo:font-size="12pt" fo:font-weight="normal" officeooo:rsid="044bdf88" style:font-size-asian="10.5pt" style:font-weight-asian="normal" style:font-size-complex="12pt" style:font-weight-complex="normal"/>
    </style:style>
    <style:style style:name="T1504" style:family="text">
      <style:text-properties style:use-window-font-color="true" loext:opacity="0%" style:font-name="Liberation Serif" fo:font-size="12pt" fo:font-weight="normal" officeooo:rsid="044f7663" style:font-size-asian="10.5pt" style:font-weight-asian="normal" style:font-size-complex="12pt" style:font-weight-complex="normal"/>
    </style:style>
    <style:style style:name="T1505" style:family="text">
      <style:text-properties style:use-window-font-color="true" loext:opacity="0%" style:font-name="Liberation Serif" fo:font-size="12pt" fo:font-weight="normal" officeooo:rsid="044ff6dc" style:font-size-asian="10.5pt" style:font-weight-asian="normal" style:font-size-complex="12pt" style:font-weight-complex="normal"/>
    </style:style>
    <style:style style:name="T1506" style:family="text">
      <style:text-properties style:font-name="Liberation Serif" officeooo:rsid="044bdf88"/>
    </style:style>
    <style:style style:name="T1507" style:family="text">
      <style:text-properties style:font-name="Liberation Serif" officeooo:rsid="044ff6dc"/>
    </style:style>
    <style:style style:name="T1508" style:family="text">
      <style:text-properties style:font-name="Liberation Serif" officeooo:rsid="04512d12"/>
    </style:style>
    <style:style style:name="T1509" style:family="text">
      <style:text-properties style:font-name="Liberation Serif" officeooo:rsid="04519293"/>
    </style:style>
    <style:style style:name="T1510" style:family="text">
      <style:text-properties fo:color="#000000" loext:opacity="100%" style:font-name="Courier" fo:font-size="12pt" fo:font-weight="normal" officeooo:rsid="04512d12" fo:background-color="#ffffff" loext:char-shading-value="0" style:font-size-asian="10.5pt" style:font-size-complex="12pt"/>
    </style:style>
    <style:style style:name="T1511" style:family="text">
      <style:text-properties style:font-name="Liberation Serif" officeooo:rsid="0628ce8a"/>
    </style:style>
    <style:style style:name="T1512" style:family="text">
      <style:text-properties style:font-name="Liberation Serif" officeooo:rsid="0453e9e5"/>
    </style:style>
    <style:style style:name="T1513" style:family="text">
      <style:text-properties style:font-name="Liberation Serif" fo:font-weight="bold" officeooo:rsid="0453e9e5" style:font-weight-asian="bold" style:font-weight-complex="bold"/>
    </style:style>
    <style:style style:name="T1514" style:family="text">
      <style:text-properties style:font-name="Liberation Serif" fo:font-weight="bold" officeooo:rsid="05a70ed4" style:font-weight-asian="bold" style:font-weight-complex="bold"/>
    </style:style>
    <style:style style:name="T1515" style:family="text">
      <style:text-properties style:use-window-font-color="true" loext:opacity="0%" fo:font-size="13pt" fo:font-weight="bold" officeooo:rsid="05a09c0c" style:font-size-asian="13pt" style:font-weight-asian="bold" style:font-size-complex="13pt" style:font-weight-complex="bold"/>
    </style:style>
    <style:style style:name="T1516" style:family="text">
      <style:text-properties style:use-window-font-color="true" loext:opacity="0%" fo:font-size="13pt" fo:font-weight="bold" officeooo:rsid="045c450f" style:font-size-asian="13pt" style:font-weight-asian="bold" style:font-size-complex="13pt" style:font-weight-complex="bold"/>
    </style:style>
    <style:style style:name="T1517" style:family="text">
      <style:text-properties style:use-window-font-color="true" loext:opacity="0%" fo:font-size="13pt" fo:font-weight="bold" officeooo:rsid="045de84c" style:font-size-asian="13pt" style:font-weight-asian="bold" style:font-size-complex="13pt" style:font-weight-complex="bold"/>
    </style:style>
    <style:style style:name="T1518" style:family="text">
      <style:text-properties style:use-window-font-color="true" loext:opacity="0%" style:font-name="Courier" fo:font-size="13pt" fo:font-weight="bold" officeooo:rsid="05ceecb0" style:font-size-asian="13pt" style:font-weight-asian="bold" style:font-size-complex="13pt" style:font-weight-complex="bold"/>
    </style:style>
    <style:style style:name="T1519" style:family="text">
      <style:text-properties style:use-window-font-color="true" loext:opacity="0%" fo:font-size="13pt" fo:font-weight="bold" officeooo:rsid="05ceecb0" style:font-size-asian="13pt" style:font-weight-asian="bold" style:font-size-complex="13pt" style:font-weight-complex="bold"/>
    </style:style>
    <style:style style:name="T1520" style:family="text">
      <style:text-properties style:font-name="Liberation Serif" officeooo:rsid="045a6b5f"/>
    </style:style>
    <style:style style:name="T1521" style:family="text">
      <style:text-properties officeooo:rsid="045a6b5f"/>
    </style:style>
    <style:style style:name="T1522" style:family="text">
      <style:text-properties style:font-name="Courier" officeooo:rsid="045a6b5f"/>
    </style:style>
    <style:style style:name="T1523" style:family="text">
      <style:text-properties style:font-name="Courier" fo:font-size="10pt" officeooo:rsid="045a6b5f" style:font-size-asian="10pt" style:font-size-complex="10pt"/>
    </style:style>
    <style:style style:name="T1524" style:family="text">
      <style:text-properties fo:font-size="10pt" officeooo:rsid="045a6b5f" style:font-size-asian="10pt" style:font-size-complex="10pt"/>
    </style:style>
    <style:style style:name="T1525" style:family="text">
      <style:text-properties fo:font-size="10pt" officeooo:rsid="05ceecb0" style:font-size-asian="10pt" style:font-size-complex="10pt"/>
    </style:style>
    <style:style style:name="T1526" style:family="text">
      <style:text-properties style:use-window-font-color="true" loext:opacity="0%" style:font-name="Liberation Serif" fo:font-size="12pt" fo:font-weight="normal" officeooo:rsid="045ab704" style:font-size-asian="10.5pt" style:font-weight-asian="normal" style:font-size-complex="12pt" style:font-weight-complex="normal"/>
    </style:style>
    <style:style style:name="T1527" style:family="text">
      <style:text-properties style:use-window-font-color="true" loext:opacity="0%" style:font-name="Liberation Serif" fo:font-size="12pt" fo:font-weight="normal" officeooo:rsid="045ab937" style:font-size-asian="10.5pt" style:font-weight-asian="normal" style:font-size-complex="12pt" style:font-weight-complex="normal"/>
    </style:style>
    <style:style style:name="T1528" style:family="text">
      <style:text-properties style:use-window-font-color="true" loext:opacity="0%" style:font-name="Liberation Serif" fo:font-size="12pt" fo:font-weight="normal" officeooo:rsid="045c450f" style:font-size-asian="10.5pt" style:font-weight-asian="normal" style:font-size-complex="12pt" style:font-weight-complex="normal"/>
    </style:style>
    <style:style style:name="T1529" style:family="text">
      <style:text-properties officeooo:rsid="045c450f"/>
    </style:style>
    <style:style style:name="T1530" style:family="text">
      <style:text-properties style:font-name="Courier" officeooo:rsid="045c450f"/>
    </style:style>
    <style:style style:name="T1531" style:family="text">
      <style:text-properties style:use-window-font-color="true" loext:opacity="0%" style:font-name="Liberation Serif" fo:font-size="12pt" fo:font-weight="normal" officeooo:rsid="062b59c7" style:font-size-asian="10.5pt" style:font-weight-asian="normal" style:font-size-complex="12pt" style:font-weight-complex="normal"/>
    </style:style>
    <style:style style:name="T1532" style:family="text">
      <style:text-properties style:use-window-font-color="true" loext:opacity="0%" style:font-name="Liberation Serif" fo:font-size="12pt" fo:font-weight="normal" officeooo:rsid="04623898" style:font-size-asian="10.5pt" style:font-weight-asian="normal" style:font-size-complex="12pt" style:font-weight-complex="normal"/>
    </style:style>
    <style:style style:name="T1533" style:family="text">
      <style:text-properties style:use-window-font-color="true" loext:opacity="0%" fo:font-size="10pt" officeooo:rsid="04645b28" style:font-size-asian="10pt" style:font-size-complex="10pt"/>
    </style:style>
    <style:style style:name="T1534" style:family="text">
      <style:text-properties style:use-window-font-color="true" loext:opacity="0%" fo:font-size="10pt" officeooo:rsid="0464bd26" style:font-size-asian="10pt" style:font-size-complex="10pt"/>
    </style:style>
    <style:style style:name="T1535" style:family="text">
      <style:text-properties style:use-window-font-color="true" loext:opacity="0%" style:font-name="Courier" fo:font-size="10pt" fo:font-weight="normal" officeooo:rsid="0464bd26" fo:background-color="#ffffff" loext:char-shading-value="0" style:font-size-asian="10pt" style:font-size-complex="10pt"/>
    </style:style>
    <style:style style:name="T1536" style:family="text">
      <style:text-properties style:use-window-font-color="true" loext:opacity="0%" style:font-name="Courier" fo:font-size="10pt" fo:font-weight="normal" officeooo:rsid="04645b28" fo:background-color="#ffffff" loext:char-shading-value="0" style:font-size-asian="10pt" style:font-size-complex="10pt"/>
    </style:style>
    <style:style style:name="T1537" style:family="text">
      <style:text-properties style:use-window-font-color="true" loext:opacity="0%" fo:font-size="10pt" fo:font-weight="normal" officeooo:rsid="0464bd26" fo:background-color="#ffffff" loext:char-shading-value="0" style:font-size-asian="10pt" style:font-size-complex="10pt"/>
    </style:style>
    <style:style style:name="T1538" style:family="text">
      <style:text-properties style:use-window-font-color="true" loext:opacity="0%" fo:font-size="10pt" fo:font-weight="normal" officeooo:rsid="04645b28" fo:background-color="#ffffff" loext:char-shading-value="0" style:font-size-asian="10pt" style:font-size-complex="10pt"/>
    </style:style>
    <style:style style:name="T1539" style:family="text">
      <style:text-properties fo:color="#a31515" loext:opacity="100%" officeooo:rsid="04643682"/>
    </style:style>
    <style:style style:name="T1540" style:family="text">
      <style:text-properties style:use-window-font-color="true" loext:opacity="0%" style:font-name="Courier" fo:font-size="10pt" fo:font-weight="normal" officeooo:rsid="046cf726" fo:background-color="#ffffff" loext:char-shading-value="0" style:font-size-asian="10pt" style:font-size-complex="10pt"/>
    </style:style>
    <style:style style:name="T1541" style:family="text">
      <style:text-properties style:use-window-font-color="true" loext:opacity="0%" fo:font-size="10pt" officeooo:rsid="046cf726" style:font-size-asian="10pt" style:font-size-complex="10pt"/>
    </style:style>
    <style:style style:name="T1542" style:family="text">
      <style:text-properties style:use-window-font-color="true" loext:opacity="0%" style:font-name="Courier" fo:font-size="10pt" fo:font-weight="normal" officeooo:rsid="047d3da9" fo:background-color="#ffffff" loext:char-shading-value="0" style:font-size-asian="10pt" style:font-size-complex="10pt"/>
    </style:style>
    <style:style style:name="T1543" style:family="text">
      <style:text-properties style:use-window-font-color="true" loext:opacity="0%" fo:font-size="10pt" officeooo:rsid="047d3da9" style:font-size-asian="10pt" style:font-size-complex="10pt"/>
    </style:style>
    <style:style style:name="T1544" style:family="text">
      <style:text-properties style:use-window-font-color="true" loext:opacity="0%" fo:font-size="10pt" fo:font-weight="normal" officeooo:rsid="047d3da9" fo:background-color="#ffffff" loext:char-shading-value="0" style:font-size-asian="10pt" style:font-size-complex="10pt"/>
    </style:style>
    <style:style style:name="T1545" style:family="text">
      <style:text-properties style:use-window-font-color="true" loext:opacity="0%" fo:font-size="10pt" fo:font-weight="normal" officeooo:rsid="047e4090" fo:background-color="#ffffff" loext:char-shading-value="0" style:font-size-asian="10pt" style:font-size-complex="10pt"/>
    </style:style>
    <style:style style:name="T1546" style:family="text">
      <style:text-properties style:use-window-font-color="true" loext:opacity="0%" fo:font-size="10pt" officeooo:rsid="047e4090" style:font-size-asian="10pt" style:font-size-complex="10pt"/>
    </style:style>
    <style:style style:name="T1547" style:family="text">
      <style:text-properties style:use-window-font-color="true" loext:opacity="0%" style:font-name="Courier" fo:font-size="10pt" fo:font-weight="normal" officeooo:rsid="047e4090" fo:background-color="#ffffff" loext:char-shading-value="0" style:font-size-asian="10pt" style:font-size-complex="10pt"/>
    </style:style>
    <style:style style:name="T1548" style:family="text">
      <style:text-properties style:use-window-font-color="true" loext:opacity="0%" fo:font-size="10pt" fo:font-weight="normal" officeooo:rsid="046cf726" fo:background-color="#ffffff" loext:char-shading-value="0" style:font-size-asian="10pt" style:font-size-complex="10pt"/>
    </style:style>
    <style:style style:name="T1549" style:family="text">
      <style:text-properties fo:font-style="italic" fo:font-weight="normal" officeooo:rsid="062b59c7" style:font-style-asian="italic" style:font-weight-asian="normal" style:font-style-complex="italic" style:font-weight-complex="normal"/>
    </style:style>
    <style:style style:name="T1550" style:family="text">
      <style:text-properties officeooo:rsid="062b59c7"/>
    </style:style>
    <style:style style:name="T1551" style:family="text">
      <style:text-properties officeooo:rsid="040df2c9"/>
    </style:style>
    <style:style style:name="T1552" style:family="text">
      <style:text-properties officeooo:rsid="046ac175"/>
    </style:style>
    <style:style style:name="T1553" style:family="text">
      <style:text-properties fo:color="#000080" loext:opacity="100%" fo:font-size="12pt" style:text-underline-style="solid" style:text-underline-width="auto" style:text-underline-color="font-color" officeooo:rsid="0475e8f6" style:font-size-asian="12pt" style:font-size-complex="12pt"/>
    </style:style>
    <style:style style:name="T1554" style:family="text">
      <style:text-properties fo:color="#00a933" loext:opacity="100%" fo:font-size="12pt" style:text-underline-style="solid" style:text-underline-width="auto" style:text-underline-color="font-color" officeooo:rsid="0475e8f6" style:font-size-asian="12pt" style:font-size-complex="12pt"/>
    </style:style>
    <style:style style:name="T1555" style:family="text">
      <style:text-properties fo:font-size="12pt" officeooo:rsid="0475e8f6" style:font-size-asian="12pt" style:font-size-complex="12pt"/>
    </style:style>
    <style:style style:name="T1556" style:family="text">
      <style:text-properties style:font-name="Courier" fo:font-size="10pt" officeooo:rsid="046cf726" fo:background-color="#ffffff" loext:char-shading-value="0" style:font-size-asian="10pt" style:font-size-complex="10pt"/>
    </style:style>
    <style:style style:name="T1557" style:family="text">
      <style:text-properties style:font-name="Courier" fo:font-size="10pt" officeooo:rsid="0464bd26" fo:background-color="#ffffff" loext:char-shading-value="0" style:font-size-asian="10pt" style:font-size-complex="10pt"/>
    </style:style>
    <style:style style:name="T1558" style:family="text">
      <style:text-properties fo:color="#a31515" loext:opacity="100%" style:font-name="Courier" fo:font-size="11pt" fo:background-color="#ffffff" loext:char-shading-value="0" style:font-size-asian="11pt" style:font-size-complex="11pt"/>
    </style:style>
    <style:style style:name="T1559" style:family="text">
      <style:text-properties fo:color="#098658" loext:opacity="100%" style:font-name="Courier" fo:font-size="11pt" fo:background-color="#ffffff" loext:char-shading-value="0" style:font-size-asian="11pt" style:font-size-complex="11pt"/>
    </style:style>
    <style:style style:name="T1560" style:family="text">
      <style:text-properties style:use-window-font-color="true" loext:opacity="0%" style:font-name="Liberation Serif" fo:font-size="12pt" fo:font-weight="normal" officeooo:rsid="0476b0a0" style:font-size-asian="10.5pt" style:font-weight-asian="normal" style:font-size-complex="12pt" style:font-weight-complex="normal"/>
    </style:style>
    <style:style style:name="T1561" style:family="text">
      <style:text-properties style:use-window-font-color="true" loext:opacity="0%" style:font-name="Liberation Serif" fo:font-size="12pt" fo:font-weight="normal" officeooo:rsid="047737d7" style:font-size-asian="10.5pt" style:font-weight-asian="normal" style:font-size-complex="12pt" style:font-weight-complex="normal"/>
    </style:style>
    <style:style style:name="T1562" style:family="text">
      <style:text-properties style:use-window-font-color="true" loext:opacity="0%" style:font-name="Liberation Serif" fo:font-size="12pt" fo:font-weight="normal" officeooo:rsid="0478bd90" style:font-size-asian="10.5pt" style:font-weight-asian="normal" style:font-size-complex="12pt" style:font-weight-complex="normal"/>
    </style:style>
    <style:style style:name="T1563" style:family="text">
      <style:text-properties style:use-window-font-color="true" loext:opacity="0%" style:font-name="Courier" fo:font-size="12pt" fo:font-weight="normal" officeooo:rsid="0468bc79" style:font-size-asian="10.5pt" style:font-weight-asian="normal" style:font-size-complex="12pt" style:font-weight-complex="normal"/>
    </style:style>
    <style:style style:name="T1564" style:family="text">
      <style:text-properties style:use-window-font-color="true" loext:opacity="0%" style:font-name="Liberation Serif" fo:font-size="12pt" fo:font-weight="normal" officeooo:rsid="047a3ecb" style:font-size-asian="10.5pt" style:font-weight-asian="normal" style:font-size-complex="12pt" style:font-weight-complex="normal"/>
    </style:style>
    <style:style style:name="T1565" style:family="text">
      <style:text-properties officeooo:rsid="047f8dd1"/>
    </style:style>
    <style:style style:name="T1566" style:family="text">
      <style:text-properties style:use-window-font-color="true" loext:opacity="0%" style:font-name="Liberation Serif" fo:font-size="12pt" fo:font-weight="normal" officeooo:rsid="047b895c" style:font-size-asian="10.5pt" style:font-weight-asian="normal" style:font-size-complex="12pt" style:font-weight-complex="normal"/>
    </style:style>
    <style:style style:name="T1567" style:family="text">
      <style:text-properties officeooo:rsid="04869436"/>
    </style:style>
    <style:style style:name="T1568" style:family="text">
      <style:text-properties style:font-name="Courier" officeooo:rsid="04869436"/>
    </style:style>
    <style:style style:name="T1569" style:family="text">
      <style:text-properties fo:font-size="10pt" officeooo:rsid="04869436" style:font-size-asian="10pt" style:font-size-complex="10pt"/>
    </style:style>
    <style:style style:name="T1570" style:family="text">
      <style:text-properties style:use-window-font-color="true" loext:opacity="0%" fo:font-weight="normal" officeooo:rsid="04869436" style:font-size-asian="10.5pt" style:font-weight-asian="normal" style:font-weight-complex="normal"/>
    </style:style>
    <style:style style:name="T1571" style:family="text">
      <style:text-properties fo:color="#000080" loext:opacity="100%" style:text-underline-style="solid" style:text-underline-width="auto" style:text-underline-color="font-color" officeooo:rsid="0475e8f6" style:font-size-asian="12pt"/>
    </style:style>
    <style:style style:name="T1572" style:family="text">
      <style:text-properties fo:color="#00a933" loext:opacity="100%" style:text-underline-style="solid" style:text-underline-width="auto" style:text-underline-color="font-color" officeooo:rsid="0475e8f6" style:font-size-asian="12pt"/>
    </style:style>
    <style:style style:name="T1573" style:family="text">
      <style:text-properties officeooo:rsid="0488696e"/>
    </style:style>
    <style:style style:name="T1574" style:family="text">
      <style:text-properties style:use-window-font-color="true" loext:opacity="0%" style:font-name="Liberation Serif" fo:font-size="12pt" fo:font-weight="normal" officeooo:rsid="048698e0" style:font-size-asian="10.5pt" style:font-weight-asian="normal" style:font-size-complex="12pt" style:font-weight-complex="normal"/>
    </style:style>
    <style:style style:name="T1575" style:family="text">
      <style:text-properties officeooo:rsid="048698e0"/>
    </style:style>
    <style:style style:name="T1576" style:family="text">
      <style:text-properties style:font-name="Courier" fo:font-size="10pt" officeooo:rsid="04869436" style:font-size-asian="10pt" style:font-size-complex="10pt"/>
    </style:style>
    <style:style style:name="T1577" style:family="text">
      <style:text-properties fo:font-size="10pt" officeooo:rsid="048698e0" style:font-size-asian="10pt" style:font-size-complex="10pt"/>
    </style:style>
    <style:style style:name="T1578" style:family="text">
      <style:text-properties officeooo:rsid="048963e3"/>
    </style:style>
    <style:style style:name="T1579" style:family="text">
      <style:text-properties style:use-window-font-color="true" loext:opacity="0%" style:font-name="Liberation Serif" fo:font-size="12pt" fo:font-weight="normal" officeooo:rsid="0488696e" style:font-size-asian="10.5pt" style:font-weight-asian="normal" style:font-size-complex="12pt" style:font-weight-complex="normal"/>
    </style:style>
    <style:style style:name="T1580" style:family="text">
      <style:text-properties style:use-window-font-color="true" loext:opacity="0%" style:font-name="Liberation Serif" fo:font-size="13pt" fo:font-weight="bold" officeooo:rsid="05a09c0c" style:font-size-asian="13pt" style:font-weight-asian="bold" style:font-size-complex="13pt" style:font-weight-complex="bold"/>
    </style:style>
    <style:style style:name="T1581" style:family="text">
      <style:text-properties style:use-window-font-color="true" loext:opacity="0%" style:font-name="Liberation Serif" fo:font-size="13pt" fo:font-weight="bold" officeooo:rsid="048a9d4c" style:font-size-asian="13pt" style:font-weight-asian="bold" style:font-size-complex="13pt" style:font-weight-complex="bold"/>
    </style:style>
    <style:style style:name="T1582" style:family="text">
      <style:text-properties style:use-window-font-color="true" loext:opacity="0%" style:font-name="Courier" fo:font-size="13pt" fo:font-weight="bold" officeooo:rsid="05d0883a" style:font-size-asian="13pt" style:font-weight-asian="bold" style:font-size-complex="13pt" style:font-weight-complex="bold"/>
    </style:style>
    <style:style style:name="T1583" style:family="text">
      <style:text-properties style:use-window-font-color="true" loext:opacity="0%" style:font-name="Liberation Serif" fo:font-size="13pt" fo:font-weight="bold" officeooo:rsid="05d0883a" style:font-size-asian="13pt" style:font-weight-asian="bold" style:font-size-complex="13pt" style:font-weight-complex="bold"/>
    </style:style>
    <style:style style:name="T1584" style:family="text">
      <style:text-properties style:use-window-font-color="true" loext:opacity="0%" style:font-name="Liberation Serif" fo:font-size="12pt" fo:font-weight="normal" officeooo:rsid="048a9d4c" style:font-size-asian="10.5pt" style:font-weight-asian="normal" style:font-size-complex="12pt" style:font-weight-complex="normal"/>
    </style:style>
    <style:style style:name="T1585" style:family="text">
      <style:text-properties officeooo:rsid="062cbacb"/>
    </style:style>
    <style:style style:name="T1586" style:family="text">
      <style:text-properties style:font-name="Courier" officeooo:rsid="062cbacb"/>
    </style:style>
    <style:style style:name="T1587" style:family="text">
      <style:text-properties style:font-name="Courier" fo:font-size="10pt" officeooo:rsid="062cbacb" style:font-size-asian="10pt" style:font-size-complex="10pt"/>
    </style:style>
    <style:style style:name="T1588" style:family="text">
      <style:text-properties officeooo:rsid="049d0c12"/>
    </style:style>
    <style:style style:name="T1589" style:family="text">
      <style:text-properties officeooo:rsid="049c1a83"/>
    </style:style>
    <style:style style:name="T1590" style:family="text">
      <style:text-properties style:use-window-font-color="true" loext:opacity="0%" style:font-name="Liberation Serif" fo:font-size="12pt" fo:font-weight="normal" officeooo:rsid="048b18f8" style:font-size-asian="10.5pt" style:font-weight-asian="normal" style:font-size-complex="12pt" style:font-weight-complex="normal"/>
    </style:style>
    <style:style style:name="T1591" style:family="text">
      <style:text-properties style:use-window-font-color="true" loext:opacity="0%" style:font-name="Liberation Serif" fo:font-size="12pt" fo:font-weight="normal" officeooo:rsid="049fa5bc" style:font-size-asian="10.5pt" style:font-weight-asian="normal" style:font-size-complex="12pt" style:font-weight-complex="normal"/>
    </style:style>
    <style:style style:name="T1592" style:family="text">
      <style:text-properties style:use-window-font-color="true" loext:opacity="0%" style:font-name="Liberation Serif" fo:font-size="12pt" fo:font-weight="normal" officeooo:rsid="049d0c12" style:font-size-asian="10.5pt" style:font-weight-asian="normal" style:font-size-complex="12pt" style:font-weight-complex="normal"/>
    </style:style>
    <style:style style:name="T1593" style:family="text">
      <style:text-properties style:use-window-font-color="true" loext:opacity="0%" style:font-name="Liberation Serif" fo:font-size="12pt" fo:font-weight="normal" officeooo:rsid="04a29875" style:font-size-asian="10.5pt" style:font-weight-asian="normal" style:font-size-complex="12pt" style:font-weight-complex="normal"/>
    </style:style>
    <style:style style:name="T1594" style:family="text">
      <style:text-properties style:use-window-font-color="true" loext:opacity="0%" style:font-name="Liberation Serif" fo:font-size="12pt" fo:font-weight="normal" officeooo:rsid="048cbad4" style:font-size-asian="10.5pt" style:font-weight-asian="normal" style:font-size-complex="12pt" style:font-weight-complex="normal"/>
    </style:style>
    <style:style style:name="T1595" style:family="text">
      <style:text-properties style:use-window-font-color="true" loext:opacity="0%" style:font-name="Liberation Serif" fo:font-size="12pt" fo:font-weight="normal" officeooo:rsid="04a41ca8" style:font-size-asian="10.5pt" style:font-weight-asian="normal" style:font-size-complex="12pt" style:font-weight-complex="normal"/>
    </style:style>
    <style:style style:name="T1596" style:family="text">
      <style:text-properties style:font-name="Liberation Serif" fo:font-size="12pt" officeooo:rsid="0491aab8" style:font-size-asian="10.5pt" style:font-size-complex="12pt"/>
    </style:style>
    <style:style style:name="T1597" style:family="text">
      <style:text-properties officeooo:rsid="0491aab8"/>
    </style:style>
    <style:style style:name="T1598" style:family="text">
      <style:text-properties officeooo:rsid="050c6687"/>
    </style:style>
    <style:style style:name="T1599" style:family="text">
      <style:text-properties style:use-window-font-color="true" loext:opacity="0%" style:font-name="Liberation Serif" fo:font-size="12pt" fo:font-weight="normal" officeooo:rsid="0492ec7a" style:font-size-asian="10.5pt" style:font-weight-asian="normal" style:font-size-complex="12pt" style:font-weight-complex="normal"/>
    </style:style>
    <style:style style:name="T1600" style:family="text">
      <style:text-properties style:use-window-font-color="true" loext:opacity="0%" style:font-name="Liberation Serif" fo:font-size="12pt" fo:font-style="italic" fo:font-weight="normal" officeooo:rsid="0492ec7a" style:font-size-asian="10.5pt" style:font-style-asian="italic" style:font-weight-asian="normal" style:font-size-complex="12pt" style:font-style-complex="italic" style:font-weight-complex="normal"/>
    </style:style>
    <style:style style:name="T1601" style:family="text">
      <style:text-properties style:use-window-font-color="true" loext:opacity="0%" style:font-name="Liberation Serif" fo:font-size="12pt" fo:font-style="normal" fo:font-weight="normal" officeooo:rsid="0492ec7a" style:font-size-asian="10.5pt" style:font-style-asian="normal" style:font-weight-asian="normal" style:font-size-complex="12pt" style:font-style-complex="normal" style:font-weight-complex="normal"/>
    </style:style>
    <style:style style:name="T1602" style:family="text">
      <style:text-properties fo:font-size="10pt" officeooo:rsid="0464bd26" fo:background-color="#ffffff" loext:char-shading-value="0" style:font-size-asian="10pt" style:font-size-complex="10pt"/>
    </style:style>
    <style:style style:name="T1603" style:family="text">
      <style:text-properties fo:font-size="10pt" officeooo:rsid="047d3da9" fo:background-color="#ffffff" loext:char-shading-value="0" style:font-size-asian="10pt" style:font-size-complex="10pt"/>
    </style:style>
    <style:style style:name="T1604" style:family="text">
      <style:text-properties style:use-window-font-color="true" loext:opacity="0%" style:font-name="Liberation Serif" fo:font-size="12pt" fo:font-style="normal" fo:font-weight="normal" officeooo:rsid="0494304c" style:font-size-asian="10.5pt" style:font-style-asian="normal" style:font-weight-asian="normal" style:font-size-complex="12pt" style:font-style-complex="normal" style:font-weight-complex="normal"/>
    </style:style>
    <style:style style:name="T1605" style:family="text">
      <style:text-properties style:use-window-font-color="true" loext:opacity="0%" style:font-name="Liberation Serif" fo:font-size="12pt" fo:font-style="normal" fo:font-weight="normal" officeooo:rsid="04a5f080" style:font-size-asian="10.5pt" style:font-style-asian="normal" style:font-weight-asian="normal" style:font-size-complex="12pt" style:font-style-complex="normal" style:font-weight-complex="normal"/>
    </style:style>
    <style:style style:name="T1606" style:family="text">
      <style:text-properties style:use-window-font-color="true" loext:opacity="0%" style:font-name="Liberation Serif" fo:font-size="12pt" fo:font-style="normal" fo:font-weight="normal" officeooo:rsid="04a757f3" style:font-size-asian="10.5pt" style:font-style-asian="normal" style:font-weight-asian="normal" style:font-size-complex="12pt" style:font-style-complex="normal" style:font-weight-complex="normal"/>
    </style:style>
    <style:style style:name="T1607" style:family="text">
      <style:text-properties style:use-window-font-color="true" loext:opacity="0%" style:font-name="Liberation Serif" fo:font-size="12pt" fo:font-style="normal" fo:font-weight="normal" officeooo:rsid="0494b183" style:font-size-asian="10.5pt" style:font-style-asian="normal" style:font-weight-asian="normal" style:font-size-complex="12pt" style:font-style-complex="normal" style:font-weight-complex="normal"/>
    </style:style>
    <style:style style:name="T1608" style:family="text">
      <style:text-properties fo:color="#000000" loext:opacity="100%" style:font-name="Courier" fo:font-size="10.5pt" fo:font-weight="normal" officeooo:rsid="049621dc" fo:background-color="#ffffff" loext:char-shading-value="0"/>
    </style:style>
    <style:style style:name="T1609" style:family="text">
      <style:text-properties fo:color="#a31515" loext:opacity="100%" style:font-name="Courier" fo:font-size="10.5pt" fo:font-weight="normal" officeooo:rsid="049621dc" fo:background-color="#ffffff" loext:char-shading-value="0"/>
    </style:style>
    <style:style style:name="T1610" style:family="text">
      <style:text-properties officeooo:rsid="049621dc"/>
    </style:style>
    <style:style style:name="T1611" style:family="text">
      <style:text-properties style:use-window-font-color="true" loext:opacity="0%" style:font-name="Liberation Serif" fo:font-size="12pt" fo:font-style="normal" fo:font-weight="normal" officeooo:rsid="049621dc" style:font-size-asian="10.5pt" style:font-style-asian="normal" style:font-weight-asian="normal" style:font-size-complex="12pt" style:font-style-complex="normal" style:font-weight-complex="normal"/>
    </style:style>
    <style:style style:name="T1612" style:family="text">
      <style:text-properties style:use-window-font-color="true" loext:opacity="0%" style:font-name="Courier" fo:font-size="12pt" fo:font-style="normal" fo:font-weight="normal" officeooo:rsid="049621dc" style:font-size-asian="10.5pt" style:font-style-asian="normal" style:font-weight-asian="normal" style:font-size-complex="12pt" style:font-style-complex="normal" style:font-weight-complex="normal"/>
    </style:style>
    <style:style style:name="T1613" style:family="text">
      <style:text-properties officeooo:rsid="062df657"/>
    </style:style>
    <style:style style:name="T1614" style:family="text">
      <style:text-properties officeooo:rsid="05d0883a"/>
    </style:style>
    <style:style style:name="T1615" style:family="text">
      <style:text-properties officeooo:rsid="04b4e377"/>
    </style:style>
    <style:style style:name="T1616" style:family="text">
      <style:text-properties style:font-name="Courier" officeooo:rsid="04b4e377"/>
    </style:style>
    <style:style style:name="T1617" style:family="text">
      <style:text-properties style:use-window-font-color="true" loext:opacity="0%" style:font-name="Liberation Serif" fo:font-size="12pt" fo:font-weight="normal" officeooo:rsid="04abe005" style:font-size-asian="10.5pt" style:font-weight-asian="normal" style:font-size-complex="12pt" style:font-weight-complex="normal"/>
    </style:style>
    <style:style style:name="T1618" style:family="text">
      <style:text-properties style:use-window-font-color="true" loext:opacity="0%" style:font-name="Liberation Serif" fo:font-size="12pt" fo:font-weight="normal" officeooo:rsid="04b34869" style:font-size-asian="10.5pt" style:font-weight-asian="normal" style:font-size-complex="12pt" style:font-weight-complex="normal"/>
    </style:style>
    <style:style style:name="T1619" style:family="text">
      <style:text-properties style:use-window-font-color="true" loext:opacity="0%" style:font-name="Courier" fo:font-size="12pt" fo:font-weight="normal" officeooo:rsid="04b4cb6b" style:font-size-asian="10.5pt" style:font-weight-asian="normal" style:font-size-complex="12pt" style:font-weight-complex="normal"/>
    </style:style>
    <style:style style:name="T1620" style:family="text">
      <style:text-properties officeooo:rsid="04b4cb6b"/>
    </style:style>
    <style:style style:name="T1621" style:family="text">
      <style:text-properties officeooo:rsid="04b82282"/>
    </style:style>
    <style:style style:name="T1622" style:family="text">
      <style:text-properties style:font-name="Courier" fo:font-size="10pt" officeooo:rsid="04acc750" style:font-size-asian="10pt" style:font-size-complex="10pt"/>
    </style:style>
    <style:style style:name="T1623" style:family="text">
      <style:text-properties fo:font-size="10pt" officeooo:rsid="04b82282" style:font-size-asian="10pt" style:font-size-complex="10pt"/>
    </style:style>
    <style:style style:name="T1624" style:family="text">
      <style:text-properties style:use-window-font-color="true" loext:opacity="0%" style:font-name="Liberation Serif" fo:font-size="12pt" fo:font-weight="normal" officeooo:rsid="04acc750" style:font-size-asian="10.5pt" style:font-weight-asian="normal" style:font-size-complex="12pt" style:font-weight-complex="normal"/>
    </style:style>
    <style:style style:name="T1625" style:family="text">
      <style:text-properties officeooo:rsid="04acc750"/>
    </style:style>
    <style:style style:name="T1626" style:family="text">
      <style:text-properties style:font-name="Courier" officeooo:rsid="04acc750"/>
    </style:style>
    <style:style style:name="T1627" style:family="text">
      <style:text-properties style:use-window-font-color="true" loext:opacity="0%" style:font-name="Liberation Serif" fo:font-size="12pt" fo:font-weight="normal" officeooo:rsid="062eb447" style:font-size-asian="10.5pt" style:font-weight-asian="normal" style:font-size-complex="12pt" style:font-weight-complex="normal"/>
    </style:style>
    <style:style style:name="T1628" style:family="text">
      <style:text-properties officeooo:rsid="04af5c78"/>
    </style:style>
    <style:style style:name="T1629" style:family="text">
      <style:text-properties officeooo:rsid="04b0c328"/>
    </style:style>
    <style:style style:name="T1630" style:family="text">
      <style:text-properties style:use-window-font-color="true" loext:opacity="0%" style:font-name="Liberation Serif" fo:font-size="12pt" fo:font-style="normal" fo:font-weight="normal" officeooo:rsid="04b880c9" style:font-size-asian="10.5pt" style:font-style-asian="normal" style:font-weight-asian="normal" style:font-size-complex="12pt" style:font-style-complex="normal" style:font-weight-complex="normal"/>
    </style:style>
    <style:style style:name="T1631" style:family="text">
      <style:text-properties style:use-window-font-color="true" loext:opacity="0%" style:font-name="Liberation Serif" fo:font-size="12pt" fo:font-style="italic" fo:font-weight="normal" officeooo:rsid="04b94cde" style:font-size-asian="10.5pt" style:font-style-asian="italic" style:font-weight-asian="normal" style:font-size-complex="12pt" style:font-style-complex="italic" style:font-weight-complex="normal"/>
    </style:style>
    <style:style style:name="T1632" style:family="text">
      <style:text-properties style:use-window-font-color="true" loext:opacity="0%" style:font-name="Liberation Serif" fo:font-size="12pt" fo:font-style="normal" fo:font-weight="normal" officeooo:rsid="04b94cde" style:font-size-asian="10.5pt" style:font-style-asian="normal" style:font-weight-asian="normal" style:font-size-complex="12pt" style:font-style-complex="normal" style:font-weight-complex="normal"/>
    </style:style>
    <style:style style:name="T1633" style:family="text">
      <style:text-properties officeooo:rsid="062eb447"/>
    </style:style>
    <style:style style:name="T1634" style:family="text">
      <style:text-properties officeooo:rsid="04b94cde"/>
    </style:style>
    <style:style style:name="T1635" style:family="text">
      <style:text-properties style:use-window-font-color="true" loext:opacity="0%" style:font-name="Liberation Serif" fo:font-size="12pt" fo:font-style="normal" fo:font-weight="normal" officeooo:rsid="04bb24ae" style:font-size-asian="10.5pt" style:font-style-asian="normal" style:font-weight-asian="normal" style:font-size-complex="12pt" style:font-style-complex="normal" style:font-weight-complex="normal"/>
    </style:style>
    <style:style style:name="T1636" style:family="text">
      <style:text-properties style:use-window-font-color="true" loext:opacity="0%" style:font-name="Liberation Serif" fo:font-size="12pt" fo:font-style="normal" fo:font-weight="normal" officeooo:rsid="062eb447" style:font-size-asian="10.5pt" style:font-style-asian="normal" style:font-weight-asian="normal" style:font-size-complex="12pt" style:font-style-complex="normal" style:font-weight-complex="normal"/>
    </style:style>
    <style:style style:name="T1637" style:family="text">
      <style:text-properties style:use-window-font-color="true" loext:opacity="0%" style:font-name="Liberation Serif" fo:font-size="12pt" fo:font-style="normal" fo:font-weight="normal" officeooo:rsid="04c58b48" style:font-size-asian="10.5pt" style:font-style-asian="normal" style:font-weight-asian="normal" style:font-size-complex="12pt" style:font-style-complex="normal" style:font-weight-complex="normal"/>
    </style:style>
    <style:style style:name="T1638" style:family="text">
      <style:text-properties style:use-window-font-color="true" loext:opacity="0%" style:font-name="Liberation Serif" fo:font-size="12pt" fo:font-style="normal" fo:font-weight="normal" officeooo:rsid="04c942ad" style:font-size-asian="10.5pt" style:font-style-asian="normal" style:font-weight-asian="normal" style:font-size-complex="12pt" style:font-style-complex="normal" style:font-weight-complex="normal"/>
    </style:style>
    <style:style style:name="T1639" style:family="text">
      <style:text-properties style:use-window-font-color="true" loext:opacity="0%" fo:font-weight="normal" officeooo:rsid="04cc93c3" style:font-size-asian="10.5pt" style:font-weight-asian="normal" style:font-weight-complex="normal"/>
    </style:style>
    <style:style style:name="T1640" style:family="text">
      <style:text-properties style:use-window-font-color="true" loext:opacity="0%" style:font-name="Liberation Serif" fo:font-size="12pt" fo:font-style="normal" fo:font-weight="normal" officeooo:rsid="04ce55f9" style:font-size-asian="10.5pt" style:font-style-asian="normal" style:font-weight-asian="normal" style:font-size-complex="12pt" style:font-style-complex="normal" style:font-weight-complex="normal"/>
    </style:style>
    <style:style style:name="T1641" style:family="text">
      <style:text-properties style:use-window-font-color="true" loext:opacity="0%" style:font-name="Liberation Serif" fo:font-size="12pt" fo:font-style="normal" fo:font-weight="normal" officeooo:rsid="04c5e338" style:font-size-asian="10.5pt" style:font-style-asian="normal" style:font-weight-asian="normal" style:font-size-complex="12pt" style:font-style-complex="normal" style:font-weight-complex="normal"/>
    </style:style>
    <style:style style:name="T1642" style:family="text">
      <style:text-properties style:use-window-font-color="true" loext:opacity="0%" fo:font-size="10pt" fo:font-weight="normal" officeooo:rsid="04d04b2f" fo:background-color="#ffffff" loext:char-shading-value="0" style:font-size-asian="10pt" style:font-size-complex="10pt"/>
    </style:style>
    <style:style style:name="T1643" style:family="text">
      <style:text-properties style:use-window-font-color="true" loext:opacity="0%" fo:font-size="10pt" officeooo:rsid="04d217ee" style:font-size-asian="10pt" style:font-size-complex="10pt"/>
    </style:style>
    <style:style style:name="T1644" style:family="text">
      <style:text-properties style:use-window-font-color="true" loext:opacity="0%" fo:font-size="10pt" officeooo:rsid="04d04b2f" style:font-size-asian="10pt" style:font-size-complex="10pt"/>
    </style:style>
    <style:style style:name="T1645" style:family="text">
      <style:text-properties style:use-window-font-color="true" loext:opacity="0%" style:font-name="Courier" fo:font-size="10pt" fo:font-weight="normal" officeooo:rsid="04d217ee" fo:background-color="#ffffff" loext:char-shading-value="0" style:font-size-asian="10pt" style:font-size-complex="10pt"/>
    </style:style>
    <style:style style:name="T1646" style:family="text">
      <style:text-properties style:use-window-font-color="true" loext:opacity="0%" style:font-name="Courier" fo:font-size="10pt" fo:font-weight="normal" officeooo:rsid="04d04b2f" fo:background-color="#ffffff" loext:char-shading-value="0" style:font-size-asian="10pt" style:font-size-complex="10pt"/>
    </style:style>
    <style:style style:name="T1647" style:family="text">
      <style:text-properties style:use-window-font-color="true" loext:opacity="0%" fo:font-size="10pt" fo:font-weight="normal" officeooo:rsid="04d217ee" fo:background-color="#ffffff" loext:char-shading-value="0" style:font-size-asian="10pt" style:font-size-complex="10pt"/>
    </style:style>
    <style:style style:name="T1648" style:family="text">
      <style:text-properties fo:font-style="italic" fo:font-weight="bold" style:font-style-asian="italic" style:font-weight-asian="bold" style:font-style-complex="italic" style:font-weight-complex="bold"/>
    </style:style>
    <style:style style:name="T1649" style:family="text">
      <style:text-properties style:use-window-font-color="true" loext:opacity="0%" fo:font-size="12pt" fo:font-weight="normal" officeooo:rsid="04d9f464" style:font-size-asian="10.5pt" style:font-weight-asian="normal" style:font-size-complex="12pt" style:font-weight-complex="normal"/>
    </style:style>
    <style:style style:name="T1650" style:family="text">
      <style:text-properties fo:font-size="12pt" fo:font-style="italic" style:font-size-asian="10.5pt" style:font-style-asian="italic" style:font-size-complex="12pt" style:font-style-complex="italic"/>
    </style:style>
    <style:style style:name="T1651" style:family="text">
      <style:text-properties fo:font-size="12pt" fo:font-style="italic" officeooo:rsid="062eb447" style:font-size-asian="10.5pt" style:font-style-asian="italic" style:font-size-complex="12pt" style:font-style-complex="italic"/>
    </style:style>
    <style:style style:name="T1652" style:family="text">
      <style:text-properties style:use-window-font-color="true" loext:opacity="0%" fo:font-size="12pt" fo:font-weight="normal" officeooo:rsid="04dc2bf1" style:font-size-asian="10.5pt" style:font-weight-asian="normal" style:font-size-complex="12pt" style:font-weight-complex="normal"/>
    </style:style>
    <style:style style:name="T1653" style:family="text">
      <style:text-properties style:use-window-font-color="true" loext:opacity="0%" fo:font-size="12pt" fo:font-weight="normal" officeooo:rsid="062eb447" style:font-size-asian="10.5pt" style:font-weight-asian="normal" style:font-size-complex="12pt" style:font-weight-complex="normal"/>
    </style:style>
    <style:style style:name="T1654" style:family="text">
      <style:text-properties officeooo:rsid="04dd9536"/>
    </style:style>
    <style:style style:name="T1655" style:family="text">
      <style:text-properties style:font-name="Courier" officeooo:rsid="04dd9536"/>
    </style:style>
    <style:style style:name="T1656" style:family="text">
      <style:text-properties fo:font-size="10pt" officeooo:rsid="04dd9536" style:font-size-asian="10pt" style:font-size-complex="10pt"/>
    </style:style>
    <style:style style:name="T1657" style:family="text">
      <style:text-properties style:use-window-font-color="true" loext:opacity="0%" fo:font-size="12pt" fo:font-weight="normal" officeooo:rsid="04dd9536" style:font-size-asian="10.5pt" style:font-weight-asian="normal" style:font-size-complex="12pt" style:font-weight-complex="normal"/>
    </style:style>
    <style:style style:name="T1658" style:family="text">
      <style:text-properties style:use-window-font-color="true" loext:opacity="0%" style:font-name="Courier" fo:font-size="12pt" fo:font-weight="normal" officeooo:rsid="04dd9536" style:font-size-asian="10.5pt" style:font-weight-asian="normal" style:font-size-complex="12pt" style:font-weight-complex="normal"/>
    </style:style>
    <style:style style:name="T1659" style:family="text">
      <style:text-properties style:use-window-font-color="true" loext:opacity="0%" fo:font-size="12pt" fo:font-weight="normal" officeooo:rsid="04dde177" style:font-size-asian="10.5pt" style:font-weight-asian="normal" style:font-size-complex="12pt" style:font-weight-complex="normal"/>
    </style:style>
    <style:style style:name="T1660" style:family="text">
      <style:text-properties style:use-window-font-color="true" loext:opacity="0%" fo:font-size="12pt" fo:font-weight="normal" officeooo:rsid="04e3069c" style:font-size-asian="10.5pt" style:font-weight-asian="normal" style:font-size-complex="12pt" style:font-weight-complex="normal"/>
    </style:style>
    <style:style style:name="T1661" style:family="text">
      <style:text-properties style:use-window-font-color="true" loext:opacity="0%" fo:font-size="12pt" fo:font-weight="normal" officeooo:rsid="04e616c0" style:font-size-asian="10.5pt" style:font-weight-asian="normal" style:font-size-complex="12pt" style:font-weight-complex="normal"/>
    </style:style>
    <style:style style:name="T1662" style:family="text">
      <style:text-properties style:use-window-font-color="true" loext:opacity="0%" style:font-name="Courier" fo:font-size="10pt" officeooo:rsid="04dde177" fo:background-color="#ffffff" loext:char-shading-value="0" style:font-size-asian="10pt" style:font-size-complex="10pt"/>
    </style:style>
    <style:style style:name="T1663" style:family="text">
      <style:text-properties fo:color="#0000ff" loext:opacity="100%" style:font-name="Courier" fo:background-color="#ffffff" loext:char-shading-value="0"/>
    </style:style>
    <style:style style:name="T1664" style:family="text">
      <style:text-properties style:use-window-font-color="true" loext:opacity="0%" fo:font-size="10pt" officeooo:rsid="04dde177" style:font-size-asian="10pt" style:font-weight-asian="normal" style:font-size-complex="10pt" style:font-weight-complex="normal"/>
    </style:style>
    <style:style style:name="T1665" style:family="text">
      <style:text-properties style:use-window-font-color="true" loext:opacity="0%" style:font-name="Courier" fo:font-size="10pt" fo:font-weight="normal" officeooo:rsid="04dde177" fo:background-color="#ffffff" loext:char-shading-value="0" style:font-size-asian="10pt" style:font-weight-asian="normal" style:font-size-complex="10pt" style:font-weight-complex="normal"/>
    </style:style>
    <style:style style:name="T1666" style:family="text">
      <style:text-properties style:use-window-font-color="true" loext:opacity="0%" fo:font-size="10pt" fo:font-weight="normal" officeooo:rsid="04dde177" fo:background-color="#ffffff" loext:char-shading-value="0" style:font-size-asian="10pt" style:font-weight-asian="normal" style:font-size-complex="10pt" style:font-weight-complex="normal"/>
    </style:style>
    <style:style style:name="T1667" style:family="text">
      <style:text-properties style:use-window-font-color="true" loext:opacity="0%" fo:font-size="12pt" fo:font-weight="normal" officeooo:rsid="04e44536" style:font-size-asian="10.5pt" style:font-weight-asian="normal" style:font-size-complex="12pt" style:font-weight-complex="normal"/>
    </style:style>
    <style:style style:name="T1668" style:family="text">
      <style:text-properties style:use-window-font-color="true" loext:opacity="0%" style:font-name="Courier" fo:font-size="12pt" fo:font-weight="normal" officeooo:rsid="04e44536" style:font-size-asian="10.5pt" style:font-weight-asian="normal" style:font-size-complex="12pt" style:font-weight-complex="normal"/>
    </style:style>
    <style:style style:name="T1669" style:family="text">
      <style:text-properties officeooo:rsid="062fe154"/>
    </style:style>
    <style:style style:name="T1670" style:family="text">
      <style:text-properties style:use-window-font-color="true" loext:opacity="0%" fo:font-weight="normal" officeooo:rsid="04e44536" style:font-size-asian="10.5pt" style:font-weight-asian="normal" style:font-weight-complex="normal"/>
    </style:style>
    <style:style style:name="T1671" style:family="text">
      <style:text-properties officeooo:rsid="055ff446"/>
    </style:style>
    <style:style style:name="T1672" style:family="text">
      <style:text-properties officeooo:rsid="05a1a320"/>
    </style:style>
    <style:style style:name="T1673" style:family="text">
      <style:text-properties officeooo:rsid="055085a4"/>
    </style:style>
    <style:style style:name="T1674" style:family="text">
      <style:text-properties style:use-window-font-color="true" loext:opacity="0%" fo:font-size="12pt" fo:font-weight="normal" officeooo:rsid="00679be2" style:font-size-asian="10.5pt" style:font-weight-asian="normal" style:font-size-complex="12pt" style:font-weight-complex="normal"/>
    </style:style>
    <style:style style:name="T1675" style:family="text">
      <style:text-properties style:use-window-font-color="true" loext:opacity="0%" fo:font-size="12pt" fo:font-style="italic" fo:font-weight="normal" officeooo:rsid="00679be2" style:font-size-asian="10.5pt" style:font-style-asian="italic" style:font-weight-asian="normal" style:font-size-complex="12pt" style:font-style-complex="italic" style:font-weight-complex="normal"/>
    </style:style>
    <style:style style:name="T1676" style:family="text">
      <style:text-properties style:use-window-font-color="true" loext:opacity="0%" fo:font-size="12pt" fo:font-style="italic" fo:font-weight="normal" officeooo:rsid="04efe026" style:font-size-asian="10.5pt" style:font-style-asian="italic" style:font-weight-asian="normal" style:font-size-complex="12pt" style:font-style-complex="italic" style:font-weight-complex="normal"/>
    </style:style>
    <style:style style:name="T1677" style:family="text">
      <style:text-properties style:use-window-font-color="true" loext:opacity="0%" fo:font-size="12pt" fo:font-weight="normal" officeooo:rsid="04efe026" style:font-size-asian="10.5pt" style:font-weight-asian="normal" style:font-size-complex="12pt" style:font-weight-complex="normal"/>
    </style:style>
    <style:style style:name="T1678" style:family="text">
      <style:text-properties style:use-window-font-color="true" loext:opacity="0%" style:font-name="Courier" fo:font-size="12pt" fo:font-weight="normal" officeooo:rsid="04f1516a" style:font-size-asian="10.5pt" style:font-weight-asian="normal" style:font-size-complex="12pt" style:font-weight-complex="normal"/>
    </style:style>
    <style:style style:name="T1679" style:family="text">
      <style:text-properties style:use-window-font-color="true" loext:opacity="0%" fo:font-size="12pt" fo:font-weight="normal" officeooo:rsid="06330c73" style:font-size-asian="10.5pt" style:font-weight-asian="normal" style:font-size-complex="12pt" style:font-weight-complex="normal"/>
    </style:style>
    <style:style style:name="T1680" style:family="text">
      <style:text-properties style:use-window-font-color="true" loext:opacity="0%" fo:font-size="12pt" fo:font-weight="normal" officeooo:rsid="04f9a81a" style:font-size-asian="10.5pt" style:font-weight-asian="normal" style:font-size-complex="12pt" style:font-weight-complex="normal"/>
    </style:style>
    <style:style style:name="T1681" style:family="text">
      <style:text-properties fo:font-weight="bold" officeooo:rsid="063bdb1c" style:font-weight-asian="bold" style:font-weight-complex="bold"/>
    </style:style>
    <style:style style:name="T1682" style:family="text">
      <style:text-properties style:use-window-font-color="true" loext:opacity="0%" style:font-name="Liberation Serif" fo:font-size="12pt" fo:font-weight="normal" officeooo:rsid="04efe026" style:font-size-asian="10.5pt" style:font-weight-asian="normal" style:font-size-complex="12pt" style:font-weight-complex="normal"/>
    </style:style>
    <style:style style:name="T1683" style:family="text">
      <style:text-properties style:use-window-font-color="true" loext:opacity="0%" fo:font-size="12pt" fo:font-weight="normal" officeooo:rsid="05191f36" style:font-size-asian="10.5pt" style:font-weight-asian="normal" style:font-size-complex="12pt" style:font-weight-complex="normal"/>
    </style:style>
    <style:style style:name="T1684" style:family="text">
      <style:text-properties style:use-window-font-color="true" loext:opacity="0%" fo:font-size="12pt" fo:font-weight="normal" officeooo:rsid="04f1516a" style:font-size-asian="10.5pt" style:font-weight-asian="normal" style:font-size-complex="12pt" style:font-weight-complex="normal"/>
    </style:style>
    <style:style style:name="T1685" style:family="text">
      <style:text-properties style:use-window-font-color="true" loext:opacity="0%" fo:font-size="12pt" fo:font-weight="normal" officeooo:rsid="04f44ca6" style:font-size-asian="10.5pt" style:font-weight-asian="normal" style:font-size-complex="12pt" style:font-weight-complex="normal"/>
    </style:style>
    <style:style style:name="T1686" style:family="text">
      <style:text-properties style:use-window-font-color="true" loext:opacity="0%" fo:font-size="12pt" fo:font-weight="normal" officeooo:rsid="04faa6af" style:font-size-asian="10.5pt" style:font-weight-asian="normal" style:font-size-complex="12pt" style:font-weight-complex="normal"/>
    </style:style>
    <style:style style:name="T1687" style:family="text">
      <style:text-properties style:use-window-font-color="true" loext:opacity="0%" fo:font-size="12pt" fo:font-weight="normal" officeooo:rsid="04fcdeb3" style:font-size-asian="10.5pt" style:font-weight-asian="normal" style:font-size-complex="12pt" style:font-weight-complex="normal"/>
    </style:style>
    <style:style style:name="T1688" style:family="text">
      <style:text-properties style:use-window-font-color="true" loext:opacity="0%" fo:font-size="12pt" fo:font-style="italic" fo:font-weight="normal" officeooo:rsid="04fcdeb3" style:font-size-asian="10.5pt" style:font-style-asian="italic" style:font-weight-asian="normal" style:font-size-complex="12pt" style:font-style-complex="italic" style:font-weight-complex="normal"/>
    </style:style>
    <style:style style:name="T1689" style:family="text">
      <style:text-properties fo:font-size="12pt" officeooo:rsid="04fe7958" style:font-size-asian="10.5pt" style:font-size-complex="12pt"/>
    </style:style>
    <style:style style:name="T1690" style:family="text">
      <style:text-properties officeooo:rsid="04fe7958"/>
    </style:style>
    <style:style style:name="T1691" style:family="text">
      <style:text-properties style:font-name="Courier" officeooo:rsid="04fe7958"/>
    </style:style>
    <style:style style:name="T1692" style:family="text">
      <style:text-properties fo:font-size="10pt" officeooo:rsid="04fe7958" style:font-size-asian="10pt" style:font-size-complex="10pt"/>
    </style:style>
    <style:style style:name="T1693" style:family="text">
      <style:text-properties fo:font-size="10pt" officeooo:rsid="05015177" style:font-size-asian="10pt" style:font-size-complex="10pt"/>
    </style:style>
    <style:style style:name="T1694" style:family="text">
      <style:text-properties style:use-window-font-color="true" loext:opacity="0%" style:font-name="Courier" fo:font-size="10pt" fo:font-weight="normal" officeooo:rsid="04f1516a" style:font-size-asian="10pt" style:font-weight-asian="normal" style:font-size-complex="10pt" style:font-weight-complex="normal"/>
    </style:style>
    <style:style style:name="T1695" style:family="text">
      <style:text-properties fo:font-size="12pt" officeooo:rsid="05015177" style:font-size-asian="10.5pt" style:font-size-complex="12pt"/>
    </style:style>
    <style:style style:name="T1696" style:family="text">
      <style:text-properties officeooo:rsid="05015177"/>
    </style:style>
    <style:style style:name="T1697" style:family="text">
      <style:text-properties style:use-window-font-color="true" loext:opacity="0%" style:font-name="Courier" fo:font-weight="normal" officeooo:rsid="04f1516a" style:font-weight-asian="normal" style:font-weight-complex="normal"/>
    </style:style>
    <style:style style:name="T1698" style:family="text">
      <style:text-properties style:use-window-font-color="true" loext:opacity="0%" style:font-name="Courier" fo:font-weight="normal" officeooo:rsid="05015177" style:font-weight-asian="normal" style:font-weight-complex="normal"/>
    </style:style>
    <style:style style:name="T1699" style:family="text">
      <style:text-properties fo:font-size="10pt" officeooo:rsid="05016649" style:font-size-asian="10pt" style:font-size-complex="10pt"/>
    </style:style>
    <style:style style:name="T1700" style:family="text">
      <style:text-properties style:use-window-font-color="true" loext:opacity="0%" fo:font-size="12pt" fo:font-weight="normal" officeooo:rsid="0519c312" style:font-size-asian="10.5pt" style:font-weight-asian="normal" style:font-size-complex="12pt" style:font-weight-complex="normal"/>
    </style:style>
    <style:style style:name="T1701" style:family="text">
      <style:text-properties officeooo:rsid="0519c312"/>
    </style:style>
    <style:style style:name="T1702" style:family="text">
      <style:text-properties officeooo:rsid="05d246e3"/>
    </style:style>
    <style:style style:name="T1703" style:family="text">
      <style:text-properties style:font-name="Courier" officeooo:rsid="0519c312"/>
    </style:style>
    <style:style style:name="T1704" style:family="text">
      <style:text-properties fo:font-size="10pt" officeooo:rsid="05d246e3" style:font-size-asian="10pt" style:font-size-complex="10pt"/>
    </style:style>
    <style:style style:name="T1705" style:family="text">
      <style:text-properties officeooo:rsid="051b9c1d"/>
    </style:style>
    <style:style style:name="T1706" style:family="text">
      <style:text-properties style:use-window-font-color="true" loext:opacity="0%" style:font-name="Courier" fo:font-size="12pt" fo:font-weight="normal" officeooo:rsid="0519c312" style:font-size-asian="10.5pt" style:font-weight-asian="normal" style:font-size-complex="12pt" style:font-weight-complex="normal"/>
    </style:style>
    <style:style style:name="T1707" style:family="text">
      <style:text-properties style:use-window-font-color="true" loext:opacity="0%" fo:font-size="10pt" officeooo:rsid="051fa640" style:font-size-asian="10pt" style:font-size-complex="10pt"/>
    </style:style>
    <style:style style:name="T1708" style:family="text">
      <style:text-properties style:use-window-font-color="true" loext:opacity="0%" fo:font-size="10pt" fo:font-weight="normal" officeooo:rsid="051fa640" fo:background-color="#ffffff" loext:char-shading-value="0" style:font-size-asian="10pt" style:font-size-complex="10pt"/>
    </style:style>
    <style:style style:name="T1709" style:family="text">
      <style:text-properties style:use-window-font-color="true" loext:opacity="0%" fo:font-weight="normal" officeooo:rsid="05253d8c" style:font-size-asian="10.5pt" style:font-weight-asian="normal" style:font-weight-complex="normal"/>
    </style:style>
    <style:style style:name="T1710" style:family="text">
      <style:text-properties style:use-window-font-color="true" loext:opacity="0%" fo:font-size="12pt" fo:font-weight="normal" officeooo:rsid="06333722" style:font-size-asian="10.5pt" style:font-weight-asian="normal" style:font-size-complex="12pt" style:font-weight-complex="normal"/>
    </style:style>
    <style:style style:name="T1711" style:family="text">
      <style:text-properties style:use-window-font-color="true" loext:opacity="0%" style:font-name="Courier" fo:font-size="12pt" fo:font-style="normal" fo:font-weight="normal" officeooo:rsid="05212a11" style:font-size-asian="10.5pt" style:font-style-asian="normal" style:font-weight-asian="normal" style:font-size-complex="12pt" style:font-style-complex="normal" style:font-weight-complex="normal"/>
    </style:style>
    <style:style style:name="T1712" style:family="text">
      <style:text-properties style:use-window-font-color="true" loext:opacity="0%" fo:font-size="12pt" fo:font-weight="normal" officeooo:rsid="0526d0dc" style:font-size-asian="10.5pt" style:font-weight-asian="normal" style:font-size-complex="12pt" style:font-weight-complex="normal"/>
    </style:style>
    <style:style style:name="T1713" style:family="text">
      <style:text-properties style:use-window-font-color="true" loext:opacity="0%" fo:font-size="12pt" fo:font-style="italic" fo:font-weight="normal" officeooo:rsid="0526d0dc" style:font-size-asian="10.5pt" style:font-style-asian="italic" style:font-weight-asian="normal" style:font-size-complex="12pt" style:font-style-complex="italic" style:font-weight-complex="normal"/>
    </style:style>
    <style:style style:name="T1714" style:family="text">
      <style:text-properties officeooo:rsid="0526d0dc"/>
    </style:style>
    <style:style style:name="T1715" style:family="text">
      <style:text-properties style:font-name="Courier" officeooo:rsid="0526d0dc"/>
    </style:style>
    <style:style style:name="T1716" style:family="text">
      <style:text-properties fo:font-size="10pt" officeooo:rsid="0526d0dc" style:font-size-asian="10pt" style:font-size-complex="10pt"/>
    </style:style>
    <style:style style:name="T1717" style:family="text">
      <style:text-properties style:use-window-font-color="true" loext:opacity="0%" fo:font-weight="normal" officeooo:rsid="0526d0dc" style:font-size-asian="10.5pt" style:font-weight-asian="normal" style:font-weight-complex="normal"/>
    </style:style>
    <style:style style:name="T1718" style:family="text">
      <style:text-properties officeooo:rsid="06333722"/>
    </style:style>
    <style:style style:name="T1719" style:family="text">
      <style:text-properties style:use-window-font-color="true" loext:opacity="0%" fo:font-size="12pt" fo:font-weight="normal" officeooo:rsid="05271256" style:font-size-asian="10.5pt" style:font-weight-asian="normal" style:font-size-complex="12pt" style:font-weight-complex="normal"/>
    </style:style>
    <style:style style:name="T1720" style:family="text">
      <style:text-properties style:use-window-font-color="true" loext:opacity="0%" style:font-name="Courier" fo:font-size="12pt" fo:font-weight="normal" officeooo:rsid="05271256" style:font-size-asian="10.5pt" style:font-weight-asian="normal" style:font-size-complex="12pt" style:font-weight-complex="normal"/>
    </style:style>
    <style:style style:name="T1721" style:family="text">
      <style:text-properties officeooo:rsid="05271256"/>
    </style:style>
    <style:style style:name="T1722" style:family="text">
      <style:text-properties fo:font-style="italic" fo:font-weight="normal" officeooo:rsid="05271256" style:font-style-asian="italic" style:font-weight-asian="normal" style:font-style-complex="italic" style:font-weight-complex="normal"/>
    </style:style>
    <style:style style:name="T1723" style:family="text">
      <style:text-properties style:use-window-font-color="true" loext:opacity="0%" fo:font-size="10pt" officeooo:rsid="05271256" style:font-size-asian="10pt" style:font-size-complex="10pt"/>
    </style:style>
    <style:style style:name="T1724" style:family="text">
      <style:text-properties style:use-window-font-color="true" loext:opacity="0%" fo:font-size="10pt" fo:font-weight="normal" officeooo:rsid="05271256" fo:background-color="#ffffff" loext:char-shading-value="0" style:font-size-asian="10pt" style:font-size-complex="10pt"/>
    </style:style>
    <style:style style:name="T1725" style:family="text">
      <style:text-properties style:use-window-font-color="true" loext:opacity="0%" style:font-name="Courier" fo:font-size="10pt" fo:font-weight="normal" officeooo:rsid="05271256" fo:background-color="#ffffff" loext:char-shading-value="0" style:font-size-asian="10pt" style:font-size-complex="10pt"/>
    </style:style>
    <style:style style:name="T17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27" style:family="text">
      <style:text-properties style:font-name="Courier" fo:font-size="12pt" fo:font-style="italic" fo:font-weight="normal" style:font-size-asian="12pt" style:font-style-asian="italic" style:font-weight-asian="normal" style:font-size-complex="12pt" style:font-style-complex="italic" style:font-weight-complex="normal"/>
    </style:style>
    <style:style style:name="T1728" style:family="text">
      <style:text-properties officeooo:rsid="063349e2"/>
    </style:style>
    <style:style style:name="T1729" style:family="text">
      <style:text-properties style:use-window-font-color="true" loext:opacity="0%" fo:font-size="12pt" fo:font-weight="normal" officeooo:rsid="05512e8d" style:font-size-asian="12pt" style:font-weight-asian="normal" style:font-size-complex="12pt" style:font-weight-complex="normal"/>
    </style:style>
    <style:style style:name="T1730" style:family="text">
      <style:text-properties style:use-window-font-color="true" loext:opacity="0%" style:font-name="Courier" fo:font-size="12pt" fo:font-weight="normal" officeooo:rsid="05512e8d" style:font-size-asian="12pt" style:font-weight-asian="normal" style:font-size-complex="12pt" style:font-weight-complex="normal"/>
    </style:style>
    <style:style style:name="T1731" style:family="text">
      <style:text-properties style:use-window-font-color="true" loext:opacity="0%" fo:font-size="12pt" fo:font-style="italic" fo:font-weight="normal" officeooo:rsid="05512e8d" style:font-size-asian="12pt" style:font-style-asian="italic" style:font-weight-asian="normal" style:font-size-complex="12pt" style:font-style-complex="italic" style:font-weight-complex="normal"/>
    </style:style>
    <style:style style:name="T1732" style:family="text">
      <style:text-properties style:use-window-font-color="true" loext:opacity="0%" style:font-name="Courier" fo:font-size="12pt" fo:font-weight="normal" officeooo:rsid="0528f74c" style:font-size-asian="10.5pt" style:font-weight-asian="normal" style:font-size-complex="12pt" style:font-weight-complex="normal"/>
    </style:style>
    <style:style style:name="T1733" style:family="text">
      <style:text-properties officeooo:rsid="05512e8d"/>
    </style:style>
    <style:style style:name="T1734" style:family="text">
      <style:text-properties style:font-name="Courier" officeooo:rsid="05512e8d"/>
    </style:style>
    <style:style style:name="T1735" style:family="text">
      <style:text-properties fo:font-size="10pt" officeooo:rsid="05512e8d" style:font-size-asian="10pt" style:font-size-complex="10pt"/>
    </style:style>
    <style:style style:name="T1736" style:family="text">
      <style:text-properties style:use-window-font-color="true" loext:opacity="0%" fo:font-size="12pt" fo:font-weight="normal" officeooo:rsid="05513024" style:font-size-asian="12pt" style:font-weight-asian="normal" style:font-size-complex="12pt" style:font-weight-complex="normal"/>
    </style:style>
    <style:style style:name="T1737" style:family="text">
      <style:text-properties style:use-window-font-color="true" loext:opacity="0%" fo:font-size="12pt" fo:font-weight="normal" officeooo:rsid="063349e2" style:font-size-asian="12pt" style:font-weight-asian="normal" style:font-size-complex="12pt" style:font-weight-complex="normal"/>
    </style:style>
    <style:style style:name="T1738" style:family="text">
      <style:text-properties style:use-window-font-color="true" loext:opacity="0%" fo:font-weight="normal" officeooo:rsid="05513024" style:font-size-asian="10.5pt" style:font-weight-asian="normal" style:font-weight-complex="normal"/>
    </style:style>
    <style:style style:name="T1739" style:family="text">
      <style:text-properties style:use-window-font-color="true" loext:opacity="0%" fo:font-size="12pt" fo:font-weight="normal" officeooo:rsid="0554450d" style:font-size-asian="12pt" style:font-weight-asian="normal" style:font-size-complex="12pt" style:font-weight-complex="normal"/>
    </style:style>
    <style:style style:name="T1740" style:family="text">
      <style:text-properties officeooo:rsid="055629b2"/>
    </style:style>
    <style:style style:name="T1741" style:family="text">
      <style:text-properties fo:font-weight="bold" officeooo:rsid="14c4e220" style:font-weight-asian="bold" style:font-weight-complex="bold"/>
    </style:style>
    <style:style style:name="T1742" style:family="text">
      <style:text-properties style:font-name="Liberation Serif" fo:font-weight="normal" style:font-weight-asian="normal" style:font-weight-complex="normal"/>
    </style:style>
    <style:style style:name="T1743" style:family="text">
      <style:text-properties officeooo:rsid="0634c71d"/>
    </style:style>
    <style:style style:name="T1744" style:family="text">
      <style:text-properties fo:color="#000080" loext:opacity="100%" fo:font-size="12pt" style:text-underline-style="solid" style:text-underline-width="auto" style:text-underline-color="font-color" officeooo:rsid="14c4e220" style:font-size-asian="12pt" style:font-size-complex="12pt"/>
    </style:style>
    <style:style style:name="T1745" style:family="text">
      <style:text-properties fo:font-size="12pt" officeooo:rsid="0634c71d" style:font-size-asian="12pt" style:font-size-complex="12pt"/>
    </style:style>
    <style:style style:name="T1746" style:family="text">
      <style:text-properties fo:font-size="12pt" fo:font-weight="normal" officeooo:rsid="0634c71d" style:font-size-asian="12pt" style:font-weight-asian="normal" style:font-size-complex="12pt" style:font-weight-complex="normal"/>
    </style:style>
    <style:style style:name="T1747" style:family="text">
      <style:text-properties fo:color="#5ebdab" loext:opacity="100%"/>
    </style:style>
    <style:style style:name="T1748" style:family="text">
      <style:text-properties fo:color="#367bf0" loext:opacity="100%"/>
    </style:style>
    <style:style style:name="T1749" style:family="text">
      <style:text-properties fo:color="#fea44c" loext:opacity="100%"/>
    </style:style>
    <style:style style:name="T1750" style:family="text">
      <style:text-properties style:font-name="Courier" officeooo:rsid="0634c71d"/>
    </style:style>
    <style:style style:name="T1751" style:family="text">
      <style:text-properties style:use-window-font-color="true" loext:opacity="0%" fo:font-size="12pt" fo:font-style="normal" fo:font-weight="normal" officeooo:rsid="05a1a320" style:font-size-asian="10.5pt" style:font-style-asian="normal" style:font-weight-asian="normal" style:font-size-complex="12pt" style:font-style-complex="normal" style:font-weight-complex="normal"/>
    </style:style>
    <style:style style:name="T1752" style:family="text">
      <style:text-properties style:use-window-font-color="true" loext:opacity="0%" fo:font-size="13pt" fo:font-style="normal" fo:font-weight="bold" officeooo:rsid="05a1a320" style:font-size-asian="13pt" style:font-style-asian="normal" style:font-weight-asian="bold" style:font-size-complex="13pt" style:font-style-complex="normal" style:font-weight-complex="bold"/>
    </style:style>
    <style:style style:name="T1753" style:family="text">
      <style:text-properties style:use-window-font-color="true" loext:opacity="0%" fo:font-size="13pt" fo:font-style="normal" fo:font-weight="bold" officeooo:rsid="013533f3" style:font-size-asian="13pt" style:font-style-asian="normal" style:font-weight-asian="bold" style:font-size-complex="13pt" style:font-style-complex="normal" style:font-weight-complex="bold"/>
    </style:style>
    <style:style style:name="T1754" style:family="text">
      <style:text-properties style:use-window-font-color="true" loext:opacity="0%" style:font-name="Courier" fo:font-size="13pt" fo:font-style="normal" fo:font-weight="bold" officeooo:rsid="013533f3" style:font-size-asian="13pt" style:font-style-asian="normal" style:font-weight-asian="bold" style:font-size-complex="13pt" style:font-style-complex="normal" style:font-weight-complex="bold"/>
    </style:style>
    <style:style style:name="T1755" style:family="text">
      <style:text-properties style:use-window-font-color="true" loext:opacity="0%" fo:font-size="12pt" fo:font-style="normal" fo:font-weight="normal" officeooo:rsid="01338523" style:font-size-asian="12pt" style:font-style-asian="normal" style:font-weight-asian="normal" style:font-size-complex="12pt" style:font-style-complex="normal" style:font-weight-complex="normal"/>
    </style:style>
    <style:style style:name="T1756" style:family="text">
      <style:text-properties style:use-window-font-color="true" loext:opacity="0%" fo:font-size="12pt" fo:font-style="normal" fo:font-weight="normal" officeooo:rsid="013435d3" style:font-size-asian="12pt" style:font-style-asian="normal" style:font-weight-asian="normal" style:font-size-complex="12pt" style:font-style-complex="normal" style:font-weight-complex="normal"/>
    </style:style>
    <style:style style:name="T1757" style:family="text">
      <style:text-properties style:use-window-font-color="true" loext:opacity="0%" fo:font-size="12pt" fo:font-style="normal" fo:font-weight="normal" officeooo:rsid="01348f8b" style:font-size-asian="12pt" style:font-style-asian="normal" style:font-weight-asian="normal" style:font-size-complex="12pt" style:font-style-complex="normal" style:font-weight-complex="normal"/>
    </style:style>
    <style:style style:name="T1758" style:family="text">
      <style:text-properties officeooo:rsid="06366c52"/>
    </style:style>
    <style:style style:name="T1759" style:family="text">
      <style:text-properties fo:font-size="12pt" officeooo:rsid="013435d3" style:font-size-asian="12pt" style:font-size-complex="12pt"/>
    </style:style>
    <style:style style:name="T1760" style:family="text">
      <style:text-properties officeooo:rsid="013435d3"/>
    </style:style>
    <style:style style:name="T1761" style:family="text">
      <style:text-properties style:use-window-font-color="true" loext:opacity="0%" fo:font-size="12pt" fo:font-style="normal" fo:font-weight="bold" officeooo:rsid="013503fa" style:font-size-asian="12pt" style:font-style-asian="normal" style:font-weight-asian="bold" style:font-size-complex="12pt" style:font-style-complex="normal" style:font-weight-complex="bold"/>
    </style:style>
    <style:style style:name="T1762" style:family="text">
      <style:text-properties style:use-window-font-color="true" loext:opacity="0%" fo:font-size="12pt" fo:font-style="normal" fo:font-weight="bold" officeooo:rsid="05a70ed4" style:font-size-asian="12pt" style:font-style-asian="normal" style:font-weight-asian="bold" style:font-size-complex="12pt" style:font-style-complex="normal" style:font-weight-complex="bold"/>
    </style:style>
    <style:style style:name="T1763" style:family="text">
      <style:text-properties style:use-window-font-color="true" loext:opacity="0%" fo:font-size="12pt" fo:font-style="normal" fo:font-weight="normal" officeooo:rsid="013503fa" style:font-size-asian="12pt" style:font-style-asian="normal" style:font-weight-asian="normal" style:font-size-complex="12pt" style:font-style-complex="normal" style:font-weight-complex="normal"/>
    </style:style>
    <style:style style:name="T1764" style:family="text">
      <style:text-properties style:use-window-font-color="true" loext:opacity="0%" fo:font-size="12pt" fo:font-weight="normal" officeooo:rsid="017c3590" style:font-size-asian="10.5pt" style:font-weight-asian="normal" style:font-size-complex="12pt" style:font-weight-complex="normal"/>
    </style:style>
    <style:style style:name="T1765" style:family="text">
      <style:text-properties style:use-window-font-color="true" loext:opacity="0%" style:font-name="Courier" fo:font-size="12pt" fo:font-weight="normal" officeooo:rsid="017c3590" style:font-size-asian="10.5pt" style:font-weight-asian="normal" style:font-size-complex="12pt" style:font-weight-complex="normal"/>
    </style:style>
    <style:style style:name="T1766" style:family="text">
      <style:text-properties style:use-window-font-color="true" loext:opacity="0%" fo:font-size="10pt" officeooo:rsid="017c3590" style:font-size-asian="10pt" style:font-size-complex="10pt"/>
    </style:style>
    <style:style style:name="T1767" style:family="text">
      <style:text-properties style:use-window-font-color="true" loext:opacity="0%" fo:font-size="10pt" style:font-size-asian="10pt" style:font-size-complex="10pt"/>
    </style:style>
    <style:style style:name="T1768" style:family="text">
      <style:text-properties style:use-window-font-color="true" loext:opacity="0%" fo:font-size="10pt" fo:font-weight="normal" officeooo:rsid="017c3590" fo:background-color="#ffffff" loext:char-shading-value="0" style:font-size-asian="10pt" style:font-size-complex="10pt"/>
    </style:style>
    <style:style style:name="T1769" style:family="text">
      <style:text-properties style:use-window-font-color="true" loext:opacity="0%" fo:font-size="10pt" fo:font-weight="normal" fo:background-color="#ffffff" loext:char-shading-value="0" style:font-size-asian="10pt" style:font-size-complex="10pt"/>
    </style:style>
    <style:style style:name="T1770" style:family="text">
      <style:text-properties style:use-window-font-color="true" loext:opacity="0%" fo:font-size="12pt" fo:font-style="normal" fo:font-weight="normal" officeooo:rsid="06377f47" style:font-size-asian="12pt" style:font-style-asian="normal" style:font-weight-asian="normal" style:font-size-complex="12pt" style:font-style-complex="normal" style:font-weight-complex="normal"/>
    </style:style>
    <style:style style:name="T1771" style:family="text">
      <style:text-properties style:use-window-font-color="true" loext:opacity="0%" fo:font-size="12pt" fo:font-style="normal" fo:font-weight="normal" officeooo:rsid="01824fe3" style:font-size-asian="12pt" style:font-style-asian="normal" style:font-weight-asian="normal" style:font-size-complex="12pt" style:font-style-complex="normal" style:font-weight-complex="normal"/>
    </style:style>
    <style:style style:name="T1772" style:family="text">
      <style:text-properties style:use-window-font-color="true" loext:opacity="0%" style:font-name="Courier" fo:font-size="12pt" fo:font-style="normal" fo:font-weight="normal" officeooo:rsid="01824fe3" style:font-size-asian="12pt" style:font-style-asian="normal" style:font-weight-asian="normal" style:font-size-complex="12pt" style:font-style-complex="normal" style:font-weight-complex="normal"/>
    </style:style>
    <style:style style:name="T1773" style:family="text">
      <style:text-properties style:use-window-font-color="true" loext:opacity="0%" fo:font-size="12pt" fo:font-style="normal" fo:font-weight="normal" officeooo:rsid="01828479" style:font-size-asian="12pt" style:font-style-asian="normal" style:font-weight-asian="normal" style:font-size-complex="12pt" style:font-style-complex="normal" style:font-weight-complex="normal"/>
    </style:style>
    <style:style style:name="T1774" style:family="text">
      <style:text-properties officeooo:rsid="01828479"/>
    </style:style>
    <style:style style:name="T1775" style:family="text">
      <style:text-properties fo:font-weight="bold" officeooo:rsid="01828479" style:font-weight-asian="bold" style:font-weight-complex="bold"/>
    </style:style>
    <style:style style:name="T1776" style:family="text">
      <style:text-properties officeooo:rsid="01bd3875"/>
    </style:style>
    <style:style style:name="T1777" style:family="text">
      <style:text-properties style:font-name="Courier" officeooo:rsid="01bd3875"/>
    </style:style>
    <style:style style:name="T1778" style:family="text">
      <style:text-properties fo:font-size="10pt" officeooo:rsid="01bd3875" style:font-size-asian="10pt" style:font-size-complex="10pt"/>
    </style:style>
    <style:style style:name="T1779" style:family="text">
      <style:text-properties style:font-name="Courier" fo:font-size="10pt" officeooo:rsid="01bd3875" style:font-size-asian="10pt" style:font-size-complex="10pt"/>
    </style:style>
    <style:style style:name="T1780" style:family="text">
      <style:text-properties style:font-name="Courier" fo:font-size="10pt" officeooo:rsid="01edafdd" style:font-size-asian="10pt" style:font-size-complex="10pt"/>
    </style:style>
    <style:style style:name="T1781" style:family="text">
      <style:text-properties officeooo:rsid="015e0dc3"/>
    </style:style>
    <style:style style:name="T1782" style:family="text">
      <style:text-properties officeooo:rsid="0184553d"/>
    </style:style>
    <style:style style:name="T1783" style:family="text">
      <style:text-properties officeooo:rsid="01b2e0de"/>
    </style:style>
    <style:style style:name="T1784" style:family="text">
      <style:text-properties fo:font-weight="bold" officeooo:rsid="050c6687" style:font-weight-asian="bold" style:font-weight-complex="bold"/>
    </style:style>
    <style:style style:name="T1785" style:family="text">
      <style:text-properties fo:font-size="12pt" fo:font-weight="normal" officeooo:rsid="023dee52" style:font-size-asian="10.5pt" style:font-weight-asian="normal" style:font-size-complex="12pt" style:font-weight-complex="normal"/>
    </style:style>
    <style:style style:name="T1786" style:family="text">
      <style:text-properties style:font-name="Courier" fo:font-size="12pt" fo:font-weight="normal" officeooo:rsid="023dee52" style:font-size-asian="10.5pt" style:font-weight-asian="normal" style:font-size-complex="12pt" style:font-weight-complex="normal"/>
    </style:style>
    <style:style style:name="T1787" style:family="text">
      <style:text-properties officeooo:rsid="01c3cdf8"/>
    </style:style>
    <style:style style:name="T1788" style:family="text">
      <style:text-properties officeooo:rsid="01cbcd8d"/>
    </style:style>
    <style:style style:name="T1789" style:family="text">
      <style:text-properties fo:font-weight="bold" officeooo:rsid="01b30794" style:font-weight-asian="bold" style:font-weight-complex="bold"/>
    </style:style>
    <style:style style:name="T1790" style:family="text">
      <style:text-properties officeooo:rsid="01b30794"/>
    </style:style>
    <style:style style:name="T1791" style:family="text">
      <style:text-properties officeooo:rsid="01c5ecbf" style:font-size-asian="10.5pt"/>
    </style:style>
    <style:style style:name="T1792" style:family="text">
      <style:text-properties style:font-name="Courier" style:font-size-asian="10.5pt"/>
    </style:style>
    <style:style style:name="T1793" style:family="text">
      <style:text-properties officeooo:rsid="01c60c99" style:font-size-asian="10.5pt"/>
    </style:style>
    <style:style style:name="T1794" style:family="text">
      <style:text-properties officeooo:rsid="023f8b6d" style:font-size-asian="10.5pt"/>
    </style:style>
    <style:style style:name="T1795" style:family="text">
      <style:text-properties style:use-window-font-color="true" loext:opacity="0%" fo:font-size="12pt" fo:font-style="normal" fo:font-weight="normal" officeooo:rsid="023a4e67" style:font-size-asian="12pt" style:font-style-asian="normal" style:font-weight-asian="normal" style:font-size-complex="12pt" style:font-style-complex="normal" style:font-weight-complex="normal"/>
    </style:style>
    <style:style style:name="T1796" style:family="text">
      <style:text-properties officeooo:rsid="023ba022"/>
    </style:style>
    <style:style style:name="T1797" style:family="text">
      <style:text-properties style:font-name="Courier" fo:font-size="10pt" officeooo:rsid="01f171f9" style:font-size-asian="10pt" style:font-size-complex="10pt"/>
    </style:style>
    <style:style style:name="T1798" style:family="text">
      <style:text-properties fo:font-size="10pt" officeooo:rsid="023ba022" style:font-size-asian="10pt" style:font-size-complex="10pt"/>
    </style:style>
    <style:style style:name="T1799" style:family="text">
      <style:text-properties officeooo:rsid="05a1a320" style:font-size-asian="13pt" style:font-weight-asian="bold" style:font-size-complex="13pt" style:font-weight-complex="bold"/>
    </style:style>
    <style:style style:name="T1800" style:family="text">
      <style:text-properties officeooo:rsid="01eba202" style:font-size-asian="13pt" style:font-weight-asian="bold" style:font-size-complex="13pt" style:font-weight-complex="bold"/>
    </style:style>
    <style:style style:name="T1801" style:family="text">
      <style:text-properties officeooo:rsid="01f171f9"/>
    </style:style>
    <style:style style:name="T1802" style:family="text">
      <style:text-properties style:font-name="Courier" officeooo:rsid="01f171f9"/>
    </style:style>
    <style:style style:name="T1803" style:family="text">
      <style:text-properties fo:font-size="10pt" officeooo:rsid="01f171f9" style:font-size-asian="10pt" style:font-size-complex="10pt"/>
    </style:style>
    <style:style style:name="T1804" style:family="text">
      <style:text-properties style:use-window-font-color="true" loext:opacity="0%" fo:font-size="13pt" fo:font-weight="bold" officeooo:rsid="05a1a320" style:font-size-asian="13pt" style:font-weight-asian="bold" style:font-size-complex="13pt" style:font-weight-complex="bold"/>
    </style:style>
    <style:style style:name="T1805" style:family="text">
      <style:text-properties style:use-window-font-color="true" loext:opacity="0%" fo:font-size="13pt" fo:font-weight="bold" style:font-size-asian="13pt" style:font-weight-asian="bold" style:font-size-complex="13pt" style:font-weight-complex="bold"/>
    </style:style>
    <style:style style:name="T1806" style:family="text">
      <style:text-properties officeooo:rsid="06315969"/>
    </style:style>
    <style:style style:name="T1807" style:family="text">
      <style:text-properties officeooo:rsid="032d45a2"/>
    </style:style>
    <style:style style:name="T1808" style:family="text">
      <style:text-properties style:font-name="Courier" officeooo:rsid="055e9395"/>
    </style:style>
    <style:style style:name="T1809" style:family="text">
      <style:text-properties style:font-name="Courier" fo:font-size="11pt" style:font-size-asian="11pt" style:font-size-complex="11pt"/>
    </style:style>
    <style:style style:name="T1810" style:family="text">
      <style:text-properties style:font-name="Courier" fo:font-size="11pt" officeooo:rsid="055e9395" style:font-size-asian="11pt" style:font-size-complex="11pt"/>
    </style:style>
    <style:style style:name="T1811" style:family="text">
      <style:text-properties style:font-name="Courier" fo:font-size="11pt" officeooo:rsid="032d45a2" style:font-size-asian="11pt" style:font-size-complex="11pt"/>
    </style:style>
    <style:style style:name="T1812" style:family="text">
      <style:text-properties style:font-name="Liberation Serif" fo:font-weight="normal" officeooo:rsid="032d45a2" style:font-weight-asian="normal" style:font-weight-complex="normal"/>
    </style:style>
    <style:style style:name="T1813" style:family="text">
      <style:text-properties officeooo:rsid="04ed3355"/>
    </style:style>
    <style:style style:name="T1814" style:family="text">
      <style:text-properties fo:color="#800080" loext:opacity="100%" style:font-name="Courier" fo:font-size="12pt" style:font-size-asian="12pt" style:font-size-complex="12pt"/>
    </style:style>
    <style:style style:name="T1815" style:family="text">
      <style:text-properties fo:font-weight="bold" officeooo:rsid="004d37d9" style:font-weight-asian="bold" style:font-weight-complex="bold"/>
    </style:style>
    <style:style style:name="T1816" style:family="text">
      <style:text-properties fo:font-weight="bold" officeooo:rsid="05a517e3" style:font-weight-asian="bold" style:font-weight-complex="bold"/>
    </style:style>
    <style:style style:name="T1817" style:family="text">
      <style:text-properties officeooo:rsid="004d37d9"/>
    </style:style>
    <style:style style:name="T1818" style:family="text">
      <style:text-properties fo:font-weight="bold" officeooo:rsid="00a94259" style:font-weight-asian="bold" style:font-weight-complex="bold"/>
    </style:style>
    <style:style style:name="T1819" style:family="text">
      <style:text-properties officeooo:rsid="00a94259"/>
    </style:style>
    <style:style style:name="T1820" style:family="text">
      <style:text-properties style:font-name="Courier" officeooo:rsid="00a4dba4"/>
    </style:style>
    <style:style style:name="T1821" style:family="text">
      <style:text-properties fo:font-size="12pt" officeooo:rsid="00d6fe4f" style:font-size-asian="10.5pt" style:font-size-complex="12pt"/>
    </style:style>
    <style:style style:name="T1822" style:family="text">
      <style:text-properties officeooo:rsid="00de20d8"/>
    </style:style>
    <style:style style:name="T1823" style:family="text">
      <style:text-properties style:font-name="Courier" officeooo:rsid="00d6fe4f"/>
    </style:style>
    <style:style style:name="T1824" style:family="text">
      <style:text-properties style:font-name="Liberation Serif" fo:font-weight="bold" officeooo:rsid="016b1e19" style:font-weight-asian="bold" style:font-weight-complex="bold"/>
    </style:style>
    <style:style style:name="T1825" style:family="text">
      <style:text-properties style:font-name="Liberation Serif" officeooo:rsid="016b1e19"/>
    </style:style>
    <style:style style:name="T1826" style:family="text">
      <style:text-properties style:font-name="Liberation Serif" officeooo:rsid="05a70ed4"/>
    </style:style>
    <style:style style:name="T1827" style:family="text">
      <style:text-properties style:font-name="Liberation Serif" fo:font-style="italic" fo:font-weight="normal" officeooo:rsid="0287a386" style:font-style-asian="italic" style:font-weight-asian="normal" style:font-style-complex="italic" style:font-weight-complex="normal"/>
    </style:style>
    <style:style style:name="T1828" style:family="text">
      <style:text-properties style:font-name="Liberation Serif" fo:font-style="normal" fo:font-weight="normal" style:font-style-asian="normal" style:font-weight-asian="normal" style:font-style-complex="normal" style:font-weight-complex="normal"/>
    </style:style>
    <style:style style:name="T1829" style:family="text">
      <style:text-properties style:font-name="Liberation Serif" fo:font-style="normal" fo:font-weight="normal" officeooo:rsid="028774ae" style:font-style-asian="normal" style:font-weight-asian="normal" style:font-style-complex="normal" style:font-weight-complex="normal"/>
    </style:style>
    <style:style style:name="T1830" style:family="text">
      <style:text-properties style:use-window-font-color="true" loext:opacity="0%" style:font-name="Liberation Serif" fo:font-size="12pt" fo:font-weight="bold" officeooo:rsid="02796c36" style:font-size-asian="12pt" style:font-weight-asian="bold" style:font-size-complex="12pt" style:font-weight-complex="bold"/>
    </style:style>
    <style:style style:name="T1831" style:family="text">
      <style:text-properties fo:font-weight="normal" officeooo:rsid="02c61f6c" style:font-weight-asian="normal" style:font-weight-complex="normal"/>
    </style:style>
    <style:style style:name="T1832" style:family="text">
      <style:text-properties style:use-window-font-color="true" loext:opacity="0%" fo:font-size="12pt" officeooo:rsid="02df987a" style:font-size-asian="12pt" style:font-size-complex="12pt"/>
    </style:style>
    <style:style style:name="T1833" style:family="text">
      <style:text-properties style:use-window-font-color="true" loext:opacity="0%" fo:font-size="12pt" officeooo:rsid="02e04e87" style:font-size-asian="12pt" style:font-size-complex="12pt"/>
    </style:style>
    <style:style style:name="T1834" style:family="text">
      <style:text-properties fo:font-weight="bold" officeooo:rsid="02e59781" style:font-weight-asian="bold" style:font-weight-complex="bold"/>
    </style:style>
    <style:style style:name="T1835" style:family="text">
      <style:text-properties fo:font-weight="normal" officeooo:rsid="02e59781" style:font-weight-asian="normal" style:font-weight-complex="normal"/>
    </style:style>
    <style:style style:name="T1836" style:family="text">
      <style:text-properties style:use-window-font-color="true" loext:opacity="0%" fo:font-size="12pt" officeooo:rsid="03ce5603" style:font-size-asian="10.5pt" style:font-size-complex="12pt"/>
    </style:style>
    <style:style style:name="T1837" style:family="text">
      <style:text-properties fo:font-weight="bold" officeooo:rsid="04322e94" style:font-weight-asian="bold" style:font-weight-complex="bold"/>
    </style:style>
    <style:style style:name="T1838" style:family="text">
      <style:text-properties officeooo:rsid="04322e94"/>
    </style:style>
    <style:style style:name="T1839" style:family="text">
      <style:text-properties style:font-name="Courier" officeooo:rsid="04130975"/>
    </style:style>
    <style:style style:name="T1840" style:family="text">
      <style:text-properties fo:font-style="normal" fo:font-weight="bold" officeooo:rsid="013503fa" style:font-size-asian="12pt" style:font-style-asian="normal" style:font-weight-asian="bold" style:font-style-complex="normal" style:font-weight-complex="bold"/>
    </style:style>
    <style:style style:name="T1841" style:family="text">
      <style:text-properties fo:font-style="normal" fo:font-weight="bold" officeooo:rsid="05a70ed4" style:font-size-asian="12pt" style:font-style-asian="normal" style:font-weight-asian="bold" style:font-style-complex="normal" style:font-weight-complex="bold"/>
    </style:style>
    <style:style style:name="T1842" style:family="text">
      <style:text-properties fo:font-style="normal" officeooo:rsid="013503fa" style:font-size-asian="12pt" style:font-style-asian="normal" style:font-style-complex="normal"/>
    </style:style>
    <style:style style:name="T1843" style:family="text">
      <style:text-properties fo:font-weight="normal" officeooo:rsid="0037a8ba" style:font-weight-asian="normal" style:font-weight-complex="normal"/>
    </style:style>
    <style:style style:name="T1844" style:family="text">
      <style:text-properties officeooo:rsid="063a0a7d"/>
    </style:style>
    <style:style style:name="T1845" style:family="text">
      <style:text-properties fo:font-weight="normal" officeooo:rsid="05142ac3" style:font-weight-asian="normal" style:font-weight-complex="normal"/>
    </style:style>
    <style:style style:name="T1846" style:family="text">
      <style:text-properties fo:font-weight="normal" officeooo:rsid="050908a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
      <text:p text:style-name="P3">Advanced Programming in the Linux Environment</text:p>
      <text:p text:style-name="P4"/>
      <text:p text:style-name="P4"><text:span text:style-name="T1">Volume</text:span> <text:span text:style-name="T2">III</text:span></text:p>
      <text:p text:style-name="P5"/>
      <text:p text:style-name="P6">Environment and System Databases</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Marco Bruno</text:p>
      <text:p text:style-name="P7"><text:soft-page-break/></text:p>
      <text:p text:style-name="P7"/>
      <text:p text:style-name="P7"/>
      <text:p text:style-name="P7"/>
      <text:p text:style-name="P7"/>
      <text:p text:style-name="P7"/>
      <text:p text:style-name="P7"><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ext:span text:style-name="Strong_20_Emphasis"><text:span text:style-name="T3">Volume</text:span></text:span><text:span text:style-name="Strong_20_Emphasis"><text:span text:style-name="T4"> </text:span></text:span><text:span text:style-name="Strong_20_Emphasis"><text:span text:style-name="T5">III</text:span></text:span><text:span text:style-name="Strong_20_Emphasis"><text:span text:style-name="T4"> — </text:span></text:span><text:span text:style-name="Strong_20_Emphasis"><text:span text:style-name="T5">Environment and System Databases</text:span></text:span></text:p>
      <text:p text:style-name="P9"><text:span text:style-name="Strong_20_Emphasis"><text:span text:style-name="T6"/></text:span></text:p>
      <text:p text:style-name="P10">This chapter explores the process environment and its interaction with the operating system. It includes functions for handling time and date, environment variables, and localization (locale). It also provides a detailed overview of system databases, such as user and group information, along with login records and system identification (<text:span text:style-name="Emphasis">uname</text:span>). The chapter concludes with a dedicated section on Pluggable Authentication Modules (PAM).</text:p>
      <text:p text:style-name="P10"/>
      <text:p text:style-name="P1"/>
      <text:p text:style-name="P11"/>
      <text:p text:style-name="P11"/>
      <text:p text:style-name="P5"/>
      <text:p text:style-name="P4"/>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able of contents</text:p>
      <text:p text:style-name="P14"/>
      <text:p text:style-name="P14"><text:span text:style-name="T2">Volume</text:span> <text:span text:style-name="T7">II</text:span><text:span text:style-name="T8">I</text:span> – <text:span text:style-name="T9">E</text:span><text:span text:style-name="T8">nvironment </text:span><text:span text:style-name="T10">and</text:span><text:span text:style-name="T9"> system databases</text:span></text:p>
      <text:p text:style-name="Standard"/>
      <text:p text:style-name="P15">I<text:span text:style-name="T11">I</text:span><text:span text:style-name="T12">I</text:span>.1 <text:span text:style-name="T8">Time functions</text:span></text:p>
      <text:p text:style-name="Standard"><text:span text:style-name="T13"><text:tab/>III.1.1 Getting the time: </text:span><text:span text:style-name="T14">time</text:span><text:span text:style-name="T13">, </text:span><text:span text:style-name="T14">gettimeofday</text:span><text:span text:style-name="T13"> and </text:span><text:span text:style-name="T14">settimeofday</text:span><text:span text:style-name="T13"> </text:span></text:p>
      <text:p text:style-name="Standard"><text:span text:style-name="T13"><text:tab/>III.1.2 Setting time with </text:span><text:span text:style-name="T14">clock_gettime</text:span><text:span text:style-name="T13"> and </text:span><text:span text:style-name="T14">clock_settime</text:span><text:span text:style-name="T13"> </text:span></text:p>
      <text:p text:style-name="P16"><text:tab/>III.1.3 Clocks on Linux </text:p>
      <text:p text:style-name="Standard"><text:span text:style-name="T13"><text:tab/>III.1.4 Setting a new time: </text:span><text:span text:style-name="T14">tm</text:span></text:p>
      <text:p text:style-name="P16"><text:tab/>III.1.5 Time conversion functions </text:p>
      <text:p text:style-name="Standard"><text:span text:style-name="T13"><text:tab/>III.1.6 Formatting date and time: </text:span><text:span text:style-name="T14">strftime</text:span><text:span text:style-name="T13"> and </text:span><text:span text:style-name="T14">strptime</text:span><text:span text:style-name="T13"> </text:span></text:p>
      <text:p text:style-name="Standard"><text:span text:style-name="T13"><text:tab/>III.1.7 </text:span><text:span text:style-name="T15">T</text:span><text:span text:style-name="T13">ime conversion: </text:span><text:span text:style-name="T14">getdate</text:span></text:p>
      <text:p text:style-name="P17"><text:span text:style-name="T16">I</text:span><text:span text:style-name="T17">I</text:span><text:span text:style-name="T18">I</text:span><text:span text:style-name="T16">.</text:span><text:span text:style-name="T19">2</text:span><text:span text:style-name="T16"> </text:span><text:span text:style-name="T20">The environment</text:span></text:p>
      <text:p text:style-name="P18"><text:tab/>III.2.1 Working with environment variables: getenv and setenv</text:p>
      <text:p text:style-name="P18"><text:tab/>III.2.2 Environment during an execve</text:p>
      <text:p text:style-name="P19">I<text:span text:style-name="T12">I</text:span><text:span text:style-name="T11">I</text:span>.<text:span text:style-name="T12">3</text:span> <text:span text:style-name="T12">Locale</text:span></text:p>
      <text:p text:style-name="Standard"><text:span text:style-name="T21"><text:tab/>III.3.1 Setting locale: </text:span><text:span text:style-name="T14">setlocale</text:span></text:p>
      <text:p text:style-name="Standard"><text:span text:style-name="T21"><text:tab/>III.3.2 Working with locale: </text:span><text:span text:style-name="T14">localeconv</text:span><text:span text:style-name="T21">, <text:s/></text:span><text:span text:style-name="T14">newlocale</text:span><text:span text:style-name="T21"> and </text:span><text:span text:style-name="T14">uselocale</text:span></text:p>
      <text:p text:style-name="Standard"><text:span text:style-name="T21"><text:tab/>III.3.3 Duplicating a locale object: </text:span><text:span text:style-name="T14">duplocale</text:span></text:p>
      <text:p text:style-name="P20">I<text:span text:style-name="T12">I</text:span><text:span text:style-name="T11">I</text:span>.<text:span text:style-name="T12">4</text:span> <text:span text:style-name="T22">The </text:span><text:span text:style-name="T23">U</text:span><text:span text:style-name="T12">ser </text:span><text:span text:style-name="T22">D</text:span><text:span text:style-name="T12">atabas</text:span><text:span text:style-name="T23">e:</text:span><text:span text:style-name="T12"> </text:span><text:span text:style-name="T24">/</text:span><text:span text:style-name="T25">etc/passwd</text:span></text:p>
      <text:p text:style-name="P21"><text:span text:style-name="T26"><text:tab/></text:span><text:span text:style-name="T27">III.4.1 User and group files</text:span></text:p>
      <text:p text:style-name="P22"><text:span text:style-name="T28"><text:tab/>III.4.2 The </text:span><text:span text:style-name="T29">/etc/passwd</text:span><text:span text:style-name="T28"> file</text:span></text:p>
      <text:p text:style-name="P23"><text:span text:style-name="T28"><text:tab/>III.4.3 </text:span><text:span text:style-name="T30">Iterating </text:span><text:span text:style-name="T28">the user database : </text:span><text:span text:style-name="T29">getpwent</text:span><text:span text:style-name="T28"> and </text:span><text:span text:style-name="T29">setpwent</text:span></text:p>
      <text:p text:style-name="P23"><text:span text:style-name="T28"><text:tab/>III.4.4 Working with records : </text:span><text:span text:style-name="T29">fgetpwent</text:span><text:span text:style-name="T28"> and </text:span><text:span text:style-name="T29">putpwent</text:span></text:p>
      <text:p text:style-name="P24"><text:span text:style-name="T16">I</text:span><text:span text:style-name="T18">I</text:span><text:span text:style-name="T17">I</text:span><text:span text:style-name="T16">.</text:span><text:span text:style-name="T18">5</text:span><text:span text:style-name="T16"> </text:span><text:span text:style-name="T31">The </text:span><text:span text:style-name="T18">Group </text:span><text:span text:style-name="T31">D</text:span><text:span text:style-name="T32">atabase: </text:span><text:span text:style-name="T33">/etc/group</text:span></text:p>
      <text:p text:style-name="P23"><text:span text:style-name="T34"><text:tab/></text:span><text:span text:style-name="T35">III.5.1 Reading the group database: </text:span><text:span text:style-name="T29">getgrnam</text:span><text:span text:style-name="T35"> and </text:span><text:span text:style-name="T29">getgrgid</text:span></text:p>
      <text:p text:style-name="P25"><text:span text:style-name="T35"><text:tab/>III.5.2 Working wit</text:span><text:span text:style-name="T36">h</text:span><text:span text:style-name="T35"> the database: </text:span><text:span text:style-name="T29">getgrent</text:span><text:span text:style-name="T35"> and </text:span><text:span text:style-name="T29">setgrent</text:span></text:p>
      <text:p text:style-name="P23"><text:span text:style-name="T35"><text:tab/>III.5.3 </text:span><text:span text:style-name="T37">Retrieving</text:span><text:span text:style-name="T35"> the group list: </text:span><text:span text:style-name="T29">getgrouplist</text:span></text:p>
      <text:p text:style-name="P23"><text:span text:style-name="T35"><text:tab/>III.5.4 Supplementary groups: </text:span><text:span text:style-name="T29">getgroups</text:span><text:span text:style-name="T35">, </text:span><text:span text:style-name="T29">setgroups</text:span><text:span text:style-name="T35"> and </text:span><text:span text:style-name="T29">initgroups</text:span></text:p>
      <text:p text:style-name="P23"><text:span text:style-name="T35"><text:tab/>III.5.5 Real and effective group ID: </text:span><text:span text:style-name="T29">getgid</text:span><text:span text:style-name="T35">, </text:span><text:span text:style-name="T29">getegid</text:span><text:span text:style-name="T35">, </text:span><text:span text:style-name="T29">setgid</text:span><text:span text:style-name="T35">, </text:span><text:span text:style-name="T29">setegid</text:span></text:p>
      <text:p text:style-name="P26"><text:tab/>III.5.6 Saved Set-User-Id and Set-Group-Id</text:p>
      <text:p text:style-name="P23"><text:span text:style-name="T35"><text:tab/>III.5.7 Checking </text:span><text:span text:style-name="T38">whether</text:span><text:span text:style-name="T35"> a process is in a group: </text:span><text:span text:style-name="T29">group_member</text:span></text:p>
      <text:p text:style-name="P20">I<text:span text:style-name="T12">I</text:span><text:span text:style-name="T11">I</text:span>.<text:span text:style-name="T12">6</text:span> <text:span text:style-name="T39">U</text:span><text:span text:style-name="T12">sers </text:span><text:span text:style-name="T23">functions</text:span></text:p>
      <text:p text:style-name="P23"><text:span text:style-name="T21"><text:tab/>III.6.1 Setting user ID: </text:span><text:span text:style-name="T29">getuid</text:span><text:span text:style-name="T21">, </text:span><text:span text:style-name="T29">geteuid</text:span><text:span text:style-name="T21">, </text:span><text:span text:style-name="T29">setuid</text:span><text:span text:style-name="T21"> and </text:span><text:span text:style-name="T29">seteuid</text:span></text:p>
      <text:p text:style-name="P23"><text:span text:style-name="T21"><text:tab/>III.6.2 </text:span><text:span text:style-name="T29">getresgid</text:span><text:span text:style-name="T21"> and </text:span><text:span text:style-name="T29">getresuid</text:span></text:p>
      <text:p text:style-name="P27"><text:span text:style-name="T16">I</text:span><text:span text:style-name="T18">I</text:span><text:span text:style-name="T17">I</text:span><text:span text:style-name="T16">.</text:span><text:span text:style-name="T40">7</text:span><text:span text:style-name="T16"> </text:span><text:span text:style-name="T31">The </text:span><text:span text:style-name="T32">Password </text:span><text:span text:style-name="T31">D</text:span><text:span text:style-name="T32">atabase: </text:span><text:span text:style-name="T33">/etc/shadow</text:span></text:p>
      <text:p text:style-name="P28"><text:span text:style-name="T41"><text:tab/>III.7.1 Creat</text:span><text:span text:style-name="T42">ing</text:span><text:span text:style-name="T41"> </text:span><text:span text:style-name="T43">an </text:span><text:span text:style-name="T41">encrypted passphrase: </text:span><text:span text:style-name="T29">crypt</text:span></text:p>
      <text:p text:style-name="P28"><text:span text:style-name="T41"><text:tab/>III.7.2 Generating a salt: </text:span><text:span text:style-name="T29">crypt_gensalt</text:span></text:p>
      <text:p text:style-name="P28"><text:span text:style-name="T41"><text:tab/>III.7.3 Hiding the input with BSD </text:span><text:span text:style-name="T29">readpassphrase</text:span><text:span text:style-name="T44"><text:tab/></text:span></text:p>
      <text:p text:style-name="P29">I<text:span text:style-name="T12">I</text:span><text:span text:style-name="T11">I</text:span>.<text:span text:style-name="T45">8</text:span> <text:span text:style-name="T45">Login</text:span></text:p>
      <text:p text:style-name="P28"><text:span text:style-name="T21"><text:tab/></text:span><text:span text:style-name="T46">III.8.1 Working with the utmp file: </text:span><text:span text:style-name="T29">getutent</text:span><text:span text:style-name="T46">, </text:span><text:span text:style-name="T29">getutid</text:span><text:span text:style-name="T46">, </text:span><text:span text:style-name="T29">setutent</text:span></text:p>
      <text:p text:style-name="P28"><text:span text:style-name="T46"><text:tab/>III.8.2 The login: </text:span><text:span text:style-name="T29">login</text:span><text:span text:style-name="T46"> and </text:span><text:span text:style-name="T29">logout</text:span></text:p>
      <text:p text:style-name="P30">I<text:span text:style-name="T12">I</text:span><text:span text:style-name="T11">I</text:span>.<text:span text:style-name="T47">9</text:span> <text:span text:style-name="T22">The h</text:span><text:span text:style-name="T48">ost, network, protocol </text:span><text:span text:style-name="T49">and</text:span><text:span text:style-name="T48"> service databases</text:span></text:p>
      <text:p text:style-name="P31"><text:span text:style-name="T50"><text:tab/>III.9.1 </text:span><text:span text:style-name="T51">The host database: </text:span><text:span text:style-name="T52">/</text:span><text:span text:style-name="T53">etc/hosts</text:span></text:p>
      <text:p text:style-name="P31"><text:span text:style-name="T50"><text:tab/>III.9.2 </text:span><text:span text:style-name="T51">The </text:span><text:span text:style-name="T54">network database: </text:span><text:span text:style-name="T55">/</text:span><text:span text:style-name="T53">etc/</text:span><text:span text:style-name="T56">networks</text:span></text:p>
      <text:p text:style-name="P31"><text:span text:style-name="T50"><text:tab/>III.9.3 </text:span><text:span text:style-name="T51">The </text:span><text:span text:style-name="T57">protocol</text:span><text:span text:style-name="T54"> database: </text:span><text:span text:style-name="T53">/etc/protocols</text:span></text:p>
      <text:p text:style-name="P32"><text:span text:style-name="T54"><text:tab/></text:span><text:span text:style-name="T58">III.9.4 </text:span><text:span text:style-name="T51">The </text:span><text:span text:style-name="T59">service</text:span><text:span text:style-name="T54"> database: </text:span><text:span text:style-name="T53">/etc/services</text:span></text:p>
      <text:p text:style-name="P33"><text:soft-page-break/>I<text:span text:style-name="T12">I</text:span><text:span text:style-name="T11">I</text:span>.<text:span text:style-name="T60">1</text:span><text:span text:style-name="T48">0</text:span> <text:span text:style-name="T47">System identification</text:span></text:p>
      <text:p text:style-name="P34"><text:span text:style-name="T21"><text:tab/></text:span><text:span text:style-name="T61">III.10.1 Getting system information: </text:span><text:span text:style-name="T62">uname</text:span></text:p>
      <text:p text:style-name="P34"><text:span text:style-name="T61"><text:tab/>III.10.2 Getting and setting hostname: </text:span><text:span text:style-name="T62">gethostname</text:span><text:span text:style-name="T61"> and </text:span><text:span text:style-name="T62">sethostent</text:span></text:p>
      <text:p text:style-name="P15">I<text:span text:style-name="T12">I</text:span><text:span text:style-name="T11">I</text:span>.<text:span text:style-name="T60">1</text:span><text:span text:style-name="T63">1 Pluggable Authentication Modules</text:span></text:p>
      <text:p text:style-name="P34"><text:span text:style-name="T13"><text:tab/>III.11.1 PAM Authentication: </text:span><text:span text:style-name="T62">pam_authenticate</text:span><text:span text:style-name="T13"> </text:span></text:p>
      <text:p text:style-name="P34"><text:span text:style-name="T13"><text:tab/>III.11.2 PAM Session: </text:span><text:span text:style-name="T62">pam_open_session</text:span><text:span text:style-name="T13"> and </text:span><text:span text:style-name="T62">pam_close_session</text:span></text:p>
      <text:p text:style-name="P34"><text:span text:style-name="T13"><text:tab/>III.11.3 Process environment and PAM environment: </text:span><text:span text:style-name="T62">pam_getenv</text:span><text:span text:style-name="T13">, </text:span><text:span text:style-name="T62">pam_putenv</text:span><text:span text:style-name="T13"> </text:span></text:p>
      <text:p text:style-name="P34"><text:span text:style-name="T13"><text:tab/>III.11.4 PAM items: </text:span><text:span text:style-name="T62">pam_get_item</text:span><text:span text:style-name="T13"> and </text:span><text:span text:style-name="T62">pam_set_item</text:span><text:span text:style-name="T13"> </text:span></text:p>
      <text:p text:style-name="P34"><text:span text:style-name="T13"><text:tab/>III.11.5 Changing password: </text:span><text:span text:style-name="T62">pam_chauthtok</text:span></text:p>
      <text:p text:style-name="P35"><text:span text:style-name="T64">III.1</text:span><text:span text:style-name="T65">2</text:span><text:span text:style-name="T64"> Theory </text:span><text:span text:style-name="T66">and</text:span><text:span text:style-name="T64"> </text:span><text:span text:style-name="T66">i</text:span><text:span text:style-name="T64">nsights</text:span></text:p>
      <text:p text:style-name="P36"><text:tab/>III.1<text:span text:style-name="T67">2</text:span>.1 The Process Execution Environment</text:p>
      <text:p text:style-name="P37"><text:span text:style-name="T64"><text:tab/>III.1</text:span><text:span text:style-name="T65">2</text:span><text:span text:style-name="T64">.2 The </text:span><text:span text:style-name="T53">intmax_t</text:span><text:span text:style-name="T64"> and </text:span><text:span text:style-name="T53">uintmax_t</text:span><text:span text:style-name="T64"> data types</text:span></text:p>
      <text:p text:style-name="P37"><text:span text:style-name="T64"><text:tab/>III.1</text:span><text:span text:style-name="T65">2</text:span><text:span text:style-name="T64">.3 Using </text:span><text:span text:style-name="T53">initgroups</text:span><text:span text:style-name="T64"> to set up the supplementary groups</text:span></text:p>
      <text:p text:style-name="P36"><text:tab/>III.1<text:span text:style-name="T67">2</text:span>.4 Command line tools for the groups</text:p>
      <text:p text:style-name="P36"><text:tab/>III.1<text:span text:style-name="T67">2</text:span>.5 The <text:span text:style-name="T68">Name Service Switch </text:span></text:p>
      <text:p text:style-name="P36"><text:tab/>III.1<text:span text:style-name="T67">2</text:span>.6 Command line tools for the users</text:p>
      <text:p text:style-name="P36"><text:tab/>III.1<text:span text:style-name="T67">2</text:span>.7 The login process</text:p>
      <text:p text:style-name="P36"><text:tab/>III.1<text:span text:style-name="T67">2</text:span>.8 PAM functions summary</text:p>
      <text:p text:style-name="P38">List of tables</text:p>
      <text:p text:style-name="P39">List of <text:span text:style-name="T69">figures</text:span></text:p>
      <text:p text:style-name="P40">Bibliograph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text:soft-page-break/><text:span text:style-name="T70">II</text:span><text:span text:style-name="T71">I</text:span><text:span text:style-name="T70">.1 </text:span><text:span text:style-name="T72">Time functions</text:span></text:p>
      <text:p text:style-name="P42"><text:span text:style-name="T73"/></text:p>
      <text:p text:style-name="P43">When we work <text:span text:style-name="T74">on Linux systems</text:span> it is a good practice to know how the system deals with dates and times, how we can retrieve these information and how we can use them. </text:p>
      <text:p text:style-name="P44">We have already seen how to retrieve the current time with the command <text:span text:style-name="T75">date</text:span>. <text:span text:style-name="T76">We examine </text:span>some options of this command.</text:p>
      <text:p text:style-name="P44"/>
      <table:table table:name="Table134" table:style-name="Table134">
        <table:table-column table:style-name="Table134.A"/>
        <table:table-row>
          <table:table-cell table:style-name="Table134.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79">date</text:span></text:p>
            <text:p text:style-name="P46">Fri Apr 25 05:37:42 +07 2025</text:p>
            <text:p text:style-name="P46"/>
            <text:p text:style-name="P45"><text:span text:style-name="T80">[</text:span><text:a xlink:type="simple" xlink:href="mailto:linux@fidir" text:style-name="Internet_20_link" text:visited-style-name="Visited_20_Internet_20_Link"><text:span text:style-name="T81">linux@fidir</text:span></text:a><text:span text:style-name="T80">] </text:span>date -<text:span text:style-name="T82">u</text:span></text:p>
            <text:p text:style-name="P45">Thu Apr 24 22:38:37 UTC 2025</text:p>
            <text:p text:style-name="P45"/>
            <text:p text:style-name="P45"><text:span text:style-name="T80">[</text:span><text:a xlink:type="simple" xlink:href="mailto:linux@fidir" text:style-name="Internet_20_link" text:visited-style-name="Visited_20_Internet_20_Link"><text:span text:style-name="T81">linux@fidir</text:span></text:a><text:span text:style-name="T80">] </text:span>date <text:span text:style-name="T82">+%D</text:span></text:p>
            <text:p text:style-name="P45">04/25/25</text:p>
            <text:p text:style-name="P45"/>
            <text:p text:style-name="P45"><text:span text:style-name="T80">[</text:span><text:a xlink:type="simple" xlink:href="mailto:linux@fidir" text:style-name="Internet_20_link" text:visited-style-name="Visited_20_Internet_20_Link"><text:span text:style-name="T81">linux@fidir</text:span></text:a><text:span text:style-name="T80">] </text:span>date <text:span text:style-name="T82">+%T</text:span></text:p>
            <text:p text:style-name="P45">05:41:06</text:p>
            <text:p text:style-name="P45"/>
            <text:p text:style-name="P45"><text:span text:style-name="T80">[</text:span><text:a xlink:type="simple" xlink:href="mailto:linux@fidir" text:style-name="Internet_20_link" text:visited-style-name="Visited_20_Internet_20_Link"><text:span text:style-name="T81">linux@fidir</text:span></text:a><text:span text:style-name="T80">] </text:span><text:span text:style-name="T82">date +%s</text:span></text:p>
            <text:p text:style-name="P45">1745534529</text:p>
          </table:table-cell>
        </table:table-row>
      </table:table>
      <text:p text:style-name="P44"/>
      <text:p text:style-name="P47"><text:span text:style-name="T83">Without any options, </text:span><text:span text:style-name="T84">date</text:span><text:span text:style-name="T83"> returns the current date and time, </text:span><text:span text:style-name="T85">passing</text:span><text:span text:style-name="T83"> the option </text:span><text:span text:style-name="T84">-u</text:span><text:span text:style-name="T83">, it returns the UTC time. The </text:span><text:span text:style-name="T84">+</text:span><text:span text:style-name="T83"> sign is used to specify which format or part of the date the command must returns: </text:span><text:span text:style-name="T84">D</text:span><text:span text:style-name="T83"> returns the current date in local format, </text:span><text:span text:style-name="T84">T</text:span><text:span text:style-name="T83"> the current time, </text:span><text:span text:style-name="T84">s</text:span><text:span text:style-name="T83"> the timestamp from the Epoch.</text:span></text:p>
      <text:p text:style-name="P43"/>
      <text:p text:style-name="P47"><text:span text:style-name="T86">In the /</text:span><text:span text:style-name="T84">etc</text:span><text:span text:style-name="T86"> folder, the symbolic link </text:span><text:span text:style-name="T84">localtime</text:span><text:span text:style-name="T86"> points to the file containing the data of the local timezone, </text:span><text:span text:style-name="T85">which is</text:span><text:span text:style-name="T86"> in the folder </text:span><text:span text:style-name="T84">/usr/share/zoneinfo</text:span><text:span text:style-name="T86">. </text:span></text:p>
      <text:p text:style-name="P44"/>
      <table:table table:name="Table135" table:style-name="Table135">
        <table:table-column table:style-name="Table135.A"/>
        <table:table-row>
          <table:table-cell table:style-name="Table135.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87">ls -l /etc/localtime</text:span></text:p>
            <text:p text:style-name="P48">lrwxrwxrwx 1 root root 35 Mar 26 20:31 <text:span text:style-name="T88">/etc/localtime</text:span> -&gt; /usr/share/zoneinfo/Asia/Phnom_Penh</text:p>
            <text:p text:style-name="P48"/>
            <text:p text:style-name="P45"><text:span text:style-name="T80">[</text:span><text:a xlink:type="simple" xlink:href="mailto:linux@fidir" text:style-name="Internet_20_link" text:visited-style-name="Visited_20_Internet_20_Link"><text:span text:style-name="T81">linux@fidir</text:span></text:a><text:span text:style-name="T80">] </text:span><text:span text:style-name="T89">file </text:span><text:span text:style-name="T87">/usr/share/zoneinfo/Asia/Phnom_Penh</text:span></text:p>
            <text:p text:style-name="P48">/usr/share/zoneinfo/Asia/Phnom_Penh: <text:span text:style-name="T90">timezone data (fat)</text:span>, version 2, no gmt time flags, no std time flags, no leap seconds, 5 transition times, 6 local time types, 21 abbreviation chars</text:p>
          </table:table-cell>
        </table:table-row>
      </table:table>
      <text:p text:style-name="P44"/>
      <text:p text:style-name="P49">The <text:span text:style-name="T76">pointed </text:span>file is a <text:span text:style-name="T68">timezone data</text:span> file <text:span text:style-name="T76">(</text:span>binary file<text:span text:style-name="T76">)</text:span>.</text:p>
      <text:p text:style-name="P50"/>
      <text:p text:style-name="P50">In <text:span text:style-name="T76">addition, in </text:span>the <text:span text:style-name="T75">/etc</text:span> folder, there is the file <text:span text:style-name="T76">containing</text:span> the information of the current timezone.</text:p>
      <text:p text:style-name="P44"/>
      <table:table table:name="Table136" table:style-name="Table136">
        <table:table-column table:style-name="Table136.A"/>
        <table:table-row>
          <table:table-cell table:style-name="Table136.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87">ls -l /etc/</text:span><text:span text:style-name="T91">timezone</text:span></text:p>
            <text:p text:style-name="P51">-rw-r--r-- 1 root root 16 Apr 17 08:13 timezone</text:p>
            <text:p text:style-name="P48"/>
            <text:p text:style-name="P45"><text:span text:style-name="T80">[</text:span><text:a xlink:type="simple" xlink:href="mailto:linux@fidir" text:style-name="Internet_20_link" text:visited-style-name="Visited_20_Internet_20_Link"><text:span text:style-name="T81">linux@fidir</text:span></text:a><text:span text:style-name="T80">] </text:span><text:span text:style-name="T92">cat /etc/timezone</text:span></text:p>
            <text:p text:style-name="P45">Asia/Phnom_Penh</text:p>
          </table:table-cell>
        </table:table-row>
      </table:table>
      <text:p text:style-name="P43"/>
      <text:p text:style-name="P52"><text:span text:style-name="T85">The </text:span><text:span text:style-name="T93">/usr/share/zoneinfo</text:span><text:span text:style-name="T85"> directories contains files for the various time zones available on the system. </text:span></text:p>
      <text:p text:style-name="P53"/>
      <text:p text:style-name="P53"/>
      <text:p text:style-name="P54"><text:soft-page-break/><text:span text:style-name="T94">III.1.1 Getting the time: </text:span><text:span text:style-name="T95">time</text:span><text:span text:style-name="T94">, </text:span><text:span text:style-name="T95">gettimeofday</text:span><text:span text:style-name="T94"> and </text:span><text:span text:style-name="T95">settimeofday</text:span></text:p>
      <text:p text:style-name="P53"/>
      <text:p text:style-name="P55"><text:span text:style-name="T96">Linux provides many functions for handling date and time. The </text:span><text:span text:style-name="Source_20_Text"><text:span text:style-name="T97">time</text:span></text:span><text:span text:style-name="Source_20_Text"><text:span text:style-name="T97"><text:note text:id="ftn3" text:note-class="footnote"><text:note-citation>1</text:note-citation><text:note-body><text:p text:style-name="P56"><text:span text:style-name="T98">See the </text:span><text:span text:style-name="T99">time(2)</text:span> <text:span text:style-name="T100">manual page</text:span></text:p></text:note-body></text:note></text:span></text:span><text:span text:style-name="T96"> function returns the time as the number of seconds elapsed since the Epoch.</text:span></text:p>
      <text:p text:style-name="P53"/>
      <table:table table:name="Table137" table:style-name="Table137">
        <table:table-column table:style-name="Table137.A"/>
        <table:table-row>
          <table:table-cell table:style-name="Table137.A1" office:value-type="string">
            <text:p text:style-name="P57"><text:span text:style-name="T101">#include </text:span><text:span text:style-name="T102">&lt;time.h&gt;</text:span></text:p>
            <text:p text:style-name="P58"/>
            <text:p text:style-name="P59"><text:span text:style-name="T103">time_t</text:span><text:span text:style-name="T104"> </text:span><text:span text:style-name="T105">time</text:span><text:span text:style-name="T104">(</text:span><text:span text:style-name="T103">time_t</text:span><text:span text:style-name="T104"> *</text:span><text:span text:style-name="T103">_Nullable</text:span><text:span text:style-name="T104"> </text:span><text:span text:style-name="T106">tloc</text:span><text:span text:style-name="T104">);</text:span></text:p>
            <text:p text:style-name="P60"/>
            <text:p text:style-name="P61"><text:s text:c="8"/><text:span text:style-name="T68">Returns: the number of seconds </text:span><text:span text:style-name="T107">if success, -1 if error and errno is set</text:span></text:p>
          </table:table-cell>
        </table:table-row>
      </table:table>
      <text:p text:style-name="P53"/>
      <text:p text:style-name="P47"><text:span text:style-name="T108">If </text:span><text:span text:style-name="T93">tloc</text:span><text:span text:style-name="T108"> is no</text:span><text:span text:style-name="T109">t</text:span><text:span text:style-name="T108"> NULL, the returned value is stored </text:span><text:span text:style-name="T109">in</text:span><text:span text:style-name="T108"> it. </text:span><text:span text:style-name="T110">The number </text:span><text:span text:style-name="T109">returned by this calls, represents </text:span><text:span text:style-name="T110">the number of seconds since the date “</text:span><text:span text:style-name="T93">1970-01-01 00:00:00 +0000 (UTC)</text:span><text:span text:style-name="T110">”.</text:span></text:p>
      <text:p text:style-name="P62"/>
      <text:p text:style-name="P62"><text:span text:style-name="T100">To retrieve and set the time, t</text:span>he following functions<text:note text:id="ftn4" text:note-class="footnote"><text:note-citation>2</text:note-citation><text:note-body><text:p text:style-name="P63"><text:span text:style-name="T111">See the man page </text:span><text:span text:style-name="T112">gettimeofday(2)</text:span><text:span text:style-name="T113"> </text:span><text:span text:style-name="T114">manual page</text:span></text:p></text:note-body></text:note> are <text:span text:style-name="T100">available.</text:span></text:p>
      <text:p text:style-name="P53"/>
      <table:table table:name="Table138" table:style-name="Table138">
        <table:table-column table:style-name="Table138.A"/>
        <table:table-row>
          <table:table-cell table:style-name="Table138.A1" office:value-type="string">
            <text:p text:style-name="P64"><text:span text:style-name="T115">#include </text:span><text:span text:style-name="T116">&lt;sys/time.h&gt;</text:span></text:p>
            <text:p text:style-name="P58"/>
            <text:p text:style-name="P59"><text:span text:style-name="T103">int</text:span><text:span text:style-name="T104"> </text:span><text:span text:style-name="T105">gettimeofday</text:span><text:span text:style-name="T104">(</text:span><text:span text:style-name="T103">struct</text:span><text:span text:style-name="T104"> </text:span><text:span text:style-name="T103">timeval</text:span><text:span text:style-name="T104"> *</text:span><text:span text:style-name="T103">restrict</text:span><text:span text:style-name="T104"> </text:span><text:span text:style-name="T106">tv</text:span><text:span text:style-name="T104">, </text:span><text:span text:style-name="T103">struct</text:span><text:span text:style-name="T104"> </text:span><text:span text:style-name="T103">timezone</text:span><text:span text:style-name="T104"> *</text:span><text:span text:style-name="T103">_Nullable</text:span><text:span text:style-name="T104"> <text:s/></text:span></text:p>
            <text:p text:style-name="P59"><text:span text:style-name="T103"><text:s text:c="17"/>restrict</text:span><text:span text:style-name="T104"> </text:span><text:span text:style-name="T106">tz</text:span><text:span text:style-name="T104">);</text:span></text:p>
            <text:p text:style-name="P64"/>
            <text:p text:style-name="P59"><text:span text:style-name="T103">int</text:span><text:span text:style-name="T104"> </text:span><text:span text:style-name="T105">settimeofday</text:span><text:span text:style-name="T104">(</text:span><text:span text:style-name="T103">const</text:span><text:span text:style-name="T104"> </text:span><text:span text:style-name="T103">struct</text:span><text:span text:style-name="T104"> </text:span><text:span text:style-name="T103">timeval</text:span><text:span text:style-name="T104"> </text:span><text:span text:style-name="T106">*tv</text:span><text:span text:style-name="T104">, </text:span><text:span text:style-name="T103">const</text:span><text:span text:style-name="T104"> </text:span><text:span text:style-name="T103">struct</text:span><text:span text:style-name="T104"> </text:span><text:span text:style-name="T103">timezone</text:span><text:span text:style-name="T104"> <text:s/></text:span></text:p>
            <text:p text:style-name="P59"><text:span text:style-name="T104"><text:s text:c="17"/>*</text:span><text:span text:style-name="T103">_Nullable</text:span><text:span text:style-name="T104"> </text:span><text:span text:style-name="T106">tz</text:span><text:span text:style-name="T104">);</text:span></text:p>
            <text:p text:style-name="P65"/>
            <text:p text:style-name="P61"><text:s text:c="28"/><text:span text:style-name="T68">Returns: </text:span><text:span text:style-name="T117">0 </text:span><text:span text:style-name="T107">if success, -1 if error and errno is set</text:span></text:p>
          </table:table-cell>
        </table:table-row>
      </table:table>
      <text:p text:style-name="P53"/>
      <text:p text:style-name="P47"><text:span text:style-name="T109">The</text:span><text:span text:style-name="T118"> </text:span><text:span text:style-name="T93">timeval</text:span><text:span text:style-name="T118"> </text:span><text:span text:style-name="T109">structure is </text:span><text:span text:style-name="T118">defined in the </text:span><text:span text:style-name="T93">sys/time.h</text:span><text:span text:style-name="T118"> </text:span><text:span text:style-name="T109">file header as follows:</text:span></text:p>
      <text:p text:style-name="P66"/>
      <table:table table:name="Table139" table:style-name="Table139">
        <table:table-column table:style-name="Table139.A"/>
        <table:table-row>
          <table:table-cell table:style-name="Table139.A1" office:value-type="string">
            <text:p text:style-name="P67"><text:span text:style-name="T115">struct</text:span> timeval {</text:p>
            <text:p text:style-name="P64"><text:span text:style-name="T115"><text:s text:c="3"/>time_t</text:span> tv_sec;<text:span text:style-name="T119"> <text:s text:c="9"/>/* seconds */</text:span></text:p>
            <text:p text:style-name="P64"><text:span text:style-name="T115"><text:s text:c="3"/>suseconds_t</text:span> tv_usec;<text:span text:style-name="T119"> <text:s text:c="3"/>/* microseconds */</text:span></text:p>
            <text:p text:style-name="P64">};</text:p>
          </table:table-cell>
        </table:table-row>
      </table:table>
      <text:p text:style-name="P66"/>
      <text:p text:style-name="P47"><text:span text:style-name="T120">The </text:span><text:span text:style-name="T93">timezone</text:span><text:span text:style-name="T120"> </text:span><text:span text:style-name="T109">structure is </text:span><text:span text:style-name="T120">defined </text:span><text:span text:style-name="T109">as follows:</text:span></text:p>
      <text:p text:style-name="P66"/>
      <table:table table:name="Table140" table:style-name="Table140">
        <table:table-column table:style-name="Table140.A"/>
        <table:table-row>
          <table:table-cell table:style-name="Table140.A1" office:value-type="string">
            <text:p text:style-name="P67"><text:span text:style-name="T115">struct</text:span> timezone {</text:p>
            <text:p text:style-name="P64"><text:span text:style-name="T115"><text:s text:c="3"/>int</text:span> tz_minuteswest;<text:span text:style-name="T119"> <text:s text:c="2"/>/* minutes west of Greenwich */</text:span></text:p>
            <text:p text:style-name="P64"><text:span text:style-name="T115"><text:s text:c="3"/>int</text:span> tz_dsttime;<text:span text:style-name="T119"> <text:s text:c="6"/>/* type of DST correction */</text:span></text:p>
            <text:p text:style-name="P64">};</text:p>
          </table:table-cell>
        </table:table-row>
      </table:table>
      <text:p text:style-name="P66"/>
      <text:p text:style-name="P47"><text:span text:style-name="T120">Since the </text:span><text:span text:style-name="T93">tz</text:span><text:span text:style-name="T120"> </text:span><text:span text:style-name="T109">argument is obsolete, it </text:span><text:span text:style-name="T120">is usually specified as </text:span><text:span text:style-name="T93">NULL</text:span><text:span text:style-name="T120">.</text:span></text:p>
      <text:p text:style-name="P68"/>
      <text:p text:style-name="P55"><text:span text:style-name="T121">The </text:span><text:span text:style-name="T93">getimeofday.c</text:span><text:span text:style-name="T121"> program </text:span><text:span text:style-name="T109">u</text:span><text:span text:style-name="T121">se</text:span><text:span text:style-name="T109">s</text:span><text:span text:style-name="T121"> </text:span><text:span text:style-name="T93">gettimeofday</text:span><text:span text:style-name="T121"> </text:span><text:span text:style-name="T109">and </text:span><text:span text:style-name="T93">time</text:span><text:span text:style-name="T109"> </text:span><text:span text:style-name="T121">to retrieve the current time.</text:span></text:p>
      <text:p text:style-name="P69"/>
      <text:p text:style-name="P64"><text:span text:style-name="T122">1 </text:span><text:span text:style-name="T115">#include </text:span><text:span text:style-name="T116">&lt;stdio.h&gt;</text:span></text:p>
      <text:p text:style-name="P64"><text:span text:style-name="T122">2 </text:span><text:span text:style-name="T115">#include </text:span><text:span text:style-name="T116">&lt;stdlib.h&gt;</text:span></text:p>
      <text:p text:style-name="P64"><text:span text:style-name="T122">3 </text:span><text:span text:style-name="T115">#include </text:span><text:span text:style-name="T116">&lt;time.h&gt;</text:span></text:p>
      <text:p text:style-name="P64"><text:soft-page-break/><text:span text:style-name="T122">4 </text:span><text:span text:style-name="T115">#include </text:span><text:span text:style-name="T116">&lt;sys/time.h&gt;</text:span></text:p>
      <text:p text:style-name="P70"/>
      <text:p text:style-name="P57"><text:span text:style-name="T123">5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59"><text:span text:style-name="T125">6 </text:span><text:span text:style-name="T103"><text:s text:c="3"/>struct</text:span><text:span text:style-name="T104"> </text:span><text:span text:style-name="T103">timeval</text:span><text:span text:style-name="T104"> *tv;</text:span></text:p>
      <text:p text:style-name="P64"><text:span text:style-name="T122">7 </text:span><text:span text:style-name="T115"><text:s text:c="3"/>int</text:span> curt;</text:p>
      <text:p text:style-name="P58"/>
      <text:p text:style-name="P64"><text:span text:style-name="T122">8 </text:span><text:span text:style-name="T115"><text:s text:c="3"/>if</text:span> (<text:span text:style-name="T126">gettimeofday</text:span>(tv, <text:span text:style-name="T115">NULL</text:span>) == -<text:span text:style-name="T127">1</text:span>) {</text:p>
      <text:p text:style-name="P64"><text:span text:style-name="T122">9 </text:span><text:s text:c="6"/>perror(<text:span text:style-name="T116">"gettimeofday"</text:span>);</text:p>
      <text:p text:style-name="P64"><text:span text:style-name="T122">10 </text:span><text:s text:c="6"/>exit(<text:span text:style-name="T115">EXIT_FAILURE</text:span>);</text:p>
      <text:p text:style-name="P64"><text:span text:style-name="T122">11 </text:span><text:s text:c="3"/>}</text:p>
      <text:p text:style-name="P58"/>
      <text:p text:style-name="P57"><text:span text:style-name="T123">12 </text:span><text:span text:style-name="T124"><text:s text:c="3"/>printf(</text:span><text:span text:style-name="T102">"\nCurrent: %d"</text:span><text:span text:style-name="T124">, tv-&gt;tv_sec);</text:span></text:p>
      <text:p text:style-name="P59"><text:span text:style-name="T125">13 </text:span><text:span text:style-name="T103"><text:s text:c="3"/>if</text:span><text:span text:style-name="T104"> ((curt = </text:span><text:span text:style-name="T105">time</text:span><text:span text:style-name="T104">(</text:span><text:span text:style-name="T103">NULL</text:span><text:span text:style-name="T104">)) == -</text:span><text:span text:style-name="T128">1</text:span><text:span text:style-name="T104">) {</text:span></text:p>
      <text:p text:style-name="P64"><text:span text:style-name="T122">14 </text:span><text:s text:c="6"/>perror(<text:span text:style-name="T116">"time"</text:span>);</text:p>
      <text:p text:style-name="P64"><text:span text:style-name="T122">15 </text:span><text:s text:c="3"/>}</text:p>
      <text:p text:style-name="P58"/>
      <text:p text:style-name="P57"><text:span text:style-name="T123">16 </text:span><text:span text:style-name="T124"><text:s text:c="3"/>printf(</text:span><text:span text:style-name="T102">"\nCurrent: %d"</text:span><text:span text:style-name="T124">, curt);</text:span></text:p>
      <text:p text:style-name="P57"><text:span text:style-name="T123">17 </text:span><text:span text:style-name="T124">}</text:span></text:p>
      <text:p text:style-name="P69"/>
      <text:p text:style-name="P71">getimeofday.c</text:p>
      <text:p text:style-name="P72"/>
      <text:p text:style-name="P55"><text:span text:style-name="T129">We </text:span><text:span text:style-name="T109">run</text:span><text:span text:style-name="T129"> the program and then check the result </text:span><text:span text:style-name="T109">using </text:span><text:span text:style-name="T129">the </text:span><text:span text:style-name="T130">date</text:span><text:span text:style-name="T129"> command.</text:span></text:p>
      <text:p text:style-name="P44"/>
      <table:table table:name="Table141" table:style-name="Table141">
        <table:table-column table:style-name="Table141.A"/>
        <table:table-row>
          <table:table-cell table:style-name="Table141.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87">./</text:span><text:span text:style-name="T131">getimeofday</text:span></text:p>
            <text:p text:style-name="P48">Current: 1745537558</text:p>
            <text:p text:style-name="P48">Current: 1745537558 <text:s/></text:p>
            <text:p text:style-name="P45"/>
            <text:p text:style-name="P45"><text:span text:style-name="T80">[</text:span><text:a xlink:type="simple" xlink:href="mailto:linux@fidir" text:style-name="Internet_20_link" text:visited-style-name="Visited_20_Internet_20_Link"><text:span text:style-name="T81">linux@fidir</text:span></text:a><text:span text:style-name="T80">] </text:span><text:span text:style-name="T132">date +%s</text:span></text:p>
            <text:p text:style-name="P45">1745537560</text:p>
          </table:table-cell>
        </table:table-row>
      </table:table>
      <text:p text:style-name="P43"/>
      <text:p text:style-name="P47"><text:span text:style-name="T130">time</text:span><text:span text:style-name="T133"> and </text:span><text:span text:style-name="T130">gettimeofday</text:span><text:span text:style-name="T133"> have returned the same value. </text:span><text:span text:style-name="T109">The execution of</text:span><text:span text:style-name="T133"> </text:span><text:span text:style-name="T130">date</text:span><text:span text:style-name="T133"> has returned a </text:span><text:span text:style-name="T109">similar value (</text:span><text:span text:style-name="T133">two seconds greater</text:span><text:span text:style-name="T109">)</text:span><text:span text:style-name="T133">.</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4"><text:soft-page-break/><text:span text:style-name="T94">III.1.2 </text:span><text:span text:style-name="T134">S</text:span><text:span text:style-name="T94">etting time with </text:span><text:span text:style-name="T95">clock_gettime</text:span><text:span text:style-name="T94"> and </text:span><text:span text:style-name="T95">clock_settime</text:span></text:p>
      <text:p text:style-name="P73"/>
      <text:p text:style-name="P74">In addition to the aforementioned functions, the following functions <text:span text:style-name="T135">are also available </text:span>for retrieving and setting the time<text:span text:style-name="T135"><text:note text:id="ftn5" text:note-class="footnote"><text:note-citation>3</text:note-citation><text:note-body><text:p text:style-name="P75"><text:span text:style-name="T136">See the </text:span><text:span text:style-name="T137">clock_getres(2)</text:span> <text:span text:style-name="T100">manual page</text:span></text:p></text:note-body></text:note></text:span><text:span text:style-name="T135">.</text:span></text:p>
      <text:p text:style-name="P44"/>
      <table:table table:name="Table142" table:style-name="Table142">
        <table:table-column table:style-name="Table142.A"/>
        <table:table-row>
          <table:table-cell table:style-name="Table142.A1" office:value-type="string">
            <text:p text:style-name="P76"><text:span text:style-name="T115">#include </text:span><text:span text:style-name="T116">&lt;time.h&gt;</text:span></text:p>
            <text:p text:style-name="P58"/>
            <text:p text:style-name="P59"><text:span text:style-name="T103">int</text:span><text:span text:style-name="T104"> </text:span><text:span text:style-name="T105">clock_getres</text:span><text:span text:style-name="T104">(</text:span><text:span text:style-name="T103">clockid_t</text:span><text:span text:style-name="T104"> </text:span><text:span text:style-name="T106">clockid</text:span><text:span text:style-name="T104">, </text:span><text:span text:style-name="T103">struct</text:span><text:span text:style-name="T104"> </text:span><text:span text:style-name="T103">timespec</text:span><text:span text:style-name="T104"> *</text:span><text:span text:style-name="T103">_Nullable</text:span><text:span text:style-name="T104"> </text:span><text:span text:style-name="T106">res</text:span><text:span text:style-name="T104">);</text:span></text:p>
            <text:p text:style-name="P77"/>
            <text:p text:style-name="P59"><text:span text:style-name="T103">int</text:span><text:span text:style-name="T104"> </text:span><text:span text:style-name="T105">clock_gettime</text:span><text:span text:style-name="T104">(</text:span><text:span text:style-name="T103">clockid_t</text:span><text:span text:style-name="T104"> </text:span><text:span text:style-name="T106">clockid</text:span><text:span text:style-name="T104">, </text:span><text:span text:style-name="T103">struct</text:span><text:span text:style-name="T104"> </text:span><text:span text:style-name="T103">timespec</text:span><text:span text:style-name="T104"> </text:span><text:span text:style-name="T106">*tp</text:span><text:span text:style-name="T104">);</text:span></text:p>
            <text:p text:style-name="P64"/>
            <text:p text:style-name="P59"><text:span text:style-name="T103">int</text:span><text:span text:style-name="T104"> </text:span><text:span text:style-name="T105">clock_settime</text:span><text:span text:style-name="T104">(</text:span><text:span text:style-name="T103">clockid_t</text:span><text:span text:style-name="T104"> </text:span><text:span text:style-name="T106">clockid</text:span><text:span text:style-name="T104">, </text:span><text:span text:style-name="T103">const</text:span><text:span text:style-name="T104"> </text:span><text:span text:style-name="T103">struct</text:span><text:span text:style-name="T104"> </text:span><text:span text:style-name="T103">timespec</text:span><text:span text:style-name="T104"> </text:span><text:span text:style-name="T106">*tp</text:span><text:span text:style-name="T104">);</text:span></text:p>
            <text:p text:style-name="P78"/>
            <text:p text:style-name="P79"><text:s text:c="29"/>Return: <text:span text:style-name="T138">0 if success, -1 if error and errno is set</text:span></text:p>
          </table:table-cell>
        </table:table-row>
      </table:table>
      <text:p text:style-name="P43"/>
      <text:p text:style-name="P55"><text:span text:style-name="T139">The </text:span><text:span text:style-name="T130">clock_gettime</text:span><text:span text:style-name="T139"> and </text:span><text:span text:style-name="T130">clock_settime</text:span><text:span text:style-name="T139"> functions, retrieve and set the time of the clock specified by the argument </text:span><text:span text:style-name="T130">clockid</text:span><text:span text:style-name="T139">. The </text:span><text:span text:style-name="T130">clockid</text:span><text:span text:style-name="T139"> argument is of the type </text:span><text:span text:style-name="T130">clockid_t</text:span><text:span text:style-name="T130"><text:note text:id="ftn6" text:note-class="footnote"><text:note-citation>4</text:note-citation><text:note-body><text:p text:style-name="P80"><text:span text:style-name="T140">clockid_t</text:span><text:span text:style-name="T141"> </text:span><text:span text:style-name="T114">is </text:span><text:span text:style-name="T141">an</text:span><text:span text:style-name="T114"> arithmetic type, </text:span><text:span text:style-name="T141">s</text:span><text:span text:style-name="T142">ee the </text:span><text:span text:style-name="T140">clockid_t(3)</text:span><text:span text:style-name="T143"> manual page</text:span></text:p></text:note-body></text:note></text:span><text:span text:style-name="T139">, </text:span><text:span text:style-name="T109">which is </text:span><text:span text:style-name="T139">defined in the </text:span><text:span text:style-name="T130">sys/types.h</text:span><text:span text:style-name="T130"><text:note text:id="ftn7" text:note-class="footnote"><text:note-citation>5</text:note-citation><text:note-body><text:p text:style-name="P81"><text:span text:style-name="T142">On </text:span><text:span text:style-name="T144">Debian-based systems,</text:span><text:span text:style-name="T142"> the header file is </text:span><text:span text:style-name="T145">/usr/include/x86_64-linux-gnu/bits/types/clockid_t.h</text:span></text:p></text:note-body></text:note></text:span><text:span text:style-name="T139"> </text:span><text:span text:style-name="T109">header file, </text:span><text:span text:style-name="T146">and represent</text:span><text:span text:style-name="T109">s</text:span><text:span text:style-name="T146"> the clock on which to act.</text:span><text:span text:style-name="T139"> </text:span></text:p>
      <text:p text:style-name="P82"/>
      <text:p text:style-name="P82">A clock can be either system-wide, making it accessible to all processes, or process-specific, where it measures time only within a single process.</text:p>
      <text:p text:style-name="P55"><text:s/></text:p>
      <text:p text:style-name="P83"><text:span text:style-name="T146">All the implementations support the system-wide </text:span><text:span text:style-name="T147">real-time clock</text:span><text:span text:style-name="T146">, which is defined by the </text:span><text:span text:style-name="T130">CLOCK_REALTIME</text:span><text:span text:style-name="T146"> </text:span><text:span text:style-name="T148">c</text:span><text:span text:style-name="T146">onstant, </text:span><text:span text:style-name="T148">which </text:span><text:span text:style-name="T146">represent</text:span><text:span text:style-name="T148">s </text:span><text:span text:style-name="T146">seconds and nanoseconds since the Epoch. The following table </text:span><text:span text:style-name="T148">lists</text:span><text:span text:style-name="T146"> the clock</text:span><text:span text:style-name="T148">s</text:span><text:span text:style-name="T146"> supported by </text:span><text:span text:style-name="T148">the</text:span><text:span text:style-name="T146"> </text:span><text:span text:style-name="T147">glibc</text:span><text:span text:style-name="T146"> and Linux kernel.</text:span></text:p>
      <text:p text:style-name="P84"/>
      <table:table table:name="Table143" table:style-name="Table143">
        <table:table-column table:style-name="Table143.A"/>
        <table:table-column table:style-name="Table143.B"/>
        <table:table-row>
          <table:table-cell table:style-name="Table143.A1" office:value-type="string">
            <text:p text:style-name="P85">CLOCK_REALTIME</text:p>
          </table:table-cell>
          <table:table-cell table:style-name="Table143.B1" office:value-type="string">
            <text:p text:style-name="P86">System-wide clock that measures real time, to set it it requires appropriate privileges</text:p>
          </table:table-cell>
        </table:table-row>
        <table:table-row>
          <table:table-cell table:style-name="Table143.A2" office:value-type="string">
            <text:p text:style-name="P85">CLOCK_REALTIME_ALARM</text:p>
          </table:table-cell>
          <table:table-cell table:style-name="Table143.B2" office:value-type="string">
            <text:p text:style-name="P47"><text:span text:style-name="T149">Like </text:span><text:span text:style-name="T130">CLOCK_REALTIME</text:span><text:span text:style-name="T149"> but not settable</text:span></text:p>
          </table:table-cell>
        </table:table-row>
        <table:table-row>
          <table:table-cell table:style-name="Table143.A2" office:value-type="string">
            <text:p text:style-name="P85">CLOCK_REALTIME_COARSE</text:p>
          </table:table-cell>
          <table:table-cell table:style-name="Table143.B2" office:value-type="string">
            <text:p text:style-name="P87"><text:span text:style-name="T149">Faster and less precise than </text:span><text:span text:style-name="T130">CLOCK_REALTIME</text:span><text:span text:style-name="T149">, not settable</text:span></text:p>
          </table:table-cell>
        </table:table-row>
        <table:table-row>
          <table:table-cell table:style-name="Table143.A2" office:value-type="string">
            <text:p text:style-name="P85">CLOCK_TAI</text:p>
          </table:table-cell>
          <table:table-cell table:style-name="Table143.B2" office:value-type="string">
            <text:p text:style-name="P87"><text:span text:style-name="T149">Nonsettable system-wide clock derived by </text:span><text:span text:style-name="T130">CLOCK_REALTIME</text:span><text:span text:style-name="T149"> but counting leap seconds</text:span><text:span text:style-name="T149"><text:note text:id="ftn8" text:note-class="footnote"><text:note-citation>6</text:note-citation><text:note-body><text:p text:style-name="P88">It does not have discontinuities or frequency adjustments caused by inserting leap seconds. TAI is an acronym of International Atomic Time </text:p></text:note-body></text:note></text:span><text:span text:style-name="T149"> </text:span></text:p>
          </table:table-cell>
        </table:table-row>
        <table:table-row>
          <table:table-cell table:style-name="Table143.A2" office:value-type="string">
            <text:p text:style-name="P85">CLOCK_MONOTONIC</text:p>
          </table:table-cell>
          <table:table-cell table:style-name="Table143.B2" office:value-type="string">
            <text:p text:style-name="P89">Nonsettable system-wide clock representing monotonic time since an unspecified point in the past, on Linux the value is the number of seconds from when the system booted. It does not count time that the system is suspended </text:p>
          </table:table-cell>
        </table:table-row>
        <table:table-row>
          <table:table-cell table:style-name="Table143.A2" office:value-type="string">
            <text:p text:style-name="P85">CLOCK_MONOTONIC_COARSE</text:p>
          </table:table-cell>
          <table:table-cell table:style-name="Table143.B2" office:value-type="string">
            <text:p text:style-name="P87"><text:span text:style-name="T149">Faster but less precise version of </text:span><text:span text:style-name="T130">CLOCK_MONOTONIC</text:span></text:p>
          </table:table-cell>
        </table:table-row>
        <table:table-row>
          <table:table-cell table:style-name="Table143.A2" office:value-type="string">
            <text:p text:style-name="P85">CLOCK_MONOTONIC_RAW</text:p>
          </table:table-cell>
          <table:table-cell table:style-name="Table143.B2" office:value-type="string">
            <text:p text:style-name="P87"><text:span text:style-name="T149">Like </text:span><text:span text:style-name="T130">CLOCK_MONOTONIC</text:span><text:span text:style-name="T149"> but provides access to hardware-based time </text:span></text:p>
          </table:table-cell>
        </table:table-row>
        <table:table-row>
          <table:table-cell table:style-name="Table143.A2" office:value-type="string">
            <text:p text:style-name="P85">CLOCK_BOOTTIME</text:p>
          </table:table-cell>
          <table:table-cell table:style-name="Table143.B2" office:value-type="string">
            <text:p text:style-name="P87"><text:span text:style-name="T149">Nonsettable system-wide clock identical to </text:span><text:span text:style-name="T130">CLOCK_MONOTONIC</text:span><text:span text:style-name="T149"> but includes the time that the system </text:span><text:soft-page-break/><text:span text:style-name="T149">is suspended</text:span></text:p>
          </table:table-cell>
        </table:table-row>
        <table:table-row>
          <table:table-cell table:style-name="Table143.A2" office:value-type="string">
            <text:p text:style-name="P85">CLOCK_BOOTTIME_ALARM</text:p>
          </table:table-cell>
          <table:table-cell table:style-name="Table143.B2" office:value-type="string">
            <text:p text:style-name="P87"><text:span text:style-name="T150">Like </text:span><text:span text:style-name="T130">CLOCK_BOOTTIME</text:span></text:p>
          </table:table-cell>
        </table:table-row>
        <table:table-row>
          <table:table-cell table:style-name="Table143.A2" office:value-type="string">
            <text:p text:style-name="P85">CLOCK_PROCESS_CPUTIME_ID</text:p>
          </table:table-cell>
          <table:table-cell table:style-name="Table143.B2" office:value-type="string">
            <text:p text:style-name="P90">It measures the CPU time consumed by the process, not settable</text:p>
          </table:table-cell>
        </table:table-row>
        <table:table-row>
          <table:table-cell table:style-name="Table143.A2" office:value-type="string">
            <text:p text:style-name="P85">CLOCK_THREAD_CPUTIME_ID</text:p>
          </table:table-cell>
          <table:table-cell table:style-name="Table143.B2" office:value-type="string">
            <text:p text:style-name="P90">It measures the CPU time consumed by the thread, <text:span text:style-name="T151">not settable</text:span> </text:p>
          </table:table-cell>
        </table:table-row>
      </table:table>
      <text:p text:style-name="P84"/>
      <text:p text:style-name="P91"><text:span text:style-name="T90">Tab 1.</text:span> Clocks</text:p>
      <text:p text:style-name="P92"/>
      <text:p text:style-name="P92">These clock IDs are hard-coded in the System V style, and Linux also supports POSIX clock operations on certain character devices known as <text:span text:style-name="T68">dynamic</text:span> <text:span text:style-name="T68">clocks</text:span>.</text:p>
      <text:p text:style-name="P47"><text:span text:style-name="T152">With appropriate macros we can convert open file descriptors into clock IDs</text:span><text:span text:style-name="T152"><text:note text:id="ftn9" text:note-class="footnote"><text:note-citation>7</text:note-citation><text:note-body><text:p text:style-name="P93"><text:span text:style-name="T153">An example of this technique is </text:span><text:span text:style-name="T154">available </text:span><text:span text:style-name="T153">in the </text:span><text:span text:style-name="T145">clock_getres(2)</text:span> <text:span text:style-name="T154">manual page</text:span></text:p></text:note-body></text:note></text:span><text:span text:style-name="T152"> and pass them to </text:span><text:span text:style-name="T130">clock_gettime</text:span><text:span text:style-name="T152">, </text:span><text:span text:style-name="T130">clock_settime</text:span><text:span text:style-name="T152">, </text:span><text:span text:style-name="T130">clock_adjtime</text:span><text:span text:style-name="T152">. </text:span></text:p>
      <text:p text:style-name="P84"/>
      <text:p text:style-name="P83"><text:span text:style-name="T146">The </text:span><text:span text:style-name="T130">clock_getres</text:span><text:span text:style-name="T146"> </text:span><text:span text:style-name="T148">function </text:span><text:span text:style-name="T146">finds the resolution of the specified clock and stores it in the </text:span><text:span text:style-name="T130">res</text:span><text:span text:style-name="T146"> </text:span><text:span text:style-name="T148">a</text:span><text:span text:style-name="T146">rgument.</text:span></text:p>
      <text:p text:style-name="P94"/>
      <text:p text:style-name="P47"><text:span text:style-name="T148">The resolution of a </text:span><text:span text:style-name="T130">clock</text:span><text:span text:style-name="T148"> depends on its implementation. Since the clock resolution defines the unit of time measurement, if the value of the </text:span><text:span text:style-name="Source_20_Text"><text:span text:style-name="T130">tp</text:span></text:span><text:span text:style-name="T148"> argument passed to the </text:span><text:span text:style-name="Source_20_Text"><text:span text:style-name="T130">clock_settime</text:span></text:span><text:span text:style-name="T148"> function is not a multiple of the </text:span><text:span text:style-name="Source_20_Text"><text:span text:style-name="T130">res</text:span></text:span><text:span text:style-name="T148"> value returned by </text:span><text:span text:style-name="Source_20_Text"><text:span text:style-name="T130">clock_getres</text:span></text:span><text:span text:style-name="T148">, it will be truncated to the nearest multiple of </text:span><text:span text:style-name="Source_20_Text"><text:span text:style-name="T130">res</text:span></text:span><text:span text:style-name="T148">.</text:span></text:p>
      <text:p text:style-name="P95"><text:span text:style-name="T155"/></text:p>
      <text:p text:style-name="P83"><text:span text:style-name="T155">The </text:span><text:span text:style-name="Source_20_Text"><text:span text:style-name="T130">clock_times.c</text:span></text:span><text:span text:style-name="T155"> program, taken from the </text:span><text:span text:style-name="Source_20_Text"><text:span text:style-name="T130">clock_gettime(2)</text:span></text:span><text:span text:style-name="T155"> manual page, demonstrates how to use the POSIX functions </text:span><text:span text:style-name="Source_20_Text"><text:span text:style-name="T130">clock_gettime</text:span></text:span><text:span text:style-name="T155"> and </text:span><text:span text:style-name="Source_20_Text"><text:span text:style-name="T130">clock_getres</text:span></text:span><text:span text:style-name="T155"> with different system clocks available in Linux.</text:span></text:p>
      <text:p text:style-name="P69"/>
      <text:p text:style-name="P64"><text:span text:style-name="T156">1 </text:span><text:span text:style-name="T115">#define _XOPEN_SOURCE </text:span><text:span text:style-name="T127">600</text:span></text:p>
      <text:p text:style-name="P64"><text:span text:style-name="T157">2</text:span><text:span text:style-name="T156"> </text:span><text:span text:style-name="T115">#include </text:span><text:span text:style-name="T116">&lt;stdbool.h&gt;</text:span></text:p>
      <text:p text:style-name="P64"><text:span text:style-name="T157">3</text:span><text:span text:style-name="T156"> </text:span><text:span text:style-name="T115">#include </text:span><text:span text:style-name="T116">&lt;stdint.h&gt;</text:span></text:p>
      <text:p text:style-name="P64"><text:span text:style-name="T157">4</text:span><text:span text:style-name="T156"> </text:span><text:span text:style-name="T115">#include </text:span><text:span text:style-name="T116">&lt;stdio.h&gt;</text:span></text:p>
      <text:p text:style-name="P64"><text:span text:style-name="T157">5</text:span><text:span text:style-name="T156"> </text:span><text:span text:style-name="T115">#include </text:span><text:span text:style-name="T116">&lt;stdlib.h&gt;</text:span></text:p>
      <text:p text:style-name="P57"><text:span text:style-name="T158">6</text:span><text:span text:style-name="T159"> </text:span><text:span text:style-name="T101">#include </text:span><text:span text:style-name="T102">&lt;time.h&gt;</text:span></text:p>
      <text:p text:style-name="P64"><text:span text:style-name="T157">7</text:span><text:span text:style-name="T156"> </text:span><text:span text:style-name="T115">#define SECS_IN_DAY (</text:span><text:span text:style-name="T127">24</text:span><text:span text:style-name="T115"> </text:span>*<text:span text:style-name="T115"> </text:span><text:span text:style-name="T127">60</text:span><text:span text:style-name="T115"> </text:span>*<text:span text:style-name="T115"> </text:span><text:span text:style-name="T127">60</text:span><text:span text:style-name="T115">)</text:span></text:p>
      <text:p text:style-name="P58"/>
      <text:p text:style-name="P59"><text:span text:style-name="T160">8</text:span><text:span text:style-name="T161"> </text:span><text:span text:style-name="T103">static</text:span><text:span text:style-name="T104"> </text:span><text:span text:style-name="T103">void</text:span><text:span text:style-name="T104"> displayClock(</text:span><text:span text:style-name="T103">clockid_t</text:span><text:span text:style-name="T104"> clock, </text:span><text:span text:style-name="T103">const</text:span><text:span text:style-name="T104"> </text:span><text:span text:style-name="T103">char</text:span><text:span text:style-name="T104"> *name, </text:span><text:span text:style-name="T103">bool</text:span><text:span text:style-name="T104"> <text:s text:c="2"/></text:span></text:p>
      <text:p text:style-name="P64"><text:s text:c="27"/>showRes)</text:p>
      <text:p text:style-name="P64"><text:span text:style-name="T157">9</text:span><text:span text:style-name="T156"> </text:span>{</text:p>
      <text:p text:style-name="P64"><text:span text:style-name="T156">1</text:span><text:span text:style-name="T157">0</text:span><text:span text:style-name="T156"> <text:s text:c="3"/></text:span><text:span text:style-name="T115">long</text:span> days;</text:p>
      <text:p text:style-name="P59"><text:span text:style-name="T161">1</text:span><text:span text:style-name="T160">1</text:span><text:span text:style-name="T161"> <text:s text:c="3"/></text:span><text:span text:style-name="T103">struct</text:span><text:span text:style-name="T104"> </text:span><text:span text:style-name="T103">timespec</text:span><text:span text:style-name="T104"> ts;</text:span></text:p>
      <text:p text:style-name="P58"/>
      <text:p text:style-name="P64"><text:span text:style-name="T156">1</text:span><text:span text:style-name="T157">2</text:span><text:span text:style-name="T156"> <text:s text:c="3"/></text:span><text:span text:style-name="T115">if</text:span> (<text:span text:style-name="T126">clock_gettime</text:span>(clock, &amp;ts) == -<text:span text:style-name="T127">1</text:span>) {</text:p>
      <text:p text:style-name="P64"><text:span text:style-name="T156">1</text:span><text:span text:style-name="T157">3</text:span><text:span text:style-name="T156"> <text:s text:c="6"/></text:span>perror(<text:span text:style-name="T116">"clock_gettime"</text:span>);</text:p>
      <text:p text:style-name="P64"><text:span text:style-name="T156">1</text:span><text:span text:style-name="T157">4</text:span><text:span text:style-name="T156"> <text:s text:c="6"/></text:span>exit(<text:span text:style-name="T115">EXIT_FAILURE</text:span>);</text:p>
      <text:p text:style-name="P64"><text:span text:style-name="T156">1</text:span><text:span text:style-name="T157">5</text:span><text:span text:style-name="T156"> <text:s text:c="3"/></text:span>}</text:p>
      <text:p text:style-name="P58"/>
      <text:p text:style-name="P64"><text:span text:style-name="T156">1</text:span><text:span text:style-name="T157">6</text:span><text:span text:style-name="T156"> <text:s text:c="3"/></text:span>printf(<text:span text:style-name="T116">"%-15s: %10jd.%03ld ("</text:span>, name,<text:span text:style-name="T156"> </text:span>(<text:span text:style-name="T115">intmax_t</text:span>) ts.tv_sec, <text:s/></text:p>
      <text:p text:style-name="P64"><text:s text:c="12"/>ts.tv_nsec / <text:span text:style-name="T127">1000000</text:span>);</text:p>
      <text:p text:style-name="P58"/>
      <text:p text:style-name="P64"><text:soft-page-break/><text:span text:style-name="T156">1</text:span><text:span text:style-name="T157">7</text:span><text:span text:style-name="T156"> <text:s text:c="3"/></text:span>days = ts.tv_sec / <text:span text:style-name="T115">SECS_IN_DAY</text:span>;</text:p>
      <text:p text:style-name="P64"><text:span text:style-name="T156">1</text:span><text:span text:style-name="T157">8</text:span><text:span text:style-name="T156"> <text:s text:c="3"/></text:span><text:span text:style-name="T115">if</text:span> (days &gt; <text:span text:style-name="T127">0</text:span>)</text:p>
      <text:p text:style-name="P64"><text:span text:style-name="T156">1</text:span><text:span text:style-name="T157">9</text:span><text:span text:style-name="T156"> <text:s text:c="7"/></text:span>printf(<text:span text:style-name="T116">"%ld days + "</text:span>, days);</text:p>
      <text:p text:style-name="P58"/>
      <text:p text:style-name="P64"><text:span text:style-name="T157">20</text:span><text:span text:style-name="T156"> <text:s text:c="3"/></text:span>printf(<text:span text:style-name="T116">"%2dh %2dm %2ds"</text:span>, (<text:span text:style-name="T115">int</text:span>) (ts.tv_sec % <text:span text:style-name="T115">SECS_IN_DAY</text:span>) / <text:span text:style-name="T127">3600</text:span>,</text:p>
      <text:p text:style-name="P64"><text:s text:c="12"/>(<text:span text:style-name="T115">int</text:span>) (ts.tv_sec % <text:span text:style-name="T127">3600</text:span>) / <text:span text:style-name="T127">60</text:span>, (<text:span text:style-name="T115">int</text:span>) ts.tv_sec % <text:span text:style-name="T127">60</text:span>);</text:p>
      <text:p text:style-name="P64"><text:span text:style-name="T157">2</text:span><text:span text:style-name="T156">1 <text:s text:c="3"/></text:span>printf(<text:span text:style-name="T116">")\n"</text:span>);</text:p>
      <text:p text:style-name="P58"/>
      <text:p text:style-name="P64"><text:span text:style-name="T157">22</text:span><text:span text:style-name="T156"> <text:s text:c="3"/></text:span><text:span text:style-name="T115">if</text:span> (<text:span text:style-name="T126">clock_getres</text:span>(clock, &amp;ts) == -<text:span text:style-name="T127">1</text:span>) {</text:p>
      <text:p text:style-name="P64"><text:span text:style-name="T157">23</text:span><text:span text:style-name="T156"> <text:s text:c="6"/></text:span>perror(<text:span text:style-name="T116">"clock_getres"</text:span>);</text:p>
      <text:p text:style-name="P64"><text:span text:style-name="T157">24</text:span><text:span text:style-name="T156"> <text:s text:c="6"/></text:span>exit(<text:span text:style-name="T115">EXIT_FAILURE</text:span>);</text:p>
      <text:p text:style-name="P64"><text:span text:style-name="T157">25</text:span><text:span text:style-name="T156"> <text:s text:c="3"/></text:span>}</text:p>
      <text:p text:style-name="P58"/>
      <text:p text:style-name="P64"><text:span text:style-name="T157">26</text:span><text:span text:style-name="T156"> <text:s text:c="3"/></text:span><text:span text:style-name="T115">if</text:span> (showRes)</text:p>
      <text:p text:style-name="P64"><text:span text:style-name="T157">27</text:span><text:span text:style-name="T156"> <text:s text:c="6"/></text:span>printf(<text:span text:style-name="T116">"resolution: %10jd.%09ld\n"</text:span>, (<text:span text:style-name="T115">intmax_t</text:span>) ts.tv_sec, <text:s text:c="2"/></text:p>
      <text:p text:style-name="P64"><text:s text:c="15"/>ts.tv_nsec);</text:p>
      <text:p text:style-name="P64"><text:span text:style-name="T157">28</text:span><text:span text:style-name="T156"> <text:s text:c="3"/></text:span>}</text:p>
      <text:p text:style-name="P58"/>
      <text:p text:style-name="P64"><text:span text:style-name="T157">29</text:span><text:span text:style-name="T156"> </text:span><text:span text:style-name="T115">int</text:span> main(<text:span text:style-name="T115">int</text:span> argc, <text:span text:style-name="T115">char</text:span> *argv<text:span text:style-name="T115">[]</text:span>)</text:p>
      <text:p text:style-name="P64"><text:span text:style-name="T157">30</text:span><text:span text:style-name="T156"> </text:span>{</text:p>
      <text:p text:style-name="P64"><text:span text:style-name="T157">3</text:span><text:span text:style-name="T156">1 <text:s text:c="3"/></text:span><text:span text:style-name="T115">bool</text:span> showRes = argc &gt; <text:span text:style-name="T127">1</text:span>;</text:p>
      <text:p text:style-name="P64"><text:span text:style-name="T157">32</text:span><text:span text:style-name="T156"> <text:s text:c="3"/></text:span>displayClock(<text:span text:style-name="T115">CLOCK_REALTIME</text:span>, <text:span text:style-name="T116">"CLOCK_REALTIME"</text:span>, showRes);</text:p>
      <text:p text:style-name="P58"/>
      <text:p text:style-name="P64"><text:span text:style-name="T157">33</text:span><text:span text:style-name="T156"> <text:s text:c="3"/></text:span><text:span text:style-name="T115">#ifdef CLOCK_TAI</text:span></text:p>
      <text:p text:style-name="P64"><text:span text:style-name="T157">34</text:span><text:span text:style-name="T156"> <text:s text:c="7"/></text:span>displayClock(<text:span text:style-name="T115">CLOCK_TAI</text:span>, <text:span text:style-name="T116">"CLOCK_TAI"</text:span>, showRes);</text:p>
      <text:p text:style-name="P77"><text:span text:style-name="T157">35</text:span><text:span text:style-name="T156"> <text:s text:c="3"/></text:span>#endif</text:p>
      <text:p text:style-name="P57"><text:span text:style-name="T158">36</text:span><text:span text:style-name="T159"> <text:s text:c="6"/></text:span><text:span text:style-name="T124">displayClock(</text:span><text:span text:style-name="T101">CLOCK_MONOTONIC</text:span><text:span text:style-name="T124">, </text:span><text:span text:style-name="T102">"CLOCK_MONOTONIC"</text:span><text:span text:style-name="T124">, showRes);</text:span></text:p>
      <text:p text:style-name="P64"><text:span text:style-name="T157">37</text:span><text:span text:style-name="T156"> <text:s text:c="3"/></text:span><text:span text:style-name="T115">#ifdef CLOCK_BOOTTIME</text:span></text:p>
      <text:p text:style-name="P64"><text:span text:style-name="T157">38</text:span><text:span text:style-name="T156"> <text:s text:c="6"/></text:span>displayClock(<text:span text:style-name="T115">CLOCK_BOOTTIME</text:span>, <text:span text:style-name="T116">"CLOCK_BOOTTIME"</text:span>, showRes);</text:p>
      <text:p text:style-name="P77"><text:span text:style-name="T157">39</text:span><text:span text:style-name="T156"> <text:s text:c="3"/></text:span>#endif</text:p>
      <text:p text:style-name="P57"><text:span text:style-name="T158">40</text:span><text:span text:style-name="T159"> <text:s text:c="3"/></text:span><text:span text:style-name="T124">exit(</text:span><text:span text:style-name="T101">EXIT_SUCCESS</text:span><text:span text:style-name="T124">);</text:span></text:p>
      <text:p text:style-name="P57"><text:span text:style-name="T158">4</text:span><text:span text:style-name="T159">1 </text:span><text:span text:style-name="T124">}</text:span></text:p>
      <text:p text:style-name="P69"/>
      <text:p text:style-name="P96">clock_times.c</text:p>
      <text:p text:style-name="P97"/>
      <text:p text:style-name="P87"><text:span text:style-name="T162">Line 1. Defines the feature test macro </text:span><text:span text:style-name="Source_20_Text"><text:span text:style-name="T163">_XOPEN_SOURCE 600</text:span></text:span><text:span text:style-name="T162">, enabling POSIX.1-2001 <text:tab/>functionality required for the use of </text:span><text:span text:style-name="Source_20_Text"><text:span text:style-name="T163">clock_gettime</text:span></text:span><text:span text:style-name="T162"> and </text:span><text:span text:style-name="Source_20_Text"><text:span text:style-name="T163">clock_getres</text:span></text:span></text:p>
      <text:p text:style-name="P87"><text:span text:style-name="T162">Line 7. Defines the constant </text:span><text:span text:style-name="Source_20_Text"><text:span text:style-name="T163">SECS_IN_DAY</text:span></text:span><text:span text:style-name="T162">, representing the total number of seconds in one day <text:tab/>(</text:span><text:span text:style-name="Source_20_Text"><text:span text:style-name="T163">24 × 60 × 60 = 86400</text:span></text:span><text:span text:style-name="T162">)</text:span></text:p>
      <text:p text:style-name="P87"><text:span text:style-name="T162">Line 8. Defines the function </text:span><text:span text:style-name="Source_20_Text"><text:span text:style-name="T163">displayClock</text:span></text:span><text:span text:style-name="T162">, which receives: a clock identifier (</text:span><text:span text:style-name="Source_20_Text"><text:span text:style-name="T163">clockid_t</text:span></text:span><text:span text:style-name="T162">) , <text:s/><text:tab/>the clock name as a string, a boolean flag indicating whether the clock resolution must be <text:tab/>displayed</text:span></text:p>
      <text:p text:style-name="P87"><text:span text:style-name="T162">Line 10-11. Declares: a variable </text:span><text:span text:style-name="Source_20_Text"><text:span text:style-name="T163">days</text:span></text:span><text:span text:style-name="T162"> used to store the number of elapsed days, a </text:span><text:span text:style-name="Source_20_Text"><text:span text:style-name="T163">timespec</text:span></text:span><text:span text:style-name="T162"> <text:tab/> <text:s text:c="7"/>structure used to store seconds and nanoseconds returned by the clock functions</text:span></text:p>
      <text:p text:style-name="P98"><text:span text:style-name="T162">Line 12-15. Calls </text:span><text:span text:style-name="Source_20_Text"><text:span text:style-name="T163">clock_gettime</text:span></text:span><text:span text:style-name="T162"> to retrieve the current value of the specified clock.<text:line-break/>Line 16. Prints: the clock name, the number of elapsed seconds (</text:span><text:span text:style-name="Source_20_Text"><text:span text:style-name="T163">tv_sec</text:span></text:span><text:span text:style-name="T162">) , the milliseconds</text:span></text:p>
      <text:p text:style-name="P98"><text:span text:style-name="T162"><text:tab/> <text:s/>obtained from the nanoseconds field (</text:span><text:span text:style-name="Source_20_Text"><text:span text:style-name="T163">tv_nsec / 1000000</text:span></text:span><text:span text:style-name="T162">).</text:span></text:p>
      <text:p text:style-name="P99">Line 17-19. Calculates the number of complete days contained in the elapsed seconds and prints</text:p>
      <text:p text:style-name="P99"><text:tab/> <text:s text:c="7"/>the result if the value is greater than zero</text:p>
      <text:p text:style-name="P99">Line 20-21. Converts the remaining seconds into: hours, minutes, seconds, using modulo arithmetic</text:p>
      <text:p text:style-name="P99"><text:soft-page-break/><text:s/><text:tab/> <text:s text:c="7"/>and prints the time in human-readable format.</text:p>
      <text:p text:style-name="P98"><text:span text:style-name="T162">Line 22-25. Calls </text:span><text:span text:style-name="Source_20_Text"><text:span text:style-name="T163">clock_getres</text:span></text:span><text:span text:style-name="T162"> to obtain the resolution (precision) of the specified clock.</text:span></text:p>
      <text:p text:style-name="P99"><text:tab/> <text:s text:c="7"/>If the function fails, the program prints an error message and exits</text:p>
      <text:p text:style-name="P87"><text:span text:style-name="T162">Line 26-27. If the boolean variable </text:span><text:span text:style-name="Source_20_Text"><text:span text:style-name="T163">showRes</text:span></text:span><text:span text:style-name="T162"> is true, prints the clock resolution in seconds and <text:tab/> <text:s text:c="7"/>nanoseconds</text:span></text:p>
      <text:p text:style-name="P87"><text:span text:style-name="T162">Line 29. Defines the </text:span><text:span text:style-name="Source_20_Text"><text:span text:style-name="T163">main</text:span></text:span><text:span text:style-name="T162"> function, which represents the entry point of the program</text:span></text:p>
      <text:p text:style-name="P87"><text:span text:style-name="T162">Line 31. Defines the boolean variable </text:span><text:span text:style-name="Source_20_Text"><text:span text:style-name="T163">showRes</text:span></text:span><text:span text:style-name="T162">. The variable becomes </text:span><text:span text:style-name="Source_20_Text"><text:span text:style-name="T163">true</text:span></text:span><text:span text:style-name="T162"> if at least one <text:tab/> <text:s text:c="3"/><text:tab/> <text:s text:c="2"/>command-line argument is provided (</text:span><text:span text:style-name="Source_20_Text"><text:span text:style-name="T163">argc &gt; 1</text:span></text:span><text:span text:style-name="T162">)</text:span></text:p>
      <text:p text:style-name="P87"><text:span text:style-name="T162">Line 32. Calls </text:span><text:span text:style-name="Source_20_Text"><text:span text:style-name="T163">displayClock</text:span></text:span><text:span text:style-name="T162"> with </text:span><text:span text:style-name="Source_20_Text"><text:span text:style-name="T163">CLOCK_REALTIME</text:span></text:span><text:span text:style-name="T162">, which represents the system real-time <text:tab/> <text:s text:c="2"/>clock</text:span></text:p>
      <text:p text:style-name="P87"><text:span text:style-name="T162">Line 33-35. Conditionally calls </text:span><text:span text:style-name="Source_20_Text"><text:span text:style-name="T163">displayClock</text:span></text:span><text:span text:style-name="T162"> with </text:span><text:span text:style-name="Source_20_Text"><text:span text:style-name="T163">CLOCK_TAI</text:span></text:span><text:span text:style-name="T162"> if the system supports this <text:tab/> <text:s text:c="7"/><text:tab/> <text:s text:c="7"/>clock</text:span></text:p>
      <text:p text:style-name="P87"><text:span text:style-name="T162">Line 36. Calls </text:span><text:span text:style-name="Source_20_Text"><text:span text:style-name="T163">displayClock</text:span></text:span><text:span text:style-name="T162"> with </text:span><text:span text:style-name="Source_20_Text"><text:span text:style-name="T163">CLOCK_MONOTONIC</text:span></text:span><text:span text:style-name="T162">, a monotonic clock not affected by <text:tab/> <text:s/>system time changes</text:span></text:p>
      <text:p text:style-name="P87"><text:span text:style-name="T162">Line 37-39. Conditionally calls </text:span><text:span text:style-name="Source_20_Text"><text:span text:style-name="T163">displayClock</text:span></text:span><text:span text:style-name="T162"> with </text:span><text:span text:style-name="Source_20_Text"><text:span text:style-name="T163">CLOCK_BOOTTIME</text:span></text:span><text:span text:style-name="T162">, which also includes <text:tab/> <text:s text:c="7"/>time spent while the system is suspended</text:span></text:p>
      <text:p text:style-name="P100"><text:span text:style-name="T164"/></text:p>
      <text:p text:style-name="P101">We execute the program </text:p>
      <text:p text:style-name="P101"/>
      <table:table table:name="Table144" table:style-name="Table144">
        <table:table-column table:style-name="Table144.A"/>
        <table:table-row>
          <table:table-cell table:style-name="Table144.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87">./</text:span><text:span text:style-name="T165">clock_times</text:span></text:p>
            <text:p text:style-name="P102">CLOCK_REALTIME <text:s text:c="6"/>: <text:s text:c="5"/>1745717821.669 (20205 days + <text:s/>1h 37m <text:s/>1s)</text:p>
            <text:p text:style-name="P102">CLOCK_TAI <text:s text:c="20"/>: <text:s text:c="4"/>1745717821.669 (20205 days + <text:s/>1h 37m <text:s/>1s)</text:p>
            <text:p text:style-name="P102">CLOCK_MONOTONIC <text:s text:c="2"/>: <text:s text:c="4"/>125659.771 (1 days + 10h 54m 19s)</text:p>
            <text:p text:style-name="P102">CLOCK_BOOTTIME <text:s text:c="6"/>: <text:s text:c="4"/>125659.771 (1 days + 10h 54m 19s)</text:p>
          </table:table-cell>
        </table:table-row>
      </table:table>
      <text:p text:style-name="P103"/>
      <text:p text:style-name="P103">Th<text:span text:style-name="T154">is</text:span> execution shows the current values returned by four different Linux clocks.</text:p>
      <text:p text:style-name="P103"/>
      <text:list text:style-name="L1">
        <text:list-item>
          <text:p text:style-name="P104"><text:span text:style-name="Source_20_Text"><text:span text:style-name="T75">CLOCK_REALTIME</text:span></text:span> and <text:span text:style-name="Source_20_Text"><text:span text:style-name="T75">CLOCK_TAI</text:span></text:span> return the current calendar time expressed as the number of seconds elapsed since the Unix Epoch (<text:span text:style-name="Source_20_Text"><text:span text:style-name="T75">1 January 1970</text:span></text:span>).<text:line-break/>The output also converts this value into a human-readable format showing days, hours, minutes, and seconds</text:p>
        </text:list-item>
        <text:list-item>
          <text:p text:style-name="P104"><text:span text:style-name="Source_20_Text"><text:span text:style-name="T75">CLOCK_MONOTONIC</text:span></text:span><text:span text:style-name="T166"> returns the time elapsed since the system boot.<text:line-break/>This clock increases continuously and is not affected by manual system date changes or NTP adjustments</text:span></text:p>
        </text:list-item>
        <text:list-item>
          <text:p text:style-name="P104"><text:span text:style-name="Source_20_Text"><text:span text:style-name="T75">CLOCK_BOOTTIME</text:span></text:span> is similar to <text:span text:style-name="Source_20_Text"><text:span text:style-name="T75">CLOCK_MONOTONIC</text:span></text:span>, but it also includes the time during which the system was suspended or in sleep mode</text:p>
        </text:list-item>
      </text:list>
      <text:list text:style-name="L2">
        <text:list-header>
          <text:p text:style-name="P105"><text:s/></text:p>
        </text:list-header>
      </text:list>
      <text:p text:style-name="P47"><text:span text:style-name="T166">In this execution the system has been running for approximately </text:span><text:span text:style-name="Strong_20_Emphasis"><text:span text:style-name="T166">1 day, 10 hours, 54 minutes, and 19 seconds. </text:span></text:span><text:span text:style-name="Strong_20_Emphasis"><text:span text:style-name="T167">B</text:span></text:span><text:span text:style-name="T166">oth monotonic clocks return the same value, indicating that the system has not been suspended since boot. </text:span><text:span text:style-name="T167">T</text:span><text:span text:style-name="T166">he milliseconds displayed after the decimal point correspond to the nanoseconds field converted to milliseconds.</text:span></text:p>
      <text:p text:style-name="P103"/>
      <text:p text:style-name="P103"><text:span text:style-name="T154">We pass </text:span>an argument <text:span text:style-name="T168">to </text:span><text:span text:style-name="T169">retrieve</text:span><text:span text:style-name="T168"> the resolution of the clock.</text:span></text:p>
      <text:p text:style-name="P101"/>
      <table:table table:name="Table145" table:style-name="Table145">
        <table:table-column table:style-name="Table145.A"/>
        <table:table-row>
          <table:table-cell table:style-name="Table145.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87">./</text:span><text:span text:style-name="T165">clock_time</text:span><text:span text:style-name="T170">s 1</text:span></text:p>
            <text:p text:style-name="P106">CLOCK_REALTIME : <text:s text:c="12"/>1745717909.375 (20205 days + <text:s/>1h 38m 29s)</text:p>
            <text:p text:style-name="P106">resolution: <text:s text:c="9"/>0.000000001</text:p>
            <text:p text:style-name="P106">CLOCK_TAI : <text:s text:c="26"/>1745717909.375 (20205 days + <text:s/>1h 38m 29s)</text:p>
            <text:p text:style-name="P106">resolution: <text:s text:c="9"/>0.000000001</text:p>
            <text:p text:style-name="P106">CLOCK_MONOTONIC: <text:s text:c="9"/>125747.477 (1 days + 10h 55m 47s)</text:p>
            <text:p text:style-name="P106">resolution: <text:s text:c="9"/>0.000000001</text:p>
            <text:p text:style-name="P106"><text:soft-page-break/>CLOCK_BOOTTIME : <text:s text:c="13"/>125747.477 (1 days + 10h 55m 47s)</text:p>
            <text:p text:style-name="P106">resolution: <text:s text:c="9"/>0.000000001</text:p>
          </table:table-cell>
        </table:table-row>
      </table:table>
      <text:p text:style-name="P103"/>
      <text:p text:style-name="P47"><text:span text:style-name="T166">When the program is executed with a command-line argument, the variable </text:span><text:span text:style-name="Source_20_Text"><text:span text:style-name="T171">showRes</text:span></text:span><text:span text:style-name="T166"> becomes </text:span><text:span text:style-name="Source_20_Text"><text:span text:style-name="T171">true</text:span></text:span><text:span text:style-name="T166">, causing the program to also display the resolution of each clock using </text:span><text:span text:style-name="Source_20_Text"><text:span text:style-name="T171">clock_getres</text:span></text:span><text:span text:style-name="T166">.</text:span></text:p>
      <text:p text:style-name="P107"><text:span text:style-name="T166">The output shows that all the clocks have a resolution of </text:span><text:span text:style-name="Source_20_Text"><text:span text:style-name="T171">0.000000001</text:span></text:span><text:span text:style-name="T166">, which corresponds to </text:span><text:span text:style-name="Source_20_Text"><text:span text:style-name="T171">1</text:span></text:span><text:span text:style-name="Strong_20_Emphasis"><text:span text:style-name="T172"> </text:span></text:span><text:span text:style-name="Strong_20_Emphasis"><text:span text:style-name="T166">nanosecond</text:span></text:span><text:span text:style-name="T166">.<text:line-break/>This means the kernel is capable of representing time values with nanosecond precision.</text:span></text:p>
      <text:p text:style-name="P47"><text:span text:style-name="Source_20_Text"><text:span text:style-name="T171">CLOCK_REALTIME</text:span></text:span><text:span text:style-name="T166"> and </text:span><text:span text:style-name="Source_20_Text"><text:span text:style-name="T171">CLOCK_TAI</text:span></text:span><text:span text:style-name="T166"> return the current system time expressed as the number of seconds elapsed since the Unix Epoch (</text:span><text:span text:style-name="Source_20_Text"><text:span text:style-name="T171">1 January 1970 00:00:00 UTC</text:span></text:span><text:span text:style-name="T166">).</text:span></text:p>
      <text:p text:style-name="P108">The retrieved value is based on UTC time and is independent from the local timezone configured on the system. The timezone only affects how the timestamp is converted into a human-readable date and time representation. As a consequence, the timestamp value is theoretically identical on all systems, differences may occur only if system clocks are not correctly synchronized. </text:p>
      <text:p text:style-name="P47"><text:span text:style-name="Source_20_Text"><text:span text:style-name="T171">CLOCK_MONOTONIC</text:span></text:span><text:span text:style-name="T166"> and </text:span><text:span text:style-name="Source_20_Text"><text:span text:style-name="T171">CLOCK_BOOTTIME</text:span></text:span><text:span text:style-name="T166"> instead represent the elapsed time since system startup rather than calendar time.</text:span></text:p>
      <text:p text:style-name="P103"/>
      <text:p text:style-name="P103"/>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text:span text:style-name="T173">III.1</text:span><text:span text:style-name="T174">.</text:span><text:span text:style-name="T175">3</text:span><text:span text:style-name="T174"> </text:span>Clocks on Linux</text:p>
      <text:p text:style-name="P111"/>
      <text:p text:style-name="P47"><text:span text:style-name="T176">On Linux systems, the current date, time, timezone, and clock synchronization status can be displayed using the </text:span><text:span text:style-name="Source_20_Text"><text:span text:style-name="T177">timedatectl</text:span></text:span><text:span text:style-name="Source_20_Text"><text:span text:style-name="T177"><text:note text:id="ftn10" text:note-class="footnote"><text:note-citation>8</text:note-citation><text:note-body><text:p text:style-name="P112"><text:span text:style-name="T178">See the </text:span><text:span text:style-name="T179">timedatectl(1)</text:span><text:span text:style-name="T180"> manual page</text:span></text:p></text:note-body></text:note></text:span></text:span><text:span text:style-name="T176"> command.</text:span></text:p>
      <text:p text:style-name="P113"/>
      <table:table table:name="Table146" table:style-name="Table146">
        <table:table-column table:style-name="Table146.A"/>
        <table:table-row>
          <table:table-cell table:style-name="Table146.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181">timedatectl</text:span></text:p>
            <text:p text:style-name="P114"><text:span text:style-name="T182"><text:s text:c="15"/>Local time:</text:span> Sun 2025-04-27 09:07:48 +07</text:p>
            <text:p text:style-name="P115"><text:span text:style-name="T182"><text:s text:c="11"/>Universal time:</text:span> Sun 2025-04-27 02:07:48 UTC</text:p>
            <text:p text:style-name="P115"><text:span text:style-name="T182"><text:s text:c="17"/>RTC time:</text:span> Sun 2025-04-27 02:07:48</text:p>
            <text:p text:style-name="P115"><text:span text:style-name="T182"><text:s text:c="16"/>Time zone:</text:span> Asia/Phnom_Penh (+07, +0700)</text:p>
            <text:p text:style-name="P115"><text:span text:style-name="T182">System clock synchronized:</text:span> yes</text:p>
            <text:p text:style-name="P115"><text:span text:style-name="T182"><text:s text:c="14"/>NTP service:</text:span> active</text:p>
            <text:p text:style-name="P116"><text:span text:style-name="T182"><text:s text:c="10"/>RTC in local TZ:</text:span> no</text:p>
          </table:table-cell>
        </table:table-row>
      </table:table>
      <text:p text:style-name="P111"/>
      <text:p text:style-name="P47"><text:span text:style-name="T176">Obviously, the </text:span><text:span text:style-name="Strong_20_Emphasis"><text:span text:style-name="T183">local time</text:span></text:span><text:span text:style-name="T176"> and the </text:span><text:span text:style-name="Strong_20_Emphasis"><text:span text:style-name="T183">universal time</text:span></text:span><text:span text:style-name="Strong_20_Emphasis"><text:span text:style-name="T176"> (UTC)</text:span></text:span><text:span text:style-name="T176"> differ because the local time includes the </text:span><text:span text:style-name="T183">timezone offset</text:span><text:span text:style-name="T176"> configured on the system.</text:span></text:p>
      <text:p text:style-name="P113"/>
      <text:p text:style-name="P117"><text:span text:style-name="T176">The value returned by </text:span><text:span text:style-name="Source_20_Text"><text:span text:style-name="T177">clock_gettime</text:span></text:span><text:span text:style-name="T176"> with </text:span><text:span text:style-name="Source_20_Text"><text:span text:style-name="T177">CLOCK_REALTIME</text:span></text:span><text:span text:style-name="T176"> is based on the Unix Epoch (</text:span><text:span text:style-name="Source_20_Text"><text:span text:style-name="T177">1 January 1970 00:00:00 UTC</text:span></text:span><text:span text:style-name="T176">). Therefore, the returned timestamp is internally represented in UTC and is independent from the </text:span><text:span text:style-name="T183">local timezone</text:span><text:span text:style-name="T176">.</text:span><text:span text:style-name="T176"><text:note text:id="ftn11" text:note-class="footnote"><text:note-citation>9</text:note-citation><text:note-body><text:p text:style-name="P118"><text:span text:style-name="T184">The option </text:span><text:span text:style-name="T185">-d</text:span><text:span text:style-name="T184"> of </text:span><text:span text:style-name="T185">date</text:span><text:span text:style-name="T184"> allow</text:span><text:span text:style-name="T186">s</text:span><text:span text:style-name="T184"> to specify a date and time </text:span></text:p></text:note-body></text:note></text:span><text:span text:style-name="T176"> </text:span><text:span text:style-name="T187">To demonstrate this behavior we can use the following sequence of commands.</text:span></text:p>
      <text:p text:style-name="P111"/>
      <table:table table:name="Table147" table:style-name="Table147">
        <table:table-column table:style-name="Table147.A"/>
        <table:table-row>
          <table:table-cell table:style-name="Table147.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181">date +%s </text:span></text:p>
            <text:p text:style-name="P119">1745720874</text:p>
            <text:p text:style-name="P120"/>
            <text:p text:style-name="P45"><text:span text:style-name="T80">[</text:span><text:a xlink:type="simple" xlink:href="mailto:linux@fidir" text:style-name="Internet_20_link" text:visited-style-name="Visited_20_Internet_20_Link"><text:span text:style-name="T81">linux@fidir</text:span></text:a><text:span text:style-name="T80">] date -d '1970-01-01 00:00:00' +%s</text:span></text:p>
            <text:p text:style-name="P45">-25200</text:p>
            <text:p text:style-name="P45"><text:span text:style-name="T80">[</text:span><text:a xlink:type="simple" xlink:href="mailto:linux@fidir" text:style-name="Internet_20_link" text:visited-style-name="Visited_20_Internet_20_Link"><text:span text:style-name="T81">linux@fidir</text:span></text:a><text:span text:style-name="T80">] echo $(( $(date +%s) + -25200 ))</text:span></text:p>
            <text:p text:style-name="P45">1745695689</text:p>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181">./</text:span><text:span text:style-name="T188">clock_times</text:span></text:p>
            <text:p text:style-name="P121">CLOCK_REALTIME : <text:s text:c="4"/><text:span text:style-name="T90">1745720890</text:span>.867 (20205 days + <text:s/>2h 28m 10s)</text:p>
            <text:p text:style-name="P121">CLOCK_TAI : <text:s text:c="18"/>1745720890.867 (20205 days + <text:s/>2h 28m 10s)</text:p>
            <text:p text:style-name="P121">CLOCK_MONOTONIC: <text:s text:c="13"/>2664.448 ( 0h 44m 24s)</text:p>
            <text:p text:style-name="P121">CLOCK_BOOTTIME : <text:s text:c="16"/>2664.448 ( 0h 44m 24s)</text:p>
          </table:table-cell>
        </table:table-row>
      </table:table>
      <text:p text:style-name="P111"/>
      <text:p text:style-name="P117"><text:span text:style-name="T189">The first command </text:span><text:span text:style-name="T190">returns the current timestamp expressed as the number of seconds elapsed since the Unix Epoch. </text:span><text:span text:style-name="T186">T</text:span><text:span text:style-name="T189">he second</text:span><text:span text:style-name="T190"> </text:span><text:span text:style-name="T186">command </text:span><text:span text:style-name="T190">calculates the difference, in seconds, between the Unix Epoch in UTC </text:span><text:span text:style-name="T186">and </text:span><text:span text:style-name="T190">the same date interpreted in the local timezone</text:span><text:span text:style-name="T191"><text:note text:id="ftn12" text:note-class="footnote"><text:note-citation>10</text:note-citation><text:note-body><text:p text:style-name="P122">As we were in the Epoch date and time in a different timezone on the earth</text:p></text:note-body></text:note></text:span><text:span text:style-name="T190">. The returned value </text:span><text:span text:style-name="T186">(25200) </text:span><text:span text:style-name="T190">corresponds to a timezone offset of </text:span><text:span text:style-name="Source_20_Text"><text:span text:style-name="T177">25200 / 60 / 60 = 7 hours</text:span></text:span><text:span text:style-name="T190">, which means the system timezone is UTC+7.</text:span></text:p>
      <text:p text:style-name="P117"><text:span text:style-name="T187">T</text:span><text:span text:style-name="T189">he third </text:span><text:span text:style-name="T187">command </text:span><text:span text:style-name="T192">executes the </text:span><text:span text:style-name="Source_20_Text"><text:span text:style-name="T177">clock_times.c</text:span></text:span><text:span text:style-name="T192"> program and displays the values returned by the different clocks. The value returned by </text:span><text:span text:style-name="Source_20_Text"><text:span text:style-name="T177">CLOCK_REALTIME</text:span></text:span><text:span text:style-name="Source_20_Text"><text:span text:style-name="T192"> </text:span></text:span><text:span text:style-name="T192">(</text:span><text:span text:style-name="Source_20_Text"><text:span text:style-name="T177">1745720890.867</text:span></text:span><text:span text:style-name="T192">)</text:span> <text:s/>is very close to the timestamp produced by <text:span text:style-name="Source_20_Text"><text:span text:style-name="T177">date +%s</text:span></text:span>, confirming that <text:span text:style-name="Source_20_Text"><text:span text:style-name="T177">CLOCK_REALTIME</text:span></text:span> internally uses UTC-based Unix time. The small difference of a few seconds is caused simply by the time required to type and execute the commands.</text:p>
      <text:p text:style-name="P123">As a result we understand that Linux internally stores time as UTC, the Unix timestamp is independent from the local timezone, <text:s/>the timezone is only applied when converting timestamps into human-readable local dates and times. </text:p>
      <text:p text:style-name="P124"><text:soft-page-break/><text:span text:style-name="T193">On Linux </text:span><text:span text:style-name="T187">sy</text:span><text:span text:style-name="T194">s</text:span><text:span text:style-name="T187">t</text:span><text:span text:style-name="T194">e</text:span><text:span text:style-name="T187">ms</text:span><text:span text:style-name="T193">, there are two </text:span><text:span text:style-name="T187">different types of </text:span><text:span text:style-name="T193">clocks:</text:span></text:p>
      <text:list text:style-name="L3">
        <text:list-header>
          <text:p text:style-name="P125"/>
        </text:list-header>
      </text:list>
      <text:p text:style-name="P126">Hardware Clock</text:p>
      <text:list text:continue-numbering="true" text:style-name="L3">
        <text:list-header>
          <text:p text:style-name="P127">Independent hardware device with its own power supplier. It operates when the machine is powered off or even unplugged. Also called “Real time clock” (RTC), BIOS clock, CMOS clock.</text:p>
        </text:list-header>
      </text:list>
      <text:p text:style-name="P128"/>
      <text:p text:style-name="P129">System Clock</text:p>
      <text:list text:continue-numbering="true" text:style-name="L3">
        <text:list-header>
          <text:p text:style-name="P125">Is part of the Linux kernel and is driven by a timer interrupt, it exists and has meaning only while Linux is running. It is the number of seconds fr<text:span text:style-name="T195">o</text:span>m the Epoch. This is initialized from the Hardware Clock at boot. </text:p>
          <text:p text:style-name="P125"/>
        </text:list-header>
      </text:list>
      <text:p text:style-name="P117"><text:span text:style-name="T196">To </text:span><text:span text:style-name="T197">retrieve</text:span><text:span text:style-name="T196"> information from the </text:span><text:span text:style-name="T198">Hardware clock</text:span><text:span text:style-name="T196">, we can use the </text:span><text:span text:style-name="T177">hwclock</text:span><text:span text:style-name="T196"><text:note text:id="ftn13" text:note-class="footnote"><text:note-citation>11</text:note-citation><text:note-body><text:p text:style-name="P130"><text:span text:style-name="T199">See the </text:span><text:span text:style-name="T200">hwclock(1)</text:span><text:span text:style-name="T201"> manual page</text:span></text:p></text:note-body></text:note></text:span><text:span text:style-name="T196"> utility.</text:span></text:p>
      <text:p text:style-name="P131"/>
      <table:table table:name="Table148" table:style-name="Table148">
        <table:table-column table:style-name="Table148.A"/>
        <table:table-row>
          <table:table-cell table:style-name="Table148.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202">sudo </text:span><text:span text:style-name="T203">hwclock</text:span></text:p>
            <text:p text:style-name="P132">2025-04-27 09:49:11.767010+07:00</text:p>
          </table:table-cell>
        </table:table-row>
      </table:table>
      <text:p text:style-name="P133"/>
      <text:p text:style-name="P133">The command displays:</text:p>
      <text:p text:style-name="P133"/>
      <text:list text:style-name="L4">
        <text:list-item>
          <text:p text:style-name="P134">the current date</text:p>
        </text:list-item>
        <text:list-item>
          <text:p text:style-name="P135">the current time <text:span text:style-name="T195">with </text:span>fractions of seconds stored by the hardware clock</text:p>
        </text:list-item>
        <text:list-item>
          <text:p text:style-name="P134">the timezone offset</text:p>
          <text:p text:style-name="P134"><text:s/></text:p>
        </text:list-item>
      </text:list>
      <text:p text:style-name="P133">The value shown is retrieved directly from the RTC (Real-Time Clock) located on the motherboard.</text:p>
      <text:p text:style-name="P133"/>
      <text:p text:style-name="P133"/>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text:soft-page-break/><text:span text:style-name="T204">III.1.</text:span><text:span text:style-name="T175">4</text:span><text:span text:style-name="T204"> </text:span>Setting a new time: <text:span text:style-name="T205">tm</text:span></text:p>
      <text:p text:style-name="P138"/>
      <text:p text:style-name="P139"><text:span text:style-name="T206">W</text:span><text:span text:style-name="T207">e present a simple example of the use of the </text:span><text:span text:style-name="Source_20_Text"><text:span text:style-name="T177">settimeofday</text:span></text:span><text:span text:style-name="T207"> system call. The </text:span><text:span text:style-name="Source_20_Text"><text:span text:style-name="T177">setnewtime.c</text:span></text:span><text:span text:style-name="T207"> <text:s/>program first retrieves the current system time and then sets a new date and time value. To define the new date and time, </text:span><text:span text:style-name="T206">it </text:span><text:span text:style-name="T207">uses the </text:span><text:span text:style-name="Source_20_Text"><text:span text:style-name="T177">tm</text:span></text:span><text:span text:style-name="T207"> structure, </text:span><text:span text:style-name="T206">which is defined </text:span><text:span text:style-name="T207">in the </text:span><text:span text:style-name="T177">sys/types.h</text:span><text:span text:style-name="T177"><text:note text:id="ftn14" text:note-class="footnote"><text:note-citation>12</text:note-citation><text:note-body><text:p text:style-name="P140"><text:span text:style-name="T208">On </text:span><text:span text:style-name="T209">Debian-based systems: </text:span><text:span text:style-name="T210">/usr/include/x86_64-linux-gnu/bits/types/struct_tm.h</text:span></text:p></text:note-body></text:note></text:span><text:span text:style-name="T207"> header </text:span><text:span text:style-name="T206">file </text:span><text:span text:style-name="T211">as follows.</text:span></text:p>
      <text:p text:style-name="P141"/>
      <table:table table:name="Table149" table:style-name="Table149">
        <table:table-column table:style-name="Table149.A"/>
        <table:table-row>
          <table:table-cell table:style-name="Table149.A1" office:value-type="string">
            <text:p text:style-name="P67"><text:span text:style-name="T115">struct</text:span> tm</text:p>
            <text:p text:style-name="P64">{</text:p>
            <text:p text:style-name="P64"><text:span text:style-name="T115"><text:s text:c="3"/>int</text:span> tm_sec;<text:span text:style-name="T119"> <text:s text:c="6"/>/* Seconds. [0-60] (1 leap second) */</text:span></text:p>
            <text:p text:style-name="P64"><text:span text:style-name="T115"><text:s text:c="3"/>int</text:span> tm_min;<text:span text:style-name="T119"> <text:s text:c="6"/>/* Minutes. [0-59] */</text:span></text:p>
            <text:p text:style-name="P64"><text:span text:style-name="T115"><text:s text:c="3"/>int</text:span> tm_hour;<text:span text:style-name="T119"> <text:s text:c="5"/>/* Hours. [0-23] */</text:span></text:p>
            <text:p text:style-name="P64"><text:span text:style-name="T115"><text:s text:c="3"/>int</text:span> tm_mday;<text:span text:style-name="T119"> <text:s text:c="5"/>/* Day. [1-31] */</text:span></text:p>
            <text:p text:style-name="P64"><text:span text:style-name="T115"><text:s text:c="3"/>int</text:span> tm_mon;<text:span text:style-name="T119"> <text:s text:c="6"/>/* Month. [0-11] */</text:span></text:p>
            <text:p text:style-name="P64"><text:span text:style-name="T115"><text:s text:c="3"/>int</text:span> tm_year;<text:span text:style-name="T119"> <text:s text:c="5"/>/* Year - 1900. */</text:span></text:p>
            <text:p text:style-name="P64"><text:span text:style-name="T115"><text:s text:c="3"/>int</text:span> tm_wday;<text:span text:style-name="T119"> <text:s text:c="5"/>/* Day of week. [0-6] */</text:span></text:p>
            <text:p text:style-name="P64"><text:span text:style-name="T115"><text:s text:c="3"/>int</text:span> tm_yday;<text:span text:style-name="T119"> <text:s text:c="5"/>/* Days in year.[0-365] */</text:span></text:p>
            <text:p text:style-name="P57"><text:span text:style-name="T101"><text:s text:c="3"/>int</text:span><text:span text:style-name="T124"> tm_isdst;</text:span><text:span text:style-name="T212"> <text:s text:c="4"/>/* DST. [-1/0/1]*/</text:span></text:p>
            <text:p text:style-name="P77"># ifdef __USE_MISC</text:p>
            <text:p text:style-name="P64"><text:span text:style-name="T115"><text:s text:c="3"/>long</text:span> <text:span text:style-name="T115">int</text:span> tm_gmtoff;<text:span text:style-name="T119"> <text:s text:c="6"/>/* Seconds east of UTC. */</text:span></text:p>
            <text:p text:style-name="P64"><text:span text:style-name="T115"><text:s text:c="3"/>const</text:span> <text:span text:style-name="T115">char</text:span> *tm_zone;<text:span text:style-name="T119"> <text:s text:c="5"/>/* Timezone abbreviation. */</text:span></text:p>
            <text:p text:style-name="P77"># else</text:p>
            <text:p text:style-name="P64"><text:span text:style-name="T115"><text:s text:c="3"/>long</text:span> <text:span text:style-name="T115">int</text:span> __tm_gmtoff;<text:span text:style-name="T119"> <text:s text:c="4"/>/* Seconds east of UTC. */</text:span></text:p>
            <text:p text:style-name="P64"><text:span text:style-name="T115"><text:s text:c="3"/>const</text:span> <text:span text:style-name="T115">char</text:span> *__tm_zone;<text:span text:style-name="T119"> <text:s text:c="3"/>/* Timezone abbreviation. */</text:span></text:p>
            <text:p text:style-name="P77"># endif</text:p>
            <text:p text:style-name="P64">};</text:p>
          </table:table-cell>
        </table:table-row>
      </table:table>
      <text:p text:style-name="P138"/>
      <text:p text:style-name="P138"/>
      <text:p text:style-name="P69"/>
      <text:p text:style-name="P64"><text:span text:style-name="T213">1 </text:span><text:span text:style-name="T115">#include </text:span><text:span text:style-name="T116">&lt;stdio.h&gt;</text:span></text:p>
      <text:p text:style-name="P64"><text:span text:style-name="T213">2 </text:span><text:span text:style-name="T115">#include </text:span><text:span text:style-name="T116">&lt;stdlib.h&gt;</text:span></text:p>
      <text:p text:style-name="P64"><text:span text:style-name="T213">3 </text:span><text:span text:style-name="T115">#include </text:span><text:span text:style-name="T116">&lt;unistd.h&gt;</text:span></text:p>
      <text:p text:style-name="P64"><text:span text:style-name="T213">4 </text:span><text:span text:style-name="T115">#include </text:span><text:span text:style-name="T116">&lt;sys/time.h&gt;</text:span></text:p>
      <text:p text:style-name="P64"><text:span text:style-name="T213">5 </text:span><text:span text:style-name="T115">#include </text:span><text:span text:style-name="T116">&lt;time.h&gt;</text:span></text:p>
      <text:p text:style-name="P64"><text:span text:style-name="T213">6 </text:span><text:span text:style-name="T115">#include </text:span><text:span text:style-name="T116">&lt;errno.h&gt;</text:span></text:p>
      <text:p text:style-name="P58"/>
      <text:p text:style-name="P64"><text:span text:style-name="T213">7 </text:span><text:span text:style-name="T115">int</text:span> main(<text:span text:style-name="T115">int</text:span> argc, <text:span text:style-name="T115">char</text:span> *argv<text:span text:style-name="T115">[]</text:span>) {</text:p>
      <text:p text:style-name="P59"><text:span text:style-name="T214">8 <text:s text:c="3"/></text:span><text:span text:style-name="T103">struct</text:span><text:span text:style-name="T104"> </text:span><text:span text:style-name="T103">timeval</text:span><text:span text:style-name="T104"> new_time;</text:span></text:p>
      <text:p text:style-name="P64"><text:span text:style-name="T213">9 <text:s text:c="3"/></text:span><text:span text:style-name="T115">time_t</text:span> t;</text:p>
      <text:p text:style-name="P58"/>
      <text:p text:style-name="P64"><text:span text:style-name="T213">10 <text:s text:c="3"/></text:span><text:span text:style-name="T115">if</text:span> (argc != <text:span text:style-name="T127">7</text:span>) {</text:p>
      <text:p text:style-name="P64"><text:span text:style-name="T213">11 <text:s text:c="6"/></text:span>printf(<text:span text:style-name="T116">"\nUsage: %s year month day hour min sec"</text:span>, argv[<text:span text:style-name="T127">0</text:span>]);</text:p>
      <text:p text:style-name="P64"><text:span text:style-name="T213">12 <text:s text:c="6"/></text:span>exit(<text:span text:style-name="T115">EXIT_FAILURE</text:span>);</text:p>
      <text:p text:style-name="P64"><text:span text:style-name="T213">13 <text:s text:c="3"/></text:span>}</text:p>
      <text:p text:style-name="P58"/>
      <text:p text:style-name="P64"><text:span text:style-name="T213">14 <text:s text:c="3"/></text:span><text:span text:style-name="T126">gettimeofday</text:span>(&amp;new_time, <text:span text:style-name="T115">NULL</text:span>);</text:p>
      <text:p text:style-name="P64"><text:span text:style-name="T213">15 <text:s text:c="3"/></text:span>t = new_time.tv_sec;</text:p>
      <text:p text:style-name="P64"><text:span text:style-name="T213">16 <text:s text:c="3"/></text:span>printf(<text:span text:style-name="T116">"\nCurrent system time: %s"</text:span>, ctime(&amp;t));</text:p>
      <text:p text:style-name="P59"><text:soft-page-break/><text:span text:style-name="T214">17 <text:s text:c="3"/></text:span><text:span text:style-name="T103">struct</text:span><text:span text:style-name="T104"> </text:span><text:span text:style-name="T103">tm</text:span><text:span text:style-name="T104"> tm_time = {</text:span></text:p>
      <text:p text:style-name="P64"><text:span text:style-name="T213">18 <text:s text:c="6"/></text:span>.tm_year = atoi(argv[<text:span text:style-name="T127">1</text:span>]) - <text:span text:style-name="T127">1900</text:span>,</text:p>
      <text:p text:style-name="P64"><text:span text:style-name="T213">19 <text:s text:c="6"/></text:span>.tm_mon = atoi(argv[<text:span text:style-name="T127">2</text:span>]) - <text:span text:style-name="T127">1</text:span>,</text:p>
      <text:p text:style-name="P64"><text:span text:style-name="T213">20 <text:s text:c="6"/></text:span>.tm_mday = atoi(argv[<text:span text:style-name="T127">3</text:span>]),</text:p>
      <text:p text:style-name="P64"><text:span text:style-name="T213">21 <text:s text:c="6"/></text:span>.tm_hour = atoi(argv[<text:span text:style-name="T127">4</text:span>]),</text:p>
      <text:p text:style-name="P64"><text:span text:style-name="T213">22 <text:s text:c="6"/>.</text:span>tm_min = atoi(argv[<text:span text:style-name="T127">5</text:span>]),</text:p>
      <text:p text:style-name="P64"><text:span text:style-name="T213">23 <text:s text:c="6"/></text:span>.tm_sec = atoi(argv[<text:span text:style-name="T127">6</text:span>]),</text:p>
      <text:p text:style-name="P64"><text:span text:style-name="T213">24 <text:s text:c="3"/></text:span>};</text:p>
      <text:p text:style-name="P58"/>
      <text:p text:style-name="P57"><text:span text:style-name="T215">25 <text:s text:c="3"/></text:span><text:span text:style-name="T101">time_t</text:span><text:span text:style-name="T124"> new_epoch = </text:span><text:span text:style-name="T216">mktime</text:span><text:span text:style-name="T124">(&amp;tm_time); </text:span></text:p>
      <text:p text:style-name="P64"><text:span text:style-name="T213">26 <text:s text:c="3"/></text:span><text:span text:style-name="T115">if</text:span> (new_epoch == -<text:span text:style-name="T127">1</text:span>) {</text:p>
      <text:p text:style-name="P64"><text:span text:style-name="T213">27 <text:s text:c="6"/></text:span>perror(<text:span text:style-name="T116">"mktime failed"</text:span>);</text:p>
      <text:p text:style-name="P64"><text:span text:style-name="T213">28 <text:s text:c="6"/></text:span><text:span text:style-name="T217">exit</text:span><text:span text:style-name="T218">(</text:span><text:span text:style-name="T115">EXIT_FAILURE</text:span><text:span text:style-name="T219">)</text:span>;</text:p>
      <text:p text:style-name="P64"><text:span text:style-name="T213">29 <text:s text:c="3"/></text:span>}</text:p>
      <text:p text:style-name="P58"/>
      <text:p text:style-name="P64"><text:span text:style-name="T213">30 <text:s text:c="3"/></text:span>new_time.tv_sec = new_epoch;</text:p>
      <text:p text:style-name="P64"><text:span text:style-name="T213">31 <text:s text:c="3"/></text:span>new_time.tv_usec = <text:span text:style-name="T127">0</text:span>;</text:p>
      <text:p text:style-name="P58"/>
      <text:p text:style-name="P64"><text:span text:style-name="T213">32 <text:s text:c="3"/></text:span><text:span text:style-name="T115">if</text:span> (<text:span text:style-name="T126">settimeofday</text:span>(&amp;new_time, <text:span text:style-name="T115">NULL</text:span>) == -<text:span text:style-name="T127">1</text:span>) {</text:p>
      <text:p text:style-name="P64"><text:span text:style-name="T213">33 <text:s text:c="6"/></text:span>perror(<text:span text:style-name="T116">"settimeofday"</text:span>);</text:p>
      <text:p text:style-name="P64"><text:span text:style-name="T213">34 <text:s text:c="6"/></text:span>exit(<text:span text:style-name="T115">EXIT_FAILURE</text:span>);</text:p>
      <text:p text:style-name="P64"><text:span text:style-name="T213">35 <text:s text:c="3"/></text:span>}</text:p>
      <text:p text:style-name="P58"/>
      <text:p text:style-name="P64"><text:span text:style-name="T213">36 <text:s text:c="3"/></text:span><text:span text:style-name="T126">gettimeofday</text:span>(&amp;new_time, <text:span text:style-name="T115">NULL</text:span>);</text:p>
      <text:p text:style-name="P64"><text:span text:style-name="T213">37 <text:s text:c="3"/></text:span>t = new_time.tv_sec;</text:p>
      <text:p text:style-name="P57"><text:span text:style-name="T215">38 <text:s text:c="3"/></text:span><text:span text:style-name="T124">printf(</text:span><text:span text:style-name="T102">"New system time: %s"</text:span><text:span text:style-name="T124">, ctime(&amp;t));</text:span></text:p>
      <text:p text:style-name="P64"><text:span text:style-name="T213">39 <text:s text:c="3"/></text:span>exit(<text:span text:style-name="T115">EXIT_SUCCESS</text:span>);</text:p>
      <text:p text:style-name="P57"><text:span text:style-name="T215">40 </text:span><text:span text:style-name="T124">}</text:span></text:p>
      <text:p text:style-name="P69"/>
      <text:p text:style-name="P142">setnewtime.c</text:p>
      <text:p text:style-name="Standard"><text:span text:style-name="Strong_20_Emphasis"><text:span text:style-name="T220">Line 8.</text:span></text:span><text:span text:style-name="T220"> Declares a </text:span><text:span text:style-name="Source_20_Text"><text:span text:style-name="T221">struct timeval</text:span></text:span><text:span text:style-name="T220"> named </text:span><text:span text:style-name="Source_20_Text"><text:span text:style-name="T221">new_time</text:span></text:span><text:span text:style-name="T220"> used to hold time in seconds and <text:tab/>microseconds</text:span><text:span text:style-name="T220"><text:note text:id="ftn15" text:note-class="footnote"><text:note-citation>13</text:note-citation><text:note-body><text:p text:style-name="P143">POSIX time format</text:p></text:note-body></text:note></text:span><text:span text:style-name="T220">. This structure is required by </text:span><text:span text:style-name="Source_20_Text"><text:span text:style-name="T221">gettimeofday</text:span></text:span><text:span text:style-name="T220"> and </text:span><text:span text:style-name="Source_20_Text"><text:span text:style-name="T221">settimeofday</text:span></text:span><text:span text:style-name="T220">, <text:tab/>which operate with higher precision than </text:span><text:span text:style-name="Source_20_Text"><text:span text:style-name="T221">time_t</text:span></text:span></text:p>
      <text:p text:style-name="Standard"><text:span text:style-name="Strong_20_Emphasis"><text:span text:style-name="T220">Line 9.</text:span></text:span><text:span text:style-name="T220"> Declares a variable of type </text:span><text:span text:style-name="Source_20_Text"><text:span text:style-name="T221">time_t</text:span></text:span><text:span text:style-name="T220"> used to store Unix epoch time</text:span><text:span text:style-name="T220"><text:note text:id="ftn16" text:note-class="footnote"><text:note-citation>14</text:note-citation><text:note-body><text:p text:style-name="P140">This is the standard scalar representation of system time used by many C library functions</text:p></text:note-body></text:note></text:span></text:p>
      <text:p text:style-name="Standard"><text:span text:style-name="Strong_20_Emphasis"><text:span text:style-name="T220">Line 14–16.</text:span></text:span><text:span text:style-name="T220"> Retrieves the current system time using </text:span><text:span text:style-name="Source_20_Text"><text:span text:style-name="T221">gettimeofday</text:span></text:span><text:span text:style-name="T220">, which fills </text:span><text:span text:style-name="Source_20_Text"><text:span text:style-name="T221">new_time</text:span></text:span><text:span text:style-name="T220"> with <text:tab/> <text:s text:c="7"/>both seconds (</text:span><text:span text:style-name="Source_20_Text"><text:span text:style-name="T221">tv_sec</text:span></text:span><text:span text:style-name="T220">) and microseconds (</text:span><text:span text:style-name="Source_20_Text"><text:span text:style-name="T221">tv_usec</text:span></text:span><text:span text:style-name="T220">). Only the seconds portion is <text:tab/> <text:s text:c="7"/>copied into </text:span><text:span text:style-name="Source_20_Text"><text:span text:style-name="T221">t</text:span></text:span><text:span text:style-name="T220">, then converted to a human-readable string using </text:span><text:span text:style-name="Source_20_Text"><text:span text:style-name="T221">ctime(&amp;t)</text:span></text:span><text:span text:style-name="Source_20_Text"><text:span text:style-name="T221"><text:note text:id="ftn17" text:note-class="footnote"><text:note-citation>15</text:note-citation><text:note-body><text:p text:style-name="P144"><text:span text:style-name="Source_20_Text"><text:span text:style-name="T222">ctime</text:span></text:span><text:span text:style-name="T209"> returns a pointer to a statically allocated string that includes a trailing newline, and it is not thread-safe, </text:span><text:span text:style-name="Source_20_Text"><text:span text:style-name="T222">ctime_r</text:span></text:span><text:span text:style-name="T209"> would be safer in multithreaded contexts</text:span></text:p></text:note-body></text:note></text:span></text:span></text:p>
      <text:p text:style-name="Standard"><text:span text:style-name="Strong_20_Emphasis"><text:span text:style-name="T220">Line 17–24.</text:span></text:span><text:span text:style-name="T220"> Declares and initializes a </text:span><text:span text:style-name="Source_20_Text"><text:span text:style-name="T221">struct</text:span></text:span><text:span text:style-name="Source_20_Text"><text:span text:style-name="T220"> </text:span></text:span><text:span text:style-name="Source_20_Text"><text:span text:style-name="T221">tm</text:span></text:span><text:span text:style-name="T220"> representing the target time provided via <text:tab/><text:tab/> <text:s text:c="7"/>command-line arguments. The fields are populated using </text:span><text:span text:style-name="Source_20_Text"><text:span text:style-name="T221">atoi</text:span></text:span><text:span text:style-name="Source_20_Text"><text:span text:style-name="T221"><text:note text:id="ftn18" text:note-class="footnote"><text:note-citation>16</text:note-citation><text:note-body><text:p text:style-name="P144"><text:s/><text:span text:style-name="Source_20_Text"><text:span text:style-name="T222">atoi</text:span></text:span> performs no validation, invalid input (non-numeric strings) will silently become 0.</text:p></text:note-body></text:note></text:span></text:span><text:span text:style-name="T220">. The year is <text:tab/> <text:s text:c="4"/><text:tab/> <text:s text:c="7"/>adjusted by subtracting 1900 and the month by subtracting </text:span><text:span text:style-name="Source_20_Text"><text:span text:style-name="T221">1</text:span></text:span><text:span text:style-name="T220">, as required by the <text:tab/> <text:s text:c="3"/><text:tab/> <text:s text:c="6"/></text:span><text:span text:style-name="Source_20_Text"><text:span text:style-name="T221">struct</text:span></text:span><text:span text:style-name="Source_20_Text"><text:span text:style-name="T220"> </text:span></text:span><text:span text:style-name="Source_20_Text"><text:span text:style-name="T221">tm</text:span></text:span><text:span text:style-name="T220"> format</text:span><text:span text:style-name="T220"><text:note text:id="ftn19" text:note-class="footnote"><text:note-citation>17</text:note-citation><text:note-body><text:p text:style-name="P140">This structure represents <text:span text:style-name="Emphasis">local time</text:span>, meaning results depend on the system timezone and daylight saving rules</text:p></text:note-body></text:note></text:span></text:p>
      <text:p text:style-name="Standard"><text:span text:style-name="Strong_20_Emphasis"><text:span text:style-name="T220">Line 25.</text:span></text:span><text:span text:style-name="T220"> Converts the populated </text:span><text:span text:style-name="Source_20_Text"><text:span text:style-name="T221">struct</text:span></text:span><text:span text:style-name="Source_20_Text"><text:span text:style-name="T220"> </text:span></text:span><text:span text:style-name="Source_20_Text"><text:span text:style-name="T221">tm</text:span></text:span><text:span text:style-name="T220"> into a </text:span><text:span text:style-name="Source_20_Text"><text:span text:style-name="T221">time_t</text:span></text:span><text:span text:style-name="T220"> (epoch timestamp) using </text:span><text:span text:style-name="Source_20_Text"><text:span text:style-name="T221">mktime</text:span></text:span><text:span text:style-name="Source_20_Text"><text:span text:style-name="T221"><text:note text:id="ftn20" text:note-class="footnote"><text:note-citation>18</text:note-citation><text:note-body><text:p text:style-name="P144"><text:span text:style-name="Source_20_Text"><text:span text:style-name="T222">mktime</text:span></text:span> interprets the input as local time and may normalize invalid date values </text:p></text:note-body></text:note></text:span></text:span><text:span text:style-name="T223"><text:tab/> <text:s text:c="2"/></text:span></text:p>
      <text:p text:style-name="Standard"><text:soft-page-break/><text:span text:style-name="Strong_20_Emphasis"><text:span text:style-name="T220">Line 30–31.</text:span></text:span><text:span text:style-name="T220"> Assigns the computed epoch time (</text:span><text:span text:style-name="Source_20_Text"><text:span text:style-name="T221">new_epoch</text:span></text:span><text:span text:style-name="T220">) to </text:span><text:span text:style-name="Source_20_Text"><text:span text:style-name="T221">new_time.tv_sec</text:span></text:span><text:span text:style-name="T220"> and <text:tab/> <text:s text:c="2"/><text:tab/> <text:s text:c="7"/>explicitly sets microseconds to </text:span><text:span text:style-name="Source_20_Text"><text:span text:style-name="T221">0</text:span></text:span><text:span text:style-name="T220">. This prepares the structure for use with <text:tab/> <text:s text:c="2"/><text:tab/> <text:s text:c="2"/><text:tab/> <text:s text:c="7"/></text:span><text:span text:style-name="Source_20_Text"><text:span text:style-name="T221">settimeofday</text:span></text:span><text:span text:style-name="T220">, which requires both seconds and microseconds fields</text:span></text:p>
      <text:p text:style-name="Standard"><text:span text:style-name="Strong_20_Emphasis"><text:span text:style-name="T220">Line 32–35.</text:span></text:span><text:span text:style-name="T220"> Attempts to set the system time using </text:span><text:span text:style-name="Source_20_Text"><text:span text:style-name="T221">settimeofday</text:span></text:span><text:span text:style-name="T220">. This operation typically <text:tab/><text:tab/> <text:s text:c="8"/>requires root/administrator privileges; otherwise, it will fail with </text:span><text:span text:style-name="Source_20_Text"><text:span text:style-name="T221">EPERM</text:span></text:span><text:span text:style-name="T220">. It directly <text:tab/> <text:s text:c="8"/>modifies the kernel clock, so it affects the entire system</text:span><text:span text:style-name="T220"><text:note text:id="ftn21" text:note-class="footnote"><text:note-citation>19</text:note-citation><text:note-body><text:p text:style-name="P140"><text:span text:style-name="Source_20_Text"><text:span text:style-name="T75">settimeofday</text:span></text:span> is considered obsolete on some systems in favor of <text:span text:style-name="Source_20_Text"><text:span text:style-name="T75">clock_settime</text:span></text:span></text:p></text:note-body></text:note></text:span></text:p>
      <text:p text:style-name="Standard"><text:span text:style-name="Strong_20_Emphasis"><text:span text:style-name="T220">Line 36–38.</text:span></text:span><text:span text:style-name="T220"> Retrieves the updated system time again using </text:span><text:span text:style-name="Source_20_Text"><text:span text:style-name="T221">gettimeofday</text:span></text:span><text:span text:style-name="T220"> to verify the change. <text:tab/> <text:s text:c="6"/>The new seconds value is converted to a human-readable string using </text:span><text:span text:style-name="Source_20_Text"><text:span text:style-name="T221">ctime</text:span></text:span></text:p>
      <text:p text:style-name="P145"/>
      <text:p text:style-name="P146"><text:span text:style-name="T224">We execute the program </text:span><text:span text:style-name="T225">using</text:span><text:span text:style-name="T224"> </text:span><text:span text:style-name="T226">sudo</text:span></text:p>
      <text:p text:style-name="P147"/>
      <table:table table:name="Table150" table:style-name="Table150">
        <table:table-column table:style-name="Table150.A"/>
        <table:table-row>
          <table:table-cell table:style-name="Table150.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202">sudo ./setnewtime 2025 5 3 17 21 10</text:span></text:p>
            <text:p text:style-name="P148"/>
            <text:p text:style-name="P148">Current system time: Thu Apr <text:s/>3 17:33:07 2025</text:p>
            <text:p text:style-name="P148">New system time: Sat May <text:s/>3 17:21:10 2025</text:p>
            <text:p text:style-name="P148"/>
            <text:p text:style-name="P45"><text:span text:style-name="T80">[</text:span><text:a xlink:type="simple" xlink:href="mailto:linux@fidir" text:style-name="Internet_20_link" text:visited-style-name="Visited_20_Internet_20_Link"><text:span text:style-name="T81">linux@fidir</text:span></text:a><text:span text:style-name="T80">] </text:span><text:span text:style-name="T227">date</text:span></text:p>
            <text:p text:style-name="P45">Sat May <text:s/>3 17:2<text:span text:style-name="T227">1</text:span>:<text:span text:style-name="T227">13</text:span> +07 2025</text:p>
          </table:table-cell>
        </table:table-row>
      </table:table>
      <text:p text:style-name="P149"/>
      <text:p text:style-name="P150">There are some things to consider: </text:p>
      <text:p text:style-name="P151"/>
      <text:list text:style-name="L5">
        <text:list-item>
          <text:p text:style-name="P152">If we run the program without <text:span text:style-name="Source_20_Text"><text:span text:style-name="T75">sudo</text:span></text:span>, we get ”<text:span text:style-name="Source_20_Text"><text:span text:style-name="T75">Operation not permitted</text:span></text:span>”.<text:line-break/>This happens because changing the system clock via <text:span text:style-name="Source_20_Text"><text:span text:style-name="T75">settimeofday</text:span></text:span> is a <text:span text:style-name="Strong_20_Emphasis"><text:span text:style-name="T220">privileged operation</text:span></text:span></text:p>
          <text:p text:style-name="P153"/>
        </text:list-item>
        <text:list-item>
          <text:p text:style-name="P152">The field <text:span text:style-name="Source_20_Text"><text:span text:style-name="T75">tm_year</text:span></text:span> of the <text:span text:style-name="Source_20_Text"><text:span text:style-name="T75">tm</text:span></text:span> <text:span text:style-name="T228">structure </text:span>must be expressed as the number of years since 1900. This is part of the historical POSIX/C design of <text:span text:style-name="Source_20_Text"><text:span text:style-name="T75">struct</text:span></text:span><text:span text:style-name="Source_20_Text"> </text:span><text:span text:style-name="Source_20_Text"><text:span text:style-name="T75">tm</text:span></text:span>, where: <text:span text:style-name="Source_20_Text"><text:span text:style-name="T75">tm_year = actual_year – 1900</text:span></text:span><text:span text:style-name="Source_20_Text">. </text:span>This is why we subtract 1900 from the user-provided year to correctly map it into the expected internal representation used by <text:span text:style-name="Source_20_Text"><text:span text:style-name="T75">mktime</text:span></text:span></text:p>
          <text:p text:style-name="P152"><text:span text:style-name="Source_20_Text"/></text:p>
        </text:list-item>
        <text:list-item>
          <text:p text:style-name="P152">Months in <text:span text:style-name="Source_20_Text"><text:span text:style-name="T75">tm</text:span></text:span> are zero-indexed (January = 0, December = 11). This is another legacy design choice in the <text:span text:style-name="T68">C time API</text:span>. Therefore <text:bookmark text:name="code-block-viewer"/><text:span text:style-name="Source_20_Text"><text:span text:style-name="T75">tm_mon = actual_month - 1</text:span></text:span></text:p>
          <text:p text:style-name="P152"><text:span text:style-name="Source_20_Text"><text:span text:style-name="T229">is required to align user-friendly input (1–12) with the internal representation expected by </text:span></text:span><text:span text:style-name="Source_20_Text"><text:span text:style-name="T75">mktime</text:span></text:span></text:p>
          <text:p text:style-name="P152"><text:span text:style-name="Source_20_Text"/></text:p>
        </text:list-item>
        <text:list-item>
          <text:p text:style-name="P152">If NTP (Network Time Protocol) is active on the system, the time may automatically be corrected after running the program. Modern Linux systems often run a time synchronization service (e.g., <text:span text:style-name="Source_20_Text"><text:span text:style-name="T75">systemd-timesyncd</text:span></text:span>, <text:span text:style-name="Source_20_Text"><text:span text:style-name="T75">ntpd</text:span></text:span>, or <text:span text:style-name="Source_20_Text"><text:span text:style-name="T75">chronyd</text:span></text:span>). These services periodically adjust the system clock to match external time servers. As a result, manual changes made by <text:span text:style-name="Source_20_Text"><text:span text:style-name="T75">settimeofday</text:span></text:span> can be: quickly overwritten, or <text:s/>gradually corrected (slewed back to the correct time, depending on configuration)</text:p>
          <text:p text:style-name="P153"/>
        </text:list-item>
        <text:list-item>
          <text:p text:style-name="P152">The program is <text:span text:style-name="T68">not thread-safe.</text:span> Several functions used are inherently unsafe in multithreaded environments: <text:span text:style-name="Source_20_Text"><text:span text:style-name="T75">ctime</text:span></text:span> returns a pointer to a <text:span text:style-name="Strong_20_Emphasis"><text:span text:style-name="T230">static internal buffer</text:span></text:span>, which can be overwritten by concurrent calls. <text:s/><text:span text:style-name="Source_20_Text"><text:span text:style-name="T75">mktime</text:span></text:span> may also rely on shared internal timezone state. <text:s/>Global time-related state (like timezone settings) may be modified implicitly.</text:p>
          <text:p text:style-name="P152"><text:span text:style-name="Source_20_Text"/></text:p>
        </text:list-item>
      </text:list>
      <text:p text:style-name="P154"/>
      <text:p text:style-name="P155"/>
      <text:p text:style-name="P156"><text:soft-page-break/><text:span text:style-name="T231">III.1.</text:span><text:span text:style-name="T232">5</text:span><text:span text:style-name="T231"> </text:span>Time conversion functions</text:p>
      <text:p text:style-name="P157"/>
      <text:p text:style-name="P146"><text:span text:style-name="T233">The </text:span><text:span text:style-name="Source_20_Text"><text:span text:style-name="T234">mktime</text:span></text:span><text:span text:style-name="T233"> function converts a broken-down time structure (</text:span><text:span text:style-name="Source_20_Text"><text:span text:style-name="T234">struct</text:span></text:span><text:span text:style-name="Source_20_Text"><text:span text:style-name="T233"> </text:span></text:span><text:span text:style-name="Source_20_Text"><text:span text:style-name="T234">tm</text:span></text:span><text:span text:style-name="T233">) into a calendar time representation (</text:span><text:span text:style-name="Source_20_Text"><text:span text:style-name="T234">time_t</text:span></text:span><text:span text:style-name="T233">), expressed as seconds since the Unix epoch. It ignores the values provided in the </text:span><text:span text:style-name="Source_20_Text"><text:span text:style-name="T234">tm_wday</text:span></text:span><text:span text:style-name="T233"> (day of the week) and </text:span><text:span text:style-name="Source_20_Text"><text:span text:style-name="T234">tm_yday</text:span></text:span><text:span text:style-name="T233"> (day of the year) fields, since these can be automatically computed from the other fields (year, month, and day).</text:span></text:p>
      <text:p text:style-name="P146"><text:span text:style-name="T233">The </text:span><text:span text:style-name="Source_20_Text"><text:span text:style-name="T234">tm_isdst</text:span></text:span><text:span text:style-name="T233"> field indicates whether Daylight Saving Time (DST) is in effect for the given time:</text:span></text:p>
      <text:p text:style-name="P157"/>
      <text:list text:style-name="L6">
        <text:list-item>
          <text:p text:style-name="P158"><text:span text:style-name="T230">A </text:span><text:span text:style-name="Strong_20_Emphasis"><text:span text:style-name="T230">positive value</text:span></text:span><text:span text:style-name="T230"> means DST is in effect</text:span></text:p>
        </text:list-item>
        <text:list-item>
          <text:p text:style-name="P158"><text:span text:style-name="T235">A value of </text:span><text:span text:style-name="Strong_20_Emphasis"><text:span text:style-name="T235">0</text:span></text:span><text:span text:style-name="T235"> means DST is not in effect</text:span></text:p>
        </text:list-item>
        <text:list-item>
          <text:p text:style-name="P158"><text:span text:style-name="T230">A </text:span><text:span text:style-name="Strong_20_Emphasis"><text:span text:style-name="T230">negative value</text:span></text:span><text:span text:style-name="T230"> tells </text:span><text:span text:style-name="Source_20_Text"><text:span text:style-name="T236">mktime</text:span></text:span><text:span text:style-name="T230"> to automatically determine whether DST should be applied based on the system’s timezone rules</text:span></text:p>
        </text:list-item>
      </text:list>
      <text:list text:style-name="L7">
        <text:list-header>
          <text:p text:style-name="P159"><text:s/></text:p>
        </text:list-header>
      </text:list>
      <text:p text:style-name="P146"><text:span text:style-name="T233">When </text:span><text:span text:style-name="Source_20_Text"><text:span text:style-name="T234">tm_isdst</text:span></text:span><text:span text:style-name="T233"> is set to </text:span><text:span text:style-name="Source_20_Text"><text:span text:style-name="T234">-1</text:span></text:span><text:span text:style-name="T233">, the function consults the system’s timezone database and adjusts the resulting </text:span><text:span text:style-name="Source_20_Text"><text:span text:style-name="T234">time_t</text:span></text:span><text:span text:style-name="T233"> value accordingly if DST applies.</text:span></text:p>
      <text:p text:style-name="P160"/>
      <text:p text:style-name="P161">The <text:span text:style-name="T237">following functions</text:span><text:note text:id="ftn22" text:note-class="footnote"><text:note-citation>20</text:note-citation><text:note-body><text:p text:style-name="P162"><text:span text:style-name="T238">See the </text:span><text:span text:style-name="T239">ctime(3)</text:span><text:span text:style-name="T240"> man</text:span><text:span text:style-name="T241">ual</text:span><text:span text:style-name="T240"> page</text:span></text:p></text:note-body></text:note> <text:span text:style-name="T237">can be used to </text:span>transform date and time to broken-down time or ASCI<text:span text:style-name="T237">I.</text:span></text:p>
      <text:p text:style-name="P161"/>
      <table:table table:name="Table151" table:style-name="Table151">
        <table:table-column table:style-name="Table151.A"/>
        <table:table-row>
          <table:table-cell table:style-name="Table151.A1" office:value-type="string">
            <text:p text:style-name="P67"><text:span text:style-name="T115">#include </text:span><text:span text:style-name="T116">&lt;time.h&gt;</text:span></text:p>
            <text:p text:style-name="P58"/>
            <text:p text:style-name="P64"><text:span text:style-name="T115">char</text:span> *<text:span text:style-name="T126">asctime</text:span>(<text:span text:style-name="T115">const</text:span> <text:span text:style-name="T115">struct</text:span> tm <text:span text:style-name="T68">*tm</text:span>);</text:p>
            <text:p text:style-name="P59"><text:span text:style-name="T103">char</text:span><text:span text:style-name="T104"> *</text:span><text:span text:style-name="T105">asctime_r</text:span><text:span text:style-name="T104">(</text:span><text:span text:style-name="T103">const</text:span><text:span text:style-name="T104"> </text:span><text:span text:style-name="T103">struct</text:span><text:span text:style-name="T104"> tm *</text:span><text:span text:style-name="T103">restrict</text:span><text:span text:style-name="T104"> </text:span><text:span text:style-name="T106">tm</text:span><text:span text:style-name="T104">, </text:span><text:span text:style-name="T103">char</text:span><text:span text:style-name="T104"> </text:span><text:span text:style-name="T106">buf</text:span><text:span text:style-name="T104">[</text:span><text:span text:style-name="T103">restrict</text:span><text:span text:style-name="T104"> </text:span><text:span text:style-name="T128">26</text:span><text:span text:style-name="T104">]);</text:span></text:p>
            <text:p text:style-name="P58"/>
            <text:p text:style-name="P59"><text:span text:style-name="T103">char</text:span><text:span text:style-name="T104"> *</text:span><text:span text:style-name="T105">ctime</text:span><text:span text:style-name="T104">(</text:span><text:span text:style-name="T103">const</text:span><text:span text:style-name="T104"> </text:span><text:span text:style-name="T103">time_t</text:span><text:span text:style-name="T104"> *</text:span><text:span text:style-name="T106">timep</text:span><text:span text:style-name="T104">);</text:span></text:p>
            <text:p text:style-name="P59"><text:span text:style-name="T103">char</text:span><text:span text:style-name="T104"> *</text:span><text:span text:style-name="T105">ctime_r</text:span><text:span text:style-name="T104">(</text:span><text:span text:style-name="T103">const</text:span><text:span text:style-name="T104"> </text:span><text:span text:style-name="T103">time_t</text:span><text:span text:style-name="T104"> *</text:span><text:span text:style-name="T103">restrict</text:span><text:span text:style-name="T104"> </text:span><text:span text:style-name="T106">timep</text:span><text:span text:style-name="T104">, </text:span><text:span text:style-name="T103">char</text:span><text:span text:style-name="T104"> </text:span><text:span text:style-name="T106">buf</text:span><text:span text:style-name="T104">[</text:span><text:span text:style-name="T103">restrict</text:span><text:span text:style-name="T104"> </text:span><text:span text:style-name="T128">26</text:span><text:span text:style-name="T104">]);</text:span></text:p>
            <text:p text:style-name="P58"/>
            <text:p text:style-name="P59"><text:span text:style-name="T103">struct</text:span><text:span text:style-name="T104"> </text:span><text:span text:style-name="T103">tm</text:span><text:span text:style-name="T104"> *</text:span><text:span text:style-name="T105">gmtime</text:span><text:span text:style-name="T104">(</text:span><text:span text:style-name="T103">const</text:span><text:span text:style-name="T104"> </text:span><text:span text:style-name="T103">time_t</text:span><text:span text:style-name="T104"> *</text:span><text:span text:style-name="T106">timep</text:span><text:span text:style-name="T104">);</text:span></text:p>
            <text:p text:style-name="P59"><text:span text:style-name="T103">struct</text:span><text:span text:style-name="T104"> </text:span><text:span text:style-name="T103">tm</text:span><text:span text:style-name="T104"> *</text:span><text:span text:style-name="T105">gmtime_r</text:span><text:span text:style-name="T104">(</text:span><text:span text:style-name="T103">const</text:span><text:span text:style-name="T104"> </text:span><text:span text:style-name="T103">time_t</text:span><text:span text:style-name="T104"> *</text:span><text:span text:style-name="T103">restrict</text:span><text:span text:style-name="T104"> </text:span><text:span text:style-name="T106">timep</text:span><text:span text:style-name="T104">, </text:span><text:span text:style-name="T103">struct</text:span><text:span text:style-name="T104"> tm *</text:span><text:span text:style-name="T103">restrict</text:span><text:span text:style-name="T104"> </text:span></text:p>
            <text:p text:style-name="P59"><text:span text:style-name="T106"><text:s text:c="20"/>result</text:span><text:span text:style-name="T104">);</text:span></text:p>
            <text:p text:style-name="P58"/>
            <text:p text:style-name="P59"><text:span text:style-name="T103">struct</text:span><text:span text:style-name="T104"> </text:span><text:span text:style-name="T103">tm</text:span><text:span text:style-name="T104"> *</text:span><text:span text:style-name="T105">localtime</text:span><text:span text:style-name="T104">(</text:span><text:span text:style-name="T103">const</text:span><text:span text:style-name="T104"> </text:span><text:span text:style-name="T103">time_t</text:span><text:span text:style-name="T104"> *</text:span><text:span text:style-name="T106">timep</text:span><text:span text:style-name="T104">);</text:span></text:p>
            <text:p text:style-name="P59"><text:span text:style-name="T103">struct</text:span><text:span text:style-name="T104"> </text:span><text:span text:style-name="T103">tm</text:span><text:span text:style-name="T104"> *</text:span><text:span text:style-name="T105">localtime_r</text:span><text:span text:style-name="T104">(</text:span><text:span text:style-name="T103">const</text:span><text:span text:style-name="T104"> </text:span><text:span text:style-name="T103">time_t</text:span><text:span text:style-name="T104"> *</text:span><text:span text:style-name="T103">restrict</text:span><text:span text:style-name="T104"> </text:span><text:span text:style-name="T106">timep</text:span><text:span text:style-name="T104">, </text:span><text:span text:style-name="T103">struct</text:span><text:span text:style-name="T104"> tm *</text:span><text:span text:style-name="T103">restrict</text:span><text:span text:style-name="T104"> </text:span></text:p>
            <text:p text:style-name="P59"><text:span text:style-name="T104"><text:s text:c="23"/></text:span><text:span text:style-name="T106">result</text:span><text:span text:style-name="T104">);</text:span></text:p>
            <text:p text:style-name="P58"/>
            <text:p text:style-name="P59"><text:span text:style-name="T103">time_t</text:span><text:span text:style-name="T104"> </text:span><text:span text:style-name="T105">mktime</text:span><text:span text:style-name="T104">(</text:span><text:span text:style-name="T103">struct</text:span><text:span text:style-name="T104"> tm </text:span><text:span text:style-name="T106">*tm</text:span><text:span text:style-name="T104">);</text:span></text:p>
            <text:p text:style-name="P64"/>
            <text:p text:style-name="P163">Return: </text:p>
            <text:p text:style-name="P163"><text:s/>gmtime and localtime return a pointer to a struct tm, NULL on error</text:p>
            <text:p text:style-name="P163"><text:s/>gmtime_r and localtime_r return the address of the structure pointed to by <text:s/></text:p>
            <text:p text:style-name="P163"><text:s text:c="10"/>result, NULL on error</text:p>
            <text:p text:style-name="P163"><text:s/>asctime and ctime return a pointer to a string, NULL on error</text:p>
            <text:p text:style-name="P163"><text:s/>asctime_r and ctime_r return a pointer to the string pointed to by buf, NULL </text:p>
            <text:p text:style-name="P163"><text:s text:c="11"/>on error</text:p>
            <text:p text:style-name="P163"><text:s/>mktime returns a calendar time (seconds since Epoch) or -1 if error <text:s text:c="6"/></text:p>
          </table:table-cell>
        </table:table-row>
      </table:table>
      <text:p text:style-name="P161"/>
      <text:p text:style-name="P146"><text:span text:style-name="T242">The functions </text:span><text:span text:style-name="T226">ctime</text:span><text:span text:style-name="T242">, </text:span><text:span text:style-name="T226">gmtime</text:span><text:span text:style-name="T242"> and </text:span><text:span text:style-name="T226">localtime</text:span><text:span text:style-name="T242">, take an argument of type </text:span><text:span text:style-name="T226">time_t</text:span><text:span text:style-name="T242"> representing a calendar time, when interpreted as an absolute value, it represent the seconds passed since Epoch.</text:span></text:p>
      <text:p text:style-name="P146"><text:span text:style-name="T226">asctime</text:span><text:span text:style-name="T242"> and </text:span><text:span text:style-name="T226">mktime</text:span><text:span text:style-name="T242"> take an argument representing broken-down time stored in a structure of type </text:span><text:span text:style-name="T226">tm</text:span><text:span text:style-name="T242">. </text:span></text:p>
      <text:p text:style-name="P146"><text:soft-page-break/><text:span text:style-name="T242">A call to </text:span><text:span text:style-name="T226">ctime</text:span><text:span text:style-name="T242"> is equivalent to call </text:span><text:span text:style-name="T226">asctime(localtime(t))</text:span><text:span text:style-name="T242"> and returns a null-terminated string representing the current time. </text:span></text:p>
      <text:p text:style-name="P146"><text:span text:style-name="T243">The </text:span><text:span text:style-name="T226">gmtime</text:span><text:span text:style-name="T242"> </text:span><text:span text:style-name="T243">function </text:span><text:span text:style-name="T242">converts the calendar time </text:span><text:span text:style-name="T226">timep</text:span><text:span text:style-name="T242"> to broken-down representation expressed in UTC. </text:span></text:p>
      <text:p text:style-name="P146"><text:span text:style-name="T226">gmtime_r</text:span><text:span text:style-name="T242"> works like </text:span><text:span text:style-name="T226">gmtime</text:span><text:span text:style-name="T242"> but stores the value in an user-supplied structure passed as second argument.</text:span></text:p>
      <text:p text:style-name="P146"><text:span text:style-name="T226">localtime</text:span><text:span text:style-name="T242"> converts the calendar time </text:span><text:span text:style-name="T226">timep</text:span><text:span text:style-name="T242"> to broken-down time representation, </text:span><text:span text:style-name="T243">expressed relative to the </text:span><text:span text:style-name="T242">user timezone. This function also sets the external variables </text:span><text:span text:style-name="T226">tzname</text:span><text:span text:style-name="T242">, </text:span><text:span text:style-name="T226">timezone</text:span><text:span text:style-name="T242"> and </text:span><text:span text:style-name="T226">daylight</text:span><text:span text:style-name="T242">.</text:span></text:p>
      <text:p text:style-name="P146"><text:span text:style-name="T226">localtime_r</text:span><text:span text:style-name="T242"> does the same but stores the result in a user-supplied structure passed as second argument.</text:span></text:p>
      <text:p text:style-name="P146"><text:span text:style-name="T226">asctime</text:span><text:span text:style-name="T242"> converts the broken-down time value </text:span><text:span text:style-name="T226">tm</text:span><text:span text:style-name="T242"> into a string with the same format as </text:span><text:span text:style-name="T226">ctime</text:span><text:span text:style-name="T242">. </text:span></text:p>
      <text:p text:style-name="P146"><text:span text:style-name="T226">asctime_r</text:span><text:span text:style-name="T242"> does the same but stores the result in an user-supplied structure passed as second argument. </text:span></text:p>
      <text:p text:style-name="P146"><text:span text:style-name="T242">The </text:span><text:span text:style-name="T226">mktime</text:span><text:span text:style-name="T242"> function modifies the fields </text:span><text:span text:style-name="T226">tm_wday</text:span><text:span text:style-name="T242"> and </text:span><text:span text:style-name="T226">tm_yday</text:span><text:span text:style-name="T242"> calculating them based on the values of the other fields.</text:span><text:span text:style-name="T243"> </text:span><text:span text:style-name="T226">mktime</text:span><text:span text:style-name="T243"> </text:span><text:span text:style-name="T244">also </text:span><text:span text:style-name="T243">sets the external variables </text:span><text:span text:style-name="T226">tzname</text:span><text:span text:style-name="T243">, </text:span><text:span text:style-name="T226">timezone</text:span><text:span text:style-name="T243"> and </text:span><text:span text:style-name="T226">daylight</text:span><text:span text:style-name="T243">. </text:span></text:p>
      <text:p text:style-name="P164"/>
      <text:p text:style-name="P146"><text:span text:style-name="T245">The variables </text:span><text:span text:style-name="T226">tzname</text:span><text:span text:style-name="T245">, </text:span><text:span text:style-name="T226">timezone</text:span><text:span text:style-name="T245"> and </text:span><text:span text:style-name="T226">daylight</text:span><text:span text:style-name="T245"> are usually initialized by the function </text:span><text:span text:style-name="T226">tzset</text:span><text:span text:style-name="T245"><text:note text:id="ftn23" text:note-class="footnote"><text:note-citation>21</text:note-citation><text:note-body><text:p text:style-name="P165"><text:span text:style-name="T246">See the </text:span><text:span text:style-name="T247">tzset(3)</text:span><text:span text:style-name="T248"> manual page</text:span></text:p></text:note-body></text:note></text:span><text:span text:style-name="T245">. </text:span><text:span text:style-name="T249">This function is automatically called by the </text:span><text:span text:style-name="T250">time conversion functions</text:span><text:span text:style-name="T249"> that depend on the timezone. <text:s/>The variables are defined </text:span><text:span text:style-name="T251">as folllows.</text:span></text:p>
      <text:p text:style-name="P166"/>
      <table:table table:name="Table152" table:style-name="Table152">
        <table:table-column table:style-name="Table152.A"/>
        <table:table-row>
          <table:table-cell table:style-name="Table152.A1" office:value-type="string">
            <text:p text:style-name="P67"><text:span text:style-name="T115">#include </text:span><text:span text:style-name="T116">&lt;time.h&gt;</text:span></text:p>
            <text:p text:style-name="P58"/>
            <text:p text:style-name="P64"><text:span text:style-name="T115">void</text:span> tzset(<text:span text:style-name="T115">void</text:span>);</text:p>
            <text:p text:style-name="P58"/>
            <text:p text:style-name="P64"><text:span text:style-name="T115">extern</text:span> <text:span text:style-name="T115">char</text:span> *tzname[<text:span text:style-name="T127">2</text:span>];</text:p>
            <text:p text:style-name="P64"><text:span text:style-name="T115">extern</text:span> <text:span text:style-name="T115">long</text:span> timezone;</text:p>
            <text:p text:style-name="P57"><text:span text:style-name="T101">extern</text:span><text:span text:style-name="T124"> </text:span><text:span text:style-name="T101">int</text:span><text:span text:style-name="T124"> daylight;</text:span></text:p>
          </table:table-cell>
        </table:table-row>
      </table:table>
      <text:p text:style-name="P166"/>
      <text:p text:style-name="P146"><text:span text:style-name="T226">tzset</text:span><text:span text:style-name="T252"> initializes </text:span><text:span text:style-name="T226">tzname</text:span><text:span text:style-name="T252"> from the </text:span><text:span text:style-name="T226">TZ</text:span><text:span text:style-name="T252"> environment variable, if </text:span><text:span text:style-name="T226">TZ</text:span><text:span text:style-name="T252"> is not defined in the environment the system timezone is used. The system timezone is configured copying or linking a file in the </text:span><text:span text:style-name="T226">tzfile</text:span><text:span text:style-name="T226"><text:note text:id="ftn24" text:note-class="footnote"><text:note-citation>22</text:note-citation><text:note-body><text:p text:style-name="P167"><text:span text:style-name="T253">See the </text:span><text:span text:style-name="T254">tzfile(5)</text:span><text:span text:style-name="T248"> manual page</text:span></text:p></text:note-body></text:note></text:span><text:span text:style-name="T252"> format to the file </text:span><text:span text:style-name="T226">/etc/localtime</text:span><text:span text:style-name="T252">. If </text:span><text:span text:style-name="T226">TZ</text:span><text:span text:style-name="T252"> is in the environment but it has no value then UTC is used. The </text:span><text:span text:style-name="T226">tzfile</text:span><text:span text:style-name="T252"> format is used to store the timezone data, the files for the several timezones are in the folder </text:span><text:span text:style-name="T226">/usr/share/zoneinfo</text:span><text:span text:style-name="T252">.</text:span></text:p>
      <text:p text:style-name="P168"/>
      <table:table table:name="Table153" table:style-name="Table153">
        <table:table-column table:style-name="Table153.A"/>
        <table:table-row table:style-name="Table153.1">
          <table:table-cell table:style-name="Table153.A1" office:value-type="string">
            <text:p text:style-name="P45"><text:span text:style-name="T77">[</text:span><text:a xlink:type="simple" xlink:href="mailto:linux@fidir" text:style-name="Internet_20_link" text:visited-style-name="Visited_20_Internet_20_Link"><text:span text:style-name="T78">linux@fidir</text:span></text:a><text:span text:style-name="T77">] </text:span><text:span text:style-name="T255">ls /usr/share/zoneinfo</text:span></text:p>
            <text:p text:style-name="P169"><text:span text:style-name="T182">Africa</text:span> <text:s text:c="5"/><text:span text:style-name="T256">Cuba</text:span> <text:s text:c="4"/><text:span text:style-name="T256">GMT+0</text:span> <text:s text:c="5"/><text:span text:style-name="T256">Kwajalein</text:span> <text:s/><text:span text:style-name="T256">Poland</text:span> <text:s text:c="4"/><text:span text:style-name="T256">Zulu</text:span></text:p>
            <text:p text:style-name="P170"><text:span text:style-name="T182">America</text:span> <text:s text:c="4"/><text:span text:style-name="T256">EET</text:span> <text:s text:c="5"/><text:span text:style-name="T256">GMT-0</text:span> <text:s text:c="5"/><text:span text:style-name="T256">Libya</text:span> <text:s text:c="5"/><text:span text:style-name="T256">Portugal</text:span> <text:s text:c="2"/>iso3166.tab</text:p>
            <text:p text:style-name="P170"><text:span text:style-name="T182">Antarctica</text:span> <text:s/><text:span text:style-name="T256">EST</text:span> <text:s text:c="5"/><text:span text:style-name="T256">GMT0</text:span> <text:s text:c="6"/><text:span text:style-name="T256">MET</text:span> <text:s text:c="7"/><text:span text:style-name="T256">ROC</text:span> <text:s text:c="7"/>leap-seconds.list</text:p>
            <text:p text:style-name="P170"><text:span text:style-name="T182">Arctic</text:span> <text:s text:c="5"/><text:span text:style-name="T256">EST5EDT</text:span> <text:s/><text:span text:style-name="T256">Greenwich</text:span> <text:s/><text:span text:style-name="T256">MST</text:span> <text:s text:c="7"/><text:span text:style-name="T256">ROK</text:span> <text:s text:c="7"/>leapseconds</text:p>
            <text:p text:style-name="P170"><text:span text:style-name="T182">Asia</text:span> <text:s text:c="7"/><text:span text:style-name="T256">Egypt</text:span> <text:s text:c="3"/><text:span text:style-name="T256">HST</text:span> <text:s text:c="7"/><text:span text:style-name="T256">MST7MDT</text:span> <text:s text:c="3"/><text:span text:style-name="T256">Singapore</text:span> <text:s/><text:span text:style-name="T256">localtime</text:span></text:p>
            <text:p text:style-name="P170"><text:span text:style-name="T182">Atlantic</text:span> <text:s text:c="3"/><text:span text:style-name="T256">Eire</text:span> <text:s text:c="4"/><text:span text:style-name="T256">Hongkong</text:span> <text:s text:c="2"/><text:span text:style-name="T182">Mexico</text:span> <text:s text:c="4"/><text:span text:style-name="T256">Turkey</text:span> <text:s text:c="4"/><text:span text:style-name="T256">posixrules</text:span></text:p>
            <text:p text:style-name="P170"><text:span text:style-name="T182">Australia</text:span> <text:s text:c="2"/><text:span text:style-name="T182">Etc</text:span> <text:s text:c="5"/><text:span text:style-name="T256">Iceland</text:span> <text:s text:c="3"/><text:span text:style-name="T256">NZ</text:span> <text:s text:c="8"/><text:span text:style-name="T256">UCT</text:span> <text:s text:c="7"/><text:span text:style-name="T182">right</text:span></text:p>
            <text:p text:style-name="P170"><text:span text:style-name="T182">Brazil</text:span> <text:s text:c="5"/><text:span text:style-name="T182">Europe</text:span> <text:s text:c="2"/><text:span text:style-name="T182">Indian</text:span> <text:s text:c="4"/><text:span text:style-name="T256">NZ-CHAT</text:span> <text:s text:c="3"/><text:span text:style-name="T182">US</text:span> <text:s text:c="8"/>tzdata.zi</text:p>
            <text:p text:style-name="P170"><text:span text:style-name="T256">CET</text:span> <text:s text:c="8"/>Factory <text:s/><text:span text:style-name="T256">Iran</text:span> <text:s text:c="6"/><text:span text:style-name="T256">Navajo</text:span> <text:s text:c="4"/><text:span text:style-name="T256">UTC</text:span> <text:s text:c="7"/>zone.tab</text:p>
            <text:p text:style-name="P170"><text:span text:style-name="T256">CST6CDT</text:span> <text:s text:c="4"/><text:span text:style-name="T256">GB</text:span> <text:s text:c="6"/><text:span text:style-name="T256">Israel</text:span> <text:s text:c="4"/><text:span text:style-name="T256">PRC</text:span> <text:s text:c="7"/><text:span text:style-name="T256">Universal</text:span> <text:s/>zone1970.tab</text:p>
            <text:p text:style-name="P170"><text:span text:style-name="T182">Canada</text:span> <text:s text:c="5"/><text:span text:style-name="T256">GB-Eire</text:span> <text:s/><text:span text:style-name="T256">Jamaica</text:span> <text:s text:c="3"/><text:span text:style-name="T256">PST8PDT</text:span> <text:s text:c="3"/><text:span text:style-name="T256">W-SU</text:span> <text:s text:c="6"/>zonenow.tab</text:p>
            <text:p text:style-name="P171"><text:span text:style-name="T257">Chile</text:span> <text:s text:c="6"/><text:span text:style-name="T258">GMT</text:span> <text:s text:c="5"/><text:span text:style-name="T258">Japan</text:span> <text:s text:c="5"/><text:span text:style-name="T257">Pacific</text:span> <text:s text:c="3"/><text:span text:style-name="T258">WET</text:span></text:p>
          </table:table-cell>
        </table:table-row>
      </table:table>
      <text:p text:style-name="P172"><text:soft-page-break/><text:span text:style-name="T259">III.1.</text:span><text:span text:style-name="T260">6</text:span><text:span text:style-name="T259"> </text:span><text:span text:style-name="T261">Formatting </text:span><text:span text:style-name="T262">date and time: </text:span><text:span text:style-name="T263">strftime</text:span><text:span text:style-name="T261"> and </text:span><text:span text:style-name="T263">strptime</text:span></text:p>
      <text:p text:style-name="Standard"/>
      <text:p text:style-name="Standard"><text:span text:style-name="T252">When working with date and time, it is often necessary to represent them in a specific format. For this purpose, the functions </text:span><text:span text:style-name="Source_20_Text"><text:span text:style-name="T264">strftime</text:span></text:span><text:span text:style-name="T252"> and </text:span><text:span text:style-name="Source_20_Text"><text:span text:style-name="T264">strptime</text:span></text:span><text:span text:style-name="Source_20_Text"><text:span text:style-name="T252"><text:note text:id="ftn25" text:note-class="footnote"><text:note-citation>23</text:note-citation><text:note-body><text:p text:style-name="P173"><text:span text:style-name="T265">See the </text:span><text:span text:style-name="T254">strftime(3)</text:span><text:span text:style-name="T266"> manual page</text:span></text:p></text:note-body></text:note></text:span></text:span><text:span text:style-name="T252"> are available.</text:span></text:p>
      <text:p text:style-name="P174"/>
      <table:table table:name="Table154" table:style-name="Table154">
        <table:table-column table:style-name="Table154.A"/>
        <table:table-row>
          <table:table-cell table:style-name="Table154.A1" office:value-type="string">
            <text:p text:style-name="P175"><text:span text:style-name="T115">#include </text:span><text:span text:style-name="T116">&lt;time.h&gt;</text:span></text:p>
            <text:p text:style-name="P176"/>
            <text:p text:style-name="P59"><text:span text:style-name="T267">size_t</text:span><text:span text:style-name="T268"> </text:span><text:span text:style-name="T269">strftime</text:span><text:span text:style-name="T268">(</text:span><text:span text:style-name="T267">char</text:span><text:span text:style-name="T268"> </text:span><text:span text:style-name="T270">s</text:span><text:span text:style-name="T268">[restrict .max], </text:span><text:span text:style-name="T267">size_t</text:span><text:span text:style-name="T268"> </text:span><text:span text:style-name="T270">max</text:span><text:span text:style-name="T268">, </text:span><text:span text:style-name="T267">const</text:span><text:span text:style-name="T268"> </text:span><text:span text:style-name="T267">char</text:span><text:span text:style-name="T268"> *</text:span><text:span text:style-name="T267">restrict</text:span><text:span text:style-name="T268"> </text:span></text:p>
            <text:p text:style-name="P59"><text:span text:style-name="T268"><text:s text:c="16"/></text:span><text:span text:style-name="T270">format</text:span><text:span text:style-name="T268">, </text:span><text:span text:style-name="T267">const</text:span><text:span text:style-name="T268"> </text:span><text:span text:style-name="T267">struct</text:span><text:span text:style-name="T268"> tm *</text:span><text:span text:style-name="T267">restrict</text:span><text:span text:style-name="T268"> </text:span><text:span text:style-name="T270">tm</text:span><text:span text:style-name="T268">);</text:span></text:p>
            <text:p text:style-name="P176"/>
            <text:p text:style-name="P59"><text:span text:style-name="T267">size_t</text:span><text:span text:style-name="T268"> </text:span><text:span text:style-name="T269">strftime_l</text:span><text:span text:style-name="T268">(</text:span><text:span text:style-name="T267">char</text:span><text:span text:style-name="T268"> </text:span><text:span text:style-name="T270">s</text:span><text:span text:style-name="T268">[restrict .max], </text:span><text:span text:style-name="T267">size_t</text:span><text:span text:style-name="T268"> </text:span><text:span text:style-name="T270">max</text:span><text:span text:style-name="T268">, </text:span><text:span text:style-name="T267">const</text:span><text:span text:style-name="T268"> </text:span><text:span text:style-name="T267">char</text:span><text:span text:style-name="T268"> *</text:span><text:span text:style-name="T267">restrict</text:span><text:span text:style-name="T268"> </text:span></text:p>
            <text:p text:style-name="P59"><text:span text:style-name="T268"><text:s text:c="18"/></text:span><text:span text:style-name="T270">format</text:span><text:span text:style-name="T268">, </text:span><text:span text:style-name="T267">const</text:span><text:span text:style-name="T268"> </text:span><text:span text:style-name="T267">struct</text:span><text:span text:style-name="T268"> tm *</text:span><text:span text:style-name="T267">restrict</text:span><text:span text:style-name="T268"> </text:span><text:span text:style-name="T270">tm</text:span><text:span text:style-name="T268">, locale_t </text:span><text:span text:style-name="T270">locale</text:span><text:span text:style-name="T268">);</text:span></text:p>
            <text:p text:style-name="P177"/>
            <text:p text:style-name="P178"><text:s/>Return: the number of bytes placed in the s array, 0 if the length of the </text:p>
            <text:p text:style-name="P178"><text:s text:c="9"/>string exceed max</text:p>
          </table:table-cell>
        </table:table-row>
      </table:table>
      <text:p text:style-name="P179"/>
      <text:p text:style-name="P139"><text:span text:style-name="T271">The </text:span><text:span text:style-name="T226">strftime</text:span><text:span text:style-name="T271"> function formats the broken-down time </text:span><text:span text:style-name="T226">tm</text:span><text:span text:style-name="T271"> in the way defined in the </text:span><text:span text:style-name="T226">format</text:span><text:span text:style-name="T271"> argument, and </text:span><text:span text:style-name="T272">stores</text:span><text:span text:style-name="T271"> the result in the </text:span><text:span text:style-name="T273">s</text:span><text:span text:style-name="T271"> array of size </text:span><text:span text:style-name="T226">max</text:span><text:span text:style-name="T271">. The format specification is a string that can contain special character sequences called </text:span><text:span text:style-name="T274">conversion specifications</text:span><text:span text:style-name="T271">, each of which is introduced by a “</text:span><text:span text:style-name="T226">%</text:span><text:span text:style-name="T271">” in the same way of the function </text:span><text:span text:style-name="T226">printf</text:span><text:span text:style-name="T271">. </text:span></text:p>
      <text:p text:style-name="P146"><text:span text:style-name="T271">The function </text:span><text:span text:style-name="T226">strftime_l</text:span><text:span text:style-name="T271"> works exactly as </text:span><text:span text:style-name="T226">strftime</text:span><text:span text:style-name="T271"> but uses the specified </text:span><text:span text:style-name="T226">locale</text:span><text:span text:style-name="T271"> at the place of the current locale. If the length of the string exceed </text:span><text:span text:style-name="T226">max</text:span><text:span text:style-name="T271"> bytes, then the function returns 0. <text:s/></text:span></text:p>
      <text:p text:style-name="P43"/>
      <text:p text:style-name="P180"><text:span text:style-name="T275">The </text:span><text:span text:style-name="T276">glibc</text:span><text:span text:style-name="T275"> provides some extensions for conversion specifications that can be used between the “</text:span><text:span text:style-name="T226">%</text:span><text:span text:style-name="T275">” and the conversion specifier character. The following table lists the flags that can be used.</text:span></text:p>
      <text:p text:style-name="P181"/>
      <table:table table:name="Table1" table:style-name="Table1">
        <table:table-column table:style-name="Table1.A"/>
        <table:table-column table:style-name="Table1.B"/>
        <table:table-row>
          <table:table-cell table:style-name="Table1.A1" office:value-type="string">
            <text:p text:style-name="P182">_ (underscore)</text:p>
          </table:table-cell>
          <table:table-cell table:style-name="Table1.B1" office:value-type="string">
            <text:p text:style-name="P183">Pad a numeric result string with spaces</text:p>
          </table:table-cell>
        </table:table-row>
        <table:table-row>
          <table:table-cell table:style-name="Table1.A2" office:value-type="string">
            <text:p text:style-name="P182">- (dash)</text:p>
          </table:table-cell>
          <table:table-cell table:style-name="Table1.B2" office:value-type="string">
            <text:p text:style-name="P183">Do not pad a numeric result string</text:p>
          </table:table-cell>
        </table:table-row>
        <table:table-row>
          <table:table-cell table:style-name="Table1.A2" office:value-type="string">
            <text:p text:style-name="P182">0</text:p>
          </table:table-cell>
          <table:table-cell table:style-name="Table1.B2" office:value-type="string">
            <text:p text:style-name="P183">Pad a numeric result string with zeros even if the conversion specifier character uses space-padding by default</text:p>
          </table:table-cell>
        </table:table-row>
        <table:table-row>
          <table:table-cell table:style-name="Table1.A2" office:value-type="string">
            <text:p text:style-name="P182">^</text:p>
          </table:table-cell>
          <table:table-cell table:style-name="Table1.B2" office:value-type="string">
            <text:p text:style-name="P183">Convert alphabetic characters in result string to uppercase</text:p>
          </table:table-cell>
        </table:table-row>
        <table:table-row>
          <table:table-cell table:style-name="Table1.A2" office:value-type="string">
            <text:p text:style-name="P182">#</text:p>
          </table:table-cell>
          <table:table-cell table:style-name="Table1.B2" office:value-type="string">
            <text:p text:style-name="P183">Swap the case of the result string, <text:span text:style-name="T277">works only with certain conversion specifier characters</text:span></text:p>
          </table:table-cell>
        </table:table-row>
      </table:table>
      <text:p text:style-name="P181"/>
      <text:p text:style-name="P184"><text:span text:style-name="T90">Tab 2.</text:span> Conversion specifier extensions of <text:s/><text:span text:style-name="T278">strftime</text:span></text:p>
      <text:p text:style-name="P181"/>
      <text:p text:style-name="P185"><text:span text:style-name="T275">The </text:span><text:span text:style-name="Source_20_Text"><text:span text:style-name="T226">timeformat.c</text:span></text:span><text:span text:style-name="T275"> program, </text:span><text:span text:style-name="T279">adapted </text:span><text:span text:style-name="T275">from the </text:span><text:span text:style-name="Source_20_Text"><text:span text:style-name="T226">strftime(3)</text:span></text:span><text:span text:style-name="T275"> manual page, </text:span><text:span text:style-name="T279">p</text:span><text:span text:style-name="T280">rint</text:span><text:span text:style-name="T281">s</text:span><text:span text:style-name="T280"> </text:span><text:span text:style-name="T279">the </text:span><text:span text:style-name="T280">date and time </text:span><text:span text:style-name="T279">according to </text:span><text:span text:style-name="T281">the </text:span><text:span text:style-name="T280">format </text:span><text:span text:style-name="T279">specified on the command line.</text:span></text:p>
      <text:p text:style-name="Horizontal_20_Line"/>
      <text:p text:style-name="P186"><text:span text:style-name="T282">1 </text:span><text:span text:style-name="T115">#include </text:span><text:span text:style-name="T116">&lt;stdio.h&gt;</text:span></text:p>
      <text:p text:style-name="P187"><text:span text:style-name="T282">2 </text:span><text:span text:style-name="T115">#include </text:span><text:span text:style-name="T116">&lt;stdlib.h&gt;</text:span></text:p>
      <text:p text:style-name="P187"><text:span text:style-name="T282">3 </text:span><text:span text:style-name="T115">#include </text:span><text:span text:style-name="T116">&lt;time.h&gt;</text:span></text:p>
      <text:p text:style-name="P188"/>
      <text:p text:style-name="P189"><text:span text:style-name="T282">4 </text:span>int <text:span text:style-name="T283">main(</text:span>int<text:span text:style-name="T283"> argc, </text:span>char<text:span text:style-name="T283"> *argv</text:span>[]<text:span text:style-name="T283">)</text:span></text:p>
      <text:p text:style-name="P187"><text:span text:style-name="T282">5 </text:span>{</text:p>
      <text:p text:style-name="P187"><text:span text:style-name="T282">6 <text:s text:c="3"/></text:span><text:span text:style-name="T115">char</text:span> outstr[<text:span text:style-name="T127">200</text:span>];</text:p>
      <text:p text:style-name="P187"><text:span text:style-name="T282">7 <text:s text:c="3"/></text:span><text:span text:style-name="T115">time_t</text:span> t;</text:p>
      <text:p text:style-name="P190"><text:soft-page-break/><text:span text:style-name="T284">8 <text:s text:c="3"/></text:span><text:span text:style-name="T103">struct</text:span><text:span text:style-name="T104"> </text:span><text:span text:style-name="T103">tm</text:span><text:span text:style-name="T104"> *tmp;</text:span></text:p>
      <text:p text:style-name="P188"/>
      <text:p text:style-name="P187"><text:span text:style-name="T282">9 <text:s text:c="3"/></text:span><text:span text:style-name="T115">if</text:span> (argc != <text:span text:style-name="T127">2</text:span>) {</text:p>
      <text:p text:style-name="P187"><text:span text:style-name="T282">10 <text:s text:c="6"/></text:span>printf(<text:span text:style-name="T116">"\nUsage: %s &lt;specifier&gt;"</text:span>, argv[<text:span text:style-name="T127">0</text:span>]);</text:p>
      <text:p text:style-name="P187"><text:span text:style-name="T282">11 <text:s text:c="6"/></text:span>exit(<text:span text:style-name="T115">EXIT_FAILURE</text:span>);</text:p>
      <text:p text:style-name="P187"><text:span text:style-name="T282">12 <text:s text:c="2"/></text:span>}</text:p>
      <text:p text:style-name="P188"/>
      <text:p text:style-name="P187"><text:span text:style-name="T282">13 <text:s text:c="3"/></text:span>t = time(<text:span text:style-name="T115">NULL</text:span>);</text:p>
      <text:p text:style-name="P187"><text:span text:style-name="T282">14 <text:s text:c="3"/></text:span>tmp = <text:span text:style-name="T126">localtime</text:span>(&amp;t);</text:p>
      <text:p text:style-name="P187"><text:span text:style-name="T282">15 <text:s text:c="3"/></text:span><text:span text:style-name="T115">if</text:span> (tmp == <text:span text:style-name="T115">NULL</text:span>) {</text:p>
      <text:p text:style-name="P187"><text:span text:style-name="T282">16 <text:s text:c="6"/></text:span>perror(<text:span text:style-name="T116">"localtime"</text:span>);</text:p>
      <text:p text:style-name="P187"><text:span text:style-name="T282">17 <text:s text:c="6"/></text:span>exit(<text:span text:style-name="T115">EXIT_FAILURE</text:span>);</text:p>
      <text:p text:style-name="P187"><text:span text:style-name="T282">18 <text:s text:c="3"/></text:span>}</text:p>
      <text:p text:style-name="P188"/>
      <text:p text:style-name="P187"><text:span text:style-name="T282">19 <text:s text:c="3"/></text:span><text:span text:style-name="T115">if</text:span> (<text:span text:style-name="T126">strftime</text:span>(outstr, <text:span text:style-name="T115">sizeof</text:span>(outstr), argv[<text:span text:style-name="T127">1</text:span>], tmp) == <text:span text:style-name="T127">0</text:span>) {</text:p>
      <text:p text:style-name="P187"><text:span text:style-name="T282">20 <text:s text:c="6"/></text:span>fprintf(<text:span text:style-name="T115">stderr</text:span>, <text:span text:style-name="T116">"strftime returned 0"</text:span>);</text:p>
      <text:p text:style-name="P187"><text:span text:style-name="T282">21 <text:s text:c="6"/></text:span>exit(<text:span text:style-name="T115">EXIT_FAILURE</text:span>);</text:p>
      <text:p text:style-name="P187"><text:span text:style-name="T282">22 <text:s text:c="3"/></text:span>}</text:p>
      <text:p text:style-name="P191"/>
      <text:p text:style-name="P192"><text:span text:style-name="T285">23 <text:s text:c="3"/></text:span><text:span text:style-name="T75">printf(</text:span><text:span text:style-name="T286">"Result string is \"%s\"\n"</text:span><text:span text:style-name="T75">, outstr);</text:span></text:p>
      <text:p text:style-name="P193"><text:span text:style-name="T282">24 <text:s text:c="3"/></text:span>exit(<text:span text:style-name="T115">EXIT_SUCCESS</text:span>);</text:p>
      <text:p text:style-name="P194"><text:span text:style-name="T287">25 </text:span><text:span text:style-name="T288">}</text:span></text:p>
      <text:p text:style-name="Horizontal_20_Line"/>
      <text:p text:style-name="P195">timeformat.c</text:p>
      <text:p text:style-name="P196"/>
      <text:p text:style-name="Standard"><text:span text:style-name="Strong_20_Emphasis"><text:span text:style-name="T220">Line 13.</text:span></text:span><text:span text:style-name="T68"> Retrieves the current system time as a </text:span><text:span text:style-name="Source_20_Text"><text:span text:style-name="T289">time_t</text:span></text:span><text:span text:style-name="T68"> value (Unix timestamp), representing the <text:tab/> <text:s/>number of seconds since the epoch</text:span></text:p>
      <text:p text:style-name="Standard"><text:span text:style-name="Strong_20_Emphasis"><text:span text:style-name="T220">Line 14.</text:span></text:span><text:span text:style-name="T68"> Converts the timestamp </text:span><text:span text:style-name="Source_20_Text"><text:span text:style-name="T289">t</text:span></text:span><text:span text:style-name="T68"> into a broken-down local time representation (</text:span><text:span text:style-name="Source_20_Text"><text:span text:style-name="T289">struct</text:span></text:span><text:span text:style-name="Source_20_Text"><text:span text:style-name="T68"> </text:span></text:span><text:span text:style-name="Source_20_Text"><text:span text:style-name="T289">tm</text:span></text:span><text:span text:style-name="T68">) <text:tab/> <text:s text:c="2"/>using </text:span><text:span text:style-name="Source_20_Text"><text:span text:style-name="T289">localtime</text:span></text:span><text:span text:style-name="T68">, which fills the structure with human-readable components such as <text:tab/> <text:s text:c="2"/>year, month, day, hour, and minute according to the system’s local timezone</text:span></text:p>
      <text:p text:style-name="Standard"><text:span text:style-name="Strong_20_Emphasis"><text:span text:style-name="T220">Line 19.</text:span></text:span><text:span text:style-name="T68"> Uses </text:span><text:span text:style-name="Source_20_Text"><text:span text:style-name="T289">strftime</text:span></text:span><text:span text:style-name="T68"> to format the </text:span><text:span text:style-name="Source_20_Text"><text:span text:style-name="T289">tm</text:span></text:span><text:span text:style-name="T68"> <text:s/>structure according to the format specifier provided <text:tab/> <text:s text:c="2"/>via the command line. The resulting formatted string is stored in </text:span><text:span text:style-name="Source_20_Text"><text:span text:style-name="T289">outstr</text:span></text:span></text:p>
      <text:p text:style-name="P196"/>
      <text:p text:style-name="P197">We execute the program passing a string with some specifiers<text:note text:id="ftn26" text:note-class="footnote"><text:note-citation>24</text:note-citation><text:note-body><text:p text:style-name="P198"><text:span text:style-name="T265">The complete list of the specifiers is available in the </text:span><text:span text:style-name="T290">strftime(3)</text:span><text:span text:style-name="T265">manual page </text:span></text:p></text:note-body></text:note>.</text:p>
      <text:p text:style-name="P197"/>
      <table:table table:name="Table2" table:style-name="Table2">
        <table:table-column table:style-name="Table2.A"/>
        <table:table-row>
          <table:table-cell table:style-name="Table2.A1" office:value-type="string">
            <text:p text:style-name="P199"><text:span text:style-name="T77">[</text:span><text:a xlink:type="simple" xlink:href="mailto:linux@fidir" text:style-name="Internet_20_link" text:visited-style-name="Visited_20_Internet_20_Link"><text:span text:style-name="T78">linux@fidir</text:span></text:a><text:span text:style-name="T77">] </text:span><text:span text:style-name="T291">./timeformat "%d %h %Y - %H:%M"</text:span></text:p>
            <text:p text:style-name="P200">Result string is "29 Apr 2025 – 11:23"</text:p>
            <text:p text:style-name="P200"/>
            <text:p text:style-name="P199"><text:span text:style-name="T80">[</text:span><text:a xlink:type="simple" xlink:href="mailto:linux@fidir" text:style-name="Internet_20_link" text:visited-style-name="Visited_20_Internet_20_Link"><text:span text:style-name="T81">linux@fidir</text:span></text:a><text:span text:style-name="T80">] ./timeformat "%d/%m/%Y - %H:%M"</text:span></text:p>
            <text:p text:style-name="P199">Result string is "29/04/2025 - 11:31"</text:p>
          </table:table-cell>
        </table:table-row>
      </table:table>
      <text:p text:style-name="Standard"/>
      <text:p text:style-name="P201">In these examples, the program interprets the format string provided on the command line and applies it to the current local time obtained via <text:span text:style-name="Source_20_Text"><text:span text:style-name="T75">localtime</text:span></text:span>. The <text:span text:style-name="Source_20_Text"><text:span text:style-name="T75">strftime</text:span></text:span> function then replaces each conversion specifier with the corresponding value from the <text:span text:style-name="Source_20_Text"><text:span text:style-name="T75">struct</text:span></text:span><text:span text:style-name="Source_20_Text"> </text:span><text:span text:style-name="Source_20_Text"><text:span text:style-name="T75">tm</text:span></text:span>.</text:p>
      <text:p text:style-name="Standard"/>
      <text:list text:style-name="L8">
        <text:list-item>
          <text:p text:style-name="P202"><text:span text:style-name="Source_20_Text"><text:span text:style-name="T75">%d</text:span></text:span> → day of the month (01–31)</text:p>
        </text:list-item>
        <text:list-item>
          <text:p text:style-name="P202"><text:span text:style-name="Source_20_Text"><text:span text:style-name="T75">%m</text:span></text:span> → month as a number (01–12)</text:p>
        </text:list-item>
        <text:list-item>
          <text:p text:style-name="P202"><text:span text:style-name="Source_20_Text"><text:span text:style-name="T75">%h</text:span></text:span> → abbreviated month name (e.g., Apr)</text:p>
        </text:list-item>
        <text:list-item>
          <text:p text:style-name="P202"><text:span text:style-name="Source_20_Text"><text:span text:style-name="T75">%Y</text:span></text:span> → full year (e.g., 2025)</text:p>
        </text:list-item>
        <text:list-item>
          <text:p text:style-name="P202"><text:soft-page-break/><text:span text:style-name="Source_20_Text"><text:span text:style-name="T75">%H</text:span></text:span> → hour in 24-hour format (00–23)</text:p>
        </text:list-item>
        <text:list-item>
          <text:p text:style-name="P202"><text:span text:style-name="Source_20_Text"><text:span text:style-name="T75">%M</text:span></text:span> → minutes (00–59)</text:p>
        </text:list-item>
      </text:list>
      <text:p text:style-name="P201"/>
      <text:p text:style-name="P201">To perform the reverse operation, that is, converting a date and time string into a <text:span text:style-name="Source_20_Text"><text:span text:style-name="T75">tm</text:span></text:span> <text:span text:style-name="T292">structure </text:span>representation, we can use the following function<text:note text:id="ftn27" text:note-class="footnote"><text:note-citation>25</text:note-citation><text:note-body><text:p text:style-name="P198"><text:span text:style-name="T293">See the </text:span><text:span text:style-name="T294">strptime(3)</text:span> <text:span text:style-name="T265">manual page </text:span></text:p></text:note-body></text:note>.</text:p>
      <text:p text:style-name="P203"/>
      <table:table table:name="Table3" table:style-name="Table3">
        <table:table-column table:style-name="Table3.A"/>
        <table:table-row>
          <table:table-cell table:style-name="Table3.A1" office:value-type="string">
            <text:p text:style-name="P204">#define _XOPEN_SOURCE</text:p>
            <text:p text:style-name="P186"><text:span text:style-name="T115">#include </text:span><text:span text:style-name="T116">&lt;time.h&gt;</text:span></text:p>
            <text:p text:style-name="P188"/>
            <text:p text:style-name="P186"><text:span text:style-name="T115">char</text:span> *<text:span text:style-name="T126">strptime</text:span>(<text:span text:style-name="T115">const</text:span> <text:span text:style-name="T115">char</text:span> *<text:span text:style-name="T115">restrict</text:span> <text:span text:style-name="T68">s</text:span>, <text:span text:style-name="T115">const</text:span> <text:span text:style-name="T115">char</text:span> *<text:span text:style-name="T115">restrict</text:span> <text:span text:style-name="T68">format</text:span>,</text:p>
            <text:p text:style-name="P186"><text:span text:style-name="T115"><text:s text:c="15"/>struct</text:span> tm *<text:span text:style-name="T115">restrict</text:span> <text:span text:style-name="T68">tm</text:span>);</text:p>
            <text:p text:style-name="P186"/>
            <text:p text:style-name="P205"><text:s text:c="9"/>Returns: a pointer to the first character not processed, NULL if error</text:p>
          </table:table-cell>
        </table:table-row>
      </table:table>
      <text:p text:style-name="P201"/>
      <text:p text:style-name="P201">The program <text:span text:style-name="Source_20_Text"><text:span text:style-name="T75">strtotime.c</text:span></text:span> converts a date-time string into a <text:span text:style-name="Source_20_Text"><text:span text:style-name="T75">tm</text:span></text:span> structure according to the format specifiers provided.</text:p>
      <text:p text:style-name="Horizontal_20_Line"/>
      <text:p text:style-name="P186"><text:span text:style-name="T295">1 </text:span><text:span text:style-name="T115">#define _XOPEN_SOURCE</text:span></text:p>
      <text:p text:style-name="P206"><text:span text:style-name="T295">2 </text:span><text:span text:style-name="T115">#include </text:span><text:span text:style-name="T116">&lt;stdio.h&gt;</text:span></text:p>
      <text:p text:style-name="P206"><text:span text:style-name="T295">3 </text:span><text:span text:style-name="T115">#include </text:span><text:span text:style-name="T116">&lt;stdlib.h&gt;</text:span></text:p>
      <text:p text:style-name="P206"><text:span text:style-name="T296">4</text:span><text:span text:style-name="T295"> </text:span><text:span text:style-name="T115">#include </text:span><text:span text:style-name="T116">&lt;time.h&gt;</text:span></text:p>
      <text:p text:style-name="P188"/>
      <text:p text:style-name="P207"><text:span text:style-name="T296">5</text:span><text:span text:style-name="T295"> </text:span><text:span text:style-name="T115">int</text:span> main(<text:span text:style-name="T115">int</text:span> argc, <text:span text:style-name="T115">char</text:span> *argv<text:span text:style-name="T115">[]</text:span>)</text:p>
      <text:p text:style-name="P207"><text:span text:style-name="T296">6</text:span><text:span text:style-name="T295"> </text:span>{</text:p>
      <text:p text:style-name="P207"><text:span text:style-name="T296">7</text:span><text:span text:style-name="T295"> <text:s text:c="3"/></text:span><text:span text:style-name="T115">struct</text:span> tm tm;</text:p>
      <text:p text:style-name="P207"><text:span text:style-name="T296">8</text:span><text:span text:style-name="T295"> <text:s text:c="3"/></text:span><text:span text:style-name="T115">if</text:span> (argc != <text:span text:style-name="T127">3</text:span>) {</text:p>
      <text:p text:style-name="P207"><text:span text:style-name="T296">9</text:span><text:span text:style-name="T295"> <text:s text:c="6"/></text:span>printf(<text:span text:style-name="T116">"\nUsage: %s &lt;datetime&gt; &lt;specifiers&gt;"</text:span>, argv[<text:span text:style-name="T127">0</text:span>]);</text:p>
      <text:p text:style-name="P207"><text:span text:style-name="T297">1</text:span><text:span text:style-name="T296">0</text:span><text:span text:style-name="T295"> <text:s text:c="6"/></text:span>exit(<text:span text:style-name="T115">EXIT_FAILURE</text:span>);</text:p>
      <text:p text:style-name="P207"><text:span text:style-name="T297">1</text:span><text:span text:style-name="T296">1</text:span><text:span text:style-name="T295"> <text:s text:c="3"/></text:span>}</text:p>
      <text:p text:style-name="P188"/>
      <text:p text:style-name="P207"><text:span text:style-name="T297">1</text:span><text:span text:style-name="T296">2</text:span><text:span text:style-name="T295"> <text:s text:c="3"/></text:span><text:span text:style-name="T126">strptime</text:span>(argv[<text:span text:style-name="T127">1</text:span>], argv[<text:span text:style-name="T127">2</text:span>], &amp;tm);</text:p>
      <text:p text:style-name="P207"><text:span text:style-name="T297">1</text:span><text:span text:style-name="T296">3</text:span><text:span text:style-name="T295"> <text:s text:c="3"/></text:span>printf(<text:span text:style-name="T116">"\nDAY: %d"</text:span>, tm.tm_mday);</text:p>
      <text:p text:style-name="P207"><text:span text:style-name="T297">1</text:span><text:span text:style-name="T296">4</text:span><text:span text:style-name="T295"> <text:s text:c="3"/></text:span>printf(<text:span text:style-name="T116">"\nMONTH: %d"</text:span>, tm.tm_mon + <text:span text:style-name="T127">1</text:span>);</text:p>
      <text:p text:style-name="P207"><text:span text:style-name="T297">1</text:span><text:span text:style-name="T296">5</text:span><text:span text:style-name="T295"> <text:s text:c="3"/></text:span>printf(<text:span text:style-name="T116">"\nYEAR: %d"</text:span>, tm.tm_year + <text:span text:style-name="T127">1900</text:span>);</text:p>
      <text:p text:style-name="P207"><text:span text:style-name="T297">1</text:span><text:span text:style-name="T296">6</text:span><text:span text:style-name="T295"> <text:s text:c="3"/></text:span>printf(<text:span text:style-name="T116">"\nHOUR: %d"</text:span>, tm.tm_hour);</text:p>
      <text:p text:style-name="P208"><text:span text:style-name="T298">1</text:span><text:span text:style-name="T299">7</text:span><text:span text:style-name="T300"> <text:s text:c="3"/></text:span><text:span text:style-name="T124">printf(</text:span><text:span text:style-name="T102">"\nMIN: %d"</text:span><text:span text:style-name="T124">, tm.tm_min);</text:span></text:p>
      <text:p text:style-name="P207"><text:span text:style-name="T297">1</text:span><text:span text:style-name="T296">8</text:span><text:span text:style-name="T295"> <text:s text:c="3"/></text:span>exit(<text:span text:style-name="T115">EXIT_SUCCESS</text:span>);</text:p>
      <text:p text:style-name="P207"><text:span text:style-name="T296">19</text:span><text:span text:style-name="T295"> </text:span>}</text:p>
      <text:p text:style-name="Horizontal_20_Line"/>
      <text:p text:style-name="P209">strtotime.c</text:p>
      <text:p text:style-name="P210"/>
      <text:p text:style-name="P211"><text:span text:style-name="Strong_20_Emphasis"><text:span text:style-name="T301">The li</text:span></text:span><text:span text:style-name="Strong_20_Emphasis"><text:span text:style-name="T302">ne 12 </text:span></text:span><text:span text:style-name="Strong_20_Emphasis"><text:span text:style-name="T301">c</text:span></text:span><text:span text:style-name="T302">alls </text:span><text:span text:style-name="Source_20_Text"><text:span text:style-name="T303">strptime</text:span></text:span><text:span text:style-name="T302">, which parses the input string (</text:span><text:span text:style-name="Source_20_Text"><text:span text:style-name="T303">argv[1]</text:span></text:span><text:span text:style-name="T302">) according to the format string (</text:span><text:span text:style-name="Source_20_Text"><text:span text:style-name="T303">argv[2]</text:span></text:span><text:span text:style-name="T302">). The function fills the corresponding fields of the </text:span><text:span text:style-name="Source_20_Text"><text:span text:style-name="T303">tm</text:span></text:span><text:span text:style-name="T302"> structure based on the provided format specifiers, converting the textual representation of date and time into a structured format that can be further processed in C.</text:span></text:p>
      <text:p text:style-name="P212"/>
      <text:p text:style-name="P212"/>
      <text:p text:style-name="P212"/>
      <text:p text:style-name="P212"><text:soft-page-break/>We execute the program</text:p>
      <text:p text:style-name="P212"/>
      <table:table table:name="Table4" table:style-name="Table4">
        <table:table-column table:style-name="Table4.A"/>
        <table:table-row>
          <table:table-cell table:style-name="Table4.A1" office:value-type="string">
            <text:p text:style-name="P213"><text:span text:style-name="T77">[</text:span><text:a xlink:type="simple" xlink:href="mailto:linux@fidir" text:style-name="Internet_20_link" text:visited-style-name="Visited_20_Internet_20_Link"><text:span text:style-name="T78">linux@fidir</text:span></text:a><text:span text:style-name="T77">] </text:span><text:span text:style-name="T291">./</text:span><text:span text:style-name="T304">strtotime "29/04/2025 11:50" "%d/%m/%Y %H:%M"</text:span></text:p>
            <text:p text:style-name="P214">DAY: 29</text:p>
            <text:p text:style-name="P214">MONTH: 4</text:p>
            <text:p text:style-name="P214">YEAR: 2025</text:p>
            <text:p text:style-name="P214">HOUR: 11</text:p>
            <text:p text:style-name="P214">MIN: 50 <text:s text:c="77"/></text:p>
          </table:table-cell>
        </table:table-row>
      </table:table>
      <text:p text:style-name="P212"/>
      <text:p text:style-name="P211"><text:span text:style-name="T305">the program has correctly parsed the input string ”</text:span><text:span text:style-name="Source_20_Text"><text:span text:style-name="T303">29/04/2025 11:50</text:span></text:span><text:span text:style-name="T305">“ according to the format specifier ”</text:span><text:span text:style-name="Source_20_Text"><text:span text:style-name="T303">%d/%m/%Y %H:%M</text:span></text:span><text:span text:style-name="T305">“ and populated the corresponding fields of the </text:span><text:span text:style-name="Source_20_Text"><text:span text:style-name="T303">tm</text:span></text:span><text:span text:style-name="T305"> structure. The values stored in </text:span><text:span text:style-name="Source_20_Text"><text:span text:style-name="T303">tm</text:span></text:span><text:span text:style-name="T305"> match the expected date and time components, confirming that </text:span><text:span text:style-name="Source_20_Text"><text:span text:style-name="T303">strptime</text:span></text:span><text:span text:style-name="T305"> successfully interpreted the input and converted it into a structured representation.</text:span></text:p>
      <text:p text:style-name="P215"/>
      <text:p text:style-name="P211"><text:span text:style-name="T306">O</text:span><text:span text:style-name="T305">nce the structure </text:span><text:span text:style-name="T303">tm</text:span><text:span text:style-name="T305"> </text:span><text:span text:style-name="T307">has been populated, </text:span><text:span text:style-name="T305">we can </text:span><text:span text:style-name="T307">pass it to</text:span><text:span text:style-name="T305"> </text:span><text:span text:style-name="T303">strtotime</text:span><text:span text:style-name="T305"> to print the time in another format </text:span><text:span text:style-name="T308">(</text:span><text:span text:style-name="T309">e.g adding </text:span><text:span text:style-name="T308">the following </text:span><text:span text:style-name="T309">code </text:span><text:span text:style-name="T310">after line 17</text:span><text:span text:style-name="T308">)</text:span></text:p>
      <text:p text:style-name="P216"/>
      <text:p text:style-name="P217"><text:span text:style-name="T115"><text:tab/></text:span><text:span text:style-name="T311">char</text:span><text:span text:style-name="T312"> outstr[</text:span><text:span text:style-name="T313">200</text:span><text:span text:style-name="T312">];</text:span></text:p>
      <text:p text:style-name="P218"><text:tab/>if<text:span text:style-name="T283"> (</text:span><text:span text:style-name="T126">strftime</text:span><text:span text:style-name="T283">(outstr, </text:span>sizeof<text:span text:style-name="T283">(outstr), </text:span><text:span text:style-name="T116">"Time: </text:span><text:span text:style-name="T314">%</text:span><text:span text:style-name="T116">Y-</text:span><text:span text:style-name="T314">%</text:span><text:span text:style-name="T116">m-%d"</text:span><text:span text:style-name="T283">, &amp;tm) == </text:span><text:span text:style-name="T127">0</text:span><text:span text:style-name="T283">) {</text:span></text:p>
      <text:p text:style-name="P186"><text:tab/><text:tab/>fprintf(<text:span text:style-name="T115">stderr</text:span>, <text:span text:style-name="T116">"strftime returned 0"</text:span>);</text:p>
      <text:p text:style-name="P186"><text:tab/><text:tab/>exit(<text:span text:style-name="T115">EXIT_FAILURE</text:span>);</text:p>
      <text:p text:style-name="P186"><text:tab/>}</text:p>
      <text:p text:style-name="P186"><text:tab/>printf(<text:span text:style-name="T116">"\n%s"</text:span>, outstr);</text:p>
      <text:p text:style-name="P219"/>
      <text:p text:style-name="P216"/>
      <text:p text:style-name="P220"/>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2"/>
      <text:p text:style-name="P222"/>
      <text:p text:style-name="P222"/>
      <text:p text:style-name="P222"/>
      <text:p text:style-name="P223"><text:soft-page-break/><text:span text:style-name="T315">III.1.</text:span><text:span text:style-name="T316">7</text:span><text:span text:style-name="T315"> </text:span><text:span text:style-name="T237">T</text:span><text:span text:style-name="T316">ime conversion: </text:span><text:span text:style-name="T75">getdate</text:span></text:p>
      <text:p text:style-name="P224"/>
      <text:p text:style-name="P225"><text:span text:style-name="T317">The </text:span><text:span text:style-name="T318">getdate</text:span><text:span text:style-name="T318"><text:note text:id="ftn28" text:note-class="footnote"><text:note-citation>26</text:note-citation><text:note-body><text:p text:style-name="P226"><text:span text:style-name="T319">See the </text:span><text:span text:style-name="T320">getdate(3)</text:span><text:span text:style-name="T321"> manual page</text:span></text:p></text:note-body></text:note></text:span><text:span text:style-name="T317"> and </text:span><text:span text:style-name="T318">getdate_r</text:span><text:span text:style-name="T317"> functions are used to convert a </text:span><text:span text:style-name="T322">date-plus-time</text:span><text:span text:style-name="T317"> string to </text:span><text:span text:style-name="T322">broken-down time</text:span><text:span text:style-name="T317">.</text:span></text:p>
      <text:p text:style-name="P227"/>
      <table:table table:name="Table5" table:style-name="Table5">
        <table:table-column table:style-name="Table5.A"/>
        <table:table-row>
          <table:table-cell table:style-name="Table5.A1" office:value-type="string">
            <text:p text:style-name="P228"><text:span text:style-name="T101">#include </text:span><text:span text:style-name="T102">&lt;time.h&gt;</text:span></text:p>
            <text:p text:style-name="P188"/>
            <text:p text:style-name="P229"><text:span text:style-name="T103">struct</text:span><text:span text:style-name="T104"> </text:span><text:span text:style-name="T103">tm</text:span><text:span text:style-name="T104"> *</text:span><text:span text:style-name="T105">getdate</text:span><text:span text:style-name="T104">(</text:span><text:span text:style-name="T103">const</text:span><text:span text:style-name="T104"> </text:span><text:span text:style-name="T103">char</text:span><text:span text:style-name="T104"> </text:span><text:span text:style-name="T106">*string</text:span><text:span text:style-name="T104">);</text:span></text:p>
            <text:p text:style-name="P188"/>
            <text:p text:style-name="P186"><text:span text:style-name="T115">extern</text:span> <text:span text:style-name="T115">int</text:span> getdate_err;</text:p>
            <text:p text:style-name="P188"/>
            <text:p text:style-name="P229"><text:span text:style-name="T103">int</text:span><text:span text:style-name="T104"> </text:span><text:span text:style-name="T105">getdate_r</text:span><text:span text:style-name="T104">(</text:span><text:span text:style-name="T103">const</text:span><text:span text:style-name="T104"> </text:span><text:span text:style-name="T103">char</text:span><text:span text:style-name="T104"> *</text:span><text:span text:style-name="T103">restrict</text:span><text:span text:style-name="T104"> </text:span><text:span text:style-name="T106">string</text:span><text:span text:style-name="T104">, </text:span><text:span text:style-name="T103">struct</text:span><text:span text:style-name="T104"> </text:span><text:span text:style-name="T103">tm</text:span><text:span text:style-name="T104"> *</text:span><text:span text:style-name="T103">restrict</text:span><text:span text:style-name="T104"> </text:span><text:span text:style-name="T106">res</text:span><text:span text:style-name="T104">);</text:span></text:p>
            <text:p text:style-name="P183"/>
            <text:p text:style-name="P230"><text:span text:style-name="T323"><text:s text:c="11"/>Return: a pointer to a struct tm, on error NULL and sets getdate_err</text:span> </text:p>
            <text:p text:style-name="P231"><text:span text:style-name="T324"><text:s text:c="38"/></text:span><text:span text:style-name="T325">0 on success, the error on fail</text:span></text:p>
          </table:table-cell>
        </table:table-row>
      </table:table>
      <text:p text:style-name="P227"/>
      <text:p text:style-name="P232"><text:span text:style-name="T326">The </text:span><text:span text:style-name="T318">getdate</text:span><text:span text:style-name="T326"> function converts the string passed in the </text:span><text:span text:style-name="T318">string</text:span><text:span text:style-name="T326"> argument into a a broken-down time. The broken-down time is stored in a </text:span><text:span text:style-name="T318">tm</text:span><text:span text:style-name="T326"> structure. To specify the format of the input string, </text:span><text:span text:style-name="T318">getdate</text:span><text:span text:style-name="T326"> uses a file that is specified in the </text:span><text:span text:style-name="T318">DATEMSK</text:span><text:span text:style-name="T326"> environment variable. </text:span><text:span text:style-name="T327">T</text:span><text:span text:style-name="T326">o use this file, we </text:span><text:span text:style-name="T327">need</text:span><text:span text:style-name="T326"> to set this variable in the environment before calling </text:span><text:span text:style-name="T318">getdate</text:span><text:span text:style-name="T326">. </text:span><text:span text:style-name="T328">If the function fail</text:span><text:span text:style-name="T327">s,</text:span><text:span text:style-name="T328"> it sets the error in the </text:span><text:span text:style-name="T318">getdate_err</text:span><text:span text:style-name="T328"> global variable.</text:span></text:p>
      <text:p text:style-name="P225"><text:span text:style-name="T328">The </text:span><text:span text:style-name="T318">getdate_r</text:span><text:span text:style-name="T328"> function is a GNU extension that does not use a global variable to report errors but the return value, and that store the broken-down time in a the second parameter </text:span><text:span text:style-name="T318">res</text:span><text:span text:style-name="T328">. </text:span></text:p>
      <text:p text:style-name="P233"/>
      <text:p text:style-name="P225"><text:span text:style-name="T329">The following table </text:span><text:span text:style-name="T327">lists</text:span><text:span text:style-name="T329"> the error</text:span><text:span text:style-name="T327">s </text:span><text:span text:style-name="T318">getdate_r</text:span><text:span text:style-name="T329"> </text:span><text:span text:style-name="T327">may return.</text:span></text:p>
      <text:p text:style-name="P234"/>
      <table:table table:name="Table6" table:style-name="Table6">
        <table:table-column table:style-name="Table6.A"/>
        <table:table-column table:style-name="Table6.B"/>
        <table:table-row>
          <table:table-cell table:style-name="Table6.A1" office:value-type="string">
            <text:p text:style-name="P235">1</text:p>
          </table:table-cell>
          <table:table-cell table:style-name="Table6.B1" office:value-type="string">
            <text:p text:style-name="P225"><text:span text:style-name="T318">DATEMSK</text:span><text:span text:style-name="T330"> is not defined</text:span></text:p>
          </table:table-cell>
        </table:table-row>
        <table:table-row>
          <table:table-cell table:style-name="Table6.A2" office:value-type="string">
            <text:p text:style-name="P235">2</text:p>
          </table:table-cell>
          <table:table-cell table:style-name="Table6.B2" office:value-type="string">
            <text:p text:style-name="P225"><text:span text:style-name="T330">The file specified in </text:span><text:span text:style-name="T318">DATEMSK</text:span><text:span text:style-name="T330"> cannot be opened for reading</text:span></text:p>
          </table:table-cell>
        </table:table-row>
        <table:table-row>
          <table:table-cell table:style-name="Table6.A2" office:value-type="string">
            <text:p text:style-name="P235">3</text:p>
          </table:table-cell>
          <table:table-cell table:style-name="Table6.B2" office:value-type="string">
            <text:p text:style-name="P236">Failed to get file status information</text:p>
          </table:table-cell>
        </table:table-row>
        <table:table-row>
          <table:table-cell table:style-name="Table6.A2" office:value-type="string">
            <text:p text:style-name="P235">4</text:p>
          </table:table-cell>
          <table:table-cell table:style-name="Table6.B2" office:value-type="string">
            <text:p text:style-name="P236">The file is not a regular file</text:p>
          </table:table-cell>
        </table:table-row>
        <table:table-row>
          <table:table-cell table:style-name="Table6.A2" office:value-type="string">
            <text:p text:style-name="P235">5</text:p>
          </table:table-cell>
          <table:table-cell table:style-name="Table6.B2" office:value-type="string">
            <text:p text:style-name="P236">Error during the reading of the file</text:p>
          </table:table-cell>
        </table:table-row>
        <table:table-row>
          <table:table-cell table:style-name="Table6.A2" office:value-type="string">
            <text:p text:style-name="P235">6</text:p>
          </table:table-cell>
          <table:table-cell table:style-name="Table6.B2" office:value-type="string">
            <text:p text:style-name="P236">Not enough memory available to allocate</text:p>
          </table:table-cell>
        </table:table-row>
        <table:table-row>
          <table:table-cell table:style-name="Table6.A2" office:value-type="string">
            <text:p text:style-name="P235">7</text:p>
          </table:table-cell>
          <table:table-cell table:style-name="Table6.B2" office:value-type="string">
            <text:p text:style-name="P236">No line in the file matches the input</text:p>
          </table:table-cell>
        </table:table-row>
        <table:table-row>
          <table:table-cell table:style-name="Table6.A2" office:value-type="string">
            <text:p text:style-name="P235">8</text:p>
          </table:table-cell>
          <table:table-cell table:style-name="Table6.B2" office:value-type="string">
            <text:p text:style-name="P236">Invalid input specification</text:p>
          </table:table-cell>
        </table:table-row>
      </table:table>
      <text:p text:style-name="P237"/>
      <text:p text:style-name="P238"><text:span text:style-name="T331">Tab </text:span><text:span text:style-name="T332">3</text:span><text:span text:style-name="T331">.</text:span><text:span text:style-name="T329"> Error of </text:span><text:span text:style-name="T318">getdate_r</text:span></text:p>
      <text:p text:style-name="P224"/>
      <text:p text:style-name="P225"><text:span text:style-name="T329">The program </text:span><text:span text:style-name="T318">getdate.c</text:span><text:span text:style-name="T329"> shows an example.</text:span></text:p>
      <text:p text:style-name="Horizontal_20_Line"/>
      <text:p text:style-name="P186"><text:span text:style-name="T333">1 </text:span><text:span text:style-name="T115">#define _GNU_SOURCE</text:span></text:p>
      <text:p text:style-name="P239"><text:span text:style-name="T333">2 </text:span><text:span text:style-name="T115">#include </text:span><text:span text:style-name="T116">&lt;stdio.h&gt;</text:span></text:p>
      <text:p text:style-name="P239"><text:span text:style-name="T333">3 </text:span><text:span text:style-name="T115">#include </text:span><text:span text:style-name="T116">&lt;stdlib.h&gt;</text:span></text:p>
      <text:p text:style-name="P239"><text:span text:style-name="T333">4 </text:span><text:span text:style-name="T115">#include </text:span><text:span text:style-name="T116">&lt;time.h&gt;</text:span></text:p>
      <text:p text:style-name="P239"><text:span text:style-name="T333">5 </text:span><text:span text:style-name="T115">#include </text:span><text:span text:style-name="T116">&lt;errno.h&gt;</text:span></text:p>
      <text:p text:style-name="P188"/>
      <text:p text:style-name="P239"><text:soft-page-break/><text:span text:style-name="T333">6 </text:span><text:span text:style-name="T115">int</text:span> main(<text:span text:style-name="T115">int</text:span> argc, <text:span text:style-name="T115">char</text:span> *argv<text:span text:style-name="T115">[]</text:span>) </text:p>
      <text:p text:style-name="P240"><text:span text:style-name="T334">7 </text:span><text:span text:style-name="T124">{</text:span></text:p>
      <text:p text:style-name="P239"><text:span text:style-name="T333">8 <text:tab/></text:span><text:span text:style-name="T115">if</text:span> (argc != <text:span text:style-name="T127">2</text:span>) {</text:p>
      <text:p text:style-name="P239"><text:span text:style-name="T333">9 <text:tab/><text:tab/></text:span>printf(<text:span text:style-name="T116">"\nUsage %s '1 January 1980 15:00' "</text:span>, argv[<text:span text:style-name="T127">0</text:span>]);</text:p>
      <text:p text:style-name="P239"><text:span text:style-name="T333">10 <text:tab/><text:tab/></text:span>exit(<text:span text:style-name="T115">EXIT_FAILURE</text:span>);</text:p>
      <text:p text:style-name="P239"><text:span text:style-name="T333">11 <text:tab/></text:span>}</text:p>
      <text:p text:style-name="P188"/>
      <text:p text:style-name="P239"><text:span text:style-name="T333">12 <text:tab/></text:span><text:span text:style-name="T126">setenv</text:span>(<text:span text:style-name="T116">"DATEMSK"</text:span>, <text:span text:style-name="T116">"./datemsk.txt"</text:span>, <text:span text:style-name="T127">1</text:span>);</text:p>
      <text:p text:style-name="P240"><text:span text:style-name="T334">13 <text:tab/></text:span><text:span text:style-name="T101">const</text:span><text:span text:style-name="T124"> </text:span><text:span text:style-name="T101">char</text:span><text:span text:style-name="T124"> *date_str = argv[</text:span><text:span text:style-name="T335">1</text:span><text:span text:style-name="T124">];</text:span></text:p>
      <text:p text:style-name="P241"><text:span text:style-name="T336">14<text:tab/></text:span><text:span text:style-name="T103">struct</text:span><text:span text:style-name="T104"> </text:span><text:span text:style-name="T103">tm</text:span><text:span text:style-name="T104"> *tm_ptr = </text:span><text:span text:style-name="T105">getdate</text:span><text:span text:style-name="T104">(date_str);</text:span></text:p>
      <text:p text:style-name="P188"/>
      <text:p text:style-name="P239"><text:span text:style-name="T333">15 <text:tab/></text:span><text:span text:style-name="T115">if</text:span> (tm_ptr == <text:span text:style-name="T115">NULL</text:span>) {</text:p>
      <text:p text:style-name="P239"><text:span text:style-name="T333">16 <text:tab/><text:tab/></text:span>perror(<text:span text:style-name="T116">"getdate"</text:span>);</text:p>
      <text:p text:style-name="P239"><text:span text:style-name="T333">17 <text:tab/><text:tab/></text:span>fprintf(<text:span text:style-name="T115">stderr</text:span>, <text:span text:style-name="T116">"getdate error code: %d\n"</text:span>, getdate_err);</text:p>
      <text:p text:style-name="P239"><text:span text:style-name="T333">18 <text:tab/><text:tab/></text:span><text:span text:style-name="T115">return</text:span> <text:span text:style-name="T127">1</text:span>;</text:p>
      <text:p text:style-name="P240"><text:span text:style-name="T334">19 <text:tab/></text:span><text:span text:style-name="T124">}</text:span></text:p>
      <text:p text:style-name="P239"/>
      <text:p text:style-name="P239"><text:span text:style-name="T333">20 <text:tab/></text:span>printf(<text:span text:style-name="T116">"Parsed date and time:\n"</text:span>);</text:p>
      <text:p text:style-name="P239"><text:span text:style-name="T333">21 <text:tab/></text:span>printf(<text:span text:style-name="T116">"Year: %d\n"</text:span>, tm_ptr-&gt;tm_year + <text:span text:style-name="T127">1900</text:span>);</text:p>
      <text:p text:style-name="P239"><text:span text:style-name="T333">22 <text:tab/></text:span>printf(<text:span text:style-name="T116">"Month: %d\n"</text:span>, tm_ptr-&gt;tm_mon + <text:span text:style-name="T127">1</text:span>);</text:p>
      <text:p text:style-name="P239"><text:span text:style-name="T333">23 <text:tab/></text:span>printf(<text:span text:style-name="T116">"Day: %d\n"</text:span>, tm_ptr-&gt;tm_mday);</text:p>
      <text:p text:style-name="P239"><text:span text:style-name="T333">24 <text:tab/></text:span>printf(<text:span text:style-name="T116">"Hour: %d\n"</text:span>, tm_ptr-&gt;tm_hour);</text:p>
      <text:p text:style-name="P240"><text:span text:style-name="T334">25 <text:tab/></text:span><text:span text:style-name="T124">printf(</text:span><text:span text:style-name="T102">"Minute: %d\n"</text:span><text:span text:style-name="T124">, tm_ptr-&gt;tm_min);</text:span></text:p>
      <text:p text:style-name="P239"><text:span text:style-name="T333">26 <text:tab/></text:span><text:span text:style-name="T115">return</text:span> <text:span text:style-name="T127">0</text:span>;</text:p>
      <text:p text:style-name="P240"><text:span text:style-name="T334">27 </text:span><text:span text:style-name="T124">}</text:span></text:p>
      <text:p text:style-name="Horizontal_20_Line"/>
      <text:p text:style-name="P242">getdate.c</text:p>
      <text:p text:style-name="P196"/>
      <text:p text:style-name="Standard"><text:span text:style-name="Strong_20_Emphasis"><text:span text:style-name="T220">Line 12.</text:span></text:span><text:span text:style-name="T220"> Sets the </text:span><text:span text:style-name="Source_20_Text"><text:span text:style-name="T221">DATEMSK</text:span></text:span><text:span text:style-name="T220"> environment variable to </text:span><text:span text:style-name="Source_20_Text"><text:span text:style-name="T221">./datemsk.txt</text:span></text:span><text:span text:style-name="T220">, which specifies the path to <text:tab/> <text:s text:c="2"/>a format template file. This file contains one or more valid date/time format strings used <text:tab/> <text:s text:c="2"/>by </text:span><text:span text:style-name="Source_20_Text"><text:span text:style-name="T221">getdate</text:span></text:span><text:span text:style-name="T220"> to interpret the input</text:span></text:p>
      <text:p text:style-name="Standard"><text:span text:style-name="Strong_20_Emphasis"><text:span text:style-name="T220">Line 14.</text:span></text:span><text:span text:style-name="T220"> Calls </text:span><text:span text:style-name="Source_20_Text"><text:span text:style-name="T221">getdate</text:span></text:span><text:span text:style-name="T220"> to convert the input string (</text:span><text:span text:style-name="Source_20_Text"><text:span text:style-name="T221">argv[1]</text:span></text:span><text:span text:style-name="T220">) into a </text:span><text:span text:style-name="Source_20_Text"><text:span text:style-name="T221">struct tm</text:span></text:span><text:span text:style-name="T220">. The <text:tab/> <text:s text:c="2"/><text:tab/> <text:s text:c="2"/>conversion is performed by matching the input against the format(s) defined in the file <text:tab/> <text:s text:c="2"/>referenced by </text:span><text:span text:style-name="Source_20_Text"><text:span text:style-name="T221">DATEMSK</text:span></text:span><text:span text:style-name="T220">. If a valid match is found, a pointer to a statically allocated <text:tab/> <text:s text:c="2"/><text:tab/> <text:s text:c="2"/></text:span><text:span text:style-name="Source_20_Text"><text:span text:style-name="T221">struct</text:span></text:span><text:span text:style-name="Source_20_Text"><text:span text:style-name="T220"> </text:span></text:span><text:span text:style-name="Source_20_Text"><text:span text:style-name="T221">tm</text:span></text:span><text:span text:style-name="T220"> is returned</text:span></text:p>
      <text:p text:style-name="Standard"><text:span text:style-name="Strong_20_Emphasis"><text:span text:style-name="T220">Line 15–19.</text:span></text:span><text:span text:style-name="T220"> Checks whether </text:span><text:span text:style-name="Source_20_Text"><text:span text:style-name="T221">getdate</text:span></text:span><text:span text:style-name="T220"> returned </text:span><text:span text:style-name="Source_20_Text"><text:span text:style-name="T221">NULL</text:span></text:span><text:span text:style-name="T220">, indicating a parsing failure. If an error <text:tab/> <text:s text:c="7"/>occurs, </text:span><text:span text:style-name="Source_20_Text"><text:span text:style-name="T221">perror</text:span></text:span><text:span text:style-name="T220"> prints a system error message, and </text:span><text:span text:style-name="Source_20_Text"><text:span text:style-name="T221">getdate_err</text:span></text:span><text:span text:style-name="T220"> provides a more <text:tab/> <text:s text:c="7"/>specific error code describing why the conversion failed (e.g., no valid match in the <text:tab/> <text:s text:c="7"/>template file or invalid input format)</text:span></text:p>
      <text:p text:style-name="Standard"><text:span text:style-name="Strong_20_Emphasis"><text:span text:style-name="T220">Line 20–25.</text:span></text:span><text:span text:style-name="T220"> Prints the parsed date and time fields stored in the resulting </text:span><text:span text:style-name="Source_20_Text"><text:span text:style-name="T221">struct</text:span></text:span><text:span text:style-name="Source_20_Text"><text:span text:style-name="T220"> </text:span></text:span><text:span text:style-name="Source_20_Text"><text:span text:style-name="T221">tm</text:span></text:span><text:span text:style-name="T220">, converting <text:tab/> <text:s text:c="7"/>them into human-readable values. Adjustments are applied for </text:span><text:span text:style-name="Source_20_Text"><text:span text:style-name="T221">tm_year</text:span></text:span><text:span text:style-name="T220"> (offset from <text:tab/> <text:s text:c="7"/>1900) and </text:span><text:span text:style-name="Source_20_Text"><text:span text:style-name="T221">tm_mon</text:span></text:span><text:span text:style-name="T220"> (zero-based indexing)</text:span></text:p>
      <text:p text:style-name="P243"/>
      <text:p text:style-name="P244"><text:span text:style-name="T337">We</text:span> create the file and execute the program.</text:p>
      <text:p text:style-name="P244"/>
      <table:table table:name="Table7" table:style-name="Table7">
        <table:table-column table:style-name="Table7.A"/>
        <table:table-row>
          <table:table-cell table:style-name="Table7.A1" office:value-type="string">
            <text:p text:style-name="P245"><text:span text:style-name="T338">[</text:span><text:a xlink:type="simple" xlink:href="mailto:linux@users" text:style-name="Internet_20_link" text:visited-style-name="Visited_20_Internet_20_Link"><text:span text:style-name="T339">linux@</text:span><text:span text:style-name="T340">users</text:span></text:a><text:span text:style-name="T338">] </text:span><text:span text:style-name="T341">echo %d %B %Y %H:%M &gt; datemsk.txt</text:span></text:p>
            <text:p text:style-name="P246"/>
            <text:p text:style-name="P24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43">cat </text:span><text:span text:style-name="T341">datemsk.txt</text:span></text:p>
            <text:p text:style-name="P246"/>
            <text:p text:style-name="P245"><text:span text:style-name="T80">[</text:span><text:a xlink:type="simple" xlink:href="mailto:linux@users" text:style-name="Internet_20_link" text:visited-style-name="Visited_20_Internet_20_Link"><text:span text:style-name="T81">linux@</text:span><text:span text:style-name="T342">users</text:span></text:a><text:span text:style-name="T80">] ./getdate '16 June 2025 13:00' <text:s text:c="2"/></text:span></text:p>
            <text:p text:style-name="P245"><text:soft-page-break/>Parsed date and time:</text:p>
            <text:p text:style-name="P245">Year: 2025</text:p>
            <text:p text:style-name="P245">Month: 6</text:p>
            <text:p text:style-name="P245">Day: 16</text:p>
            <text:p text:style-name="P245">Hour: 13</text:p>
            <text:p text:style-name="P245">Minute: 0</text:p>
          </table:table-cell>
        </table:table-row>
      </table:table>
      <text:p text:style-name="P244"/>
      <text:p text:style-name="P247"><text:span text:style-name="T344">The program successfully reads the format patterns from the </text:span><text:span text:style-name="Source_20_Text"><text:span text:style-name="T345">datemsk.txt</text:span></text:span><text:span text:style-name="T344"> file and uses them to parse the input string ”</text:span><text:span text:style-name="Source_20_Text"><text:span text:style-name="T345">16 June 2025 13:00</text:span></text:span><text:span text:style-name="T344">“ via </text:span><text:span text:style-name="Source_20_Text"><text:span text:style-name="T345">getdate</text:span></text:span><text:span text:style-name="T344">. The function matches the string against the specified format, converts it into a </text:span><text:span text:style-name="Source_20_Text"><text:span text:style-name="T345">tm</text:span></text:span><text:span text:style-name="T344"> </text:span><text:span text:style-name="T346">structure,</text:span><text:span text:style-name="T344"> and correctly extracts each field (day, month, year, hour, and minute). The printed output confirms that the parsing operation was successful and that the date-time string was accurately interpreted according to the external template.</text:spa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8"><text:soft-page-break/>II<text:span text:style-name="T74">I</text:span>.<text:span text:style-name="T347">2</text:span> <text:span text:style-name="T348">T</text:span><text:span text:style-name="T347">he environment</text:span></text:p>
      <text:p text:style-name="P249"/>
      <text:p text:style-name="P249"><text:span text:style-name="T349">On</text:span> Linux system<text:span text:style-name="T349">s</text:span> we have always to deal with the environment. This is composed by the configuration related to the shell, the processes, the file system, the users and groups and many other settings. The behavior of the applications can change or can be modified based on the environment settings. The most of these setting are related to the user-level and affect the way a user, process or group behave executing programs and acting on the filesystem.</text:p>
      <text:p text:style-name="P249"/>
      <text:p text:style-name="P249">The most important part of the environment is the set of the environment variables that we can display with the <text:span text:style-name="T75">env</text:span><text:note text:id="ftn29" text:note-class="footnote"><text:note-citation>27</text:note-citation><text:note-body><text:p text:style-name="P250"><text:span text:style-name="T350">See the </text:span><text:span text:style-name="T351">env(1)</text:span><text:span text:style-name="T352"> manual page</text:span></text:p></text:note-body></text:note> command.</text:p>
      <text:p text:style-name="P249"/>
      <table:table table:name="Table9" table:style-name="Table9">
        <table:table-column table:style-name="Table9.A"/>
        <table:table-row>
          <table:table-cell table:style-name="Table9.A1" office:value-type="string">
            <text:p text:style-name="P25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53">env</text:span></text:p>
            <text:p text:style-name="P252">…<text:span text:style-name="T237">output...</text:span></text:p>
          </table:table-cell>
        </table:table-row>
      </table:table>
      <text:p text:style-name="P249"/>
      <text:p text:style-name="P253">The following table <text:span text:style-name="T349">l</text:span>ist<text:span text:style-name="T349">s</text:span> <text:span text:style-name="T349">some </text:span>of the most common variables<text:note text:id="ftn30" text:note-class="footnote"><text:note-citation>28</text:note-citation><text:note-body><text:p text:style-name="P250"><text:span text:style-name="T354">See the </text:span><text:span text:style-name="T355">environ(7)</text:span><text:span text:style-name="T352"> manual page</text:span></text:p></text:note-body></text:note>.</text:p>
      <text:p text:style-name="P253"/>
      <table:table table:name="Table10" table:style-name="Table10">
        <table:table-column table:style-name="Table10.A"/>
        <table:table-column table:style-name="Table10.B"/>
        <table:table-row>
          <table:table-cell table:style-name="Table10.A1" office:value-type="string">
            <text:p text:style-name="P254">LANG</text:p>
          </table:table-cell>
          <table:table-cell table:style-name="Table10.B1" office:value-type="string">
            <text:p text:style-name="P255">The language of the system</text:p>
          </table:table-cell>
        </table:table-row>
        <table:table-row>
          <table:table-cell table:style-name="Table10.A2" office:value-type="string">
            <text:p text:style-name="P254">USER</text:p>
          </table:table-cell>
          <table:table-cell table:style-name="Table10.B2" office:value-type="string">
            <text:p text:style-name="P255">Username of the user currently logged in</text:p>
          </table:table-cell>
        </table:table-row>
        <table:table-row>
          <table:table-cell table:style-name="Table10.A2" office:value-type="string">
            <text:p text:style-name="P254">HOME</text:p>
          </table:table-cell>
          <table:table-cell table:style-name="Table10.B2" office:value-type="string">
            <text:p text:style-name="P255">The home folder of the user</text:p>
          </table:table-cell>
        </table:table-row>
        <table:table-row>
          <table:table-cell table:style-name="Table10.A2" office:value-type="string">
            <text:p text:style-name="P254">PWD<text:note text:id="ftn31" text:note-class="footnote"><text:note-citation>29</text:note-citation><text:note-body><text:p text:style-name="P256"><text:span text:style-name="T351">PWD</text:span><text:span text:style-name="T356"> stands for </text:span><text:span text:style-name="T357">Process Working Directory,</text:span><text:span text:style-name="T356"> in the shell </text:span><text:span text:style-name="T358">it </text:span><text:span text:style-name="T356">usual</text:span><text:span text:style-name="T354">ly</text:span><text:span text:style-name="T356"> correspond</text:span><text:span text:style-name="T358">s</text:span><text:span text:style-name="T356"> to </text:span><text:span text:style-name="T351">CWD</text:span></text:p></text:note-body></text:note></text:p>
          </table:table-cell>
          <table:table-cell table:style-name="Table10.B2" office:value-type="string">
            <text:p text:style-name="P255">The current working directory</text:p>
          </table:table-cell>
        </table:table-row>
        <table:table-row>
          <table:table-cell table:style-name="Table10.A2" office:value-type="string">
            <text:p text:style-name="P254">PATH</text:p>
          </table:table-cell>
          <table:table-cell table:style-name="Table10.B2" office:value-type="string">
            <text:p text:style-name="P255">The paths list where the shell search for the commands entered on the command line</text:p>
          </table:table-cell>
        </table:table-row>
        <table:table-row>
          <table:table-cell table:style-name="Table10.A2" office:value-type="string">
            <text:p text:style-name="P254">LOGNAME</text:p>
          </table:table-cell>
          <table:table-cell table:style-name="Table10.B2" office:value-type="string">
            <text:p text:style-name="P255">Login name (POSIX)</text:p>
          </table:table-cell>
        </table:table-row>
        <table:table-row>
          <table:table-cell table:style-name="Table10.A2" office:value-type="string">
            <text:p text:style-name="P254">SHELL</text:p>
          </table:table-cell>
          <table:table-cell table:style-name="Table10.B2" office:value-type="string">
            <text:p text:style-name="P255">Default shell</text:p>
          </table:table-cell>
        </table:table-row>
        <table:table-row>
          <table:table-cell table:style-name="Table10.A2" office:value-type="string">
            <text:p text:style-name="P254">TERM</text:p>
          </table:table-cell>
          <table:table-cell table:style-name="Table10.B2" office:value-type="string">
            <text:p text:style-name="P255">Default terminal</text:p>
          </table:table-cell>
        </table:table-row>
        <table:table-row>
          <table:table-cell table:style-name="Table10.A2" office:value-type="string">
            <text:p text:style-name="P254">DISPLAY</text:p>
          </table:table-cell>
          <table:table-cell table:style-name="Table10.B2" office:value-type="string">
            <text:p text:style-name="P255">Default display </text:p>
          </table:table-cell>
        </table:table-row>
        <table:table-row>
          <table:table-cell table:style-name="Table10.A2" office:value-type="string">
            <text:p text:style-name="P254">OLDPWD</text:p>
          </table:table-cell>
          <table:table-cell table:style-name="Table10.B2" office:value-type="string">
            <text:p text:style-name="P257"><text:span text:style-name="T359">Previous </text:span><text:span text:style-name="T360">CWD</text:span></text:p>
          </table:table-cell>
        </table:table-row>
      </table:table>
      <text:p text:style-name="P253"/>
      <text:p text:style-name="P258"><text:span text:style-name="T90">Tab </text:span><text:span text:style-name="T361">4</text:span><text:span text:style-name="T90">.</text:span> Common environment variables</text:p>
      <text:p text:style-name="P253"/>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60"><text:soft-page-break/>III.2.1 Working with environment variables: getenv and setenv</text:p>
      <text:p text:style-name="P261"/>
      <text:p text:style-name="P261">Environment variables can be set through the shell or stored in files that are read during system boot or user login.</text:p>
      <text:p text:style-name="P257"><text:span text:style-name="T362">When a program is executed, it runs within the environment defined by these variables and other system settings. In C, the </text:span><text:span text:style-name="Source_20_Text"><text:span text:style-name="T360">main</text:span></text:span><text:span text:style-name="T362"> function can accept the environment as a third parameter. Similarly, the </text:span><text:span text:style-name="Source_20_Text"><text:span text:style-name="T360">execve</text:span></text:span><text:span text:style-name="T362"> function takes the environment as an argument when executing an external program.</text:span></text:p>
      <text:p text:style-name="P261"/>
      <text:p text:style-name="P257"><text:span text:style-name="T362">The program </text:span><text:span text:style-name="T360">showenv.c</text:span><text:span text:style-name="T362"> display</text:span><text:span text:style-name="T363">s</text:span><text:span text:style-name="T362"> all the environment variables using the </text:span><text:span text:style-name="T360">envp</text:span><text:span text:style-name="T362"> parameter of the </text:span><text:span text:style-name="T360">main</text:span><text:span text:style-name="T362"> function.</text:span></text:p>
      <text:p text:style-name="Horizontal_20_Line"/>
      <text:p text:style-name="P186"><text:span text:style-name="T364">1 </text:span><text:span text:style-name="T115">#include </text:span><text:span text:style-name="T116">&lt;stdio.h&gt;</text:span></text:p>
      <text:p text:style-name="P188"/>
      <text:p text:style-name="P262"><text:span text:style-name="T364">2 </text:span><text:span text:style-name="T115">int</text:span> main(<text:span text:style-name="T115">int</text:span> argc, <text:span text:style-name="T115">char</text:span> *argv<text:span text:style-name="T115">[]</text:span>, <text:span text:style-name="T115">char</text:span> *envp<text:span text:style-name="T115">[]</text:span>) {</text:p>
      <text:p text:style-name="P262"><text:span text:style-name="T364">3 <text:tab/></text:span>printf(<text:span text:style-name="T116">"Environment variables:\n\n"</text:span>);</text:p>
      <text:p text:style-name="P188"/>
      <text:p text:style-name="P262"><text:span text:style-name="T364">4 <text:tab/></text:span><text:span text:style-name="T115">for</text:span> (<text:span text:style-name="T115">int</text:span> i = <text:span text:style-name="T127">0</text:span>; envp[i] != <text:span text:style-name="T115">NULL</text:span>; i++) {</text:p>
      <text:p text:style-name="P262"><text:span text:style-name="T364">5<text:tab/><text:tab/></text:span>printf(<text:span text:style-name="T116">"%s\n"</text:span>, envp[i]);</text:p>
      <text:p text:style-name="P263"><text:span text:style-name="T365">6 <text:tab/></text:span><text:span text:style-name="T124">}</text:span></text:p>
      <text:p text:style-name="P262"><text:span text:style-name="T364">7 <text:tab/></text:span><text:span text:style-name="T115">return</text:span> <text:span text:style-name="T127">0</text:span>;</text:p>
      <text:p text:style-name="P263"><text:span text:style-name="T365">8 </text:span><text:span text:style-name="T124">}</text:span></text:p>
      <text:p text:style-name="Horizontal_20_Line"/>
      <text:p text:style-name="P264">showenv.c</text:p>
      <text:p text:style-name="P265"/>
      <text:p text:style-name="P266">The<text:span text:style-name="T366"> </text:span><text:span text:style-name="T75">envp</text:span> <text:span text:style-name="T358">argument </text:span>is automatically populated with the environment variables. </text:p>
      <text:p text:style-name="P257"><text:span text:style-name="T367">The </text:span><text:span text:style-name="T360">for</text:span><text:span text:style-name="T367"> loop at line 4, retrieves and prints all the elements of the </text:span><text:span text:style-name="T360">envp</text:span><text:span text:style-name="T367"> array. </text:span></text:p>
      <text:p text:style-name="P265"/>
      <table:table table:name="Table11" table:style-name="Table11">
        <table:table-column table:style-name="Table11.A"/>
        <table:table-row>
          <table:table-cell table:style-name="Table11.A1" office:value-type="string">
            <text:p text:style-name="P26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53">./</text:span><text:span text:style-name="T368">showenv</text:span></text:p>
            <text:p text:style-name="P268"/>
            <text:p text:style-name="P268">Environment variables:</text:p>
            <text:p text:style-name="P268"/>
            <text:p text:style-name="P268">HOME=/home/users</text:p>
            <text:p text:style-name="P268">LANG=en_US.UTF-8</text:p>
            <text:p text:style-name="P268">LOGNAME=users</text:p>
            <text:p text:style-name="P268">PATH=/home/users/.local/bin:/usr/local/sbin:/usr/sbin:/sbin:/usr/local/bin:/usr/bin:/bin:/usr/local/</text:p>
            <text:p text:style-name="P269">...<text:span text:style-name="T349">output...</text:span></text:p>
          </table:table-cell>
        </table:table-row>
      </table:table>
      <text:p text:style-name="P265"/>
      <text:p text:style-name="P270">To <text:span text:style-name="T349">retrieve</text:span> the value of a variable from the environment we can use the following functions<text:note text:id="ftn32" text:note-class="footnote"><text:note-citation>30</text:note-citation><text:note-body><text:p text:style-name="P250"><text:span text:style-name="T369">See the </text:span><text:span text:style-name="T370">getenv(</text:span><text:span text:style-name="T371">3)</text:span><text:span text:style-name="T372"> manual page</text:span></text:p></text:note-body></text:note>.</text:p>
      <text:p text:style-name="P270"/>
      <table:table table:name="Table12" table:style-name="Table12">
        <table:table-column table:style-name="Table12.A"/>
        <table:table-row>
          <table:table-cell table:style-name="Table12.A1" office:value-type="string">
            <text:p text:style-name="P271"><text:span text:style-name="T115">#include </text:span><text:span text:style-name="T116">&lt;stdlib.h&gt;</text:span></text:p>
            <text:p text:style-name="P188"/>
            <text:p text:style-name="P186"><text:span text:style-name="T115">char</text:span> *<text:span text:style-name="T126">getenv</text:span>(<text:span text:style-name="T115">const</text:span> <text:span text:style-name="T115">char</text:span> <text:span text:style-name="T68">*name</text:span>);</text:p>
            <text:p text:style-name="P186"/>
            <text:p text:style-name="P186"><text:span text:style-name="T115">char</text:span> *<text:span text:style-name="T126">secure_getenv</text:span>(<text:span text:style-name="T115">const</text:span> <text:span text:style-name="T115">char</text:span> <text:span text:style-name="T68">*name</text:span>);</text:p>
            <text:p text:style-name="P183"/>
            <text:p text:style-name="P272"><text:s text:c="34"/>Return: a pointer to the value, NULL on error</text:p>
          </table:table-cell>
        </table:table-row>
      </table:table>
      <text:p text:style-name="P270"/>
      <text:p text:style-name="P273"><text:soft-page-break/><text:span text:style-name="T373">The </text:span><text:span text:style-name="T374">getenv</text:span><text:span text:style-name="T373"> function returns the value of the variable </text:span><text:span text:style-name="T374">name</text:span><text:span text:style-name="T373">. The </text:span><text:span text:style-name="T374">secure_getenv</text:span><text:span text:style-name="T373"> function returns </text:span><text:span text:style-name="T374">NULL</text:span><text:span text:style-name="T373"> when the </text:span><text:span text:style-name="T375">secure execution</text:span><text:span text:style-name="T373"> is required. The </text:span><text:span text:style-name="T375">secure execution </text:span><text:span text:style-name="T376">is required when one of the following conditions is true </text:span></text:p>
      <text:p text:style-name="P274"/>
      <text:list text:style-name="L9">
        <text:list-item>
          <text:p text:style-name="P275">The process’s effective user ID did not match its real user ID or the process effective group ID did not match its real group ID (set-user-ID, set-group-ID programs).</text:p>
        </text:list-item>
        <text:list-item>
          <text:p text:style-name="P275">The <text:span text:style-name="T68">effective capability bit</text:span> is set on the executable file</text:p>
        </text:list-item>
        <text:list-item>
          <text:p text:style-name="P275">The process has a nonempty capability set</text:p>
        </text:list-item>
      </text:list>
      <text:p text:style-name="P276"/>
      <text:p text:style-name="P277">To set the value of an environment variable we can use <text:span text:style-name="T349">the following functions</text:span><text:note text:id="ftn33" text:note-class="footnote"><text:note-citation>31</text:note-citation><text:note-body><text:p text:style-name="P162"><text:span text:style-name="T377">See the </text:span><text:span text:style-name="T371">setenv(3)</text:span><text:span text:style-name="T378"> manual page</text:span></text:p></text:note-body></text:note><text:span text:style-name="T349">.</text:span></text:p>
      <text:p text:style-name="P276"/>
      <table:table table:name="Table13" table:style-name="Table13">
        <table:table-column table:style-name="Table13.A"/>
        <table:table-row>
          <table:table-cell table:style-name="Table13.A1" office:value-type="string">
            <text:p text:style-name="P271"><text:span text:style-name="T115">#include </text:span><text:span text:style-name="T116">&lt;stdlib.h&gt;</text:span></text:p>
            <text:p text:style-name="P188"/>
            <text:p text:style-name="P229"><text:span text:style-name="T103">int</text:span><text:span text:style-name="T104"> </text:span><text:span text:style-name="T105">setenv</text:span><text:span text:style-name="T104">(</text:span><text:span text:style-name="T103">const</text:span><text:span text:style-name="T104"> </text:span><text:span text:style-name="T103">char</text:span><text:span text:style-name="T104"> </text:span><text:span text:style-name="T106">*name</text:span><text:span text:style-name="T104">, </text:span><text:span text:style-name="T103">const</text:span><text:span text:style-name="T104"> </text:span><text:span text:style-name="T103">char</text:span><text:span text:style-name="T104"> </text:span><text:span text:style-name="T106">*value</text:span><text:span text:style-name="T104">, </text:span><text:span text:style-name="T103">int</text:span><text:span text:style-name="T104"> </text:span><text:span text:style-name="T106">overwrite</text:span><text:span text:style-name="T104">);</text:span></text:p>
            <text:p text:style-name="P186"/>
            <text:p text:style-name="P229"><text:span text:style-name="T103">int</text:span><text:span text:style-name="T104"> </text:span><text:span text:style-name="T105">unsetenv</text:span><text:span text:style-name="T104">(</text:span><text:span text:style-name="T103">const</text:span><text:span text:style-name="T104"> </text:span><text:span text:style-name="T103">char</text:span><text:span text:style-name="T104"> </text:span><text:span text:style-name="T106">*name</text:span><text:span text:style-name="T104">);</text:span></text:p>
            <text:p text:style-name="P278"/>
            <text:p text:style-name="P278"><text:s text:c="31"/>Return: 0 on success, -1 on error and sets errno</text:p>
          </table:table-cell>
        </table:table-row>
      </table:table>
      <text:p text:style-name="P279"/>
      <text:p text:style-name="P280"><text:span text:style-name="T379">The </text:span><text:span text:style-name="T380">setenv</text:span><text:span text:style-name="T379"> function sets the value </text:span><text:span text:style-name="T380">value</text:span><text:span text:style-name="T379"> of the </text:span><text:span text:style-name="T380">name</text:span><text:span text:style-name="T379"> environment variable and overwrite it if </text:span><text:span text:style-name="T380">overwrite</text:span><text:span text:style-name="T379"> is nonzero. This function makes copies of the strings pointed to by </text:span><text:span text:style-name="T380">name</text:span><text:span text:style-name="T379"> and </text:span><text:span text:style-name="T380">value</text:span><text:span text:style-name="T379">. </text:span></text:p>
      <text:p text:style-name="P280"><text:span text:style-name="T379">The </text:span><text:span text:style-name="T380">unsetenv</text:span><text:span text:style-name="T379"> function deletes the variable from the environment. </text:span></text:p>
      <text:p text:style-name="P281"/>
      <text:p text:style-name="P282"><text:span text:style-name="T381">In addition,</text:span><text:span text:style-name="T379"> the </text:span><text:span text:style-name="T380">putenv</text:span><text:span text:style-name="T380"><text:note text:id="ftn34" text:note-class="footnote"><text:note-citation>32</text:note-citation><text:note-body><text:p text:style-name="P162"><text:span text:style-name="T377">See the </text:span><text:span text:style-name="T382">putenv(3)</text:span><text:span text:style-name="T383"> manual page</text:span></text:p></text:note-body></text:note></text:span><text:span text:style-name="T379"> function can be used to set/change the value of an environment variable.</text:span></text:p>
      <text:p text:style-name="P279"/>
      <table:table table:name="Table14" table:style-name="Table14">
        <table:table-column table:style-name="Table14.A"/>
        <table:table-row>
          <table:table-cell table:style-name="Table14.A1" office:value-type="string">
            <text:p text:style-name="P271"><text:span text:style-name="T115">#include </text:span><text:span text:style-name="T116">&lt;stdlib.h&gt;</text:span></text:p>
            <text:p text:style-name="P188"/>
            <text:p text:style-name="P186"><text:span text:style-name="T115">int</text:span> <text:span text:style-name="T126">putenv</text:span>(<text:span text:style-name="T115">char</text:span> <text:span text:style-name="T68">*string</text:span>);</text:p>
            <text:p text:style-name="P283"/>
            <text:p text:style-name="P284"><text:s text:c="25"/>Returns: 0 on success, nonzero on error and sets errno</text:p>
          </table:table-cell>
        </table:table-row>
      </table:table>
      <text:p text:style-name="P279"/>
      <text:p text:style-name="P282"><text:span text:style-name="T384">The </text:span><text:span text:style-name="T380">string</text:span><text:span text:style-name="T384"> argument is in the form </text:span><text:span text:style-name="T380">name=value</text:span><text:span text:style-name="T384">. If </text:span><text:span text:style-name="T380">name</text:span><text:span text:style-name="T384"> does not already exists in the environment is added to it. If </text:span><text:span text:style-name="T380">string</text:span><text:span text:style-name="T384"> does not include an equal (=) sign then the variabile </text:span><text:span text:style-name="T385">name </text:span><text:span text:style-name="T384">is removed from the environment. </text:span><text:span text:style-name="T380">putenv</text:span><text:span text:style-name="T386"> does not make copies of the string pointed to by </text:span><text:span text:style-name="T380">string</text:span><text:span text:style-name="T386">. The string pointed to by </text:span><text:span text:style-name="T380">string</text:span><text:span text:style-name="T386"> becomes part of the environment, so altering the string changes the environment.</text:span></text:p>
      <text:p text:style-name="P285"/>
      <text:p text:style-name="P282"><text:span text:style-name="T387">The </text:span><text:span text:style-name="T380">clearenv</text:span><text:span text:style-name="T380"><text:note text:id="ftn35" text:note-class="footnote"><text:note-citation>33</text:note-citation><text:note-body><text:p text:style-name="P162"><text:span text:style-name="T388">See the </text:span><text:span text:style-name="T389">clearenv(3)</text:span><text:span text:style-name="T383"> manual page</text:span></text:p></text:note-body></text:note></text:span><text:span text:style-name="T387"> function clears the environment of all </text:span><text:span text:style-name="T390">name-value</text:span><text:span text:style-name="T387"> pairs and sets the value of the external variable </text:span><text:span text:style-name="T380">environ</text:span><text:span text:style-name="T387"> to </text:span><text:span text:style-name="T380">NULL</text:span><text:span text:style-name="T387">. </text:span></text:p>
      <text:p text:style-name="P286"/>
      <table:table table:name="Table15" table:style-name="Table15">
        <table:table-column table:style-name="Table15.A"/>
        <table:table-row>
          <table:table-cell table:style-name="Table15.A1" office:value-type="string">
            <text:p text:style-name="P287"><text:span text:style-name="T115">#include </text:span><text:span text:style-name="T116">&lt;stdlib.h&gt;</text:span></text:p>
            <text:p text:style-name="P288"/>
            <text:p text:style-name="P289"><text:span text:style-name="T115">int</text:span> <text:span text:style-name="T391">clearenv</text:span>(<text:span text:style-name="T392">void</text:span>);</text:p>
            <text:p text:style-name="P290"/>
            <text:p text:style-name="P291"><text:s text:c="40"/>Returns: 0 on success, nonzero on error</text:p>
          </table:table-cell>
        </table:table-row>
      </table:table>
      <text:p text:style-name="P286"/>
      <text:p text:style-name="P292"/>
      <text:p text:style-name="P282"><text:soft-page-break/><text:span text:style-name="T381">O</text:span><text:span text:style-name="T393">n Linux, </text:span><text:span text:style-name="T381">t</text:span><text:span text:style-name="T393">he environment is explained in the </text:span><text:span text:style-name="T385">environ(7)</text:span><text:span text:style-name="T393"> manual page. It is defined as a pointer to an array of pointers to strings </text:span><text:span text:style-name="T381">named </text:span><text:span text:style-name="T385">environ</text:span><text:span text:style-name="T381">.</text:span><text:span text:style-name="T381"><text:note text:id="ftn36" text:note-class="footnote"><text:note-citation>34</text:note-citation><text:note-body><text:p text:style-name="P293"><text:span text:style-name="T378">The </text:span><text:span text:style-name="T349">reader is encouraged to</text:span><text:span text:style-name="T378"> read </text:span><text:span text:style-name="T358">also </text:span><text:span text:style-name="T378">the </text:span><text:span text:style-name="T389">environ(3POSIX)</text:span><text:span text:style-name="T378"> POSIX manual page:</text:span></text:p></text:note-body></text:note></text:span></text:p>
      <text:p text:style-name="P292"/>
      <table:table table:name="Table16" table:style-name="Table16">
        <table:table-column table:style-name="Table16.A"/>
        <table:table-row>
          <table:table-cell table:style-name="Table16.A1" office:value-type="string">
            <text:p text:style-name="P294"><text:span text:style-name="T101">extern</text:span><text:span text:style-name="T124"> </text:span><text:span text:style-name="T101">char</text:span><text:span text:style-name="T124"> **environ;</text:span></text:p>
          </table:table-cell>
        </table:table-row>
      </table:table>
      <text:p text:style-name="P292"/>
      <text:p text:style-name="P295"><text:span text:style-name="T393"><text:s/></text:span><text:span text:style-name="T394">To print the environment is also available the </text:span><text:span text:style-name="T380">printenv</text:span><text:span text:style-name="T380"><text:note text:id="ftn37" text:note-class="footnote"><text:note-citation>35</text:note-citation><text:note-body><text:p text:style-name="P162"><text:span text:style-name="T378">See the </text:span><text:span text:style-name="T389">printenv(1)</text:span><text:span text:style-name="T383"> manual page</text:span></text:p></text:note-body></text:note></text:span><text:span text:style-name="T394"> command.</text:span></text:p>
      <text:p text:style-name="P279"/>
      <table:table table:name="Table17" table:style-name="Table17">
        <table:table-column table:style-name="Table17.A"/>
        <table:table-row>
          <table:table-cell table:style-name="Table17.A1" office:value-type="string">
            <text:p text:style-name="P29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95">printenv</text:span></text:p>
            <text:p text:style-name="P297">...<text:span text:style-name="T349">output...</text:span></text:p>
          </table:table-cell>
        </table:table-row>
      </table:table>
      <text:p text:style-name="P298"/>
      <text:p text:style-name="P295"><text:span text:style-name="T394">The </text:span><text:span text:style-name="Source_20_Text"><text:span text:style-name="T380">env_manage.c</text:span></text:span><text:span text:style-name="T394"> program demonstrates how to manipulate and inspect environment variables from within a C program.</text:span><text:span text:style-name="T396"> </text:span></text:p>
      <text:p text:style-name="Horizontal_20_Line"/>
      <text:p text:style-name="P186"><text:span text:style-name="T397">1 </text:span><text:span text:style-name="T115">#include </text:span><text:span text:style-name="T116">&lt;stdio.h&gt;</text:span></text:p>
      <text:p text:style-name="P299"><text:span text:style-name="T398">2</text:span><text:span text:style-name="T397"> </text:span><text:span text:style-name="T115">#include </text:span><text:span text:style-name="T116">&lt;stdlib.h&gt;</text:span></text:p>
      <text:p text:style-name="P299"><text:span text:style-name="T398">3</text:span><text:span text:style-name="T397"> </text:span><text:span text:style-name="T115">#include </text:span><text:span text:style-name="T116">&lt;string.h&gt;</text:span></text:p>
      <text:p text:style-name="P188"/>
      <text:p text:style-name="P299"><text:span text:style-name="T398">4</text:span><text:span text:style-name="T397"> </text:span><text:span text:style-name="T115">int</text:span> main(<text:span text:style-name="T115">int</text:span> argc, <text:span text:style-name="T115">char</text:span> *argv<text:span text:style-name="T115">[]</text:span>, <text:span text:style-name="T115">char</text:span> *envp<text:span text:style-name="T115">[]</text:span>) {</text:p>
      <text:p text:style-name="P299"><text:span text:style-name="T398">5</text:span><text:span text:style-name="T397"> <text:tab/></text:span><text:span text:style-name="T115">if</text:span> (argc &lt; <text:span text:style-name="T127">2</text:span> || (argc != <text:span text:style-name="T127">3</text:span> &amp;&amp; strcmp(argv[<text:span text:style-name="T127">1</text:span>], <text:span text:style-name="T116">"print"</text:span>) != <text:span text:style-name="T127">0</text:span>)) {</text:p>
      <text:p text:style-name="P299"><text:span text:style-name="T398">6</text:span><text:span text:style-name="T397"> <text:tab/><text:tab/></text:span>fprintf(<text:span text:style-name="T115">stderr</text:span>, <text:span text:style-name="T116">"Usage:\n"</text:span>);</text:p>
      <text:p text:style-name="P299"><text:span text:style-name="T398">7</text:span><text:span text:style-name="T397"> <text:tab/><text:tab/></text:span>fprintf(<text:span text:style-name="T115">stderr</text:span>, <text:span text:style-name="T116">" %s add &lt;VAR_NAME&gt; &lt;VALUE&gt;\n"</text:span>, argv[<text:span text:style-name="T127">0</text:span>]);</text:p>
      <text:p text:style-name="P300"><text:span text:style-name="T398">8</text:span><text:span text:style-name="T397"> <text:tab/><text:tab/></text:span>fprintf(<text:span text:style-name="T115">stderr</text:span>, <text:span text:style-name="T116">" %s change &lt;VAR_NAME&gt; &lt;NEW_VALUE&gt;\n"</text:span>, </text:p>
      <text:p text:style-name="P300"><text:tab/><text:tab/><text:tab/> <text:s text:c="2"/>argv[<text:span text:style-name="T127">0</text:span>]);</text:p>
      <text:p text:style-name="P299"><text:span text:style-name="T398">9</text:span><text:span text:style-name="T397"> <text:tab/><text:tab/></text:span>fprintf(<text:span text:style-name="T115">stderr</text:span>, <text:span text:style-name="T116">" %s delete &lt;VAR_NAME&gt;\n"</text:span>, argv[<text:span text:style-name="T127">0</text:span>]);</text:p>
      <text:p text:style-name="P299"><text:span text:style-name="T397">1</text:span><text:span text:style-name="T398">0</text:span><text:span text:style-name="T397"> <text:tab/><text:tab/></text:span>fprintf(<text:span text:style-name="T115">stderr</text:span>, <text:span text:style-name="T116">" %s print\n"</text:span>, argv[<text:span text:style-name="T127">0</text:span>]);</text:p>
      <text:p text:style-name="P299"><text:span text:style-name="T397">1</text:span><text:span text:style-name="T398">1</text:span><text:span text:style-name="T397"> <text:tab/><text:tab/></text:span><text:span text:style-name="T115">return</text:span> <text:span text:style-name="T127">1</text:span>;</text:p>
      <text:p text:style-name="P299"><text:span text:style-name="T397">1</text:span><text:span text:style-name="T398">2</text:span><text:span text:style-name="T397"> </text:span>}</text:p>
      <text:p text:style-name="P188"/>
      <text:p text:style-name="P299"><text:span text:style-name="T397">1</text:span><text:span text:style-name="T398">3</text:span><text:span text:style-name="T397"> <text:tab/></text:span><text:span text:style-name="T115">const</text:span> <text:span text:style-name="T115">char</text:span> *action = argv[<text:span text:style-name="T127">1</text:span>];</text:p>
      <text:p text:style-name="P299"><text:span text:style-name="T397">1</text:span><text:span text:style-name="T398">4</text:span><text:span text:style-name="T397"> <text:tab/></text:span><text:span text:style-name="T115">const</text:span> <text:span text:style-name="T115">char</text:span> *var_name = argv[<text:span text:style-name="T127">2</text:span>];</text:p>
      <text:p text:style-name="P299"><text:span text:style-name="T397">1</text:span><text:span text:style-name="T398">5</text:span><text:span text:style-name="T397"> <text:tab/></text:span><text:span text:style-name="T115">const</text:span> <text:span text:style-name="T115">char</text:span> *var_value = (argc &gt;= <text:span text:style-name="T127">4</text:span>) ? argv[<text:span text:style-name="T127">3</text:span>] : <text:span text:style-name="T115">NULL</text:span>;</text:p>
      <text:p text:style-name="P188"/>
      <text:p text:style-name="P299"><text:span text:style-name="T397">1</text:span><text:span text:style-name="T398">6</text:span><text:span text:style-name="T397"> <text:tab/></text:span><text:span text:style-name="T115">if</text:span> (strcmp(action, <text:span text:style-name="T116">"add"</text:span>) == <text:span text:style-name="T127">0</text:span>) {</text:p>
      <text:p text:style-name="P299"><text:span text:style-name="T397">1</text:span><text:span text:style-name="T398">7</text:span><text:span text:style-name="T397"> <text:tab/><text:tab/></text:span><text:span text:style-name="T115">if</text:span> (var_value == <text:span text:style-name="T115">NULL</text:span>) {</text:p>
      <text:p text:style-name="P299"><text:span text:style-name="T397">1</text:span><text:span text:style-name="T398">8</text:span><text:span text:style-name="T397"> <text:tab/><text:tab/><text:tab/></text:span>fprintf(<text:span text:style-name="T115">stderr</text:span>, <text:span text:style-name="T116">"Missing value for 'add'\n"</text:span>);</text:p>
      <text:p text:style-name="P299"><text:span text:style-name="T397">1</text:span><text:span text:style-name="T398">9</text:span><text:span text:style-name="T397"> <text:tab/><text:tab/><text:tab/></text:span><text:span text:style-name="T115">return</text:span> <text:span text:style-name="T127">1</text:span>;</text:p>
      <text:p text:style-name="P301"><text:span text:style-name="T399">20</text:span><text:span text:style-name="T400"> <text:tab/><text:tab/></text:span><text:span text:style-name="T124">}</text:span></text:p>
      <text:p text:style-name="P299"><text:span text:style-name="T398">2</text:span><text:span text:style-name="T397">1 <text:tab/><text:tab/></text:span><text:span text:style-name="T115">if</text:span> (<text:span text:style-name="T126">getenv</text:span>(var_name)) {</text:p>
      <text:p text:style-name="P300"><text:span text:style-name="T398">22</text:span><text:span text:style-name="T397"> <text:tab/><text:tab/><text:tab/></text:span>printf(<text:span text:style-name="T116">"Variable %s already exists: %s\n"</text:span>, var_name, </text:p>
      <text:p text:style-name="P302"><text:span text:style-name="T104"><text:tab/><text:tab/><text:tab/> <text:s/><text:tab/> <text:s/></text:span><text:span text:style-name="T105">getenv</text:span><text:span text:style-name="T104">(var_name));</text:span></text:p>
      <text:p text:style-name="P299"><text:span text:style-name="T398">23</text:span><text:span text:style-name="T397"> <text:tab/><text:tab/></text:span>} <text:span text:style-name="T115">else</text:span> {</text:p>
      <text:p text:style-name="P299"><text:span text:style-name="T398">24</text:span><text:span text:style-name="T397"> <text:tab/><text:tab/><text:tab/></text:span><text:span text:style-name="T115">if</text:span> (<text:span text:style-name="T126">setenv</text:span>(var_name, var_value, <text:span text:style-name="T127">0</text:span>) != <text:span text:style-name="T127">0</text:span>) {</text:p>
      <text:p text:style-name="P299"><text:span text:style-name="T398">25</text:span><text:span text:style-name="T397"> <text:tab/><text:tab/><text:tab/><text:tab/></text:span>perror(<text:span text:style-name="T116">"setenv"</text:span>);</text:p>
      <text:p text:style-name="P299"><text:span text:style-name="T398">26</text:span><text:span text:style-name="T397"> <text:tab/><text:tab/><text:tab/><text:tab/></text:span><text:span text:style-name="T115">return</text:span> <text:span text:style-name="T127">1</text:span>;</text:p>
      <text:p text:style-name="P299"><text:span text:style-name="T398">27</text:span><text:span text:style-name="T397"> <text:tab/><text:tab/><text:tab/></text:span>}</text:p>
      <text:p text:style-name="P302"><text:span text:style-name="T401">28</text:span><text:span text:style-name="T402"> <text:tab/><text:tab/><text:tab/></text:span><text:span text:style-name="T104">printf(</text:span><text:span text:style-name="T403">"Added %s=%s\n"</text:span><text:span text:style-name="T104">, var_name, </text:span><text:span text:style-name="T105">getenv</text:span><text:span text:style-name="T104">(var_name));</text:span></text:p>
      <text:p text:style-name="P299"><text:span text:style-name="T398">29</text:span><text:span text:style-name="T397"> <text:tab/><text:tab/></text:span>}</text:p>
      <text:p text:style-name="P188"><text:soft-page-break/></text:p>
      <text:p text:style-name="P299"><text:span text:style-name="T398">30</text:span><text:span text:style-name="T397"> <text:tab/></text:span>} <text:span text:style-name="T115">else</text:span> <text:span text:style-name="T115">if</text:span> (strcmp(action, <text:span text:style-name="T116">"change"</text:span>) == <text:span text:style-name="T127">0</text:span>) {</text:p>
      <text:p text:style-name="P299"><text:span text:style-name="T398">31</text:span><text:span text:style-name="T397"> <text:tab/><text:tab/></text:span><text:span text:style-name="T115">if</text:span> (var_value == <text:span text:style-name="T115">NULL</text:span>) {</text:p>
      <text:p text:style-name="P299"><text:span text:style-name="T398">32</text:span><text:span text:style-name="T397"> <text:tab/><text:tab/><text:tab/></text:span>fprintf(<text:span text:style-name="T115">stderr</text:span>, <text:span text:style-name="T116">"Missing value for 'change'\n"</text:span>);</text:p>
      <text:p text:style-name="P299"><text:span text:style-name="T398">33</text:span><text:span text:style-name="T397"> <text:tab/><text:tab/><text:tab/></text:span><text:span text:style-name="T115">return</text:span> <text:span text:style-name="T127">1</text:span>;</text:p>
      <text:p text:style-name="P301"><text:span text:style-name="T399">34</text:span><text:span text:style-name="T400"> <text:tab/><text:tab/></text:span><text:span text:style-name="T124">}</text:span></text:p>
      <text:p text:style-name="P299"><text:span text:style-name="T398">35</text:span><text:span text:style-name="T397"> <text:tab/><text:tab/></text:span><text:span text:style-name="T115">if</text:span> (<text:span text:style-name="T126">setenv</text:span>(var_name, var_value, <text:span text:style-name="T127">1</text:span>) != <text:span text:style-name="T127">0</text:span>) {</text:p>
      <text:p text:style-name="P299"><text:span text:style-name="T398">36</text:span><text:span text:style-name="T397"> <text:tab/><text:tab/><text:tab/></text:span>perror(<text:span text:style-name="T116">"setenv"</text:span>);</text:p>
      <text:p text:style-name="P299"><text:span text:style-name="T398">37</text:span><text:span text:style-name="T397"> <text:tab/><text:tab/><text:tab/></text:span><text:span text:style-name="T115">return</text:span> <text:span text:style-name="T127">1</text:span>;</text:p>
      <text:p text:style-name="P299"><text:span text:style-name="T398">38</text:span><text:span text:style-name="T397"> <text:tab/><text:tab/></text:span>}</text:p>
      <text:p text:style-name="P302"><text:span text:style-name="T401">39</text:span><text:span text:style-name="T402"> <text:tab/><text:tab/></text:span><text:span text:style-name="T104">printf(</text:span><text:span text:style-name="T403">"Changed %s=%s\n"</text:span><text:span text:style-name="T104">, var_name, </text:span><text:span text:style-name="T105">getenv</text:span><text:span text:style-name="T104">(var_name));</text:span></text:p>
      <text:p text:style-name="P299"><text:span text:style-name="T398">40</text:span><text:span text:style-name="T397"> <text:tab/></text:span>} <text:span text:style-name="T115">else</text:span> <text:span text:style-name="T115">if</text:span> (strcmp(action, <text:span text:style-name="T116">"delete"</text:span>) == <text:span text:style-name="T127">0</text:span>) {</text:p>
      <text:p text:style-name="P299"><text:span text:style-name="T398">4</text:span><text:span text:style-name="T397">1 <text:tab/><text:tab/></text:span><text:span text:style-name="T115">if</text:span> (<text:span text:style-name="T126">unsetenv</text:span>(var_name) != <text:span text:style-name="T127">0</text:span>) {</text:p>
      <text:p text:style-name="P299"><text:span text:style-name="T398">42</text:span><text:span text:style-name="T397"> <text:tab/><text:tab/><text:tab/></text:span>perror(<text:span text:style-name="T116">"unsetenv"</text:span>);</text:p>
      <text:p text:style-name="P299"><text:span text:style-name="T398">43</text:span><text:span text:style-name="T397"> <text:tab/><text:tab/><text:tab/></text:span><text:span text:style-name="T115">return</text:span> <text:span text:style-name="T127">1</text:span>;</text:p>
      <text:p text:style-name="P299"><text:span text:style-name="T398">44</text:span><text:span text:style-name="T397"> <text:tab/><text:tab/></text:span>}</text:p>
      <text:p text:style-name="P300"><text:span text:style-name="T398">45</text:span><text:span text:style-name="T397"> <text:tab/><text:tab/></text:span>printf(<text:span text:style-name="T116">"Deleted %s (current value: %s)\n"</text:span>, var_name, </text:p>
      <text:p text:style-name="P303"><text:span text:style-name="T104"><text:tab/><text:tab/><text:tab/> <text:s/></text:span><text:span text:style-name="T105">getenv</text:span><text:span text:style-name="T104">(var_name) ? </text:span><text:span text:style-name="T404">46</text:span><text:span text:style-name="T402"> </text:span><text:span text:style-name="T105">getenv</text:span><text:span text:style-name="T104">(var_name) : </text:span><text:span text:style-name="T403">"NULL"</text:span><text:span text:style-name="T104">);</text:span></text:p>
      <text:p text:style-name="P299"><text:span text:style-name="T398">47</text:span><text:span text:style-name="T397"> <text:tab/></text:span>} <text:span text:style-name="T115">else</text:span> <text:span text:style-name="T115">if</text:span> (strcmp(action, <text:span text:style-name="T116">"print"</text:span>) == <text:span text:style-name="T127">0</text:span>) {</text:p>
      <text:p text:style-name="P299"><text:span text:style-name="T398">48</text:span><text:span text:style-name="T397"> <text:tab/><text:tab/><text:tab/></text:span><text:span text:style-name="T115">for</text:span> (<text:span text:style-name="T115">int</text:span> i = <text:span text:style-name="T127">0</text:span>; envp[i] != <text:span text:style-name="T115">NULL</text:span>; i++) {</text:p>
      <text:p text:style-name="P299"><text:span text:style-name="T398">49</text:span><text:span text:style-name="T397"> <text:tab/><text:tab/><text:tab/><text:tab/></text:span>printf(<text:span text:style-name="T116">"%s\n"</text:span>, envp[i]);</text:p>
      <text:p text:style-name="P299"><text:span text:style-name="T398">50</text:span><text:span text:style-name="T397"> <text:tab/><text:tab/><text:tab/></text:span>}</text:p>
      <text:p text:style-name="P299"><text:span text:style-name="T398">5</text:span><text:span text:style-name="T397">1 <text:tab/></text:span>} <text:span text:style-name="T115">else</text:span> {</text:p>
      <text:p text:style-name="P300"><text:span text:style-name="T398">52</text:span><text:span text:style-name="T397"> <text:tab/><text:tab/></text:span>fprintf(<text:span text:style-name="T115">stderr</text:span>, <text:span text:style-name="T116">"Unknown action: %s (use add, change, delete </text:span></text:p>
      <text:p text:style-name="P304"><text:tab/><text:tab/><text:tab/> <text:s text:c="2"/>or print)<text:span text:style-name="T405">\</text:span>n"<text:span text:style-name="T283">, action);</text:span></text:p>
      <text:p text:style-name="P299"><text:span text:style-name="T398">53</text:span><text:span text:style-name="T397"> <text:tab/><text:tab/></text:span><text:span text:style-name="T115">return</text:span> <text:span text:style-name="T127">1</text:span>;</text:p>
      <text:p text:style-name="P301"><text:span text:style-name="T399">54</text:span><text:span text:style-name="T400"> <text:tab/></text:span><text:span text:style-name="T124">}</text:span></text:p>
      <text:p text:style-name="P299"><text:span text:style-name="T398">55</text:span><text:span text:style-name="T397"> <text:tab/></text:span><text:span text:style-name="T115">return</text:span> <text:span text:style-name="T127">0</text:span>;</text:p>
      <text:p text:style-name="P301"><text:span text:style-name="T399">56</text:span><text:span text:style-name="T400"> </text:span><text:span text:style-name="T124">}</text:span></text:p>
      <text:p text:style-name="Horizontal_20_Line"/>
      <text:p text:style-name="P305">env_manage.c</text:p>
      <text:p text:style-name="P306"/>
      <text:p text:style-name="Standard"><text:span text:style-name="Strong_20_Emphasis"><text:span text:style-name="T220">Line 16–29.</text:span></text:span><text:span text:style-name="T220"> Adds a new environment variable if it does not already exist. It first checks whether the <text:tab/> <text:s text:c="7"/>variable is already defined using </text:span><text:span text:style-name="Source_20_Text"><text:span text:style-name="T221">getenv</text:span></text:span><text:span text:style-name="T220">. If it exists, the program prints its current <text:tab/> <text:s text:c="7"/>value. Otherwise, it uses </text:span><text:span text:style-name="Source_20_Text"><text:span text:style-name="T221">setenv</text:span></text:span><text:span text:style-name="T220"> with the </text:span><text:span text:style-name="Source_20_Text"><text:span text:style-name="T221">overwrite</text:span></text:span><text:span text:style-name="T220"> flag set to </text:span><text:span text:style-name="Source_20_Text"><text:span text:style-name="T221">0</text:span></text:span><text:span text:style-name="T220"> to create the <text:tab/> <text:s text:c="3"/><text:tab/> <text:s text:c="7"/>variable without replacing an existing one</text:span></text:p>
      <text:p text:style-name="Standard"><text:span text:style-name="Strong_20_Emphasis"><text:span text:style-name="T220">Line 30–39.</text:span></text:span><text:span text:style-name="T220"> Changes the value of an existing environment variable. The function </text:span><text:span text:style-name="Source_20_Text"><text:span text:style-name="T221">setenv</text:span></text:span><text:span text:style-name="T220"> is called <text:tab/> <text:s text:c="7"/>with the overwrite flag set to </text:span><text:span text:style-name="Source_20_Text"><text:span text:style-name="T221">1</text:span></text:span><text:span text:style-name="T220">, which forces the update even if the variable already <text:tab/> <text:s text:c="7"/>exists. The updated value is then retrieved using </text:span><text:span text:style-name="Source_20_Text"><text:span text:style-name="T221">getenv</text:span></text:span><text:span text:style-name="T220"> and displayed</text:span></text:p>
      <text:p text:style-name="Standard"><text:span text:style-name="Strong_20_Emphasis"><text:span text:style-name="T220">Line 40–46.</text:span></text:span><text:span text:style-name="T220"> Deletes an existing environment variable. The function </text:span><text:span text:style-name="Source_20_Text"><text:span text:style-name="T221">unsetenv</text:span></text:span><text:span text:style-name="T220"> removes the <text:tab/> <text:s text:c="3"/><text:tab/> <text:s text:c="7"/>variable from the environment. After deletion, the program attempts to print its value, <text:tab/> <text:s text:c="7"/>which should return </text:span><text:span text:style-name="Source_20_Text"><text:span text:style-name="T221">NULL</text:span></text:span><text:span text:style-name="T220"> since the variable no longer exists</text:span></text:p>
      <text:p text:style-name="Standard"><text:span text:style-name="Strong_20_Emphasis"><text:span text:style-name="T220">Line 47–50.</text:span></text:span><text:span text:style-name="T220"> Prints all environment variables. The program iterates through the </text:span><text:span text:style-name="Source_20_Text"><text:span text:style-name="T221">envp</text:span></text:span><text:span text:style-name="T220"> array, which <text:tab/> <text:s text:c="7"/>contains all environment strings in the form </text:span><text:span text:style-name="Source_20_Text"><text:span text:style-name="T221">NAME=VALUE</text:span></text:span><text:span text:style-name="T220">, and prints each entry line <text:tab/> <text:s text:c="7"/>by lin</text:span><text:span text:style-name="T406">e</text:span></text:p>
      <text:p text:style-name="P307"/>
      <text:p text:style-name="P308"/>
      <text:p text:style-name="P308"/>
      <text:p text:style-name="P308"/>
      <text:p text:style-name="P309"/>
      <table:table table:name="Table8" table:style-name="Table8">
        <table:table-column table:style-name="Table8.A"/>
        <text:soft-page-break/>
        <table:table-row>
          <table:table-cell table:style-name="Table8.A1" office:value-type="string">
            <text:p text:style-name="Standard"><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53">./</text:span><text:span text:style-name="T407">env_manage</text:span></text:p>
            <text:p text:style-name="P310">Usage: </text:p>
            <text:p text:style-name="P310"><text:s text:c="4"/>./env_manage add &lt;VAR_NAME&gt;  </text:p>
            <text:p text:style-name="P310"><text:s text:c="4"/>./env_manage change &lt;VAR_NAME&gt; &lt;NEW_VALUE&gt; </text:p>
            <text:p text:style-name="P310"><text:s text:c="4"/>./env_manage delete &lt;VAR_NAME&gt;</text:p>
          </table:table-cell>
        </table:table-row>
      </table:table>
      <text:p text:style-name="P309"/>
      <text:p text:style-name="P309">The reader is encouraged to run the program in order to test the different available options and observe how each operation affects the environment variables in practic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11"><text:soft-page-break/><text:span text:style-name="T408">III.</text:span><text:span text:style-name="T409">2</text:span><text:span text:style-name="T408">.</text:span><text:span text:style-name="T410">2</text:span><text:span text:style-name="T408"> </text:span><text:span text:style-name="T229">Environment during an </text:span><text:span text:style-name="T75">execve</text:span></text:p>
      <text:p text:style-name="P312"/>
      <text:p text:style-name="P313"><text:span text:style-name="T411">When using </text:span><text:span text:style-name="Source_20_Text"><text:span text:style-name="T412">execve</text:span></text:span><text:span text:style-name="T411">, the child process can be executed with different environments depending on the arguments provided. The child:</text:span></text:p>
      <text:p text:style-name="P314"/>
      <text:list text:style-name="L10">
        <text:list-item>
          <text:p text:style-name="P315">may inherit exactly the same environment as the parent process</text:p>
        </text:list-item>
        <text:list-item>
          <text:p text:style-name="P315">run with a completely custom environment</text:p>
        </text:list-item>
        <text:list-item>
          <text:p text:style-name="P315">execute with the parent’s environment extended by additional user-defined variables</text:p>
          <text:p text:style-name="P315"/>
        </text:list-item>
      </text:list>
      <text:p text:style-name="P314">This flexibility allows programs to control how external applications access configuration settings and environment variables.</text:p>
      <text:p text:style-name="P316"/>
      <text:p text:style-name="P317"><text:span text:style-name="T413">The </text:span><text:span text:style-name="Source_20_Text"><text:span text:style-name="T412">getvar.c</text:span></text:span><text:span text:style-name="T413"> </text:span><text:span text:style-name="T411">program </text:span><text:span text:style-name="T413">retrieves the value of </text:span><text:span text:style-name="T411">the</text:span><text:span text:style-name="T413"> env</text:span><text:span text:style-name="T411">ironment</text:span><text:span text:style-name="T413"> variable passed as its first argument.</text:span></text:p>
      <text:p text:style-name="P316"/>
      <text:p text:style-name="Horizontal_20_Line"/>
      <text:p text:style-name="P186"><text:span text:style-name="T414">1 </text:span><text:span text:style-name="T115">#include </text:span><text:span text:style-name="T116">&lt;stdio.h&gt;</text:span></text:p>
      <text:p text:style-name="P318"><text:span text:style-name="T414">2 </text:span><text:span text:style-name="T115">#include </text:span><text:span text:style-name="T116">&lt;stdlib.h&gt;</text:span></text:p>
      <text:p text:style-name="P188"/>
      <text:p text:style-name="P319"><text:span text:style-name="T415">3 </text:span><text:span text:style-name="T101">int</text:span><text:span text:style-name="T124"> main (</text:span><text:span text:style-name="T101">int</text:span><text:span text:style-name="T124"> argc, </text:span><text:span text:style-name="T101">char</text:span><text:span text:style-name="T124"> *argv</text:span><text:span text:style-name="T101">[]</text:span><text:span text:style-name="T124">) {</text:span></text:p>
      <text:p text:style-name="P318"><text:span text:style-name="T414">4 </text:span><text:span text:style-name="T115"><text:tab/>if</text:span> (argc != <text:span text:style-name="T127">2</text:span>) {</text:p>
      <text:p text:style-name="P318"><text:span text:style-name="T414">5 </text:span><text:tab/><text:tab/>printf(<text:span text:style-name="T116">"\nUsage %s &lt;env_var&gt;"</text:span>, argv[<text:span text:style-name="T127">0</text:span>]);</text:p>
      <text:p text:style-name="P318"><text:span text:style-name="T414">6 </text:span><text:tab/><text:tab/>exit(<text:span text:style-name="T115">EXIT_FAILURE</text:span>);</text:p>
      <text:p text:style-name="P318"><text:span text:style-name="T414">7 </text:span><text:tab/>}</text:p>
      <text:p text:style-name="P188"/>
      <text:p text:style-name="P318"><text:span text:style-name="T414">8 </text:span><text:span text:style-name="T115"><text:tab/>char</text:span> *value;</text:p>
      <text:p text:style-name="P318"><text:span text:style-name="T414">9 </text:span><text:tab/>value = <text:span text:style-name="T126">getenv</text:span>(argv[<text:span text:style-name="T127">1</text:span>]);</text:p>
      <text:p text:style-name="P318"><text:span text:style-name="T414">10 </text:span><text:tab/>printf(<text:span text:style-name="T116">"\nVAR: %s=%s"</text:span>, argv[<text:span text:style-name="T127">1</text:span>], value);</text:p>
      <text:p text:style-name="P188"/>
      <text:p text:style-name="P319"><text:span text:style-name="T415">11 </text:span><text:span text:style-name="T124"><text:tab/>exit(</text:span><text:span text:style-name="T101">EXIT_SUCCESS</text:span><text:span text:style-name="T124">);</text:span></text:p>
      <text:p text:style-name="P319"><text:span text:style-name="T415">12 </text:span><text:span text:style-name="T124">}</text:span></text:p>
      <text:p text:style-name="Horizontal_20_Line"/>
      <text:p text:style-name="P320">getvar.c</text:p>
      <text:p text:style-name="P316"/>
      <text:p text:style-name="P317"><text:span text:style-name="T413">The function </text:span><text:span text:style-name="Source_20_Text"><text:span text:style-name="T412">getenv</text:span></text:span><text:span text:style-name="T413"> searches the process environment for the variable name provided in </text:span><text:span text:style-name="Source_20_Text"><text:span text:style-name="T412">argv[1]</text:span></text:span><text:span text:style-name="T413"> and returns a pointer to its value if it exists.</text:span></text:p>
      <text:p text:style-name="P316"/>
      <text:p text:style-name="P316"/>
      <text:p text:style-name="P321">Custom environment</text:p>
      <text:p text:style-name="P316"/>
      <text:p text:style-name="P322"><text:span text:style-name="T413">The program </text:span><text:span text:style-name="Source_20_Text"><text:span text:style-name="T412">exec_with_env.c</text:span></text:span><text:span text:style-name="T413"> executes </text:span><text:span text:style-name="Source_20_Text"><text:span text:style-name="T412">getvar.c</text:span></text:span><text:span text:style-name="T413"> using </text:span><text:span text:style-name="Source_20_Text"><text:span text:style-name="T412">execve</text:span></text:span><text:span text:style-name="Source_20_Text"><text:span text:style-name="T412"><text:note text:id="ftn38" text:note-class="footnote"><text:note-citation>36</text:note-citation><text:note-body><text:p text:style-name="P323"><text:span text:style-name="T416">See</text:span><text:span text:style-name="T417"> the </text:span><text:span text:style-name="T418">execve(2)</text:span><text:span text:style-name="T417"> manual page</text:span></text:p></text:note-body></text:note></text:span></text:span><text:span text:style-name="T413">, explicitly providing a custom environment.</text:span></text:p>
      <text:p text:style-name="Horizontal_20_Line"/>
      <text:p text:style-name="P186"><text:span text:style-name="T419">1 </text:span><text:span text:style-name="T115">#include </text:span><text:span text:style-name="T116">&lt;stdio.h&gt;</text:span></text:p>
      <text:p text:style-name="P324"><text:span text:style-name="T420">2</text:span><text:span text:style-name="T419"> </text:span><text:span text:style-name="T115">#include </text:span><text:span text:style-name="T116">&lt;unistd.h&gt;</text:span></text:p>
      <text:p text:style-name="P324"><text:span text:style-name="T420">3</text:span><text:span text:style-name="T419"> </text:span><text:span text:style-name="T115">#include </text:span><text:span text:style-name="T116">&lt;stdlib.h&gt;</text:span></text:p>
      <text:p text:style-name="P188"/>
      <text:p text:style-name="P325"><text:span text:style-name="T421">4</text:span><text:span text:style-name="T422">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324"><text:soft-page-break/><text:span text:style-name="T420">5</text:span><text:span text:style-name="T419"> <text:tab/></text:span><text:span text:style-name="T115">if</text:span> (argc != <text:span text:style-name="T127">2</text:span>) {</text:p>
      <text:p text:style-name="P324"><text:span text:style-name="T420">6</text:span><text:span text:style-name="T419"> <text:tab/><text:tab/></text:span>printf(<text:span text:style-name="T116">"\nUsage: %s &lt;env_var&gt;"</text:span>, argv[<text:span text:style-name="T127">0</text:span>]);</text:p>
      <text:p text:style-name="P324"><text:span text:style-name="T420">7</text:span><text:span text:style-name="T419"> <text:tab/><text:tab/></text:span>exit(<text:span text:style-name="T115">EXIT_FAILURE</text:span>);</text:p>
      <text:p text:style-name="P324"><text:span text:style-name="T420">8</text:span><text:span text:style-name="T419"> <text:tab/></text:span>}</text:p>
      <text:p text:style-name="P188"/>
      <text:p text:style-name="P324"><text:span text:style-name="T420">9</text:span><text:span text:style-name="T419"> <text:tab/></text:span><text:span text:style-name="T115">char</text:span> *path = <text:span text:style-name="T116">"./getvar"</text:span>;</text:p>
      <text:p text:style-name="P324"><text:span text:style-name="T419">1</text:span><text:span text:style-name="T420">0</text:span><text:span text:style-name="T419"> <text:tab/></text:span><text:span text:style-name="T115">char</text:span> *<text:span text:style-name="T115">const</text:span> args<text:span text:style-name="T115">[]</text:span> = { <text:span text:style-name="T116">"./getvar"</text:span>, argv[<text:span text:style-name="T127">1</text:span>], <text:span text:style-name="T115">NULL</text:span> };</text:p>
      <text:p text:style-name="P188"/>
      <text:p text:style-name="P324"><text:span text:style-name="T419">1</text:span><text:span text:style-name="T420">1</text:span><text:span text:style-name="T419"> <text:tab/></text:span><text:span text:style-name="T115">char</text:span> *<text:span text:style-name="T115">const</text:span> envp<text:span text:style-name="T115">[]</text:span> = {</text:p>
      <text:p text:style-name="P324"><text:span text:style-name="T419">1</text:span><text:span text:style-name="T420">2</text:span><text:span text:style-name="T419"> <text:tab/><text:tab/></text:span><text:span text:style-name="T116">"USER=example_user"</text:span>,</text:p>
      <text:p text:style-name="P324"><text:span text:style-name="T419">1</text:span><text:span text:style-name="T420">3</text:span><text:span text:style-name="T419"> <text:tab/><text:tab/></text:span><text:span text:style-name="T116">"HOME=/home/example_user"</text:span>,</text:p>
      <text:p text:style-name="P324"><text:span text:style-name="T419">1</text:span><text:span text:style-name="T420">4</text:span><text:span text:style-name="T419"> <text:tab/><text:tab/></text:span><text:span text:style-name="T116">"MY_VAR=HelloWorld"</text:span>,</text:p>
      <text:p text:style-name="P326"><text:span text:style-name="T419">1</text:span><text:span text:style-name="T420">5</text:span><text:span text:style-name="T419"> <text:tab/><text:tab/></text:span>NULL</text:p>
      <text:p text:style-name="P324"><text:span text:style-name="T419">1</text:span><text:span text:style-name="T420">6</text:span><text:span text:style-name="T419"> <text:tab/></text:span>};</text:p>
      <text:p text:style-name="P188"/>
      <text:p text:style-name="P324"><text:span text:style-name="T419">1</text:span><text:span text:style-name="T420">7</text:span><text:span text:style-name="T419"> <text:tab/></text:span><text:span text:style-name="T115">if</text:span> (<text:span text:style-name="T126">execve</text:span>(path, args, envp) == -<text:span text:style-name="T127">1</text:span>) {</text:p>
      <text:p text:style-name="P324"><text:span text:style-name="T419">1</text:span><text:span text:style-name="T420">8</text:span><text:span text:style-name="T419"> <text:tab/><text:tab/></text:span>perror(<text:span text:style-name="T116">"execve"</text:span>);</text:p>
      <text:p text:style-name="P324"><text:span text:style-name="T419">1</text:span><text:span text:style-name="T420">9</text:span><text:span text:style-name="T419"> <text:tab/><text:tab/></text:span>exit(<text:span text:style-name="T115">EXIT_FAILURE</text:span>);</text:p>
      <text:p text:style-name="P324"><text:span text:style-name="T420">20</text:span><text:span text:style-name="T419"> <text:tab/></text:span>}</text:p>
      <text:p text:style-name="P188"/>
      <text:p text:style-name="P324"><text:span text:style-name="T420">2</text:span><text:span text:style-name="T419">1 <text:tab/></text:span>exit(<text:span text:style-name="T115">EXIT_SUCCESS</text:span>);</text:p>
      <text:p text:style-name="P327"><text:span text:style-name="T423">22</text:span><text:span text:style-name="T424"> </text:span><text:span text:style-name="T104">}</text:span></text:p>
      <text:p text:style-name="Horizontal_20_Line"/>
      <text:p text:style-name="P328">exec_with_env.c</text:p>
      <text:p text:style-name="P329"/>
      <text:p text:style-name="Standard"><text:span text:style-name="Strong_20_Emphasis"><text:span text:style-name="T220">Line 9.</text:span></text:span><text:span text:style-name="T220"> Defines the pathname of the executable to be run (</text:span><text:span text:style-name="Source_20_Text"><text:span text:style-name="T221">getvar</text:span></text:span><text:span text:style-name="T220">)</text:span></text:p>
      <text:p text:style-name="Standard"><text:span text:style-name="Strong_20_Emphasis"><text:span text:style-name="T220">Line 10.</text:span></text:span><text:span text:style-name="T220"> Defines the argument list passed to the new program, including the program name and the <text:tab/> <text:s text:c="2"/>environment variable to retrieve</text:span></text:p>
      <text:p text:style-name="Standard"><text:span text:style-name="Strong_20_Emphasis"><text:span text:style-name="T220">Line 16.</text:span></text:span><text:span text:style-name="T220"> Defines a completely new environment (</text:span><text:span text:style-name="Source_20_Text"><text:span text:style-name="T221">envp</text:span></text:span><text:span text:style-name="T220">) that will replace the current process <text:tab/> <text:s text:c="2"/><text:tab/> <text:s/>environment when executing </text:span><text:span text:style-name="Source_20_Text"><text:span text:style-name="T221">getvar.c</text:span></text:span></text:p>
      <text:p text:style-name="Standard"><text:span text:style-name="Strong_20_Emphasis"><text:span text:style-name="T220">Line 17.</text:span></text:span><text:span text:style-name="T220"> Calls </text:span><text:span text:style-name="Source_20_Text"><text:span text:style-name="T221">execve</text:span></text:span><text:span text:style-name="T220">, passing the program path, arguments, and the custom environment. If <text:tab/> <text:s/><text:tab/> <text:s/>successful, the current process image is replaced by </text:span><text:span text:style-name="Source_20_Text"><text:span text:style-name="T221">getvar</text:span></text:span><text:span text:style-name="T220">, which then runs using only <text:tab/> <text:s/>the provided environment variables</text:span></text:p>
      <text:p text:style-name="P330"/>
      <text:p text:style-name="P331">We execute the program. </text:p>
      <text:p text:style-name="P331"/>
      <table:table table:name="Table20" table:style-name="Table20">
        <table:table-column table:style-name="Table20.A"/>
        <table:table-row>
          <table:table-cell table:style-name="Table20.A1" office:value-type="string">
            <text:p text:style-name="P33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95">./exec_with_env <text:s/>USER</text:span></text:p>
            <text:p text:style-name="P333">VAR: USER=example_user <text:s text:c="68"/></text:p>
            <text:p text:style-name="P333"/>
            <text:p text:style-name="P332"><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HOME</text:span></text:p>
            <text:p text:style-name="P332">VAR: HOME=/home/example_user <text:s text:c="68"/></text:p>
            <text:p text:style-name="P332"/>
            <text:p text:style-name="P332"><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MY_VAR</text:span></text:p>
            <text:p text:style-name="P332">VAR: MY_VAR=HelloWorld <text:s text:c="68"/></text:p>
            <text:p text:style-name="P332"/>
            <text:p text:style-name="P332"><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DISPLAY</text:span></text:p>
            <text:p text:style-name="P332">VAR: DISPLAY=(null) <text:s text:c="68"/></text:p>
            <text:p text:style-name="P332"/>
            <text:p text:style-name="P332"><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LOGNAME</text:span></text:p>
            <text:p text:style-name="P332">VAR: LOGNAME=(null) <text:s text:c="68"/></text:p>
          </table:table-cell>
        </table:table-row>
      </table:table>
      <text:p text:style-name="P313"><text:soft-page-break/><text:span text:style-name="T426">W</text:span><text:span text:style-name="T427">hen </text:span><text:span text:style-name="Source_20_Text"><text:span text:style-name="T75">getvar</text:span></text:span><text:span text:style-name="T427"> is executed, it inherits the environment explicitly provided by the </text:span><text:span text:style-name="Source_20_Text"><text:span text:style-name="T75">execve</text:span></text:span><text:span text:style-name="T427"> call in the parent process (</text:span><text:span text:style-name="Source_20_Text"><text:span text:style-name="T75">exec_with_env</text:span></text:span><text:span text:style-name="T427">). </text:span><text:span text:style-name="T426">When it attempts t</text:span><text:span text:style-name="T428">o retrieve the values of the </text:span><text:span text:style-name="T429">USER</text:span><text:span text:style-name="T428">, </text:span><text:span text:style-name="T429">HOME</text:span><text:span text:style-name="T428">, </text:span><text:span text:style-name="T429">MY_VAR</text:span><text:span text:style-name="T428"> environment variables, it succeeds and prints the value. </text:span><text:span text:style-name="T430">I</text:span><text:span text:style-name="T428">f we pass other variables, </text:span><text:span text:style-name="T411">such as</text:span><text:span text:style-name="T428"> </text:span><text:span text:style-name="T429">DISPLAY</text:span><text:span text:style-name="T428">, </text:span><text:span text:style-name="T429">LOGNAME</text:span><text:span text:style-name="T428"> etc.., it will print </text:span><text:span text:style-name="T429">null</text:span><text:span text:style-name="T428">. This because these variables do not exist in the environment of </text:span><text:span text:style-name="T429">getvar</text:span><text:span text:style-name="T428">. The program is running with his own environment that does not contain these variables.</text:span></text:p>
      <text:p text:style-name="P334"/>
      <text:p text:style-name="P334"/>
      <text:p text:style-name="P321">Environment inherited from the parent</text:p>
      <text:p text:style-name="P334"/>
      <text:p text:style-name="P313"><text:span text:style-name="T428">If we want a program to inherit the environment of the parent we can pass the </text:span><text:span text:style-name="T429">envp</text:span><text:span text:style-name="T428"> paramater of the </text:span><text:span text:style-name="T429">main</text:span><text:span text:style-name="T428"> function to </text:span><text:span text:style-name="T429">execve</text:span><text:span text:style-name="T428">. </text:span><text:span text:style-name="T431">To do this we </text:span><text:span text:style-name="T432">define</text:span><text:span text:style-name="T431"> </text:span><text:span text:style-name="T429">main</text:span><text:span text:style-name="T431"> </text:span><text:span text:style-name="T432">as follows</text:span><text:span text:style-name="T431"> </text:span></text:p>
      <text:p text:style-name="P335"/>
      <text:p text:style-name="P336"><text:span text:style-name="T115"><text:tab/>int</text:span> main(<text:span text:style-name="T115">int</text:span> argc, <text:span text:style-name="T115">char</text:span> *argv<text:span text:style-name="T115">[]</text:span>, <text:span text:style-name="T115">char</text:span> *envp<text:span text:style-name="T115">[]</text:span>) {</text:p>
      <text:p text:style-name="P337"/>
      <text:p text:style-name="P335"><text:span text:style-name="T433">next,</text:span> <text:span text:style-name="T358">we </text:span>comment <text:span text:style-name="T434">out </text:span>the lines <text:span text:style-name="T358">11-16</text:span></text:p>
      <text:p text:style-name="P335"/>
      <text:p text:style-name="P338"><text:tab/>/*char *const envp[] = {</text:p>
      <text:p text:style-name="P339"><text:s text:c="3"/><text:tab/> <text:s text:c="3"/>"USER=example_user",</text:p>
      <text:p text:style-name="P339"><text:s text:c="2"/><text:tab/> <text:s text:c="3"/>"HOME=/home/example_user",</text:p>
      <text:p text:style-name="P339"><text:s text:c="3"/><text:tab/> <text:s text:c="3"/>"MY_VAR=HelloWorld",</text:p>
      <text:p text:style-name="P339"><text:s text:c="4"/><text:tab/> <text:s text:c="3"/>NULL</text:p>
      <text:p text:style-name="P339"><text:tab/>};*/</text:p>
      <text:p text:style-name="P335"/>
      <text:p text:style-name="P340"><text:span text:style-name="T435">Now, the </text:span><text:span text:style-name="Source_20_Text"><text:span text:style-name="T429">execve</text:span></text:span><text:span text:style-name="T435"> call at line 17, will pass to </text:span><text:span text:style-name="Source_20_Text"><text:span text:style-name="T429">getvar.c</text:span></text:span><text:span text:style-name="T435"> the </text:span><text:span text:style-name="Source_20_Text"><text:span text:style-name="T429">envp</text:span></text:span><text:span text:style-name="T435"> of </text:span><text:span text:style-name="Source_20_Text"><text:span text:style-name="T429">main</text:span></text:span><text:span text:style-name="T435"> instead of a custom defined environment.</text:span></text:p>
      <text:p text:style-name="P335"/>
      <text:p text:style-name="P336"><text:span text:style-name="T115"><text:tab/>if</text:span> (<text:span text:style-name="T126">execve</text:span>(path, args, envp) == -<text:span text:style-name="T127">1</text:span>) {</text:p>
      <text:p text:style-name="P335"/>
      <table:table table:name="Table228" table:style-name="Table228">
        <table:table-column table:style-name="Table228.A"/>
        <table:table-row>
          <table:table-cell table:style-name="Table228.A1" office:value-type="string">
            <text:p text:style-name="P34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395">./exec_with_env <text:s/>USER</text:span></text:p>
            <text:p text:style-name="P342">VAR: USER=<text:span text:style-name="T436">users</text:span> <text:s text:c="119"/></text:p>
            <text:p text:style-name="P341"/>
            <text:p text:style-name="P341"><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DISPLAY</text:span></text:p>
            <text:p text:style-name="P341">VAR: DISPLAY=:<text:span text:style-name="T436">0</text:span> <text:s text:c="67"/></text:p>
            <text:p text:style-name="P341"/>
            <text:p text:style-name="P341"><text:span text:style-name="T80">[</text:span><text:a xlink:type="simple" xlink:href="mailto:linux@users" text:style-name="Internet_20_link" text:visited-style-name="Visited_20_Internet_20_Link"><text:span text:style-name="T81">linux@</text:span><text:span text:style-name="T342">users</text:span></text:a><text:span text:style-name="T80">] </text:span>./exec_with_env <text:s/><text:span text:style-name="T425">LOGNAME</text:span></text:p>
            <text:p text:style-name="P341">VAR: LOGNAME=<text:span text:style-name="T436">users</text:span></text:p>
          </table:table-cell>
        </table:table-row>
      </table:table>
      <text:p text:style-name="P343"/>
      <text:p text:style-name="P340"><text:span text:style-name="T431">The </text:span><text:span text:style-name="Source_20_Text"><text:span text:style-name="T429">USER</text:span></text:span><text:span text:style-name="T431"> environment variable contains the name of the current user (</text:span><text:span text:style-name="Source_20_Text"><text:span text:style-name="T429">users</text:span></text:span><text:span text:style-name="T431">), while </text:span><text:span text:style-name="Source_20_Text"><text:span text:style-name="T429">DISPLAY</text:span></text:span><text:span text:style-name="T431"> and </text:span><text:span text:style-name="Source_20_Text"><text:span text:style-name="T429">LOGNAME</text:span></text:span><text:span text:style-name="T431"> are resolved to their respective values.</text:span></text:p>
      <text:p text:style-name="P340"><text:span text:style-name="T431">The </text:span><text:span text:style-name="Source_20_Text"><text:span text:style-name="T429">getvar.c</text:span></text:span><text:span text:style-name="T431"> program is executed within the same environment as </text:span><text:span text:style-name="Source_20_Text"><text:span text:style-name="T429">exec_with_env.c</text:span></text:span><text:span text:style-name="T431">, namely the environment of the user </text:span><text:span text:style-name="Source_20_Text"><text:span text:style-name="T429">users</text:span></text:span><text:span text:style-name="T431">.</text:span></text:p>
      <text:p text:style-name="P343"/>
      <text:p text:style-name="P344"/>
      <text:p text:style-name="P321">Extended inherited environment</text:p>
      <text:p text:style-name="P340"><text:span text:style-name="T431"/></text:p>
      <text:p text:style-name="P340"><text:span text:style-name="T431">If we want to extend the parent’s environment with additional variables instead of replacing it completely, we must first copy the existing </text:span><text:span text:style-name="Source_20_Text"><text:span text:style-name="T429">envp</text:span></text:span><text:span text:style-name="T431"> array into a new array, then append the new variables to it. Finally, this updated environment array can be passed to </text:span><text:span text:style-name="Source_20_Text"><text:span text:style-name="T429">execve</text:span></text:span><text:span text:style-name="T431">, ensuring that both the original and newly added variables are available in the executed program.</text:span></text:p>
      <text:p text:style-name="P343"/>
      <text:p text:style-name="P340"><text:soft-page-break/><text:span text:style-name="Source_20_Text"><text:span text:style-name="T437">The</text:span></text:span><text:span text:style-name="Source_20_Text"><text:span text:style-name="T431"> </text:span></text:span><text:span text:style-name="Source_20_Text"><text:span text:style-name="T429">exec_add_env.c</text:span></text:span><text:span text:style-name="T431"> </text:span><text:span text:style-name="T430">program </text:span><text:span text:style-name="T431">demonstrates how to extend the current environment by copying it into a new array, adding additional variables, and then passing the modified environment to </text:span><text:span text:style-name="Source_20_Text"><text:span text:style-name="T429">execve</text:span></text:span><text:span text:style-name="T431">.</text:span></text:p>
      <text:p text:style-name="Horizontal_20_Line"/>
      <text:p text:style-name="P186"><text:span text:style-name="T438">1 </text:span><text:span text:style-name="T115">#include </text:span><text:span text:style-name="T116">&lt;stdio.h&gt;</text:span></text:p>
      <text:p text:style-name="P345"><text:span text:style-name="T439">2</text:span><text:span text:style-name="T438"> </text:span><text:span text:style-name="T115">#include </text:span><text:span text:style-name="T116">&lt;stdlib.h&gt;</text:span></text:p>
      <text:p text:style-name="P345"><text:span text:style-name="T439">3</text:span><text:span text:style-name="T438"> </text:span><text:span text:style-name="T115">#include </text:span><text:span text:style-name="T116">&lt;string.h&gt;</text:span></text:p>
      <text:p text:style-name="P345"><text:span text:style-name="T439">4</text:span><text:span text:style-name="T438"> </text:span><text:span text:style-name="T115">#include </text:span><text:span text:style-name="T116">&lt;unistd.h&gt;</text:span></text:p>
      <text:p text:style-name="P188"/>
      <text:p text:style-name="P346"><text:span text:style-name="T440">5</text:span><text:span text:style-name="T441"> </text:span><text:span text:style-name="T101">#define EXTRA_VARS </text:span><text:span text:style-name="T335">2</text:span></text:p>
      <text:p text:style-name="P345"><text:span text:style-name="T439">6</text:span><text:span text:style-name="T438"> </text:span><text:span text:style-name="T115">int</text:span> count_env(<text:span text:style-name="T115">char</text:span> *envp<text:span text:style-name="T115">[]</text:span>) {</text:p>
      <text:p text:style-name="P345"><text:span text:style-name="T439">7</text:span><text:span text:style-name="T438"> <text:tab/></text:span><text:span text:style-name="T115">int</text:span> count = <text:span text:style-name="T127">0</text:span>;</text:p>
      <text:p text:style-name="P345"><text:span text:style-name="T439">8</text:span><text:span text:style-name="T438"> <text:tab/></text:span><text:span text:style-name="T115">while</text:span> (envp[count] != <text:span text:style-name="T115">NULL</text:span>) count++;</text:p>
      <text:p text:style-name="P345"><text:span text:style-name="T439">9</text:span><text:span text:style-name="T438"> <text:tab/></text:span><text:span text:style-name="T115">return</text:span> count;</text:p>
      <text:p text:style-name="P345"><text:span text:style-name="T438">1</text:span><text:span text:style-name="T439">0</text:span><text:span text:style-name="T438"> </text:span>}</text:p>
      <text:p text:style-name="P188"/>
      <text:p text:style-name="P346"><text:span text:style-name="T441">1</text:span><text:span text:style-name="T440">1</text:span><text:span text:style-name="T441">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span text:style-name="T101">char</text:span><text:span text:style-name="T124"> *envp</text:span><text:span text:style-name="T101">[]</text:span><text:span text:style-name="T124">) {</text:span></text:p>
      <text:p text:style-name="P345"><text:span text:style-name="T438">1</text:span><text:span text:style-name="T439">2</text:span><text:span text:style-name="T438"> <text:tab/></text:span><text:span text:style-name="T115">if</text:span> (argc &lt; <text:span text:style-name="T127">2</text:span>) {</text:p>
      <text:p text:style-name="P345"><text:span text:style-name="T438">1</text:span><text:span text:style-name="T439">3</text:span><text:span text:style-name="T438"> <text:tab/><text:tab/></text:span>printf(<text:span text:style-name="T116">"\nUsage: %s &lt;var&gt; [value]"</text:span>, argv[<text:span text:style-name="T127">0</text:span>]);</text:p>
      <text:p text:style-name="P345"><text:span text:style-name="T438">1</text:span><text:span text:style-name="T439">4</text:span><text:span text:style-name="T438"> <text:tab/><text:tab/></text:span>exit(<text:span text:style-name="T115">EXIT_FAILURE</text:span>);</text:p>
      <text:p text:style-name="P345"><text:span text:style-name="T438">1</text:span><text:span text:style-name="T439">5</text:span><text:span text:style-name="T438"> <text:tab/></text:span>}</text:p>
      <text:p text:style-name="P188"/>
      <text:p text:style-name="P345"><text:span text:style-name="T438">1</text:span><text:span text:style-name="T439">6</text:span><text:span text:style-name="T438"> <text:tab/></text:span><text:span text:style-name="T115">int</text:span> env_count = count_env(envp);</text:p>
      <text:p text:style-name="P345"><text:span text:style-name="T438">1</text:span><text:span text:style-name="T439">7</text:span><text:span text:style-name="T438"> <text:tab/></text:span><text:span text:style-name="T115">char</text:span> *result;</text:p>
      <text:p text:style-name="P345"><text:span text:style-name="T438">1</text:span><text:span text:style-name="T439">8</text:span><text:span text:style-name="T438"> <text:tab/></text:span><text:span text:style-name="T115">int</text:span> total_env = env_count + <text:span text:style-name="T115">EXTRA_VARS</text:span>;</text:p>
      <text:p text:style-name="P347"><text:span text:style-name="T438">1</text:span><text:span text:style-name="T439">9</text:span><text:span text:style-name="T438"> <text:tab/></text:span><text:span text:style-name="T115">char</text:span> **new_envp = <text:span text:style-name="T126">malloc</text:span>((total_env + <text:span text:style-name="T127">1</text:span>) * <text:span text:style-name="T115">sizeof</text:span>(<text:span text:style-name="T115">char</text:span> *));<text:span text:style-name="T119"> </text:span></text:p>
      <text:p text:style-name="P348"><text:tab/><text:tab/><text:tab/><text:tab/><text:tab/></text:p>
      <text:p text:style-name="P345"><text:span text:style-name="T438">2</text:span><text:span text:style-name="T439">0</text:span><text:span text:style-name="T438"> <text:tab/></text:span><text:span text:style-name="T115">if</text:span> (!new_envp) {</text:p>
      <text:p text:style-name="P345"><text:span text:style-name="T438">2</text:span><text:span text:style-name="T439">1</text:span><text:span text:style-name="T438"> <text:tab/><text:tab/></text:span>perror(<text:span text:style-name="T116">"malloc"</text:span>);</text:p>
      <text:p text:style-name="P345"><text:span text:style-name="T438">2</text:span><text:span text:style-name="T439">2</text:span><text:span text:style-name="T438"> <text:tab/><text:tab/></text:span><text:span text:style-name="T115">return</text:span> <text:span text:style-name="T127">1</text:span>;</text:p>
      <text:p text:style-name="P346"><text:span text:style-name="T441">2</text:span><text:span text:style-name="T440">3</text:span><text:span text:style-name="T441"> <text:tab/></text:span><text:span text:style-name="T124">}</text:span></text:p>
      <text:p text:style-name="P345"><text:span text:style-name="T438">2</text:span><text:span text:style-name="T439">4</text:span><text:span text:style-name="T438"> <text:tab/></text:span><text:span text:style-name="T115">for</text:span> (<text:span text:style-name="T115">int</text:span> i = <text:span text:style-name="T127">0</text:span>; i &lt; env_count; i++) {</text:p>
      <text:p text:style-name="P345"><text:span text:style-name="T438">2</text:span><text:span text:style-name="T439">5</text:span><text:span text:style-name="T438"> <text:tab/><text:tab/></text:span>new_envp[i] = envp[i];</text:p>
      <text:p text:style-name="P345"><text:span text:style-name="T438">2</text:span><text:span text:style-name="T439">6</text:span><text:span text:style-name="T438"> <text:tab/></text:span>}</text:p>
      <text:p text:style-name="P188"/>
      <text:p text:style-name="P345"><text:span text:style-name="T438">2</text:span><text:span text:style-name="T439">7</text:span><text:span text:style-name="T438"> <text:tab/></text:span><text:span text:style-name="T115">if</text:span> (argv[<text:span text:style-name="T127">2</text:span>]) {</text:p>
      <text:p text:style-name="P345"><text:span text:style-name="T438">2</text:span><text:span text:style-name="T439">8</text:span><text:span text:style-name="T438"> <text:tab/><text:tab/></text:span><text:span text:style-name="T115">size_t</text:span> len = strlen(argv[<text:span text:style-name="T127">1</text:span>]) + strlen(<text:span text:style-name="T116">"="</text:span>)+strlen(argv[<text:span text:style-name="T127">2</text:span>])+<text:span text:style-name="T127">1</text:span>;</text:p>
      <text:p text:style-name="P345"><text:span text:style-name="T438">2</text:span><text:span text:style-name="T439">9</text:span><text:span text:style-name="T438"> <text:tab/><text:tab/></text:span>result = <text:span text:style-name="T126">malloc</text:span>(len);</text:p>
      <text:p text:style-name="P345"><text:span text:style-name="T438">3</text:span><text:span text:style-name="T439">0</text:span><text:span text:style-name="T438"> <text:tab/><text:tab/></text:span><text:span text:style-name="T115">if</text:span> (!result) {</text:p>
      <text:p text:style-name="P345"><text:span text:style-name="T438">3</text:span><text:span text:style-name="T439">1</text:span><text:span text:style-name="T438"> <text:tab/><text:tab/><text:tab/></text:span>perror(<text:span text:style-name="T116">"malloc"</text:span>);</text:p>
      <text:p text:style-name="P345"><text:span text:style-name="T438">3</text:span><text:span text:style-name="T439">2</text:span><text:span text:style-name="T438"> <text:tab/><text:tab/><text:tab/></text:span><text:span text:style-name="T115">return</text:span> <text:span text:style-name="T127">1</text:span>;</text:p>
      <text:p text:style-name="P346"><text:span text:style-name="T441">3</text:span><text:span text:style-name="T440">3</text:span><text:span text:style-name="T441"> <text:tab/><text:tab/></text:span><text:span text:style-name="T124">}</text:span></text:p>
      <text:p text:style-name="P345"><text:span text:style-name="T438">3</text:span><text:span text:style-name="T439">4</text:span><text:span text:style-name="T438"> <text:tab/><text:tab/></text:span><text:span text:style-name="T126">strcpy</text:span>(result, argv[<text:span text:style-name="T127">1</text:span>]);</text:p>
      <text:p text:style-name="P349"><text:span text:style-name="T442">3</text:span><text:span text:style-name="T443">5</text:span><text:span text:style-name="T442"> <text:tab/><text:tab/></text:span><text:span text:style-name="T105">strcat</text:span><text:span text:style-name="T104">(result, </text:span><text:span text:style-name="T403">"="</text:span><text:span text:style-name="T104">);</text:span></text:p>
      <text:p text:style-name="P349"><text:span text:style-name="T442">3</text:span><text:span text:style-name="T443">6</text:span><text:span text:style-name="T442"> <text:tab/><text:tab/></text:span><text:span text:style-name="T105">strcat</text:span><text:span text:style-name="T104">(result, argv[</text:span><text:span text:style-name="T128">2</text:span><text:span text:style-name="T104">]);</text:span></text:p>
      <text:p text:style-name="P346"><text:span text:style-name="T441">3</text:span><text:span text:style-name="T440">7</text:span><text:span text:style-name="T441"> <text:tab/></text:span><text:span text:style-name="T124">}</text:span></text:p>
      <text:p text:style-name="P345"><text:span text:style-name="T438">3</text:span><text:span text:style-name="T439">8</text:span><text:span text:style-name="T438"> <text:tab/></text:span>new_envp[env_count] = argv[<text:span text:style-name="T127">2</text:span>] ? result : argv[<text:span text:style-name="T127">1</text:span>];</text:p>
      <text:p text:style-name="P345"><text:span text:style-name="T438">3</text:span><text:span text:style-name="T439">9</text:span><text:span text:style-name="T438"> <text:tab/></text:span>new_envp[env_count + <text:span text:style-name="T127">1</text:span>] = <text:span text:style-name="T116">"DEBUG=1"</text:span>;</text:p>
      <text:p text:style-name="P345"><text:span text:style-name="T438">4</text:span><text:span text:style-name="T439">0</text:span><text:span text:style-name="T438"> <text:tab/></text:span>new_envp[env_count + <text:span text:style-name="T127">2</text:span>] = <text:span text:style-name="T115">NULL</text:span>;</text:p>
      <text:p text:style-name="P188"/>
      <text:p text:style-name="P345"><text:soft-page-break/><text:span text:style-name="T438">4</text:span><text:span text:style-name="T439">1</text:span><text:span text:style-name="T438"> <text:tab/></text:span><text:span text:style-name="T115">char</text:span> *program = <text:span text:style-name="T116">"./getvar"</text:span>;</text:p>
      <text:p text:style-name="P346"><text:span text:style-name="T441">4</text:span><text:span text:style-name="T440">2</text:span><text:span text:style-name="T441"> <text:tab/></text:span><text:span text:style-name="T101">char</text:span><text:span text:style-name="T124"> *</text:span><text:span text:style-name="T101">const</text:span><text:span text:style-name="T124"> new_argv</text:span><text:span text:style-name="T101">[]</text:span><text:span text:style-name="T124"> = { </text:span><text:span text:style-name="T102">"./getvar"</text:span><text:span text:style-name="T124">, argv[</text:span><text:span text:style-name="T335">1</text:span><text:span text:style-name="T124">], </text:span><text:span text:style-name="T101">NULL</text:span><text:span text:style-name="T124"> };</text:span></text:p>
      <text:p text:style-name="P349"><text:span text:style-name="T442">4</text:span><text:span text:style-name="T443">3</text:span><text:span text:style-name="T442"> <text:tab/></text:span><text:span text:style-name="T103">if</text:span><text:span text:style-name="T104"> (</text:span><text:span text:style-name="T105">execve</text:span><text:span text:style-name="T104">(program, new_argv, new_envp) == -</text:span><text:span text:style-name="T128">1</text:span><text:span text:style-name="T104">) {</text:span></text:p>
      <text:p text:style-name="P345"><text:span text:style-name="T438">4</text:span><text:span text:style-name="T439">4</text:span><text:span text:style-name="T438"> <text:tab/><text:tab/></text:span>perror(<text:span text:style-name="T116">"execve"</text:span>);</text:p>
      <text:p text:style-name="P345"><text:span text:style-name="T438">4</text:span><text:span text:style-name="T439">5</text:span><text:span text:style-name="T438"> <text:tab/><text:tab/></text:span>free(new_envp);<text:span text:style-name="T119"> </text:span></text:p>
      <text:p text:style-name="P345"><text:span text:style-name="T438">4</text:span><text:span text:style-name="T439">6</text:span><text:span text:style-name="T438"> <text:tab/><text:tab/></text:span><text:span text:style-name="T115">return</text:span> <text:span text:style-name="T127">1</text:span>;</text:p>
      <text:p text:style-name="P346"><text:span text:style-name="T441">4</text:span><text:span text:style-name="T440">7</text:span><text:span text:style-name="T441"> <text:tab/></text:span><text:span text:style-name="T124">}</text:span></text:p>
      <text:p text:style-name="P345"><text:span text:style-name="T438">4</text:span><text:span text:style-name="T439">8</text:span><text:span text:style-name="T438"> <text:tab/></text:span>exit(<text:span text:style-name="T115">EXIT_SUCCESS</text:span>);</text:p>
      <text:p text:style-name="P346"><text:span text:style-name="T441">4</text:span><text:span text:style-name="T440">9</text:span><text:span text:style-name="T441"> </text:span><text:span text:style-name="T124">}</text:span></text:p>
      <text:p text:style-name="Horizontal_20_Line"/>
      <text:p text:style-name="P350">exec_add_env.c</text:p>
      <text:p text:style-name="P307"/>
      <text:p text:style-name="Standard"><text:span text:style-name="Strong_20_Emphasis"><text:span text:style-name="T220">Line 6–10.</text:span></text:span><text:span text:style-name="T220"> Defines a helper function that counts the number of environment variables by iterating <text:tab/> <text:s text:c="5"/>through the </text:span><text:span text:style-name="Source_20_Text"><text:span text:style-name="T221">envp</text:span></text:span><text:span text:style-name="T220"> array until the </text:span><text:span text:style-name="Source_20_Text"><text:span text:style-name="T221">NULL</text:span></text:span><text:span text:style-name="T220"> terminator is reached</text:span></text:p>
      <text:p text:style-name="Standard"><text:span text:style-name="Strong_20_Emphasis"><text:span text:style-name="T220">Line 16.</text:span></text:span><text:span text:style-name="T220"> Calls the function to determine the size of the current environment</text:span></text:p>
      <text:p text:style-name="Standard"><text:span text:style-name="Strong_20_Emphasis"><text:span text:style-name="T220">Line 18.</text:span></text:span><text:span text:style-name="T220"> Increases the environment size by 2 to make space for additional variables</text:span></text:p>
      <text:p text:style-name="Standard"><text:span text:style-name="Strong_20_Emphasis"><text:span text:style-name="T220">Line 19.</text:span></text:span><text:span text:style-name="T220"> Allocates memory for the new environment array, including one extra slot for the </text:span><text:span text:style-name="Source_20_Text"><text:span text:style-name="T221">NULL</text:span></text:span><text:span text:style-name="T220"> <text:tab/> <text:s/>terminator</text:span></text:p>
      <text:p text:style-name="Standard"><text:span text:style-name="Strong_20_Emphasis"><text:span text:style-name="T220">Line 24–26.</text:span></text:span><text:span text:style-name="T220"> Copies all existing environment variables from </text:span><text:span text:style-name="Source_20_Text"><text:span text:style-name="T221">envp</text:span></text:span><text:span text:style-name="T220"> into the newly allocated <text:tab/> <text:s text:c="3"/><text:tab/> <text:s text:c="7"/></text:span><text:span text:style-name="Source_20_Text"><text:span text:style-name="T221">new_envp</text:span></text:span><text:span text:style-name="T220"> array</text:span></text:p>
      <text:p text:style-name="Standard"><text:span text:style-name="Strong_20_Emphasis"><text:span text:style-name="T220">Line 27–37.</text:span></text:span><text:span text:style-name="T220"> If a third argument is provided (the value of the new variable), a new string of the form <text:tab/> <text:s text:c="7"/></text:span><text:span text:style-name="Source_20_Text"><text:span text:style-name="T221">name=value</text:span></text:span><text:span text:style-name="T220"> is dynamically constructed using </text:span><text:span text:style-name="Source_20_Text"><text:span text:style-name="T221">malloc</text:span></text:span><text:span text:style-name="T220">, </text:span><text:span text:style-name="Source_20_Text"><text:span text:style-name="T221">strcpy</text:span></text:span><text:span text:style-name="T220">, and </text:span><text:span text:style-name="Source_20_Text"><text:span text:style-name="T221">strcat</text:span></text:span></text:p>
      <text:p text:style-name="Standard"><text:span text:style-name="Strong_20_Emphasis"><text:span text:style-name="T220">Line 38.</text:span></text:span><text:span text:style-name="T220"> Adds the new variable to the environment. If a value was provided, the entry is <text:tab/> <text:s text:c="2"/><text:tab/> <text:s text:c="2"/><text:tab/> <text:s/></text:span><text:span text:style-name="Source_20_Text"><text:span text:style-name="T221">name=value</text:span></text:span><text:span text:style-name="T220">; otherwise, only the variable name is stored</text:span></text:p>
      <text:p text:style-name="Standard"><text:span text:style-name="Strong_20_Emphasis"><text:span text:style-name="T220">Line 39.</text:span></text:span><text:span text:style-name="T220"> Adds an additional environment variable (</text:span><text:span text:style-name="Source_20_Text"><text:span text:style-name="T221">DEBUG=1</text:span></text:span><text:span text:style-name="T220">) to the new environment</text:span></text:p>
      <text:p text:style-name="Standard"><text:span text:style-name="Strong_20_Emphasis"><text:span text:style-name="T220">Line 40.</text:span></text:span><text:span text:style-name="T220"> Adds a </text:span><text:span text:style-name="Source_20_Text"><text:span text:style-name="T221">NULL</text:span></text:span><text:span text:style-name="T220"> pointer to terminate the new environment array, as required by </text:span><text:span text:style-name="Source_20_Text"><text:span text:style-name="T221">execve</text:span></text:span></text:p>
      <text:p text:style-name="Standard"><text:span text:style-name="Strong_20_Emphasis"><text:span text:style-name="T220">Line 41–42.</text:span></text:span><text:span text:style-name="T220"> Prepares the executable path (</text:span><text:span text:style-name="Source_20_Text"><text:span text:style-name="T221">getvar</text:span></text:span><text:span text:style-name="T220">) and the argument list to pass to the new <text:tab/> <text:s text:c="3"/><text:tab/> <text:s text:c="7"/>program</text:span></text:p>
      <text:p text:style-name="Standard"><text:span text:style-name="Strong_20_Emphasis"><text:span text:style-name="T220">Line 43.</text:span></text:span><text:span text:style-name="T220"> Calls </text:span><text:span text:style-name="Source_20_Text"><text:span text:style-name="T221">execve</text:span></text:span><text:span text:style-name="T220"> to execute </text:span><text:span text:style-name="Source_20_Text"><text:span text:style-name="T221">getvar</text:span></text:span><text:span text:style-name="T220"> with the modified environment. The current process <text:tab/> <text:s/>image is replaced by the new program</text:span></text:p>
      <text:p text:style-name="Standard"><text:span text:style-name="Strong_20_Emphasis"><text:span text:style-name="T220">Line 45.</text:span></text:span><text:span text:style-name="T220"> Frees allocated memory only if </text:span><text:span text:style-name="Source_20_Text"><text:span text:style-name="T221">execve</text:span></text:span><text:span text:style-name="T220"> fails, since on success the process memory is <text:tab/> <text:s text:c="2"/><text:tab/> <text:s text:c="2"/>replaced and this code is never executed</text:span></text:p>
      <text:p text:style-name="Standard"><text:span text:style-name="Strong_20_Emphasis"><text:span text:style-name="T220">Line 48.</text:span></text:span><text:span text:style-name="T220"> This line is never reached because a successful </text:span><text:span text:style-name="Source_20_Text"><text:span text:style-name="T221">execve</text:span></text:span><text:span text:style-name="T220"> does not return</text:span></text:p>
      <text:p text:style-name="P307"/>
      <text:p text:style-name="P351"><text:span text:style-name="T433">We e</text:span>xecute the program.</text:p>
      <text:p text:style-name="P351"/>
      <table:table table:name="Table21" table:style-name="Table21">
        <table:table-column table:style-name="Table21.A"/>
        <table:table-row>
          <table:table-cell table:style-name="Table21.A1" office:value-type="string">
            <text:p text:style-name="P352"><text:span text:style-name="T80">[</text:span><text:a xlink:type="simple" xlink:href="mailto:linux@users" text:style-name="Internet_20_link" text:visited-style-name="Visited_20_Internet_20_Link"><text:span text:style-name="T81">linux@</text:span><text:span text:style-name="T342">users</text:span></text:a><text:span text:style-name="T80">] </text:span>./exec_<text:span text:style-name="T444">add_env USER</text:span></text:p>
            <text:p text:style-name="P352">VAR: USER=<text:span text:style-name="T445">users</text:span></text:p>
            <text:p text:style-name="P352"/>
            <text:p text:style-name="P353"><text:span text:style-name="T80">[</text:span><text:a xlink:type="simple" xlink:href="mailto:linux@users" text:style-name="Internet_20_link" text:visited-style-name="Visited_20_Internet_20_Link"><text:span text:style-name="T81">linux@</text:span><text:span text:style-name="T342">users</text:span></text:a><text:span text:style-name="T80">] </text:span>./exec_<text:span text:style-name="T444">add_env </text:span><text:span text:style-name="T446">DEBUG</text:span></text:p>
            <text:p text:style-name="P353">VAR: DEBUG=1 <text:s text:c="129"/></text:p>
          </table:table-cell>
        </table:table-row>
      </table:table>
      <text:p text:style-name="P201"/>
      <text:p text:style-name="P201"><text:span text:style-name="Source_20_Text"><text:span text:style-name="T229">Both the inherited </text:span></text:span><text:span text:style-name="Source_20_Text"><text:span text:style-name="T75">USER</text:span></text:span><text:span text:style-name="Source_20_Text"><text:span text:style-name="T229"> variable and the newly added </text:span></text:span><text:span text:style-name="Source_20_Text"><text:span text:style-name="T75">DEBUG</text:span></text:span><text:span text:style-name="Source_20_Text"><text:span text:style-name="T229"> variable are correctly resolved, confirming that standard environment variables are preserved across </text:span></text:span><text:span text:style-name="Source_20_Text"><text:span text:style-name="T75">execve</text:span></text:span><text:span text:style-name="Source_20_Text"><text:span text:style-name="T229">, while newly defined variables are also properly set in the resulting process environment.</text:span></text:span></text:p>
      <text:p text:style-name="P201"/>
      <text:p text:style-name="P201"><text:span text:style-name="T433">We </text:span><text:span text:style-name="T446">p</text:span>ass a new variable without value.</text:p>
      <text:p text:style-name="P354"/>
      <table:table table:name="Table22" table:style-name="Table22">
        <table:table-column table:style-name="Table22.A"/>
        <table:table-row>
          <table:table-cell table:style-name="Table22.A1" office:value-type="string">
            <text:p text:style-name="P355"><text:span text:style-name="T80">[</text:span><text:a xlink:type="simple" xlink:href="mailto:linux@users" text:style-name="Internet_20_link" text:visited-style-name="Visited_20_Internet_20_Link"><text:span text:style-name="T81">linux@</text:span><text:span text:style-name="T342">users</text:span></text:a><text:span text:style-name="T80">] </text:span>./exec_<text:span text:style-name="T444">add_env </text:span><text:span text:style-name="T445">MY_VAR</text:span></text:p>
            <text:p text:style-name="P355">VAR: MY_VAR=(null) <text:s text:c="68"/></text:p>
          </table:table-cell>
        </table:table-row>
      </table:table>
      <text:p text:style-name="P201"><text:soft-page-break/><text:span text:style-name="T447">When passing a new variable without a value (</text:span><text:span text:style-name="Source_20_Text"><text:span text:style-name="T448">MY_VAR</text:span></text:span><text:span text:style-name="T447">), the variable is added to the custom environment but has no associated value, resulting in </text:span><text:span text:style-name="Source_20_Text"><text:span text:style-name="T447">(</text:span></text:span><text:span text:style-name="Source_20_Text"><text:span text:style-name="T448">null</text:span></text:span><text:span text:style-name="Source_20_Text"><text:span text:style-name="T447">)</text:span></text:span><text:span text:style-name="T447"> when </text:span><text:span text:style-name="Source_20_Text"><text:span text:style-name="T448">getenv</text:span></text:span><text:span text:style-name="T447"> is called in </text:span><text:span text:style-name="Source_20_Text"><text:span text:style-name="T448">getvar</text:span></text:span><text:span text:style-name="T447">.</text:span></text:p>
      <text:p text:style-name="P201"/>
      <text:p text:style-name="P201"><text:span text:style-name="T433">We </text:span>passing a new variable with <text:span text:style-name="T449">a value.</text:span></text:p>
      <text:p text:style-name="P356"/>
      <table:table table:name="Table23" table:style-name="Table23">
        <table:table-column table:style-name="Table23.A"/>
        <table:table-row>
          <table:table-cell table:style-name="Table23.A1" office:value-type="string">
            <text:p text:style-name="P357"><text:span text:style-name="T80">[</text:span><text:a xlink:type="simple" xlink:href="mailto:linux@users" text:style-name="Internet_20_link" text:visited-style-name="Visited_20_Internet_20_Link"><text:span text:style-name="T81">linux@</text:span><text:span text:style-name="T342">users</text:span></text:a><text:span text:style-name="T80">] </text:span>./exec_<text:span text:style-name="T444">add_env </text:span><text:span text:style-name="T449">NEW</text:span><text:span text:style-name="T445">_VAR </text:span><text:span text:style-name="T449">hellofromgetvar</text:span></text:p>
            <text:p text:style-name="P357">VAR: NEW_VAR=hellofromgetvar <text:s text:c="68"/></text:p>
            <text:p text:style-name="P357"/>
          </table:table-cell>
        </table:table-row>
      </table:table>
      <text:p text:style-name="P201"/>
      <text:p text:style-name="P201"><text:span text:style-name="T450">When passing a new variable with an explicit value (</text:span><text:span text:style-name="Source_20_Text"><text:span text:style-name="T448">NEW_VAR</text:span></text:span><text:span text:style-name="Source_20_Text"><text:span text:style-name="T450"> </text:span></text:span><text:span text:style-name="Source_20_Text"><text:span text:style-name="T448">hellofromgetvar</text:span></text:span><text:span text:style-name="T450">), the program correctly constructs the </text:span><text:span text:style-name="Source_20_Text"><text:span text:style-name="T448">name=value</text:span></text:span><text:span text:style-name="T450"> pair, adds it to the environment, and </text:span><text:span text:style-name="Source_20_Text"><text:span text:style-name="T448">getvar</text:span></text:span><text:span text:style-name="T450"> successfully retrieves and prints the assigned value.</text:span></text:p>
      <text:p text:style-name="P201"/>
      <text:p text:style-name="P201"><text:span text:style-name="T450">These executions show that by building a custom </text:span><text:span text:style-name="Source_20_Text"><text:span text:style-name="T448">envp</text:span></text:span><text:span text:style-name="T450"> array and passing it to </text:span><text:span text:style-name="Source_20_Text"><text:span text:style-name="T448">execve</text:span></text:span><text:span text:style-name="T450">, it is possible to run a program with a fully controlled environment, including inherited, modified, or newly created variables.</text:span></text:p>
      <text:p text:style-name="Standard"/>
      <text:p text:style-name="Standard"/>
      <text:p text:style-name="Standard"/>
      <text:p text:style-name="Standard"/>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9"><text:soft-page-break/>I<text:span text:style-name="T12">I</text:span>I.3 Locale</text:p>
      <text:p text:style-name="P360"/>
      <text:p text:style-name="P361"><text:span text:style-name="T451">On L</text:span>inux systems, the <text:span text:style-name="T68">locale</text:span> represents a set of rules that define regional and language-specific behavior for a program’s runtime environment. With the <text:span text:style-name="T75">locale</text:span> <text:note text:id="ftn39" text:note-class="footnote"><text:note-citation>37</text:note-citation><text:note-body><text:p text:style-name="P250"><text:span text:style-name="T452">See the </text:span><text:span text:style-name="T453">locale(1)</text:span><text:span text:style-name="T454"> manual page</text:span></text:p></text:note-body></text:note>command we can see the current locale settings.</text:p>
      <text:p text:style-name="P361"/>
      <table:table table:name="Table24" table:style-name="Table24">
        <table:table-column table:style-name="Table24.A"/>
        <table:table-row>
          <table:table-cell table:style-name="Table24.A1" office:value-type="string">
            <text:p text:style-name="P36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455">locale</text:span></text:p>
            <text:p text:style-name="P362">LANG=en_US.UTF-8</text:p>
            <text:p text:style-name="P362">LANGUAGE=</text:p>
            <text:p text:style-name="P362">LC_CTYPE="en_US.UTF-8"</text:p>
            <text:p text:style-name="P362">LC_NUMERIC="en_US.UTF-8"</text:p>
            <text:p text:style-name="P362">LC_TIME="en_US.UTF-8"</text:p>
            <text:p text:style-name="P362">LC_COLLATE="en_US.UTF-8"</text:p>
            <text:p text:style-name="P362">LC_MONETARY="en_US.UTF-8"</text:p>
            <text:p text:style-name="P362">LC_MESSAGES="en_US.UTF-8"</text:p>
            <text:p text:style-name="P362">LC_PAPER="en_US.UTF-8"</text:p>
            <text:p text:style-name="P362">LC_NAME="en_US.UTF-8"</text:p>
            <text:p text:style-name="P362">LC_ADDRESS="en_US.UTF-8"</text:p>
            <text:p text:style-name="P362">LC_TELEPHONE="en_US.UTF-8"</text:p>
            <text:p text:style-name="P362">LC_MEASUREMENT="en_US.UTF-8"</text:p>
            <text:p text:style-name="P362">LC_IDENTIFICATION="en_US.UTF-8"</text:p>
            <text:p text:style-name="P362">LC_ALL=</text:p>
          </table:table-cell>
        </table:table-row>
      </table:table>
      <text:p text:style-name="P361"/>
      <text:p text:style-name="P363">The following table lists some of these settings.</text:p>
      <text:p text:style-name="P363"/>
      <table:table table:name="Table25" table:style-name="Table25">
        <table:table-column table:style-name="Table25.A"/>
        <table:table-column table:style-name="Table25.B"/>
        <table:table-column table:style-name="Table25.C"/>
        <table:table-row>
          <table:table-cell table:style-name="Table25.A1" office:value-type="string">
            <text:p text:style-name="P364">Category</text:p>
          </table:table-cell>
          <table:table-cell table:style-name="Table25.A1" office:value-type="string">
            <text:p text:style-name="P364">Description</text:p>
          </table:table-cell>
          <table:table-cell table:style-name="Table25.C1" office:value-type="string">
            <text:p text:style-name="P365">Example</text:p>
          </table:table-cell>
        </table:table-row>
        <table:table-row>
          <table:table-cell table:style-name="Table25.A2" office:value-type="string">
            <text:p text:style-name="P366">LC_CTYPE</text:p>
          </table:table-cell>
          <table:table-cell table:style-name="Table25.A2" office:value-type="string">
            <text:p text:style-name="P367">Character classification and case conversion</text:p>
          </table:table-cell>
          <table:table-cell table:style-name="Table25.C2" office:value-type="string">
            <text:p text:style-name="P368"><text:span text:style-name="T456">Determines if </text:span><text:span text:style-name="Source_20_Text"><text:span text:style-name="T457">ä</text:span></text:span><text:span text:style-name="T456"> is a letter</text:span></text:p>
          </table:table-cell>
        </table:table-row>
        <table:table-row>
          <table:table-cell table:style-name="Table25.A2" office:value-type="string">
            <text:p text:style-name="P366">LC_COLLATE</text:p>
          </table:table-cell>
          <table:table-cell table:style-name="Table25.A2" office:value-type="string">
            <text:p text:style-name="P183">String sorting rules</text:p>
          </table:table-cell>
          <table:table-cell table:style-name="Table25.C2" office:value-type="string">
            <text:p text:style-name="P368"><text:span text:style-name="T456">Sort order: </text:span><text:span text:style-name="Source_20_Text"><text:span text:style-name="T457">ä</text:span></text:span><text:span text:style-name="T456"> vs </text:span><text:span text:style-name="Source_20_Text"><text:span text:style-name="T457">z</text:span></text:span></text:p>
          </table:table-cell>
        </table:table-row>
        <table:table-row>
          <table:table-cell table:style-name="Table25.A2" office:value-type="string">
            <text:p text:style-name="P368"><text:span text:style-name="Source_20_Text"><text:span text:style-name="T457">LC_TIME</text:span></text:span></text:p>
          </table:table-cell>
          <table:table-cell table:style-name="Table25.A2" office:value-type="string">
            <text:p text:style-name="P183">Date and time formats</text:p>
          </table:table-cell>
          <table:table-cell table:style-name="Table25.C2" office:value-type="string">
            <text:p text:style-name="P368"><text:span text:style-name="Source_20_Text"><text:span text:style-name="T457">15.06.2025</text:span></text:span><text:span text:style-name="T456"> vs </text:span><text:span text:style-name="Source_20_Text"><text:span text:style-name="T457">06/15/2025</text:span></text:span></text:p>
          </table:table-cell>
        </table:table-row>
        <table:table-row>
          <table:table-cell table:style-name="Table25.A2" office:value-type="string">
            <text:p text:style-name="P368"><text:span text:style-name="Source_20_Text"><text:span text:style-name="T457">LC_NUMERIC</text:span></text:span></text:p>
          </table:table-cell>
          <table:table-cell table:style-name="Table25.A2" office:value-type="string">
            <text:p text:style-name="P183">Decimal and thousands separators</text:p>
          </table:table-cell>
          <table:table-cell table:style-name="Table25.C2" office:value-type="string">
            <text:p text:style-name="P368"><text:span text:style-name="Source_20_Text"><text:span text:style-name="T457">1.000,50</text:span></text:span><text:span text:style-name="T456"> vs </text:span><text:span text:style-name="Source_20_Text"><text:span text:style-name="T457">1,000.50</text:span></text:span></text:p>
          </table:table-cell>
        </table:table-row>
        <table:table-row>
          <table:table-cell table:style-name="Table25.A2" office:value-type="string">
            <text:p text:style-name="P368"><text:span text:style-name="Source_20_Text"><text:span text:style-name="T457">LC_MONETARY</text:span></text:span></text:p>
          </table:table-cell>
          <table:table-cell table:style-name="Table25.A2" office:value-type="string">
            <text:p text:style-name="P183">Currency format</text:p>
          </table:table-cell>
          <table:table-cell table:style-name="Table25.C2" office:value-type="string">
            <text:p text:style-name="P368"><text:span text:style-name="Source_20_Text"><text:span text:style-name="T457">€1.234,56</text:span></text:span><text:span text:style-name="T456"> vs </text:span><text:span text:style-name="Source_20_Text"><text:span text:style-name="T457">$1,234.56</text:span></text:span></text:p>
          </table:table-cell>
        </table:table-row>
        <table:table-row>
          <table:table-cell table:style-name="Table25.A2" office:value-type="string">
            <text:p text:style-name="P366">LC_MESSAGES</text:p>
          </table:table-cell>
          <table:table-cell table:style-name="Table25.A2" office:value-type="string">
            <text:p text:style-name="P183">Language used for system messages</text:p>
          </table:table-cell>
          <table:table-cell table:style-name="Table25.C2" office:value-type="string">
            <text:p text:style-name="P367">"Permission denied" in French</text:p>
          </table:table-cell>
        </table:table-row>
        <table:table-row>
          <table:table-cell table:style-name="Table25.A2" office:value-type="string">
            <text:p text:style-name="P366">LC_ALL</text:p>
          </table:table-cell>
          <table:table-cell table:style-name="Table25.A2" office:value-type="string">
            <text:p text:style-name="P183">Overrides all of the above</text:p>
          </table:table-cell>
          <table:table-cell table:style-name="Table25.C2" office:value-type="string">
            <text:p text:style-name="P367">Used for testing or global set</text:p>
          </table:table-cell>
        </table:table-row>
        <table:table-row table:style-name="Table25.9">
          <table:table-cell table:style-name="Table25.A2" office:value-type="string">
            <text:p text:style-name="P366">LANG</text:p>
          </table:table-cell>
          <table:table-cell table:style-name="Table25.A2" office:value-type="string">
            <text:p text:style-name="P368"><text:span text:style-name="T456">Default locale if no </text:span><text:span text:style-name="Source_20_Text"><text:span text:style-name="T457">LC_*</text:span></text:span><text:span text:style-name="T456"> is defined</text:span></text:p>
          </table:table-cell>
          <table:table-cell table:style-name="Table25.C2" office:value-type="string">
            <text:p text:style-name="P369">Used as a fallback</text:p>
            <text:p text:style-name="P367"/>
          </table:table-cell>
        </table:table-row>
      </table:table>
      <text:p text:style-name="P363"/>
      <text:p text:style-name="P370"><text:span text:style-name="T90">Tab </text:span><text:span text:style-name="T361">5</text:span><text:span text:style-name="T90">.</text:span> Locale settings</text:p>
      <text:p text:style-name="P363"/>
      <text:p text:style-name="P371">These settings can be specified through environment variables, <text:span text:style-name="T458">as follows.</text:span></text:p>
      <text:p text:style-name="P371"/>
      <table:table table:name="Table26" table:style-name="Table26">
        <table:table-column table:style-name="Table26.A"/>
        <table:table-row>
          <table:table-cell table:style-name="Table26.A1" office:value-type="string">
            <text:p text:style-name="P372"><text:span text:style-name="T80">[</text:span><text:a xlink:type="simple" xlink:href="mailto:linux@users" text:style-name="Internet_20_link" text:visited-style-name="Visited_20_Internet_20_Link"><text:span text:style-name="T81">linux@</text:span><text:span text:style-name="T342">users</text:span></text:a><text:span text:style-name="T80">] export LANG=en_US.UTF-8</text:span></text:p>
            <text:p text:style-name="P372"><text:span text:style-name="T80">[</text:span><text:a xlink:type="simple" xlink:href="mailto:linux@users" text:style-name="Internet_20_link" text:visited-style-name="Visited_20_Internet_20_Link"><text:span text:style-name="T81">linux@</text:span><text:span text:style-name="T342">users</text:span></text:a><text:span text:style-name="T80">] </text:span>export LC_TIME=it_IT.UTF-8</text:p>
          </table:table-cell>
        </table:table-row>
      </table:table>
      <text:p text:style-name="P371"/>
      <text:p text:style-name="P373"/>
      <text:p text:style-name="P373"/>
      <text:p text:style-name="P374"><text:soft-page-break/>III.3.1 Setting locale: <text:span text:style-name="T75">setlocale</text:span></text:p>
      <text:p text:style-name="P373"/>
      <text:p text:style-name="P373"><text:span text:style-name="T459">We can use</text:span> the <text:span text:style-name="T75">setlocale</text:span><text:span text:style-name="T75"><text:note text:id="ftn40" text:note-class="footnote"><text:note-citation>38</text:note-citation><text:note-body><text:p text:style-name="P375"><text:span text:style-name="T460">See the </text:span><text:span text:style-name="T461">setlocale(3)</text:span><text:span text:style-name="T462"> manual page</text:span></text:p></text:note-body></text:note></text:span> function to set <text:span text:style-name="T463">or query </text:span>the <text:span text:style-name="T464">program’s</text:span> current locale. </text:p>
      <text:p text:style-name="P373"/>
      <table:table table:name="Table27" table:style-name="Table27">
        <table:table-column table:style-name="Table27.A"/>
        <table:table-row>
          <table:table-cell table:style-name="Table27.A1" office:value-type="string">
            <text:p text:style-name="P376"><text:span text:style-name="T115">#include </text:span><text:span text:style-name="T116">&lt;locale.h&gt;</text:span></text:p>
            <text:p text:style-name="P188"/>
            <text:p text:style-name="P229"><text:span text:style-name="T103">char</text:span><text:span text:style-name="T104"> *</text:span><text:span text:style-name="T105">setlocale</text:span><text:span text:style-name="T104">(</text:span><text:span text:style-name="T103">int</text:span><text:span text:style-name="T104"> </text:span><text:span text:style-name="T106">category</text:span><text:span text:style-name="T104">, </text:span><text:span text:style-name="T103">const</text:span><text:span text:style-name="T104"> </text:span><text:span text:style-name="T103">char</text:span><text:span text:style-name="T104"> </text:span><text:span text:style-name="T106">*locale</text:span><text:span text:style-name="T104">);</text:span></text:p>
            <text:p text:style-name="P186"/>
            <text:p text:style-name="P377"><text:s text:c="17"/>Returns: string corresponding to the locale set, NULL on error</text:p>
          </table:table-cell>
        </table:table-row>
      </table:table>
      <text:p text:style-name="P373"/>
      <text:p text:style-name="P378"><text:span text:style-name="T465">The </text:span><text:span text:style-name="T466">category</text:span><text:span text:style-name="T465"> argument </text:span><text:span text:style-name="T467">may take</text:span><text:span text:style-name="T465"> one of the following </text:span><text:span text:style-name="T468">values.</text:span></text:p>
      <text:p text:style-name="P379"/>
      <table:table table:name="Table28" table:style-name="Table28">
        <table:table-column table:style-name="Table28.A"/>
        <table:table-column table:style-name="Table28.B"/>
        <table:table-row>
          <table:table-cell table:style-name="Table28.A1" office:value-type="string">
            <text:p text:style-name="P380">LC_ALL <text:s text:c="4"/></text:p>
          </table:table-cell>
          <table:table-cell table:style-name="Table28.B1" office:value-type="string">
            <text:p text:style-name="P381">All of the locale</text:p>
          </table:table-cell>
        </table:table-row>
        <table:table-row>
          <table:table-cell table:style-name="Table28.A2" office:value-type="string">
            <text:p text:style-name="P382">LC_ADDRESS</text:p>
          </table:table-cell>
          <table:table-cell table:style-name="Table28.B2" office:value-type="string">
            <text:p text:style-name="P381">Formatting of addresses and geography-related items (*)</text:p>
          </table:table-cell>
        </table:table-row>
        <table:table-row>
          <table:table-cell table:style-name="Table28.A2" office:value-type="string">
            <text:p text:style-name="P382">LC_COLLATE <text:s/></text:p>
          </table:table-cell>
          <table:table-cell table:style-name="Table28.B2" office:value-type="string">
            <text:p text:style-name="P381">String collation</text:p>
          </table:table-cell>
        </table:table-row>
        <table:table-row>
          <table:table-cell table:style-name="Table28.A2" office:value-type="string">
            <text:p text:style-name="P382">LC_CTYPE <text:s text:c="11"/></text:p>
          </table:table-cell>
          <table:table-cell table:style-name="Table28.B2" office:value-type="string">
            <text:p text:style-name="P381">Character classification</text:p>
          </table:table-cell>
        </table:table-row>
        <table:table-row>
          <table:table-cell table:style-name="Table28.A2" office:value-type="string">
            <text:p text:style-name="P382">LC_IDENTIFICATION <text:s text:c="2"/></text:p>
          </table:table-cell>
          <table:table-cell table:style-name="Table28.B2" office:value-type="string">
            <text:p text:style-name="P381">Metadata describing the locale (*)</text:p>
          </table:table-cell>
        </table:table-row>
        <table:table-row>
          <table:table-cell table:style-name="Table28.A2" office:value-type="string">
            <text:p text:style-name="P382">LC_MEASUREMENT <text:s text:c="5"/></text:p>
          </table:table-cell>
          <table:table-cell table:style-name="Table28.B2" office:value-type="string">
            <text:p text:style-name="P381">Settings related to measurements (metric versus US customary) (*)</text:p>
          </table:table-cell>
        </table:table-row>
        <table:table-row>
          <table:table-cell table:style-name="Table28.A2" office:value-type="string">
            <text:p text:style-name="P382">LC_MESSAGES <text:s text:c="8"/></text:p>
          </table:table-cell>
          <table:table-cell table:style-name="Table28.B2" office:value-type="string">
            <text:p text:style-name="P381">Localizable natural-language messages</text:p>
          </table:table-cell>
        </table:table-row>
        <table:table-row>
          <table:table-cell table:style-name="Table28.A2" office:value-type="string">
            <text:p text:style-name="P382">LC_MONETARY <text:s text:c="8"/></text:p>
          </table:table-cell>
          <table:table-cell table:style-name="Table28.B2" office:value-type="string">
            <text:p text:style-name="P381">Formatting of monetary values</text:p>
          </table:table-cell>
        </table:table-row>
        <table:table-row>
          <table:table-cell table:style-name="Table28.A2" office:value-type="string">
            <text:p text:style-name="P382">LC_NAME <text:s text:c="12"/></text:p>
          </table:table-cell>
          <table:table-cell table:style-name="Table28.B2" office:value-type="string">
            <text:p text:style-name="P381">Formatting of salutations for persons (*)</text:p>
          </table:table-cell>
        </table:table-row>
        <table:table-row>
          <table:table-cell table:style-name="Table28.A2" office:value-type="string">
            <text:p text:style-name="P382">LC_NUMERIC <text:s text:c="9"/></text:p>
          </table:table-cell>
          <table:table-cell table:style-name="Table28.B2" office:value-type="string">
            <text:p text:style-name="P381">Formatting of nonmonetary numeric values</text:p>
          </table:table-cell>
        </table:table-row>
        <table:table-row>
          <table:table-cell table:style-name="Table28.A2" office:value-type="string">
            <text:p text:style-name="P382">LC_PAPER <text:s text:c="11"/></text:p>
          </table:table-cell>
          <table:table-cell table:style-name="Table28.B2" office:value-type="string">
            <text:p text:style-name="P381">Settings related to the standard paper size (*)</text:p>
          </table:table-cell>
        </table:table-row>
        <table:table-row>
          <table:table-cell table:style-name="Table28.A2" office:value-type="string">
            <text:p text:style-name="P382">LC_TELEPHONE <text:s text:c="7"/></text:p>
          </table:table-cell>
          <table:table-cell table:style-name="Table28.B2" office:value-type="string">
            <text:p text:style-name="P381">Formats to be used with telephone services (*)</text:p>
          </table:table-cell>
        </table:table-row>
        <table:table-row>
          <table:table-cell table:style-name="Table28.A2" office:value-type="string">
            <text:p text:style-name="P382">LC_TIME <text:s text:c="11"/></text:p>
          </table:table-cell>
          <table:table-cell table:style-name="Table28.B2" office:value-type="string">
            <text:p text:style-name="P381"><text:s/>Formatting of date and time values</text:p>
          </table:table-cell>
        </table:table-row>
      </table:table>
      <text:p text:style-name="P379"/>
      <text:p text:style-name="P383"><text:span text:style-name="T90">Tab </text:span><text:span text:style-name="T361">6</text:span><text:span text:style-name="T90">.</text:span> Locale categories</text:p>
      <text:p text:style-name="P383"/>
      <text:p text:style-name="P384"><text:span text:style-name="T469">The categories marked with an asterisk are GNU extensions. Many details about these categories are availabe in the </text:span><text:span text:style-name="T470">locale(7)</text:span><text:span text:style-name="T469"> manual page. </text:span><text:span text:style-name="T471">The data types and functions are defined in the </text:span><text:span text:style-name="T470">locale.h</text:span><text:span text:style-name="T471"> header </text:span><text:span text:style-name="T467">file. </text:span><text:span text:style-name="T471">The following table shows a list of the current implemented functions.</text:span></text:p>
      <text:p text:style-name="P385"/>
      <table:table table:name="Table29" table:style-name="Table29">
        <table:table-column table:style-name="Table29.A"/>
        <table:table-column table:style-name="Table29.B"/>
        <table:table-row>
          <table:table-cell table:style-name="Table29.A1" office:value-type="string">
            <text:p text:style-name="P386">setlocale</text:p>
          </table:table-cell>
          <table:table-cell table:style-name="Table29.B1" office:value-type="string">
            <text:p text:style-name="P387">Set/return the current locale</text:p>
          </table:table-cell>
        </table:table-row>
        <table:table-row>
          <table:table-cell table:style-name="Table29.A2" office:value-type="string">
            <text:p text:style-name="P386">localeconv</text:p>
          </table:table-cell>
          <table:table-cell table:style-name="Table29.B2" office:value-type="string">
            <text:p text:style-name="P387">Returns the numeric/monetary information for the current locale</text:p>
          </table:table-cell>
        </table:table-row>
        <table:table-row>
          <table:table-cell table:style-name="Table29.A2" office:value-type="string">
            <text:p text:style-name="P386">newlocale</text:p>
          </table:table-cell>
          <table:table-cell table:style-name="Table29.B2" office:value-type="string">
            <text:p text:style-name="P387">Returns a reference to a data structure representing a set of locale dataset</text:p>
          </table:table-cell>
        </table:table-row>
        <table:table-row>
          <table:table-cell table:style-name="Table29.A2" office:value-type="string">
            <text:p text:style-name="P386">duplocale</text:p>
          </table:table-cell>
          <table:table-cell table:style-name="Table29.B2" office:value-type="string">
            <text:p text:style-name="P387">Return a duplicate of the set of locale</text:p>
          </table:table-cell>
        </table:table-row>
        <table:table-row>
          <table:table-cell table:style-name="Table29.A2" office:value-type="string">
            <text:p text:style-name="P386">freelocale</text:p>
          </table:table-cell>
          <table:table-cell table:style-name="Table29.B2" office:value-type="string">
            <text:p text:style-name="P388"><text:span text:style-name="T472">Free the data associated with a locale dataset previously returned by </text:span><text:span text:style-name="T470">setlocale_r</text:span></text:p>
          </table:table-cell>
        </table:table-row>
        <table:table-row>
          <table:table-cell table:style-name="Table29.A2" office:value-type="string">
            <text:p text:style-name="P386">uselocale</text:p>
          </table:table-cell>
          <table:table-cell table:style-name="Table29.B2" office:value-type="string">
            <text:p text:style-name="P387">Switch the current thread’s locale to a new one</text:p>
          </table:table-cell>
        </table:table-row>
      </table:table>
      <text:p text:style-name="P385"/>
      <text:p text:style-name="P389"><text:span text:style-name="T90">Tab </text:span><text:span text:style-name="T361">7</text:span><text:span text:style-name="T90">.</text:span> Locale functions </text:p>
      <text:p text:style-name="P384"><text:soft-page-break/><text:span text:style-name="T471">To handle numeric and monetary formatting, C provides the </text:span><text:span text:style-name="Source_20_Text"><text:span text:style-name="T470">lconv</text:span></text:span><text:span text:style-name="T471"> structure, defined as follows.</text:span><text:span text:style-name="T473"> </text:span></text:p>
      <text:p text:style-name="P390"/>
      <table:table table:name="Table30" table:style-name="Table30">
        <table:table-column table:style-name="Table30.A"/>
        <table:table-row>
          <table:table-cell table:style-name="Table30.A1" office:value-type="string">
            <text:p text:style-name="P391"><text:span text:style-name="T115">struct</text:span> lconv</text:p>
            <text:p text:style-name="P392">{</text:p>
            <text:p text:style-name="P393">/* Numeric (non-monetary) information. */</text:p>
            <text:p text:style-name="P392"><text:span text:style-name="T115"><text:s text:c="3"/>char</text:span> *decimal_point;<text:span text:style-name="T119"> /* Decimal point character. */</text:span></text:p>
            <text:p text:style-name="P392"><text:span text:style-name="T115"><text:s text:c="3"/>char</text:span> *thousands_sep;<text:span text:style-name="T119"> /* Thousands separator. */</text:span></text:p>
            <text:p text:style-name="P394"><text:span text:style-name="T101"><text:s text:c="3"/>char</text:span><text:span text:style-name="T124"> *grouping;</text:span></text:p>
            <text:p text:style-name="P393">/* Monetary information. */</text:p>
            <text:p text:style-name="P392"><text:span text:style-name="T115"><text:s text:c="3"/>char</text:span> *int_curr_symbol;</text:p>
            <text:p text:style-name="P392"><text:span text:style-name="T115"><text:s text:c="3"/>char</text:span> *currency_symbol;<text:span text:style-name="T119"> /* Local currency symbol. */</text:span></text:p>
            <text:p text:style-name="P392"><text:span text:style-name="T115"><text:s text:c="3"/>char</text:span> *mon_decimal_point;<text:span text:style-name="T119"> /* Decimal point character. */</text:span></text:p>
            <text:p text:style-name="P392"><text:span text:style-name="T115"><text:s text:c="3"/>char</text:span> *mon_thousands_sep;<text:span text:style-name="T119"> /* Thousands separator. */</text:span></text:p>
            <text:p text:style-name="P392"><text:span text:style-name="T115"><text:s text:c="3"/>char</text:span> *mon_grouping;<text:span text:style-name="T119"> /* Like `grouping' element (above). */</text:span></text:p>
            <text:p text:style-name="P392"><text:span text:style-name="T115"><text:s text:c="3"/>char</text:span> *positive_sign;<text:span text:style-name="T119"> /* Sign for positive values. */</text:span></text:p>
            <text:p text:style-name="P392"><text:span text:style-name="T115"><text:s text:c="3"/>char</text:span> *negative_sign;<text:span text:style-name="T119"> /* Sign for negative values. */</text:span></text:p>
            <text:p text:style-name="P392"><text:span text:style-name="T115"><text:s text:c="3"/>char</text:span> int_frac_digits;<text:span text:style-name="T119"> /* Int'l fractional digits. */</text:span></text:p>
            <text:p text:style-name="P392"><text:span text:style-name="T115"><text:s text:c="3"/>char</text:span> frac_digits;<text:span text:style-name="T119"> /* Local fractional digits. */</text:span></text:p>
            <text:p text:style-name="P393">/* 1 if currency_symbol precedes a positive value, 0 if succeeds. */</text:p>
            <text:p text:style-name="P392"><text:span text:style-name="T115"><text:s text:c="3"/>char</text:span> p_cs_precedes;</text:p>
            <text:p text:style-name="P393">/* 1 if a space separates currency_symbol from a positive value. */</text:p>
            <text:p text:style-name="P392"><text:span text:style-name="T115"><text:s text:c="3"/>char</text:span> p_sep_by_space;</text:p>
            <text:p text:style-name="P393">/* 1 if currency_symbol precedes a negative value, 0 if succeeds. */</text:p>
            <text:p text:style-name="P392"><text:span text:style-name="T115"><text:s text:c="3"/>char</text:span> n_cs_precedes;</text:p>
            <text:p text:style-name="P393">/* 1 iff a space separates currency_symbol from a negative value. */</text:p>
            <text:p text:style-name="P392"><text:span text:style-name="T115"><text:s text:c="3"/>char</text:span> n_sep_by_space;</text:p>
            <text:p text:style-name="P393">/* Positive and negative sign positions:</text:p>
            <text:p text:style-name="P392"><text:span text:style-name="T115"><text:s text:c="3"/>char</text:span> p_sign_posn;</text:p>
            <text:p text:style-name="P392"><text:span text:style-name="T115"><text:s text:c="3"/>char</text:span> n_sign_posn;</text:p>
            <text:p text:style-name="P395">#ifdef __USE_ISOC99</text:p>
            <text:p text:style-name="P393">/* 1 if int_curr_symbol precedes a positive value, 0 if succeeds. */</text:p>
            <text:p text:style-name="P392"><text:span text:style-name="T115"><text:s text:c="3"/>char</text:span> int_p_cs_precedes;</text:p>
            <text:p text:style-name="P393">/* 1 if a space separates int_curr_symbol from a positive value. */</text:p>
            <text:p text:style-name="P392"><text:span text:style-name="T115"><text:s text:c="3"/>char</text:span> int_p_sep_by_space;</text:p>
            <text:p text:style-name="P393">/* 1 if int_curr_symbol precedes a negative value, 0 if succeeds. */</text:p>
            <text:p text:style-name="P392"><text:span text:style-name="T115"><text:s text:c="3"/>char</text:span> int_n_cs_precedes;</text:p>
            <text:p text:style-name="P393">/* 1 if a space separates int_curr_symbol from a negative value. */</text:p>
            <text:p text:style-name="P392"><text:span text:style-name="T115"><text:s text:c="3"/>char</text:span> int_n_sep_by_space;</text:p>
            <text:p text:style-name="P393">/* Positive and negative sign positions:</text:p>
            <text:p text:style-name="P392"><text:span text:style-name="T115"><text:s text:c="3"/>char</text:span> int_p_sign_posn;</text:p>
            <text:p text:style-name="P392"><text:span text:style-name="T115"><text:s text:c="3"/>char</text:span> int_n_sign_posn;</text:p>
            <text:p text:style-name="P395">#else</text:p>
            <text:p text:style-name="P392"><text:span text:style-name="T115"><text:s text:c="3"/>char</text:span> __int_p_cs_precedes;</text:p>
            <text:p text:style-name="P392"><text:span text:style-name="T115"><text:s text:c="3"/>char</text:span> __int_p_sep_by_space;</text:p>
            <text:p text:style-name="P392"><text:span text:style-name="T115"><text:s text:c="3"/>char</text:span> __int_n_cs_precedes;</text:p>
            <text:p text:style-name="P392"><text:span text:style-name="T115"><text:s text:c="3"/>char</text:span> __int_n_sep_by_space; </text:p>
            <text:p text:style-name="P392"><text:span text:style-name="T115"><text:s text:c="3"/>char</text:span> __int_p_sign_posn;</text:p>
            <text:p text:style-name="P392"><text:span text:style-name="T115"><text:s text:c="3"/>char</text:span> __int_n_sign_posn;</text:p>
            <text:p text:style-name="P395">#endif</text:p>
            <text:p text:style-name="P392">};</text:p>
          </table:table-cell>
        </table:table-row>
      </table:table>
      <text:p text:style-name="P396"><text:soft-page-break/><text:span text:style-name="T474">III.3.2 Working with locale: </text:span><text:span text:style-name="T475">localeconv</text:span><text:span text:style-name="T474">, <text:s/></text:span><text:span text:style-name="T475">newlocale</text:span><text:span text:style-name="T474"> and </text:span><text:span text:style-name="T475">uselocale</text:span></text:p>
      <text:p text:style-name="P397"/>
      <text:p text:style-name="P398"><text:span text:style-name="T476">The function </text:span><text:span text:style-name="T477">localeconv</text:span><text:span text:style-name="T476"><text:note text:id="ftn41" text:note-class="footnote"><text:note-citation>39</text:note-citation><text:note-body><text:p text:style-name="P375"><text:span text:style-name="T478">See the </text:span><text:span text:style-name="T479">localeconv(3)</text:span><text:span text:style-name="T480"> manual page</text:span></text:p></text:note-body></text:note></text:span><text:span text:style-name="T476"> returns a pointer to a </text:span><text:span text:style-name="T477">struct</text:span><text:span text:style-name="T476"> </text:span><text:span text:style-name="T477">lconv</text:span><text:span text:style-name="T476"> for the current locale that contains all values associated with the locale categories </text:span><text:span text:style-name="T477">LC_NUMERIC</text:span><text:span text:style-name="T476"> and </text:span><text:span text:style-name="T477">LC_MONETARY</text:span></text:p>
      <text:p text:style-name="P399"/>
      <table:table table:name="Table31" table:style-name="Table31">
        <table:table-column table:style-name="Table31.A"/>
        <table:table-row>
          <table:table-cell table:style-name="Table31.A1" office:value-type="string">
            <text:p text:style-name="P271"><text:span text:style-name="T115">#include </text:span><text:span text:style-name="T116">&lt;locale.h&gt;</text:span></text:p>
            <text:p text:style-name="P188"/>
            <text:p text:style-name="P229"><text:span text:style-name="T103">struct</text:span><text:span text:style-name="T104"> </text:span><text:span text:style-name="T103">lconv</text:span><text:span text:style-name="T104"> *</text:span><text:span text:style-name="T105">localeconv</text:span><text:span text:style-name="T104">(</text:span><text:span text:style-name="T103">void</text:span><text:span text:style-name="T104">);</text:span></text:p>
            <text:p text:style-name="P186"/>
            <text:p text:style-name="P400"><text:s text:c="33"/>Returns: a pointer to a filled in struct lconv</text:p>
          </table:table-cell>
        </table:table-row>
      </table:table>
      <text:p text:style-name="P399"/>
      <text:p text:style-name="P398"><text:span text:style-name="T481">The program </text:span><text:span text:style-name="T477">locale_info.c</text:span><text:span text:style-name="T481"> shows an example.</text:span></text:p>
      <text:p text:style-name="Horizontal_20_Line"/>
      <text:p text:style-name="P186"><text:span text:style-name="T482">1 </text:span><text:span text:style-name="T115">#include </text:span><text:span text:style-name="T116">&lt;stdio.h&gt;</text:span></text:p>
      <text:p text:style-name="P401"><text:span text:style-name="T482">2 </text:span><text:span text:style-name="T115">#include </text:span><text:span text:style-name="T116">&lt;locale.h&gt;</text:span></text:p>
      <text:p text:style-name="P401"><text:span text:style-name="T482">3 </text:span><text:span text:style-name="T115">#include </text:span><text:span text:style-name="T116">&lt;stdlib.h&gt;</text:span></text:p>
      <text:p text:style-name="P188"/>
      <text:p text:style-name="P401"><text:span text:style-name="T482">4 </text:span><text:span text:style-name="T115">int</text:span> main(<text:span text:style-name="T115">int</text:span> argc, <text:span text:style-name="T115">char</text:span> *argv<text:span text:style-name="T115">[]</text:span>) {</text:p>
      <text:p text:style-name="P188"/>
      <text:p text:style-name="P401"><text:span text:style-name="T482">5 <text:tab/></text:span><text:span text:style-name="T115">if</text:span> (argc != <text:span text:style-name="T127">2</text:span>) {</text:p>
      <text:p text:style-name="P401"><text:span text:style-name="T482">6 <text:tab/><text:tab/></text:span>printf(<text:span text:style-name="T116">"\nUsage: %s &lt;LANG&gt;\n"</text:span>, argv[<text:span text:style-name="T127">0</text:span>]);</text:p>
      <text:p text:style-name="P401"><text:span text:style-name="T482">7 <text:tab/><text:tab/></text:span>printf(<text:span text:style-name="T116">"\nExample:\n"</text:span>);</text:p>
      <text:p text:style-name="P401"><text:span text:style-name="T482">8 <text:tab/><text:tab/></text:span>printf(<text:span text:style-name="T116">"%s en_US.UTF-8\n"</text:span>, argv[<text:span text:style-name="T127">0</text:span>]);</text:p>
      <text:p text:style-name="P401"><text:span text:style-name="T482">9 <text:tab/><text:tab/></text:span>printf(<text:span text:style-name="T116">"%s fr_FR.UTF-8\n"</text:span>, argv[<text:span text:style-name="T127">0</text:span>]);</text:p>
      <text:p text:style-name="P401"><text:span text:style-name="T482">10 <text:tab/><text:tab/></text:span>exit(<text:span text:style-name="T115">EXIT_FAILURE</text:span>);</text:p>
      <text:p text:style-name="P401"><text:span text:style-name="T482">11 <text:tab/></text:span>}</text:p>
      <text:p text:style-name="P188"/>
      <text:p text:style-name="P401"><text:span text:style-name="T482">12 <text:tab/></text:span><text:span text:style-name="T115">if</text:span> (!<text:span text:style-name="T126">setlocale</text:span>(<text:span text:style-name="T115">LC_ALL</text:span>, argv[<text:span text:style-name="T127">1</text:span>])) {</text:p>
      <text:p text:style-name="P401"><text:span text:style-name="T482">13 <text:tab/><text:tab/></text:span>perror(<text:span text:style-name="T116">"setlocale"</text:span>);</text:p>
      <text:p text:style-name="P401"><text:span text:style-name="T482">14 <text:tab/><text:tab/></text:span>exit(<text:span text:style-name="T115">EXIT_FAILURE</text:span>);</text:p>
      <text:p text:style-name="P401"><text:span text:style-name="T482">15 <text:tab/></text:span>}</text:p>
      <text:p text:style-name="P188"/>
      <text:p text:style-name="P402"><text:span text:style-name="T483">16 <text:tab/></text:span><text:span text:style-name="T103">struct</text:span><text:span text:style-name="T104"> </text:span><text:span text:style-name="T103">lconv</text:span><text:span text:style-name="T104"> *lc = </text:span><text:span text:style-name="T105">localeconv</text:span><text:span text:style-name="T104">();</text:span></text:p>
      <text:p text:style-name="P401"><text:span text:style-name="T482">17 <text:tab/></text:span>printf(<text:span text:style-name="T116">"Locale settings:\n"</text:span>);</text:p>
      <text:p text:style-name="P401"><text:span text:style-name="T482">18 <text:tab/></text:span>printf(<text:span text:style-name="T116">"Decimal point : '%s'\n"</text:span>, lc-&gt;decimal_point);</text:p>
      <text:p text:style-name="P401"><text:span text:style-name="T482">19 <text:tab/></text:span>printf(<text:span text:style-name="T116">"Thousands separator : '%s'\n"</text:span>, lc-&gt;thousands_sep);</text:p>
      <text:p text:style-name="P401"><text:span text:style-name="T482">20 <text:tab/></text:span>printf(<text:span text:style-name="T116">"Currency symbol : '%s'\n"</text:span>, lc-&gt;currency_symbol);</text:p>
      <text:p text:style-name="P401"><text:span text:style-name="T482">21 <text:tab/></text:span>printf(<text:span text:style-name="T116">"Positive sign : '%s'\n"</text:span>, lc-&gt;positive_sign);</text:p>
      <text:p text:style-name="P401"><text:span text:style-name="T482">22 <text:tab/></text:span>printf(<text:span text:style-name="T116">"Negative sign : '%s'\n"</text:span>, lc-&gt;negative_sign);</text:p>
      <text:p text:style-name="P403"><text:span text:style-name="T482">23 <text:tab/></text:span>printf(<text:span text:style-name="T116">"International currency symbol: '%s'\n"</text:span>, <text:s text:c="17"/></text:p>
      <text:p text:style-name="P403"><text:tab/><text:tab/> <text:s/>lc-&gt;int_curr_symbol);</text:p>
      <text:p text:style-name="P188"/>
      <text:p text:style-name="P401"><text:span text:style-name="T482">24 <text:tab/></text:span>exit(<text:span text:style-name="T115">EXIT_SUCCESS</text:span>);</text:p>
      <text:p text:style-name="P401"><text:span text:style-name="T482">25 </text:span>}</text:p>
      <text:p text:style-name="Horizontal_20_Line"/>
      <text:p text:style-name="P404">locale_info.c</text:p>
      <text:p text:style-name="P405"/>
      <text:p text:style-name="P406"/>
      <text:p text:style-name="P406"><text:soft-page-break/><text:span text:style-name="T458">We e</text:span>xecute the program passing different locale<text:span text:style-name="T451">s</text:span>.</text:p>
      <text:p text:style-name="P406"/>
      <table:table table:name="Table32" table:style-name="Table32">
        <table:table-column table:style-name="Table32.A"/>
        <table:table-row>
          <table:table-cell table:style-name="Table32.A1" office:value-type="string">
            <text:p text:style-name="P40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484">locale_info en_US.UTF-8</text:span></text:p>
            <text:p text:style-name="P407">Locale settings:</text:p>
            <text:p text:style-name="P407">Decimal point <text:s text:c="6"/>: '<text:span text:style-name="T90">.</text:span>'</text:p>
            <text:p text:style-name="P407">Thousands separator : '<text:span text:style-name="T90">,</text:span>'</text:p>
            <text:p text:style-name="P407">Currency symbol <text:s text:c="4"/>: '<text:span text:style-name="T90">$</text:span>'</text:p>
            <text:p text:style-name="P407">Positive sign <text:s text:c="6"/>: ''</text:p>
            <text:p text:style-name="P407">Negative sign <text:s text:c="6"/>: '-'</text:p>
            <text:p text:style-name="P407">International currency symbol: '<text:span text:style-name="T90">USD</text:span> '</text:p>
            <text:p text:style-name="P407"/>
            <text:p text:style-name="P40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484">locale_info fr_FR.UTF-8</text:span></text:p>
            <text:p text:style-name="P407">Locale settings:</text:p>
            <text:p text:style-name="P407">Decimal point <text:s text:c="6"/>: '<text:span text:style-name="T90">,</text:span>'</text:p>
            <text:p text:style-name="P407">Thousands separator : ' '</text:p>
            <text:p text:style-name="P407">Currency symbol <text:s text:c="4"/>: '<text:span text:style-name="T90">€</text:span>'</text:p>
            <text:p text:style-name="P407">Positive sign <text:s text:c="6"/>: ''</text:p>
            <text:p text:style-name="P407">Negative sign <text:s text:c="6"/>: '-'</text:p>
            <text:p text:style-name="P407">International currency symbol: '<text:span text:style-name="T90">EUR</text:span> '</text:p>
            <text:p text:style-name="P407"/>
            <text:p text:style-name="P408"><text:span text:style-name="T80">[</text:span><text:a xlink:type="simple" xlink:href="mailto:linux@users" text:style-name="Internet_20_link" text:visited-style-name="Visited_20_Internet_20_Link"><text:span text:style-name="T81">linux@</text:span><text:span text:style-name="T342">users</text:span></text:a><text:span text:style-name="T80">] </text:span>./locale_info ja_JP.utf8</text:p>
            <text:p text:style-name="P408">Locale settings:</text:p>
            <text:p text:style-name="P408">Decimal point <text:s text:c="6"/>: '<text:span text:style-name="T90">.</text:span>'</text:p>
            <text:p text:style-name="P408">Thousands separator : '<text:span text:style-name="T90">,</text:span>'</text:p>
            <text:p text:style-name="P408">Currency symbol <text:s text:c="4"/>: '<text:span text:style-name="T90">￥</text:span>'</text:p>
            <text:p text:style-name="P408">Positive sign <text:s text:c="6"/>: ''</text:p>
            <text:p text:style-name="P408">Negative sign <text:s text:c="6"/>: '-'</text:p>
            <text:p text:style-name="P408">International currency symbol: '<text:span text:style-name="T90">JPY</text:span> '</text:p>
          </table:table-cell>
        </table:table-row>
      </table:table>
      <text:p text:style-name="Standard"/>
      <text:p text:style-name="P409">We pass three different locale identifiers: <text:span text:style-name="Source_20_Text"><text:span text:style-name="T485">en_US.UTF-8</text:span></text:span>, <text:span text:style-name="Source_20_Text"><text:span text:style-name="T485">fr_FR.UTF-8</text:span></text:span>, and <text:span text:style-name="Source_20_Text"><text:span text:style-name="T485">ja_JP.utf8</text:span></text:span>. The output of the program changes depending on the locale selected at runtime.</text:p>
      <text:p text:style-name="P201">Program behavior is influenced by locale settings, which determine how language- and region-specific conventions are applied. Formatting details such as the decimal point, thousands separator, currency symbol, and international currency representation vary across locales.</text:p>
      <text:p text:style-name="P201">As observed, the same program produces different outputs for each locale, confirming that execution is context-dependent and relies on the environment in which it runs.</text:p>
      <text:p text:style-name="P410"/>
      <text:p text:style-name="P409"><text:span text:style-name="T486">To </text:span><text:span text:style-name="T487">retrieve</text:span><text:span text:style-name="T486"> the full list of available locales on the system, we can use the </text:span><text:span text:style-name="Source_20_Text"><text:span text:style-name="T485">locale</text:span></text:span><text:span text:style-name="T486"> command with the </text:span><text:span text:style-name="Source_20_Text"><text:span text:style-name="T485">-a</text:span></text:span><text:span text:style-name="T486"> option.</text:span></text:p>
      <text:p text:style-name="P411"/>
      <table:table table:name="Table229" table:style-name="Table229">
        <table:table-column table:style-name="Table229.A"/>
        <table:table-row>
          <table:table-cell table:style-name="Table229.A1" office:value-type="string">
            <text:p text:style-name="P41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484">loca</text:span><text:span text:style-name="T451">le -a</text:span></text:p>
            <text:p text:style-name="P412">C</text:p>
            <text:p text:style-name="P412">C.utf8</text:p>
            <text:p text:style-name="P412">POSIX</text:p>
            <text:p text:style-name="P412">aa_DJ</text:p>
            <text:p text:style-name="P412">aa_DJ.utf8</text:p>
            <text:p text:style-name="P412">aa_ER</text:p>
            <text:p text:style-name="P413">...<text:span text:style-name="T451">output...</text:span></text:p>
          </table:table-cell>
        </table:table-row>
      </table:table>
      <text:p text:style-name="P411"/>
      <text:p text:style-name="P414"/>
      <text:p text:style-name="P415"/>
      <text:p text:style-name="P415"><text:soft-page-break/>C, C.UTF-8, and POSIX are standard or special-purpose base locales that define default system-wide formatting and behavior. The C locale is the original default locale defined by the C standard. POSIX is functionally equivalent to the C locale, while C.UTF-8 is a variant that extends the C locale by supporting UTF-8 encoding.</text:p>
      <text:p text:style-name="P416"/>
      <text:p text:style-name="P417"><text:span text:style-name="T486">The functions </text:span><text:span text:style-name="T485">nl_langinfo</text:span><text:span text:style-name="T486"><text:note text:id="ftn42" text:note-class="footnote"><text:note-citation>40</text:note-citation><text:note-body><text:p text:style-name="P375"><text:span text:style-name="T488">See the </text:span><text:span text:style-name="T489">nl_langinfo(3)</text:span><text:span text:style-name="T490"> manual page</text:span></text:p></text:note-body></text:note></text:span><text:span text:style-name="T486"> and </text:span><text:span text:style-name="T485">nl_langinfo_l</text:span><text:span text:style-name="T486"> are used to query language and locale information in a more flexible way. They are defined as follows.</text:span></text:p>
      <text:p text:style-name="P415"/>
      <table:table table:name="Table33" table:style-name="Table33">
        <table:table-column table:style-name="Table33.A"/>
        <table:table-row>
          <table:table-cell table:style-name="Table33.A1" office:value-type="string">
            <text:p text:style-name="P271"><text:span text:style-name="T115">#include </text:span><text:span text:style-name="T116">&lt;langinfo.h&gt;</text:span></text:p>
            <text:p text:style-name="P188"/>
            <text:p text:style-name="P229"><text:span text:style-name="T103">char</text:span><text:span text:style-name="T104"> *</text:span><text:span text:style-name="T105">nl_langinfo</text:span><text:span text:style-name="T104">(</text:span><text:span text:style-name="T103">nl_item</text:span><text:span text:style-name="T104"> </text:span><text:span text:style-name="T106">item</text:span><text:span text:style-name="T104">);</text:span></text:p>
            <text:p text:style-name="P186"/>
            <text:p text:style-name="P229"><text:span text:style-name="T103">char</text:span><text:span text:style-name="T104"> *</text:span><text:span text:style-name="T105">nl_langinfo_l</text:span><text:span text:style-name="T104">(</text:span><text:span text:style-name="T103">nl_item</text:span><text:span text:style-name="T104"> </text:span><text:span text:style-name="T106">item</text:span><text:span text:style-name="T104">, </text:span><text:span text:style-name="T103">locale_t</text:span><text:span text:style-name="T104"> </text:span><text:span text:style-name="T106">locale</text:span><text:span text:style-name="T104">);</text:span></text:p>
            <text:p text:style-name="P186"/>
            <text:p text:style-name="P418">Return: a pointer to a string with the value of item, if <text:s/>no locale <text:s/>has <text:s/>been <text:s text:c="2"/></text:p>
            <text:p text:style-name="P418"><text:s text:c="8"/>selected by setlocale for the appropriate category, return a pointer to <text:s text:c="2"/></text:p>
            <text:p text:style-name="P418"><text:s text:c="8"/>the corresponding string in the "C" locale</text:p>
          </table:table-cell>
        </table:table-row>
      </table:table>
      <text:p text:style-name="P415"/>
      <text:p text:style-name="P417"><text:span text:style-name="T491">The function </text:span><text:span text:style-name="T485">nl_langinfo</text:span><text:span text:style-name="T491"> </text:span><text:span text:style-name="T492">returns a string </text:span><text:span text:style-name="T491">with</text:span><text:span text:style-name="T492"> the value corresponding to </text:span><text:span text:style-name="T485">item</text:span><text:span text:style-name="T492"> in the program's current locale. </text:span><text:span text:style-name="T491">The function</text:span><text:span text:style-name="T492"> </text:span><text:span text:style-name="T485">nl_langinfo_l</text:span><text:span text:style-name="T492"> returns a string </text:span><text:span text:style-name="T491">with</text:span><text:span text:style-name="T492"> the value corresponding to </text:span><text:span text:style-name="T485">item</text:span><text:span text:style-name="T492"> for the locale identified by the </text:span><text:span text:style-name="T485">locale</text:span><text:span text:style-name="T492"> </text:span><text:span text:style-name="T491">parameter</text:span><text:span text:style-name="T492">, which was previously created by </text:span><text:span text:style-name="T491">a call to </text:span><text:span text:style-name="T485">newlocale</text:span><text:span text:style-name="T492">.</text:span></text:p>
      <text:p text:style-name="P419"/>
      <text:p text:style-name="P384"><text:span text:style-name="T491">The </text:span><text:span text:style-name="T485">newlocale</text:span><text:span text:style-name="T485"><text:note text:id="ftn43" text:note-class="footnote"><text:note-citation>41</text:note-citation><text:note-body><text:p text:style-name="P375"><text:span text:style-name="T493">See the </text:span><text:span text:style-name="T494">newlocale(3)</text:span><text:span text:style-name="T495"> manual page</text:span></text:p></text:note-body></text:note></text:span><text:span text:style-name="T491"> function creates a new </text:span><text:span text:style-name="T496">locale object</text:span><text:span text:style-name="T491">, </text:span><text:span text:style-name="T467">while</text:span><text:span text:style-name="T491"> </text:span><text:span text:style-name="T485">freelocale</text:span><text:span text:style-name="T491"> </text:span><text:span text:style-name="T467">releases </text:span><text:span text:style-name="T491">the memory a</text:span><text:span text:style-name="T467">ss</text:span><text:span text:style-name="T491">oc</text:span><text:span text:style-name="T467">i</text:span><text:span text:style-name="T491">ated </text:span><text:span text:style-name="T467">with a </text:span><text:span text:style-name="T491">locale object. The</text:span><text:span text:style-name="T467">se</text:span><text:span text:style-name="T491"> two functions are defined </text:span><text:span text:style-name="T468">as follows.</text:span></text:p>
      <text:p text:style-name="P420"/>
      <table:table table:name="Table34" table:style-name="Table34">
        <table:table-column table:style-name="Table34.A"/>
        <table:table-row>
          <table:table-cell table:style-name="Table34.A1" office:value-type="string">
            <text:p text:style-name="P271"><text:span text:style-name="T115">#include </text:span><text:span text:style-name="T116">&lt;locale.h&gt;</text:span></text:p>
            <text:p text:style-name="P188"/>
            <text:p text:style-name="P201"><text:span text:style-name="T103">locale_t</text:span><text:span text:style-name="T104"> </text:span><text:span text:style-name="T105">newlocale</text:span><text:span text:style-name="T104">(</text:span><text:span text:style-name="T103">int</text:span><text:span text:style-name="T104"> </text:span><text:span text:style-name="T106">category_mask</text:span><text:span text:style-name="T104">, </text:span><text:span text:style-name="T103">const</text:span><text:span text:style-name="T104"> </text:span><text:span text:style-name="T103">char</text:span><text:span text:style-name="T104"> *</text:span><text:span text:style-name="T106">locale</text:span><text:span text:style-name="T104">, </text:span><text:span text:style-name="T103">locale_t</text:span><text:span text:style-name="T104"> </text:span></text:p>
            <text:p text:style-name="P421"><text:s text:c="19"/><text:span text:style-name="T68">base</text:span>);</text:p>
            <text:p text:style-name="P421"/>
            <text:p text:style-name="P201"><text:span text:style-name="T103">void</text:span><text:span text:style-name="T104"> </text:span><text:span text:style-name="T105">freelocale</text:span><text:span text:style-name="T104">(</text:span><text:span text:style-name="T103">locale_t</text:span><text:span text:style-name="T104"> </text:span><text:span text:style-name="T106">locobj</text:span><text:span text:style-name="T104">);</text:span></text:p>
            <text:p text:style-name="P283"/>
            <text:p text:style-name="P422"><text:s text:c="46"/>Return: a handle of locale_t type</text:p>
          </table:table-cell>
        </table:table-row>
      </table:table>
      <text:p text:style-name="P423"/>
      <text:p text:style-name="P424"><text:span text:style-name="T497">Concerning the </text:span><text:span text:style-name="T498">nl_langinfo</text:span><text:span text:style-name="T497"> function, </text:span><text:span text:style-name="T499">the values </text:span><text:span text:style-name="T497">that can be specified in the </text:span><text:span text:style-name="T498">item</text:span><text:span text:style-name="T497"> argument is </text:span><text:span text:style-name="T499">listed in </text:span><text:span text:style-name="T497">the following </text:span><text:span text:style-name="T499">table.</text:span></text:p>
      <text:p text:style-name="P425"/>
      <table:table table:name="Table35" table:style-name="Table35">
        <table:table-column table:style-name="Table35.A"/>
        <table:table-column table:style-name="Table35.B"/>
        <table:table-row>
          <table:table-cell table:style-name="Table35.A1" office:value-type="string">
            <text:p text:style-name="P426">CODESET</text:p>
          </table:table-cell>
          <table:table-cell table:style-name="Table35.B1" office:value-type="string">
            <text:p text:style-name="P427"><text:span text:style-name="T456">Return <text:s/>a <text:s/>string <text:s/>with <text:s/>the <text:s/>name <text:s/>of <text:s/>the <text:s/>character <text:s/>encoding used in the selected locale, such as "</text:span><text:span text:style-name="T498">UTF-8</text:span><text:span text:style-name="T456">", "</text:span><text:span text:style-name="T498">ISO-8859-1</text:span><text:span text:style-name="T456">", or "</text:span><text:span text:style-name="T498">ANSI_X3.4-1968</text:span><text:span text:style-name="T456">"</text:span></text:p>
          </table:table-cell>
        </table:table-row>
        <table:table-row>
          <table:table-cell table:style-name="Table35.A2" office:value-type="string">
            <text:p text:style-name="P426">D_T_FMT</text:p>
          </table:table-cell>
          <table:table-cell table:style-name="Table35.B2" office:value-type="string">
            <text:p text:style-name="P427"><text:span text:style-name="T456">Return a string that can be used as a format string for </text:span><text:span text:style-name="T498">strftime</text:span><text:span text:style-name="T456"> to represent time and date in a locale-specific way</text:span></text:p>
          </table:table-cell>
        </table:table-row>
        <table:table-row>
          <table:table-cell table:style-name="Table35.A2" office:value-type="string">
            <text:p text:style-name="P426">D_FMT</text:p>
          </table:table-cell>
          <table:table-cell table:style-name="Table35.B2" office:value-type="string">
            <text:p text:style-name="P427"><text:span text:style-name="T456">Return a string that can be used as a format string for </text:span><text:span text:style-name="T498">strftime</text:span><text:span text:style-name="T456"> to represent a date in a locale-specific way</text:span></text:p>
          </table:table-cell>
        </table:table-row>
        <table:table-row>
          <table:table-cell table:style-name="Table35.A2" office:value-type="string">
            <text:p text:style-name="P426">T_FMT</text:p>
          </table:table-cell>
          <table:table-cell table:style-name="Table35.B2" office:value-type="string">
            <text:p text:style-name="P427"><text:span text:style-name="T456">Return a string that can be used as a format string for </text:span><text:span text:style-name="T498">strftime</text:span><text:span text:style-name="T456"> to represent a time in a locale-specific way</text:span></text:p>
          </table:table-cell>
        </table:table-row>
        <text:soft-page-break/>
        <table:table-row>
          <table:table-cell table:style-name="Table35.A2" office:value-type="string">
            <text:p text:style-name="P426">AM_STR</text:p>
          </table:table-cell>
          <table:table-cell table:style-name="Table35.B2" office:value-type="string">
            <text:p text:style-name="P427"><text:span text:style-name="T456">Return a string that represents affix for ante meridiem (before noon, "</text:span><text:span text:style-name="T498">AM</text:span><text:span text:style-name="T456">") time</text:span></text:p>
          </table:table-cell>
        </table:table-row>
        <table:table-row>
          <table:table-cell table:style-name="Table35.A2" office:value-type="string">
            <text:p text:style-name="P426">PM_STR</text:p>
          </table:table-cell>
          <table:table-cell table:style-name="Table35.B2" office:value-type="string">
            <text:p text:style-name="P427"><text:span text:style-name="T456">Return a string that represents affix for post meridiem (before midnight, "</text:span><text:span text:style-name="T498">PM</text:span><text:span text:style-name="T456">") time</text:span></text:p>
          </table:table-cell>
        </table:table-row>
        <table:table-row>
          <table:table-cell table:style-name="Table35.A2" office:value-type="string">
            <text:p text:style-name="P426">T_FMT_AMPM</text:p>
          </table:table-cell>
          <table:table-cell table:style-name="Table35.B2" office:value-type="string">
            <text:p text:style-name="P427"><text:span text:style-name="T456">Return a string that can be used as a format string for </text:span><text:span text:style-name="T498">strftime</text:span><text:span text:style-name="T456"> to represent a time in a.m. or p.m. notation in a locale-specific way</text:span></text:p>
          </table:table-cell>
        </table:table-row>
        <table:table-row>
          <table:table-cell table:style-name="Table35.A2" office:value-type="string">
            <text:p text:style-name="P426">ERA</text:p>
          </table:table-cell>
          <table:table-cell table:style-name="Table35.B2" office:value-type="string">
            <text:p text:style-name="P183">Return era description, which contains information about how years are counted and displayed for each era in a locale. <text:span text:style-name="T500">The format is :</text:span></text:p>
            <text:p text:style-name="P428">direction:offset:start_date:end_date:era_name:era_format</text:p>
          </table:table-cell>
        </table:table-row>
        <table:table-row>
          <table:table-cell table:style-name="Table35.A2" office:value-type="string">
            <text:p text:style-name="P426">ERA_D_T_FMT</text:p>
          </table:table-cell>
          <table:table-cell table:style-name="Table35.B2" office:value-type="string">
            <text:p text:style-name="P427"><text:span text:style-name="T456">Return a string that can be used as a format string for </text:span><text:span text:style-name="T498">strftime</text:span><text:span text:style-name="T456"> for alternative representation of time and date in a locale-specific way</text:span></text:p>
          </table:table-cell>
        </table:table-row>
        <table:table-row>
          <table:table-cell table:style-name="Table35.A2" office:value-type="string">
            <text:p text:style-name="P426">ERA_D_FMT</text:p>
          </table:table-cell>
          <table:table-cell table:style-name="Table35.B2" office:value-type="string">
            <text:p text:style-name="P427"><text:span text:style-name="T456">Return a string that can be used as a format string for </text:span><text:span text:style-name="T498">strftime</text:span><text:span text:style-name="T456"> for alternative representation of a date in a locale-specific way</text:span></text:p>
          </table:table-cell>
        </table:table-row>
        <table:table-row>
          <table:table-cell table:style-name="Table35.A2" office:value-type="string">
            <text:p text:style-name="P426">ERA_T_FMT</text:p>
          </table:table-cell>
          <table:table-cell table:style-name="Table35.B2" office:value-type="string">
            <text:p text:style-name="P427"><text:span text:style-name="T456">Return a string that can be used as a format string for </text:span><text:span text:style-name="T498">strftime</text:span><text:span text:style-name="T456"> for alternative representation of a time in a locale-specific way </text:span></text:p>
          </table:table-cell>
        </table:table-row>
        <table:table-row>
          <table:table-cell table:style-name="Table35.A2" office:value-type="string">
            <text:p text:style-name="P426">DAY_{1–7}</text:p>
          </table:table-cell>
          <table:table-cell table:style-name="Table35.B2" office:value-type="string">
            <text:p text:style-name="P183">Return name of the n-th day of the week</text:p>
          </table:table-cell>
        </table:table-row>
        <table:table-row>
          <table:table-cell table:style-name="Table35.A2" office:value-type="string">
            <text:p text:style-name="P426">ABDAY_{1–7} </text:p>
          </table:table-cell>
          <table:table-cell table:style-name="Table35.B2" office:value-type="string">
            <text:p text:style-name="P183">Return abbreviated name of the n-th day of the week</text:p>
          </table:table-cell>
        </table:table-row>
        <table:table-row>
          <table:table-cell table:style-name="Table35.A2" office:value-type="string">
            <text:p text:style-name="P426">MON_{1–12}</text:p>
          </table:table-cell>
          <table:table-cell table:style-name="Table35.B2" office:value-type="string">
            <text:p text:style-name="P183">Return name of the n-th month</text:p>
          </table:table-cell>
        </table:table-row>
        <table:table-row>
          <table:table-cell table:style-name="Table35.A2" office:value-type="string">
            <text:p text:style-name="P426">ABMON_{1–12}</text:p>
          </table:table-cell>
          <table:table-cell table:style-name="Table35.B2" office:value-type="string">
            <text:p text:style-name="P183">Return abbreviated name of the n-th month</text:p>
          </table:table-cell>
        </table:table-row>
        <table:table-row>
          <table:table-cell table:style-name="Table35.A2" office:value-type="string">
            <text:p text:style-name="P426">RADIXCHAR</text:p>
          </table:table-cell>
          <table:table-cell table:style-name="Table35.B2" office:value-type="string">
            <text:p text:style-name="P183">Return radix character (decimal dot, decimal comma, etc.<text:span text:style-name="T500">)</text:span></text:p>
          </table:table-cell>
        </table:table-row>
        <table:table-row>
          <table:table-cell table:style-name="Table35.A2" office:value-type="string">
            <text:p text:style-name="P426">THOUSEP</text:p>
          </table:table-cell>
          <table:table-cell table:style-name="Table35.B2" office:value-type="string">
            <text:p text:style-name="P183">Return separator character for thousands (groups of three digits)</text:p>
          </table:table-cell>
        </table:table-row>
        <table:table-row>
          <table:table-cell table:style-name="Table35.A2" office:value-type="string">
            <text:p text:style-name="P426">YESEXPR</text:p>
          </table:table-cell>
          <table:table-cell table:style-name="Table35.B2" office:value-type="string">
            <text:p text:style-name="P427"><text:span text:style-name="T456">Return a regular expression that can be used with the </text:span><text:span text:style-name="T498">regex</text:span><text:span text:style-name="T456"> function to recognize a positive response to a yes/no question</text:span></text:p>
          </table:table-cell>
        </table:table-row>
        <table:table-row>
          <table:table-cell table:style-name="Table35.A2" office:value-type="string">
            <text:p text:style-name="P426">NOEXPR</text:p>
          </table:table-cell>
          <table:table-cell table:style-name="Table35.B2" office:value-type="string">
            <text:p text:style-name="P427"><text:span text:style-name="T456">Return a regular expression that can be used with the </text:span><text:span text:style-name="T498">regex</text:span><text:span text:style-name="T456"> function to recognize a negative response to a yes/no question</text:span></text:p>
          </table:table-cell>
        </table:table-row>
        <table:table-row>
          <table:table-cell table:style-name="Table35.A2" office:value-type="string">
            <text:p text:style-name="P426">CRNCYSTR</text:p>
          </table:table-cell>
          <table:table-cell table:style-name="Table35.B2" office:value-type="string">
            <text:p text:style-name="P427"><text:span text:style-name="T456">Return the currency symbol, preceded by "</text:span><text:span text:style-name="T498">-</text:span><text:span text:style-name="T456">" if the symbol should appear before the value, "</text:span><text:span text:style-name="T498">+</text:span><text:span text:style-name="T456">" if the symbol should appear after the value, or "</text:span><text:span text:style-name="T498">.</text:span><text:span text:style-name="T456">" if the symbol should replace the radix characte</text:span><text:span text:style-name="T501">r</text:span></text:p>
          </table:table-cell>
        </table:table-row>
      </table:table>
      <text:p text:style-name="P425"/>
      <text:p text:style-name="P429"><text:span text:style-name="T502">Tab </text:span><text:span text:style-name="T503">8</text:span><text:span text:style-name="T504">.</text:span><text:span text:style-name="T505"> Values for the parameter </text:span><text:span text:style-name="T498">item</text:span><text:span text:style-name="T505"> of </text:span><text:span text:style-name="T498">nl_langinfo</text:span></text:p>
      <text:p text:style-name="P183"/>
      <text:p text:style-name="P427"><text:span text:style-name="Strong_20_Emphasis"><text:span text:style-name="T506">The </text:span></text:span><text:span text:style-name="Strong_20_Emphasis"><text:span text:style-name="T507">nlocale.c</text:span></text:span><text:span text:style-name="T456"> </text:span><text:span text:style-name="T508">program </text:span><text:span text:style-name="T456">demonstrates how to use </text:span><text:span text:style-name="Strong_20_Emphasis"><text:span text:style-name="T507">newlocale</text:span></text:span><text:span text:style-name="T456"> and </text:span><text:span text:style-name="Strong_20_Emphasis"><text:span text:style-name="T507">freelocale</text:span></text:span><text:span text:style-name="T456"> to create and manage locale objects, and how locale settings affect formatted output.</text:span></text:p>
      <text:p text:style-name="Horizontal_20_Line"/>
      <text:p text:style-name="P186"><text:span text:style-name="T509">1 </text:span><text:span text:style-name="T115">#define _GNU_SOURCE </text:span></text:p>
      <text:p text:style-name="P430"><text:span text:style-name="T510">2</text:span><text:span text:style-name="T509"> </text:span><text:span text:style-name="T115">#include </text:span><text:span text:style-name="T116">&lt;stdio.h&gt;</text:span></text:p>
      <text:p text:style-name="P430"><text:span text:style-name="T510">3</text:span><text:span text:style-name="T509"> </text:span><text:span text:style-name="T115">#include </text:span><text:span text:style-name="T116">&lt;locale.h&gt;</text:span></text:p>
      <text:p text:style-name="P430"><text:span text:style-name="T510">4</text:span><text:span text:style-name="T509"> </text:span><text:span text:style-name="T115">#include </text:span><text:span text:style-name="T116">&lt;langinfo.h&gt;</text:span></text:p>
      <text:p text:style-name="P430"><text:span text:style-name="T510">5</text:span><text:span text:style-name="T509"> </text:span><text:span text:style-name="T115">#include </text:span><text:span text:style-name="T116">&lt;stdlib.h&gt;</text:span></text:p>
      <text:p text:style-name="P188"/>
      <text:p text:style-name="P430"><text:span text:style-name="T510">6</text:span><text:span text:style-name="T509"> </text:span><text:span text:style-name="T115">int</text:span> main(<text:span text:style-name="T115">int</text:span> argc, <text:span text:style-name="T115">char</text:span> *argv<text:span text:style-name="T115">[]</text:span>) {</text:p>
      <text:p text:style-name="P430"><text:span text:style-name="T510">7</text:span><text:span text:style-name="T509"> <text:tab/></text:span><text:span text:style-name="T115">if</text:span> (argc != <text:span text:style-name="T127">2</text:span>) {</text:p>
      <text:p text:style-name="P430"><text:span text:style-name="T510">8</text:span><text:span text:style-name="T509"> <text:tab/><text:tab/></text:span>printf(<text:span text:style-name="T116">"\nUsage: %s &lt;locale&gt;"</text:span>, argv[<text:span text:style-name="T127">0</text:span>]);</text:p>
      <text:p text:style-name="P430"><text:span text:style-name="T510">9</text:span><text:span text:style-name="T509"> <text:tab/><text:tab/></text:span>exit(<text:span text:style-name="T115">EXIT_FAILURE</text:span>);</text:p>
      <text:p text:style-name="P430"><text:soft-page-break/><text:span text:style-name="T509">1</text:span><text:span text:style-name="T510">0</text:span><text:span text:style-name="T509"> <text:tab/></text:span>}</text:p>
      <text:p text:style-name="P431"/>
      <text:p text:style-name="P432"><text:span text:style-name="T511">1</text:span><text:span text:style-name="T512">1</text:span><text:span text:style-name="T511"> <text:tab/></text:span><text:span text:style-name="T101">const</text:span><text:span text:style-name="T124"> </text:span><text:span text:style-name="T101">char</text:span><text:span text:style-name="T124"> *locale_name = argv[</text:span><text:span text:style-name="T335">1</text:span><text:span text:style-name="T124">];</text:span></text:p>
      <text:p text:style-name="P433"><text:span text:style-name="T513">1</text:span><text:span text:style-name="T514">2</text:span><text:span text:style-name="T513"> <text:tab/></text:span><text:span text:style-name="T103">locale_t</text:span><text:span text:style-name="T104"> new_locale = </text:span><text:span text:style-name="T105">newlocale</text:span><text:span text:style-name="T104">(</text:span><text:span text:style-name="T103">LC_ALL_MASK</text:span><text:span text:style-name="T104">, locale_name, </text:span><text:span text:style-name="T103">NULL</text:span><text:span text:style-name="T104">);</text:span></text:p>
      <text:p text:style-name="P433"><text:span text:style-name="T513">1</text:span><text:span text:style-name="T514">3</text:span><text:span text:style-name="T513"> <text:tab/></text:span><text:span text:style-name="T103">if</text:span><text:span text:style-name="T104"> (new_locale == (</text:span><text:span text:style-name="T103">locale_t</text:span><text:span text:style-name="T104">)</text:span><text:span text:style-name="T128">0</text:span><text:span text:style-name="T104">) {</text:span></text:p>
      <text:p text:style-name="P430"><text:span text:style-name="T509">1</text:span><text:span text:style-name="T510">4</text:span><text:span text:style-name="T509"> <text:tab/><text:tab/></text:span>perror(<text:span text:style-name="T116">"newlocale"</text:span>);</text:p>
      <text:p text:style-name="P430"><text:span text:style-name="T509">1</text:span><text:span text:style-name="T510">5 <text:tab/><text:tab/></text:span><text:span text:style-name="T115">return</text:span> <text:span text:style-name="T127">1</text:span>;</text:p>
      <text:p text:style-name="P430"><text:span text:style-name="T509">1</text:span><text:span text:style-name="T510">6 <text:tab/></text:span>}</text:p>
      <text:p text:style-name="P434"/>
      <text:p text:style-name="P433"><text:span text:style-name="T513">1</text:span><text:span text:style-name="T514">7</text:span><text:span text:style-name="T513"> <text:tab/></text:span><text:span text:style-name="T103">locale_t</text:span><text:span text:style-name="T104"> old_locale = </text:span><text:span text:style-name="T105">uselocale</text:span><text:span text:style-name="T104">(new_locale);</text:span></text:p>
      <text:p text:style-name="P430"><text:span text:style-name="T510">18</text:span><text:span text:style-name="T509"> <text:tab/></text:span>printf(<text:span text:style-name="T116">"Locale: %s\n"</text:span>, locale_name);</text:p>
      <text:p text:style-name="P433"><text:span text:style-name="T514">19</text:span><text:span text:style-name="T513"> <text:tab/></text:span><text:span text:style-name="T104">printf(</text:span><text:span text:style-name="T403">"Day 1: %s\n"</text:span><text:span text:style-name="T104">, </text:span><text:span text:style-name="T105">nl_langinfo</text:span><text:span text:style-name="T104">(</text:span><text:span text:style-name="T103">DAY_1</text:span><text:span text:style-name="T104">));</text:span></text:p>
      <text:p text:style-name="P433"><text:span text:style-name="T513">2</text:span><text:span text:style-name="T514">0</text:span><text:span text:style-name="T513"> <text:tab/></text:span><text:span text:style-name="T104">printf(</text:span><text:span text:style-name="T403">"Abbrev month 1: %s\n"</text:span><text:span text:style-name="T104">, </text:span><text:span text:style-name="T105">nl_langinfo</text:span><text:span text:style-name="T104">(</text:span><text:span text:style-name="T103">ABMON_1</text:span><text:span text:style-name="T104">)); </text:span></text:p>
      <text:p text:style-name="P433"><text:span text:style-name="T513">2</text:span><text:span text:style-name="T514">1</text:span><text:span text:style-name="T513"> <text:tab/></text:span><text:span text:style-name="T104">printf(</text:span><text:span text:style-name="T403">"Currency symbol: %s\n"</text:span><text:span text:style-name="T104">, </text:span><text:span text:style-name="T105">nl_langinfo</text:span><text:span text:style-name="T104">(</text:span><text:span text:style-name="T103">CURRENCY_SYMBOL</text:span><text:span text:style-name="T104">)); </text:span></text:p>
      <text:p text:style-name="P433"><text:span text:style-name="T513">2</text:span><text:span text:style-name="T514">2</text:span><text:span text:style-name="T513"> <text:tab/></text:span><text:span text:style-name="T104">printf(</text:span><text:span text:style-name="T403">"Decimal point: %s\n"</text:span><text:span text:style-name="T104">, </text:span><text:span text:style-name="T105">nl_langinfo</text:span><text:span text:style-name="T104">(</text:span><text:span text:style-name="T103">RADIXCHAR</text:span><text:span text:style-name="T104">)); </text:span></text:p>
      <text:p text:style-name="P430"><text:span text:style-name="T509">2</text:span><text:span text:style-name="T510">3</text:span><text:span text:style-name="T509"> <text:tab/></text:span><text:span text:style-name="T126">uselocale</text:span>(old_locale);</text:p>
      <text:p text:style-name="P432"><text:span text:style-name="T511">2</text:span><text:span text:style-name="T512">4</text:span><text:span text:style-name="T511"> <text:tab/></text:span><text:span text:style-name="T216">freelocale</text:span><text:span text:style-name="T124">(new_locale);</text:span></text:p>
      <text:p text:style-name="P430"><text:span text:style-name="T509">2</text:span><text:span text:style-name="T510">5</text:span><text:span text:style-name="T509"> <text:tab/></text:span><text:span text:style-name="T115">return</text:span> <text:span text:style-name="T127">0</text:span>;</text:p>
      <text:p text:style-name="P432"><text:span text:style-name="T511">2</text:span><text:span text:style-name="T512">6</text:span><text:span text:style-name="T511"> </text:span><text:span text:style-name="T124">}</text:span></text:p>
      <text:p text:style-name="Horizontal_20_Line"/>
      <text:p text:style-name="P435">nlocale.c</text:p>
      <text:p text:style-name="P436"/>
      <text:p text:style-name="P437"><text:span text:style-name="Strong_20_Emphasis"><text:span text:style-name="T220">Line 12.</text:span></text:span><text:span text:style-name="T220"> Creates a new </text:span><text:span text:style-name="Source_20_Text"><text:span text:style-name="T515">locale_t</text:span></text:span><text:span text:style-name="T220"> object using </text:span><text:span text:style-name="Source_20_Text"><text:span text:style-name="T515">newlocale</text:span></text:span><text:span text:style-name="T220">, based on the locale name provided <text:tab/> <text:s/>as a command-line argument. This object defines a set of locale-specific rules for <text:tab/> <text:s/><text:tab/> <text:s/>formatting dates, numbers, currency, and language-dependent strings</text:span></text:p>
      <text:p text:style-name="P437"><text:span text:style-name="Strong_20_Emphasis"><text:span text:style-name="T220">Line 17.</text:span></text:span><text:span text:style-name="T220"> Switches the current thread’s locale to the newly created locale using </text:span><text:span text:style-name="Source_20_Text"><text:span text:style-name="T515">uselocale</text:span></text:span><text:span text:style-name="T220">, while <text:tab/> <text:s text:c="2"/>storing the previous locale so it can be restored later</text:span></text:p>
      <text:p text:style-name="P437"><text:span text:style-name="Strong_20_Emphasis"><text:span text:style-name="T220">Line 18–22.</text:span></text:span><text:span text:style-name="T220"> Prints various locale-dependent values using </text:span><text:span text:style-name="Source_20_Text"><text:span text:style-name="T515">nl_langinfo</text:span></text:span><text:span text:style-name="T220">, such as the name of the <text:tab/> <text:s text:c="4"/>first day of the week, abbreviated month names, currency symbol, and decimal separator. <text:tab/> <text:s text:c="4"/>These values change depending on the active locale</text:span></text:p>
      <text:p text:style-name="Standard"><text:span text:style-name="Strong_20_Emphasis"><text:span text:style-name="T220">Line 23.</text:span></text:span><text:span text:style-name="T220"> Restores the previous locale to ensure that further operations are not affected by the <text:tab/> <text:s text:c="3"/><text:tab/> <text:s/>temporary locale change</text:span></text:p>
      <text:p text:style-name="P437"><text:span text:style-name="Strong_20_Emphasis"><text:span text:style-name="T220">Line 24.</text:span></text:span><text:span text:style-name="T220"> Frees the memory associated with the newly created locale object using </text:span><text:span text:style-name="Source_20_Text"><text:span text:style-name="T515">freelocale</text:span></text:span><text:span text:style-name="T220">, <text:tab/> <text:s text:c="2"/>preventing memory leaks</text:span></text:p>
      <text:p text:style-name="P307"/>
      <text:p text:style-name="P438"><text:span text:style-name="T516">We e</text:span><text:span text:style-name="T517">xecute the program passing different locale</text:span><text:span text:style-name="T518">s</text:span><text:span text:style-name="T517">.</text:span></text:p>
      <text:p text:style-name="P439"/>
      <table:table table:name="Table36" table:style-name="Table36">
        <table:table-column table:style-name="Table36.A"/>
        <table:table-row>
          <table:table-cell table:style-name="Table36.A1" office:value-type="string">
            <text:p text:style-name="P440"><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519">nlocale en_US.UTF-8</text:span></text:p>
            <text:p text:style-name="P440">Locale: en_US.UTF-8</text:p>
            <text:p text:style-name="P440">Day 1: <text:s text:c="9"/>Sunday</text:p>
            <text:p text:style-name="P440">Abbrev month 1: Jan</text:p>
            <text:p text:style-name="P440">Currency symbol: $</text:p>
            <text:p text:style-name="P440">Decimal point: .</text:p>
            <text:p text:style-name="P440"/>
            <text:p text:style-name="P441"><text:span text:style-name="T80">[</text:span><text:a xlink:type="simple" xlink:href="mailto:linux@users" text:style-name="Internet_20_link" text:visited-style-name="Visited_20_Internet_20_Link"><text:span text:style-name="T81">linux@</text:span><text:span text:style-name="T342">users</text:span></text:a><text:span text:style-name="T80">] ./nlocale zh_CN.utf8 </text:span></text:p>
            <text:p text:style-name="P442">Locale: zh_CN.utf8</text:p>
            <text:p text:style-name="P442">Day 1: <text:s text:c="9"/>星期日</text:p>
            <text:p text:style-name="P442">Abbrev month 1: 1月</text:p>
            <text:p text:style-name="P442">Currency symbol: ￥</text:p>
            <text:p text:style-name="P442">Decimal point: . </text:p>
          </table:table-cell>
        </table:table-row>
      </table:table>
      <text:p text:style-name="P443"><text:soft-page-break/><text:span text:style-name="T520">At runtime, the program creates and activates the requested locale using </text:span><text:span text:style-name="Source_20_Text"><text:span text:style-name="T521">newlocale</text:span></text:span><text:span text:style-name="T520"> and </text:span><text:span text:style-name="Source_20_Text"><text:span text:style-name="T521">uselocale</text:span></text:span><text:span text:style-name="T520">, and then retrieves locale-dependent information through </text:span><text:span text:style-name="Source_20_Text"><text:span text:style-name="T521">nl_langinfo</text:span></text:span><text:span text:style-name="T520">.</text:span></text:p>
      <text:p text:style-name="P443"><text:span text:style-name="T522">T</text:span><text:span text:style-name="T520">he </text:span><text:span text:style-name="Source_20_Text"><text:span text:style-name="T521">en_US.UTF-8</text:span></text:span><text:span text:style-name="T520"> locale returns properly formatted English values, while </text:span><text:span text:style-name="Source_20_Text"><text:span text:style-name="T521">zh_CN.utf8</text:span></text:span><text:span text:style-name="T520"> displays the corresponding values in the respective language.</text:span></text:p>
      <text:p text:style-name="P444"/>
      <text:p text:style-name="P445">The <text:span text:style-name="T75">uselocale</text:span><text:span text:style-name="T75"><text:note text:id="ftn44" text:note-class="footnote"><text:note-citation>42</text:note-citation><text:note-body><text:p text:style-name="P375"><text:span text:style-name="T523">See the </text:span><text:span text:style-name="T524">uselocale(3)</text:span><text:span text:style-name="T525"> manual page</text:span></text:p></text:note-body></text:note></text:span> function is used to set the current locale <text:span text:style-name="T526">for the process </text:span>and is defined as follows.</text:p>
      <text:p text:style-name="P444"/>
      <table:table table:name="Table37" table:style-name="Table37">
        <table:table-column table:style-name="Table37.A"/>
        <table:table-row>
          <table:table-cell table:style-name="Table37.A1" office:value-type="string">
            <text:p text:style-name="P271"><text:span text:style-name="T115">#include </text:span><text:span text:style-name="T116">&lt;locale.h&gt;</text:span></text:p>
            <text:p text:style-name="P188"/>
            <text:p text:style-name="P201"><text:span text:style-name="T103">locale_t</text:span><text:span text:style-name="T104"> </text:span><text:span text:style-name="T105">uselocale</text:span><text:span text:style-name="T104">(</text:span><text:span text:style-name="T103">locale_t</text:span><text:span text:style-name="T104"> </text:span><text:span text:style-name="T106">newloc</text:span><text:span text:style-name="T104">);</text:span></text:p>
            <text:p text:style-name="P271"/>
            <text:p text:style-name="P446">Returns: the locale handle, LC_GLOBAL_LOCALE if there was no a previous call, </text:p>
            <text:p text:style-name="P446"><text:s text:c="9"/>on error (locale_t)0 and sets errno</text:p>
          </table:table-cell>
        </table:table-row>
      </table:table>
      <text:p text:style-name="P444"/>
      <text:p text:style-name="P447"><text:span text:style-name="T527">The </text:span><text:span text:style-name="T521">newloc</text:span><text:span text:style-name="T527"> </text:span><text:span text:style-name="T528">argument </text:span><text:span text:style-name="T529">may </text:span><text:span text:style-name="T528">take</text:span><text:span text:style-name="T529"> </text:span><text:span text:style-name="T527">one of the following values: </text:span></text:p>
      <text:p text:style-name="P448"/>
      <text:list text:style-name="L11">
        <text:list-item>
          <text:p text:style-name="P449"><text:span text:style-name="T527">A handle returned by a call to </text:span><text:span text:style-name="T530">newlocale</text:span><text:span text:style-name="T527"> or </text:span><text:span text:style-name="T530">duplocale</text:span><text:span text:style-name="T527">. </text:span><text:span text:style-name="T528">T</text:span><text:span text:style-name="T527">he thread current locale is set to the specified locale.</text:span></text:p>
        </text:list-item>
      </text:list>
      <text:p text:style-name="P450"/>
      <text:list text:continue-numbering="true" text:style-name="L11">
        <text:list-item>
          <text:p text:style-name="P449"><text:span text:style-name="T527">The special locale object handle </text:span><text:span text:style-name="T530">LC_GLOBAL_LOCALE</text:span><text:span text:style-name="T527">. </text:span><text:span text:style-name="T528">T</text:span><text:span text:style-name="T527">he thread current locale is set to the global locale.</text:span></text:p>
        </text:list-item>
      </text:list>
      <text:p text:style-name="P450"/>
      <text:list text:continue-numbering="true" text:style-name="L11">
        <text:list-item>
          <text:p text:style-name="P451"><text:span text:style-name="T530">(locale_t)</text:span><text:span text:style-name="T531">0</text:span><text:span text:style-name="T527">. </text:span><text:span text:style-name="T528">T</text:span><text:span text:style-name="T527">he thread current locale is left unchanged/</text:span></text:p>
        </text:list-item>
      </text:list>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374"><text:soft-page-break/>III.3.3 Duplicating a locale object: <text:span text:style-name="T75">duplocale</text:span></text:p>
      <text:p text:style-name="P397"/>
      <text:p text:style-name="P452"><text:span text:style-name="T532">The </text:span><text:span text:style-name="T533">duplocale</text:span><text:span text:style-name="T533"><text:note text:id="ftn45" text:note-class="footnote"><text:note-citation>43</text:note-citation><text:note-body><text:p text:style-name="P453"><text:span text:style-name="T534">See the </text:span><text:span text:style-name="T535">duplocale(3)</text:span><text:span text:style-name="T536"> manual page</text:span></text:p></text:note-body></text:note></text:span><text:span text:style-name="T532"> function is used to duplicate a locale object, </text:span><text:span text:style-name="T537">it </text:span><text:span text:style-name="T532">is defined as follows.</text:span></text:p>
      <text:p text:style-name="P454"/>
      <table:table table:name="Table38" table:style-name="Table38">
        <table:table-column table:style-name="Table38.A"/>
        <table:table-row>
          <table:table-cell table:style-name="Table38.A1" office:value-type="string">
            <text:p text:style-name="P271"><text:span text:style-name="T115">#include </text:span><text:span text:style-name="T116">&lt;locale.h&gt;</text:span></text:p>
            <text:p text:style-name="P188"/>
            <text:p text:style-name="P201"><text:span text:style-name="T103">locale_t</text:span><text:span text:style-name="T104"> </text:span><text:span text:style-name="T105">duplocale</text:span><text:span text:style-name="T104">(</text:span><text:span text:style-name="T103">locale_t</text:span><text:span text:style-name="T104"> </text:span><text:span text:style-name="T106">locobj</text:span><text:span text:style-name="T104">);</text:span></text:p>
            <text:p text:style-name="P283"/>
            <text:p text:style-name="P455">Returns: a handle for the new locale object, (locale_t)0 on error and sets </text:p>
            <text:p text:style-name="P455"><text:s text:c="9"/>errno</text:p>
          </table:table-cell>
        </table:table-row>
      </table:table>
      <text:p text:style-name="P456"/>
      <text:p text:style-name="P452"><text:span text:style-name="T538">The </text:span><text:span text:style-name="Strong_20_Emphasis"><text:span text:style-name="T533">toup.c</text:span></text:span><text:span text:style-name="T538"> program converts a given string to uppercase. It uses </text:span><text:span text:style-name="Source_20_Text"><text:span text:style-name="T533">duplocale</text:span></text:span><text:span text:style-name="T538"> to create a duplicate of the current locale, which is then passed to </text:span><text:span text:style-name="Source_20_Text"><text:span text:style-name="T533">toupper_l</text:span></text:span><text:span text:style-name="Source_20_Text"><text:span text:style-name="T539"><text:note text:id="ftn46" text:note-class="footnote"><text:note-citation>44</text:note-citation><text:note-body><text:p text:style-name="P453"><text:span text:style-name="T540">See the </text:span><text:span text:style-name="T541">toupper(</text:span><text:span text:style-name="T542">3)</text:span> <text:span text:style-name="T534">manual page</text:span></text:p></text:note-body></text:note></text:span></text:span><text:span text:style-name="T538"> for locale-aware character conversion. This approach is necessary because </text:span><text:span text:style-name="Source_20_Text"><text:span text:style-name="T533">uselocale</text:span></text:span><text:span text:style-name="T538"> may return the special value </text:span><text:span text:style-name="Source_20_Text"><text:span text:style-name="T533">LC_GLOBAL_LOCALE</text:span></text:span><text:span text:style-name="T538">. That value cannot be safely used as an argument to </text:span><text:span text:style-name="Source_20_Text"><text:span text:style-name="T533">toupper_l</text:span></text:span><text:span text:style-name="T538">. By duplicating the locale with </text:span><text:span text:style-name="Source_20_Text"><text:span text:style-name="T533">duplocale</text:span></text:span><text:span text:style-name="T538">, the program ensures it has a valid, usable locale object for the conversion function. The program is taken from the </text:span><text:span text:style-name="T533">duplocale</text:span><text:span text:style-name="T543">(3)</text:span><text:span text:style-name="T538"> manual page.</text:span></text:p>
      <text:p text:style-name="P457"/>
      <text:p text:style-name="Horizontal_20_Line"/>
      <text:p text:style-name="P186"><text:span text:style-name="T544">1 </text:span><text:span text:style-name="T115">#define _XOPEN_SOURCE </text:span><text:span text:style-name="T127">700</text:span></text:p>
      <text:p text:style-name="P458"><text:span text:style-name="T545">2</text:span><text:span text:style-name="T544"> </text:span><text:span text:style-name="T115">#include </text:span><text:span text:style-name="T116">&lt;ctype.h&gt;</text:span></text:p>
      <text:p text:style-name="P458"><text:span text:style-name="T545">3</text:span><text:span text:style-name="T544"> </text:span><text:span text:style-name="T115">#include </text:span><text:span text:style-name="T116">&lt;locale.h&gt;</text:span></text:p>
      <text:p text:style-name="P458"><text:span text:style-name="T545">4</text:span><text:span text:style-name="T544"> </text:span><text:span text:style-name="T115">#include </text:span><text:span text:style-name="T116">&lt;stdio.h&gt;</text:span></text:p>
      <text:p text:style-name="P458"><text:span text:style-name="T545">5</text:span><text:span text:style-name="T544"> </text:span><text:span text:style-name="T115">#include </text:span><text:span text:style-name="T116">&lt;stdlib.h&gt;</text:span></text:p>
      <text:p text:style-name="P188"/>
      <text:p text:style-name="P458"><text:span text:style-name="T545">6</text:span><text:span text:style-name="T544"> </text:span><text:span text:style-name="T115">#define errExit(msg) do { perror(msg); exit(EXIT_FAILURE); } while (</text:span><text:span text:style-name="T127">0</text:span><text:span text:style-name="T115">)</text:span></text:p>
      <text:p text:style-name="P188"/>
      <text:p text:style-name="P458"><text:span text:style-name="T545">7</text:span><text:span text:style-name="T544"> </text:span><text:span text:style-name="T115">int</text:span> main(<text:span text:style-name="T115">int</text:span> argc, <text:span text:style-name="T115">char</text:span> *argv<text:span text:style-name="T115">[]</text:span>)</text:p>
      <text:p text:style-name="P458"><text:span text:style-name="T545">8</text:span><text:span text:style-name="T544"> </text:span>{</text:p>
      <text:p text:style-name="P459"><text:span text:style-name="T546">9</text:span><text:span text:style-name="T547"> <text:tab/></text:span><text:span text:style-name="T103">locale_t</text:span><text:span text:style-name="T104"> loc, nloc;</text:span></text:p>
      <text:p text:style-name="P188"/>
      <text:p text:style-name="P458"><text:span text:style-name="T544">1</text:span><text:span text:style-name="T545">0</text:span><text:span text:style-name="T544"> <text:tab/></text:span><text:span text:style-name="T115">if</text:span> (argc != <text:span text:style-name="T127">2</text:span>) {</text:p>
      <text:p text:style-name="P458"><text:span text:style-name="T544">1</text:span><text:span text:style-name="T545">1</text:span><text:span text:style-name="T544"> <text:tab/><text:tab/></text:span>fprintf(<text:span text:style-name="T115">stderr</text:span>, <text:span text:style-name="T116">"Usage: %s string\n"</text:span>, argv[<text:span text:style-name="T127">0</text:span>]);</text:p>
      <text:p text:style-name="P458"><text:span text:style-name="T544">1</text:span><text:span text:style-name="T545">2</text:span><text:span text:style-name="T544"> <text:tab/><text:tab/></text:span>exit(<text:span text:style-name="T115">EXIT_FAILURE</text:span>);</text:p>
      <text:p text:style-name="P458"><text:span text:style-name="T544">1</text:span><text:span text:style-name="T545">3</text:span><text:span text:style-name="T544"> <text:tab/></text:span>}</text:p>
      <text:p text:style-name="P188"/>
      <text:p text:style-name="P458"><text:span text:style-name="T544">1</text:span><text:span text:style-name="T545">4</text:span><text:span text:style-name="T544"> <text:tab/></text:span>loc = <text:span text:style-name="T126">uselocale</text:span>((locale_t) <text:span text:style-name="T127">0</text:span>);</text:p>
      <text:p text:style-name="P458"><text:span text:style-name="T544">1</text:span><text:span text:style-name="T545">5</text:span><text:span text:style-name="T544"> <text:tab/></text:span><text:span text:style-name="T115">if</text:span> (loc == (locale_t) <text:span text:style-name="T127">0</text:span>)</text:p>
      <text:p text:style-name="P459"><text:span text:style-name="T547">1</text:span><text:span text:style-name="T546">6</text:span><text:span text:style-name="T547"> <text:tab/><text:tab/></text:span><text:span text:style-name="T104">errExit(</text:span><text:span text:style-name="T403">"uselocale"</text:span><text:span text:style-name="T104">);</text:span></text:p>
      <text:p text:style-name="P188"/>
      <text:p text:style-name="P458"><text:span text:style-name="T544">1</text:span><text:span text:style-name="T545">7</text:span><text:span text:style-name="T544"> <text:tab/></text:span>nloc = <text:span text:style-name="T126">duplocale</text:span>(loc);</text:p>
      <text:p text:style-name="P459"><text:span text:style-name="T547">1</text:span><text:span text:style-name="T546">8</text:span><text:span text:style-name="T547"> <text:tab/></text:span><text:span text:style-name="T103">if</text:span><text:span text:style-name="T104"> (nloc == (</text:span><text:span text:style-name="T103">locale_t</text:span><text:span text:style-name="T104">) </text:span><text:span text:style-name="T128">0</text:span><text:span text:style-name="T104">)</text:span></text:p>
      <text:p text:style-name="P459"><text:span text:style-name="T547">1</text:span><text:span text:style-name="T546">9</text:span><text:span text:style-name="T547"> <text:tab/><text:tab/></text:span><text:span text:style-name="T104">errExit(</text:span><text:span text:style-name="T403">"duplocale"</text:span><text:span text:style-name="T104">);</text:span></text:p>
      <text:p text:style-name="P188"/>
      <text:p text:style-name="P458"><text:span text:style-name="T544">2</text:span><text:span text:style-name="T545">0</text:span><text:span text:style-name="T544"> <text:tab/></text:span><text:span text:style-name="T115">for</text:span> (<text:span text:style-name="T115">char</text:span> *p = argv[<text:span text:style-name="T127">1</text:span>]; *p; p++)</text:p>
      <text:p text:style-name="P459"><text:span text:style-name="T547">2</text:span><text:span text:style-name="T546">1</text:span><text:span text:style-name="T547"> <text:tab/><text:tab/></text:span><text:span text:style-name="T104">putchar(</text:span><text:span text:style-name="T105">toupper_l</text:span><text:span text:style-name="T104">(*p, nloc));</text:span></text:p>
      <text:p text:style-name="P460"><text:span text:style-name="T548">2</text:span><text:span text:style-name="T549">2</text:span><text:span text:style-name="T548"> <text:tab/></text:span><text:span text:style-name="T124">printf(</text:span><text:span text:style-name="T102">"\n"</text:span><text:span text:style-name="T124">);</text:span></text:p>
      <text:p text:style-name="P460"><text:span text:style-name="T548">2</text:span><text:span text:style-name="T549">3</text:span><text:span text:style-name="T548"> <text:tab/></text:span><text:span text:style-name="T216">freelocale</text:span><text:span text:style-name="T124">(nloc);</text:span></text:p>
      <text:p text:style-name="P458"><text:soft-page-break/><text:span text:style-name="T544">2</text:span><text:span text:style-name="T545">4</text:span><text:span text:style-name="T544"> <text:tab/></text:span>exit(<text:span text:style-name="T115">EXIT_SUCCESS</text:span>);</text:p>
      <text:p text:style-name="P460"><text:span text:style-name="T548">2</text:span><text:span text:style-name="T549">5</text:span><text:span text:style-name="T548"> </text:span><text:span text:style-name="T124">}</text:span></text:p>
      <text:p text:style-name="Horizontal_20_Line"/>
      <text:p text:style-name="P461">toup.c</text:p>
      <text:p text:style-name="P436"/>
      <text:p text:style-name="Standard"><text:span text:style-name="Strong_20_Emphasis"><text:span text:style-name="T220">Line 6.</text:span></text:span><text:span text:style-name="T220"> Defines a macro </text:span><text:span text:style-name="Source_20_Text"><text:span text:style-name="T221">errExit(msg)</text:span></text:span><text:span text:style-name="T220"> that prints an error message using </text:span><text:span text:style-name="Source_20_Text"><text:span text:style-name="T221">perror</text:span></text:span><text:span text:style-name="T220"> and <text:tab/> <text:tab/> immediately terminates the program with </text:span><text:span text:style-name="Source_20_Text"><text:span text:style-name="T221">exit(EXIT_FAILURE)</text:span></text:span></text:p>
      <text:p text:style-name="Standard"><text:span text:style-name="Strong_20_Emphasis"><text:span text:style-name="T220">Line 9.</text:span></text:span><text:span text:style-name="T220"> Declares two </text:span><text:span text:style-name="Source_20_Text"><text:span text:style-name="T221">locale_t</text:span></text:span><text:span text:style-name="T220"> variables used to store the current locale and its duplicate</text:span></text:p>
      <text:p text:style-name="Standard"><text:span text:style-name="Strong_20_Emphasis"><text:span text:style-name="T220">Line 14.</text:span></text:span><text:span text:style-name="T220"> Retrieves the current thread-specific locale using </text:span><text:span text:style-name="Source_20_Text"><text:span text:style-name="T221">uselocale((locale_t)0)</text:span></text:span><text:span text:style-name="T220"> without <text:tab/> <text:s/>modifying it, allowing the program to access the active locale safely</text:span></text:p>
      <text:p text:style-name="Standard"><text:span text:style-name="Strong_20_Emphasis"><text:span text:style-name="T220">Line 17.</text:span></text:span><text:span text:style-name="T220"> Creates a duplicate of the current locale using </text:span><text:span text:style-name="Source_20_Text"><text:span text:style-name="T221">duplocale</text:span></text:span><text:span text:style-name="T220">, which allows the program to <text:tab/> <text:s text:c="2"/>use a separate locale object without affecting the global or thread locale</text:span></text:p>
      <text:p text:style-name="Standard"><text:span text:style-name="Strong_20_Emphasis"><text:span text:style-name="T220">Line 20–21.</text:span></text:span><text:span text:style-name="T220"> Iterates through each character of the input string and converts it to uppercase using <text:tab/> <text:s text:c="7"/></text:span><text:span text:style-name="Source_20_Text"><text:span text:style-name="T221">toupper_l</text:span></text:span><text:span text:style-name="T220">, which performs locale-aware character conversion based on the <text:tab/> <text:s text:c="3"/><text:tab/> <text:s text:c="7"/>duplicated locale. The result is printed character by character</text:span></text:p>
      <text:p text:style-name="Standard"><text:span text:style-name="Strong_20_Emphasis"><text:span text:style-name="T220">Line 23.</text:span></text:span><text:span text:style-name="T220"> Frees the memory allocated for the duplicated locale object using </text:span><text:span text:style-name="Source_20_Text"><text:span text:style-name="T221">freelocale</text:span></text:span></text:p>
      <text:p text:style-name="P462"/>
      <text:p text:style-name="P463">We execute the program.</text:p>
      <text:p text:style-name="P463"/>
      <table:table table:name="Table19" table:style-name="Table19">
        <table:table-column table:style-name="Table19.A"/>
        <table:table-row>
          <table:table-cell table:style-name="Table19.A1" office:value-type="string">
            <text:p text:style-name="P464"><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550">toup hello</text:span></text:p>
            <text:p text:style-name="P464"/>
            <text:p text:style-name="P464">HELLO</text:p>
          </table:table-cell>
        </table:table-row>
      </table:table>
      <text:p text:style-name="P463"/>
      <text:p text:style-name="P465"><text:span text:style-name="T551">The program receives the input string ”</text:span><text:span text:style-name="Source_20_Text"><text:span text:style-name="T533">hello</text:span></text:span><text:span text:style-name="T551">“, processes each character using </text:span><text:span text:style-name="Source_20_Text"><text:span text:style-name="T533">toupper_l</text:span></text:span><text:span text:style-name="T551"> with the current locale, and converts all lowercase letters to uppercase. The resulting transformed string is then printed to the standard output.</text:span></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66"><text:soft-page-break/>III.4 <text:span text:style-name="T22">The </text:span><text:span text:style-name="T23">U</text:span><text:span text:style-name="T552">ser</text:span><text:span text:style-name="T553"> </text:span><text:span text:style-name="T22">D</text:span><text:span text:style-name="T553">atabase: </text:span><text:span text:style-name="T554">/</text:span><text:span text:style-name="T555">etc/passwd</text:span></text:p>
      <text:p text:style-name="P467"/>
      <text:p text:style-name="P468"><text:span text:style-name="T556">III.4.1 </text:span>User and group files</text:p>
      <text:p text:style-name="P469"/>
      <text:p text:style-name="P470">UNIX was designed to be a multi-user operating system, this fact has affected all the subsequent systems based on it, including Linux. On Linux the users belong to one or more groups. If we create a new user, a new group with the same name of the user will be created in a way that the user will belong to that group. This because on Linux a user must belong to at least one group, <text:span text:style-name="T557">it is not possible for a user to not belong to any group. </text:span><text:span text:style-name="T558">When a user is created it is assigned to it an user ID (UID), a group ID (GID) and optionally the supplementary groups.</text:span></text:p>
      <text:p text:style-name="P471"/>
      <text:p text:style-name="P472"><text:span text:style-name="T559">The system’s groups are stored in the file </text:span><text:span text:style-name="Source_20_Text"><text:span text:style-name="T560">/etc/group</text:span></text:span><text:span text:style-name="T559">, which follows a specific syntax</text:span><text:span text:style-name="T559"><text:note text:id="ftn47" text:note-class="footnote"><text:note-citation>45</text:note-citation><text:note-body><text:p text:style-name="P250"><text:span text:style-name="T558">See the </text:span><text:span text:style-name="T561">group(5)</text:span> <text:span text:style-name="T558">manual page</text:span></text:p></text:note-body></text:note></text:span><text:span text:style-name="T559">:</text:span></text:p>
      <text:p text:style-name="P473"/>
      <text:p text:style-name="P474"><text:s text:c="4"/>group_name:password:GID:user_list</text:p>
      <text:p text:style-name="P473"/>
      <text:p text:style-name="P475"><text:span text:style-name="T560">user_list</text:span><text:span text:style-name="T559"> is the list of all the users that belong to that group.</text:span></text:p>
      <text:p text:style-name="P475"><text:span text:style-name="T562">The field </text:span><text:span text:style-name="T560">password</text:span><text:span text:style-name="T562"> has the placeholder ‘</text:span><text:span text:style-name="T560">x</text:span><text:span text:style-name="T562">’ if the password is not set. </text:span><text:span text:style-name="T563">E.g.</text:span></text:p>
      <text:p text:style-name="P476"/>
      <text:p text:style-name="P477"><text:span text:style-name="T563"><text:tab/></text:span><text:span text:style-name="T560">newuser:x:1000:</text:span></text:p>
      <text:p text:style-name="P474"><text:tab/>sudo:x:27:newuser</text:p>
      <text:p text:style-name="P474"><text:tab/>root:x:0:</text:p>
      <text:p text:style-name="P478"/>
      <text:p text:style-name="P475"><text:span text:style-name="T559">If a group has a password set, it is stored in the </text:span><text:span text:style-name="Source_20_Text"><text:span text:style-name="T560">/etc/gshadow</text:span></text:span><text:span text:style-name="T559"> file.</text:span></text:p>
      <text:p text:style-name="P478"/>
      <text:p text:style-name="P475"><text:span text:style-name="T559">The list of system users is stored in the </text:span><text:span text:style-name="Source_20_Text"><text:span text:style-name="T560">/etc/passwd</text:span></text:span><text:span text:style-name="T559"> file, which follows a defined syntax. This file is also referred to by POSIX as the </text:span><text:span text:style-name="T564">user database</text:span><text:span text:style-name="T559">.</text:span></text:p>
      <text:p text:style-name="P479"><text:tab/></text:p>
      <text:p text:style-name="P480"><text:span text:style-name="T565"><text:s text:c="4"/></text:span><text:span text:style-name="T566">login</text:span><text:span text:style-name="T567">_</text:span><text:span text:style-name="T566">name:encrypted_password:UID:GID:user_name:home_dir:interpreter</text:span></text:p>
      <text:p text:style-name="P473"/>
      <text:p text:style-name="P475"><text:span text:style-name="T559">The </text:span><text:span text:style-name="Source_20_Text"><text:span text:style-name="T560">encrypted_password</text:span></text:span><text:span text:style-name="T559"> field is optional because the actual password is typically stored in the </text:span><text:span text:style-name="Source_20_Text"><text:span text:style-name="T560">/etc/shadow</text:span></text:span><text:span text:style-name="T559"> file; in </text:span><text:span text:style-name="Source_20_Text"><text:span text:style-name="T560">/etc/passwd</text:span></text:span><text:span text:style-name="T559">, this field usually contains the placeholder ’</text:span><text:span text:style-name="Source_20_Text"><text:span text:style-name="T560">x</text:span></text:span><text:span text:style-name="T559">‘. The interpreter field specifies the shell assigned to the user when the user logs in. The </text:span><text:span text:style-name="Source_20_Text"><text:span text:style-name="T560">user_name</text:span></text:span><text:span text:style-name="T559"> field is also known as the </text:span><text:span text:style-name="T564">comment</text:span><text:span text:style-name="T559"> field. </text:span><text:span text:style-name="T568">For example:</text:span></text:p>
      <text:p text:style-name="P476"/>
      <text:p text:style-name="P481"><text:span text:style-name="T563"><text:tab/></text:span><text:span text:style-name="T569">newuser</text:span><text:span text:style-name="T570">:x:1000:1000:</text:span><text:span text:style-name="T569">newuser</text:span><text:span text:style-name="T570">,,,:/home/</text:span><text:span text:style-name="T569">newuser</text:span><text:span text:style-name="T570">:/usr/bin/zsh</text:span></text:p>
      <text:p text:style-name="P482"/>
      <text:p text:style-name="P475"><text:span text:style-name="T571">If the password field is empty, it means that no password is set for the user, and the user can log in without entering a password. If the password field starts with an exclamation mark (</text:span><text:span text:style-name="Source_20_Text"><text:span text:style-name="T570">!</text:span></text:span><text:span text:style-name="T571">), it means that the password is locked and password-based authentication is disabled for that account.</text:span></text:p>
      <text:p text:style-name="P483"><text:span text:style-name="T571">The </text:span><text:span text:style-name="T564">comment</text:span><text:span text:style-name="T571"> field is used by programs such as </text:span><text:span text:style-name="Source_20_Text"><text:span text:style-name="T570">finger</text:span></text:span><text:span text:style-name="Source_20_Text"><text:span text:style-name="T570"><text:note text:id="ftn48" text:note-class="footnote"><text:note-citation>46</text:note-citation><text:note-body><text:p text:style-name="P250"><text:span text:style-name="T572">See the </text:span><text:span text:style-name="T573">finger(1)</text:span><text:span text:style-name="T574"> manual page</text:span></text:p></text:note-body></text:note></text:span></text:span><text:span text:style-name="T571"> to retrieve descriptive information about a user, including on remote systems.</text:span></text:p>
      <text:p text:style-name="P484"/>
      <text:p text:style-name="P485"><text:span text:style-name="T575">The </text:span><text:span text:style-name="T570">/etc/shadow</text:span><text:span text:style-name="T575"> file contains the password information for the accounts and optional aging information. </text:span><text:span text:style-name="T576">The fields of the file are listed in the following table.</text:span></text:p>
      <text:p text:style-name="P486"/>
      <table:table table:name="Table39" table:style-name="Table39">
        <table:table-column table:style-name="Table39.A"/>
        <table:table-column table:style-name="Table39.B"/>
        <table:table-row>
          <table:table-cell table:style-name="Table39.A1" office:value-type="string">
            <text:p text:style-name="P487">Login name</text:p>
          </table:table-cell>
          <table:table-cell table:style-name="Table39.B1" office:value-type="string">
            <text:p text:style-name="P488">Account name that must exist on the system</text:p>
          </table:table-cell>
        </table:table-row>
        <table:table-row>
          <table:table-cell table:style-name="Table39.A2" office:value-type="string">
            <text:p text:style-name="P487">Encrypted password</text:p>
          </table:table-cell>
          <table:table-cell table:style-name="Table39.B2" office:value-type="string">
            <text:p text:style-name="P488">May be empty, in which case no password <text:span text:style-name="T577">are required to authenticate</text:span></text:p>
          </table:table-cell>
        </table:table-row>
        <text:soft-page-break/>
        <table:table-row>
          <table:table-cell table:style-name="Table39.A2" office:value-type="string">
            <text:p text:style-name="P487">Date of the last password change</text:p>
          </table:table-cell>
          <table:table-cell table:style-name="Table39.B2" office:value-type="string">
            <text:p text:style-name="P489">The date of the last password change expressed as the number of days since the Epoch</text:p>
          </table:table-cell>
        </table:table-row>
        <table:table-row>
          <table:table-cell table:style-name="Table39.A2" office:value-type="string">
            <text:p text:style-name="P487">Minimum password age</text:p>
          </table:table-cell>
          <table:table-cell table:style-name="Table39.B2" office:value-type="string">
            <text:p text:style-name="P489">Number of days the user will have to wait before he can can change the password again</text:p>
          </table:table-cell>
        </table:table-row>
        <table:table-row>
          <table:table-cell table:style-name="Table39.A2" office:value-type="string">
            <text:p text:style-name="P487">Maximum password age</text:p>
          </table:table-cell>
          <table:table-cell table:style-name="Table39.B2" office:value-type="string">
            <text:p text:style-name="P489">Number of days after which the user will have to change his password</text:p>
          </table:table-cell>
        </table:table-row>
        <table:table-row>
          <table:table-cell table:style-name="Table39.A2" office:value-type="string">
            <text:p text:style-name="P487">Password warning period</text:p>
          </table:table-cell>
          <table:table-cell table:style-name="Table39.B2" office:value-type="string">
            <text:p text:style-name="P183">The number of days before a password is going to expire during which the user should be warned</text:p>
          </table:table-cell>
        </table:table-row>
        <table:table-row>
          <table:table-cell table:style-name="Table39.A2" office:value-type="string">
            <text:p text:style-name="P487">Password inactivity period</text:p>
          </table:table-cell>
          <table:table-cell table:style-name="Table39.B2" office:value-type="string">
            <text:p text:style-name="P183"><text:span text:style-name="T578">N</text:span>umber of days after a password has expired during which the password should still be accepted</text:p>
          </table:table-cell>
        </table:table-row>
        <table:table-row>
          <table:table-cell table:style-name="Table39.A2" office:value-type="string">
            <text:p text:style-name="P487">Account expiration date</text:p>
          </table:table-cell>
          <table:table-cell table:style-name="Table39.B2" office:value-type="string">
            <text:p text:style-name="P183">The date of expiration of the account, expressed as the number of days since <text:span text:style-name="T578">the Epoch</text:span></text:p>
          </table:table-cell>
        </table:table-row>
        <table:table-row>
          <table:table-cell table:style-name="Table39.A2" office:value-type="string">
            <text:p text:style-name="P487">Reserved field</text:p>
          </table:table-cell>
          <table:table-cell table:style-name="Table39.B2" office:value-type="string">
            <text:p text:style-name="P183"><text:span text:style-name="T578">R</text:span>eserved for future use</text:p>
          </table:table-cell>
        </table:table-row>
      </table:table>
      <text:p text:style-name="P490"/>
      <text:p text:style-name="P491"><text:span text:style-name="T579">Tab </text:span><text:span text:style-name="T503">9</text:span><text:span text:style-name="T579">.</text:span><text:span text:style-name="T580"> Fields of the </text:span><text:span text:style-name="T581">shadow</text:span><text:span text:style-name="T580"> file</text:span></text:p>
      <text:p text:style-name="P492"/>
      <text:p text:style-name="P493"><text:span text:style-name="T582">Concerning the groups, the file </text:span><text:span text:style-name="T581">/etc/gshadow</text:span><text:span text:style-name="T582"> contains the shadowed information. The fields of are listed in the following table.</text:span></text:p>
      <text:p text:style-name="P494"/>
      <table:table table:name="Table40" table:style-name="Table40">
        <table:table-column table:style-name="Table40.A"/>
        <table:table-column table:style-name="Table40.B"/>
        <table:table-row>
          <table:table-cell table:style-name="Table40.A1" office:value-type="string">
            <text:p text:style-name="P487">Group name</text:p>
          </table:table-cell>
          <table:table-cell table:style-name="Table40.B1" office:value-type="string">
            <text:p text:style-name="P495">Name of the group</text:p>
          </table:table-cell>
        </table:table-row>
        <table:table-row>
          <table:table-cell table:style-name="Table40.A2" office:value-type="string">
            <text:p text:style-name="P487">Encrypted password</text:p>
          </table:table-cell>
          <table:table-cell table:style-name="Table40.B2" office:value-type="string">
            <text:p text:style-name="P495">Group password, is used when a user who is not a member of the group wants to gain the permission of this group</text:p>
          </table:table-cell>
        </table:table-row>
        <table:table-row>
          <table:table-cell table:style-name="Table40.A2" office:value-type="string">
            <text:p text:style-name="P487">Administrators</text:p>
          </table:table-cell>
          <table:table-cell table:style-name="Table40.B2" office:value-type="string">
            <text:p text:style-name="P495">Comma-separated list of administrators of the group</text:p>
          </table:table-cell>
        </table:table-row>
        <table:table-row>
          <table:table-cell table:style-name="Table40.A2" office:value-type="string">
            <text:p text:style-name="P487">Members</text:p>
          </table:table-cell>
          <table:table-cell table:style-name="Table40.B2" office:value-type="string">
            <text:p text:style-name="P495">Comma-separated list of user names</text:p>
          </table:table-cell>
        </table:table-row>
      </table:table>
      <text:p text:style-name="P494"/>
      <text:p text:style-name="P491"><text:span text:style-name="T579">Tab </text:span><text:span text:style-name="T503">10</text:span><text:span text:style-name="T579">.</text:span><text:span text:style-name="T583"> Fields of the </text:span><text:span text:style-name="T581">gshadow</text:span><text:span text:style-name="T583"> file</text:span></text:p>
      <text:p text:style-name="P496"/>
      <text:p text:style-name="P497">The following table <text:span text:style-name="T584">provides</text:span> a summary of the files and commands used to <text:span text:style-name="T584">manage </text:span>users and groups.</text:p>
      <text:p text:style-name="P497"/>
      <table:table table:name="Table41" table:style-name="Table41">
        <table:table-column table:style-name="Table41.A"/>
        <table:table-column table:style-name="Table41.B"/>
        <table:table-column table:style-name="Table41.C"/>
        <table:table-row>
          <table:table-cell table:style-name="Table41.A1" office:value-type="string">
            <text:p text:style-name="P498">File</text:p>
          </table:table-cell>
          <table:table-cell table:style-name="Table41.A1" office:value-type="string">
            <text:p text:style-name="P498">Commands</text:p>
          </table:table-cell>
          <table:table-cell table:style-name="Table41.C1" office:value-type="string">
            <text:p text:style-name="P498">Notes</text:p>
          </table:table-cell>
        </table:table-row>
        <table:table-row table:style-name="Table41.2">
          <table:table-cell table:style-name="Table41.A2" office:value-type="string">
            <text:p text:style-name="P487">/etc/passwd</text:p>
          </table:table-cell>
          <table:table-cell table:style-name="Table41.B2" office:value-type="string">
            <text:p text:style-name="P499"><text:span text:style-name="T581">useradd</text:span><text:span text:style-name="T585">, </text:span><text:span text:style-name="T581">usermod</text:span><text:span text:style-name="T585">, </text:span><text:span text:style-name="T581">userdel</text:span></text:p>
          </table:table-cell>
          <table:table-cell table:style-name="Table41.C2" office:value-type="string">
            <text:p text:style-name="P500">User account information</text:p>
          </table:table-cell>
        </table:table-row>
        <table:table-row>
          <table:table-cell table:style-name="Table41.A2" office:value-type="string">
            <text:p text:style-name="P487">/etc/shadow</text:p>
          </table:table-cell>
          <table:table-cell table:style-name="Table41.A2" office:value-type="string">
            <text:p text:style-name="P499"><text:span text:style-name="T581">passwd</text:span><text:span text:style-name="T585">, </text:span><text:span text:style-name="T581">chage</text:span></text:p>
          </table:table-cell>
          <table:table-cell table:style-name="Table41.C3" office:value-type="string">
            <text:p text:style-name="P500">Hashed passwords and aging</text:p>
          </table:table-cell>
        </table:table-row>
        <table:table-row>
          <table:table-cell table:style-name="Table41.A2" office:value-type="string">
            <text:p text:style-name="P487">/etc/group</text:p>
          </table:table-cell>
          <table:table-cell table:style-name="Table41.A2" office:value-type="string">
            <text:p text:style-name="P499"><text:span text:style-name="T581">groupadd</text:span><text:span text:style-name="T585">, </text:span><text:span text:style-name="T581">groupmod</text:span><text:span text:style-name="T585">, </text:span><text:span text:style-name="T581">groupdel</text:span><text:span text:style-name="T585">, </text:span><text:span text:style-name="T581">gpasswd</text:span></text:p>
          </table:table-cell>
          <table:table-cell table:style-name="Table41.C4" office:value-type="string">
            <text:p text:style-name="P500">Group information</text:p>
          </table:table-cell>
        </table:table-row>
        <table:table-row>
          <table:table-cell table:style-name="Table41.A2" office:value-type="string">
            <text:p text:style-name="P487">/etc/gshadow</text:p>
          </table:table-cell>
          <table:table-cell table:style-name="Table41.A2" office:value-type="string">
            <text:p text:style-name="P487">gpasswd</text:p>
          </table:table-cell>
          <table:table-cell table:style-name="Table41.C5" office:value-type="string">
            <text:p text:style-name="P501">Group passwords and administrators</text:p>
          </table:table-cell>
        </table:table-row>
      </table:table>
      <text:p text:style-name="P497"/>
      <text:p text:style-name="P502">Tab 1<text:span text:style-name="T586">1</text:span>. <text:span text:style-name="T230">Files and commands for user and groups</text:span></text:p>
      <text:p text:style-name="P466"/>
      <text:p text:style-name="P466"/>
      <text:p text:style-name="P503"/>
      <text:p text:style-name="P503"/>
      <text:p text:style-name="P503"/>
      <text:p text:style-name="P504"><text:soft-page-break/><text:span text:style-name="T587">III.4.2 The </text:span><text:span text:style-name="T588">/etc/passwd</text:span><text:span text:style-name="T587"> file</text:span></text:p>
      <text:p text:style-name="P505"/>
      <text:p text:style-name="P505">To <text:span text:style-name="T589">retrieve</text:span> <text:span text:style-name="T590">an </text:span>entr<text:span text:style-name="T590">y</text:span> from the <text:span text:style-name="T590">users database (</text:span><text:span text:style-name="T591">/etc/passwd</text:span><text:span text:style-name="T590">), </text:span><text:span text:style-name="T592">we can use</text:span> the following functions<text:note text:id="ftn49" text:note-class="footnote"><text:note-citation>47</text:note-citation><text:note-body><text:p text:style-name="P506"><text:span text:style-name="T593">See the </text:span><text:span text:style-name="T594">getpwnam(3)</text:span><text:span text:style-name="T595"> manual page</text:span></text:p></text:note-body></text:note></text:p>
      <text:p text:style-name="P505"/>
      <table:table table:name="Table42" table:style-name="Table42">
        <table:table-column table:style-name="Table42.A"/>
        <table:table-row>
          <table:table-cell table:style-name="Table42.A1" office:value-type="string">
            <text:p text:style-name="P271"><text:span text:style-name="T115">#include </text:span><text:span text:style-name="T116">&lt;sys/types.h&gt;</text:span></text:p>
            <text:p text:style-name="P186"><text:span text:style-name="T115">#include </text:span><text:span text:style-name="T116">&lt;pwd.h&gt;</text:span></text:p>
            <text:p text:style-name="P188"/>
            <text:p text:style-name="P229"><text:span text:style-name="T103">struct</text:span><text:span text:style-name="T104"> </text:span><text:span text:style-name="T103">passwd</text:span><text:span text:style-name="T104"> *</text:span><text:span text:style-name="T105">getpwnam</text:span><text:span text:style-name="T104">(</text:span><text:span text:style-name="T103">const</text:span><text:span text:style-name="T104"> </text:span><text:span text:style-name="T103">char</text:span><text:span text:style-name="T104"> </text:span><text:span text:style-name="T106">*name</text:span><text:span text:style-name="T104">);</text:span></text:p>
            <text:p text:style-name="P229"><text:span text:style-name="T103">struct</text:span><text:span text:style-name="T104"> </text:span><text:span text:style-name="T103">passwd</text:span><text:span text:style-name="T104"> *</text:span><text:span text:style-name="T105">getpwuid</text:span><text:span text:style-name="T104">(</text:span><text:span text:style-name="T103">uid_t</text:span><text:span text:style-name="T104"> </text:span><text:span text:style-name="T106">uid</text:span><text:span text:style-name="T104">);</text:span></text:p>
            <text:p text:style-name="P188"/>
            <text:p text:style-name="P229"><text:span text:style-name="T103">int</text:span><text:span text:style-name="T104"> </text:span><text:span text:style-name="T105">getpwnam_r</text:span><text:span text:style-name="T104">(</text:span><text:span text:style-name="T103">const</text:span><text:span text:style-name="T104"> </text:span><text:span text:style-name="T103">char</text:span><text:span text:style-name="T104"> *</text:span><text:span text:style-name="T103">restrict</text:span><text:span text:style-name="T104"> </text:span><text:span text:style-name="T106">name</text:span><text:span text:style-name="T104">, </text:span><text:span text:style-name="T103">struct</text:span><text:span text:style-name="T104"> </text:span><text:span text:style-name="T103">passwd</text:span><text:span text:style-name="T104"> *</text:span><text:span text:style-name="T103">restrict</text:span><text:span text:style-name="T104"> </text:span><text:span text:style-name="T106">pwd</text:span><text:span text:style-name="T104">,</text:span></text:p>
            <text:p text:style-name="P507"><text:span text:style-name="T103"><text:s text:c="15"/>char</text:span><text:span text:style-name="T104"> </text:span><text:span text:style-name="T106">buf[restrict .buflen]</text:span><text:span text:style-name="T104">, </text:span><text:span text:style-name="T103">size_t</text:span><text:span text:style-name="T104"> </text:span><text:span text:style-name="T106">buflen</text:span><text:span text:style-name="T104">, </text:span><text:span text:style-name="T103">struct</text:span><text:span text:style-name="T104"> </text:span><text:span text:style-name="T103">passwd</text:span><text:span text:style-name="T104"> <text:s text:c="2"/></text:span></text:p>
            <text:p text:style-name="P507"><text:span text:style-name="T104"><text:s text:c="15"/>**</text:span><text:span text:style-name="T103">restrict</text:span><text:span text:style-name="T104"> </text:span><text:span text:style-name="T106">result</text:span><text:span text:style-name="T104">);</text:span></text:p>
            <text:p text:style-name="P508"/>
            <text:p text:style-name="P229"><text:span text:style-name="T103">int</text:span><text:span text:style-name="T104"> </text:span><text:span text:style-name="T105">getpwuid_r</text:span><text:span text:style-name="T104">(</text:span><text:span text:style-name="T103">uid_t</text:span><text:span text:style-name="T104"> </text:span><text:span text:style-name="T106">uid</text:span><text:span text:style-name="T104">, </text:span><text:span text:style-name="T103">struct</text:span><text:span text:style-name="T104"> </text:span><text:span text:style-name="T103">passwd</text:span><text:span text:style-name="T104"> *</text:span><text:span text:style-name="T103">restrict</text:span><text:span text:style-name="T104"> </text:span><text:span text:style-name="T106">pwd</text:span><text:span text:style-name="T104">, </text:span><text:span text:style-name="T103">char</text:span><text:span text:style-name="T104"> </text:span><text:span text:style-name="T106">buf[restrict </text:span></text:p>
            <text:p text:style-name="P507"><text:span text:style-name="T106"><text:s text:c="15"/>.buflen]</text:span><text:span text:style-name="T104">, </text:span><text:span text:style-name="T103">size_t</text:span><text:span text:style-name="T104"> </text:span><text:span text:style-name="T106">buflen</text:span><text:span text:style-name="T104">, </text:span><text:span text:style-name="T103">struct</text:span><text:span text:style-name="T104"> </text:span><text:span text:style-name="T103">passwd</text:span><text:span text:style-name="T104"> **</text:span><text:span text:style-name="T103">restrict</text:span><text:span text:style-name="T104"> </text:span></text:p>
            <text:p text:style-name="P507"><text:span text:style-name="T106"><text:s text:c="15"/>result</text:span><text:span text:style-name="T104">);</text:span></text:p>
            <text:p text:style-name="P183"/>
            <text:p text:style-name="P509">Return: a pointer to a passwd structure, NULL i<text:span text:style-name="T596">f</text:span> there is no matching entry, on error errno is set,</text:p>
            <text:p text:style-name="P509"><text:s/>0 on success and set *result to pwd, 0 if there is no matching entry and NULL in *result</text:p>
          </table:table-cell>
        </table:table-row>
      </table:table>
      <text:p text:style-name="P510"/>
      <text:p text:style-name="P511"><text:span text:style-name="T597">The </text:span><text:span text:style-name="Source_20_Text"><text:span text:style-name="T598">getpwnam</text:span></text:span><text:span text:style-name="T597"> function retrieves the record corresponding to the specified user </text:span><text:span text:style-name="Source_20_Text"><text:span text:style-name="T598">name</text:span></text:span><text:span text:style-name="T597"> and returns it as a structure of type </text:span><text:span text:style-name="Source_20_Text"><text:span text:style-name="T598">passwd</text:span></text:span><text:span text:style-name="T597">.</text:span></text:p>
      <text:p text:style-name="P511"><text:span text:style-name="T597">The </text:span><text:span text:style-name="Source_20_Text"><text:span text:style-name="T598">getpwuid</text:span></text:span><text:span text:style-name="T597"> function retrieves the record corresponding to the user ID specified in the </text:span><text:span text:style-name="Source_20_Text"><text:span text:style-name="T598">uid</text:span></text:span><text:span text:style-name="T597"> parameter and also returns it as a </text:span><text:span text:style-name="Source_20_Text"><text:span text:style-name="T598">passwd</text:span></text:span><text:span text:style-name="T597"> structure.</text:span></text:p>
      <text:p text:style-name="P512"><text:span text:style-name="T597">The functions </text:span><text:span text:style-name="Source_20_Text"><text:span text:style-name="T598">getpwnam_r</text:span></text:span><text:span text:style-name="T597"> and </text:span><text:span text:style-name="Source_20_Text"><text:span text:style-name="T598">getpwuid_r</text:span></text:span><text:span text:style-name="T597"> retrieve the same information using a reentrant interface. Instead of returning a pointer to a static structure, they store the result in the structure pointed to by the </text:span><text:span text:style-name="Source_20_Text"><text:span text:style-name="T598">pwd</text:span></text:span><text:span text:style-name="T597"> parameter. The string fields referenced by the members of the </text:span><text:span text:style-name="Source_20_Text"><text:span text:style-name="T598">passwd</text:span></text:span><text:span text:style-name="T597"> structure are stored in the buffer </text:span><text:span text:style-name="Source_20_Text"><text:span text:style-name="T598">buf</text:span></text:span><text:span text:style-name="T597">, whose size is specified by </text:span><text:span text:style-name="Source_20_Text"><text:span text:style-name="T598">buflen</text:span></text:span><text:span text:style-name="T597">.</text:span></text:p>
      <text:p text:style-name="P512"><text:span text:style-name="T597">The </text:span><text:span text:style-name="Source_20_Text"><text:span text:style-name="T598">result</text:span></text:span><text:span text:style-name="T597"> argument is set to point to the filled structure on success, or to </text:span><text:span text:style-name="Source_20_Text"><text:span text:style-name="T598">NULL</text:span></text:span><text:span text:style-name="T597"> if no matching entry is found.</text:span></text:p>
      <text:p text:style-name="P513"/>
      <text:p text:style-name="P514"><text:span text:style-name="T597">The </text:span><text:span text:style-name="T581">passwd</text:span><text:span text:style-name="T597"> structure is defined in the </text:span><text:span text:style-name="T581">pwd.h</text:span><text:span text:style-name="T597"> header </text:span><text:span text:style-name="T599">file </text:span><text:span text:style-name="T597">as follows.</text:span></text:p>
      <text:p text:style-name="P513"/>
      <table:table table:name="Table43" table:style-name="Table43">
        <table:table-column table:style-name="Table43.A"/>
        <table:table-row>
          <table:table-cell table:style-name="Table43.A1" office:value-type="string">
            <text:p text:style-name="P515"><text:span text:style-name="T115">struct</text:span> passwd {</text:p>
            <text:p text:style-name="P516"><text:span text:style-name="T115"><text:s text:c="3"/>char</text:span> *pw_name;<text:span text:style-name="T119"> <text:s text:c="22"/>/* username */</text:span></text:p>
            <text:p text:style-name="P516"><text:span text:style-name="T115"><text:s text:c="3"/>char</text:span> *pw_passwd;<text:span text:style-name="T119"> <text:s text:c="20"/>/* user password */ </text:span></text:p>
            <text:p text:style-name="P516"><text:span text:style-name="T115"><text:s text:c="3"/>uid_t</text:span> pw_uid;<text:span text:style-name="T119"> <text:s text:c="23"/>/* user ID */</text:span></text:p>
            <text:p text:style-name="P516"><text:span text:style-name="T115"><text:s text:c="3"/>gid_t</text:span> pw_gid;<text:span text:style-name="T119"> <text:s text:c="23"/>/* group ID */</text:span></text:p>
            <text:p text:style-name="P516"><text:span text:style-name="T115"><text:s text:c="3"/>char</text:span> *pw_gecos;<text:span text:style-name="T119"> <text:s text:c="21"/>/* user information */</text:span></text:p>
            <text:p text:style-name="P516"><text:span text:style-name="T115"><text:s text:c="3"/>char</text:span> *pw_dir;<text:span text:style-name="T119"> <text:s text:c="23"/>/* home directory */</text:span></text:p>
            <text:p text:style-name="P516"><text:span text:style-name="T115"><text:s text:c="3"/>char</text:span> *pw_shell;<text:span text:style-name="T119"> <text:s text:c="21"/>/* shell program */</text:span></text:p>
            <text:p text:style-name="P516">};</text:p>
          </table:table-cell>
        </table:table-row>
      </table:table>
      <text:p text:style-name="P513"/>
      <text:p text:style-name="P517"><text:span text:style-name="T600">When we want to get a record from the user database with </text:span><text:span text:style-name="T581">getpwnam_l</text:span><text:span text:style-name="T600"> and </text:span><text:span text:style-name="T581">getpwuid_l</text:span><text:span text:style-name="T600">, we </text:span><text:span text:style-name="T601">need</text:span><text:span text:style-name="T600"> to allocate the memory for the buffer. Considering that we don’t know the size of this buffer we can use the following call to obtain an initial suggested size:</text:span></text:p>
      <text:p text:style-name="P518"><text:soft-page-break/></text:p>
      <text:p text:style-name="P229"><text:span text:style-name="T600"><text:tab/></text:span><text:span text:style-name="T602">sysconf</text:span><text:span text:style-name="T603">(</text:span><text:span text:style-name="T604">_SC_GETPW_R_SIZE_MAX</text:span><text:span text:style-name="T603">)</text:span></text:p>
      <text:p text:style-name="P518"/>
      <text:p text:style-name="P519"><text:span text:style-name="T600">The </text:span><text:span text:style-name="Source_20_Text"><text:span text:style-name="T605">getrecord.c</text:span></text:span><text:span text:style-name="T600"> program is a modified version of the example provided in the </text:span><text:span text:style-name="Source_20_Text"><text:span text:style-name="T605">getpwnam(3)</text:span></text:span><text:span text:style-name="T600"> manual page and demonstrates how to retrieve the record corresponding to the user name passed on the command line.</text:span></text:p>
      <text:p text:style-name="Horizontal_20_Line"/>
      <text:p text:style-name="P186"><text:span text:style-name="T606">1 </text:span><text:span text:style-name="T115">#include </text:span><text:span text:style-name="T116">&lt;errno.h&gt;</text:span></text:p>
      <text:p text:style-name="P520"><text:span text:style-name="T607">2</text:span><text:span text:style-name="T606"> </text:span><text:span text:style-name="T115">#include </text:span><text:span text:style-name="T116">&lt;pwd.h&gt;</text:span></text:p>
      <text:p text:style-name="P520"><text:span text:style-name="T607">3</text:span><text:span text:style-name="T606"> </text:span><text:span text:style-name="T115">#include </text:span><text:span text:style-name="T116">&lt;stdint.h&gt;</text:span></text:p>
      <text:p text:style-name="P520"><text:span text:style-name="T607">4</text:span><text:span text:style-name="T606"> </text:span><text:span text:style-name="T115">#include </text:span><text:span text:style-name="T116">&lt;stdio.h&gt;</text:span></text:p>
      <text:p text:style-name="P520"><text:span text:style-name="T607">5</text:span><text:span text:style-name="T606"> </text:span><text:span text:style-name="T115">#include </text:span><text:span text:style-name="T116">&lt;stdlib.h&gt;</text:span></text:p>
      <text:p text:style-name="P520"><text:span text:style-name="T607">6</text:span><text:span text:style-name="T606"> </text:span><text:span text:style-name="T115">#include </text:span><text:span text:style-name="T116">&lt;unistd.h&gt;</text:span></text:p>
      <text:p text:style-name="P188"/>
      <text:p text:style-name="P520"><text:span text:style-name="T607">7</text:span><text:span text:style-name="T606"> </text:span><text:span text:style-name="T115">int</text:span> main(<text:span text:style-name="T115">int</text:span> argc, <text:span text:style-name="T115">char</text:span> *argv<text:span text:style-name="T115">[]</text:span>)</text:p>
      <text:p text:style-name="P520"><text:span text:style-name="T607">8</text:span><text:span text:style-name="T606"> </text:span>{</text:p>
      <text:p text:style-name="P521"><text:span text:style-name="T608">9</text:span><text:span text:style-name="T609"> <text:tab/></text:span><text:span text:style-name="T103">struct</text:span><text:span text:style-name="T104"> </text:span><text:span text:style-name="T103">passwd</text:span><text:span text:style-name="T104"> pwd;</text:span></text:p>
      <text:p text:style-name="P521"><text:span text:style-name="T609">1</text:span><text:span text:style-name="T608">0</text:span><text:span text:style-name="T609"> <text:tab/></text:span><text:span text:style-name="T103">struct</text:span><text:span text:style-name="T104"> </text:span><text:span text:style-name="T103">passwd</text:span><text:span text:style-name="T104"> *result;</text:span></text:p>
      <text:p text:style-name="P520"><text:span text:style-name="T606">1</text:span><text:span text:style-name="T607">1</text:span><text:span text:style-name="T606"> <text:tab/></text:span><text:span text:style-name="T115">char</text:span> *buf;</text:p>
      <text:p text:style-name="P520"><text:span text:style-name="T606">1</text:span><text:span text:style-name="T607">2</text:span><text:span text:style-name="T606"> <text:tab/></text:span><text:span text:style-name="T115">long</text:span> bufsize;</text:p>
      <text:p text:style-name="P520"><text:span text:style-name="T606">1</text:span><text:span text:style-name="T607">3</text:span><text:span text:style-name="T606"> <text:tab/></text:span><text:span text:style-name="T115">int</text:span> s;</text:p>
      <text:p text:style-name="P188"/>
      <text:p text:style-name="P520"><text:span text:style-name="T606">1</text:span><text:span text:style-name="T607">4</text:span><text:span text:style-name="T606"> <text:tab/></text:span><text:span text:style-name="T115">if</text:span> (argc != <text:span text:style-name="T127">2</text:span>) {</text:p>
      <text:p text:style-name="P520"><text:span text:style-name="T606">1</text:span><text:span text:style-name="T607">5</text:span><text:span text:style-name="T606"> <text:tab/><text:tab/></text:span>fprintf(<text:span text:style-name="T115">stderr</text:span>, <text:span text:style-name="T116">"Usage: %s username\n"</text:span>, argv[<text:span text:style-name="T127">0</text:span>]);</text:p>
      <text:p text:style-name="P520"><text:span text:style-name="T606">1</text:span><text:span text:style-name="T607">6</text:span><text:span text:style-name="T606"> <text:tab/><text:tab/></text:span>exit(<text:span text:style-name="T115">EXIT_FAILURE</text:span>);</text:p>
      <text:p text:style-name="P520"><text:span text:style-name="T606">1</text:span><text:span text:style-name="T607">7</text:span><text:span text:style-name="T606"> <text:tab/></text:span>}</text:p>
      <text:p text:style-name="P188"/>
      <text:p text:style-name="P520"><text:span text:style-name="T606">1</text:span><text:span text:style-name="T607">8</text:span><text:span text:style-name="T606"> <text:tab/></text:span>bufsize = <text:span text:style-name="T126">sysconf</text:span>(<text:span text:style-name="T115">_SC_GETPW_R_SIZE_MAX</text:span>);</text:p>
      <text:p text:style-name="P520"><text:span text:style-name="T606">1</text:span><text:span text:style-name="T607">9</text:span><text:span text:style-name="T606"> <text:tab/></text:span><text:span text:style-name="T115">if</text:span> (bufsize == -<text:span text:style-name="T127">1</text:span>) </text:p>
      <text:p text:style-name="P520"><text:span text:style-name="T606">2</text:span><text:span text:style-name="T607">0</text:span><text:span text:style-name="T606"> <text:tab/><text:tab/></text:span>bufsize = <text:span text:style-name="T127">16384</text:span>; </text:p>
      <text:p text:style-name="P188"/>
      <text:p text:style-name="P520"><text:span text:style-name="T606">2</text:span><text:span text:style-name="T607">1</text:span><text:span text:style-name="T606"> <text:tab/></text:span>buf = malloc(bufsize);</text:p>
      <text:p text:style-name="P520"><text:span text:style-name="T606">2</text:span><text:span text:style-name="T607">2</text:span><text:span text:style-name="T606"> <text:tab/></text:span><text:span text:style-name="T115">if</text:span> (buf == <text:span text:style-name="T115">NULL</text:span>) {</text:p>
      <text:p text:style-name="P520"><text:span text:style-name="T606">2</text:span><text:span text:style-name="T607">3</text:span><text:span text:style-name="T606"> <text:tab/><text:tab/></text:span>perror(<text:span text:style-name="T116">"malloc"</text:span>);</text:p>
      <text:p text:style-name="P520"><text:span text:style-name="T606">2</text:span><text:span text:style-name="T607">4</text:span><text:span text:style-name="T606"> <text:tab/><text:tab/></text:span>exit(<text:span text:style-name="T115">EXIT_FAILURE</text:span>);</text:p>
      <text:p text:style-name="P520"><text:span text:style-name="T606">2</text:span><text:span text:style-name="T607">5</text:span><text:span text:style-name="T606"> <text:tab/></text:span>}</text:p>
      <text:p text:style-name="P188"/>
      <text:p text:style-name="P520"><text:span text:style-name="T606">2</text:span><text:span text:style-name="T607">6</text:span><text:span text:style-name="T606"> <text:tab/></text:span>s = <text:span text:style-name="T126">getpwnam_r</text:span>(argv[<text:span text:style-name="T127">1</text:span>], &amp;pwd, buf, bufsize, &amp;result);</text:p>
      <text:p text:style-name="P520"><text:span text:style-name="T606">2</text:span><text:span text:style-name="T607">7</text:span><text:span text:style-name="T606"> <text:tab/></text:span><text:span text:style-name="T115">if</text:span> (result == <text:span text:style-name="T115">NULL</text:span>) {</text:p>
      <text:p text:style-name="P520"><text:span text:style-name="T606">2</text:span><text:span text:style-name="T607">8</text:span><text:span text:style-name="T606"> <text:tab/><text:tab/></text:span><text:span text:style-name="T115">if</text:span> (s == <text:span text:style-name="T127">0</text:span>)</text:p>
      <text:p text:style-name="P520"><text:span text:style-name="T606">2</text:span><text:span text:style-name="T607">9</text:span><text:span text:style-name="T606"> <text:tab/><text:tab/><text:tab/></text:span>printf(<text:span text:style-name="T116">"Not found\n"</text:span>);</text:p>
      <text:p text:style-name="P520"><text:span text:style-name="T607">30</text:span><text:span text:style-name="T606"> <text:tab/><text:tab/></text:span><text:span text:style-name="T115">else</text:span> {</text:p>
      <text:p text:style-name="P520"><text:span text:style-name="T606">3</text:span><text:span text:style-name="T607">1</text:span><text:span text:style-name="T606"> <text:tab/><text:tab/><text:tab/></text:span><text:span text:style-name="T115">errno</text:span> = s;</text:p>
      <text:p text:style-name="P520"><text:span text:style-name="T606">3</text:span><text:span text:style-name="T607">2</text:span><text:span text:style-name="T606"> <text:tab/><text:tab/><text:tab/></text:span>perror(<text:span text:style-name="T116">"getpwnam_r"</text:span>);</text:p>
      <text:p text:style-name="P520"><text:span text:style-name="T606">3</text:span><text:span text:style-name="T607">3</text:span><text:span text:style-name="T606"> <text:tab/><text:tab/></text:span>}</text:p>
      <text:p text:style-name="P520"><text:span text:style-name="T606">3</text:span><text:span text:style-name="T607">4</text:span><text:span text:style-name="T606"> <text:tab/><text:tab/></text:span>exit(<text:span text:style-name="T115">EXIT_FAILURE</text:span>);</text:p>
      <text:p text:style-name="P520"><text:span text:style-name="T606">3</text:span><text:span text:style-name="T607">5</text:span><text:span text:style-name="T606"> <text:tab/></text:span>}</text:p>
      <text:p text:style-name="P188"/>
      <text:p text:style-name="P520"><text:span text:style-name="T606">3</text:span><text:span text:style-name="T607">6</text:span><text:span text:style-name="T606"> <text:tab/></text:span>printf(<text:span text:style-name="T116">"User: %s \n"</text:span>, pwd.pw_name);</text:p>
      <text:p text:style-name="P520"><text:span text:style-name="T606">3</text:span><text:span text:style-name="T607">7</text:span><text:span text:style-name="T606"> <text:tab/></text:span>printf(<text:span text:style-name="T116">"Password: %s \n"</text:span>, pwd.pw_passwd);</text:p>
      <text:p text:style-name="P520"><text:soft-page-break/><text:span text:style-name="T606">3</text:span><text:span text:style-name="T607">8</text:span><text:span text:style-name="T606"> <text:tab/></text:span>printf(<text:span text:style-name="T116">"UID: %d \n"</text:span>, (<text:span text:style-name="T115">intmax_t</text:span>) pwd.pw_uid);</text:p>
      <text:p text:style-name="P520"><text:span text:style-name="T606">3</text:span><text:span text:style-name="T607">9</text:span><text:span text:style-name="T606"> <text:tab/></text:span>printf(<text:span text:style-name="T116">"GID: %d \n"</text:span>, (<text:span text:style-name="T115">intmax_t</text:span>) pwd.pw_gid);</text:p>
      <text:p text:style-name="P520"><text:span text:style-name="T607">40</text:span><text:span text:style-name="T606"> <text:tab/></text:span>printf(<text:span text:style-name="T116">"Comment: %s \n"</text:span>, pwd.pw_gecos);</text:p>
      <text:p text:style-name="P520"><text:span text:style-name="T606">4</text:span><text:span text:style-name="T607">1</text:span><text:span text:style-name="T606"> <text:tab/></text:span>printf(<text:span text:style-name="T116">"Home: %s \n"</text:span>, pwd.pw_dir);</text:p>
      <text:p text:style-name="P522"><text:span text:style-name="T610">4</text:span><text:span text:style-name="T611">2</text:span><text:span text:style-name="T610"> <text:tab/></text:span><text:span text:style-name="T124">printf(</text:span><text:span text:style-name="T102">"Shell: %s \n"</text:span><text:span text:style-name="T124">, pwd.pw_shell);</text:span></text:p>
      <text:p text:style-name="P520"><text:span text:style-name="T606">4</text:span><text:span text:style-name="T607">3</text:span><text:span text:style-name="T606"> <text:tab/></text:span>exit(<text:span text:style-name="T115">EXIT_SUCCESS</text:span>);</text:p>
      <text:p text:style-name="P522"><text:span text:style-name="T610">4</text:span><text:span text:style-name="T611">4</text:span><text:span text:style-name="T610"> </text:span><text:span text:style-name="T124">}</text:span></text:p>
      <text:p text:style-name="Horizontal_20_Line"/>
      <text:p text:style-name="P523">getrecord.c</text:p>
      <text:p text:style-name="P524"/>
      <text:p text:style-name="Standard"><text:span text:style-name="Strong_20_Emphasis"><text:span text:style-name="T220">Line 18.</text:span></text:span><text:span text:style-name="T220"> Retrieves the recommended initial size for the buffer </text:span><text:span text:style-name="Source_20_Text"><text:span text:style-name="T221">buf</text:span></text:span><text:span text:style-name="T220"> using </text:span><text:span text:style-name="T612"><text:tab/> <text:s/><text:tab/> <text:s/><text:tab/> <text:s/><text:tab/> <text:s/><text:tab/> <text:s text:c="2"/></text:span><text:span text:style-name="Source_20_Text"><text:span text:style-name="T221">sysconf(_SC_GETPW_R_SIZE_MAX)</text:span></text:span><text:span text:style-name="T220">. This value specifies the suggested buffer size <text:tab/> <text:s text:c="2"/>for reentrant password database functions. If the system does not provide a limit, a default <text:tab/> <text:s text:c="2"/>size of 16384 bytes is used</text:span></text:p>
      <text:p text:style-name="Standard"><text:span text:style-name="Strong_20_Emphasis"><text:span text:style-name="T220">Line 21.</text:span></text:span><text:span text:style-name="T220"> Allocates dynamic memory for the buffer </text:span><text:span text:style-name="Source_20_Text"><text:span text:style-name="T221">buf</text:span></text:span><text:span text:style-name="T220">, which will store the string fields associated <text:tab/> <text:s text:c="2"/>with the </text:span><text:span text:style-name="Source_20_Text"><text:span text:style-name="T221">passwd</text:span></text:span><text:span text:style-name="T220"> structure</text:span></text:p>
      <text:p text:style-name="Standard"><text:span text:style-name="Strong_20_Emphasis"><text:span text:style-name="T220">Line 26.</text:span></text:span><text:span text:style-name="T220"> Calls </text:span><text:span text:style-name="Source_20_Text"><text:span text:style-name="T221">getpwnam_r</text:span></text:span><text:span text:style-name="T220"> to retrieve the record associated with the specified user name. The <text:tab/> <text:s text:c="2"/>function receives the user name, the </text:span><text:span text:style-name="Source_20_Text"><text:span text:style-name="T221">pwd</text:span></text:span><text:span text:style-name="T220"> structure where the result will be stored, the <text:tab/> <text:s text:c="2"/><text:tab/> <text:s text:c="2"/>buffer </text:span><text:span text:style-name="Source_20_Text"><text:span text:style-name="T221">buf</text:span></text:span><text:span text:style-name="T220">, its size </text:span><text:span text:style-name="Source_20_Text"><text:span text:style-name="T221">bufsize</text:span></text:span><text:span text:style-name="T220">, and the pointer </text:span><text:span text:style-name="Source_20_Text"><text:span text:style-name="T221">result</text:span></text:span><text:span text:style-name="T220">, which indicates whether the <text:tab/> <text:s text:c="3"/><text:tab/> <text:s text:c="2"/>operation succeeded</text:span></text:p>
      <text:p text:style-name="Standard"><text:span text:style-name="Strong_20_Emphasis"><text:span text:style-name="T220">Line 27–35.</text:span></text:span><text:span text:style-name="T220"> Checks whether the record was successfully retrieved. If no matching user is found, the <text:tab/> <text:s text:c="8"/>program prints ”</text:span><text:span text:style-name="Source_20_Text"><text:span text:style-name="T221">Not found</text:span></text:span><text:span text:style-name="T220">“; otherwise, if an error occurred, it reports the <text:tab/> <text:s text:c="2"/><text:tab/> <text:s text:c="8"/>corresponding error message</text:span></text:p>
      <text:p text:style-name="Standard"><text:span text:style-name="Strong_20_Emphasis"><text:span text:style-name="T220">Line 36–42.</text:span></text:span><text:span text:style-name="T220"> Prints the information contained in the retrieved </text:span><text:span text:style-name="Source_20_Text"><text:span text:style-name="T221">passwd</text:span></text:span><text:span text:style-name="T220"> structure, including user <text:tab/> <text:s text:c="8"/>name, encrypted password placeholder, user ID (UID), group ID (GID), comment <text:tab/> <text:s text:c="4"/><text:tab/> <text:s text:c="8"/>field, home directory, and login shell</text:span></text:p>
      <text:p text:style-name="Standard"><text:s/></text:p>
      <text:p text:style-name="P525"><text:span text:style-name="T589">We e</text:span>xecute the program.</text:p>
      <text:p text:style-name="P525"/>
      <table:table table:name="Table44" table:style-name="Table44">
        <table:table-column table:style-name="Table44.A"/>
        <table:table-row>
          <table:table-cell table:style-name="Table44.A1" office:value-type="string">
            <text:p text:style-name="P52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13">sudo useradd -m newuser</text:span></text:p>
            <text:p text:style-name="P52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13">sudo passwd newuser</text:span></text:p>
            <text:p text:style-name="P526"/>
            <text:p text:style-name="P526"><text:span text:style-name="T80">[</text:span><text:a xlink:type="simple" xlink:href="mailto:linux@users" text:style-name="Internet_20_link" text:visited-style-name="Visited_20_Internet_20_Link"><text:span text:style-name="T81">linux@</text:span><text:span text:style-name="T342">users</text:span></text:a><text:span text:style-name="T80">] New password: </text:span></text:p>
            <text:p text:style-name="P526">Retype new password: </text:p>
            <text:p text:style-name="P526">passwd: password updated successfully</text:p>
            <text:p text:style-name="P526"/>
            <text:p text:style-name="P526"><text:span text:style-name="T80">[</text:span><text:a xlink:type="simple" xlink:href="mailto:linux@users" text:style-name="Internet_20_link" text:visited-style-name="Visited_20_Internet_20_Link"><text:span text:style-name="T81">linux@</text:span><text:span text:style-name="T342">users</text:span></text:a><text:span text:style-name="T80">]</text:span><text:span text:style-name="T613"> grep newuser /etc/passwd</text:span></text:p>
            <text:p text:style-name="P526">newuser:x:1002:1002::/home/newuser:/bin/sh</text:p>
            <text:p text:style-name="P526"/>
            <text:p text:style-name="P52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13">getrecord newuser</text:span></text:p>
            <text:p text:style-name="P526">User: newuser </text:p>
            <text:p text:style-name="P526">Password: x </text:p>
            <text:p text:style-name="P526">UID: 1002 </text:p>
            <text:p text:style-name="P526">GID: 1002 </text:p>
            <text:p text:style-name="P526">Comment: <text:s/></text:p>
            <text:p text:style-name="P526">Home: /home/newuser </text:p>
            <text:p text:style-name="P526">Shell: /bin/sh </text:p>
            <text:p text:style-name="P526"/>
            <text:p text:style-name="P52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13">getrecord </text:span><text:span text:style-name="T614">root</text:span></text:p>
            <text:p text:style-name="P527">User: root </text:p>
            <text:p text:style-name="P527">Password: x </text:p>
            <text:p text:style-name="P527"><text:soft-page-break/>UID: 0 </text:p>
            <text:p text:style-name="P527">GID: 0 </text:p>
            <text:p text:style-name="P527">Comment: root </text:p>
            <text:p text:style-name="P527">Home: /root </text:p>
            <text:p text:style-name="P527">Shell: /usr/bin/zsh </text:p>
          </table:table-cell>
        </table:table-row>
      </table:table>
      <text:p text:style-name="P528"/>
      <text:p text:style-name="P529"><text:span text:style-name="T615">The execution shows that after creating the user </text:span><text:span text:style-name="Source_20_Text"><text:span text:style-name="T616">newuser</text:span></text:span><text:span text:style-name="T615">, its record is correctly added to the user database (</text:span><text:span text:style-name="Source_20_Text"><text:span text:style-name="T616">/etc/passwd</text:span></text:span><text:span text:style-name="T615">). The </text:span><text:span text:style-name="Source_20_Text"><text:span text:style-name="T616">grep</text:span></text:span><text:span text:style-name="T615"> command confirms the presence of the entry, including the UID, GID, home directory, and login shell.</text:span></text:p>
      <text:p text:style-name="P529"><text:span text:style-name="T615">Running </text:span><text:span text:style-name="Source_20_Text"><text:span text:style-name="T616">getrecord</text:span></text:span><text:span text:style-name="T615"> for both </text:span><text:span text:style-name="Source_20_Text"><text:span text:style-name="T616">newuser</text:span></text:span><text:span text:style-name="T615"> and </text:span><text:span text:style-name="Source_20_Text"><text:span text:style-name="T616">root</text:span></text:span><text:span text:style-name="T615"> demonstrates that </text:span><text:span text:style-name="Source_20_Text"><text:span text:style-name="T616">getpwnam_r</text:span></text:span><text:span text:style-name="T615"> successfully retrieves user information from the user database and stores it in the </text:span><text:span text:style-name="Source_20_Text"><text:span text:style-name="T616">passwd</text:span></text:span><text:span text:style-name="T615"> structure. The output fields printed by the program correspond to the values stored in </text:span><text:span text:style-name="Source_20_Text"><text:span text:style-name="T616">/etc/passwd</text:span></text:span><text:span text:style-name="T615">.</text:span></text:p>
      <text:p text:style-name="P529"><text:span text:style-name="T615">The password field contains the placeholder </text:span><text:span text:style-name="Source_20_Text"><text:span text:style-name="T616">x</text:span></text:span><text:span text:style-name="T615">, indicating that the encrypted password is stored separately in the shadow password database (</text:span><text:span text:style-name="Source_20_Text"><text:span text:style-name="T616">/etc/shadow</text:span></text:span><text:span text:style-name="T615">). The execution also highlights differences between regular users and privileged accounts, such as different home directories, shells, and user IDs (</text:span><text:span text:style-name="Source_20_Text"><text:span text:style-name="T617">UID</text:span></text:span><text:span text:style-name="Source_20_Text"><text:span text:style-name="T615"> </text:span></text:span><text:span text:style-name="Source_20_Text"><text:span text:style-name="T616">0</text:span></text:span><text:span text:style-name="T615"> for </text:span><text:span text:style-name="Source_20_Text"><text:span text:style-name="T616">root</text:span></text:span><text:span text:style-name="T615">).</text:span></text:p>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1"><text:soft-page-break/><text:span text:style-name="T618">III.4.</text:span><text:span text:style-name="T619">3</text:span><text:span text:style-name="T618"> </text:span><text:span text:style-name="T620">Iterating</text:span><text:span text:style-name="T619"> the user database</text:span><text:span text:style-name="T618"> </text:span><text:span text:style-name="T619">: </text:span><text:span text:style-name="T621">getpwent</text:span><text:span text:style-name="T619"> and </text:span><text:span text:style-name="T621">setpwent</text:span></text:p>
      <text:p text:style-name="P530"/>
      <text:p text:style-name="P530"><text:span text:style-name="T622">We can </text:span><text:span text:style-name="T623">also</text:span><text:span text:style-name="T622"> work with</text:span> <text:span text:style-name="T75">/etc/passwd</text:span> <text:span text:style-name="T623">by</text:span><text:span text:style-name="T622"> </text:span><text:span text:style-name="T624">iterat</text:span><text:span text:style-name="T625">ing</text:span><text:span text:style-name="T622"> </text:span><text:span text:style-name="T624">over</text:span><text:span text:style-name="T622"> the </text:span>file <text:span text:style-name="T622">using </text:span>the following functions<text:note text:id="ftn50" text:note-class="footnote"><text:note-citation>48</text:note-citation><text:note-body><text:p text:style-name="P532"><text:span text:style-name="T622">See the </text:span><text:span text:style-name="T626">getpwent(3)</text:span><text:span text:style-name="T627"> manual page</text:span></text:p></text:note-body></text:note></text:p>
      <text:p text:style-name="P530"/>
      <table:table table:name="Table45" table:style-name="Table45">
        <table:table-column table:style-name="Table45.A"/>
        <table:table-row>
          <table:table-cell table:style-name="Table45.A1" office:value-type="string">
            <text:p text:style-name="P533"><text:span text:style-name="T115">#include </text:span><text:span text:style-name="T116">&lt;sys/types.h&gt;</text:span></text:p>
            <text:p text:style-name="P534"><text:span text:style-name="T115">#include </text:span><text:span text:style-name="T116">&lt;pwd.h&gt;</text:span></text:p>
            <text:p text:style-name="P535"/>
            <text:p text:style-name="P229"><text:span text:style-name="T628">struct</text:span><text:span text:style-name="T603"> </text:span><text:span text:style-name="T628">passwd</text:span><text:span text:style-name="T603"> *</text:span><text:span text:style-name="T602">getpwent</text:span><text:span text:style-name="T603">(</text:span><text:span text:style-name="T628">void</text:span><text:span text:style-name="T603">);</text:span></text:p>
            <text:p text:style-name="P534"><text:span text:style-name="T115">void</text:span> <text:span text:style-name="T126">setpwent</text:span>(<text:span text:style-name="T115">void</text:span>);</text:p>
            <text:p text:style-name="P536"><text:span text:style-name="T101">void</text:span><text:span text:style-name="T124"> </text:span><text:span text:style-name="T216">endpwent</text:span><text:span text:style-name="T124">(</text:span><text:span text:style-name="T101">void</text:span><text:span text:style-name="T124">);</text:span></text:p>
            <text:p text:style-name="P534"/>
            <text:p text:style-name="P537">Return<text:span text:style-name="T629">s</text:span>: a <text:span text:style-name="T629">pointer to a</text:span> passwd structure, <text:span text:style-name="T629">NULL if there is no matching entry, </text:span></text:p>
            <text:p text:style-name="P538"><text:s text:c="9"/>sets errno on error</text:p>
          </table:table-cell>
        </table:table-row>
      </table:table>
      <text:p text:style-name="P539"/>
      <text:p text:style-name="P529"><text:span text:style-name="T630">The </text:span><text:span text:style-name="Source_20_Text"><text:span text:style-name="T631">getpwent</text:span></text:span><text:span text:style-name="T630"> function returns a pointer to a structure containing the parsed fields of an entry from the user database (</text:span><text:span text:style-name="Source_20_Text"><text:span text:style-name="T631">/etc/passwd</text:span></text:span><text:span text:style-name="T630">). The first time </text:span><text:span text:style-name="Source_20_Text"><text:span text:style-name="T631">getpwent</text:span></text:span><text:span text:style-name="T630"> is called, it returns the first entry in the database; subsequent calls return the following entries sequentially.</text:span></text:p>
      <text:p text:style-name="P529"><text:span text:style-name="T630">The </text:span><text:span text:style-name="Source_20_Text"><text:span text:style-name="T631">setpwent</text:span></text:span><text:span text:style-name="T630"> function resets the position in the password database to the beginning, allowing iteration to start again from the first entry.</text:span></text:p>
      <text:p text:style-name="P529"><text:span text:style-name="T630">The </text:span><text:span text:style-name="Source_20_Text"><text:span text:style-name="T631">endpwent</text:span></text:span><text:span text:style-name="T630"> function closes the password database after processing is complete and releases any associated resources.</text:span></text:p>
      <text:p text:style-name="P540"/>
      <text:p text:style-name="P511"><text:span text:style-name="T630">The </text:span><text:span text:style-name="Source_20_Text"><text:span text:style-name="T631">iteratepwd.c</text:span></text:span><text:span text:style-name="T630"> program shows an example of how to use </text:span><text:span text:style-name="Source_20_Text"><text:span text:style-name="T631">setpwent</text:span></text:span><text:span text:style-name="T630">, </text:span><text:span text:style-name="Source_20_Text"><text:span text:style-name="T631">getpwent</text:span></text:span><text:span text:style-name="T630">, and </text:span><text:span text:style-name="Source_20_Text"><text:span text:style-name="T631">endpwent</text:span></text:span><text:span text:style-name="T630"> to iterate through the user database. </text:span></text:p>
      <text:p text:style-name="Horizontal_20_Line"/>
      <text:p text:style-name="P186"><text:span text:style-name="T632">1 </text:span><text:span text:style-name="T115">#include </text:span><text:span text:style-name="T116">&lt;stdio.h&gt;</text:span></text:p>
      <text:p text:style-name="P541"><text:span text:style-name="T633">2</text:span><text:span text:style-name="T632"> </text:span><text:span text:style-name="T115">#include </text:span><text:span text:style-name="T116">&lt;pwd.h&gt;</text:span></text:p>
      <text:p text:style-name="P541"><text:span text:style-name="T633">3</text:span><text:span text:style-name="T632"> </text:span><text:span text:style-name="T115">#include </text:span><text:span text:style-name="T116">&lt;stdlib.h&gt;</text:span></text:p>
      <text:p text:style-name="P188"/>
      <text:p text:style-name="P541"><text:span text:style-name="T633">4</text:span><text:span text:style-name="T632"> </text:span><text:span text:style-name="T115">int</text:span> main() {</text:p>
      <text:p text:style-name="P542"><text:span text:style-name="T634">5</text:span><text:span text:style-name="T635"> <text:tab/></text:span><text:span text:style-name="T103">struct</text:span><text:span text:style-name="T104"> </text:span><text:span text:style-name="T103">passwd</text:span><text:span text:style-name="T104"> *pw;</text:span></text:p>
      <text:p text:style-name="P541"><text:span text:style-name="T633">6</text:span><text:span text:style-name="T632"> <text:tab/></text:span>printf(<text:span text:style-name="T116">"=== Reading /etc/passwd entries ===\n"</text:span>);</text:p>
      <text:p text:style-name="P543"><text:span text:style-name="T636">7</text:span><text:span text:style-name="T637"> <text:tab/></text:span><text:span text:style-name="T216">setpwent</text:span><text:span text:style-name="T124">();</text:span></text:p>
      <text:p text:style-name="P541"><text:span text:style-name="T633">8</text:span><text:span text:style-name="T632"> <text:tab/></text:span><text:span text:style-name="T115">while</text:span> ((pw = <text:span text:style-name="T126">getpwent</text:span>()) != <text:span text:style-name="T115">NULL</text:span>) {</text:p>
      <text:p text:style-name="P541"><text:span text:style-name="T633">9<text:tab/><text:tab/></text:span>printf(<text:span text:style-name="T116">"Username: %s\n"</text:span>, pw-&gt;pw_name);</text:p>
      <text:p text:style-name="P541"><text:span text:style-name="T632">1</text:span><text:span text:style-name="T633">0</text:span><text:span text:style-name="T632"> <text:tab/><text:tab/></text:span>printf(<text:span text:style-name="T116">"UID: %d\n"</text:span>, pw-&gt;pw_uid);</text:p>
      <text:p text:style-name="P541"><text:span text:style-name="T632">1</text:span><text:span text:style-name="T633">1</text:span><text:span text:style-name="T632"> <text:tab/><text:tab/></text:span>printf(<text:span text:style-name="T116">"GID: %d\n"</text:span>, pw-&gt;pw_gid);</text:p>
      <text:p text:style-name="P541"><text:span text:style-name="T632">1</text:span><text:span text:style-name="T633">2</text:span><text:span text:style-name="T632"> <text:tab/><text:tab/></text:span>printf(<text:span text:style-name="T116">"Home Directory: %s\n"</text:span>, pw-&gt;pw_dir);</text:p>
      <text:p text:style-name="P541"><text:span text:style-name="T632">1</text:span><text:span text:style-name="T633">3</text:span><text:span text:style-name="T632"> <text:tab/><text:tab/></text:span>printf(<text:span text:style-name="T116">"Shell: %s\n"</text:span>, pw-&gt;pw_shell);</text:p>
      <text:p text:style-name="P541"><text:span text:style-name="T632">1</text:span><text:span text:style-name="T633">4</text:span><text:span text:style-name="T632"> <text:tab/><text:tab/></text:span>printf(<text:span text:style-name="T116">"------------------------\n"</text:span>);</text:p>
      <text:p text:style-name="P543"><text:span text:style-name="T637">1</text:span><text:span text:style-name="T636">5</text:span><text:span text:style-name="T637"> <text:tab/></text:span><text:span text:style-name="T124">}</text:span></text:p>
      <text:p text:style-name="P541"><text:span text:style-name="T632">1</text:span><text:span text:style-name="T633">6</text:span><text:span text:style-name="T632"> <text:tab/></text:span><text:span text:style-name="T126">endpwent</text:span>();</text:p>
      <text:p text:style-name="P541"><text:span text:style-name="T632">1</text:span><text:span text:style-name="T633">7</text:span><text:span text:style-name="T632"> <text:tab/></text:span>printf(<text:span text:style-name="T116">"=== Done ===\n"</text:span>);</text:p>
      <text:p text:style-name="P541"><text:span text:style-name="T632">1</text:span><text:span text:style-name="T633">8</text:span><text:span text:style-name="T632"> <text:tab/></text:span><text:span text:style-name="T115">return</text:span> <text:span text:style-name="T127">0</text:span>;</text:p>
      <text:p text:style-name="P543"><text:span text:style-name="T637">1</text:span><text:span text:style-name="T636">9</text:span><text:span text:style-name="T637"> </text:span><text:span text:style-name="T124">}</text:span></text:p>
      <text:p text:style-name="Horizontal_20_Line"/>
      <text:p text:style-name="P544">iteratepwd.c</text:p>
      <text:p text:style-name="P545"/>
      <text:p text:style-name="Standard"><text:soft-page-break/><text:span text:style-name="Strong_20_Emphasis"><text:span text:style-name="T220">Line 7.</text:span></text:span><text:span text:style-name="T220"> Calls </text:span><text:span text:style-name="Source_20_Text"><text:span text:style-name="T221">setpwent</text:span></text:span><text:span text:style-name="T220"> to reset the reading position to the beginning of the password database</text:span></text:p>
      <text:p text:style-name="Standard"><text:span text:style-name="Strong_20_Emphasis"><text:span text:style-name="T220">Line 8.</text:span></text:span><text:span text:style-name="T220"> Uses </text:span><text:span text:style-name="Source_20_Text"><text:span text:style-name="T221">getpwent</text:span></text:span><text:span text:style-name="T220"> inside a loop to sequentially retrieve each entry from the database until <text:tab/> no more entries are available</text:span></text:p>
      <text:p text:style-name="Standard"><text:span text:style-name="Strong_20_Emphasis"><text:span text:style-name="T220">Line 9–14.</text:span></text:span><text:span text:style-name="T220"> Prints selected information from each </text:span><text:span text:style-name="Source_20_Text"><text:span text:style-name="T221">passwd</text:span></text:span><text:span text:style-name="T220"> structure, including user name, user ID <text:tab/> <text:s text:c="5"/>(UID), group ID (GID), home directory, and login shell</text:span></text:p>
      <text:p text:style-name="Standard"><text:span text:style-name="Strong_20_Emphasis"><text:span text:style-name="T220">Line 16.</text:span></text:span><text:span text:style-name="T220"> Calls </text:span><text:span text:style-name="Source_20_Text"><text:span text:style-name="T221">endpwent</text:span></text:span><text:span text:style-name="T220"> to close the password database stream and release any associated <text:tab/> <text:s text:c="2"/><text:tab/> <text:s text:c="2"/>resources</text:span></text:p>
      <text:p text:style-name="P546"/>
      <text:p text:style-name="P547"><text:span text:style-name="T638">We e</text:span>xecute the program.</text:p>
      <text:p text:style-name="P547"/>
      <table:table table:name="Table46" table:style-name="Table46">
        <table:table-column table:style-name="Table46.A"/>
        <table:table-row>
          <table:table-cell table:style-name="Table46.A1" office:value-type="string">
            <text:p text:style-name="P548"><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39">iteratepwd </text:span></text:p>
            <text:p text:style-name="P548">=== Reading /etc/passwd entries ===</text:p>
            <text:p text:style-name="P548">Username: root</text:p>
            <text:p text:style-name="P548">UID: 0</text:p>
            <text:p text:style-name="P548">GID: 0</text:p>
            <text:p text:style-name="P548">Home Directory: /root</text:p>
            <text:p text:style-name="P548">Shell: /usr/bin/zsh</text:p>
            <text:p text:style-name="P548">------------------------</text:p>
            <text:p text:style-name="P548">Username: daemon</text:p>
            <text:p text:style-name="P548">UID: 1</text:p>
            <text:p text:style-name="P548">GID: 1</text:p>
            <text:p text:style-name="P548">Home Directory: /usr/sbin</text:p>
            <text:p text:style-name="P548">Shell: /usr/sbin/nologin</text:p>
            <text:p text:style-name="P548">------------------------</text:p>
            <text:p text:style-name="P549">...<text:span text:style-name="T638">output...</text:span></text:p>
          </table:table-cell>
        </table:table-row>
      </table:table>
      <text:p text:style-name="P547"/>
      <text:p text:style-name="P550"><text:span text:style-name="T640">The program sequentially reads all entries from the user database (</text:span><text:span text:style-name="Source_20_Text"><text:span text:style-name="T641">/etc/passwd</text:span></text:span><text:span text:style-name="T640">) using </text:span><text:span text:style-name="Source_20_Text"><text:span text:style-name="T641">getpwent</text:span></text:span><text:span text:style-name="T640">. For each entry, it prints selected information contained in the corresponding </text:span><text:span text:style-name="Source_20_Text"><text:span text:style-name="T641">passwd</text:span></text:span><text:span text:style-name="T640"> structure, such as the user name, UID, GID, home directory, and login shell.</text:span></text:p>
      <text:p text:style-name="P550"><text:span text:style-name="T640">The output shows both regular users and system accounts (for example </text:span><text:span text:style-name="Source_20_Text"><text:span text:style-name="T641">root</text:span></text:span><text:span text:style-name="T640"> and </text:span><text:span text:style-name="Source_20_Text"><text:span text:style-name="T641">daemon</text:span></text:span><text:span text:style-name="T640">), demonstrating how the password database stores information for every account configured on the system. The iteration continues until all entries in the database have been processed.</text:span></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2"><text:soft-page-break/><text:span text:style-name="T618">III.4.</text:span><text:span text:style-name="T642">4</text:span><text:span text:style-name="T618"> </text:span><text:span text:style-name="T619">Working with </text:span><text:span text:style-name="T642">records</text:span><text:span text:style-name="T619">: </text:span><text:span text:style-name="T643">fgetpwent</text:span><text:span text:style-name="T619"> and </text:span><text:span text:style-name="T621">putpwent</text:span></text:p>
      <text:p text:style-name="P551"/>
      <text:p text:style-name="P553"><text:span text:style-name="T644">The </text:span><text:span text:style-name="Source_20_Text"><text:span text:style-name="T645">fgetpwent</text:span></text:span><text:span text:style-name="Source_20_Text"><text:span text:style-name="T645"><text:note text:id="ftn51" text:note-class="footnote"><text:note-citation>49</text:note-citation><text:note-body><text:p text:style-name="P532"><text:span text:style-name="T646">See the </text:span><text:span text:style-name="T647">fgetpwent(3)</text:span><text:span text:style-name="T622"> manual page</text:span></text:p></text:note-body></text:note></text:span></text:span><text:span text:style-name="T644"> function is used to retrieve records from a file formatted like </text:span><text:span text:style-name="Source_20_Text"><text:span text:style-name="T645">/etc/passwd</text:span></text:span><text:span text:style-name="T644">, </text:span><text:span text:style-name="T648">it is </text:span><text:span text:style-name="T644">defined as follows.</text:span></text:p>
      <text:p text:style-name="P551"/>
      <table:table table:name="Table47" table:style-name="Table47">
        <table:table-column table:style-name="Table47.A"/>
        <table:table-row>
          <table:table-cell table:style-name="Table47.A1" office:value-type="string">
            <text:p text:style-name="P554"><text:span text:style-name="T115">#include </text:span><text:span text:style-name="T116">&lt;stdio.h&gt;</text:span></text:p>
            <text:p text:style-name="P516"><text:span text:style-name="T115">#include </text:span><text:span text:style-name="T116">&lt;sys/types.h&gt;</text:span></text:p>
            <text:p text:style-name="P516"><text:span text:style-name="T115">#include </text:span><text:span text:style-name="T116">&lt;pwd.h&gt;</text:span></text:p>
            <text:p text:style-name="P555"/>
            <text:p text:style-name="P229"><text:span text:style-name="T267">struct</text:span><text:span text:style-name="T268"> </text:span><text:span text:style-name="T267">passwd</text:span><text:span text:style-name="T268"> *</text:span><text:span text:style-name="T269">fgetpwent</text:span><text:span text:style-name="T268">(</text:span><text:span text:style-name="T267">FILE</text:span><text:span text:style-name="T268"> </text:span><text:span text:style-name="T270">*stream</text:span><text:span text:style-name="T268">);</text:span></text:p>
            <text:p text:style-name="P516"/>
            <text:p text:style-name="P556"><text:s text:c="4"/>Returns: a pointer to a passwd structure, NULL if no matching entries, sets </text:p>
            <text:p text:style-name="P556"><text:s text:c="13"/>errno on error</text:p>
          </table:table-cell>
        </table:table-row>
      </table:table>
      <text:p text:style-name="P551"/>
      <text:p text:style-name="P557"><text:span text:style-name="T649">The function accepts a pointer to a </text:span><text:span text:style-name="T645">FILE</text:span><text:span text:style-name="T649"> object as argument </text:span><text:span text:style-name="T650">and returns a </text:span><text:span text:style-name="T645">passwd</text:span><text:span text:style-name="T650"> </text:span><text:span text:style-name="T648">structure.</text:span></text:p>
      <text:p text:style-name="P558"/>
      <text:p text:style-name="P557"><text:span text:style-name="T650">The </text:span><text:span text:style-name="T645">fiterate.c</text:span><text:span text:style-name="T650"> program s</text:span><text:span text:style-name="T649">hows an example of how to use </text:span><text:span text:style-name="Source_20_Text"><text:span text:style-name="T645">fgetpwent</text:span></text:span><text:span text:style-name="T649"> to iterate through a password-format file provided as input.</text:span></text:p>
      <text:p text:style-name="Horizontal_20_Line"/>
      <text:p text:style-name="P186"><text:span text:style-name="T651">1 </text:span><text:span text:style-name="T115">#include </text:span><text:span text:style-name="T116">&lt;stdio.h&gt;</text:span></text:p>
      <text:p text:style-name="P559"><text:span text:style-name="T651">2 </text:span><text:span text:style-name="T115">#include </text:span><text:span text:style-name="T116">&lt;pwd.h&gt;</text:span></text:p>
      <text:p text:style-name="P559"><text:span text:style-name="T651">3 </text:span><text:span text:style-name="T115">#include </text:span><text:span text:style-name="T116">&lt;stdlib.h&gt;</text:span></text:p>
      <text:p text:style-name="P188"/>
      <text:p text:style-name="P560"><text:span text:style-name="T652">4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559"><text:span text:style-name="T651">5 <text:tab/></text:span><text:span text:style-name="T115">if</text:span> (argc != <text:span text:style-name="T127">2</text:span>) {</text:p>
      <text:p text:style-name="P559"><text:span text:style-name="T651">6<text:tab/><text:tab/></text:span>printf(<text:span text:style-name="T116">"\nUsage: %s &lt;file_pwd&gt;"</text:span>, argv[<text:span text:style-name="T127">0</text:span>]);</text:p>
      <text:p text:style-name="P559"><text:span text:style-name="T651">7 <text:tab/><text:tab/></text:span>exit(<text:span text:style-name="T115">EXIT_FAILURE</text:span>);</text:p>
      <text:p text:style-name="P559"><text:span text:style-name="T651">8 <text:tab/></text:span>}</text:p>
      <text:p text:style-name="P188"><text:span text:style-name="T124"/></text:p>
      <text:p text:style-name="P561"><text:span text:style-name="T653">9</text:span><text:span text:style-name="T654"> <text:tab/></text:span><text:span text:style-name="T103">struct</text:span><text:span text:style-name="T104"> </text:span><text:span text:style-name="T103">passwd</text:span><text:span text:style-name="T104"> *pw;</text:span></text:p>
      <text:p text:style-name="P561"><text:span text:style-name="T654">1</text:span><text:span text:style-name="T653">0</text:span><text:span text:style-name="T654"> <text:tab/></text:span><text:span text:style-name="T103">FILE</text:span><text:span text:style-name="T104"> *passwd_file;</text:span></text:p>
      <text:p text:style-name="P188"/>
      <text:p text:style-name="P559"><text:span text:style-name="T651">1</text:span><text:span text:style-name="T655">1</text:span><text:span text:style-name="T651"> <text:tab/></text:span>passwd_file = fopen(argv[<text:span text:style-name="T127">1</text:span>], <text:span text:style-name="T116">"r"</text:span>);</text:p>
      <text:p text:style-name="P559"><text:span text:style-name="T651">1</text:span><text:span text:style-name="T655">2</text:span><text:span text:style-name="T651"> <text:tab/></text:span><text:span text:style-name="T115">if</text:span> (passwd_file == <text:span text:style-name="T115">NULL</text:span>) {</text:p>
      <text:p text:style-name="P559"><text:span text:style-name="T651">1</text:span><text:span text:style-name="T655">3</text:span><text:span text:style-name="T651"> <text:tab/><text:tab/></text:span>perror(<text:span text:style-name="T116">"fopen"</text:span>);</text:p>
      <text:p text:style-name="P559"><text:span text:style-name="T651">1</text:span><text:span text:style-name="T655">4</text:span><text:span text:style-name="T651"> <text:tab/><text:tab/></text:span><text:span text:style-name="T115">return</text:span> <text:span text:style-name="T115">EXIT_FAILURE</text:span>;</text:p>
      <text:p text:style-name="P560"><text:span text:style-name="T652">1</text:span><text:span text:style-name="T656">5</text:span><text:span text:style-name="T652"> <text:tab/></text:span><text:span text:style-name="T124">}</text:span></text:p>
      <text:p text:style-name="P559"><text:span text:style-name="T651">1</text:span><text:span text:style-name="T655">6</text:span><text:span text:style-name="T651"> <text:tab/></text:span>printf(<text:span text:style-name="T116">"=== Reading %s using fgetpwent() ===\n"</text:span>, argv[<text:span text:style-name="T127">1</text:span>]);</text:p>
      <text:p text:style-name="P188"/>
      <text:p text:style-name="P559"><text:span text:style-name="T651">1</text:span><text:span text:style-name="T655">6</text:span><text:span text:style-name="T651"> <text:tab/></text:span><text:span text:style-name="T115">while</text:span> ((pw = <text:span text:style-name="T126">fgetpwent</text:span>(passwd_file)) != <text:span text:style-name="T115">NULL</text:span>) {</text:p>
      <text:p text:style-name="P559"><text:span text:style-name="T651">1</text:span><text:span text:style-name="T655">7</text:span><text:span text:style-name="T651"> <text:tab/><text:tab/></text:span>printf(<text:span text:style-name="T116">"Username: %s\n"</text:span>, pw-&gt;pw_name);</text:p>
      <text:p text:style-name="P559"><text:span text:style-name="T655">19</text:span><text:span text:style-name="T651"> <text:tab/><text:tab/></text:span>printf(<text:span text:style-name="T116">"UID: %d\n"</text:span>, pw-&gt;pw_uid);</text:p>
      <text:p text:style-name="P559"><text:span text:style-name="T651">2</text:span><text:span text:style-name="T655">0</text:span><text:span text:style-name="T651"> <text:tab/><text:tab/></text:span>printf(<text:span text:style-name="T116">"GID: %d\n"</text:span>, pw-&gt;pw_gid);</text:p>
      <text:p text:style-name="P559"><text:span text:style-name="T651">2</text:span><text:span text:style-name="T655">1</text:span><text:span text:style-name="T651"> <text:tab/><text:tab/></text:span>pr<text:span text:style-name="T657">i</text:span>ntf(<text:span text:style-name="T116">"Home Directory: %s\n"</text:span>, pw-&gt;pw_dir);</text:p>
      <text:p text:style-name="P559"><text:span text:style-name="T651">2</text:span><text:span text:style-name="T655">2</text:span><text:span text:style-name="T651"> <text:tab/><text:tab/></text:span>printf(<text:span text:style-name="T116">"Shell: %s\n"</text:span>, pw-&gt;pw_shell);</text:p>
      <text:p text:style-name="P559"><text:span text:style-name="T651">2</text:span><text:span text:style-name="T655">3</text:span><text:span text:style-name="T651"> <text:tab/><text:tab/></text:span>printf(<text:span text:style-name="T116">"------------------------\n"</text:span>);</text:p>
      <text:p text:style-name="P559"><text:span text:style-name="T651">2</text:span><text:span text:style-name="T655">4</text:span><text:span text:style-name="T651"> <text:tab/></text:span>}</text:p>
      <text:p text:style-name="P188"/>
      <text:p text:style-name="P559"><text:soft-page-break/><text:span text:style-name="T651">2</text:span><text:span text:style-name="T655">5</text:span><text:span text:style-name="T651"> <text:tab/></text:span>fclose(passwd_file);</text:p>
      <text:p text:style-name="P559"><text:span text:style-name="T651">2</text:span><text:span text:style-name="T655">6</text:span><text:span text:style-name="T651"> <text:tab/></text:span>printf(<text:span text:style-name="T116">"=== Done ===\n"</text:span>);</text:p>
      <text:p text:style-name="P559"><text:span text:style-name="T651">2</text:span><text:span text:style-name="T655">7</text:span><text:span text:style-name="T651"> <text:tab/></text:span><text:span text:style-name="T115">return</text:span> <text:span text:style-name="T127">0</text:span>;</text:p>
      <text:p text:style-name="P560"><text:span text:style-name="T652">2</text:span><text:span text:style-name="T656">8</text:span><text:span text:style-name="T652"> </text:span><text:span text:style-name="T124">}</text:span></text:p>
      <text:p text:style-name="Horizontal_20_Line"/>
      <text:p text:style-name="P562">fiterate.c</text:p>
      <text:p text:style-name="P563"/>
      <text:p text:style-name="Standard"><text:span text:style-name="Strong_20_Emphasis"><text:span text:style-name="T658">Line 11.</text:span></text:span><text:span text:style-name="T658"> Opens the file passed as a command-line argument in read mode using </text:span><text:span text:style-name="Source_20_Text"><text:span text:style-name="T659">fopen</text:span></text:span></text:p>
      <text:p text:style-name="P564"><text:span text:style-name="Strong_20_Emphasis"><text:span text:style-name="T658">Line 16.</text:span></text:span><text:span text:style-name="T658"> Iterates through the file using </text:span><text:span text:style-name="Source_20_Text"><text:span text:style-name="T659">fgetpwent</text:span></text:span><text:span text:style-name="T658">, which reads each entry formatted like</text:span></text:p>
      <text:p text:style-name="P564"><text:span text:style-name="Source_20_Text"><text:span text:style-name="T659"><text:tab/> /etc/passwd</text:span></text:span><text:span text:style-name="T658"> and returns it as a </text:span><text:span text:style-name="Source_20_Text"><text:span text:style-name="T659">passwd</text:span></text:span><text:span text:style-name="T658"> structure. For each record, the program <text:tab/> <text:s/><text:tab/> <text:s/>prints the user information stored in the structure</text:span></text:p>
      <text:p text:style-name="Standard"><text:span text:style-name="Strong_20_Emphasis"><text:span text:style-name="T658">Line 25.</text:span></text:span><text:span text:style-name="T658"> Closes the file stream using </text:span><text:span text:style-name="Source_20_Text"><text:span text:style-name="T659">fclose</text:span></text:span><text:span text:style-name="T658"> after all entries have been processed, releasing <text:tab/> <text:s/><text:tab/> <text:s text:c="2"/>system resources</text:span></text:p>
      <text:p text:style-name="P565"/>
      <text:p text:style-name="P566">We execute the program. </text:p>
      <text:p text:style-name="P566"/>
      <table:table table:name="Table48" table:style-name="Table48">
        <table:table-column table:style-name="Table48.A"/>
        <table:table-row>
          <table:table-cell table:style-name="Table48.A1" office:value-type="string">
            <text:p text:style-name="P56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60">fiterate /etc/passwd</text:span></text:p>
            <text:p text:style-name="P568">=== Reading /etc/passwd using fgetpwent() ===</text:p>
            <text:p text:style-name="P567">Username: root</text:p>
            <text:p text:style-name="P567">UID: 0</text:p>
            <text:p text:style-name="P567">GID: 0</text:p>
            <text:p text:style-name="P567">Home Directory: /root</text:p>
            <text:p text:style-name="P567">Shell: /usr/bin/zsh</text:p>
            <text:p text:style-name="P567">------------------------</text:p>
            <text:p text:style-name="P567">Username: daemon</text:p>
            <text:p text:style-name="P567">UID: 1</text:p>
            <text:p text:style-name="P567">GID: 1</text:p>
            <text:p text:style-name="P567">Home Directory: /usr/sbin</text:p>
            <text:p text:style-name="P567">Shell: /usr/sbin/nologin</text:p>
            <text:p text:style-name="P567">------------------------</text:p>
            <text:p text:style-name="P569">...<text:span text:style-name="T638">output...</text:span></text:p>
          </table:table-cell>
        </table:table-row>
      </table:table>
      <text:p text:style-name="P570"/>
      <text:p text:style-name="P571"><text:span text:style-name="T661">When the program is executed with </text:span><text:span text:style-name="Source_20_Text"><text:span text:style-name="T662">/etc/passwd</text:span></text:span><text:span text:style-name="T661">, </text:span><text:span text:style-name="Source_20_Text"><text:span text:style-name="T662">fgetpwent</text:span></text:span><text:span text:style-name="T661"> parses each line and returns <text:s/></text:span><text:span text:style-name="Source_20_Text"><text:span text:style-name="T662">passwd</text:span></text:span><text:span text:style-name="T661"> structures. As a result, all user entries are displayed, confirming that the file format matches the expected password database syntax.</text:span></text:p>
      <text:p text:style-name="P572"/>
      <table:table table:name="Table49" table:style-name="Table49">
        <table:table-column table:style-name="Table49.A"/>
        <table:table-row>
          <table:table-cell table:style-name="Table49.A1" office:value-type="string">
            <text:p text:style-name="P573"><text:span text:style-name="T80">[</text:span><text:a xlink:type="simple" xlink:href="mailto:linux@users" text:style-name="Internet_20_link" text:visited-style-name="Visited_20_Internet_20_Link"><text:span text:style-name="T81">linux@users</text:span></text:a><text:span text:style-name="T80">] ./</text:span><text:span text:style-name="T660">fiterate /etc/</text:span><text:span text:style-name="T663">networks</text:span></text:p>
            <text:p text:style-name="P574">=== Reading /etc/networks using fgetpwent() ===</text:p>
            <text:p text:style-name="P575">=== Done ===</text:p>
            <text:p text:style-name="P575"><text:span text:style-name="T90"/></text:p>
          </table:table-cell>
        </table:table-row>
      </table:table>
      <text:p text:style-name="P570"/>
      <text:p text:style-name="P571"><text:span text:style-name="T661">When a file with a different format such as </text:span><text:span text:style-name="Source_20_Text"><text:span text:style-name="T662">/etc/networks</text:span></text:span><text:span text:style-name="T661"> is provided, </text:span><text:span text:style-name="Source_20_Text"><text:span text:style-name="T662">fgetpwent</text:span></text:span><text:span text:style-name="T661"> fails to interpret the file because it does not follow the </text:span><text:span text:style-name="Source_20_Text"><text:span text:style-name="T662">/etc/passwd</text:span></text:span><text:span text:style-name="T661"> structure. </text:span><text:span text:style-name="T648">N</text:span><text:span text:style-name="T661">o records are printed, and the program terminates after reaching the end of the file.</text:span></text:p>
      <text:p text:style-name="P576"/>
      <text:p text:style-name="P577"><text:span text:style-name="T664">We execute the program with </text:span><text:span text:style-name="T662">sudo</text:span><text:span text:style-name="T664"> passing the</text:span><text:span text:style-name="T661"> </text:span><text:span text:style-name="T662">/etc/shadow</text:span><text:span text:style-name="T661"> </text:span><text:span text:style-name="T664">file.</text:span></text:p>
      <text:p text:style-name="P578"/>
      <table:table table:name="Table50" table:style-name="Table50">
        <table:table-column table:style-name="Table50.A"/>
        <table:table-row>
          <table:table-cell table:style-name="Table50.A1" office:value-type="string">
            <text:p text:style-name="P5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65">sudo </text:span><text:span text:style-name="T80">./</text:span><text:span text:style-name="T660">fiterate /etc/</text:span><text:span text:style-name="T663">shadow</text:span></text:p>
            <text:p text:style-name="P574">=== Reading /etc/shadow using fgetpwent() ===</text:p>
            <text:p text:style-name="P575">Username: root</text:p>
            <text:p text:style-name="P575"><text:soft-page-break/>UID: 20174</text:p>
            <text:p text:style-name="P575">GID: 0</text:p>
            <text:p text:style-name="P575">Home Directory: 7</text:p>
            <text:p text:style-name="P575">Shell: ::</text:p>
            <text:p text:style-name="P575">------------------------</text:p>
            <text:p text:style-name="P575">Username: daemon</text:p>
            <text:p text:style-name="P575">UID: 20154</text:p>
            <text:p text:style-name="P575">GID: 0</text:p>
            <text:p text:style-name="P575">Home Directory: 7</text:p>
            <text:p text:style-name="P575">Shell: ::</text:p>
            <text:p text:style-name="P575">------------------------</text:p>
            <text:p text:style-name="P579">...<text:span text:style-name="T638">output...</text:span></text:p>
          </table:table-cell>
        </table:table-row>
      </table:table>
      <text:p text:style-name="P580"/>
      <text:p text:style-name="P577"><text:span text:style-name="Source_20_Text"><text:span text:style-name="T666">In this execution</text:span></text:span><text:span text:style-name="T666">, </text:span><text:span text:style-name="Source_20_Text"><text:span text:style-name="T667">fgetpwent</text:span></text:span><text:span text:style-name="T664"> is able to read the file because elevated privileges allow access to the </text:span><text:span text:style-name="T668">shadow</text:span><text:span text:style-name="T664"> </text:span><text:span text:style-name="T668">database</text:span><text:span text:style-name="T664">. However, since </text:span><text:span text:style-name="Source_20_Text"><text:span text:style-name="T667">/etc/shadow</text:span></text:span><text:span text:style-name="T664"> does not follow the same format as </text:span><text:span text:style-name="Source_20_Text"><text:span text:style-name="T667">/etc/passwd</text:span></text:span><text:span text:style-name="T664">, the fields are misinterpreted and incorrectly mapped into the </text:span><text:span text:style-name="Source_20_Text"><text:span text:style-name="T667">passwd</text:span></text:span><text:span text:style-name="T664"> structure.</text:span></text:p>
      <text:p text:style-name="P577"><text:span text:style-name="T664">As a result, the output </text:span><text:span text:style-name="T669">is</text:span><text:span text:style-name="T664"> corrupted or inconsistent. </text:span></text:p>
      <text:p text:style-name="P580"/>
      <text:p text:style-name="P577"><text:span text:style-name="Source_20_Text"><text:span text:style-name="T667">fgetpwent</text:span></text:span><text:span text:style-name="T664"> is strictly designed to work with files that follow the password database format. If the structure differs, the function silently fails without necessarily producing an error message.</text:span></text:p>
      <text:p text:style-name="P580"/>
      <text:p text:style-name="P577"><text:span text:style-name="T664">When we create a new user in the system (using </text:span><text:span text:style-name="Source_20_Text"><text:span text:style-name="T670">useradd</text:span></text:span><text:span text:style-name="Source_20_Text"><text:span text:style-name="T671"><text:note text:id="ftn52" text:note-class="footnote"><text:note-citation>50</text:note-citation><text:note-body><text:p text:style-name="P532"><text:span text:style-name="T672">See the </text:span><text:span text:style-name="T673">useradd(8)</text:span><text:span text:style-name="T674"> manual page</text:span></text:p></text:note-body></text:note></text:span></text:span><text:span text:style-name="T664"> or </text:span><text:span text:style-name="Source_20_Text"><text:span text:style-name="T670">adduser</text:span></text:span><text:span text:style-name="Source_20_Text"><text:span text:style-name="T670"><text:note text:id="ftn53" text:note-class="footnote"><text:note-citation>51</text:note-citation><text:note-body><text:p text:style-name="P532"><text:span text:style-name="T672">See the </text:span><text:span text:style-name="T675">adduser(8)</text:span><text:span text:style-name="T672"> manual page</text:span></text:p></text:note-body></text:note></text:span></text:span><text:span text:style-name="T664">), a new entry is added to the </text:span><text:span text:style-name="Source_20_Text"><text:span text:style-name="T670">/etc/passwd</text:span></text:span><text:span text:style-name="T664"> file. This operation can also be performed programmatically using the </text:span><text:span text:style-name="Source_20_Text"><text:span text:style-name="T670">putpwent</text:span></text:span><text:span text:style-name="Source_20_Text"><text:span text:style-name="T676"><text:note text:id="ftn54" text:note-class="footnote"><text:note-citation>52</text:note-citation><text:note-body><text:p text:style-name="P532"><text:span text:style-name="T677">See the </text:span><text:span text:style-name="T673">putpwent(3)</text:span><text:span text:style-name="T672"> manual page</text:span></text:p></text:note-body></text:note></text:span></text:span><text:span text:style-name="T664"> function, </text:span><text:span text:style-name="T669">which </text:span><text:span text:style-name="T664">defined as follows.</text:span></text:p>
      <text:p text:style-name="P581"/>
      <table:table table:name="Table51" table:style-name="Table51">
        <table:table-column table:style-name="Table51.A"/>
        <table:table-row>
          <table:table-cell table:style-name="Table51.A1" office:value-type="string">
            <text:p text:style-name="P271"><text:span text:style-name="T115">#include </text:span><text:span text:style-name="T116">&lt;stdio.h&gt;</text:span></text:p>
            <text:p text:style-name="P186"><text:span text:style-name="T115">#include </text:span><text:span text:style-name="T116">&lt;sys/types.h&gt;</text:span></text:p>
            <text:p text:style-name="P186"><text:span text:style-name="T115">#include </text:span><text:span text:style-name="T116">&lt;pwd.h&gt;</text:span></text:p>
            <text:p text:style-name="P188"/>
            <text:p text:style-name="P229"><text:span text:style-name="T103">int</text:span><text:span text:style-name="T104"> </text:span><text:span text:style-name="T105">putpwent</text:span><text:span text:style-name="T104">(</text:span><text:span text:style-name="T103">const</text:span><text:span text:style-name="T104"> </text:span><text:span text:style-name="T103">struct</text:span><text:span text:style-name="T104"> </text:span><text:span text:style-name="T103">passwd</text:span><text:span text:style-name="T104"> *</text:span><text:span text:style-name="T103">restrict</text:span><text:span text:style-name="T104"> </text:span><text:span text:style-name="T106">p</text:span><text:span text:style-name="T104">, </text:span><text:span text:style-name="T103">FILE</text:span><text:span text:style-name="T104"> *</text:span><text:span text:style-name="T103">restrict</text:span><text:span text:style-name="T104"> </text:span><text:span text:style-name="T106">stream</text:span><text:span text:style-name="T104">);</text:span></text:p>
            <text:p text:style-name="P283"/>
            <text:p text:style-name="P582"><text:s text:c="30"/>Returns: 0 on success, on error -<text:span text:style-name="T678">1 </text:span>and errno</text:p>
          </table:table-cell>
        </table:table-row>
      </table:table>
      <text:p text:style-name="P581"/>
      <text:p text:style-name="P583"><text:span text:style-name="T664">This function writes a </text:span><text:span text:style-name="T668">user entry</text:span><text:span text:style-name="T664"> from the structure </text:span><text:span text:style-name="Source_20_Text"><text:span text:style-name="T670">p</text:span></text:span><text:span text:style-name="T664"> into the specified file stream.</text:span></text:p>
      <text:p text:style-name="P584"/>
      <text:p text:style-name="P583"><text:span text:style-name="T664">The program </text:span><text:span text:style-name="Source_20_Text"><text:span text:style-name="T670">newpentry.c</text:span></text:span><text:span text:style-name="T664"> shows an example. </text:span><text:span text:style-name="T669">I</text:span><text:span text:style-name="T664">nstead of modifying </text:span><text:span text:style-name="Source_20_Text"><text:span text:style-name="T670">/etc/passwd</text:span></text:span><text:span text:style-name="T664">, we will use a separate file to store the generated entries.</text:span></text:p>
      <text:p text:style-name="Horizontal_20_Line"/>
      <text:p text:style-name="P186"><text:span text:style-name="T679">1 </text:span><text:span text:style-name="T115">#include </text:span><text:span text:style-name="T116">&lt;stdio.h&gt;</text:span></text:p>
      <text:p text:style-name="P585"><text:span text:style-name="T679">2 </text:span><text:span text:style-name="T115">#include </text:span><text:span text:style-name="T116">&lt;stdlib.h&gt;</text:span></text:p>
      <text:p text:style-name="P585"><text:span text:style-name="T679">3 </text:span><text:span text:style-name="T115">#include </text:span><text:span text:style-name="T116">&lt;pwd.h&gt;</text:span></text:p>
      <text:p text:style-name="P585"><text:span text:style-name="T679">4 </text:span><text:span text:style-name="T115">#include </text:span><text:span text:style-name="T116">&lt;string.h&gt;</text:span></text:p>
      <text:p text:style-name="P188"/>
      <text:p text:style-name="P585"><text:span text:style-name="T679">5 </text:span><text:span text:style-name="T115">int</text:span> main(<text:span text:style-name="T115">int</text:span> argc, <text:span text:style-name="T115">char</text:span> *argv<text:span text:style-name="T115">[]</text:span>) {</text:p>
      <text:p text:style-name="P585"><text:span text:style-name="T679">6<text:tab/></text:span><text:span text:style-name="T115">if</text:span> (argc != <text:span text:style-name="T680">9</text:span>) {</text:p>
      <text:p text:style-name="P586"><text:span text:style-name="T681">7</text:span><text:tab/><text:tab/>fprintf(<text:span text:style-name="T115">stderr</text:span>, <text:span text:style-name="T116">"Usage: %s &lt;output_file&gt; user passwd uid gid <text:tab/><text:tab/><text:tab/> </text:span><text:span text:style-name="T682"><text:s text:c="2"/></text:span><text:span text:style-name="T116">gecos home shell\n"</text:span>, argv[<text:span text:style-name="T127">0</text:span>]);</text:p>
      <text:p text:style-name="P585"><text:soft-page-break/><text:span text:style-name="T679">8 <text:tab/><text:tab/></text:span><text:span text:style-name="T115">return</text:span> <text:span text:style-name="T115">EXIT_FAILURE</text:span>;</text:p>
      <text:p text:style-name="P585"><text:span text:style-name="T679">9 <text:tab/></text:span>}</text:p>
      <text:p text:style-name="P188"/>
      <text:p text:style-name="P587"><text:span text:style-name="T683">10 <text:tab/></text:span><text:span text:style-name="T103">FILE</text:span><text:span text:style-name="T104"> *outfile = fopen(argv[</text:span><text:span text:style-name="T128">1</text:span><text:span text:style-name="T104">], </text:span><text:span text:style-name="T403">"w"</text:span><text:span text:style-name="T104">);</text:span></text:p>
      <text:p text:style-name="P585"><text:span text:style-name="T679">11 <text:tab/></text:span><text:span text:style-name="T115">if</text:span> (outfile == <text:span text:style-name="T115">NULL</text:span>) {</text:p>
      <text:p text:style-name="P585"><text:span text:style-name="T679">12 <text:tab/><text:tab/></text:span>perror(<text:span text:style-name="T116">"fopen"</text:span>);</text:p>
      <text:p text:style-name="P585"><text:span text:style-name="T679">13 <text:tab/><text:tab/></text:span><text:span text:style-name="T115">return</text:span> <text:span text:style-name="T115">EXIT_FAILURE</text:span>;</text:p>
      <text:p text:style-name="P585"><text:span text:style-name="T679">14 <text:tab/></text:span>}</text:p>
      <text:p text:style-name="P188"/>
      <text:p text:style-name="P587"><text:span text:style-name="T683">15 <text:tab/></text:span><text:span text:style-name="T103">struct</text:span><text:span text:style-name="T104"> </text:span><text:span text:style-name="T103">passwd</text:span><text:span text:style-name="T104"> pw;</text:span></text:p>
      <text:p text:style-name="P588"><text:span text:style-name="T679">1</text:span><text:span text:style-name="T681">6</text:span><text:span text:style-name="T679"> <text:tab/></text:span>pw.pw_name = argv[<text:span text:style-name="T127">2</text:span>];</text:p>
      <text:p text:style-name="P586"><text:span text:style-name="T679">1</text:span><text:span text:style-name="T681">7<text:tab/></text:span>pw.pw_passwd = argv[<text:span text:style-name="T127">3</text:span>]; </text:p>
      <text:p text:style-name="P589"><text:span text:style-name="T679">1</text:span><text:span text:style-name="T684">8</text:span><text:tab/>pw.pw_uid = (<text:span text:style-name="T115">uid_t</text:span>) atoi(argv[<text:span text:style-name="T127">4</text:span>]);</text:p>
      <text:p text:style-name="P590"><text:span text:style-name="T679">1</text:span><text:span text:style-name="T684">9</text:span><text:tab/>pw.pw_gid = (<text:span text:style-name="T115">gid_t</text:span>) atoi(argv[<text:span text:style-name="T127">5</text:span>]);</text:p>
      <text:p text:style-name="P586"><text:span text:style-name="T681">20</text:span><text:span text:style-name="T679"> <text:tab/></text:span>pw.pw_gecos = argv[<text:span text:style-name="T127">6</text:span>];</text:p>
      <text:p text:style-name="P586"><text:span text:style-name="T681">21</text:span><text:span text:style-name="T679"> <text:tab/></text:span>pw.pw_dir = argv[<text:span text:style-name="T127">7</text:span>];</text:p>
      <text:p text:style-name="P591"><text:span text:style-name="T685">22</text:span><text:span text:style-name="T686"> <text:tab/></text:span><text:span text:style-name="T124">pw.pw_shell = argv[</text:span><text:span text:style-name="T335">8</text:span><text:span text:style-name="T124">];</text:span></text:p>
      <text:p text:style-name="P586"/>
      <text:p text:style-name="P585"><text:span text:style-name="T679">2</text:span><text:span text:style-name="T681">3</text:span><text:span text:style-name="T679"> <text:tab/></text:span><text:span text:style-name="T115">if</text:span> (<text:span text:style-name="T126">putpwent</text:span>(&amp;pw, outfile) != <text:span text:style-name="T127">0</text:span>) {</text:p>
      <text:p text:style-name="P585"><text:span text:style-name="T679">2</text:span><text:span text:style-name="T681">4</text:span><text:span text:style-name="T679"> <text:tab/><text:tab/></text:span>perror(<text:span text:style-name="T116">"putpwent"</text:span>);</text:p>
      <text:p text:style-name="P585"><text:span text:style-name="T679">2</text:span><text:span text:style-name="T681">5</text:span><text:span text:style-name="T679"> <text:tab/><text:tab/></text:span>fclose(outfile);</text:p>
      <text:p text:style-name="P585"><text:span text:style-name="T679">2</text:span><text:span text:style-name="T681">6</text:span><text:span text:style-name="T679"> <text:tab/><text:tab/></text:span><text:span text:style-name="T115">return</text:span> <text:span text:style-name="T115">EXIT_FAILURE</text:span>;</text:p>
      <text:p text:style-name="P592"><text:span text:style-name="T685">27</text:span><text:span text:style-name="T686"> <text:tab/></text:span><text:span text:style-name="T124">}</text:span></text:p>
      <text:p text:style-name="P585"><text:span text:style-name="T681">28</text:span><text:span text:style-name="T679"> <text:tab/></text:span>fclose(outfile);</text:p>
      <text:p text:style-name="P585"><text:span text:style-name="T681">29</text:span><text:span text:style-name="T679"> <text:tab/></text:span>printf(<text:span text:style-name="T116">"User entry written to %s\n"</text:span>, argv[<text:span text:style-name="T127">1</text:span>]);</text:p>
      <text:p text:style-name="P585"><text:span text:style-name="T679">3</text:span><text:span text:style-name="T681">0</text:span><text:span text:style-name="T679"> <text:tab/></text:span><text:span text:style-name="T115">return</text:span> <text:span text:style-name="T115">EXIT_SUCCESS</text:span>;</text:p>
      <text:p text:style-name="P592"><text:span text:style-name="T686">3</text:span><text:span text:style-name="T685">1</text:span><text:span text:style-name="T686"> </text:span><text:span text:style-name="T124">}</text:span></text:p>
      <text:p text:style-name="Horizontal_20_Line"/>
      <text:p text:style-name="P593">newpentry.c</text:p>
      <text:p text:style-name="P594"/>
      <text:p text:style-name="Standard"><text:span text:style-name="Strong_20_Emphasis"><text:span text:style-name="T220">Line 10.</text:span></text:span><text:span text:style-name="T220"> Opens the output file provided as the first argument in write mode using </text:span><text:span text:style-name="Source_20_Text"><text:span text:style-name="T221">fopen</text:span></text:span></text:p>
      <text:p text:style-name="Standard"><text:span text:style-name="Strong_20_Emphasis"><text:span text:style-name="T220">Line 15–22.</text:span></text:span><text:span text:style-name="T220"> Declares a </text:span><text:span text:style-name="Source_20_Text"><text:span text:style-name="T221">passwd</text:span></text:span><text:span text:style-name="T220"> structure and fills its fields using the values passed on the <text:tab/> <text:s/><text:tab/> <text:s text:c="8"/>command line (username, password, UID, GID, GECOS/comment, home directory, <text:tab/> <text:s text:c="9"/>and shell)</text:span></text:p>
      <text:p text:style-name="Standard"><text:span text:style-name="Strong_20_Emphasis"><text:span text:style-name="T220">Line 23.</text:span></text:span><text:span text:style-name="T220"> Writes the user entry into the file stream using </text:span><text:span text:style-name="Source_20_Text"><text:span text:style-name="T221">putpwent</text:span></text:span><text:span text:style-name="T220">, which stores the structure in <text:tab/> <text:s text:c="2"/>the standard </text:span><text:span text:style-name="Source_20_Text"><text:span text:style-name="T221">/etc/passwd</text:span></text:span><text:span text:style-name="T220">-like format</text:span></text:p>
      <text:p text:style-name="P307"/>
      <text:p text:style-name="P595">We execute the program</text:p>
      <text:p text:style-name="P595"/>
      <table:table table:name="Table54" table:style-name="Table54">
        <table:table-column table:style-name="Table54.A"/>
        <table:table-row>
          <table:table-cell table:style-name="Table54.A1" office:value-type="string">
            <text:p text:style-name="P59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87">newpentry ./mypasswd admin x 1005 1005 adminuser /home/admin /bin/zsh </text:span></text:p>
            <text:p text:style-name="P596">User entry written to ./mypasswd</text:p>
            <text:p text:style-name="P596"/>
            <text:p text:style-name="Standard"><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87">cat ./mypasswd</text:span></text:p>
            <text:p text:style-name="P596">admin:x:1005:1005:adminuser:/home/admin:/bin/zsh</text:p>
          </table:table-cell>
        </table:table-row>
      </table:table>
      <text:p text:style-name="P201"/>
      <text:p text:style-name="P201">The program successfully creates a new file and writes a user entry in <text:span text:style-name="Source_20_Text"><text:span text:style-name="T75">/etc/passwd</text:span></text:span> format using <text:span text:style-name="Source_20_Text"><text:span text:style-name="T75">putpwent</text:span></text:span>. The output confirms that all fields provided on the command line are correctly stored in the record, and the entry is formatted with colon-separated values.</text:p>
      <text:p text:style-name="P201"/>
      <text:p text:style-name="P201"><text:soft-page-break/>When attempting to write directly to <text:span text:style-name="Source_20_Text"><text:span text:style-name="T75">/etc/passwd</text:span></text:span>, the program fails with <text:span text:style-name="Source_20_Text"><text:span text:style-name="T75">fopen:</text:span></text:span><text:span text:style-name="Source_20_Text"> </text:span><text:span text:style-name="Source_20_Text"><text:span text:style-name="T75">Permission denied</text:span></text:span> because this file is a critical system database protected by strict permissions. Only privileged users (typically <text:span text:style-name="Source_20_Text"><text:span text:style-name="T75">root</text:span></text:span>) are allowed to modify it.</text:p>
      <text:p text:style-name="P597"/>
      <table:table table:name="Table53" table:style-name="Table53">
        <table:table-column table:style-name="Table53.A"/>
        <table:table-row>
          <table:table-cell table:style-name="Table53.A1" office:value-type="string">
            <text:p text:style-name="P59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687">newpentry /</text:span><text:span text:style-name="T688">etc/passwd</text:span><text:span text:style-name="T687"> admin x 1005 1005 adminuser /home/admin /bin/zsh </text:span></text:p>
            <text:p text:style-name="P596">fopen: Permission denied</text:p>
          </table:table-cell>
        </table:table-row>
      </table:table>
      <text:p text:style-name="P597"/>
      <text:p text:style-name="P598">If we execute the program with <text:span text:style-name="Source_20_Text"><text:span text:style-name="T75">sudo</text:span></text:span> and pass <text:span text:style-name="Source_20_Text"><text:span text:style-name="T75">/etc/passwd</text:span></text:span> as the output file, the original content of the file will be overwritten and replaced by the new entry only. This happens because the file is opened using the ”<text:span text:style-name="Source_20_Text"><text:span text:style-name="T75">w</text:span></text:span>“ mode, which truncates the file before writing.</text:p>
      <text:p text:style-name="P598">For this reason, when working with critical system files such as <text:span text:style-name="Source_20_Text"><text:span text:style-name="T75">/etc/passwd</text:span></text:span>, it is essential to use caution and keep a backup copy.</text:p>
      <text:p text:style-name="P598"/>
      <text:p text:style-name="P598">We conclude this section by noting that adding an entry to <text:span text:style-name="Source_20_Text"><text:span text:style-name="T75">/etc/passwd</text:span></text:span> does not automatically mean that a new user has been fully created.</text:p>
      <text:p text:style-name="P598">To properly create a new user, a password must be set, and the user must also be assigned to a group. Therefore, the corresponding group must already exist or be created as part of the setup process.</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text:soft-page-break/>III.5 <text:span text:style-name="T22">The </text:span><text:span text:style-name="T689">G</text:span>roup<text:span text:style-name="T689"> </text:span><text:span text:style-name="T22">D</text:span><text:span text:style-name="T689">atabase:</text:span> <text:span text:style-name="T75">/</text:span><text:span text:style-name="T555">etc/group</text:span></text:p>
      <text:p text:style-name="P600"/>
      <text:p text:style-name="P601"><text:span text:style-name="T690">The group database </text:span><text:span text:style-name="Source_20_Text"><text:span text:style-name="T691">/etc/group</text:span></text:span><text:span text:style-name="T690"> maintains a list of all existing groups on the system. The fields that make up each record are defined in the </text:span><text:span text:style-name="Source_20_Text"><text:span text:style-name="T691">grp.h</text:span></text:span><text:span text:style-name="T690"> header file.</text:span></text:p>
      <text:p text:style-name="P600"/>
      <text:p text:style-name="P600"/>
      <text:p text:style-name="P602"><text:span text:style-name="T692">III.5.1 Reading the group database: </text:span><text:span text:style-name="T693">getgrnam</text:span><text:span text:style-name="T692"> and </text:span><text:span text:style-name="T693">getgrgid</text:span></text:p>
      <text:p text:style-name="P600"/>
      <text:p text:style-name="P601"><text:span text:style-name="T694">To </text:span><text:span text:style-name="T695">retrieve</text:span><text:span text:style-name="T690"> an entry from the group file we can use the following functions</text:span><text:span text:style-name="T690"><text:note text:id="ftn55" text:note-class="footnote"><text:note-citation>53</text:note-citation><text:note-body><text:p text:style-name="P250"><text:span text:style-name="T696">See the </text:span><text:span text:style-name="T697">getgrnam(3)</text:span><text:span text:style-name="T698"> manual page</text:span></text:p></text:note-body></text:note></text:span><text:span text:style-name="T690">.</text:span></text:p>
      <text:p text:style-name="P603"/>
      <table:table table:name="Table52" table:style-name="Table52">
        <table:table-column table:style-name="Table52.A"/>
        <table:table-row>
          <table:table-cell table:style-name="Table52.A1" office:value-type="string">
            <text:p text:style-name="P271"><text:span text:style-name="T115">#include </text:span><text:span text:style-name="T116">&lt;sys/types.h&gt;</text:span></text:p>
            <text:p text:style-name="P186"><text:span text:style-name="T115">#include </text:span><text:span text:style-name="T116">&lt;grp.h&gt;</text:span></text:p>
            <text:p text:style-name="P188"/>
            <text:p text:style-name="P229"><text:span text:style-name="T103">struct</text:span><text:span text:style-name="T104"> </text:span><text:span text:style-name="T103">group</text:span><text:span text:style-name="T104"> *</text:span><text:span text:style-name="T105">getgrnam</text:span><text:span text:style-name="T104">(</text:span><text:span text:style-name="T103">const</text:span><text:span text:style-name="T104"> </text:span><text:span text:style-name="T103">char</text:span><text:span text:style-name="T104"> *name);</text:span></text:p>
            <text:p text:style-name="P229"><text:span text:style-name="T103">struct</text:span><text:span text:style-name="T104"> </text:span><text:span text:style-name="T103">group</text:span><text:span text:style-name="T104"> *</text:span><text:span text:style-name="T105">getgrgid</text:span><text:span text:style-name="T104">(</text:span><text:span text:style-name="T103">gid_t</text:span><text:span text:style-name="T104"> gid);</text:span></text:p>
            <text:p text:style-name="P188"/>
            <text:p text:style-name="P229"><text:span text:style-name="T103">int</text:span><text:span text:style-name="T104"> </text:span><text:span text:style-name="T105">getgrnam_r</text:span><text:span text:style-name="T104">(</text:span><text:span text:style-name="T103">const</text:span><text:span text:style-name="T104"> </text:span><text:span text:style-name="T103">char</text:span><text:span text:style-name="T104"> *</text:span><text:span text:style-name="T103">restrict</text:span><text:span text:style-name="T104"> </text:span><text:span text:style-name="T106">name</text:span><text:span text:style-name="T104">, </text:span><text:span text:style-name="T103">struct</text:span><text:span text:style-name="T104"> </text:span><text:span text:style-name="T103">group</text:span><text:span text:style-name="T104"> *</text:span><text:span text:style-name="T103">restrict</text:span><text:span text:style-name="T104"> </text:span><text:span text:style-name="T699">grp</text:span><text:span text:style-name="T104">, </text:span></text:p>
            <text:p text:style-name="P229"><text:span text:style-name="T103"><text:s text:c="15"/>char</text:span><text:span text:style-name="T104"> </text:span><text:span text:style-name="T106">buf[restrict .buflen]</text:span><text:span text:style-name="T104">, </text:span><text:span text:style-name="T103">size_t</text:span><text:span text:style-name="T104"> </text:span><text:span text:style-name="T106">buflen</text:span><text:span text:style-name="T104">, </text:span><text:span text:style-name="T103">struct</text:span><text:span text:style-name="T104"> </text:span><text:span text:style-name="T103">group</text:span><text:span text:style-name="T104"> </text:span></text:p>
            <text:p text:style-name="P604"><text:s text:c="15"/>**<text:span text:style-name="T115">restrict</text:span> <text:span text:style-name="T68">result</text:span>);</text:p>
            <text:p text:style-name="P218"/>
            <text:p text:style-name="P229"><text:span text:style-name="T103">int</text:span><text:span text:style-name="T104"> </text:span><text:span text:style-name="T105">getgrgid_r</text:span><text:span text:style-name="T104">(</text:span><text:span text:style-name="T103">gid_t</text:span><text:span text:style-name="T104"> </text:span><text:span text:style-name="T106">gid</text:span><text:span text:style-name="T104">, </text:span><text:span text:style-name="T103">struct</text:span><text:span text:style-name="T104"> </text:span><text:span text:style-name="T103">group</text:span><text:span text:style-name="T104"> *</text:span><text:span text:style-name="T103">restrict</text:span><text:span text:style-name="T104"> </text:span><text:span text:style-name="T106">grp</text:span><text:span text:style-name="T104">, </text:span><text:span text:style-name="T103">char <text:s text:c="4"/></text:span></text:p>
            <text:p text:style-name="P229"><text:span text:style-name="T103"><text:s text:c="15"/></text:span><text:span text:style-name="T106">buf[restrict .buflen]</text:span><text:span text:style-name="T104">, </text:span><text:span text:style-name="T103">size_t</text:span><text:span text:style-name="T104"> </text:span><text:span text:style-name="T106">buflen</text:span><text:span text:style-name="T104">, </text:span><text:span text:style-name="T103">struct</text:span><text:span text:style-name="T104"> </text:span><text:span text:style-name="T103">group</text:span><text:span text:style-name="T104"> </text:span></text:p>
            <text:p text:style-name="P604"><text:s text:c="15"/>**<text:span text:style-name="T115">restrict</text:span> <text:span text:style-name="T68">result</text:span>);</text:p>
            <text:p text:style-name="P605"/>
            <text:p text:style-name="P606">Return: <text:span text:style-name="T700">a pointer to a group structure, NULL if there is no matching entry, </text:span></text:p>
            <text:p text:style-name="P607"><text:s text:c="8"/>errno is set</text:p>
          </table:table-cell>
        </table:table-row>
      </table:table>
      <text:p text:style-name="P600"/>
      <text:p text:style-name="P608">The <text:span text:style-name="Source_20_Text"><text:span text:style-name="T75">getgrnam</text:span></text:span> function <text:span text:style-name="T701">retrieve the entry in the group database corresponding to the group name and returns a pointer to a structure containing the parsed fields.</text:span></text:p>
      <text:p text:style-name="P608"><text:span text:style-name="T690">The </text:span><text:span text:style-name="Source_20_Text"><text:span text:style-name="T691">getgrgid</text:span></text:span><text:span text:style-name="T690"> function searches the group database for the entry matching the group ID </text:span><text:span text:style-name="Source_20_Text"><text:span text:style-name="T691">gid</text:span></text:span><text:span text:style-name="T690">.</text:span></text:p>
      <text:p text:style-name="P601"><text:span text:style-name="T690">The functions </text:span><text:span text:style-name="Source_20_Text"><text:span text:style-name="T691">getgrnam_r</text:span></text:span><text:span text:style-name="T690"> and </text:span><text:span text:style-name="Source_20_Text"><text:span text:style-name="T691">getgrgid_r</text:span></text:span><text:span text:style-name="T690"> </text:span><text:span text:style-name="T702">are</text:span><text:span text:style-name="T690"> </text:span><text:span text:style-name="T702">the </text:span><text:span text:style-name="T690">reentrant versions of these </text:span><text:span text:style-name="T702">functions</text:span><text:span text:style-name="T690">.</text:span></text:p>
      <text:p text:style-name="P600"/>
      <text:p text:style-name="P601"><text:span text:style-name="T690">The </text:span><text:span text:style-name="Source_20_Text"><text:span text:style-name="T691">group</text:span></text:span><text:span text:style-name="T690"> structure and the </text:span><text:span text:style-name="Source_20_Text"><text:span text:style-name="T691">gid_t</text:span></text:span><text:span text:style-name="T690"> type are defined in the </text:span><text:span text:style-name="Source_20_Text"><text:span text:style-name="T691">grp.h</text:span></text:span><text:span text:style-name="T690"> header file as follows.</text:span></text:p>
      <text:p text:style-name="P609"><text:span text:style-name="T703"/></text:p>
      <table:table table:name="Table55" table:style-name="Table55">
        <table:table-column table:style-name="Table55.A"/>
        <table:table-row>
          <table:table-cell table:style-name="Table55.A1" office:value-type="string">
            <text:p text:style-name="P201"><text:span text:style-name="T103">typedef</text:span><text:span text:style-name="T104"> </text:span><text:span text:style-name="T103">__gid_t</text:span><text:span text:style-name="T104"> gid_t;</text:span></text:p>
            <text:p text:style-name="P204"/>
            <text:p text:style-name="P271"><text:span text:style-name="T115">struct</text:span> group {</text:p>
            <text:p text:style-name="P186"><text:span text:style-name="T115"><text:s text:c="3"/>char</text:span> *gr_name;<text:span text:style-name="T119"> <text:s text:c="3"/>/* group name */ <text:s text:c="2"/></text:span></text:p>
            <text:p text:style-name="P186"><text:span text:style-name="T115"><text:s text:c="3"/>char</text:span> *gr_passwd;<text:span text:style-name="T119"> <text:s/>/* group password */</text:span></text:p>
            <text:p text:style-name="P186"><text:span text:style-name="T115"><text:s text:c="3"/>gid_t</text:span> gr_gid;<text:span text:style-name="T119"> <text:s text:c="4"/>/* group ID */</text:span></text:p>
            <text:p text:style-name="P186"><text:span text:style-name="T115"><text:s text:c="3"/>char</text:span> **gr_mem;<text:span text:style-name="T119"> <text:s text:c="3"/>/* </text:span><text:span text:style-name="T704">A</text:span><text:span text:style-name="T119">rray of pointers to names of group members */</text:span></text:p>
            <text:p text:style-name="P186">};</text:p>
          </table:table-cell>
        </table:table-row>
      </table:table>
      <text:p text:style-name="Standard"/>
      <text:p text:style-name="P601"><text:span text:style-name="T690">Since entries in the group database can have different sizes, we must allocate an appropriately sized buffer </text:span><text:span text:style-name="Source_20_Text"><text:span text:style-name="T691">buf</text:span></text:span><text:span text:style-name="T690">. An initial size can be obtained using:</text:span></text:p>
      <text:p text:style-name="P610"/>
      <text:p text:style-name="Standard"><text:span text:style-name="T705"><text:tab/></text:span><text:span text:style-name="T706">sysconf</text:span><text:span text:style-name="T707">(</text:span><text:span text:style-name="T708">_SC_GETGR_R_SIZE_MAX</text:span><text:span text:style-name="T707">);</text:span></text:p>
      <text:p text:style-name="Standard"/>
      <text:p text:style-name="P611"/>
      <text:p text:style-name="P602"><text:soft-page-break/><text:span text:style-name="T692">III.5.2 </text:span><text:span text:style-name="T709">Working with</text:span><text:span text:style-name="T692"> the database: </text:span><text:span text:style-name="T693">getgrent</text:span><text:span text:style-name="T692"> and </text:span><text:span text:style-name="T693">setgrent</text:span></text:p>
      <text:p text:style-name="P611"/>
      <text:p text:style-name="P612"><text:span text:style-name="T702">T</text:span><text:span text:style-name="T710">he </text:span><text:span text:style-name="Source_20_Text"><text:span text:style-name="T603">setgrent</text:span></text:span><text:span text:style-name="T702"> and </text:span><text:span text:style-name="Source_20_Text"><text:span text:style-name="T603">endgrent</text:span></text:span><text:span text:style-name="T710"> functions</text:span><text:span text:style-name="T710"><text:note text:id="ftn56" text:note-class="footnote"><text:note-citation>54</text:note-citation><text:note-body><text:p text:style-name="P613"><text:span text:style-name="T711">See the </text:span><text:span text:style-name="T712">getgrent(3)</text:span><text:span text:style-name="T713"> manual page</text:span></text:p></text:note-body></text:note></text:span><text:span text:style-name="T710"> </text:span><text:span text:style-name="T702">are used </text:span><text:span text:style-name="T710">to iterate through </text:span><text:span text:style-name="T702">the </text:span><text:span text:style-name="T710">entries in the </text:span><text:span text:style-name="Source_20_Text"><text:span text:style-name="T603">/etc/group</text:span></text:span><text:span text:style-name="T710"> file.</text:span></text:p>
      <text:p text:style-name="P611"/>
      <table:table table:name="Table56" table:style-name="Table56">
        <table:table-column table:style-name="Table56.A"/>
        <table:table-row>
          <table:table-cell table:style-name="Table56.A1" office:value-type="string">
            <text:p text:style-name="P271"><text:span text:style-name="T115">#include </text:span><text:span text:style-name="T116">&lt;sys/types.h&gt;</text:span></text:p>
            <text:p text:style-name="P186"><text:span text:style-name="T115">#include </text:span><text:span text:style-name="T116">&lt;grp.h&gt;</text:span></text:p>
            <text:p text:style-name="P188"/>
            <text:p text:style-name="P229"><text:span text:style-name="T103">struct</text:span><text:span text:style-name="T104"> </text:span><text:span text:style-name="T103">group</text:span><text:span text:style-name="T104"> *</text:span><text:span text:style-name="T105">getgrent</text:span><text:span text:style-name="T104">(</text:span><text:span text:style-name="T103">void</text:span><text:span text:style-name="T104">);</text:span></text:p>
            <text:p text:style-name="P188"/>
            <text:p text:style-name="P186"><text:span text:style-name="T115">void</text:span> <text:span text:style-name="T126">setgrent</text:span>(<text:span text:style-name="T115">void</text:span>);</text:p>
            <text:p text:style-name="P228"><text:span text:style-name="T101">void</text:span><text:span text:style-name="T124"> </text:span><text:span text:style-name="T216">endgrent</text:span><text:span text:style-name="T124">(</text:span><text:span text:style-name="T101">void</text:span><text:span text:style-name="T124">);</text:span></text:p>
          </table:table-cell>
        </table:table-row>
      </table:table>
      <text:p text:style-name="P611"/>
      <text:p text:style-name="P612"><text:span text:style-name="T710">They work in the same way as the functions used for the user database. The same applies to the </text:span><text:span text:style-name="Source_20_Text"><text:span text:style-name="T603">getgrent_r</text:span></text:span><text:span text:style-name="T710"> and </text:span><text:span text:style-name="Source_20_Text"><text:span text:style-name="T603">fgetgrent_r</text:span></text:span><text:span text:style-name="Source_20_Text"><text:span text:style-name="T710"><text:note text:id="ftn57" text:note-class="footnote"><text:note-citation>55</text:note-citation><text:note-body><text:p text:style-name="P613"><text:span text:style-name="T714">See the </text:span><text:span text:style-name="T715">fgetgrent(3)</text:span><text:span text:style-name="T714"> and </text:span><text:span text:style-name="T716">getgrent_r(3)</text:span><text:span text:style-name="T711"> manual page</text:span><text:span text:style-name="T717">s</text:span></text:p></text:note-body></text:note></text:span></text:span><text:span text:style-name="T710"> functions as well.</text:span></text:p>
      <text:p text:style-name="P614"/>
      <table:table table:name="Table57" table:style-name="Table57">
        <table:table-column table:style-name="Table57.A"/>
        <table:table-row>
          <table:table-cell table:style-name="Table57.A1" office:value-type="string">
            <text:p text:style-name="P271"><text:span text:style-name="T115">#include </text:span><text:span text:style-name="T116">&lt;stdio.h&gt;</text:span></text:p>
            <text:p text:style-name="P186"><text:span text:style-name="T115">#include </text:span><text:span text:style-name="T116">&lt;sys/types.h&gt;</text:span></text:p>
            <text:p text:style-name="P186"><text:span text:style-name="T115">#include </text:span><text:span text:style-name="T116">&lt;grp.h&gt;</text:span></text:p>
            <text:p text:style-name="P188"/>
            <text:p text:style-name="P615"><text:span text:style-name="T103">struct</text:span><text:span text:style-name="T104"> </text:span><text:span text:style-name="T103">group</text:span><text:span text:style-name="T104"> *</text:span><text:span text:style-name="T105">fgetgrent</text:span><text:span text:style-name="T104">(</text:span><text:span text:style-name="T103">FILE</text:span><text:span text:style-name="T104"> </text:span><text:span text:style-name="T106">*stream</text:span><text:span text:style-name="T104">);</text:span></text:p>
            <text:p text:style-name="P186"/>
            <text:p text:style-name="P186"><text:span text:style-name="T115">#include </text:span><text:span text:style-name="T116">&lt;grp.h&gt;</text:span></text:p>
            <text:p text:style-name="P188"/>
            <text:p text:style-name="P615"><text:span text:style-name="T103">int</text:span><text:span text:style-name="T104"> </text:span><text:span text:style-name="T105">getgrent_r</text:span><text:span text:style-name="T104">(</text:span><text:span text:style-name="T103">struct</text:span><text:span text:style-name="T104"> </text:span><text:span text:style-name="T103">group</text:span><text:span text:style-name="T104"> *</text:span><text:span text:style-name="T103">restrict</text:span><text:span text:style-name="T104"> </text:span><text:span text:style-name="T106">gbuf</text:span><text:span text:style-name="T104">,</text:span><text:span text:style-name="T718"> </text:span><text:span text:style-name="T103">char</text:span><text:span text:style-name="T104"> </text:span><text:span text:style-name="T106">buf[restrict .buflen]</text:span><text:span text:style-name="T104">, </text:span></text:p>
            <text:p text:style-name="P615"><text:span text:style-name="T103"><text:s text:c="15"/>size_t</text:span><text:span text:style-name="T104"> </text:span><text:span text:style-name="T106">buflen</text:span><text:span text:style-name="T104">, </text:span><text:span text:style-name="T103">struct</text:span><text:span text:style-name="T104"> </text:span><text:span text:style-name="T103">group</text:span><text:span text:style-name="T104"> **</text:span><text:span text:style-name="T103">restrict</text:span><text:span text:style-name="T104"> </text:span><text:span text:style-name="T106">gbufp</text:span><text:span text:style-name="T104">);</text:span></text:p>
            <text:p text:style-name="P615"><text:span text:style-name="T103">int</text:span><text:span text:style-name="T104"> </text:span><text:span text:style-name="T105">fgetgrent_r</text:span><text:span text:style-name="T104">(</text:span><text:span text:style-name="T103">FILE</text:span><text:span text:style-name="T104"> *</text:span><text:span text:style-name="T103">restrict</text:span><text:span text:style-name="T104"> </text:span><text:span text:style-name="T106">stream</text:span><text:span text:style-name="T104">, </text:span><text:span text:style-name="T103">struct</text:span><text:span text:style-name="T104"> </text:span><text:span text:style-name="T103">group</text:span><text:span text:style-name="T104"> *</text:span><text:span text:style-name="T103">restrict</text:span><text:span text:style-name="T104"> </text:span><text:span text:style-name="T106">gbuf</text:span><text:span text:style-name="T104">, </text:span><text:span text:style-name="T103">char</text:span><text:span text:style-name="T104"> </text:span></text:p>
            <text:p text:style-name="P615"><text:span text:style-name="T104"><text:s text:c="16"/></text:span><text:span text:style-name="T106">buf[restrict .buflen]</text:span><text:span text:style-name="T104">, </text:span><text:span text:style-name="T103">size_t </text:span><text:span text:style-name="T106">buflen</text:span><text:span text:style-name="T104">, </text:span><text:span text:style-name="T103">struct</text:span><text:span text:style-name="T104"> </text:span><text:span text:style-name="T103">group</text:span><text:span text:style-name="T104"> </text:span></text:p>
            <text:p text:style-name="P616"><text:s text:c="16"/>**<text:span text:style-name="T115">restrict</text:span> <text:span text:style-name="T68">gbufp</text:span>);</text:p>
            <text:p text:style-name="P616"/>
            <text:p text:style-name="P617"><text:span text:style-name="T719">Return: on success </text:span>0 and *gbufp is a pointer to the struct group, <text:span text:style-name="T719">o</text:span>n error <text:span text:style-name="T719">the </text:span></text:p>
            <text:p text:style-name="P618"><text:s text:c="8"/>error value and *gbufp is NULL</text:p>
          </table:table-cell>
        </table:table-row>
      </table:table>
      <text:p text:style-name="P619"/>
      <text:p text:style-name="P620"><text:span text:style-name="T720">The </text:span><text:span text:style-name="T603">putgrent</text:span><text:span text:style-name="T603"><text:note text:id="ftn58" text:note-class="footnote"><text:note-citation>56</text:note-citation><text:note-body><text:p text:style-name="P613"><text:span text:style-name="T721">See the </text:span><text:span text:style-name="T716">putgrent(3)</text:span><text:span text:style-name="T711"> manual page</text:span></text:p></text:note-body></text:note></text:span><text:span text:style-name="T720"> function is used to add an entry in the group file </text:span><text:span text:style-name="T722">and </text:span><text:span text:style-name="T720">is defined as follows. </text:span></text:p>
      <text:p text:style-name="P621"/>
      <table:table table:name="Table58" table:style-name="Table58">
        <table:table-column table:style-name="Table58.A"/>
        <table:table-row>
          <table:table-cell table:style-name="Table58.A1" office:value-type="string">
            <text:p text:style-name="P271"><text:span text:style-name="T115">#define _GNU_SOURCE</text:span><text:span text:style-name="T119"> </text:span></text:p>
            <text:p text:style-name="P186"><text:span text:style-name="T115">#include </text:span><text:span text:style-name="T116">&lt;grp.h&gt;</text:span></text:p>
            <text:p text:style-name="P188"/>
            <text:p text:style-name="P622"><text:span text:style-name="T723">int</text:span><text:span text:style-name="T724"> </text:span><text:span text:style-name="T725">putgrent</text:span><text:span text:style-name="T724">(</text:span><text:span text:style-name="T723">const</text:span><text:span text:style-name="T724"> </text:span><text:span text:style-name="T723">struct</text:span><text:span text:style-name="T724"> </text:span><text:span text:style-name="T723">group</text:span><text:span text:style-name="T724"> *</text:span><text:span text:style-name="T723">restrict</text:span><text:span text:style-name="T724"> </text:span><text:span text:style-name="T726">grp</text:span><text:span text:style-name="T724">, </text:span><text:span text:style-name="T723">FILE</text:span><text:span text:style-name="T724"> *</text:span><text:span text:style-name="T723">restrict</text:span><text:span text:style-name="T724"> </text:span><text:span text:style-name="T726">stream</text:span><text:span text:style-name="T724">);</text:span></text:p>
            <text:p text:style-name="P186"/>
            <text:p text:style-name="P623">Returns: 0 on success, on error nonzero</text:p>
          </table:table-cell>
        </table:table-row>
      </table:table>
      <text:p text:style-name="P621"/>
      <text:p text:style-name="P624"/>
      <text:p text:style-name="P624"/>
      <text:p text:style-name="P624"/>
      <text:p text:style-name="P624"/>
      <text:p text:style-name="P624"/>
      <text:p text:style-name="P625"><text:soft-page-break/><text:span text:style-name="Strong_20_Emphasis"><text:span text:style-name="T720">The </text:span></text:span><text:span text:style-name="Strong_20_Emphasis"><text:span text:style-name="T603">getgroups.c</text:span></text:span><text:span text:style-name="T720"> </text:span><text:span text:style-name="T722">program </text:span><text:span text:style-name="T720">shows an example of how to iterate over the group database using </text:span><text:span text:style-name="Strong_20_Emphasis"><text:span text:style-name="T603">getgrent_r</text:span></text:span><text:span text:style-name="T720">.</text:span></text:p>
      <text:p text:style-name="Horizontal_20_Line"/>
      <text:p text:style-name="P626"><text:span text:style-name="T727">1 </text:span><text:span text:style-name="T115">#define _GNU_SOURCE</text:span></text:p>
      <text:p text:style-name="P186"><text:span text:style-name="T727">2 </text:span><text:span text:style-name="T115">#include </text:span><text:span text:style-name="T116">&lt;grp.h&gt;</text:span></text:p>
      <text:p text:style-name="P626"><text:span text:style-name="T727">3 </text:span><text:span text:style-name="T115">#include </text:span><text:span text:style-name="T116">&lt;stdint.h&gt;</text:span></text:p>
      <text:p text:style-name="P626"><text:span text:style-name="T727">4 </text:span><text:span text:style-name="T115">#include </text:span><text:span text:style-name="T116">&lt;stdio.h&gt;</text:span></text:p>
      <text:p text:style-name="P626"><text:span text:style-name="T727">5 </text:span><text:span text:style-name="T115">#include </text:span><text:span text:style-name="T116">&lt;stdlib.h&gt;</text:span></text:p>
      <text:p text:style-name="P626"><text:span text:style-name="T727">6 </text:span><text:span text:style-name="T115">#define BUFLEN </text:span><text:span text:style-name="T127">4096</text:span></text:p>
      <text:p text:style-name="P188"/>
      <text:p text:style-name="P626"><text:span text:style-name="T727">7 </text:span><text:span text:style-name="T115">int</text:span> main(<text:span text:style-name="T115">void</text:span>)</text:p>
      <text:p text:style-name="P626"><text:span text:style-name="T727">8 </text:span>{</text:p>
      <text:p text:style-name="P627"><text:span text:style-name="T728">9 <text:tab/></text:span><text:span text:style-name="T103">struct</text:span><text:span text:style-name="T104"> </text:span><text:span text:style-name="T103">group</text:span><text:span text:style-name="T104"> grp;</text:span></text:p>
      <text:p text:style-name="P627"><text:span text:style-name="T728">10 <text:tab/></text:span><text:span text:style-name="T103">struct</text:span><text:span text:style-name="T104"> </text:span><text:span text:style-name="T103">group</text:span><text:span text:style-name="T104"> *grpp;</text:span></text:p>
      <text:p text:style-name="P626"><text:span text:style-name="T727">11 <text:tab/></text:span><text:span text:style-name="T115">char</text:span> buf[<text:span text:style-name="T115">BUFLEN</text:span>];</text:p>
      <text:p text:style-name="P626"><text:span text:style-name="T727">12 <text:tab/></text:span><text:span text:style-name="T115">int</text:span> i;</text:p>
      <text:p text:style-name="P188"/>
      <text:p text:style-name="P626"><text:span text:style-name="T727">13 <text:tab/></text:span><text:span text:style-name="T126">setgrent</text:span>();</text:p>
      <text:p text:style-name="P626"><text:span text:style-name="T727">14 <text:tab/></text:span><text:span text:style-name="T115">while</text:span> (<text:span text:style-name="T127">1</text:span>) {</text:p>
      <text:p text:style-name="P626"><text:span text:style-name="T727">15 <text:tab/><text:tab/></text:span>i = <text:span text:style-name="T126">getgrent_r</text:span>(&amp;grp, buf, <text:span text:style-name="T115">sizeof</text:span>(buf), &amp;grpp);</text:p>
      <text:p text:style-name="P626"><text:span text:style-name="T727">16 <text:tab/><text:tab/></text:span><text:span text:style-name="T115">if</text:span> (i)</text:p>
      <text:p text:style-name="P626"><text:span text:style-name="T727">17 <text:tab/><text:tab/><text:tab/></text:span><text:span text:style-name="T115">break</text:span>;</text:p>
      <text:p text:style-name="P626"><text:span text:style-name="T727">18 <text:tab/><text:tab/></text:span>printf(<text:span text:style-name="T116">"%s (%jd):"</text:span>, grpp-&gt;gr_name, (<text:span text:style-name="T115">intmax_t</text:span>) grpp-&gt;gr_gid);</text:p>
      <text:p text:style-name="P626"><text:span text:style-name="T727">19 <text:tab/><text:tab/></text:span><text:span text:style-name="T115">for</text:span> (<text:span text:style-name="T115">size_t</text:span> j = <text:span text:style-name="T127">0</text:span>; ; j++) {</text:p>
      <text:p text:style-name="P626"><text:span text:style-name="T727">20 <text:tab/><text:tab/><text:tab/></text:span><text:span text:style-name="T115">if</text:span> (grpp-&gt;gr_mem[j] == <text:span text:style-name="T115">NULL</text:span>)</text:p>
      <text:p text:style-name="P626"><text:span text:style-name="T727">21 <text:tab/><text:tab/><text:tab/><text:tab/></text:span><text:span text:style-name="T115">break</text:span>;</text:p>
      <text:p text:style-name="P626"><text:span text:style-name="T727">22 <text:tab/><text:tab/><text:tab/></text:span>printf(<text:span text:style-name="T116">" %s"</text:span>, grpp-&gt;gr_mem[j]);</text:p>
      <text:p text:style-name="P626"><text:span text:style-name="T727">23 <text:tab/><text:tab/></text:span>}</text:p>
      <text:p text:style-name="P626"><text:span text:style-name="T727">24 <text:tab/><text:tab/></text:span>printf(<text:span text:style-name="T116">"\n"</text:span>);</text:p>
      <text:p text:style-name="P626"><text:span text:style-name="T727">25 <text:tab/></text:span>}</text:p>
      <text:p text:style-name="P626"><text:span text:style-name="T727">26 <text:tab/></text:span><text:span text:style-name="T126">endgrent</text:span>();</text:p>
      <text:p text:style-name="P626"><text:span text:style-name="T727">27 <text:tab/></text:span>exit(<text:span text:style-name="T115">EXIT_SUCCESS</text:span>);</text:p>
      <text:p text:style-name="P628"><text:span text:style-name="T729">28 </text:span><text:span text:style-name="T124">}</text:span></text:p>
      <text:p text:style-name="Horizontal_20_Line"/>
      <text:p text:style-name="P629"><text:span text:style-name="T90">getgroup</text:span><text:span text:style-name="T730">s</text:span><text:span text:style-name="T90">.c</text:span></text:p>
      <text:p text:style-name="P630"/>
      <text:p text:style-name="Standard"><text:span text:style-name="Strong_20_Emphasis"><text:span text:style-name="T731">Line 13.</text:span></text:span><text:span text:style-name="T731"> Calls </text:span><text:span text:style-name="Source_20_Text"><text:span text:style-name="T221">setgrent</text:span></text:span><text:span text:style-name="T731"> to reset the position to the beginning of the group database</text:span></text:p>
      <text:p text:style-name="Standard"><text:span text:style-name="Strong_20_Emphasis"><text:span text:style-name="T731">Line 14.</text:span></text:span><text:span text:style-name="T731"> Starts an infinite loop used to read all entries from the database</text:span></text:p>
      <text:p text:style-name="Standard"><text:span text:style-name="Strong_20_Emphasis"><text:span text:style-name="T731">Line 15.</text:span></text:span><text:span text:style-name="T731"> Retrieves the next group entry using </text:span><text:span text:style-name="Source_20_Text"><text:span text:style-name="T221">getgrent_r</text:span></text:span><text:span text:style-name="T731">, storing the result in </text:span><text:span text:style-name="Source_20_Text"><text:span text:style-name="T221">grp</text:span></text:span><text:span text:style-name="T731"> and <text:tab/> <text:s text:c="2"/><text:tab/> <text:s text:c="2"/>returning a pointer in </text:span><text:span text:style-name="Source_20_Text"><text:span text:style-name="T221">grpp</text:span></text:span></text:p>
      <text:p text:style-name="Standard"><text:span text:style-name="Strong_20_Emphasis"><text:span text:style-name="T731">Line 16–17.</text:span></text:span><text:span text:style-name="T731"> Checks the return value of </text:span><text:span text:style-name="Source_20_Text"><text:span text:style-name="T221">getgrent_r</text:span></text:span><text:span text:style-name="T731">. If an error occurs or there are no more <text:tab/> <text:s text:c="2"/><text:tab/> <text:s text:c="8"/>entries, the loop is terminated</text:span></text:p>
      <text:p text:style-name="Standard"><text:span text:style-name="Strong_20_Emphasis"><text:span text:style-name="T731">Line 18.</text:span></text:span><text:span text:style-name="T731"> Prints the group name and group ID (</text:span><text:span text:style-name="Source_20_Text"><text:span text:style-name="T731">gid</text:span></text:span><text:span text:style-name="T731">) for the current entry</text:span></text:p>
      <text:p text:style-name="Standard"><text:span text:style-name="Strong_20_Emphasis"><text:span text:style-name="T731">Line 19.</text:span></text:span><text:span text:style-name="T731"> Starts iterating over the list of group members stored in </text:span><text:span text:style-name="Source_20_Text"><text:span text:style-name="T221">gr_mem</text:span></text:span></text:p>
      <text:p text:style-name="Standard"><text:span text:style-name="Strong_20_Emphasis"><text:span text:style-name="T731">Line 20–21.</text:span></text:span><text:span text:style-name="T731"> Checks for the end of the member list (</text:span><text:span text:style-name="Source_20_Text"><text:span text:style-name="T221">NULL</text:span></text:span><text:span text:style-name="T731"> terminator) and exits the loop when no <text:tab/> <text:s text:c="7"/>more members are present</text:span></text:p>
      <text:p text:style-name="Standard"><text:span text:style-name="Strong_20_Emphasis"><text:span text:style-name="T731">Line 22.</text:span></text:span><text:span text:style-name="T731"> Prints each group member name</text:span></text:p>
      <text:p text:style-name="Standard"><text:span text:style-name="Strong_20_Emphasis"><text:span text:style-name="T731">Line 26.</text:span></text:span><text:span text:style-name="T731"> Closes the group database using </text:span><text:span text:style-name="Source_20_Text"><text:span text:style-name="T221">endgrent</text:span></text:span><text:span text:style-name="T731"> and releases associated resources</text:span></text:p>
      <text:p text:style-name="Standard"/>
      <text:p text:style-name="Standard"/>
      <text:p text:style-name="P631"><text:soft-page-break/>We execute the program </text:p>
      <text:p text:style-name="P631"/>
      <table:table table:name="Table59" table:style-name="Table59">
        <table:table-column table:style-name="Table59.A"/>
        <table:table-row>
          <table:table-cell table:style-name="Table59.A1" office:value-type="string">
            <text:p text:style-name="P63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732">getgroups</text:span></text:p>
            <text:p text:style-name="P632">root (0):</text:p>
            <text:p text:style-name="P632">daemon (1):</text:p>
            <text:p text:style-name="P632">bin (2):</text:p>
            <text:p text:style-name="P632">sys (3):</text:p>
            <text:p text:style-name="P632">adm (4): <text:span text:style-name="T732">users</text:span></text:p>
            <text:p text:style-name="P633">...<text:span text:style-name="T733">output...</text:span></text:p>
          </table:table-cell>
        </table:table-row>
      </table:table>
      <text:p text:style-name="P634"/>
      <text:p text:style-name="P625"><text:span text:style-name="T720">The program iterates through the group database (</text:span><text:span text:style-name="Source_20_Text"><text:span text:style-name="T734">/etc/group</text:span></text:span><text:span text:style-name="T720">) and prints </text:span><text:span text:style-name="T722">the</text:span><text:span text:style-name="T720"> group name, group ID (GID), and the list of users belonging to that group.</text:span></text:p>
      <text:p text:style-name="P634">Some groups include members, while others may have an empty member list.</text:p>
      <text:p text:style-name="P635"/>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7"><text:soft-page-break/><text:span text:style-name="T735">III.5.</text:span><text:span text:style-name="T717">3</text:span><text:span text:style-name="T735"> </text:span><text:span text:style-name="T736">Retrieving</text:span><text:span text:style-name="T717"> the group list:</text:span> <text:span text:style-name="T737">get</text:span><text:span text:style-name="T75">grouplist</text:span></text:p>
      <text:p text:style-name="P637"/>
      <text:p text:style-name="P638">The <text:span text:style-name="T75">getgrouplist</text:span><text:note text:id="ftn59" text:note-class="footnote"><text:note-citation>57</text:note-citation><text:note-body><text:p text:style-name="P613"><text:span text:style-name="T738">See the </text:span><text:span text:style-name="T737">getgrouplist(3)</text:span><text:span text:style-name="T739"> manual page</text:span></text:p></text:note-body></text:note> function retrieves the list of groups to which a user belong, <text:span text:style-name="T740">it </text:span>is defined as follows.</text:p>
      <text:p text:style-name="P638"/>
      <table:table table:name="Table62" table:style-name="Table62">
        <table:table-column table:style-name="Table62.A"/>
        <table:table-row>
          <table:table-cell table:style-name="Table62.A1" office:value-type="string">
            <text:p text:style-name="P271"><text:span text:style-name="T115">#include </text:span><text:span text:style-name="T116">&lt;grp.h&gt;</text:span></text:p>
            <text:p text:style-name="P188"/>
            <text:p text:style-name="P639"><text:span text:style-name="T101">int</text:span><text:span text:style-name="T124"> </text:span><text:span text:style-name="T216">getgrouplist</text:span><text:span text:style-name="T124">(</text:span><text:span text:style-name="T101">const</text:span><text:span text:style-name="T124"> </text:span><text:span text:style-name="T101">char</text:span><text:span text:style-name="T124"> </text:span><text:span text:style-name="T741">*user</text:span><text:span text:style-name="T124">, </text:span><text:span text:style-name="T101">gid_t</text:span><text:span text:style-name="T124"> </text:span><text:span text:style-name="T741">group</text:span><text:span text:style-name="T124">, </text:span><text:span text:style-name="T101">gid_t</text:span><text:span text:style-name="T124"> </text:span><text:span text:style-name="T741">*groups</text:span><text:span text:style-name="T124">, </text:span><text:span text:style-name="T101">int</text:span><text:span text:style-name="T124"> </text:span></text:p>
            <text:p text:style-name="P639"><text:span text:style-name="T741"><text:s text:c="17"/>*ngroups</text:span><text:span text:style-name="T124">);</text:span></text:p>
            <text:p text:style-name="P640"/>
            <text:p text:style-name="P641">Returns: If the number of groups of which user is a member is less than or <text:s/></text:p>
            <text:p text:style-name="P641"><text:s text:c="9"/>equal to *ngroups then the value *ngroups is returned, otherwise -1 </text:p>
          </table:table-cell>
        </table:table-row>
      </table:table>
      <text:p text:style-name="P638"/>
      <text:p text:style-name="P642"><text:span text:style-name="T742">The function scans the group database and returns up to </text:span><text:span text:style-name="T743">ngroups</text:span><text:span text:style-name="T742"> to which the user user belong in the </text:span><text:span text:style-name="T743">groups</text:span><text:span text:style-name="T742"> buffer. The </text:span><text:span text:style-name="T743">group</text:span><text:span text:style-name="T742"> argument is usually <text:s/>the group ID of the passed user. If the groups to which the user belong are more than </text:span><text:span text:style-name="T743">ngroups</text:span><text:span text:style-name="T742"> the value of this last one can be used to resize the buffer </text:span><text:span text:style-name="T743">group</text:span><text:span text:style-name="T742"> passed to a further call.</text:span></text:p>
      <text:p text:style-name="P643"/>
      <text:p text:style-name="P644"><text:span text:style-name="T744">The </text:span><text:span text:style-name="T745">getusergroups.c</text:span><text:span text:style-name="T744"> program is taken from the </text:span><text:span text:style-name="T745">getgrouplist(3)</text:span><text:span text:style-name="T744"> manual page.</text:span></text:p>
      <text:p text:style-name="Horizontal_20_Line"/>
      <text:p text:style-name="P186"><text:span text:style-name="T746">1 </text:span><text:span text:style-name="T115">#include </text:span><text:span text:style-name="T116">&lt;errno.h&gt;</text:span></text:p>
      <text:p text:style-name="P645"><text:span text:style-name="T747">2</text:span><text:span text:style-name="T746"> </text:span><text:span text:style-name="T115">#include </text:span><text:span text:style-name="T116">&lt;grp.h&gt;</text:span></text:p>
      <text:p text:style-name="P645"><text:span text:style-name="T747">3</text:span><text:span text:style-name="T746"> </text:span><text:span text:style-name="T115">#include </text:span><text:span text:style-name="T116">&lt;pwd.h&gt;</text:span></text:p>
      <text:p text:style-name="P645"><text:span text:style-name="T747">4</text:span><text:span text:style-name="T746"> </text:span><text:span text:style-name="T115">#include </text:span><text:span text:style-name="T116">&lt;stdio.h&gt;</text:span></text:p>
      <text:p text:style-name="P645"><text:span text:style-name="T747">5</text:span><text:span text:style-name="T746"> </text:span><text:span text:style-name="T115">#include </text:span><text:span text:style-name="T116">&lt;stdlib.h&gt;</text:span></text:p>
      <text:p text:style-name="P188"/>
      <text:p text:style-name="P645"><text:span text:style-name="T747">6</text:span><text:span text:style-name="T746"> </text:span><text:span text:style-name="T115">int</text:span> main(<text:span text:style-name="T115">int</text:span> argc, <text:span text:style-name="T115">char</text:span> *argv<text:span text:style-name="T115">[]</text:span>)</text:p>
      <text:p text:style-name="P645"><text:span text:style-name="T747">7</text:span><text:span text:style-name="T746"> </text:span>{</text:p>
      <text:p text:style-name="P645"><text:span text:style-name="T747">8</text:span><text:span text:style-name="T746"> <text:tab/></text:span><text:span text:style-name="T115">int</text:span> ngroups;</text:p>
      <text:p text:style-name="P645"><text:span text:style-name="T747">9</text:span><text:span text:style-name="T746"> <text:tab/></text:span><text:span text:style-name="T115">gid_t</text:span> *groups;</text:p>
      <text:p text:style-name="P646"><text:span text:style-name="T748">1</text:span><text:span text:style-name="T749">0</text:span><text:span text:style-name="T748"> <text:tab/></text:span><text:span text:style-name="T103">struct</text:span><text:span text:style-name="T104"> </text:span><text:span text:style-name="T103">group</text:span><text:span text:style-name="T104"> *gr;</text:span></text:p>
      <text:p text:style-name="P646"><text:span text:style-name="T748">1</text:span><text:span text:style-name="T749">1</text:span><text:span text:style-name="T748"> <text:tab/></text:span><text:span text:style-name="T103">struct</text:span><text:span text:style-name="T104"> </text:span><text:span text:style-name="T103">passwd</text:span><text:span text:style-name="T104"> *pw;</text:span></text:p>
      <text:p text:style-name="P188"/>
      <text:p text:style-name="P645"><text:span text:style-name="T746">1</text:span><text:span text:style-name="T747">2</text:span><text:span text:style-name="T746"> <text:tab/></text:span><text:span text:style-name="T115">if</text:span> (argc != <text:span text:style-name="T127">3</text:span>) {</text:p>
      <text:p text:style-name="P645"><text:span text:style-name="T746">1</text:span><text:span text:style-name="T747">3</text:span><text:span text:style-name="T746"> <text:tab/><text:tab/></text:span>fprintf(<text:span text:style-name="T115">stderr</text:span>, <text:span text:style-name="T116">"Usage: %s &lt;user&gt; &lt;ngroups&gt;\n"</text:span>, argv[<text:span text:style-name="T127">0</text:span>]);</text:p>
      <text:p text:style-name="P645"><text:span text:style-name="T746">1</text:span><text:span text:style-name="T747">4</text:span><text:span text:style-name="T746"> <text:tab/><text:tab/></text:span>exit(<text:span text:style-name="T115">EXIT_FAILURE</text:span>);</text:p>
      <text:p text:style-name="P645"><text:span text:style-name="T746">1</text:span><text:span text:style-name="T747">5</text:span><text:span text:style-name="T746"> <text:tab/></text:span>}</text:p>
      <text:p text:style-name="P188"/>
      <text:p text:style-name="P647"><text:span text:style-name="T750">1</text:span><text:span text:style-name="T751">6</text:span><text:span text:style-name="T750"> <text:tab/></text:span><text:span text:style-name="T124">ngroups = atoi(argv[</text:span><text:span text:style-name="T335">2</text:span><text:span text:style-name="T124">]);</text:span></text:p>
      <text:p text:style-name="P645"><text:span text:style-name="T746">1</text:span><text:span text:style-name="T747">7</text:span><text:span text:style-name="T746"> <text:tab/></text:span>groups = malloc(<text:span text:style-name="T115">sizeof</text:span>(*groups) * ngroups);</text:p>
      <text:p text:style-name="P645"><text:span text:style-name="T746">1</text:span><text:span text:style-name="T747">8</text:span><text:span text:style-name="T746"> <text:tab/></text:span><text:span text:style-name="T115">if</text:span> (groups == <text:span text:style-name="T115">NULL</text:span>) {</text:p>
      <text:p text:style-name="P645"><text:span text:style-name="T746">1</text:span><text:span text:style-name="T747">9</text:span><text:span text:style-name="T746"> <text:tab/><text:tab/></text:span>perror(<text:span text:style-name="T116">"malloc"</text:span>);</text:p>
      <text:p text:style-name="P645"><text:span text:style-name="T746">2</text:span><text:span text:style-name="T747">0</text:span><text:span text:style-name="T746"> <text:tab/><text:tab/></text:span>exit(<text:span text:style-name="T115">EXIT_FAILURE</text:span>);</text:p>
      <text:p text:style-name="P645"><text:span text:style-name="T746">2</text:span><text:span text:style-name="T747">1</text:span><text:span text:style-name="T746"> <text:tab/></text:span>}</text:p>
      <text:p text:style-name="P188"/>
      <text:p text:style-name="P645"><text:span text:style-name="T746">2</text:span><text:span text:style-name="T747">2</text:span><text:span text:style-name="T746"> <text:tab/></text:span><text:span text:style-name="T115">errno</text:span> = <text:span text:style-name="T127">0</text:span>;</text:p>
      <text:p text:style-name="P645"><text:span text:style-name="T746">2</text:span><text:span text:style-name="T747">3</text:span><text:span text:style-name="T746"> <text:tab/></text:span>pw = <text:span text:style-name="T126">getpwnam</text:span>(argv[<text:span text:style-name="T127">1</text:span>]);</text:p>
      <text:p text:style-name="P645"><text:span text:style-name="T746">2</text:span><text:span text:style-name="T747">4</text:span><text:span text:style-name="T746"> <text:tab/></text:span><text:span text:style-name="T115">if</text:span> (pw == <text:span text:style-name="T115">NULL</text:span>) {</text:p>
      <text:p text:style-name="P645"><text:soft-page-break/><text:span text:style-name="T746">2</text:span><text:span text:style-name="T747">5</text:span><text:span text:style-name="T746"> <text:tab/><text:tab/></text:span><text:span text:style-name="T115">if</text:span> (<text:span text:style-name="T115">errno</text:span>)</text:p>
      <text:p text:style-name="P645"><text:span text:style-name="T746">2</text:span><text:span text:style-name="T747">6 <text:tab/><text:tab/><text:tab/></text:span>perror(<text:span text:style-name="T116">"getpwnam"</text:span>);</text:p>
      <text:p text:style-name="P648"><text:span text:style-name="T746">2</text:span><text:span text:style-name="T747">7</text:span><text:span text:style-name="T746"> <text:tab/><text:tab/></text:span>else</text:p>
      <text:p text:style-name="P645"><text:span text:style-name="T746">2</text:span><text:span text:style-name="T747">8</text:span><text:span text:style-name="T746"> <text:tab/><text:tab/><text:tab/></text:span>fprintf(<text:span text:style-name="T115">stderr</text:span>, <text:span text:style-name="T116">"no such user\n"</text:span>);</text:p>
      <text:p text:style-name="P645"><text:span text:style-name="T746">2</text:span><text:span text:style-name="T747">9</text:span><text:span text:style-name="T746"> <text:tab/><text:tab/></text:span>exit(<text:span text:style-name="T115">EXIT_FAILURE</text:span>);</text:p>
      <text:p text:style-name="P645"><text:span text:style-name="T747">30</text:span><text:span text:style-name="T746"> <text:tab/></text:span>}</text:p>
      <text:p text:style-name="P188"/>
      <text:p text:style-name="P645"><text:span text:style-name="T747">31</text:span><text:span text:style-name="T746"> <text:tab/></text:span><text:span text:style-name="T115">if</text:span> (<text:span text:style-name="T126">getgrouplist</text:span>(argv[<text:span text:style-name="T127">1</text:span>], pw-&gt;pw_gid, groups, &amp;ngroups) == -<text:span text:style-name="T127">1</text:span>) {</text:p>
      <text:p text:style-name="P649"><text:span text:style-name="T747">3</text:span><text:span text:style-name="T746">2 <text:tab/><text:tab/></text:span>fprintf(<text:span text:style-name="T115">stderr</text:span>, <text:span text:style-name="T116">"getgrouplist() returned -1; ngroups = %d\n"</text:span>, </text:p>
      <text:p text:style-name="P649"><text:tab/><text:tab/><text:tab/> <text:s text:c="2"/>ngroups);</text:p>
      <text:p text:style-name="P645"><text:span text:style-name="T747">33</text:span><text:span text:style-name="T746"> <text:tab/><text:tab/></text:span>exit(<text:span text:style-name="T115">EXIT_FAILURE</text:span>);</text:p>
      <text:p text:style-name="P645"><text:span text:style-name="T747">34</text:span><text:span text:style-name="T746"> <text:tab/></text:span>}</text:p>
      <text:p text:style-name="P188"/>
      <text:p text:style-name="P645"><text:span text:style-name="T747">35</text:span><text:span text:style-name="T746"> <text:tab/></text:span>fprintf(<text:span text:style-name="T115">stderr</text:span>, <text:span text:style-name="T116">"ngroups = %d\n"</text:span>, ngroups);</text:p>
      <text:p text:style-name="P645"><text:span text:style-name="T747">36</text:span><text:span text:style-name="T746"> <text:tab/></text:span><text:span text:style-name="T115">for</text:span> (<text:span text:style-name="T115">int</text:span> j = <text:span text:style-name="T127">0</text:span>; j &lt; ngroups; j++) {</text:p>
      <text:p text:style-name="P645"><text:span text:style-name="T747">37</text:span><text:span text:style-name="T746"> <text:tab/><text:tab/></text:span>printf(<text:span text:style-name="T116">"%d"</text:span>, groups[j]);</text:p>
      <text:p text:style-name="P645"><text:span text:style-name="T747">38</text:span><text:span text:style-name="T746"> <text:tab/><text:tab/></text:span>gr = <text:span text:style-name="T126">getgrgid</text:span>(groups[j]);</text:p>
      <text:p text:style-name="P645"><text:span text:style-name="T747">39</text:span><text:span text:style-name="T746"> <text:tab/><text:tab/></text:span><text:span text:style-name="T115">if</text:span> (gr != <text:span text:style-name="T115">NULL</text:span>)</text:p>
      <text:p text:style-name="P645"><text:span text:style-name="T747">40</text:span><text:span text:style-name="T746"> <text:tab/><text:tab/><text:tab/></text:span>printf(<text:span text:style-name="T116">" (%s)"</text:span>, gr-&gt;gr_name);</text:p>
      <text:p text:style-name="P645"><text:span text:style-name="T747">41</text:span><text:span text:style-name="T746"> <text:tab/><text:tab/></text:span>printf(<text:span text:style-name="T116">"\n"</text:span>);</text:p>
      <text:p text:style-name="P647"><text:span text:style-name="T751">42</text:span><text:span text:style-name="T750"> <text:tab/></text:span><text:span text:style-name="T124">}</text:span></text:p>
      <text:p text:style-name="P645"><text:span text:style-name="T747">43</text:span><text:span text:style-name="T746"> <text:tab/></text:span>exit(<text:span text:style-name="T115">EXIT_SUCCESS</text:span>);</text:p>
      <text:p text:style-name="P647"><text:span text:style-name="T751">44</text:span><text:span text:style-name="T750"> </text:span><text:span text:style-name="T124">}</text:span></text:p>
      <text:p text:style-name="Horizontal_20_Line"/>
      <text:p text:style-name="P650">getusergroups.c</text:p>
      <text:p text:style-name="Standard"/>
      <text:p text:style-name="Standard"><text:span text:style-name="Strong_20_Emphasis"><text:span text:style-name="T731">Line 12–16.</text:span></text:span><text:span text:style-name="T731"> Reads the username and the initial number of groups (</text:span><text:span text:style-name="Source_20_Text"><text:span text:style-name="T221">ngroups</text:span></text:span><text:span text:style-name="T731">) from the command-<text:tab/> <text:s text:c="8"/>line arguments and converts the value from string to integer</text:span></text:p>
      <text:p text:style-name="Standard"><text:span text:style-name="Strong_20_Emphasis"><text:span text:style-name="T731">Line 17.</text:span></text:span><text:span text:style-name="T731"> Allocates memory for the </text:span><text:span text:style-name="Source_20_Text"><text:span text:style-name="T221">groups</text:span></text:span><text:span text:style-name="T731"> array, which will store the group IDs (</text:span><text:span text:style-name="Source_20_Text"><text:span text:style-name="T221">gid_t</text:span></text:span><text:span text:style-name="T731">) returned <text:tab/> <text:s text:c="2"/>by </text:span><text:span text:style-name="Source_20_Text"><text:span text:style-name="T221">getgrouplist</text:span></text:span></text:p>
      <text:p text:style-name="Standard"><text:span text:style-name="Strong_20_Emphasis"><text:span text:style-name="T731">Line 23.</text:span></text:span><text:span text:style-name="T731"> Retrieves the user entry from the user database (</text:span><text:span text:style-name="Source_20_Text"><text:span text:style-name="T221">/etc/passwd</text:span></text:span><text:span text:style-name="T731">) using </text:span><text:span text:style-name="Source_20_Text"><text:span text:style-name="T221">getpwnam</text:span></text:span><text:span text:style-name="T731"> in <text:tab/> <text:s text:c="2"/>order to obtain the user’s primary group ID</text:span></text:p>
      <text:p text:style-name="Standard"><text:span text:style-name="Strong_20_Emphasis"><text:span text:style-name="T731">Line 31.</text:span></text:span><text:span text:style-name="T731"> Calls </text:span><text:span text:style-name="Source_20_Text"><text:span text:style-name="T221">getgrouplist</text:span></text:span><text:span text:style-name="T731"> to obtain all supplementary groups associated with the user. If the <text:tab/> <text:s text:c="2"/>call fails, the required number of groups is reported</text:span></text:p>
      <text:p text:style-name="Standard"><text:span text:style-name="Strong_20_Emphasis"><text:span text:style-name="T731">Line 35–42.</text:span></text:span><text:span text:style-name="T731"> Iterates over the resulting list of group IDs and prints each one. For each group ID, <text:tab/> <text:s text:c="7"/></text:span><text:span text:style-name="Source_20_Text"><text:span text:style-name="T221">getgrgid</text:span></text:span><text:span text:style-name="T731"> is used to retrieve the corresponding group name from the group database</text:span></text:p>
      <text:p text:style-name="Standard"/>
      <text:p text:style-name="Standard"><text:span text:style-name="T740">We e</text:span>xecute the program.</text:p>
      <text:p text:style-name="Standard"/>
      <table:table table:name="Table63" table:style-name="Table63">
        <table:table-column table:style-name="Table63.A"/>
        <table:table-row>
          <table:table-cell table:style-name="Table63.A1" office:value-type="string">
            <text:p text:style-name="P65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732">ge</text:span><text:span text:style-name="T752">tusergroups users 5</text:span></text:p>
            <text:p text:style-name="P651">getgrouplist() returned -1; ngroups = 18</text:p>
            <text:p text:style-name="P651"/>
            <text:p text:style-name="P65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732">ge</text:span><text:span text:style-name="T752">tusergroups users </text:span><text:span text:style-name="T753">18</text:span></text:p>
            <text:p text:style-name="P652">ngroups = 18</text:p>
            <text:p text:style-name="P652">1000 (<text:span text:style-name="T754">users</text:span>)</text:p>
            <text:p text:style-name="P652">4 (adm)</text:p>
            <text:p text:style-name="P652">20 (dialout)</text:p>
            <text:p text:style-name="P652">24 (cdrom)</text:p>
            <text:p text:style-name="P653">...<text:span text:style-name="T740">output...</text:span></text:p>
          </table:table-cell>
        </table:table-row>
      </table:table>
      <text:p text:style-name="Standard"/>
      <text:p text:style-name="P654"><text:soft-page-break/><text:span text:style-name="T755">In the first execution, the program fails because the initial value passed for the number of groups is too small to hold all supplementary groups associated with the user. As a result, </text:span><text:span text:style-name="Source_20_Text"><text:span text:style-name="T756">getgrouplist</text:span></text:span><text:span text:style-name="T755"> returns </text:span><text:span text:style-name="Source_20_Text"><text:span text:style-name="T756">-1</text:span></text:span><text:span text:style-name="T755"> and updates </text:span><text:span text:style-name="Source_20_Text"><text:span text:style-name="T756">ngroups</text:span></text:span><text:span text:style-name="T755"> with the required size (18 in this case).</text:span></text:p>
      <text:p text:style-name="P654"><text:span text:style-name="T755">In the second execution, the corrected value (</text:span><text:span text:style-name="Source_20_Text"><text:span text:style-name="T756">18</text:span></text:span><text:span text:style-name="T755">) is used, allowing the function to successfully retrieve the complete list of groups. The program then prints all group IDs along with their corresponding group names obtained via </text:span><text:span text:style-name="Source_20_Text"><text:span text:style-name="T756">getgrgid</text:span></text:span><text:span text:style-name="T755">.</text:span></text:p>
      <text:p text:style-name="P654"><text:span text:style-name="T755">This demonstrates that </text:span><text:span text:style-name="Source_20_Text"><text:span text:style-name="T756">getgrouplist</text:span></text:span><text:span text:style-name="T755"> may require a </text:span><text:span text:style-name="Source_20_Text"><text:span text:style-name="T757">preliminary</text:span></text:span><text:span text:style-name="T755"> call or an initial guess for buffer size, and that the correct size must be used to successfully retrieve all group memberships.</text:span></text:p>
      <text:p text:style-name="P655"><text:span text:style-name="T740">T</text:span>his process could be automated replacing the <text:span text:style-name="T740">following</text:span> lines</text:p>
      <text:p text:style-name="P656"/>
      <text:p text:style-name="P657"><text:span text:style-name="T747">31</text:span><text:span text:style-name="T746"> <text:tab/></text:span><text:span text:style-name="T115">if</text:span> (<text:span text:style-name="T126">getgrouplist</text:span>(argv[<text:span text:style-name="T127">1</text:span>], pw-&gt;pw_gid, groups, &amp;ngroups) == -<text:span text:style-name="T127">1</text:span>) {</text:p>
      <text:p text:style-name="P657"><text:span text:style-name="T747">3</text:span><text:span text:style-name="T746">2 <text:tab/><text:tab/></text:span>fprintf(<text:span text:style-name="T115">stderr</text:span>, <text:span text:style-name="T116">"getgrouplist() returned -1; ngroups = %d\n"</text:span>, </text:p>
      <text:p text:style-name="P657"><text:tab/><text:tab/><text:tab/> <text:s text:c="2"/>ngroups);</text:p>
      <text:p text:style-name="P657"><text:span text:style-name="T747">33</text:span><text:span text:style-name="T746"> <text:tab/><text:tab/></text:span>exit(<text:span text:style-name="T115">EXIT_FAILURE</text:span>);</text:p>
      <text:p text:style-name="P657"><text:span text:style-name="T747">34</text:span><text:span text:style-name="T746"> <text:tab/></text:span>}</text:p>
      <text:p text:style-name="P657"/>
      <text:p text:style-name="P658">with</text:p>
      <text:p text:style-name="P656"/>
      <text:p text:style-name="P659"><text:span text:style-name="T115">if</text:span> (<text:span text:style-name="T126">getgrouplist</text:span>(argv[<text:span text:style-name="T127">1</text:span>], pw-&gt;pw_gid, groups, &amp;ngroups) == -<text:span text:style-name="T127">1</text:span>) {</text:p>
      <text:p text:style-name="P516"><text:tab/><text:span text:style-name="T126">getgrouplist</text:span>(argv[<text:span text:style-name="T127">1</text:span>], pw-&gt;pw_gid, groups, &amp;ngroups);</text:p>
      <text:p text:style-name="P516">}</text:p>
      <text:p text:style-name="P658"/>
      <text:p text:style-name="P660">We execute the program.</text:p>
      <text:p text:style-name="P660"/>
      <table:table table:name="Table79" table:style-name="Table79">
        <table:table-column table:style-name="Table79.A"/>
        <table:table-row>
          <table:table-cell table:style-name="Table79.A1" office:value-type="string">
            <text:p text:style-name="P66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732">ge</text:span><text:span text:style-name="T752">tusergroups users </text:span><text:span text:style-name="T758">5</text:span></text:p>
            <text:p text:style-name="P661">ngroups = 18</text:p>
            <text:p text:style-name="P661">1000 (<text:span text:style-name="T754">users</text:span>)</text:p>
            <text:p text:style-name="P661">4 (adm)</text:p>
            <text:p text:style-name="P661">20 (dialout)</text:p>
            <text:p text:style-name="P661">24 (cdrom)</text:p>
            <text:p text:style-name="P662">...<text:span text:style-name="T740">output...</text:span></text:p>
          </table:table-cell>
        </table:table-row>
      </table:table>
      <text:p text:style-name="P660"/>
      <text:p text:style-name="P654"><text:span text:style-name="T758">After modifying the code, the program automatically handles the case where the initial buffer size for group IDs is too small. If </text:span><text:span text:style-name="Source_20_Text"><text:span text:style-name="T756">getgrouplist</text:span></text:span><text:span text:style-name="T758"> returns </text:span><text:span text:style-name="Source_20_Text"><text:span text:style-name="T756">-1</text:span></text:span><text:span text:style-name="T758">, the function is called again using the updated value of </text:span><text:span text:style-name="Source_20_Text"><text:span text:style-name="T756">ngroups</text:span></text:span><text:span text:style-name="T758">, allowing it to succeed in a single execution.</text:span></text:p>
      <text:p text:style-name="P663">As a result, the program correctly retrieves and prints all groups for the user without requiring a second manual run. </text:p>
      <text:p text:style-name="P660"/>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64"><text:soft-page-break/><text:span text:style-name="T759">III.5.</text:span><text:span text:style-name="T760">4</text:span><text:span text:style-name="T759"> </text:span><text:span text:style-name="T761">Supplementary </text:span><text:span text:style-name="T760">g</text:span><text:span text:style-name="T761">roup</text:span><text:span text:style-name="T760">s:</text:span><text:span text:style-name="T761"> </text:span><text:span text:style-name="T762">getgroups</text:span><text:span text:style-name="T760">, </text:span><text:span text:style-name="T762">setgroups</text:span><text:span text:style-name="T760"> and </text:span><text:span text:style-name="T762">initgroups</text:span></text:p>
      <text:p text:style-name="P658"/>
      <text:p text:style-name="P665"><text:span text:style-name="T763">In the file header </text:span><text:span text:style-name="T764">linux/limits.h</text:span><text:span text:style-name="T763"> is defined the </text:span><text:span text:style-name="T764">NGROUPS_MAX</text:span><text:span text:style-name="T763"> constant </text:span><text:span text:style-name="T765">as follows</text:span></text:p>
      <text:p text:style-name="P666"/>
      <text:p text:style-name="P667"><text:span text:style-name="T763"><text:tab/></text:span><text:span text:style-name="T628">#define NGROUPS_MAX</text:span><text:span text:style-name="T764"> <text:s text:c="3"/></text:span><text:span text:style-name="T766">65536</text:span><text:span text:style-name="T764"><text:tab/></text:span></text:p>
      <text:p text:style-name="P658"/>
      <text:p text:style-name="P668"><text:span text:style-name="T765">This constant</text:span><text:span text:style-name="T763"> specifies the maximum number of </text:span><text:span text:style-name="T767">supplementary groups</text:span><text:span text:style-name="T763"> to which a user can belong.</text:span></text:p>
      <text:p text:style-name="P669"/>
      <text:p text:style-name="P668"><text:span text:style-name="T767">Supplementary groups</text:span><text:span text:style-name="T763"> are the groups a user can join after his primary group. The user can belong to other groups in a way he can have additional permissions without chang</text:span><text:span text:style-name="T768">ing</text:span><text:span text:style-name="T763"> his primary group. </text:span><text:span text:style-name="T769">The same value of this constant is also present in the file </text:span><text:span text:style-name="T764">/proc/sys/kernel/ngroups_max</text:span><text:span text:style-name="T769">.</text:span></text:p>
      <text:p text:style-name="P670"/>
      <text:p text:style-name="P670">To retrieve and set the supplementary groups we can use the following functions<text:note text:id="ftn60" text:note-class="footnote"><text:note-citation>58</text:note-citation><text:note-body><text:p text:style-name="P671">See the <text:span text:style-name="T75">getgroups(2)</text:span> <text:s/>manual page</text:p></text:note-body></text:note>.</text:p>
      <text:p text:style-name="P670"/>
      <table:table table:name="Table64" table:style-name="Table64">
        <table:table-column table:style-name="Table64.A"/>
        <table:table-row>
          <table:table-cell table:style-name="Table64.A1" office:value-type="string">
            <text:p text:style-name="P271"><text:span text:style-name="T115">#include </text:span><text:span text:style-name="T116">&lt;unistd.h&gt;</text:span></text:p>
            <text:p text:style-name="P188"/>
            <text:p text:style-name="P186"><text:span text:style-name="T115">int</text:span> <text:span text:style-name="T126">getgroups</text:span>(<text:span text:style-name="T115">int</text:span> <text:span text:style-name="T68">size</text:span>, <text:span text:style-name="T115">gid_t</text:span> <text:span text:style-name="T68">list</text:span><text:span text:style-name="T770">[]</text:span>);</text:p>
            <text:p text:style-name="P188"/>
            <text:p text:style-name="P229"><text:span text:style-name="T103">#include </text:span><text:span text:style-name="T403">&lt;grp.h&gt;</text:span></text:p>
            <text:p text:style-name="P188"/>
            <text:p text:style-name="P186"><text:span text:style-name="T115">int</text:span> <text:span text:style-name="T126">setgroups</text:span>(<text:span text:style-name="T115">size_t</text:span> <text:span text:style-name="T68">size</text:span>, <text:span text:style-name="T115">const</text:span> <text:span text:style-name="T115">gid_t</text:span> *_Nullable <text:span text:style-name="T68">list</text:span>);</text:p>
            <text:p text:style-name="P605"/>
            <text:p text:style-name="P672"><text:span text:style-name="T771">Return: </text:span><text:span text:style-name="T772">the number supplementary group IDs, on error -1 and errno</text:span></text:p>
            <text:p text:style-name="P673"><text:s text:c="8"/><text:span text:style-name="T773">on success 0, on error -1 and errno</text:span></text:p>
          </table:table-cell>
        </table:table-row>
      </table:table>
      <text:p text:style-name="P670"/>
      <text:p text:style-name="P674"><text:span text:style-name="T774">The </text:span><text:span text:style-name="T775">getgroups</text:span><text:span text:style-name="T774"> function returns the supplementary group IDs of the calling process in </text:span><text:span text:style-name="T775">list</text:span><text:span text:style-name="T774">. The </text:span><text:span text:style-name="T775">size</text:span><text:span text:style-name="T774"> argument is the maximum number of items that can be stored in the buffer </text:span><text:span text:style-name="T775">list</text:span><text:span text:style-name="T774">. </text:span></text:p>
      <text:p text:style-name="P674"><text:span text:style-name="T774">The </text:span><text:span text:style-name="T775">setgroups</text:span><text:span text:style-name="T774"> function sets the supplementary group IDs for the calling process. To drop all the supplementary groups a process can call </text:span></text:p>
      <text:p text:style-name="P675"/>
      <text:p text:style-name="P676"><text:tab/><text:span text:style-name="T126">setgroups</text:span>(0, NULL)</text:p>
      <text:p text:style-name="P675"/>
      <text:p text:style-name="P674"><text:span text:style-name="T774">A process can have up to </text:span><text:span text:style-name="T775">NGROUPS_MAX</text:span><text:span text:style-name="T774"> supplementary group IDs in addition to the effective group ID. <text:s/>The set of supplementary group IDs is inherited from the parent process, and preserved across an </text:span><text:span text:style-name="T775">execve</text:span><text:span text:style-name="T774">.</text:span></text:p>
      <text:p text:style-name="P674"><text:span text:style-name="T776">To </text:span><text:span text:style-name="T765">retrieve</text:span><text:span text:style-name="T776"> t</text:span>he maximum number of supplementary group IDs at run time <text:span text:style-name="T776">we can use:</text:span></text:p>
      <text:p text:style-name="P674"/>
      <text:p text:style-name="P229"><text:span text:style-name="T75"><text:s text:c="11"/></text:span><text:span text:style-name="T604">long</text:span><text:span text:style-name="T75"> ngroups_max;</text:span></text:p>
      <text:p text:style-name="P229"><text:span text:style-name="T75"><text:s text:c="11"/>ngroups_max = </text:span><text:span text:style-name="T777">sysconf</text:span><text:span text:style-name="T75">(</text:span><text:span text:style-name="T604">_SC_NGROUPS_MAX</text:span><text:span text:style-name="T75">);</text:span></text:p>
      <text:p text:style-name="P675"/>
      <text:p text:style-name="P677"><text:span text:style-name="T774">The </text:span><text:span text:style-name="Source_20_Text"><text:span text:style-name="T75">initgroups</text:span></text:span><text:span text:style-name="Source_20_Text"><text:span text:style-name="T778"><text:note text:id="ftn61" text:note-class="footnote"><text:note-citation>59</text:note-citation><text:note-body><text:p text:style-name="P678"><text:span text:style-name="T779">See the </text:span><text:span text:style-name="T780">initgroups(3)</text:span><text:span text:style-name="T781"> manual page</text:span></text:p></text:note-body></text:note></text:span></text:span><text:span text:style-name="T774"> function initializes the supplementary group access list for the calling process by adding all the groups of which the specified user is a member, based on the system group database.</text:span></text:p>
      <text:p text:style-name="P679"/>
      <table:table table:name="Table66" table:style-name="Table66">
        <table:table-column table:style-name="Table66.A"/>
        <table:table-row>
          <table:table-cell table:style-name="Table66.A1" office:value-type="string">
            <text:p text:style-name="P271"><text:span text:style-name="T115">#include </text:span><text:span text:style-name="T116">&lt;sys/types.h&gt;</text:span></text:p>
            <text:p text:style-name="P186"><text:span text:style-name="T115">#include </text:span><text:span text:style-name="T116">&lt;grp.h&gt;</text:span></text:p>
            <text:p text:style-name="P188"/>
            <text:p text:style-name="P186"><text:span text:style-name="T115">int</text:span> <text:span text:style-name="T126">initgroups</text:span>(<text:span text:style-name="T115">const</text:span> <text:span text:style-name="T115">char</text:span> <text:span text:style-name="T68">*user</text:span>, <text:span text:style-name="T115">gid_t</text:span> <text:span text:style-name="T68">group</text:span>);</text:p>
            <text:p text:style-name="P283"><text:soft-page-break/></text:p>
            <text:p text:style-name="P680"><text:s text:c="28"/>Return<text:span text:style-name="T782">s</text:span>: 0 on success, on error -<text:span text:style-name="T782">1 </text:span>and errno</text:p>
          </table:table-cell>
        </table:table-row>
      </table:table>
      <text:p text:style-name="P674"/>
      <text:p text:style-name="P677"><text:span text:style-name="T783">The </text:span><text:span text:style-name="T75">getsetgroups.c</text:span><text:span text:style-name="T783"> program retrieves the groups to which the passed use</text:span><text:span text:style-name="T784">r</text:span><text:span text:style-name="T783"> belongs using the </text:span><text:span text:style-name="T75">getgroup</text:span><text:span text:style-name="T783"> function and replace the retrieved list with the first group. This technique can be used to limit the privileges of the process excluding the groups it does not need. </text:span><text:span text:style-name="T784">The function </text:span><text:span text:style-name="T75">initgroups</text:span><text:span text:style-name="T784"> is used to set the groups as the process’s supplementary groups based on the passed user.</text:span></text:p>
      <text:p text:style-name="Horizontal_20_Line"/>
      <text:p text:style-name="P218"><text:span text:style-name="T785">1 </text:span>#define _GNU_SOURCE</text:p>
      <text:p text:style-name="P681"><text:span text:style-name="T785">2 </text:span><text:span text:style-name="T115">#include </text:span><text:span text:style-name="T116">&lt;stdio.h&gt;</text:span></text:p>
      <text:p text:style-name="P681"><text:span text:style-name="T785">3 </text:span><text:span text:style-name="T115">#include </text:span><text:span text:style-name="T116">&lt;stdlib.h&gt;</text:span></text:p>
      <text:p text:style-name="P681"><text:span text:style-name="T785">4 </text:span><text:span text:style-name="T115">#include </text:span><text:span text:style-name="T116">&lt;unistd.h&gt;</text:span></text:p>
      <text:p text:style-name="P681"><text:span text:style-name="T785">5 </text:span><text:span text:style-name="T115">#include </text:span><text:span text:style-name="T116">&lt;pwd.h&gt;</text:span></text:p>
      <text:p text:style-name="P681"><text:span text:style-name="T785">6 </text:span><text:span text:style-name="T115">#include </text:span><text:span text:style-name="T116">&lt;grp.h&gt;</text:span></text:p>
      <text:p text:style-name="P681"><text:span text:style-name="T785">7 </text:span><text:span text:style-name="T115">#include </text:span><text:span text:style-name="T116">&lt;errno.h&gt;</text:span></text:p>
      <text:p text:style-name="P681"><text:span text:style-name="T785">8 </text:span><text:span text:style-name="T115">#include </text:span><text:span text:style-name="T116">&lt;limits.h&gt;</text:span></text:p>
      <text:p text:style-name="P188"/>
      <text:p text:style-name="P681"><text:span text:style-name="T785">9 </text:span><text:span text:style-name="T115">int</text:span> main(<text:span text:style-name="T115">int</text:span> argc, <text:span text:style-name="T115">char</text:span> *argv<text:span text:style-name="T115">[]</text:span>) {</text:p>
      <text:p text:style-name="P681"><text:span text:style-name="T785">10 <text:tab/></text:span><text:span text:style-name="T115">if</text:span> (argc != <text:span text:style-name="T127">2</text:span>) {</text:p>
      <text:p text:style-name="P681"><text:span text:style-name="T785">11 <text:tab/><text:tab/></text:span>fprintf(<text:span text:style-name="T115">stderr</text:span>, <text:span text:style-name="T116">"Usage: %s &lt;username&gt;\n"</text:span>, argv[<text:span text:style-name="T127">0</text:span>]);</text:p>
      <text:p text:style-name="P681"><text:span text:style-name="T785">12 <text:tab/><text:tab/></text:span>exit(<text:span text:style-name="T115">EXIT_FAILURE</text:span>);</text:p>
      <text:p text:style-name="P681"><text:span text:style-name="T785">13 <text:tab/></text:span>}</text:p>
      <text:p text:style-name="P188"/>
      <text:p text:style-name="P681"><text:span text:style-name="T785">14 <text:tab/></text:span><text:span text:style-name="T115">const</text:span> <text:span text:style-name="T115">char</text:span> *username = argv[<text:span text:style-name="T127">1</text:span>];</text:p>
      <text:p text:style-name="P682"><text:span text:style-name="T786">15 <text:tab/></text:span><text:span text:style-name="T103">struct</text:span><text:span text:style-name="T104"> </text:span><text:span text:style-name="T103">passwd</text:span><text:span text:style-name="T104"> *pw = </text:span><text:span text:style-name="T105">getpwnam</text:span><text:span text:style-name="T104">(username);</text:span></text:p>
      <text:p text:style-name="P681"><text:span text:style-name="T785">16 <text:tab/></text:span><text:span text:style-name="T115">if</text:span> (!pw) {</text:p>
      <text:p text:style-name="P681"><text:span text:style-name="T785">17 <text:tab/><text:tab/></text:span>perror(<text:span text:style-name="T116">"getpwnam"</text:span>);</text:p>
      <text:p text:style-name="P681"><text:span text:style-name="T785">18 <text:tab/><text:tab/></text:span>exit(<text:span text:style-name="T115">EXIT_FAILURE</text:span>);</text:p>
      <text:p text:style-name="P681"><text:span text:style-name="T785">19 <text:tab/></text:span>}</text:p>
      <text:p text:style-name="P188"/>
      <text:p text:style-name="P681"><text:span text:style-name="T785">20 <text:tab/></text:span>printf(<text:span text:style-name="T116">"Initializing group list for user: %s\n"</text:span>, username);</text:p>
      <text:p text:style-name="P681"><text:span text:style-name="T785">21 <text:tab/></text:span><text:span text:style-name="T115">if</text:span> (<text:span text:style-name="T126">initgroups</text:span>(username, pw-&gt;pw_gid) != <text:span text:style-name="T127">0</text:span>) {</text:p>
      <text:p text:style-name="P681"><text:span text:style-name="T785">22 <text:tab/><text:tab/></text:span>perror(<text:span text:style-name="T116">"initgroups"</text:span>);</text:p>
      <text:p text:style-name="P681"><text:span text:style-name="T785">23 <text:tab/><text:tab/></text:span>exit(<text:span text:style-name="T115">EXIT_FAILURE</text:span>);</text:p>
      <text:p text:style-name="P681"><text:span text:style-name="T785">24 <text:tab/></text:span>}</text:p>
      <text:p text:style-name="P434"/>
      <text:p text:style-name="P681"><text:span text:style-name="T785">25 <text:tab/></text:span><text:span text:style-name="T115">gid_t</text:span> groups[<text:span text:style-name="T115">NGROUPS_MAX</text:span>];</text:p>
      <text:p text:style-name="P681"><text:span text:style-name="T785">26 <text:tab/></text:span><text:span text:style-name="T115">int</text:span> ngroups = <text:span text:style-name="T126">getgroups</text:span>(<text:span text:style-name="T115">NGROUPS_MAX</text:span>, groups);</text:p>
      <text:p text:style-name="P681"><text:span text:style-name="T785">27 <text:tab/></text:span><text:span text:style-name="T115">if</text:span> (ngroups == -<text:span text:style-name="T127">1</text:span>) {</text:p>
      <text:p text:style-name="P681"><text:span text:style-name="T785">28 <text:tab/><text:tab/></text:span>perror(<text:span text:style-name="T116">"getgroups"</text:span>);</text:p>
      <text:p text:style-name="P681"><text:span text:style-name="T785">29 <text:tab/><text:tab/></text:span>exit(<text:span text:style-name="T115">EXIT_FAILURE</text:span>);</text:p>
      <text:p text:style-name="P681"><text:span text:style-name="T785">30 <text:tab/></text:span>}</text:p>
      <text:p text:style-name="P188"/>
      <text:p text:style-name="P681"><text:span text:style-name="T785">31 <text:tab/></text:span>printf(<text:span text:style-name="T116">"Supplementary groups (%d):\n"</text:span>, ngroups);</text:p>
      <text:p text:style-name="P681"><text:span text:style-name="T785">32 <text:tab/></text:span><text:span text:style-name="T115">for</text:span> (<text:span text:style-name="T115">int</text:span> i = <text:span text:style-name="T127">0</text:span>; i &lt; ngroups; i++) {</text:p>
      <text:p text:style-name="P683"><text:span text:style-name="T785">33 <text:tab/><text:tab/></text:span>printf(<text:span text:style-name="T116">" [%d] GID: %d - %s\n"</text:span>, i, groups[i], <text:tab/><text:tab/><text:tab/><text:tab/><text:tab/><text:tab/> <text:s/><text:span text:style-name="T126">getgrgid</text:span>(groups[i])-<text:span text:style-name="T785"> </text:span>&gt;gr_name);</text:p>
      <text:p text:style-name="P684"><text:span text:style-name="T787">34 <text:tab/></text:span><text:span text:style-name="T124">}</text:span></text:p>
      <text:p text:style-name="P681"><text:span text:style-name="T785">35 <text:tab/></text:span><text:span text:style-name="T115">if</text:span> (ngroups &gt;= <text:span text:style-name="T127">1</text:span>) {</text:p>
      <text:p text:style-name="P684"><text:soft-page-break/><text:span text:style-name="T787">36 <text:tab/><text:tab/></text:span><text:span text:style-name="T124">printf(</text:span><text:span text:style-name="T102">"Trying to reduce group list to first one only...\n"</text:span><text:span text:style-name="T124">);</text:span></text:p>
      <text:p text:style-name="P681"><text:span text:style-name="T785">37 <text:tab/><text:tab/></text:span><text:span text:style-name="T115">if</text:span> (<text:span text:style-name="T126">setgroups</text:span>(<text:span text:style-name="T127">1</text:span>, &amp;groups[<text:span text:style-name="T127">0</text:span>]) == -<text:span text:style-name="T127">1</text:span>) {</text:p>
      <text:p text:style-name="P681"><text:span text:style-name="T785">38 <text:tab/><text:tab/><text:tab/></text:span>perror(<text:span text:style-name="T116">"setgroups (requires root)"</text:span>);</text:p>
      <text:p text:style-name="P681"><text:span text:style-name="T785">39 <text:tab/><text:tab/></text:span>} <text:span text:style-name="T115">else</text:span> {</text:p>
      <text:p text:style-name="P681"><text:span text:style-name="T785">40 <text:tab/><text:tab/><text:tab/></text:span>printf(<text:span text:style-name="T116">"Successfully set reduced group list.\n"</text:span>);</text:p>
      <text:p text:style-name="P681"><text:span text:style-name="T785">41 <text:tab/><text:tab/><text:tab/></text:span><text:span text:style-name="T115">gid_t</text:span> new_groups[<text:span text:style-name="T115">NGROUPS_MAX</text:span>];</text:p>
      <text:p text:style-name="P681"><text:span text:style-name="T785">42 <text:tab/><text:tab/><text:tab/></text:span><text:span text:style-name="T115">int</text:span> new_ngroups = <text:span text:style-name="T126">getgroups</text:span>(<text:span text:style-name="T115">NGROUPS_MAX</text:span>, new_groups);</text:p>
      <text:p text:style-name="P681"><text:span text:style-name="T785">43 <text:tab/><text:tab/><text:tab/></text:span><text:span text:style-name="T115">if</text:span> (new_ngroups == -<text:span text:style-name="T127">1</text:span>) {</text:p>
      <text:p text:style-name="P681"><text:span text:style-name="T785">44 <text:tab/><text:tab/><text:tab/><text:tab/></text:span>perror(<text:span text:style-name="T116">"getgroups (after setgroups)"</text:span>);</text:p>
      <text:p text:style-name="P681"><text:span text:style-name="T785">45 <text:tab/><text:tab/><text:tab/></text:span>} <text:span text:style-name="T115">else</text:span> {</text:p>
      <text:p text:style-name="P683"><text:span text:style-name="T785">46 <text:tab/><text:tab/><text:tab/><text:tab/></text:span>printf(<text:span text:style-name="T116">"New supplementary group list (%d):\n"</text:span>, </text:p>
      <text:p text:style-name="P683"><text:tab/><text:tab/><text:tab/><text:tab/><text:tab/> <text:s text:c="2"/>new_ngroups);</text:p>
      <text:p text:style-name="P681"><text:span text:style-name="T785">47 <text:tab/><text:tab/><text:tab/><text:tab/></text:span><text:span text:style-name="T115">for</text:span> (<text:span text:style-name="T115">int</text:span> i = <text:span text:style-name="T127">0</text:span>; i &lt; new_ngroups; i++) {</text:p>
      <text:p text:style-name="P683"><text:span text:style-name="T785">48 <text:tab/><text:tab/><text:tab/><text:tab/><text:tab/></text:span>printf(<text:span text:style-name="T116">" [%d] GID: %d - %s\n"</text:span>, i, </text:p>
      <text:p text:style-name="P683"><text:tab/><text:tab/><text:tab/><text:tab/><text:tab/><text:tab/> <text:s/>new_groups[i], </text:p>
      <text:p text:style-name="P683"><text:tab/><text:tab/><text:tab/><text:tab/><text:tab/><text:tab/> <text:s/><text:span text:style-name="T126">getgrgid</text:span>(new_groups[i])-&gt;gr_name);</text:p>
      <text:p text:style-name="P681"><text:span text:style-name="T785">49 <text:tab/><text:tab/><text:tab/><text:tab/></text:span>}</text:p>
      <text:p text:style-name="P681"><text:span text:style-name="T785">50 <text:tab/><text:tab/><text:tab/></text:span>}</text:p>
      <text:p text:style-name="P681"><text:span text:style-name="T785">51 <text:tab/><text:tab/></text:span>}</text:p>
      <text:p text:style-name="P684"><text:span text:style-name="T787">52 <text:tab/></text:span><text:span text:style-name="T124">}</text:span></text:p>
      <text:p text:style-name="P681"><text:span text:style-name="T785">53 <text:tab/></text:span>exit(<text:span text:style-name="T115">EXIT_SUCCESS</text:span>);</text:p>
      <text:p text:style-name="P684"><text:span text:style-name="T787">54 </text:span><text:span text:style-name="T124">}</text:span></text:p>
      <text:p text:style-name="Horizontal_20_Line"/>
      <text:p text:style-name="P685">getsetgroups.c</text:p>
      <text:p text:style-name="P674"/>
      <text:p text:style-name="Standard"><text:span text:style-name="Strong_20_Emphasis"><text:span text:style-name="T220">Line 15.</text:span></text:span><text:span text:style-name="T220"> Retrieves the user entry from the user database using </text:span><text:span text:style-name="Source_20_Text"><text:span text:style-name="T221">getpwnam</text:span></text:span><text:span text:style-name="T220">, in order to obtain the <text:tab/> <text:s text:c="2"/>user’s primary group ID (</text:span><text:span text:style-name="Source_20_Text"><text:span text:style-name="T221">gid</text:span></text:span><text:span text:style-name="T220">)</text:span></text:p>
      <text:p text:style-name="Standard"><text:span text:style-name="Strong_20_Emphasis"><text:span text:style-name="T220">Line 21.</text:span></text:span><text:span text:style-name="T220"> Initializes the supplementary group access list for the specified user using </text:span><text:span text:style-name="Source_20_Text"><text:span text:style-name="T221">initgroups</text:span></text:span><text:span text:style-name="T220">, <text:tab/> <text:s/>which loads all groups the user belongs to</text:span></text:p>
      <text:p text:style-name="Standard"><text:span text:style-name="Strong_20_Emphasis"><text:span text:style-name="T220">Line 26.</text:span></text:span><text:span text:style-name="T220"> Retrieves the current supplementary group list of the process using </text:span><text:span text:style-name="Source_20_Text"><text:span text:style-name="T221">getgroups</text:span></text:span></text:p>
      <text:p text:style-name="Standard"><text:span text:style-name="Strong_20_Emphasis"><text:span text:style-name="T220">Line 32–34.</text:span></text:span><text:span text:style-name="T220"> Iterates over the group list and prints each group ID along with its corresponding <text:tab/> <text:s text:c="2"/><text:tab/> <text:s text:c="7"/>group name obtained via </text:span><text:span text:style-name="Source_20_Text"><text:span text:style-name="T221">getgrgid</text:span></text:span></text:p>
      <text:p text:style-name="Standard"><text:span text:style-name="Strong_20_Emphasis"><text:span text:style-name="T220">Line 37.</text:span></text:span><text:span text:style-name="T220"> Replaces the current supplementary group list with a reduced one containing only the first <text:tab/> <text:s/>group using </text:span><text:span text:style-name="Source_20_Text"><text:span text:style-name="T221">setgroups</text:span></text:span><text:span text:style-name="T220"> (this operation typically requires root privileges)</text:span></text:p>
      <text:p text:style-name="Standard"><text:span text:style-name="Strong_20_Emphasis"><text:span text:style-name="T220">Line 42.</text:span></text:span><text:span text:style-name="T220"> Retrieves the updated group list after modification</text:span></text:p>
      <text:p text:style-name="Standard"><text:span text:style-name="Strong_20_Emphasis"><text:span text:style-name="T220">Line 47–49.</text:span></text:span><text:span text:style-name="T220"> Prints the new (reduced) list of supplementary groups to confirm the effect of <text:tab/> <text:s text:c="3"/><text:tab/> <text:s text:c="7"/></text:span><text:span text:style-name="Source_20_Text"><text:span text:style-name="T221">setgroups</text:span></text:span></text:p>
      <text:p text:style-name="P686"/>
      <text:p text:style-name="P687"><text:span text:style-name="T788">We execute the program </text:span><text:span text:style-name="T789">using</text:span><text:span text:style-name="T790"> </text:span><text:span text:style-name="T791">sudo</text:span></text:p>
      <text:p text:style-name="P688"/>
      <table:table table:name="Table67" table:style-name="Table67">
        <table:table-column table:style-name="Table67.A"/>
        <table:table-row>
          <table:table-cell table:style-name="Table67.A1" office:value-type="string">
            <text:p text:style-name="P689"><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792">sudo </text:span><text:span text:style-name="T80">./</text:span><text:span text:style-name="T793">getsetgroups users</text:span></text:p>
            <text:p text:style-name="P689">Initializing group list for user: <text:span text:style-name="T794">users</text:span></text:p>
            <text:p text:style-name="P689">Supplementary groups (18):</text:p>
            <text:p text:style-name="P689"><text:s text:c="2"/>[0] GID: 4 - adm</text:p>
            <text:p text:style-name="P689"><text:s text:c="2"/>[1] GID: 20 - dialout</text:p>
            <text:p text:style-name="P689"><text:s text:c="2"/>[2] GID: 24 - cdrom</text:p>
            <text:p text:style-name="P689"><text:s text:c="2"/>[3] GID: 25 - floppy</text:p>
            <text:p text:style-name="P689"><text:s text:c="2"/>[4] GID: 27 - sudo</text:p>
            <text:p text:style-name="P689"><text:s text:c="2"/>[5] GID: 29 - audio</text:p>
            <text:p text:style-name="P689"><text:s text:c="2"/>[6] GID: 30 - dip</text:p>
            <text:p text:style-name="P689"><text:soft-page-break/><text:s text:c="2"/>[7] GID: 44 - video</text:p>
            <text:p text:style-name="P689"><text:s text:c="2"/>[8] GID: 46 - plugdev</text:p>
            <text:p text:style-name="P689"><text:s text:c="2"/>[9] GID: 100 - users</text:p>
            <text:p text:style-name="P689"><text:s text:c="2"/>[10] GID: 101 - netdev</text:p>
            <text:p text:style-name="P689"><text:s text:c="2"/>[11] GID: 118 - bluetooth</text:p>
            <text:p text:style-name="P689"><text:s text:c="2"/>[12] GID: 120 - vboxsf</text:p>
            <text:p text:style-name="P689"><text:s text:c="2"/>[13] GID: 124 - lpadmin</text:p>
            <text:p text:style-name="P689"><text:s text:c="2"/>[14] GID: 133 - scanner</text:p>
            <text:p text:style-name="P689"><text:s text:c="2"/>[15] GID: 138 - kaboxer</text:p>
            <text:p text:style-name="P689"><text:s text:c="2"/>[16] GID: 139 - wireshark</text:p>
            <text:p text:style-name="P689"><text:s text:c="2"/>[17] GID: 1000 - <text:span text:style-name="T792">users</text:span></text:p>
            <text:p text:style-name="P689">Trying to reduce group list to the first one only...</text:p>
            <text:p text:style-name="P689">Successfully set reduced group list.</text:p>
            <text:p text:style-name="P689">New supplementary group list (1):</text:p>
            <text:p text:style-name="P689"><text:s text:c="2"/>[0] GID: 4 - adm</text:p>
          </table:table-cell>
        </table:table-row>
      </table:table>
      <text:p text:style-name="P690"/>
      <text:p text:style-name="P691"><text:span text:style-name="T795">When the program is executed with </text:span><text:span text:style-name="Source_20_Text"><text:span text:style-name="T603">sudo</text:span></text:span><text:span text:style-name="T795">, it successfully initializes the supplementary group list for the user using </text:span><text:span text:style-name="Source_20_Text"><text:span text:style-name="T603">initgroups</text:span></text:span><text:span text:style-name="T795"> and retrieves all groups associated with that user. The full list of groups is printed correctly, showing all memberships defined in the system group database.</text:span></text:p>
      <text:p text:style-name="P691"><text:span text:style-name="T795">The program then attempts to reduce the supplementary group list using </text:span><text:span text:style-name="Source_20_Text"><text:span text:style-name="T603">setgroups</text:span></text:span><text:span text:style-name="T795">, which succeeds only because it is executed with root privileges. After the modification, the process retains only the first group (</text:span><text:span text:style-name="Source_20_Text"><text:span text:style-name="T603">adm</text:span></text:span><text:span text:style-name="T795">), and the updated group list confirms the change.</text:span></text:p>
      <text:p text:style-name="P691"><text:span text:style-name="T795">If the program is executed without root privileges, the call to </text:span><text:span text:style-name="Source_20_Text"><text:span text:style-name="T603">setgroups</text:span></text:span><text:span text:style-name="T795"> fails with the error </text:span><text:span text:style-name="Source_20_Text"><text:span text:style-name="T603">EPERM</text:span></text:span><text:span text:style-name="Source_20_Text"><text:span text:style-name="T795"> </text:span></text:span><text:span text:style-name="Source_20_Text"><text:span text:style-name="T796">(Operation not permitted)</text:span></text:span><text:span text:style-name="T796">, </text:span><text:span text:style-name="T795">since modifying the process group list requires elevated permissions.</text:span></text:p>
      <text:p text:style-name="P692"/>
      <text:p text:style-name="P690">The instruction</text:p>
      <text:p text:style-name="P690"/>
      <text:p text:style-name="P693"><text:span text:style-name="T115"><text:tab/>if</text:span> (<text:span text:style-name="T126">initgroups</text:span>(username, pw-&gt;pw_gid) != <text:span text:style-name="T127">0</text:span>) {</text:p>
      <text:p text:style-name="P693"/>
      <text:p text:style-name="P691"><text:span text:style-name="T797">i</text:span><text:span text:style-name="T795">nitializes the process supplementary group</text:span><text:span text:style-name="T797">s</text:span><text:span text:style-name="T795"> list based on the passed user. </text:span><text:span text:style-name="T798">A</text:span><text:span text:style-name="T795">fter this line, the </text:span><text:span text:style-name="T797">supplementary groups of the process will be those of the passed user. If we comment this instruction we will get only one group in the list, the group </text:span><text:span text:style-name="T603">root</text:span><text:span text:style-name="T797">, because we have executed the program as </text:span><text:span text:style-name="T603">root</text:span><text:span text:style-name="T797"> (with </text:span><text:span text:style-name="T603">sudo</text:span><text:span text:style-name="T797">).</text:span></text:p>
      <text:p text:style-name="P694"/>
      <text:p text:style-name="P694">Setting the supplementary group list to a single group, as shown in this example, can be useful for privilege restriction and process isolation. By reducing the number of groups associated with a process, it is possible to limit access to system resources and files that are controlled through group permissions. This technique is often used in security-sensitive contexts where a program needs to drop unnecessary privileges after initialization.</text:p>
      <text:p text:style-name="P694"/>
      <text:p text:style-name="P674"/>
      <text:p text:style-name="P674"/>
      <text:p text:style-name="P674"/>
      <text:p text:style-name="P674"/>
      <text:p text:style-name="P674"/>
      <text:p text:style-name="P674"/>
      <text:p text:style-name="P674"/>
      <text:p text:style-name="P674"/>
      <text:p text:style-name="P674"/>
      <text:p text:style-name="P674"/>
      <text:p text:style-name="P695"><text:soft-page-break/><text:span text:style-name="T799">III.5.</text:span><text:span text:style-name="T760">5</text:span><text:span text:style-name="T799"> </text:span><text:span text:style-name="T800">Real and effective group ID: </text:span><text:span text:style-name="T762">getgid</text:span><text:span text:style-name="T760">, </text:span><text:span text:style-name="T762">getegid</text:span><text:span text:style-name="T760">, </text:span><text:span text:style-name="T762">setgid</text:span><text:span text:style-name="T760">, </text:span><text:span text:style-name="T762">setegid</text:span></text:p>
      <text:p text:style-name="P674"/>
      <text:p text:style-name="P674">To retrieve the group ID and the effective group ID of a process we can use the following functions<text:note text:id="ftn62" text:note-class="footnote"><text:note-citation>60</text:note-citation><text:note-body><text:p text:style-name="P678"><text:span text:style-name="T801">See the </text:span><text:span text:style-name="T780">getgid(2)</text:span><text:span text:style-name="T802"> manual page</text:span></text:p></text:note-body></text:note></text:p>
      <text:p text:style-name="P674"/>
      <table:table table:name="Table65" table:style-name="Table65">
        <table:table-column table:style-name="Table65.A"/>
        <table:table-row>
          <table:table-cell table:style-name="Table65.A1" office:value-type="string">
            <text:p text:style-name="P271"><text:span text:style-name="T115">#include </text:span><text:span text:style-name="T116">&lt;unistd.h&gt;</text:span></text:p>
            <text:p text:style-name="P188"/>
            <text:p text:style-name="P186"><text:span text:style-name="T115">gid_t</text:span> <text:span text:style-name="T126">getgid</text:span>(<text:span text:style-name="T115">void</text:span>);</text:p>
            <text:p text:style-name="P186"><text:span text:style-name="T115">gid_t</text:span> <text:span text:style-name="T126">getegid</text:span>(<text:span text:style-name="T115">void</text:span>);</text:p>
            <text:p text:style-name="P188"/>
            <text:p text:style-name="P696">Return: the real group ID, <text:span text:style-name="T803">t</text:span>he effective group ID</text:p>
          </table:table-cell>
        </table:table-row>
      </table:table>
      <text:p text:style-name="P674"/>
      <text:p text:style-name="P679">These functions return respectively the real group ID and the effective group ID of the calling process.</text:p>
      <text:p text:style-name="P679"/>
      <text:p text:style-name="P697">The <text:span text:style-name="T75">getgid.c</text:span> program shows an example </text:p>
      <text:p text:style-name="Horizontal_20_Line"/>
      <text:p text:style-name="P698"><text:span text:style-name="T804">1 </text:span><text:span text:style-name="T115">#include </text:span><text:span text:style-name="T116">&lt;stdio.h&gt;</text:span></text:p>
      <text:p text:style-name="P699"><text:span text:style-name="T804">1 </text:span><text:span text:style-name="T115">#include </text:span><text:span text:style-name="T116">&lt;stdlib.h&gt;</text:span></text:p>
      <text:p text:style-name="P699"><text:span text:style-name="T804">1 </text:span><text:span text:style-name="T115">#include </text:span><text:span text:style-name="T116">&lt;grp.h&gt;</text:span></text:p>
      <text:p text:style-name="P699"><text:span text:style-name="T804">1 </text:span><text:span text:style-name="T115">#include </text:span><text:span text:style-name="T116">&lt;unistd.h&gt;</text:span></text:p>
      <text:p text:style-name="P188"/>
      <text:p text:style-name="P700"><text:span text:style-name="T805">1 </text:span><text:span text:style-name="T101">int</text:span><text:span text:style-name="T124"> main() {</text:span></text:p>
      <text:p text:style-name="P699"><text:span text:style-name="T804">1 <text:tab/></text:span><text:span text:style-name="T115">gid_t</text:span> rgid, egid;</text:p>
      <text:p text:style-name="P188"/>
      <text:p text:style-name="P699"><text:span text:style-name="T804">1 <text:tab/></text:span>printf(<text:span text:style-name="T116">"\nReal group ID: %d"</text:span>, <text:span text:style-name="T126">getgid</text:span>());</text:p>
      <text:p text:style-name="P700"><text:span text:style-name="T805">1 <text:tab/></text:span><text:span text:style-name="T124">printf(</text:span><text:span text:style-name="T102">"\nEffective group ID: %d"</text:span><text:span text:style-name="T124">, </text:span><text:span text:style-name="T216">getegid</text:span><text:span text:style-name="T124">());</text:span></text:p>
      <text:p text:style-name="P700"><text:span text:style-name="T805">1 <text:tab/></text:span><text:span text:style-name="T124">exit(</text:span><text:span text:style-name="T101">EXIT_SUCCESS</text:span><text:span text:style-name="T124">);</text:span></text:p>
      <text:p text:style-name="P700"><text:span text:style-name="T805">1 </text:span><text:span text:style-name="T124">}</text:span></text:p>
      <text:p text:style-name="Horizontal_20_Line"/>
      <text:p text:style-name="P701">getgid.c</text:p>
      <text:p text:style-name="P702"/>
      <text:p text:style-name="P702">We execute the program </text:p>
      <text:p text:style-name="P702"/>
      <table:table table:name="Table68" table:style-name="Table68">
        <table:table-column table:style-name="Table68.A"/>
        <table:table-row>
          <table:table-cell table:style-name="Table68.A1" office:value-type="string">
            <text:p text:style-name="P703"><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06">getgid</text:span></text:p>
            <text:p text:style-name="P703">Real group ID: 1000</text:p>
            <text:p text:style-name="P703">Effective group ID: 1000 <text:s text:c="5"/></text:p>
            <text:p text:style-name="P703"/>
            <text:p text:style-name="P703"><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06">sudo .</text:span><text:span text:style-name="T80">/</text:span><text:span text:style-name="T806">getgid</text:span></text:p>
            <text:p text:style-name="P703">Real group ID: 0</text:p>
            <text:p text:style-name="P703">Effective group ID: 0 <text:s text:c="15"/></text:p>
          </table:table-cell>
        </table:table-row>
      </table:table>
      <text:p text:style-name="P702"/>
      <text:p text:style-name="P704"><text:span text:style-name="T806">As we can see from the output, when we execute the program with </text:span><text:span text:style-name="T807">sudo</text:span><text:span text:style-name="T806"> we get the value </text:span><text:span text:style-name="T807">0</text:span><text:span text:style-name="T806"> for both GID and EGID. </text:span>To change the effective group ID of a process means to modify the privileges under which that process operates.</text:p>
      <text:p text:style-name="P704"/>
      <text:p text:style-name="P705">To set a new GID we can use the following function<text:note text:id="ftn63" text:note-class="footnote"><text:note-citation>61</text:note-citation><text:note-body><text:p text:style-name="P678"><text:span text:style-name="T808">See the </text:span><text:span text:style-name="T809">setgid(2)</text:span><text:span text:style-name="T810"> </text:span><text:span text:style-name="T808"><text:s/>manual page</text:span></text:p></text:note-body></text:note>.</text:p>
      <text:p text:style-name="P702"><text:soft-page-break/></text:p>
      <table:table table:name="Table69" table:style-name="Table69">
        <table:table-column table:style-name="Table69.A"/>
        <table:table-row>
          <table:table-cell table:style-name="Table69.A1" office:value-type="string">
            <text:p text:style-name="P271"><text:span text:style-name="T115">#include </text:span><text:span text:style-name="T116">&lt;unistd.h&gt;</text:span></text:p>
            <text:p text:style-name="P188"/>
            <text:p text:style-name="P228"><text:span text:style-name="T101">int</text:span><text:span text:style-name="T124"> </text:span><text:span text:style-name="T216">setgid</text:span><text:span text:style-name="T124">(</text:span><text:span text:style-name="T101">gid_t</text:span><text:span text:style-name="T124"> </text:span><text:span text:style-name="T741">gid</text:span><text:span text:style-name="T124">);</text:span></text:p>
            <text:p text:style-name="P186"/>
            <text:p text:style-name="P706"><text:s text:c="28"/>Returns: 0 on success, on error -1 and errno</text:p>
          </table:table-cell>
        </table:table-row>
      </table:table>
      <text:p text:style-name="P702"/>
      <text:p text:style-name="P644"><text:span text:style-name="T811">The </text:span><text:span text:style-name="T812">setgid</text:span><text:span text:style-name="T811"> function sets the effective group ID of the calling process. If the calling process is privileged (has the </text:span><text:span text:style-name="T812">CAP_SETGID</text:span><text:span text:style-name="T811"> capability in its </text:span><text:span text:style-name="T813">user namespace</text:span><text:span text:style-name="T811">), the real GID and </text:span><text:span text:style-name="T813">saved set-group-ID</text:span><text:span text:style-name="T811"> are also set.</text:span></text:p>
      <text:p text:style-name="P707"/>
      <text:p text:style-name="P707">To understand the difference between the <text:span text:style-name="T814">real, effective and saved GID </text:span>we can look at the following table.</text:p>
      <text:p text:style-name="P707"/>
      <table:table table:name="Table70" table:style-name="Table70">
        <table:table-column table:style-name="Table70.A"/>
        <table:table-column table:style-name="Table70.B"/>
        <table:table-row>
          <table:table-cell table:style-name="Table70.A1" office:value-type="string">
            <text:p text:style-name="P708">Real GID</text:p>
          </table:table-cell>
          <table:table-cell table:style-name="Table70.B1" office:value-type="string">
            <text:p text:style-name="P708">Who the user is</text:p>
          </table:table-cell>
        </table:table-row>
        <table:table-row>
          <table:table-cell table:style-name="Table70.A2" office:value-type="string">
            <text:p text:style-name="P708">Effective GID</text:p>
          </table:table-cell>
          <table:table-cell table:style-name="Table70.B2" office:value-type="string">
            <text:p text:style-name="P708">What permission the user has</text:p>
          </table:table-cell>
        </table:table-row>
        <table:table-row>
          <table:table-cell table:style-name="Table70.A2" office:value-type="string">
            <text:p text:style-name="P708">Saved GID</text:p>
          </table:table-cell>
          <table:table-cell table:style-name="Table70.B2" office:value-type="string">
            <text:p text:style-name="P708">To temporarily drop and regain privileges</text:p>
          </table:table-cell>
        </table:table-row>
      </table:table>
      <text:p text:style-name="P707"/>
      <text:p text:style-name="P709"><text:span text:style-name="T815">Tab 1</text:span><text:span text:style-name="T361">2</text:span><text:span text:style-name="T815">.</text:span><text:span text:style-name="T816"> Real, effective and saved GID</text:span></text:p>
      <text:p text:style-name="P710"/>
      <text:p text:style-name="P711"><text:span text:style-name="T817">To change only the effective group ID we can use the </text:span><text:span text:style-name="T812">setegid</text:span><text:span text:style-name="T812"><text:note text:id="ftn64" text:note-class="footnote"><text:note-citation>62</text:note-citation><text:note-body><text:p text:style-name="P678"><text:span text:style-name="T817">See the </text:span><text:span text:style-name="T818">seteuid(2)</text:span><text:span text:style-name="T810"> manual page</text:span></text:p></text:note-body></text:note></text:span><text:span text:style-name="T817"> function.</text:span></text:p>
      <text:p text:style-name="P712"/>
      <table:table table:name="Table71" table:style-name="Table71">
        <table:table-column table:style-name="Table71.A"/>
        <table:table-row>
          <table:table-cell table:style-name="Table71.A1" office:value-type="string">
            <text:p text:style-name="P271"><text:span text:style-name="T115">#include </text:span><text:span text:style-name="T116">&lt;unistd.h&gt;</text:span></text:p>
            <text:p text:style-name="P605"/>
            <text:p text:style-name="P186"><text:span text:style-name="T115">int</text:span> <text:span text:style-name="T126">setegid</text:span>(<text:span text:style-name="T115">gid_t</text:span> <text:span text:style-name="T68">egid</text:span>);</text:p>
            <text:p text:style-name="P605"/>
            <text:p text:style-name="P713"><text:s text:c="28"/>Returns: 0 on success, <text:span text:style-name="T819">on</text:span> error -<text:span text:style-name="T819">1 </text:span>and errno</text:p>
          </table:table-cell>
        </table:table-row>
      </table:table>
      <text:p text:style-name="P712"/>
      <text:p text:style-name="P711"><text:span text:style-name="T820">The</text:span><text:span text:style-name="T817"> </text:span><text:span text:style-name="T812">setegid</text:span><text:span text:style-name="T817"> </text:span><text:span text:style-name="T820">function</text:span><text:span text:style-name="T817"> sets the effective </text:span><text:span text:style-name="T820">group</text:span><text:span text:style-name="T817"> ID of the calling process. Unprivileged processes may only set the effective </text:span><text:span text:style-name="T820">group</text:span><text:span text:style-name="T817"> ID to the real </text:span><text:span text:style-name="T820">group</text:span><text:span text:style-name="T817"> ID, the effective </text:span><text:span text:style-name="T820">group</text:span><text:span text:style-name="T817"> ID or the saved set-</text:span><text:span text:style-name="T820">group</text:span><text:span text:style-name="T817">-ID.</text:span></text:p>
      <text:p text:style-name="P711"/>
      <text:p text:style-name="P644"><text:span text:style-name="T821">The </text:span><text:span text:style-name="T812">setregid</text:span><text:span text:style-name="T812"><text:note text:id="ftn65" text:note-class="footnote"><text:note-citation>63</text:note-citation><text:note-body><text:p text:style-name="P678"><text:span text:style-name="T821">See the </text:span><text:span text:style-name="T822">setreuid(2)</text:span><text:span text:style-name="T810"> manual page</text:span></text:p></text:note-body></text:note></text:span><text:span text:style-name="T821"> function is used to change the real </text:span><text:span text:style-name="T823">and </text:span><text:span text:style-name="T821">effective group ID of the calling process and is defined as follows.</text:span></text:p>
      <text:p text:style-name="P711"/>
      <table:table table:name="Table72" table:style-name="Table72">
        <table:table-column table:style-name="Table72.A"/>
        <table:table-row>
          <table:table-cell table:style-name="Table72.A1" office:value-type="string">
            <text:p text:style-name="P271"><text:span text:style-name="T115">#include </text:span><text:span text:style-name="T116">&lt;unistd.h&gt;</text:span></text:p>
            <text:p text:style-name="P188"/>
            <text:p text:style-name="P186"><text:span text:style-name="T115">int</text:span> <text:span text:style-name="T126">setregid</text:span>(<text:span text:style-name="T115">gid_t</text:span> <text:span text:style-name="T68">rgid</text:span>, <text:span text:style-name="T115">gid_t</text:span> <text:span text:style-name="T68">egid</text:span>);</text:p>
            <text:p text:style-name="P283"/>
            <text:p text:style-name="P714"><text:s text:c="28"/>Returns: 0 on success, on error -<text:span text:style-name="T824">1 </text:span>and errn<text:span text:style-name="T824">o</text:span></text:p>
          </table:table-cell>
        </table:table-row>
      </table:table>
      <text:p text:style-name="P711"/>
      <text:p text:style-name="P711"><text:span text:style-name="T812">setregid</text:span> sets real and effective <text:span text:style-name="T823">group</text:span> IDs of the calling process. <text:span text:style-name="T823">If we pass </text:span>a value of <text:span text:style-name="T812">-1</text:span> for either the real or effective <text:span text:style-name="T823">group</text:span> ID <text:span text:style-name="T823">the group</text:span> ID <text:span text:style-name="T823">is leaved </text:span>unchanged. Unprivileged processes may only set the effective <text:span text:style-name="T823">group</text:span> ID to the real <text:span text:style-name="T823">group</text:span> ID, the effective <text:span text:style-name="T823">group</text:span> ID, or the saved set-<text:span text:style-name="T823">group</text:span>-ID. Unprivileged users may only set the real <text:span text:style-name="T823">group</text:span> ID to the real <text:span text:style-name="T823">group</text:span> ID or the effective <text:span text:style-name="T823">group</text:span> ID. If the real <text:span text:style-name="T823">group</text:span> ID is set (i.e., r<text:span text:style-name="T823">g</text:span>id is not <text:span text:style-name="T812">-1</text:span>) or the effective <text:span text:style-name="T823">group</text:span> ID is set to a value not <text:soft-page-break/>equal to the previous real <text:span text:style-name="T823">group</text:span> ID, the saved set-<text:span text:style-name="T823">group</text:span>-ID will be set to the new effective <text:span text:style-name="T823">group</text:span> ID.</text:p>
      <text:p text:style-name="P711"/>
      <text:p text:style-name="P644"><text:span text:style-name="T825">The </text:span><text:span text:style-name="T812">setresgid</text:span><text:span text:style-name="T812"><text:note text:id="ftn66" text:note-class="footnote"><text:note-citation>64</text:note-citation><text:note-body><text:p text:style-name="P250"><text:span text:style-name="T826">See the </text:span><text:span text:style-name="T827">setresuid(2)</text:span><text:span text:style-name="T828"> manual page</text:span></text:p></text:note-body></text:note></text:span><text:span text:style-name="T825"> function sets the real, effective and </text:span><text:span text:style-name="T829">saved set-group-ID</text:span><text:span text:style-name="T825">.</text:span></text:p>
      <text:p text:style-name="P715"/>
      <table:table table:name="Table77" table:style-name="Table77">
        <table:table-column table:style-name="Table77.A"/>
        <table:table-row>
          <table:table-cell table:style-name="Table77.A1" office:value-type="string">
            <text:p text:style-name="P204">#define _GNU_SOURCE</text:p>
            <text:p text:style-name="P186"><text:span text:style-name="T115">#include </text:span><text:span text:style-name="T116">&lt;unistd.h&gt;</text:span></text:p>
            <text:p text:style-name="P605"/>
            <text:p text:style-name="P186"><text:span text:style-name="T115">int</text:span> <text:span text:style-name="T126">setresgid</text:span>(<text:span text:style-name="T115">gid_t</text:span> <text:span text:style-name="T68">rgid</text:span>, <text:span text:style-name="T115">gid_t</text:span> <text:span text:style-name="T68">egid</text:span>, <text:span text:style-name="T115">gid_t</text:span> <text:span text:style-name="T68">sgid</text:span>);</text:p>
            <text:p text:style-name="P283"/>
            <text:p text:style-name="P716">Returns: 0 on success, on error -<text:span text:style-name="T830">1 </text:span>and errno</text:p>
          </table:table-cell>
        </table:table-row>
      </table:table>
      <text:p text:style-name="P717"/>
      <text:p text:style-name="P718">The following table shows the difference between these functions.</text:p>
      <text:p text:style-name="P719"/>
      <table:table table:name="Table73" table:style-name="Table73">
        <table:table-column table:style-name="Table73.A"/>
        <table:table-column table:style-name="Table73.B"/>
        <table:table-header-rows>
          <table:table-row>
            <table:table-cell table:style-name="Table73.A1" office:value-type="string">
              <text:p text:style-name="P711"><text:span text:style-name="Source_20_Text"><text:span text:style-name="T831">set</text:span></text:span><text:span text:style-name="Source_20_Text"><text:span text:style-name="T832">g</text:span></text:span><text:span text:style-name="Source_20_Text"><text:span text:style-name="T831">id</text:span></text:span></text:p>
            </table:table-cell>
            <table:table-cell table:style-name="Table73.A1" office:value-type="string">
              <text:p text:style-name="P720"><text:span text:style-name="T833">E</text:span>ffective <text:span text:style-name="T833">GID</text:span>, <text:span text:style-name="T833">if process is privileged also real and saved set-group-ID</text:span></text:p>
            </table:table-cell>
          </table:table-row>
        </table:table-header-rows>
        <table:table-row>
          <table:table-cell table:style-name="Table73.A1" office:value-type="string">
            <text:p text:style-name="P711"><text:span text:style-name="Source_20_Text"><text:span text:style-name="T831">sete</text:span></text:span><text:span text:style-name="Source_20_Text"><text:span text:style-name="T832">g</text:span></text:span><text:span text:style-name="Source_20_Text"><text:span text:style-name="T831">id</text:span></text:span></text:p>
          </table:table-cell>
          <table:table-cell table:style-name="Table73.A1" office:value-type="string">
            <text:p text:style-name="P720">Only effective <text:span text:style-name="T833">G</text:span>ID</text:p>
          </table:table-cell>
        </table:table-row>
        <table:table-row>
          <table:table-cell table:style-name="Table73.A1" office:value-type="string">
            <text:p text:style-name="P711"><text:span text:style-name="Source_20_Text"><text:span text:style-name="T831">setregid</text:span></text:span></text:p>
          </table:table-cell>
          <table:table-cell table:style-name="Table73.A1" office:value-type="string">
            <text:p text:style-name="P720">Real <text:span text:style-name="T833">and</text:span> effective <text:span text:style-name="T833">GID</text:span></text:p>
          </table:table-cell>
        </table:table-row>
        <table:table-row>
          <table:table-cell table:style-name="Table73.A1" office:value-type="string">
            <text:p text:style-name="P711"><text:span text:style-name="Source_20_Text"><text:span text:style-name="T831">setre</text:span></text:span><text:span text:style-name="Source_20_Text"><text:span text:style-name="T834">s</text:span></text:span><text:span text:style-name="Source_20_Text"><text:span text:style-name="T831">gid</text:span></text:span></text:p>
          </table:table-cell>
          <table:table-cell table:style-name="Table73.A1" office:value-type="string">
            <text:p text:style-name="P720">Real, effective, saved <text:span text:style-name="T833">set-group-ID</text:span></text:p>
          </table:table-cell>
        </table:table-row>
      </table:table>
      <text:p text:style-name="P719"/>
      <text:p text:style-name="P721"><text:span text:style-name="T815">Tab 1</text:span><text:span text:style-name="T361">3</text:span><text:span text:style-name="T815">.</text:span><text:span text:style-name="T816"> </text:span><text:span text:style-name="Source_20_Text"><text:span text:style-name="T812">setgid</text:span></text:span><text:span text:style-name="T835">, </text:span><text:span text:style-name="Source_20_Text"><text:span text:style-name="T812">setegid</text:span></text:span><text:span text:style-name="T835">, </text:span><text:span text:style-name="Source_20_Text"><text:span text:style-name="T812">setregid</text:span></text:span><text:span text:style-name="Source_20_Text"><text:span text:style-name="T836">,</text:span></text:span><text:span text:style-name="Source_20_Text"><text:span text:style-name="T812">setre</text:span></text:span><text:span text:style-name="Source_20_Text"><text:span text:style-name="T837">s</text:span></text:span><text:span text:style-name="Source_20_Text"><text:span text:style-name="T812">gid</text:span></text:span></text:p>
      <text:p text:style-name="P718"/>
      <text:p text:style-name="P722"><text:span text:style-name="Strong_20_Emphasis"><text:span text:style-name="T838">The</text:span></text:span><text:span text:style-name="Strong_20_Emphasis"><text:span text:style-name="T839"> </text:span></text:span><text:span text:style-name="Strong_20_Emphasis"><text:span text:style-name="T840">setegid.c</text:span></text:span><text:span text:style-name="T835"> </text:span><text:span text:style-name="T841">program </text:span><text:span text:style-name="T835">demonstrates how to change the effective group ID (EGID) of a process at runtime by iterating through the supplementary groups of a user.</text:span></text:p>
      <text:p text:style-name="Horizontal_20_Line"/>
      <text:p text:style-name="P186"><text:span text:style-name="T842">1 </text:span><text:span text:style-name="T115">#include </text:span><text:span text:style-name="T116">&lt;stdio.h&gt;</text:span></text:p>
      <text:p text:style-name="P723"><text:span text:style-name="T842">2 </text:span><text:span text:style-name="T115">#include </text:span><text:span text:style-name="T116">&lt;stdlib.h&gt;</text:span></text:p>
      <text:p text:style-name="P723"><text:span text:style-name="T842">3 </text:span><text:span text:style-name="T115">#include </text:span><text:span text:style-name="T116">&lt;grp.h&gt;</text:span></text:p>
      <text:p text:style-name="P723"><text:span text:style-name="T842">4 </text:span><text:span text:style-name="T115">#include </text:span><text:span text:style-name="T116">&lt;unistd.h&gt;</text:span></text:p>
      <text:p text:style-name="P723"><text:span text:style-name="T842">5 </text:span><text:span text:style-name="T115">#include </text:span><text:span text:style-name="T116">&lt;sys/types.h&gt;</text:span></text:p>
      <text:p text:style-name="P723"><text:span text:style-name="T842">6 </text:span><text:span text:style-name="T115">#include </text:span><text:span text:style-name="T116">&lt;linux/limits.h&gt;</text:span></text:p>
      <text:p text:style-name="P723"><text:span text:style-name="T842">7 </text:span><text:span text:style-name="T115">#include </text:span><text:span text:style-name="T116">&lt;pwd.h&gt;</text:span></text:p>
      <text:p text:style-name="P724"/>
      <text:p text:style-name="P723"><text:span text:style-name="T842">8 </text:span><text:span text:style-name="T115">int</text:span> main(<text:span text:style-name="T115">int</text:span> argc, <text:span text:style-name="T115">char</text:span> *argv<text:span text:style-name="T115">[]</text:span>) {</text:p>
      <text:p text:style-name="P188"/>
      <text:p text:style-name="P723"><text:span text:style-name="T842">9 <text:tab/></text:span><text:span text:style-name="T115">if</text:span> (argc != <text:span text:style-name="T127">2</text:span>) {</text:p>
      <text:p text:style-name="P723"><text:span text:style-name="T842">10 <text:tab/><text:tab/></text:span>printf(<text:span text:style-name="T116">"\nUsage: %s &lt;username&gt;"</text:span>, argv[<text:span text:style-name="T127">0</text:span>]);</text:p>
      <text:p text:style-name="P723"><text:span text:style-name="T842">11 <text:tab/><text:tab/></text:span>exit(<text:span text:style-name="T115">EXIT_FAILURE</text:span>);</text:p>
      <text:p text:style-name="P723"><text:span text:style-name="T842">12 <text:tab/></text:span>}</text:p>
      <text:p text:style-name="P188"/>
      <text:p text:style-name="P723"><text:span text:style-name="T842">13 <text:tab/></text:span><text:span text:style-name="T115">char</text:span> *username = argv[<text:span text:style-name="T127">1</text:span>];</text:p>
      <text:p text:style-name="P723"><text:span text:style-name="T842">14 <text:tab/></text:span><text:span text:style-name="T115">gid_t</text:span> new_gid;</text:p>
      <text:p text:style-name="P725"><text:span text:style-name="T843">15 <text:tab/></text:span><text:span text:style-name="T103">struct</text:span><text:span text:style-name="T104"> </text:span><text:span text:style-name="T103">group</text:span><text:span text:style-name="T104"> *new_group;</text:span></text:p>
      <text:p text:style-name="P723"><text:span text:style-name="T842">16 <text:tab/></text:span><text:span text:style-name="T115">gid_t</text:span> orig_egid = <text:span text:style-name="T126">getegid</text:span>();</text:p>
      <text:p text:style-name="P723"><text:span text:style-name="T842">17 <text:tab/></text:span><text:span text:style-name="T115">gid_t</text:span> groups[<text:span text:style-name="T115">NGROUPS_MAX</text:span>];</text:p>
      <text:p text:style-name="P723"><text:span text:style-name="T842">18 <text:tab/></text:span><text:span text:style-name="T115">int</text:span> i;</text:p>
      <text:p text:style-name="P188"/>
      <text:p text:style-name="P725"><text:span text:style-name="T843">19 <text:tab/></text:span><text:span text:style-name="T103">struct</text:span><text:span text:style-name="T104"> </text:span><text:span text:style-name="T103">passwd</text:span><text:span text:style-name="T104"> *pw = </text:span><text:span text:style-name="T105">getpwnam</text:span><text:span text:style-name="T104">(username);</text:span></text:p>
      <text:p text:style-name="P723"><text:soft-page-break/><text:span text:style-name="T842">20 <text:tab/></text:span><text:span text:style-name="T115">if</text:span> (<text:span text:style-name="T126">initgroups</text:span>(username, pw-&gt;pw_gid) != <text:span text:style-name="T127">0</text:span>) {</text:p>
      <text:p text:style-name="P723"><text:span text:style-name="T842">21 <text:tab/><text:tab/></text:span>perror(<text:span text:style-name="T116">"initgroups"</text:span>);</text:p>
      <text:p text:style-name="P723"><text:span text:style-name="T842">22 <text:tab/><text:tab/></text:span>exit(<text:span text:style-name="T115">EXIT_FAILURE</text:span>);</text:p>
      <text:p text:style-name="P723"><text:span text:style-name="T842">23 <text:tab/></text:span>}</text:p>
      <text:p text:style-name="P723"><text:span text:style-name="T842">24 <text:tab/></text:span><text:span text:style-name="T115">int</text:span> ngroups = <text:span text:style-name="T126">getgroups</text:span>(<text:span text:style-name="T115">NGROUPS_MAX</text:span>, groups);</text:p>
      <text:p text:style-name="P188"/>
      <text:p text:style-name="P723"><text:span text:style-name="T842">25 <text:tab/></text:span>printf(<text:span text:style-name="T116">"Original group: %4u \t %12s \t\t"</text:span>, orig_egid, </text:p>
      <text:p text:style-name="P723"><text:tab/><text:tab/> <text:s/><text:span text:style-name="T126">getgrgid</text:span>(<text:span text:style-name="T844">orig</text:span>_<text:span text:style-name="T844">e</text:span>gid)-&gt;gr_name);</text:p>
      <text:p text:style-name="P188"/>
      <text:p text:style-name="P723"><text:span text:style-name="T842">26 <text:tab/></text:span><text:span text:style-name="T115">for</text:span> (i=<text:span text:style-name="T127">0</text:span>; i &lt; ngroups; i++) {</text:p>
      <text:p text:style-name="P723"><text:span text:style-name="T842">27 <text:tab/><text:tab/></text:span>new_gid = groups[i];</text:p>
      <text:p text:style-name="P723"><text:span text:style-name="T842">28 <text:tab/><text:tab/></text:span>new_group = <text:span text:style-name="T126">getgrgid</text:span>(new_gid);</text:p>
      <text:p text:style-name="P723"><text:span text:style-name="T842">29 <text:tab/><text:tab/></text:span><text:span text:style-name="T115">if</text:span> (setegid(new_gid) != <text:span text:style-name="T127">0</text:span>)</text:p>
      <text:p text:style-name="P723"><text:span text:style-name="T842">30 <text:tab/><text:tab/><text:tab/></text:span>printf(<text:span text:style-name="T116">"\nCannot switch to group %u"</text:span>, new_gid);</text:p>
      <text:p text:style-name="P726"><text:span text:style-name="T842">31 <text:tab/><text:tab/></text:span>else</text:p>
      <text:p text:style-name="P723"><text:span text:style-name="T842">32 <text:tab/><text:tab/><text:tab/></text:span>printf(<text:span text:style-name="T116">"\nSwitched to group: %4u \t %12s \t\tOK"</text:span>, </text:p>
      <text:p text:style-name="P723"><text:tab/><text:tab/><text:tab/><text:tab/> <text:s/>new_gid, new_group-&gt;gr_name);</text:p>
      <text:p text:style-name="P723"><text:span text:style-name="T842">33 <text:tab/></text:span>}</text:p>
      <text:p text:style-name="P188"/>
      <text:p text:style-name="P723"><text:span text:style-name="T842">34 <text:tab/></text:span>printf(<text:span text:style-name="T116">"\n\nRestoring EGID to original (%u)"</text:span>, orig_egid);</text:p>
      <text:p text:style-name="P723"><text:span text:style-name="T842">35 <text:tab/></text:span><text:span text:style-name="T115">if</text:span> (<text:span text:style-name="T126">setegid</text:span>(orig_egid) != <text:span text:style-name="T127">0</text:span>) {</text:p>
      <text:p text:style-name="P723"><text:span text:style-name="T842">36 <text:tab/><text:tab/></text:span>perror(<text:span text:style-name="T116">"setegid (restore)"</text:span>);</text:p>
      <text:p text:style-name="P723"><text:span text:style-name="T842">37 <text:tab/><text:tab/></text:span><text:span text:style-name="T115">return</text:span> <text:span text:style-name="T115">EXIT_FAILURE</text:span>;</text:p>
      <text:p text:style-name="P723"><text:span text:style-name="T842">38 <text:tab/></text:span>} <text:span text:style-name="T115">else</text:span> {</text:p>
      <text:p text:style-name="P723"><text:span text:style-name="T842">39 <text:tab/><text:tab/></text:span>printf(<text:span text:style-name="T116">"\nExit..."</text:span>);</text:p>
      <text:p text:style-name="P727"><text:span text:style-name="T845">40 <text:tab/></text:span><text:span text:style-name="T124">}</text:span></text:p>
      <text:p text:style-name="P723"><text:span text:style-name="T842">41 <text:tab/></text:span>exit(<text:span text:style-name="T115">EXIT_SUCCESS</text:span>);</text:p>
      <text:p text:style-name="P727"><text:span text:style-name="T845">42 </text:span><text:span text:style-name="T124">}</text:span></text:p>
      <text:p text:style-name="Horizontal_20_Line"/>
      <text:p text:style-name="P650">setegid.c</text:p>
      <text:p text:style-name="Standard"/>
      <text:p text:style-name="Standard"><text:span text:style-name="Strong_20_Emphasis"><text:span text:style-name="T220">Line 16.</text:span></text:span><text:span text:style-name="T220"> Retrieves the current effective group ID (EGID) of the process using </text:span><text:span text:style-name="Source_20_Text"><text:span text:style-name="T221">getegid</text:span></text:span></text:p>
      <text:p text:style-name="Standard"><text:span text:style-name="Strong_20_Emphasis"><text:span text:style-name="T220">Line 19.</text:span></text:span><text:span text:style-name="T220"> Retrieves the user entry from the user database (</text:span><text:span text:style-name="Source_20_Text"><text:span text:style-name="T221">/etc/passwd</text:span></text:span><text:span text:style-name="T220">) for the specified <text:tab/> <text:s/><text:tab/> <text:s text:c="2"/>username</text:span></text:p>
      <text:p text:style-name="Standard"><text:span text:style-name="Strong_20_Emphasis"><text:span text:style-name="T220">Line 20.</text:span></text:span><text:span text:style-name="T220"> Initializes the supplementary group list for the user using </text:span><text:span text:style-name="Source_20_Text"><text:span text:style-name="T221">initgroups</text:span></text:span></text:p>
      <text:p text:style-name="Standard"><text:span text:style-name="Strong_20_Emphasis"><text:span text:style-name="T220">Line 24.</text:span></text:span><text:span text:style-name="T220"> Retrieves the list of supplementary groups associated with the user using </text:span><text:span text:style-name="Source_20_Text"><text:span text:style-name="T221">getgroups</text:span></text:span></text:p>
      <text:p text:style-name="Standard"><text:span text:style-name="Strong_20_Emphasis"><text:span text:style-name="T220">Line 25.</text:span></text:span><text:span text:style-name="T220"> Prints the original EGID along with its corresponding group name retrieved from the <text:tab/> <text:s/><text:tab/> <text:s/>group database</text:span></text:p>
      <text:p text:style-name="Standard"><text:span text:style-name="Strong_20_Emphasis"><text:span text:style-name="T220">Line 26.</text:span></text:span><text:span text:style-name="T220"> Iterates over all supplementary groups of the user</text:span></text:p>
      <text:p text:style-name="Standard"><text:span text:style-name="Strong_20_Emphasis"><text:span text:style-name="T220">Line 28.</text:span></text:span><text:span text:style-name="T220"> Retrieves the group record corresponding to the current group ID using </text:span><text:span text:style-name="Source_20_Text"><text:span text:style-name="T221">getgrgid</text:span></text:span></text:p>
      <text:p text:style-name="Standard"><text:span text:style-name="Strong_20_Emphasis"><text:span text:style-name="T220">Line 29.</text:span></text:span><text:span text:style-name="T220"> Changes the effective group ID of the process to the selected group using </text:span><text:span text:style-name="Source_20_Text"><text:span text:style-name="T221">setegid</text:span></text:span></text:p>
      <text:p text:style-name="Standard"><text:span text:style-name="Strong_20_Emphasis"><text:span text:style-name="T220">Line 35.</text:span></text:span><text:span text:style-name="T220"> Restores the original effective group ID after testing all group switches</text:span></text:p>
      <text:p text:style-name="P728"/>
      <text:p text:style-name="P729">We execute the program passing different user<text:span text:style-name="T803">s. </text:span></text:p>
      <text:p text:style-name="P729"/>
      <table:table table:name="Table78" table:style-name="Table78">
        <table:table-column table:style-name="Table78.A"/>
        <table:table-row>
          <table:table-cell table:style-name="Table78.A1" office:value-type="string">
            <text:p text:style-name="P730"><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46">sudo ./getegid newuser</text:span></text:p>
            <text:p text:style-name="P730">Original group: <text:s text:c="6"/>0 <text:s text:c="17"/>root </text:p>
            <text:p text:style-name="P730">Switched to group: 1002 <text:s text:c="14"/>newuser <text:s text:c="10"/>OK</text:p>
            <text:p text:style-name="P730"/>
            <text:p text:style-name="P730">Restoring EGID to original (0)</text:p>
            <text:p text:style-name="P730"><text:soft-page-break/>Exit... <text:s text:c="18"/></text:p>
            <text:p text:style-name="P730"/>
            <text:p text:style-name="P73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46">sudo ./getegid </text:span><text:span text:style-name="T847">root</text:span></text:p>
            <text:p text:style-name="P731">Original group: <text:s text:c="6"/>0 <text:s text:c="17"/>root </text:p>
            <text:p text:style-name="P731">Switched to group: <text:s text:c="3"/>0 <text:s text:c="17"/>root <text:s text:c="10"/>OK</text:p>
            <text:p text:style-name="P731"/>
            <text:p text:style-name="P731">Restoring EGID to original (0)</text:p>
            <text:p text:style-name="P731">Exit... <text:s text:c="13"/></text:p>
            <text:p text:style-name="P731"/>
            <text:p text:style-name="P73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46">sudo ./getegid </text:span><text:span text:style-name="T847">users</text:span></text:p>
            <text:p text:style-name="P731">Original group: <text:s text:c="9"/>0 <text:s text:c="17"/>root </text:p>
            <text:p text:style-name="P731">Switched to group: <text:s text:c="3"/>4 <text:s text:c="18"/>adm <text:s text:c="10"/>OK</text:p>
            <text:p text:style-name="P731">Switched to group: <text:s text:c="2"/>20 <text:s text:c="14"/>dialout <text:s text:c="9"/>OK</text:p>
            <text:p text:style-name="P731">Switched to group: <text:s text:c="2"/>24 <text:s text:c="16"/>cdrom <text:s text:c="8"/>OK</text:p>
            <text:p text:style-name="P731">Switched to group: <text:s text:c="2"/>25 <text:s text:c="15"/>floppy <text:s text:c="9"/>OK</text:p>
            <text:p text:style-name="P731">Switched to group: <text:s text:c="2"/>27 <text:s text:c="17"/>sudo <text:s text:c="10"/>OK</text:p>
            <text:p text:style-name="P731">Switched to group: <text:s text:c="2"/>29 <text:s text:c="16"/>audio <text:s text:c="10"/>OK</text:p>
            <text:p text:style-name="P731">Switched to group: <text:s text:c="2"/>30 <text:s text:c="18"/>dip <text:s text:c="12"/>OK</text:p>
            <text:p text:style-name="P732">...<text:span text:style-name="T803">output,,,</text:span></text:p>
          </table:table-cell>
        </table:table-row>
      </table:table>
      <text:p text:style-name="P729"/>
      <text:p text:style-name="P733"><text:span text:style-name="T848">When the program is executed with </text:span><text:span text:style-name="Source_20_Text"><text:span text:style-name="T849">sudo</text:span></text:span><text:span text:style-name="T848">, it starts with root privileges and prints the original effective group ID (EGID). It then iterates over the supplementary groups of the specified user and attempts to switch the process EGID using </text:span><text:span text:style-name="Source_20_Text"><text:span text:style-name="T849">setegid</text:span></text:span><text:span text:style-name="T848">.</text:span></text:p>
      <text:p text:style-name="P733"><text:span text:style-name="T848">For </text:span><text:span text:style-name="Source_20_Text"><text:span text:style-name="T849">newuser</text:span></text:span><text:span text:style-name="T848">, the program switches successfully to the user’s primary group. For </text:span><text:span text:style-name="Source_20_Text"><text:span text:style-name="T849">root</text:span></text:span><text:span text:style-name="T848">, the EGID remains unchanged since root belongs to its own group. For </text:span><text:span text:style-name="Source_20_Text"><text:span text:style-name="T849">users</text:span></text:span><text:span text:style-name="T848">, the program successfully cycles through multiple supplementary groups (e.g., </text:span><text:span text:style-name="Source_20_Text"><text:span text:style-name="T849">adm</text:span></text:span><text:span text:style-name="T848">, </text:span><text:span text:style-name="Source_20_Text"><text:span text:style-name="T849">dialout</text:span></text:span><text:span text:style-name="T848">, </text:span><text:span text:style-name="Source_20_Text"><text:span text:style-name="T849">cdrom</text:span></text:span><text:span text:style-name="T848">, etc.), demonstrating how the effective group ID can be changed at runtime based on group membership.</text:span></text:p>
      <text:p text:style-name="P734">After completing the iteration, the program restores the original EGID, ensuring that the process returns to its initial privilege level.</text:p>
      <text:p text:style-name="P735"/>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7"><text:soft-page-break/><text:span text:style-name="T850">III.5.</text:span><text:span text:style-name="T760">6</text:span><text:span text:style-name="T850"> </text:span><text:span text:style-name="T44">Saved Set-User-Id and Set-Group-Id</text:span></text:p>
      <text:p text:style-name="P710"/>
      <text:p text:style-name="P738"><text:span text:style-name="T851">These two bits are set on the executable files to allow program to run with the owner privileges. A program with the </text:span><text:span text:style-name="T852">set-user-ID</text:span><text:span text:style-name="T851"> enabled that belongs to the user </text:span><text:span text:style-name="T853">user1</text:span><text:span text:style-name="T851"> will run with the privilege</text:span><text:span text:style-name="T854">s</text:span><text:span text:style-name="T851"> of the user </text:span><text:span text:style-name="T853">user1</text:span><text:span text:style-name="T851"> even when it will be executed by the user </text:span><text:span text:style-name="T853">user2</text:span><text:span text:style-name="T851">. This means that the EUID (set-user-ID) or EGID (set-group-ID) will be the same of the user that owns the file or the group of the file. </text:span></text:p>
      <text:p text:style-name="P738"><text:span text:style-name="T851">The </text:span><text:span text:style-name="T852">saved set-user-ID</text:span><text:span text:style-name="T851"> and </text:span><text:span text:style-name="T852">set-group-ID</text:span><text:span text:style-name="T851"> are copied from the value of the effective UID/GID. So if a process has the real, effective and saved set-user-ID, all with the value of </text:span><text:span text:style-name="T853">1000</text:span><text:span text:style-name="T851"> and it execute a program that is owned by the root (UID </text:span><text:span text:style-name="T853">0</text:span><text:span text:style-name="T851">) and that has the </text:span><text:span text:style-name="T852">set-user-ID</text:span><text:span text:style-name="T851"> enabled, </text:span><text:span text:style-name="T854">the executed program</text:span><text:span text:style-name="T851"> will have the following values during its execution</text:span></text:p>
      <text:p text:style-name="P739"/>
      <text:p text:style-name="P740"><text:tab/><text:tab/><text:tab/><text:tab/>Real UID<text:tab/><text:tab/><text:span text:style-name="T75">1000</text:span></text:p>
      <text:p text:style-name="P740"><text:tab/><text:tab/><text:tab/><text:tab/>Effective UID<text:tab/><text:tab/><text:span text:style-name="T75">0</text:span></text:p>
      <text:p text:style-name="P740"><text:tab/><text:tab/><text:tab/><text:tab/>Saved set-user-ID<text:tab/><text:span text:style-name="T75">0</text:span></text:p>
      <text:p text:style-name="P740"/>
      <text:p text:style-name="P738"><text:span text:style-name="T855">The </text:span><text:span text:style-name="T856">e</text:span><text:span text:style-name="T855">ffective UID will be the same as the owner of the executable (</text:span><text:span text:style-name="T853">root</text:span><text:span text:style-name="T855">). </text:span><text:span text:style-name="T857">A running process can switch its effective UID/GID to the values of the real UID/GID and </text:span><text:span text:style-name="T858">saved set-user/group-id</text:span><text:span text:style-name="T857"> in a way it can operate with different privileges and be in a state of potentially privileged and privileged. If a program does not need to be privileged it can operate with the real user/group ID and gain the privileged state only when it needs. </text:span></text:p>
      <text:p text:style-name="P741"><text:span text:style-name="T859">The </text:span><text:span text:style-name="T860">saved set-user-id</text:span><text:span text:style-name="T859"> and </text:span><text:span text:style-name="T860">set-group-id</text:span><text:span text:style-name="T859"> are also called </text:span><text:span text:style-name="T860">saved user ID</text:span><text:span text:style-name="T859"> and </text:span><text:span text:style-name="T860">saved group ID</text:span><text:span text:style-name="T859">.</text:span></text:p>
      <text:p text:style-name="P742"/>
      <text:p text:style-name="P743"><text:span text:style-name="T861">To </text:span><text:span text:style-name="T841">retrieve</text:span><text:span text:style-name="T861"> the </text:span><text:span text:style-name="T860">saved set-group-id</text:span><text:span text:style-name="T861">, the real and effective GID, we can use the following function</text:span><text:span text:style-name="T861"><text:note text:id="ftn67" text:note-class="footnote"><text:note-citation>65</text:note-citation><text:note-body><text:p text:style-name="P678"><text:span text:style-name="T861">See the </text:span><text:span text:style-name="T862">getresuid(2)</text:span><text:span text:style-name="T863"> manual page</text:span></text:p></text:note-body></text:note></text:span><text:span text:style-name="T861">.</text:span></text:p>
      <text:p text:style-name="P744"/>
      <table:table table:name="Table89" table:style-name="Table89">
        <table:table-column table:style-name="Table89.A"/>
        <table:table-row>
          <table:table-cell table:style-name="Table89.A1" office:value-type="string">
            <text:p text:style-name="P271"><text:span text:style-name="T115">#define _GNU_SOURCE</text:span><text:span text:style-name="T119"> </text:span></text:p>
            <text:p text:style-name="P186"><text:span text:style-name="T115">#include </text:span><text:span text:style-name="T116">&lt;unistd.h&gt;</text:span></text:p>
            <text:p text:style-name="P605"/>
            <text:p text:style-name="P186"><text:span text:style-name="T115">int</text:span> <text:span text:style-name="T126">getresgid</text:span>(<text:span text:style-name="T115">gid_t</text:span> *<text:span text:style-name="T68">rgid</text:span>, <text:span text:style-name="T115">gid_t</text:span> *<text:span text:style-name="T68">egid</text:span>, <text:span text:style-name="T115">gid_t</text:span> *<text:span text:style-name="T68">sgid</text:span>);</text:p>
            <text:p text:style-name="P188"/>
            <text:p text:style-name="P745">Returns: 0 on success, on error -<text:span text:style-name="T830">1 </text:span>and errno</text:p>
          </table:table-cell>
        </table:table-row>
      </table:table>
      <text:p text:style-name="P746"/>
      <text:p text:style-name="P747">The <text:span text:style-name="T75">setgrouprog.c</text:span> program <text:span text:style-name="T856">retrieves and print </text:span>its real and effective GID.</text:p>
      <text:p text:style-name="Horizontal_20_Line"/>
      <text:p text:style-name="P186"><text:span text:style-name="T864">1 </text:span><text:span text:style-name="T115">#include </text:span><text:span text:style-name="T116">&lt;stdlib.h&gt;</text:span></text:p>
      <text:p text:style-name="P748"><text:span text:style-name="T864">2 </text:span><text:span text:style-name="T115">#include </text:span><text:span text:style-name="T116">&lt;stdio.h&gt;</text:span></text:p>
      <text:p text:style-name="P748"><text:span text:style-name="T864">3 </text:span><text:span text:style-name="T115">#include </text:span><text:span text:style-name="T116">&lt;unistd.h&gt;</text:span></text:p>
      <text:p text:style-name="P188"/>
      <text:p text:style-name="P748"><text:span text:style-name="T864">4 </text:span><text:span text:style-name="T115">int</text:span> main() {</text:p>
      <text:p text:style-name="P188"><text:span text:style-name="T124"/></text:p>
      <text:p text:style-name="P748"><text:span text:style-name="T864">5 <text:tab/></text:span>printf(<text:span text:style-name="T116">"\nReal GID: %u"</text:span>, <text:span text:style-name="T126">getgid</text:span>());</text:p>
      <text:p text:style-name="P749"><text:span text:style-name="T865">6 <text:tab/></text:span><text:span text:style-name="T124">printf(</text:span><text:span text:style-name="T102">"\nEffective GID: %u"</text:span><text:span text:style-name="T124">, </text:span><text:span text:style-name="T216">getegid</text:span><text:span text:style-name="T124">());</text:span></text:p>
      <text:p text:style-name="P748"><text:span text:style-name="T864">7 <text:tab/></text:span>exit(<text:span text:style-name="T115">EXIT_SUCCESS</text:span>);</text:p>
      <text:p text:style-name="P749"><text:span text:style-name="T865">8 </text:span><text:span text:style-name="T124">}</text:span></text:p>
      <text:p text:style-name="Horizontal_20_Line"/>
      <text:p text:style-name="P750">setgrouprog.c</text:p>
      <text:p text:style-name="P751"/>
      <text:p text:style-name="P751"/>
      <text:p text:style-name="P751">We execute the program </text:p>
      <text:p text:style-name="P751"><text:soft-page-break/></text:p>
      <table:table table:name="Table80" table:style-name="Table80">
        <table:table-column table:style-name="Table80.A"/>
        <table:table-row>
          <table:table-cell table:style-name="Table80.A1" office:value-type="string">
            <text:p text:style-name="P75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6">setgrouprog </text:span></text:p>
            <text:p text:style-name="P752">Real GID: 1000</text:p>
            <text:p text:style-name="P752">Effective GID: 1000 <text:s/></text:p>
          </table:table-cell>
        </table:table-row>
      </table:table>
      <text:p text:style-name="P751"/>
      <text:p text:style-name="P753"><text:span text:style-name="T856">We</text:span> change the owner and set the set-user-ID and the set-group-ID.</text:p>
      <text:p text:style-name="P754"/>
      <table:table table:name="Table81" table:style-name="Table81">
        <table:table-column table:style-name="Table81.A"/>
        <table:table-row>
          <table:table-cell table:style-name="Table81.A1" office:value-type="string">
            <text:p text:style-name="P75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7">sudo chown newuser:newuser setgrouprog</text:span></text:p>
            <text:p text:style-name="P75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7">sudo chmod +s setgrouprog</text:span></text:p>
            <text:p text:style-name="P75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7">ls -l setgrouprog</text:span></text:p>
            <text:p text:style-name="P755">-rw<text:span text:style-name="T90">s</text:span>rw<text:span text:style-name="T90">s</text:span>r-x 1 newuser newuser 16112 Jun 25 01:31 <text:span text:style-name="T868">setgrouprog</text:span></text:p>
          </table:table-cell>
        </table:table-row>
      </table:table>
      <text:p text:style-name="P754"/>
      <text:p text:style-name="P756"><text:span text:style-name="T856">We</text:span> execute <text:span text:style-name="T856">the program</text:span></text:p>
      <text:p text:style-name="P757"/>
      <table:table table:name="Table82" table:style-name="Table82">
        <table:table-column table:style-name="Table82.A"/>
        <table:table-row>
          <table:table-cell table:style-name="Table82.A1" office:value-type="string">
            <text:p text:style-name="P758"><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6">setgrouprog </text:span></text:p>
            <text:p text:style-name="P758">Real GID: 1000</text:p>
            <text:p text:style-name="P758">Effective GID: 1002 </text:p>
          </table:table-cell>
        </table:table-row>
      </table:table>
      <text:p text:style-name="P757"/>
      <text:p text:style-name="P759"><text:span text:style-name="T869">The real GID is that one of the user </text:span><text:span text:style-name="T870">users</text:span><text:span text:style-name="T869"> (who whe are) and the effective GID is that one of the user </text:span><text:span text:style-name="T870">newuser</text:span><text:span text:style-name="T869"> (the owner of the executable).</text:span></text:p>
      <text:p text:style-name="P760"/>
      <text:p text:style-name="P761">We can modify the program as follows</text:p>
      <text:p text:style-name="P761"/>
      <text:p text:style-name="P762"><text:span text:style-name="T115"><text:tab/></text:span><text:span text:style-name="T871">gid_t</text:span><text:span text:style-name="T872"> saved_gid = </text:span><text:span text:style-name="T873">getegid</text:span><text:span text:style-name="T872">();<text:tab/><text:tab/></text:span><text:span text:style-name="T874">// </text:span><text:span text:style-name="T875">Store the current EGID</text:span></text:p>
      <text:p text:style-name="P763"/>
      <text:p text:style-name="P392"><text:tab/>printf(<text:span text:style-name="T116">"\nReal GID: %u"</text:span>, <text:span text:style-name="T126">getgid</text:span>());</text:p>
      <text:p text:style-name="P392"><text:tab/>printf(<text:span text:style-name="T116">"\nEffective GID: %u"</text:span>, <text:span text:style-name="T126">getegid</text:span>());</text:p>
      <text:p text:style-name="P763"/>
      <text:p text:style-name="P229"><text:span text:style-name="T876"><text:tab/></text:span><text:span text:style-name="T877">setegid</text:span><text:span text:style-name="T876">(getgid());<text:tab/><text:tab/> <text:s text:c="5"/></text:span><text:span text:style-name="T878">// Set the EGID to the real GID value</text:span></text:p>
      <text:p text:style-name="P763"/>
      <text:p text:style-name="P392"><text:tab/>printf(<text:span text:style-name="T116">"\nReal GID: %u"</text:span>, <text:span text:style-name="T126">getgid</text:span>());</text:p>
      <text:p text:style-name="P392"><text:tab/>printf(<text:span text:style-name="T116">"\nEffective GID: %u"</text:span>, <text:span text:style-name="T126">getegid</text:span>());</text:p>
      <text:p text:style-name="P763"/>
      <text:p text:style-name="P764"><text:span text:style-name="T879"><text:tab/></text:span><text:span text:style-name="T880">setegid</text:span><text:span text:style-name="T879">(saved_gid);<text:tab/><text:tab/><text:tab/></text:span><text:span text:style-name="T881">// Restore the saved EGID</text:span></text:p>
      <text:p text:style-name="P763"/>
      <text:p text:style-name="P392"><text:tab/>printf(<text:span text:style-name="T116">"\nReal GID: %u"</text:span>, <text:span text:style-name="T126">getgid</text:span>());</text:p>
      <text:p text:style-name="P392"><text:tab/>printf(<text:span text:style-name="T116">"\nEffective GID: %u"</text:span>, <text:span text:style-name="T126">getegid</text:span>());</text:p>
      <text:p text:style-name="P765"/>
      <text:p text:style-name="P766">We execute <text:span text:style-name="T856">the program </text:span></text:p>
      <text:p text:style-name="P766"/>
      <table:table table:name="Table83" table:style-name="Table83">
        <table:table-column table:style-name="Table83.A"/>
        <table:table-row>
          <table:table-cell table:style-name="Table83.A1" office:value-type="string">
            <text:p text:style-name="P767"><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66">setgrouprog</text:span></text:p>
            <text:p text:style-name="P767">Real GID: 1000</text:p>
            <text:p text:style-name="P768">Effective GID: 1002</text:p>
            <text:p text:style-name="P767">Real GID: 1000</text:p>
            <text:p text:style-name="P768">Effective GID: 1000</text:p>
            <text:p text:style-name="P767">Real GID: 1000</text:p>
            <text:p text:style-name="P767"><text:span text:style-name="T90">Effective GID: 1002</text:span> <text:s/></text:p>
          </table:table-cell>
        </table:table-row>
      </table:table>
      <text:p text:style-name="P738"/>
      <text:p text:style-name="P738"/>
      <text:p text:style-name="P769"><text:soft-page-break/><text:span text:style-name="T856">In this way, a program can switch between gaining and dropping privileges depending on its effective user and group IDs. If the program is owned by </text:span><text:span text:style-name="Source_20_Text"><text:span text:style-name="T882">root</text:span></text:span><text:span text:style-name="T856"> and has the set-user-ID or set-group-ID bits enabled, it will execute with </text:span><text:span text:style-name="Source_20_Text"><text:span text:style-name="T882">root</text:span></text:span><text:span text:style-name="T856"> privileges.</text:span></text:p>
      <text:p text:style-name="P769"/>
      <text:p text:style-name="P644"><text:span text:style-name="T856">The </text:span><text:span text:style-name="Source_20_Text"><text:span text:style-name="T882">setgrouprog2.c</text:span></text:span><text:span text:style-name="T856"> program demonstrates this concept by switching between the normal user context and the </text:span><text:span text:style-name="Source_20_Text"><text:span text:style-name="T882">root</text:span></text:span><text:span text:style-name="T856"> context, and attempting to access a file owned by </text:span><text:span text:style-name="Source_20_Text"><text:span text:style-name="T882">root</text:span></text:span><text:span text:style-name="T856">.</text:span></text:p>
      <text:p text:style-name="Horizontal_20_Line"/>
      <text:p text:style-name="P186"><text:span text:style-name="T883">1 </text:span><text:span text:style-name="T115">#include </text:span><text:span text:style-name="T116">&lt;stdlib.h&gt;</text:span></text:p>
      <text:p text:style-name="P770"><text:span text:style-name="T883">2 </text:span><text:span text:style-name="T115">#include </text:span><text:span text:style-name="T116">&lt;stdio.h&gt;</text:span></text:p>
      <text:p text:style-name="P770"><text:span text:style-name="T883">3 </text:span><text:span text:style-name="T115">#include </text:span><text:span text:style-name="T116">&lt;unistd.h&gt;</text:span></text:p>
      <text:p text:style-name="P770"><text:span text:style-name="T883">4 </text:span><text:span text:style-name="T115">#include </text:span><text:span text:style-name="T116">&lt;fcntl.h&gt;</text:span></text:p>
      <text:p text:style-name="P771"><text:span text:style-name="T884">5 </text:span><text:span text:style-name="T101">#include </text:span><text:span text:style-name="T102">&lt;sys/types.h&gt;</text:span></text:p>
      <text:p text:style-name="P772"/>
      <text:p text:style-name="P770"><text:span text:style-name="T883">6 </text:span><text:span text:style-name="T115">int</text:span> openfile(<text:span text:style-name="T115">char</text:span> *filename) {</text:p>
      <text:p text:style-name="P771"><text:span text:style-name="T884">7 </text:span><text:span text:style-name="T101"><text:tab/>int</text:span><text:span text:style-name="T124"> fd;</text:span></text:p>
      <text:p text:style-name="P770"><text:span text:style-name="T883">8 </text:span><text:tab/>fd = open(filename, <text:span text:style-name="T115">O_RDONLY</text:span>);</text:p>
      <text:p text:style-name="P770"><text:span text:style-name="T883">9 </text:span><text:span text:style-name="T115"><text:tab/>if</text:span> (fd &lt; <text:span text:style-name="T127">0</text:span>) {</text:p>
      <text:p text:style-name="P770"><text:span text:style-name="T883">10 </text:span><text:tab/><text:tab/>perror(<text:span text:style-name="T116">"open"</text:span>);</text:p>
      <text:p text:style-name="P770"><text:span text:style-name="T883">11 </text:span><text:span text:style-name="T115"><text:tab/><text:tab/>return</text:span> <text:span text:style-name="T115">EXIT_FAILURE</text:span>;</text:p>
      <text:p text:style-name="P770"><text:span text:style-name="T883">12 </text:span><text:tab/>} <text:span text:style-name="T115">else</text:span> {</text:p>
      <text:p text:style-name="P770"><text:span text:style-name="T883">13 </text:span><text:tab/><text:tab/>close(fd);</text:p>
      <text:p text:style-name="P770"><text:span text:style-name="T883">14 </text:span><text:tab/><text:tab/>printf(<text:span text:style-name="T116">"\nFile opened successfully\n"</text:span>);</text:p>
      <text:p text:style-name="P770"><text:span text:style-name="T883">15 </text:span><text:span text:style-name="T115"><text:tab/><text:tab/>return</text:span> <text:span text:style-name="T115">EXIT_SUCCESS</text:span>;</text:p>
      <text:p text:style-name="P770"><text:span text:style-name="T883">16 </text:span><text:tab/>}</text:p>
      <text:p text:style-name="P770"><text:span text:style-name="T883">17 </text:span>}</text:p>
      <text:p text:style-name="P188"/>
      <text:p text:style-name="P771"><text:span text:style-name="T884">18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770"><text:span text:style-name="T883">19 </text:span><text:span text:style-name="T115"><text:tab/>if</text:span> (argc != <text:span text:style-name="T127">2</text:span>) {</text:p>
      <text:p text:style-name="P770"><text:span text:style-name="T883">20 </text:span><text:tab/><text:tab/>printf(<text:span text:style-name="T116">"\nUsage %s &lt;filename&gt;"</text:span>, argv[<text:span text:style-name="T127">0</text:span>]);</text:p>
      <text:p text:style-name="P770"><text:span text:style-name="T883">21 </text:span><text:tab/><text:tab/>exit(<text:span text:style-name="T115">EXIT_FAILURE</text:span>);</text:p>
      <text:p text:style-name="P770"><text:span text:style-name="T883">22 </text:span><text:tab/>}</text:p>
      <text:p text:style-name="P188"/>
      <text:p text:style-name="P770"><text:span text:style-name="T883">23 </text:span><text:span text:style-name="T115"><text:tab/>char</text:span> *filename = argv[<text:span text:style-name="T127">1</text:span>];</text:p>
      <text:p text:style-name="P770"><text:span text:style-name="T883">24 </text:span><text:span text:style-name="T115"><text:tab/>gid_t</text:span> saved_gid = <text:span text:style-name="T126">getegid</text:span>();</text:p>
      <text:p text:style-name="P770"><text:span text:style-name="T883">25 </text:span><text:span text:style-name="T115"><text:tab/>uid_t</text:span> saved_uid = <text:span text:style-name="T126">geteuid</text:span>();</text:p>
      <text:p text:style-name="P188"/>
      <text:p text:style-name="P770"><text:span text:style-name="T883">26 </text:span><text:tab/>printf(<text:span text:style-name="T116">"\nReal GID: %u"</text:span>, <text:span text:style-name="T126">getgid</text:span>());</text:p>
      <text:p text:style-name="P770"><text:span text:style-name="T883">27 </text:span><text:tab/>printf(<text:span text:style-name="T116">"\nEffective GID: %u"</text:span>, <text:span text:style-name="T126">getegid</text:span>());</text:p>
      <text:p text:style-name="P770"><text:span text:style-name="T883">28 </text:span><text:tab/>openfile(filename);</text:p>
      <text:p text:style-name="P188"/>
      <text:p text:style-name="P770"><text:span text:style-name="T883">29 </text:span><text:tab/>printf(<text:span text:style-name="T116">"\nDropping privileges..."</text:span>);</text:p>
      <text:p text:style-name="P770"><text:span text:style-name="T883">30 </text:span><text:tab/><text:span text:style-name="T126">setegid</text:span>(getgid());</text:p>
      <text:p text:style-name="P770"><text:span text:style-name="T883">31 <text:s/></text:span><text:tab/><text:span text:style-name="T126">seteuid</text:span>(getuid());</text:p>
      <text:p text:style-name="P770"><text:span text:style-name="T883">32 </text:span><text:tab/>printf(<text:span text:style-name="T116">"\nReal GID: %u"</text:span>, <text:span text:style-name="T126">getgid</text:span>());</text:p>
      <text:p text:style-name="P770"><text:span text:style-name="T883">33 </text:span><text:tab/>printf(<text:span text:style-name="T116">"\nEffective GID: %u"</text:span>, <text:span text:style-name="T126">getegid</text:span>());</text:p>
      <text:p text:style-name="P770"><text:span text:style-name="T883">34 </text:span><text:tab/>printf(<text:span text:style-name="T116">"\nReal UID: %u"</text:span>, <text:span text:style-name="T126">getuid</text:span>());</text:p>
      <text:p text:style-name="P770"><text:span text:style-name="T883">35 </text:span><text:tab/>printf(<text:span text:style-name="T116">"\nEffective UID: %u"</text:span>, <text:span text:style-name="T126">geteuid</text:span>());</text:p>
      <text:p text:style-name="P770"><text:span text:style-name="T883">36 </text:span><text:tab/>openfile(filename);</text:p>
      <text:p text:style-name="P188"/>
      <text:p text:style-name="P770"><text:span text:style-name="T883">37 </text:span><text:tab/>printf(<text:span text:style-name="T116">"\n\nRegain privileges..."</text:span>);</text:p>
      <text:p text:style-name="P770"><text:soft-page-break/><text:span text:style-name="T883">38 </text:span><text:tab/><text:span text:style-name="T126">setegid</text:span>(saved_gid);<text:span text:style-name="T883"> </text:span></text:p>
      <text:p text:style-name="P770"><text:span text:style-name="T883">39 </text:span><text:tab/><text:span text:style-name="T126">seteuid</text:span>(saved_uid);</text:p>
      <text:p text:style-name="P770"><text:span text:style-name="T883">40 </text:span><text:tab/>printf(<text:span text:style-name="T116">"\nReal GID: %u"</text:span>, <text:span text:style-name="T126">getgid</text:span>());</text:p>
      <text:p text:style-name="P770"><text:span text:style-name="T883">41 </text:span><text:tab/>printf(<text:span text:style-name="T116">"\nEffective GID: %u"</text:span>, <text:span text:style-name="T126">getegid</text:span>());</text:p>
      <text:p text:style-name="P770"><text:span text:style-name="T883">42 </text:span><text:tab/>printf(<text:span text:style-name="T116">"\nReal UID: %u"</text:span>, <text:span text:style-name="T126">getuid</text:span>());</text:p>
      <text:p text:style-name="P770"><text:span text:style-name="T883">43 </text:span><text:tab/>printf(<text:span text:style-name="T116">"\nEffective UID: %u"</text:span>, <text:span text:style-name="T126">geteuid</text:span>());</text:p>
      <text:p text:style-name="P770"><text:span text:style-name="T883">44 </text:span><text:tab/>openfile(filename);</text:p>
      <text:p text:style-name="P188"/>
      <text:p text:style-name="P770"><text:span text:style-name="T883">45 </text:span><text:tab/>exit(<text:span text:style-name="T115">EXIT_SUCCESS</text:span>);</text:p>
      <text:p text:style-name="P771"><text:span text:style-name="T884">46 </text:span><text:span text:style-name="T124">}</text:span></text:p>
      <text:p text:style-name="Horizontal_20_Line"/>
      <text:p text:style-name="P773">setgrouprog2.c</text:p>
      <text:p text:style-name="P307"/>
      <text:p text:style-name="Standard"><text:span text:style-name="Strong_20_Emphasis"><text:span text:style-name="T220">Line 6–17.</text:span></text:span><text:span text:style-name="T220"> The function </text:span><text:span text:style-name="Source_20_Text"><text:span text:style-name="T221">openfile</text:span></text:span><text:span text:style-name="T220"> attempts to open the file passed as argument in read-only <text:tab/><text:tab/> <text:s text:c="5"/>mode. If successful, it closes the file descriptor and prints a success message; otherwise, <text:tab/> <text:s text:c="5"/>it reports an error</text:span></text:p>
      <text:p text:style-name="Standard"><text:span text:style-name="Strong_20_Emphasis"><text:span text:style-name="T220">Line 24–25.</text:span></text:span><text:span text:style-name="T220"> The program stores the current effective group ID (EGID) and effective user ID <text:tab/> <text:s text:c="2"/><text:tab/> <text:s text:c="7"/>(EUID) so they can be restored later</text:span></text:p>
      <text:p text:style-name="Standard"><text:span text:style-name="Strong_20_Emphasis"><text:span text:style-name="T220">Line 26–28.</text:span></text:span><text:span text:style-name="T220"> Prints the real and effective group IDs and attempts to open the file using the current <text:tab/> <text:s text:c="7"/>(possibly privileged) identity</text:span></text:p>
      <text:p text:style-name="Standard"><text:span text:style-name="Strong_20_Emphasis"><text:span text:style-name="T220">Line 29–36.</text:span></text:span><text:span text:style-name="T220"> The program drops privileges by setting the effective GID and UID to the real ones. It <text:tab/> <text:s text:c="8"/>then prints the updated identity values and attempts again to open the file, which may <text:tab/> <text:s text:c="8"/>now fail if access is restricted</text:span></text:p>
      <text:p text:style-name="Standard"><text:span text:style-name="Strong_20_Emphasis"><text:span text:style-name="T220">Line 37–44.</text:span></text:span><text:span text:style-name="T220"> The program restores the original saved privileges (typically root if running as <text:tab/> <text:s text:c="2"/><text:tab/> <text:s text:c="7"/>SUID/SGID), prints the restored identity values, and tries again to open the file, which <text:tab/> <text:s text:c="7"/>should succeed if privileges allow it</text:span></text:p>
      <text:p text:style-name="P307"/>
      <text:p text:style-name="P774"><text:span text:style-name="T856">We</text:span> create a file owned by <text:span text:style-name="T75">root</text:span>.</text:p>
      <text:p text:style-name="P774"/>
      <table:table table:name="Table84" table:style-name="Table84">
        <table:table-column table:style-name="Table84.A"/>
        <table:table-row>
          <table:table-cell table:style-name="Table84.A1" office:value-type="string">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echo hello &gt; rootfile.txt</text:span></text:p>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sudo chown root:root rootfile.txt</text:span></text:p>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sudo chmod 640 rootfile.txt</text:span></text:p>
          </table:table-cell>
        </table:table-row>
      </table:table>
      <text:p text:style-name="P774"/>
      <text:p text:style-name="P774"><text:span text:style-name="T856">We</text:span> execute the program.</text:p>
      <text:p text:style-name="P774"/>
      <table:table table:name="Table85" table:style-name="Table85">
        <table:table-column table:style-name="Table85.A"/>
        <table:table-row>
          <table:table-cell table:style-name="Table85.A1" office:value-type="string">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sudo chown root:root setgrouprog2</text:span></text:p>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sudo chmod +s setgrouprog2</text:span></text:p>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ls -l setgrouprog2</text:span></text:p>
            <text:p text:style-name="P775">-rw<text:span text:style-name="T90">s</text:span>rw<text:span text:style-name="T90">s</text:span>r-x 1 root root 16552 Jun 25 03:21 <text:span text:style-name="T868">setgrouprog2</text:span></text:p>
            <text:p text:style-name="P776"/>
            <text:p text:style-name="P77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85">setgrouprog2 ./rootfile</text:span></text:p>
            <text:p text:style-name="P775">Real GID: 1000</text:p>
            <text:p text:style-name="P777">Effective GID: 0</text:p>
            <text:p text:style-name="P777">File opened successfully</text:p>
            <text:p text:style-name="P775"/>
            <text:p text:style-name="P775">Dropping privileges...</text:p>
            <text:p text:style-name="P775">Real GID: 1000</text:p>
            <text:p text:style-name="P777">Effective GID: 1000</text:p>
            <text:p text:style-name="P775">Real UID: 1000</text:p>
            <text:p text:style-name="P777">open: Permission denied</text:p>
            <text:p text:style-name="P777"><text:soft-page-break/>Effective UID: 1000</text:p>
            <text:p text:style-name="P775"/>
            <text:p text:style-name="P775">Regain privileges...</text:p>
            <text:p text:style-name="P775">Real GID: 1000</text:p>
            <text:p text:style-name="P777">Effective GID: 0</text:p>
            <text:p text:style-name="P775">Real UID: 1000</text:p>
            <text:p text:style-name="P777">Effective UID: 0</text:p>
            <text:p text:style-name="P777">File opened successfully</text:p>
          </table:table-cell>
        </table:table-row>
      </table:table>
      <text:p text:style-name="P778"/>
      <text:p text:style-name="P778">The program demonstrates how file access depends on both the effective user ID (EUID) and effective group ID (EGID), especially when running a set-user-ID/set-group-ID executable.</text:p>
      <text:p text:style-name="P779"><text:span text:style-name="T885">Initially, the program runs with elevated privileges (EUID=0, EGID=0), allowing it to successfully open the </text:span><text:span text:style-name="T603">root</text:span><text:span text:style-name="T885">-owned file. After dropping privileges using </text:span><text:span text:style-name="Source_20_Text"><text:span text:style-name="T603">setegid(getgid())</text:span></text:span><text:span text:style-name="T885"> and </text:span><text:span text:style-name="Source_20_Text"><text:span text:style-name="T603">seteuid(getuid())</text:span></text:span><text:span text:style-name="T885">, both identifiers are reduced to the calling user’s values, and access to the </text:span><text:span text:style-name="T603">root</text:span><text:span text:style-name="T885">-owned file is denied (</text:span><text:span text:style-name="Source_20_Text"><text:span text:style-name="T886">Permission denied</text:span></text:span><text:span text:style-name="T885">). When privileges are restored using the saved IDs, access is granted again.</text:span></text:p>
      <text:p text:style-name="P778"/>
      <text:p text:style-name="P779"><text:span text:style-name="T885">This behavior highlights that both EUID and EGID jointly determine access rights: reducing only the group ID is not sufficient to restrict access if the process still retains </text:span><text:span text:style-name="Source_20_Text"><text:span text:style-name="T603">root</text:span></text:span><text:span text:style-name="T885"> EUID.</text:span></text:p>
      <text:p text:style-name="P779"><text:span text:style-name="T885">If </text:span><text:span text:style-name="Source_20_Text"><text:span text:style-name="T603">seteuid(getuid())</text:span></text:span><text:span text:style-name="T885"> is removed, then even after dropping the group privileges, the process still keeps EUID = 0 due to the set-user-ID mechanism, and the file remains accessible.</text:span></text:p>
      <text:p text:style-name="P778"/>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80"><text:soft-page-break/><text:span text:style-name="T887">III.5.</text:span><text:span text:style-name="T760">7</text:span><text:span text:style-name="T887"> </text:span><text:span text:style-name="T44">Check</text:span><text:span text:style-name="T760">ing</text:span><text:span text:style-name="T44"> </text:span><text:span text:style-name="T888">whether</text:span><text:span text:style-name="T44"> a process is in a group: </text:span><text:span text:style-name="T762">group_member</text:span></text:p>
      <text:p text:style-name="P774"/>
      <text:p text:style-name="P781"><text:span text:style-name="T889">We can know if one of the supplementary groups of a process matches a specified GID </text:span><text:span text:style-name="T890">using</text:span><text:span text:style-name="T889"> the </text:span><text:span text:style-name="T891">group_member</text:span><text:span text:style-name="T889"><text:note text:id="ftn68" text:note-class="footnote"><text:note-citation>66</text:note-citation><text:note-body><text:p text:style-name="P678"><text:span text:style-name="T889">See the </text:span><text:span text:style-name="T892">group_member(3)</text:span><text:span text:style-name="T861"> manual page</text:span></text:p></text:note-body></text:note></text:span><text:span text:style-name="T889"> </text:span><text:span text:style-name="T890">f</text:span><text:span text:style-name="T889">unction, </text:span><text:span text:style-name="T890">which is defined as follows. </text:span></text:p>
      <text:p text:style-name="P774"/>
      <table:table table:name="Table86" table:style-name="Table86">
        <table:table-column table:style-name="Table86.A"/>
        <table:table-row>
          <table:table-cell table:style-name="Table86.A1" office:value-type="string">
            <text:p text:style-name="P271"><text:span text:style-name="T115">#include </text:span><text:span text:style-name="T116">&lt;unistd.h&gt;</text:span></text:p>
            <text:p text:style-name="P188"/>
            <text:p text:style-name="P186"><text:span text:style-name="T115">int</text:span> <text:span text:style-name="T126">group_member</text:span>(<text:span text:style-name="T115">gid_t</text:span> <text:span text:style-name="T68">gid</text:span>);</text:p>
            <text:p text:style-name="P283"/>
            <text:p text:style-name="P782">Returns: nonzero if a supplementary group matches gid, zero if not</text:p>
          </table:table-cell>
        </table:table-row>
      </table:table>
      <text:p text:style-name="P774"/>
      <text:p text:style-name="P644"><text:span text:style-name="T893">The </text:span><text:span text:style-name="T891">grpmember.c</text:span><text:span text:style-name="T893"> program </text:span><text:span text:style-name="T890">d</text:span>emonstrates the use of <text:span text:style-name="Source_20_Text"><text:span text:style-name="T891">group_member</text:span></text:span> to check whether a given group ID (GID) is part of the supplementary groups of the current process.</text:p>
      <text:p text:style-name="Horizontal_20_Line"/>
      <text:p text:style-name="P186"><text:span text:style-name="T894">1 </text:span><text:span text:style-name="T115">#define _GNU_SOURCE</text:span></text:p>
      <text:p text:style-name="P783"><text:span text:style-name="T895">2</text:span><text:span text:style-name="T894"> </text:span><text:span text:style-name="T115">#include </text:span><text:span text:style-name="T116">&lt;stdio.h&gt;</text:span></text:p>
      <text:p text:style-name="P783"><text:span text:style-name="T895">3</text:span><text:span text:style-name="T894"> </text:span><text:span text:style-name="T115">#include </text:span><text:span text:style-name="T116">&lt;stdlib.h&gt;</text:span></text:p>
      <text:p text:style-name="P783"><text:span text:style-name="T895">4</text:span><text:span text:style-name="T894"> </text:span><text:span text:style-name="T115">#include </text:span><text:span text:style-name="T116">&lt;unistd.h&gt;</text:span></text:p>
      <text:p text:style-name="P783"><text:span text:style-name="T895">5</text:span><text:span text:style-name="T894"> </text:span><text:span text:style-name="T115">#include </text:span><text:span text:style-name="T116">&lt;grp.h&gt;</text:span></text:p>
      <text:p text:style-name="P188"/>
      <text:p text:style-name="P783"><text:span text:style-name="T895">6</text:span><text:span text:style-name="T894"> </text:span><text:span text:style-name="T115">int</text:span> main(<text:span text:style-name="T115">int</text:span> argc, <text:span text:style-name="T115">char</text:span> *argv<text:span text:style-name="T115">[]</text:span>) {</text:p>
      <text:p text:style-name="P783"><text:span text:style-name="T895">7</text:span><text:span text:style-name="T894"> <text:tab/></text:span><text:span text:style-name="T115">if</text:span> (argc != <text:span text:style-name="T127">2</text:span>) {</text:p>
      <text:p text:style-name="P783"><text:span text:style-name="T895">8</text:span><text:span text:style-name="T894"> <text:tab/><text:tab/></text:span>fprintf(<text:span text:style-name="T115">stderr</text:span>, <text:span text:style-name="T116">"Usage: %s &lt;gid&gt;\n"</text:span>, argv[<text:span text:style-name="T127">0</text:span>]);</text:p>
      <text:p text:style-name="P783"><text:span text:style-name="T895">9</text:span><text:span text:style-name="T894"> <text:tab/><text:tab/></text:span>exit(<text:span text:style-name="T115">EXIT_FAILURE</text:span>);</text:p>
      <text:p text:style-name="P783"><text:span text:style-name="T894">1</text:span><text:span text:style-name="T895">0</text:span><text:span text:style-name="T894"> <text:tab/></text:span>}</text:p>
      <text:p text:style-name="P188"/>
      <text:p text:style-name="P783"><text:span text:style-name="T894">1</text:span><text:span text:style-name="T895">1</text:span><text:span text:style-name="T894"> <text:tab/></text:span><text:span text:style-name="T115">gid_t</text:span> gid = atoi(argv[<text:span text:style-name="T127">1</text:span>]);</text:p>
      <text:p text:style-name="P783"><text:span text:style-name="T894">1</text:span><text:span text:style-name="T895">2</text:span><text:span text:style-name="T894"> <text:tab/></text:span><text:span text:style-name="T115">int</text:span> match;</text:p>
      <text:p text:style-name="P783"><text:span text:style-name="T894">1</text:span><text:span text:style-name="T895">3</text:span><text:span text:style-name="T894"> <text:tab/></text:span>match = <text:span text:style-name="T126">group_member</text:span>(gid);</text:p>
      <text:p text:style-name="P188"/>
      <text:p text:style-name="P783"><text:span text:style-name="T894">1</text:span><text:span text:style-name="T895">4</text:span><text:span text:style-name="T894"> <text:tab/></text:span><text:span text:style-name="T115">if</text:span> (match != <text:span text:style-name="T127">0</text:span>) </text:p>
      <text:p text:style-name="P783"><text:span text:style-name="T894">1</text:span><text:span text:style-name="T895">5</text:span><text:span text:style-name="T894"> <text:tab/><text:tab/></text:span>printf(<text:span text:style-name="T116">"\nGID %u group found: %s"</text:span>,gid,<text:span text:style-name="T896">g</text:span><text:span text:style-name="T126">etgrgid</text:span>(gid)-&gt;gr_name);</text:p>
      <text:p text:style-name="P783"><text:span text:style-name="T894">1</text:span><text:span text:style-name="T895">6</text:span><text:span text:style-name="T894"> <text:tab/></text:span><text:span text:style-name="T115">else</text:span> </text:p>
      <text:p text:style-name="P783"><text:span text:style-name="T894">1</text:span><text:span text:style-name="T895">7</text:span><text:span text:style-name="T894"> <text:tab/><text:tab/></text:span>printf(<text:span text:style-name="T116">"\nNo matching group found"</text:span>);</text:p>
      <text:p text:style-name="P188"/>
      <text:p text:style-name="P783"><text:span text:style-name="T894">1</text:span><text:span text:style-name="T895">8</text:span><text:span text:style-name="T894"> <text:tab/></text:span>exit(<text:span text:style-name="T115">EXIT_SUCCESS</text:span>);</text:p>
      <text:p text:style-name="P784"><text:span text:style-name="T897">1</text:span><text:span text:style-name="T898">9</text:span><text:span text:style-name="T897"> </text:span><text:span text:style-name="T124">}</text:span></text:p>
      <text:p text:style-name="P785"/>
      <text:p text:style-name="P786">grpmember.c</text:p>
      <text:p text:style-name="P787"/>
      <text:p text:style-name="Standard"><text:span text:style-name="Strong_20_Emphasis"><text:span text:style-name="T220">Line 7–10.</text:span></text:span><text:span text:style-name="T220"> Checks that exactly one command-line argument (the GID) is provided; otherwise, it <text:tab/> <text:s text:c="5"/>prints usage information and exits</text:span></text:p>
      <text:p text:style-name="Standard"><text:span text:style-name="Strong_20_Emphasis"><text:span text:style-name="T220">Line 11.</text:span></text:span><text:span text:style-name="T220"> Converts the input argument from string to integer and stores it as a </text:span><text:span text:style-name="Source_20_Text"><text:span text:style-name="T221">gid_t</text:span></text:span></text:p>
      <text:p text:style-name="Standard"><text:span text:style-name="Strong_20_Emphasis"><text:span text:style-name="T220">Line 13.</text:span></text:span><text:span text:style-name="T220"> Calls </text:span><text:span text:style-name="Source_20_Text"><text:span text:style-name="T221">group_member(gid),</text:span></text:span><text:span text:style-name="T220"> which returns a non-zero value if the specified GID is <text:tab/> <text:s/>found in the process’s supplementary group list</text:span></text:p>
      <text:p text:style-name="Standard"><text:span text:style-name="Strong_20_Emphasis"><text:span text:style-name="T220">Line 14–17.</text:span></text:span><text:span text:style-name="T220"> If the group is found, the program prints the group name obtained via </text:span><text:span text:style-name="Source_20_Text"><text:span text:style-name="T221">getgrgid</text:span></text:span><text:span text:style-name="T220">. <text:tab/> <text:s text:c="7"/>Otherwise, it reports that no matching group was found</text:span></text:p>
      <text:p text:style-name="P307"/>
      <text:p text:style-name="P788"><text:soft-page-break/>The program is executed. </text:p>
      <text:p text:style-name="P787"/>
      <table:table table:name="Table87" table:style-name="Table87">
        <table:table-column table:style-name="Table87.A"/>
        <table:table-row>
          <table:table-cell table:style-name="Table87.A1" office:value-type="string">
            <text:p text:style-name="P789"><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899">grep users /etc/group</text:span></text:p>
            <text:p text:style-name="P789">adm:x:4:<text:span text:style-name="T899">users</text:span></text:p>
            <text:p text:style-name="P789">dialout:x:20:<text:span text:style-name="T899">users</text:span></text:p>
            <text:p text:style-name="P789">cdrom:x:24:<text:span text:style-name="T899">users</text:span></text:p>
            <text:p text:style-name="P789">floppy:x:25:<text:span text:style-name="T899">users</text:span></text:p>
            <text:p text:style-name="P789">sudo:x:27:<text:span text:style-name="T899">users</text:span></text:p>
            <text:p text:style-name="P789">audio:x:29:pulse,<text:span text:style-name="T899">users</text:span></text:p>
            <text:p text:style-name="P789">dip:x:30:<text:span text:style-name="T899">users</text:span></text:p>
            <text:p text:style-name="P789">video:x:44:<text:span text:style-name="T899">users</text:span></text:p>
            <text:p text:style-name="P789">plugdev:x:46:<text:span text:style-name="T899">users</text:span></text:p>
            <text:p text:style-name="P789">users:x:100:<text:span text:style-name="T899">users</text:span></text:p>
            <text:p text:style-name="P789"/>
            <text:p text:style-name="P790"><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00">grpmember 27</text:span></text:p>
            <text:p text:style-name="P790">GID 27 group found: sudo <text:s text:c="68"/></text:p>
            <text:p text:style-name="P790"/>
            <text:p text:style-name="P79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00">grpmember </text:span><text:span text:style-name="T901">29</text:span></text:p>
            <text:p text:style-name="P791">GID 29 group found: audio <text:s text:c="68"/></text:p>
            <text:p text:style-name="P791"/>
            <text:p text:style-name="P79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00">grpmember </text:span><text:span text:style-name="T901">0</text:span></text:p>
            <text:p text:style-name="P791">No matching group found <text:s text:c="68"/></text:p>
          </table:table-cell>
        </table:table-row>
      </table:table>
      <text:p text:style-name="P788"/>
      <text:p text:style-name="P781"><text:span text:style-name="T890">The output shows that GIDs such as </text:span><text:span text:style-name="Source_20_Text"><text:span text:style-name="T902">27</text:span></text:span><text:span text:style-name="T890"> (</text:span><text:span text:style-name="Source_20_Text"><text:span text:style-name="T902">sudo</text:span></text:span><text:span text:style-name="T890">) and </text:span><text:span text:style-name="Source_20_Text"><text:span text:style-name="T902">29</text:span></text:span><text:span text:style-name="T890"> (</text:span><text:span text:style-name="Source_20_Text"><text:span text:style-name="T902">audio</text:span></text:span><text:span text:style-name="T890">) are found because they belong to the user’s supplementary group list as defined in </text:span><text:span text:style-name="Source_20_Text"><text:span text:style-name="T902">/etc/group</text:span></text:span><text:span text:style-name="T890">.</text:span></text:p>
      <text:p text:style-name="P781"><text:span text:style-name="T890">When a GID that is not part of the process’s supplementary groups (such as </text:span><text:span text:style-name="Source_20_Text"><text:span text:style-name="T902">0</text:span></text:span><text:span text:style-name="T890">, </text:span><text:span text:style-name="Source_20_Text"><text:span text:style-name="T902">root</text:span></text:span><text:span text:style-name="T890">) is tested, the function correctly reports that no matching group is found. This demonstrates how </text:span><text:span text:style-name="Source_20_Text"><text:span text:style-name="T902">group_member</text:span></text:span><text:span text:style-name="T890"> can be used to verify group membership at runtime based on the process’s current group context.</text:span></text:p>
      <text:p text:style-name="P788"/>
      <text:p text:style-name="P710"/>
      <text:p text:style-name="P792"><text:span text:style-name="T903"/></text:p>
      <text:p text:style-name="P793">III. 6 User <text:span text:style-name="T23">functions</text:span></text:p>
      <text:p text:style-name="Standard"/>
      <text:p text:style-name="P794">For the group-related functions discussed in the previous section, there are equivalent functions for user management. These are summarized in the following table.</text:p>
      <text:p text:style-name="P794"/>
      <text:p text:style-name="P795"/>
      <table:table table:name="Table92" table:style-name="Table92">
        <table:table-column table:style-name="Table92.A"/>
        <table:table-column table:style-name="Table92.B"/>
        <table:table-column table:style-name="Table92.C"/>
        <table:table-row>
          <table:table-cell table:style-name="Table92.A1" office:value-type="string">
            <text:p text:style-name="P796">Get group/user ID</text:p>
          </table:table-cell>
          <table:table-cell table:style-name="Table92.A1" office:value-type="string">
            <text:p text:style-name="P797">getgid</text:p>
          </table:table-cell>
          <table:table-cell table:style-name="Table92.C1" office:value-type="string">
            <text:p text:style-name="P797">getuid</text:p>
          </table:table-cell>
        </table:table-row>
        <table:table-row>
          <table:table-cell table:style-name="Table92.A2" office:value-type="string">
            <text:p text:style-name="P796">Get effective group/user ID</text:p>
          </table:table-cell>
          <table:table-cell table:style-name="Table92.A2" office:value-type="string">
            <text:p text:style-name="P797">getegid</text:p>
          </table:table-cell>
          <table:table-cell table:style-name="Table92.C2" office:value-type="string">
            <text:p text:style-name="P797">geteuid</text:p>
          </table:table-cell>
        </table:table-row>
        <table:table-row>
          <table:table-cell table:style-name="Table92.A2" office:value-type="string">
            <text:p text:style-name="P796">Set group/user ID</text:p>
          </table:table-cell>
          <table:table-cell table:style-name="Table92.A2" office:value-type="string">
            <text:p text:style-name="P797">setgid</text:p>
          </table:table-cell>
          <table:table-cell table:style-name="Table92.C2" office:value-type="string">
            <text:p text:style-name="P797">setuid</text:p>
          </table:table-cell>
        </table:table-row>
        <table:table-row>
          <table:table-cell table:style-name="Table92.A2" office:value-type="string">
            <text:p text:style-name="P796">Set effective user/group ID</text:p>
          </table:table-cell>
          <table:table-cell table:style-name="Table92.A2" office:value-type="string">
            <text:p text:style-name="P797">setegid</text:p>
          </table:table-cell>
          <table:table-cell table:style-name="Table92.C2" office:value-type="string">
            <text:p text:style-name="P797">seteuid</text:p>
          </table:table-cell>
        </table:table-row>
        <table:table-row>
          <table:table-cell table:style-name="Table92.A2" office:value-type="string">
            <text:p text:style-name="P796">Set real and effective group/user ID</text:p>
          </table:table-cell>
          <table:table-cell table:style-name="Table92.A2" office:value-type="string">
            <text:p text:style-name="P797">setregid</text:p>
          </table:table-cell>
          <table:table-cell table:style-name="Table92.C2" office:value-type="string">
            <text:p text:style-name="P797">setreuid</text:p>
          </table:table-cell>
        </table:table-row>
        <table:table-row>
          <table:table-cell table:style-name="Table92.A2" office:value-type="string">
            <text:p text:style-name="P796">Set real, effective, saved group/user ID</text:p>
          </table:table-cell>
          <table:table-cell table:style-name="Table92.A2" office:value-type="string">
            <text:p text:style-name="P797">setresgid</text:p>
          </table:table-cell>
          <table:table-cell table:style-name="Table92.C2" office:value-type="string">
            <text:p text:style-name="P797">setresuid</text:p>
          </table:table-cell>
        </table:table-row>
      </table:table>
      <text:p text:style-name="P798"/>
      <text:p text:style-name="P799"><text:span text:style-name="T90">Tab 1</text:span><text:span text:style-name="T361">4</text:span><text:span text:style-name="T90">.</text:span> Get and set user/group ID functions</text:p>
      <text:p text:style-name="P800"/>
      <text:p text:style-name="P801"><text:span text:style-name="T904">Each of these functions has a </text:span><text:span text:style-name="T905">dedicated </text:span><text:span text:style-name="T904">manual page in the </text:span><text:span text:style-name="T906">section 2</text:span><text:span text:style-name="T904">: </text:span><text:span text:style-name="T907">getuid(2)</text:span><text:span text:style-name="T904">, </text:span><text:span text:style-name="T907">setuid(2)</text:span><text:span text:style-name="T904">, etc.. The prototypes of the</text:span><text:span text:style-name="T908">se</text:span><text:span text:style-name="T904"> system calls are listed below.</text:span></text:p>
      <text:p text:style-name="P794"/>
      <table:table table:name="Table93" table:style-name="Table93">
        <table:table-column table:style-name="Table93.A"/>
        <table:table-row>
          <table:table-cell table:style-name="Table93.A1" office:value-type="string">
            <text:p text:style-name="P186"><text:span text:style-name="T115">#include </text:span><text:span text:style-name="T116">&lt;unistd.h&gt;</text:span></text:p>
            <text:p text:style-name="P188"/>
            <text:p text:style-name="P186"><text:span text:style-name="T115">uid_t</text:span> <text:span text:style-name="T126">getuid</text:span>(<text:span text:style-name="T115">void</text:span>);</text:p>
            <text:p text:style-name="P186"><text:span text:style-name="T115">uid_t</text:span> <text:span text:style-name="T126">geteuid</text:span>(<text:span text:style-name="T115">void</text:span>);</text:p>
            <text:p text:style-name="P186"><text:span text:style-name="T115">int</text:span> <text:span text:style-name="T126">setuid</text:span>(<text:span text:style-name="T115">uid_t</text:span> <text:span text:style-name="T68">uid</text:span>);</text:p>
            <text:p text:style-name="P186"><text:span text:style-name="T115">int</text:span> <text:span text:style-name="T126">seteuid</text:span>(<text:span text:style-name="T115">uid_t</text:span> <text:span text:style-name="T68">euid</text:span>);</text:p>
            <text:p text:style-name="P186"><text:span text:style-name="T115">int</text:span> <text:span text:style-name="T126">setreuid</text:span>(<text:span text:style-name="T115">uid_t</text:span> <text:span text:style-name="T68">ruid</text:span>, <text:span text:style-name="T115">uid_t</text:span> <text:span text:style-name="T68">euid</text:span>);</text:p>
            <text:p text:style-name="P188"/>
            <text:p text:style-name="P218">#define _GNU_SOURCE </text:p>
            <text:p text:style-name="P186"><text:span text:style-name="T115">#include </text:span><text:span text:style-name="T116">&lt;unistd.h&gt;</text:span></text:p>
            <text:p text:style-name="P188"/>
            <text:p text:style-name="P186"><text:span text:style-name="T115">int</text:span> <text:span text:style-name="T126">setresuid</text:span>(<text:span text:style-name="T115">uid_t</text:span> <text:span text:style-name="T68">ruid</text:span>, <text:span text:style-name="T115">uid_t</text:span> <text:span text:style-name="T68">euid</text:span>, <text:span text:style-name="T115">uid_t</text:span> <text:span text:style-name="T68">suid</text:span>);</text:p>
            <text:p text:style-name="P802"/>
          </table:table-cell>
        </table:table-row>
      </table:table>
      <text:p text:style-name="P803"/>
      <text:p text:style-name="P801"><text:span text:style-name="T909">The return values and the arguments are the same as the groups functions, with the difference that the user related functions work with the </text:span><text:span text:style-name="T907">uid_t</text:span><text:span text:style-name="T909"> data type instead of </text:span><text:span text:style-name="T907">gid_t</text:span><text:span text:style-name="T909">.</text:span></text:p>
      <text:p text:style-name="P801"/>
      <text:p text:style-name="P801"/>
      <text:p text:style-name="P804">III.6.1 Setting user ID: getuid, geteuid, setuid and seteuid</text:p>
      <text:p text:style-name="P801"/>
      <text:p text:style-name="P644"><text:span text:style-name="T910">The </text:span><text:span text:style-name="T907">writeuserfile.c</text:span><text:span text:style-name="T910"> program </text:span>demonstrates how changing the effective user ID (EUID) and effective group ID (EGID) allows a process to access and modify a file owned by another user.</text:p>
      <text:p text:style-name="Horizontal_20_Line"/>
      <text:p text:style-name="P186"><text:span text:style-name="T911">1 </text:span><text:span text:style-name="T115">#include </text:span><text:span text:style-name="T116">&lt;stdio.h&gt;</text:span></text:p>
      <text:p text:style-name="P805"><text:span text:style-name="T911">2 </text:span><text:span text:style-name="T115">#include </text:span><text:span text:style-name="T116">&lt;stdlib.h&gt;</text:span></text:p>
      <text:p text:style-name="P805"><text:span text:style-name="T911">3 </text:span><text:span text:style-name="T115">#include </text:span><text:span text:style-name="T116">&lt;unistd.h&gt;</text:span></text:p>
      <text:p text:style-name="P805"><text:span text:style-name="T911">4 </text:span><text:span text:style-name="T115">#include </text:span><text:span text:style-name="T116">&lt;sys/types.h&gt;</text:span></text:p>
      <text:p text:style-name="P805"><text:span text:style-name="T911">5 </text:span><text:span text:style-name="T115">#include </text:span><text:span text:style-name="T116">&lt;pwd.h&gt;</text:span></text:p>
      <text:p text:style-name="P805"><text:span text:style-name="T911">6 </text:span><text:span text:style-name="T115">#include </text:span><text:span text:style-name="T116">&lt;fcntl.h&gt;</text:span></text:p>
      <text:p text:style-name="P805"><text:soft-page-break/><text:span text:style-name="T911">7 </text:span><text:span text:style-name="T115">#include </text:span><text:span text:style-name="T116">&lt;string.h&gt;</text:span></text:p>
      <text:p text:style-name="P188"/>
      <text:p text:style-name="P806"><text:span text:style-name="T912">8 </text:span><text:span text:style-name="T101">int</text:span><text:span text:style-name="T124"> main (</text:span><text:span text:style-name="T101">int</text:span><text:span text:style-name="T124"> argc, </text:span><text:span text:style-name="T101">char</text:span><text:span text:style-name="T124"> *argv</text:span><text:span text:style-name="T101">[]</text:span><text:span text:style-name="T124">) {</text:span></text:p>
      <text:p text:style-name="P805"><text:span text:style-name="T911">9 <text:tab/></text:span><text:span text:style-name="T115">if</text:span> (argc != <text:span text:style-name="T127">4</text:span>) {</text:p>
      <text:p text:style-name="P805"><text:span text:style-name="T911">10 <text:tab/><text:tab/></text:span>printf(<text:span text:style-name="T116">"\nUsage: %s &lt;filename&gt; &lt;username&gt; &lt;string&gt;"</text:span>, argv[<text:span text:style-name="T127">0</text:span>]);</text:p>
      <text:p text:style-name="P805"><text:span text:style-name="T911">11 <text:tab/><text:tab/></text:span>exit(<text:span text:style-name="T115">EXIT_FAILURE</text:span>);</text:p>
      <text:p text:style-name="P805"><text:span text:style-name="T911">12 <text:tab/></text:span>}</text:p>
      <text:p text:style-name="P188"/>
      <text:p text:style-name="P805"><text:span text:style-name="T911">13 <text:tab/></text:span><text:span text:style-name="T115">uid_t</text:span> neweuid;</text:p>
      <text:p text:style-name="P805"><text:span text:style-name="T911">14 <text:tab/></text:span><text:span text:style-name="T115">int</text:span> fd;</text:p>
      <text:p text:style-name="P805"><text:span text:style-name="T911">15 <text:tab/></text:span><text:span text:style-name="T115">size_t</text:span> bw;</text:p>
      <text:p text:style-name="P805"><text:span text:style-name="T911">16 <text:tab/></text:span><text:span text:style-name="T115">char</text:span> *buf = argv[<text:span text:style-name="T127">3</text:span>];</text:p>
      <text:p text:style-name="P807"><text:span text:style-name="T913">17 <text:tab/></text:span><text:span text:style-name="T103">struct</text:span><text:span text:style-name="T104"> </text:span><text:span text:style-name="T103">passwd</text:span><text:span text:style-name="T104"> *pw;</text:span></text:p>
      <text:p text:style-name="P188"/>
      <text:p text:style-name="P805"><text:span text:style-name="T911">18 <text:tab/></text:span>pw = <text:span text:style-name="T126">getpwnam</text:span>(argv[<text:span text:style-name="T127">2</text:span>]);</text:p>
      <text:p text:style-name="P805"><text:span text:style-name="T911">19 <text:tab/></text:span><text:span text:style-name="T115">if</text:span> (!pw) {</text:p>
      <text:p text:style-name="P805"><text:span text:style-name="T911">20 <text:tab/><text:tab/></text:span>perror(<text:span text:style-name="T116">"getpwnam"</text:span>);</text:p>
      <text:p text:style-name="P805"><text:span text:style-name="T911">21 <text:tab/><text:tab/></text:span>exit(<text:span text:style-name="T115">EXIT_FAILURE</text:span>);</text:p>
      <text:p text:style-name="P805"><text:span text:style-name="T911">22 <text:tab/></text:span>}</text:p>
      <text:p text:style-name="P188"/>
      <text:p text:style-name="P806"><text:span text:style-name="T912">23 <text:tab/></text:span><text:span text:style-name="T124">printf(</text:span><text:span text:style-name="T102">"\nOriginal EUID: %u EGID: %u"</text:span><text:span text:style-name="T124">, </text:span><text:span text:style-name="T216">geteuid</text:span><text:span text:style-name="T124">(), </text:span><text:span text:style-name="T216">getegid</text:span><text:span text:style-name="T124">());</text:span></text:p>
      <text:p text:style-name="P805"><text:span text:style-name="T911">24 <text:tab/></text:span><text:span text:style-name="T115">if</text:span> (<text:span text:style-name="T126">setegid</text:span>(pw-&gt;pw_gid) != <text:span text:style-name="T127">0</text:span>) {</text:p>
      <text:p text:style-name="P805"><text:span text:style-name="T911">25 <text:tab/><text:tab/></text:span>perror(<text:span text:style-name="T116">"setegid"</text:span>);</text:p>
      <text:p text:style-name="P805"><text:span text:style-name="T911">26 <text:tab/><text:tab/></text:span>exit(<text:span text:style-name="T115">EXIT_FAILURE</text:span>);</text:p>
      <text:p text:style-name="P805"><text:span text:style-name="T911">27 <text:tab/></text:span>}</text:p>
      <text:p text:style-name="P805"><text:span text:style-name="T911">28 <text:tab/></text:span><text:span text:style-name="T115">if</text:span> (<text:span text:style-name="T126">seteuid</text:span>(pw-&gt;pw_uid) != <text:span text:style-name="T127">0</text:span>) {</text:p>
      <text:p text:style-name="P805"><text:span text:style-name="T911">29 <text:tab/><text:tab/></text:span>perror(<text:span text:style-name="T116">"seteuid"</text:span>);</text:p>
      <text:p text:style-name="P805"><text:span text:style-name="T911">30 <text:tab/><text:tab/></text:span>exit(<text:span text:style-name="T115">EXIT_FAILURE</text:span>);</text:p>
      <text:p text:style-name="P805"><text:span text:style-name="T911">31 <text:tab/></text:span>}</text:p>
      <text:p text:style-name="P805"><text:span text:style-name="T911">32 <text:tab/></text:span>printf(<text:span text:style-name="T116">"\nNew EUID: %u EGID: %u"</text:span>, <text:span text:style-name="T126">geteuid</text:span>(), <text:span text:style-name="T126">getegid</text:span>());</text:p>
      <text:p text:style-name="P188"/>
      <text:p text:style-name="P805"><text:span text:style-name="T911">33 <text:tab/></text:span>fd = open(argv[<text:span text:style-name="T127">1</text:span>], <text:span text:style-name="T115">O_RDWR</text:span> | <text:span text:style-name="T115">O_APPEND</text:span>);</text:p>
      <text:p text:style-name="P805"><text:span text:style-name="T911">34 <text:tab/></text:span><text:span text:style-name="T115">if</text:span> (fd == -<text:span text:style-name="T127">1</text:span>) {</text:p>
      <text:p text:style-name="P805"><text:span text:style-name="T911">35 <text:tab/><text:tab/></text:span>perror(<text:span text:style-name="T116">"open"</text:span>);</text:p>
      <text:p text:style-name="P805"><text:span text:style-name="T911">36 <text:tab/><text:tab/></text:span>exit(<text:span text:style-name="T115">EXIT_FAILURE</text:span>);</text:p>
      <text:p text:style-name="P805"><text:span text:style-name="T911">37 <text:tab/></text:span>} <text:span text:style-name="T115">else</text:span> {</text:p>
      <text:p text:style-name="P805"><text:span text:style-name="T911">38 <text:tab/><text:tab/></text:span>printf(<text:span text:style-name="T116">"\nFile opened: %d"</text:span>, fd);</text:p>
      <text:p text:style-name="P806"><text:span text:style-name="T912">39 <text:tab/></text:span><text:span text:style-name="T124">}</text:span></text:p>
      <text:p text:style-name="P805"><text:span text:style-name="T911">40 <text:tab/></text:span>bw = write(fd, buf, strlen(buf));</text:p>
      <text:p text:style-name="P805"><text:span text:style-name="T911">41 <text:tab/></text:span><text:span text:style-name="T115">if</text:span> (bw == -<text:span text:style-name="T127">1</text:span>) {</text:p>
      <text:p text:style-name="P805"><text:span text:style-name="T911">42 <text:tab/><text:tab/></text:span>perror(<text:span text:style-name="T116">"write"</text:span>);</text:p>
      <text:p text:style-name="P805"><text:span text:style-name="T911">43 <text:tab/><text:tab/></text:span>exit(<text:span text:style-name="T115">EXIT_FAILURE</text:span>);</text:p>
      <text:p text:style-name="P806"><text:span text:style-name="T912">44 <text:tab/></text:span><text:span text:style-name="T124">}</text:span></text:p>
      <text:p text:style-name="P805"><text:span text:style-name="T911">45 <text:tab/></text:span>printf(<text:span text:style-name="T116">"\n%d bytes written into the file"</text:span>, bw);</text:p>
      <text:p text:style-name="P806"><text:span text:style-name="T912">46 <text:tab/></text:span><text:span text:style-name="T124">exit(</text:span><text:span text:style-name="T101">EXIT_SUCCESS</text:span><text:span text:style-name="T124">);</text:span></text:p>
      <text:p text:style-name="P806"><text:span text:style-name="T912">47 </text:span><text:span text:style-name="T124">}</text:span></text:p>
      <text:p text:style-name="Horizontal_20_Line"/>
      <text:p text:style-name="P808">writeuserfile.c</text:p>
      <text:p text:style-name="P809"/>
      <text:p text:style-name="Standard"><text:soft-page-break/><text:span text:style-name="Strong_20_Emphasis"><text:span text:style-name="T731">Line 18.</text:span></text:span><text:span text:style-name="T731"> Retrieves the user record from the user database (</text:span><text:span text:style-name="Source_20_Text"><text:span text:style-name="T221">/etc/passwd</text:span></text:span><text:span text:style-name="T731">) using </text:span><text:span text:style-name="Source_20_Text"><text:span text:style-name="T221">getpwnam</text:span></text:span><text:span text:style-name="T731"> to <text:tab/> <text:s/>obtain the target user’s UID and GID</text:span></text:p>
      <text:p text:style-name="Standard"><text:span text:style-name="Strong_20_Emphasis"><text:span text:style-name="T731">Line 24.</text:span></text:span><text:span text:style-name="T731"> Sets the effective group ID (EGID) of the process to the group ID of the specified user <text:tab/> <text:s text:c="2"/><text:tab/> <text:s/>using </text:span><text:span text:style-name="Source_20_Text"><text:span text:style-name="T221">setegid</text:span></text:span></text:p>
      <text:p text:style-name="Standard"><text:span text:style-name="Strong_20_Emphasis"><text:span text:style-name="T731">Line 28.</text:span></text:span><text:span text:style-name="T731"> Sets the effective user ID (EUID) of the process to the user ID of the specified user using <text:tab/> <text:s/></text:span><text:span text:style-name="Source_20_Text"><text:span text:style-name="T221">seteuid</text:span></text:span></text:p>
      <text:p text:style-name="P809"/>
      <text:p text:style-name="P810"><text:span text:style-name="T914">We</text:span><text:span text:style-name="T915"> create </text:span><text:span text:style-name="T914">the </text:span><text:span text:style-name="T915">file </text:span><text:span text:style-name="T916">newuserfile.txt</text:span><text:span text:style-name="T914"> in the </text:span><text:span text:style-name="T916">/tmp</text:span><text:span text:style-name="T914"> directory. </text:span></text:p>
      <text:p text:style-name="P811"/>
      <table:table table:name="Table96" table:style-name="Table96">
        <table:table-column table:style-name="Table96.A"/>
        <table:table-row>
          <table:table-cell table:style-name="Table96.A1" office:value-type="string">
            <text:p text:style-name="P81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17">echo hello &gt; /tmp/newuserfile.txt</text:span></text:p>
            <text:p text:style-name="P81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17">sudo chown newuser:newuser /tmp/newuserfile.txt</text:span></text:p>
            <text:p text:style-name="P813"><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17">sudo ch</text:span><text:span text:style-name="T918">mod 640</text:span><text:span text:style-name="T917"> /tmp/newuserfile.txt</text:span></text:p>
            <text:p text:style-name="P814"><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19">ls -l /tmp/newuserfile.txt</text:span></text:p>
            <text:p text:style-name="P813">-rw-r----- 1 newuser newuser 6 Jun 25 17:38 /tmp/newuserfile.txt</text:p>
            <text:p text:style-name="P813"/>
            <text:p text:style-name="P812"><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0">cat /tmp/newuserfile.txt</text:span></text:p>
            <text:p text:style-name="P812">cat: /tmp/newuserfile.txt: Permission denied</text:p>
            <text:p text:style-name="P812"/>
            <text:p text:style-name="P81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1">sudo </text:span><text:span text:style-name="T920">cat /tmp/newuserfile.</text:span><text:span text:style-name="T921">txt</text:span></text:p>
            <text:p text:style-name="P816">hello</text:p>
          </table:table-cell>
        </table:table-row>
      </table:table>
      <text:p text:style-name="P811"/>
      <text:p text:style-name="P644"><text:span text:style-name="T922">The </text:span><text:span text:style-name="T923">newuserfile.txt</text:span><text:span text:style-name="T922"> file is owned by the user </text:span><text:span text:style-name="T923">newuser</text:span><text:span text:style-name="T922"> and the group has the read permission set. If we try to read the file we </text:span><text:span text:style-name="T914">obtain</text:span><text:span text:style-name="T922"> a “Permission denied” </text:span><text:span text:style-name="T914">error </text:span><text:span text:style-name="T922">because the user </text:span><text:span text:style-name="T923">users</text:span><text:span text:style-name="T922"> is not in the group </text:span><text:span text:style-name="T923">newuser</text:span><text:span text:style-name="T922">. </text:span><text:span text:style-name="T924">If we try to read the file with </text:span><text:span text:style-name="T923">sudo</text:span><text:span text:style-name="T924">, </text:span><text:span text:style-name="T914">the execution succeeds</text:span><text:span text:style-name="T924">.</text:span></text:p>
      <text:p text:style-name="P817"/>
      <text:p text:style-name="P817"><text:span text:style-name="T905">We</text:span> write some <text:span text:style-name="T905">data</text:span> into the file. </text:p>
      <text:p text:style-name="P818"/>
      <table:table table:name="Table97" table:style-name="Table97">
        <table:table-column table:style-name="Table97.A"/>
        <table:table-row>
          <table:table-cell table:style-name="Table97.A1" office:value-type="string">
            <text:p text:style-name="P819"><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17">echo </text:span><text:span text:style-name="T925">world</text:span><text:span text:style-name="T917"> &gt;&gt; /tmp/newuserfile.txt</text:span></text:p>
            <text:p text:style-name="P820">zsh: permission denied: /tmp/newuserfile.txt</text:p>
            <text:p text:style-name="P820"/>
            <text:p text:style-name="P821"><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6">sudo </text:span><text:span text:style-name="T917">echo </text:span><text:span text:style-name="T925">world</text:span><text:span text:style-name="T917"> &gt;&gt; /tmp/newuserfile.txt</text:span></text:p>
            <text:p text:style-name="P821">zsh: permission denied: /tmp/newuserfile.txt</text:p>
          </table:table-cell>
        </table:table-row>
      </table:table>
      <text:p text:style-name="P818"/>
      <text:p text:style-name="P822">We obtain a “permission denied” error even when using <text:span text:style-name="T75">sudo</text:span> because we cannot modify a file owned by another user if write permissions are not granted<text:tab/> to others (or if appropriate privileges are not applied to the operation).</text:p>
      <text:p text:style-name="P801"><text:span text:style-name="T914">Hence, if we have </text:span><text:span text:style-name="Source_20_Text"><text:span text:style-name="T916">sudo</text:span></text:span><text:span text:style-name="T914"> access and want to modify this file, we must obtain the appropriate permissions of the file owner (or operate with sufficient elevated privileges that effectively bypass ownership restrictions).</text:span></text:p>
      <text:p text:style-name="P823"/>
      <text:p text:style-name="P801"><text:span text:style-name="T927">We execute the program </text:span><text:span text:style-name="T914">using</text:span><text:span text:style-name="T928"> </text:span><text:span text:style-name="T907">sudo</text:span><text:span text:style-name="T928"> </text:span></text:p>
      <text:p text:style-name="P823"/>
      <table:table table:name="Table98" table:style-name="Table98">
        <table:table-column table:style-name="Table98.A"/>
        <table:table-row>
          <table:table-cell table:style-name="Table98.A1" office:value-type="string">
            <text:p text:style-name="P824"><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9">sudo </text:span><text:span text:style-name="T80">./writeuserfile /tmp/newuserfile.txt </text:span><text:span text:style-name="T930">users</text:span><text:span text:style-name="T80"> one </text:span></text:p>
            <text:p text:style-name="P824">Original EUID: 1000 <text:s/>EGID: 1000</text:p>
            <text:p text:style-name="P825">open: Permission denied</text:p>
            <text:p text:style-name="P824">New EUID: 1000 <text:s/>EGID: 1000 <text:s/></text:p>
            <text:p text:style-name="P824"/>
            <text:p text:style-name="P826"><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9">sudo </text:span><text:span text:style-name="T80">./writeuserfile /tmp/newuserfile.txt </text:span><text:span text:style-name="T930">newuser</text:span><text:span text:style-name="T80"> </text:span><text:span text:style-name="T931">two</text:span></text:p>
            <text:p text:style-name="P826">Original EUID: 0 <text:s/>EGID: 0</text:p>
            <text:p text:style-name="P826">New EUID: 1005 <text:s/>EGID: 1005</text:p>
            <text:p text:style-name="P827"><text:soft-page-break/>File opened: 3</text:p>
            <text:p text:style-name="P826">3 bytes written into the file <text:s text:c="2"/></text:p>
            <text:p text:style-name="P826"/>
            <text:p text:style-name="P828"><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32">sudo cat /tmp/newuserfile.txt</text:span></text:p>
            <text:p text:style-name="P829">hello</text:p>
            <text:p text:style-name="P829">two</text:p>
            <text:p text:style-name="P826"/>
            <text:p text:style-name="P830"><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29">sudo </text:span><text:span text:style-name="T80">./writeuserfile /tmp/newuserfile.txt </text:span><text:span text:style-name="T933">root</text:span><text:span text:style-name="T80"> </text:span><text:span text:style-name="T931">t</text:span><text:span text:style-name="T934">hree</text:span></text:p>
            <text:p text:style-name="P828">Original EUID: 0 <text:s/>EGID: 0</text:p>
            <text:p text:style-name="P828">New EUID: 0 <text:s/>EGID: 0</text:p>
            <text:p text:style-name="P828">File opened: 3</text:p>
            <text:p text:style-name="P828">5 bytes written into the file <text:s text:c="3"/></text:p>
          </table:table-cell>
        </table:table-row>
      </table:table>
      <text:p text:style-name="P831"/>
      <text:p text:style-name="P831">As shown in the execution results, the program behaves differently depending on the target user used to set the effective UID and GID.</text:p>
      <text:p text:style-name="P801"><text:span text:style-name="T927">When attempting to use a regular user (e.g., </text:span><text:span text:style-name="Source_20_Text"><text:span text:style-name="T907">users</text:span></text:span><text:span text:style-name="T927">), the program fails to open the file due to insufficient permissions, even though it is executed with </text:span><text:span text:style-name="Source_20_Text"><text:span text:style-name="T907">sudo</text:span></text:span><text:span text:style-name="T927">, because the privilege change is not sufficient to match the file’s ownership and access rights.</text:span></text:p>
      <text:p text:style-name="P801"><text:span text:style-name="T927">When switching to </text:span><text:span text:style-name="Source_20_Text"><text:span text:style-name="T907">newuser</text:span></text:span><text:span text:style-name="T927">, the program successfully updates the effective UID and GID,</text:span></text:p>
      <text:p text:style-name="P801"><text:span text:style-name="T927">allowing the file to be opened and modified. The same occurs when switching to </text:span><text:span text:style-name="Source_20_Text"><text:span text:style-name="T907">root</text:span></text:span><text:span text:style-name="T927">, which has full access and can freely write to the file.</text:span></text:p>
      <text:p text:style-name="P801"><text:span text:style-name="T927">As a result, only users with appropriate privileges (or </text:span><text:span text:style-name="T907">root</text:span><text:span text:style-name="T927">) can successfully modify the file. The program itself must be executed with </text:span><text:span text:style-name="Source_20_Text"><text:span text:style-name="T907">sudo</text:span></text:span><text:span text:style-name="T927">, otherwise it cannot change the process’s effective UID and GID and therefore cannot perform privileged operations.</text:span></text:p>
      <text:p text:style-name="P832"/>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4"><text:soft-page-break/><text:span text:style-name="T935">III.6.2 </text:span><text:span text:style-name="T936">getresgid</text:span><text:span text:style-name="T935"> and </text:span><text:span text:style-name="T936">getresuid</text:span></text:p>
      <text:p text:style-name="Standard"/>
      <text:p text:style-name="P201"><text:span text:style-name="Strong_20_Emphasis"><text:span text:style-name="T230">The</text:span></text:span><text:span text:style-name="Strong_20_Emphasis"> </text:span><text:span text:style-name="Strong_20_Emphasis"><text:span text:style-name="T236">switcheuid.c</text:span></text:span> <text:span text:style-name="T937">program </text:span>is a modified version of <text:span text:style-name="Strong_20_Emphasis"><text:span text:style-name="T236">setgrouprog2.c</text:span></text:span> that uses <text:span text:style-name="Strong_20_Emphasis"><text:span text:style-name="T236">getresgid</text:span></text:span> and <text:span text:style-name="Strong_20_Emphasis"><text:span text:style-name="T236">getresuid</text:span></text:span> to retrieve real, effective, and saved user and group IDs, allowing more precise control over privilege switching.</text:p>
      <text:p text:style-name="Horizontal_20_Line"/>
      <text:p text:style-name="P186"><text:span text:style-name="T938">1 </text:span><text:span text:style-name="T115">#define _GNU_SOURCE</text:span></text:p>
      <text:p text:style-name="P835"><text:span text:style-name="T939">2</text:span><text:span text:style-name="T938"> </text:span><text:span text:style-name="T115">#include </text:span><text:span text:style-name="T116">&lt;stdlib.h&gt;</text:span></text:p>
      <text:p text:style-name="P835"><text:span text:style-name="T939">3</text:span><text:span text:style-name="T938"> </text:span><text:span text:style-name="T115">#include </text:span><text:span text:style-name="T116">&lt;stdio.h&gt;</text:span></text:p>
      <text:p text:style-name="P835"><text:span text:style-name="T939">4</text:span><text:span text:style-name="T938"> </text:span><text:span text:style-name="T115">#include </text:span><text:span text:style-name="T116">&lt;unistd.h&gt;</text:span></text:p>
      <text:p text:style-name="P835"><text:span text:style-name="T939">5</text:span><text:span text:style-name="T938"> </text:span><text:span text:style-name="T115">#include </text:span><text:span text:style-name="T116">&lt;fcntl.h&gt;</text:span></text:p>
      <text:p text:style-name="P836"><text:span text:style-name="T940">6</text:span><text:span text:style-name="T941"> </text:span><text:span text:style-name="T101">#include </text:span><text:span text:style-name="T102">&lt;sys/types.h&gt;</text:span></text:p>
      <text:p text:style-name="P837"/>
      <text:p text:style-name="P835"><text:span text:style-name="T939">7</text:span><text:span text:style-name="T938"> </text:span><text:span text:style-name="T115">int</text:span> openfile(<text:span text:style-name="T115">char</text:span> *filename) {</text:p>
      <text:p text:style-name="P836"><text:span text:style-name="T940">8</text:span><text:span text:style-name="T941"> <text:tab/></text:span><text:span text:style-name="T101">int</text:span><text:span text:style-name="T124"> fd;</text:span></text:p>
      <text:p text:style-name="P835"><text:span text:style-name="T939">9</text:span><text:span text:style-name="T938"> <text:tab/></text:span>fd = open(filename, <text:span text:style-name="T115">O_RDONLY</text:span>);</text:p>
      <text:p text:style-name="P835"><text:span text:style-name="T938">1</text:span><text:span text:style-name="T939">0</text:span><text:span text:style-name="T938"> <text:tab/></text:span><text:span text:style-name="T115">if</text:span> (fd &lt; <text:span text:style-name="T127">0</text:span>) {</text:p>
      <text:p text:style-name="P835"><text:span text:style-name="T938">1</text:span><text:span text:style-name="T939">1</text:span><text:span text:style-name="T938"> <text:tab/><text:tab/></text:span>perror(<text:span text:style-name="T116">"open"</text:span>);</text:p>
      <text:p text:style-name="P835"><text:span text:style-name="T938">1</text:span><text:span text:style-name="T939">2</text:span><text:span text:style-name="T938"> <text:tab/><text:tab/></text:span><text:span text:style-name="T115">return</text:span> <text:span text:style-name="T115">EXIT_FAILURE</text:span>;</text:p>
      <text:p text:style-name="P835"><text:span text:style-name="T938">1</text:span><text:span text:style-name="T939">3</text:span><text:span text:style-name="T938"> <text:tab/></text:span>} <text:span text:style-name="T115">else</text:span> {</text:p>
      <text:p text:style-name="P835"><text:span text:style-name="T938">1</text:span><text:span text:style-name="T939">4</text:span><text:span text:style-name="T938"> <text:tab/><text:tab/></text:span>close(fd);</text:p>
      <text:p text:style-name="P835"><text:span text:style-name="T938">1</text:span><text:span text:style-name="T939">5</text:span><text:span text:style-name="T938"> <text:tab/><text:tab/></text:span>printf(<text:span text:style-name="T116">"\nFile opened successfully\n"</text:span>);</text:p>
      <text:p text:style-name="P835"><text:span text:style-name="T938">1</text:span><text:span text:style-name="T939">6</text:span><text:span text:style-name="T938"> <text:tab/><text:tab/></text:span><text:span text:style-name="T115">return</text:span> <text:span text:style-name="T115">EXIT_SUCCESS</text:span>;</text:p>
      <text:p text:style-name="P835"><text:span text:style-name="T938">1</text:span><text:span text:style-name="T939">7</text:span><text:span text:style-name="T938"> <text:tab/></text:span>}</text:p>
      <text:p text:style-name="P835"><text:span text:style-name="T938">1</text:span><text:span text:style-name="T939">8</text:span><text:span text:style-name="T938"> </text:span>}</text:p>
      <text:p text:style-name="P188"/>
      <text:p text:style-name="P836"><text:span text:style-name="T941">1</text:span><text:span text:style-name="T940">9</text:span><text:span text:style-name="T941">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835"><text:span text:style-name="T938">2</text:span><text:span text:style-name="T939">0</text:span><text:span text:style-name="T938"> <text:tab/></text:span><text:span text:style-name="T115">if</text:span> (argc != <text:span text:style-name="T127">2</text:span>) {</text:p>
      <text:p text:style-name="P835"><text:span text:style-name="T938">2</text:span><text:span text:style-name="T939">1</text:span><text:span text:style-name="T938"> <text:tab/><text:tab/></text:span>printf(<text:span text:style-name="T116">"\nUsage %s &lt;filename&gt;"</text:span>, argv[<text:span text:style-name="T127">0</text:span>]);</text:p>
      <text:p text:style-name="P835"><text:span text:style-name="T938">2</text:span><text:span text:style-name="T939">2</text:span><text:span text:style-name="T938"> <text:tab/><text:tab/></text:span>exit(<text:span text:style-name="T115">EXIT_FAILURE</text:span>);</text:p>
      <text:p text:style-name="P835"><text:span text:style-name="T938">2</text:span><text:span text:style-name="T939">3</text:span><text:span text:style-name="T938"> <text:tab/></text:span>}</text:p>
      <text:p text:style-name="P188"/>
      <text:p text:style-name="P835"><text:span text:style-name="T938">2</text:span><text:span text:style-name="T939">4</text:span><text:span text:style-name="T938"> <text:tab/></text:span><text:span text:style-name="T115">char</text:span> *filename = argv[<text:span text:style-name="T127">1</text:span>];</text:p>
      <text:p text:style-name="P835"><text:span text:style-name="T938">2</text:span><text:span text:style-name="T939">5</text:span><text:span text:style-name="T938"> <text:tab/></text:span><text:span text:style-name="T115">gid_t</text:span> rgid, egid, sgid;</text:p>
      <text:p text:style-name="P835"><text:span text:style-name="T938">2</text:span><text:span text:style-name="T939">6</text:span><text:span text:style-name="T938"> <text:tab/></text:span><text:span text:style-name="T115">uid_t</text:span> ruid, euid, suid;</text:p>
      <text:p text:style-name="P188"/>
      <text:p text:style-name="P835"><text:span text:style-name="T938">2</text:span><text:span text:style-name="T939">7</text:span><text:span text:style-name="T938"> <text:tab/></text:span><text:span text:style-name="T115">if</text:span> (<text:span text:style-name="T126">getresgid</text:span>(&amp;rgid, &amp;egid, &amp;sgid) != <text:span text:style-name="T127">0</text:span>) {</text:p>
      <text:p text:style-name="P835"><text:span text:style-name="T938">2</text:span><text:span text:style-name="T939">8</text:span><text:span text:style-name="T938"> <text:tab/><text:tab/></text:span>perror(<text:span text:style-name="T116">"getresgid"</text:span>);</text:p>
      <text:p text:style-name="P835"><text:span text:style-name="T938">2</text:span><text:span text:style-name="T939">9</text:span><text:span text:style-name="T938"> <text:tab/><text:tab/></text:span>exit(<text:span text:style-name="T115">EXIT_FAILURE</text:span>);</text:p>
      <text:p text:style-name="P835"><text:span text:style-name="T938">3</text:span><text:span text:style-name="T939">0</text:span><text:span text:style-name="T938"> <text:tab/></text:span>}<text:tab/> </text:p>
      <text:p text:style-name="P835"><text:span text:style-name="T938">3</text:span><text:span text:style-name="T939">1</text:span><text:span text:style-name="T938"> <text:tab/></text:span><text:span text:style-name="T115">if</text:span> (<text:span text:style-name="T126">getresuid</text:span>(&amp;ruid, &amp;euid, &amp;suid) != <text:span text:style-name="T127">0</text:span>) {</text:p>
      <text:p text:style-name="P835"><text:span text:style-name="T938">3</text:span><text:span text:style-name="T939">2</text:span><text:span text:style-name="T938"> <text:tab/><text:tab/></text:span>perror(<text:span text:style-name="T116">"getresuid"</text:span>);</text:p>
      <text:p text:style-name="P835"><text:span text:style-name="T938">3</text:span><text:span text:style-name="T939">3</text:span><text:span text:style-name="T938"> <text:tab/><text:tab/></text:span>exit(<text:span text:style-name="T115">EXIT_FAILURE</text:span>);</text:p>
      <text:p text:style-name="P835"><text:span text:style-name="T938">3</text:span><text:span text:style-name="T939">4</text:span><text:span text:style-name="T938"> <text:tab/></text:span>}</text:p>
      <text:p text:style-name="P188"/>
      <text:p text:style-name="P835"><text:span text:style-name="T938">3</text:span><text:span text:style-name="T939">5</text:span><text:span text:style-name="T938"> <text:tab/></text:span>printf(<text:span text:style-name="T116">"\nReal GID: %u"</text:span>, rgid);</text:p>
      <text:p text:style-name="P835"><text:span text:style-name="T938">3</text:span><text:span text:style-name="T939">6</text:span><text:span text:style-name="T938"> <text:tab/></text:span>printf(<text:span text:style-name="T116">"\nEffective GID: %u"</text:span>, egid);</text:p>
      <text:p text:style-name="P835"><text:span text:style-name="T938">3</text:span><text:span text:style-name="T939">7</text:span><text:span text:style-name="T938"> <text:tab/></text:span>openfile(filename);</text:p>
      <text:p text:style-name="P188"/>
      <text:p text:style-name="P835"><text:span text:style-name="T938">3</text:span><text:span text:style-name="T939">8</text:span><text:span text:style-name="T938"> <text:tab/></text:span>printf(<text:span text:style-name="T116">"\nDropping privileges..."</text:span>);</text:p>
      <text:p text:style-name="P835"><text:soft-page-break/><text:span text:style-name="T938">3</text:span><text:span text:style-name="T939">9</text:span><text:span text:style-name="T938"> <text:tab/></text:span><text:span text:style-name="T126">setegid</text:span>(rgid);</text:p>
      <text:p text:style-name="P835"><text:span text:style-name="T938">4</text:span><text:span text:style-name="T939">0</text:span><text:span text:style-name="T938"> <text:tab/></text:span><text:span text:style-name="T126">seteuid</text:span>(ruid);</text:p>
      <text:p text:style-name="P835"><text:span text:style-name="T938">4</text:span><text:span text:style-name="T939">1</text:span><text:span text:style-name="T938"> <text:tab/></text:span>printf(<text:span text:style-name="T116">"\nReal GID: %u"</text:span>, <text:span text:style-name="T126">getgid</text:span>());</text:p>
      <text:p text:style-name="P835"><text:span text:style-name="T938">4</text:span><text:span text:style-name="T939">2</text:span><text:span text:style-name="T938"> <text:tab/></text:span>printf(<text:span text:style-name="T116">"\nEffective GID: %u"</text:span>, <text:span text:style-name="T126">getegid</text:span>());</text:p>
      <text:p text:style-name="P835"><text:span text:style-name="T938">4</text:span><text:span text:style-name="T939">3</text:span><text:span text:style-name="T938"> <text:tab/></text:span>printf(<text:span text:style-name="T116">"\nReal UID: %u"</text:span>, <text:span text:style-name="T126">getuid</text:span>());</text:p>
      <text:p text:style-name="P835"><text:span text:style-name="T938">4</text:span><text:span text:style-name="T939">4</text:span><text:span text:style-name="T938"> <text:tab/></text:span>printf(<text:span text:style-name="T116">"\nEffective UID: %u"</text:span>, <text:span text:style-name="T126">geteuid</text:span>());</text:p>
      <text:p text:style-name="P835"><text:span text:style-name="T938">4</text:span><text:span text:style-name="T939">5</text:span><text:span text:style-name="T938"> <text:tab/></text:span>openfile(filename);</text:p>
      <text:p text:style-name="P188"/>
      <text:p text:style-name="P835"><text:span text:style-name="T938">4</text:span><text:span text:style-name="T939">6</text:span><text:span text:style-name="T938"> <text:tab/></text:span>printf(<text:span text:style-name="T116">"\n\nRegain privileges..."</text:span>);</text:p>
      <text:p text:style-name="P835"><text:span text:style-name="T938">4</text:span><text:span text:style-name="T939">7</text:span><text:span text:style-name="T938"> <text:tab/></text:span><text:span text:style-name="T126">setegid</text:span>(sgid);</text:p>
      <text:p text:style-name="P836"><text:span text:style-name="T941">4</text:span><text:span text:style-name="T940">8</text:span><text:span text:style-name="T941"> <text:tab/></text:span><text:span text:style-name="T216">seteuid</text:span><text:span text:style-name="T124">(suid);</text:span></text:p>
      <text:p text:style-name="P835"><text:span text:style-name="T938">4</text:span><text:span text:style-name="T939">9</text:span><text:span text:style-name="T938"> <text:tab/></text:span>printf(<text:span text:style-name="T116">"\nReal GID: %u"</text:span>, <text:span text:style-name="T126">getgid</text:span>());</text:p>
      <text:p text:style-name="P835"><text:span text:style-name="T938">5</text:span><text:span text:style-name="T939">0</text:span><text:span text:style-name="T938"> <text:tab/></text:span>printf(<text:span text:style-name="T116">"\nEffective GID: %u"</text:span>, <text:span text:style-name="T126">getegid</text:span>());</text:p>
      <text:p text:style-name="P835"><text:span text:style-name="T938">5</text:span><text:span text:style-name="T939">1</text:span><text:span text:style-name="T938"> <text:tab/></text:span>printf(<text:span text:style-name="T116">"\nReal UID: %u"</text:span>, <text:span text:style-name="T126">getuid</text:span>());</text:p>
      <text:p text:style-name="P835"><text:span text:style-name="T938">5</text:span><text:span text:style-name="T939">2</text:span><text:span text:style-name="T938"> <text:tab/></text:span>printf(<text:span text:style-name="T116">"\nEffective UID: %u"</text:span>, <text:span text:style-name="T126">geteuid</text:span>());</text:p>
      <text:p text:style-name="P838"><text:span text:style-name="T941">5</text:span><text:span text:style-name="T940">3</text:span><text:span text:style-name="T941"> <text:tab/></text:span><text:span text:style-name="T124">openfile(filename);</text:span></text:p>
      <text:p text:style-name="P839"/>
      <text:p text:style-name="P835"><text:span text:style-name="T938">5</text:span><text:span text:style-name="T939">4</text:span><text:span text:style-name="T938"> <text:tab/></text:span>exit(<text:span text:style-name="T115">EXIT_SUCCESS</text:span>);</text:p>
      <text:p text:style-name="P836"><text:span text:style-name="T941">5</text:span><text:span text:style-name="T940">5</text:span><text:span text:style-name="T941"> </text:span><text:span text:style-name="T124">}</text:span></text:p>
      <text:p text:style-name="Horizontal_20_Line"/>
      <text:p text:style-name="P840">switcheuid.c</text:p>
      <text:p text:style-name="P840"/>
      <text:p text:style-name="Standard"><text:span text:style-name="Strong_20_Emphasis"><text:span text:style-name="T220">Line 27.</text:span></text:span><text:span text:style-name="T220"> Retrieves the real, effective, and saved group IDs using </text:span><text:span text:style-name="Source_20_Text"><text:span text:style-name="T221">getresgid</text:span></text:span></text:p>
      <text:p text:style-name="Standard"><text:span text:style-name="Strong_20_Emphasis"><text:span text:style-name="T220">Line 31.</text:span></text:span><text:span text:style-name="T220"> Retrieves the real, effective, and saved user IDs using </text:span><text:span text:style-name="Source_20_Text"><text:span text:style-name="T221">getresuid</text:span></text:span></text:p>
      <text:p text:style-name="Standard"><text:span text:style-name="Strong_20_Emphasis"><text:span text:style-name="T220">Line 35–37.</text:span></text:span><text:span text:style-name="T220"> Attempts to open the file using the current effective privileges</text:span></text:p>
      <text:p text:style-name="Standard"><text:span text:style-name="Strong_20_Emphasis"><text:span text:style-name="T220">Line 38–45.</text:span></text:span><text:span text:style-name="T220"> Drops privileges by setting the effective UID and GID to the real ones, then attempts <text:tab/> <text:s text:c="8"/>again to open the file with reduced permissions</text:span></text:p>
      <text:p text:style-name="Standard"><text:span text:style-name="Strong_20_Emphasis"><text:span text:style-name="T220">Line 46–53.</text:span></text:span><text:span text:style-name="T220"> Restores the saved privileges (saved UID and GID) and retries opening the file with <text:tab/> <text:s text:c="8"/>elevated permissions</text:span></text:p>
      <text:p text:style-name="P841"/>
      <text:p text:style-name="P842"><text:span text:style-name="T942">We exec</text:span>ute the program </text:p>
      <text:p text:style-name="P842"/>
      <table:table table:name="Table94" table:style-name="Table94">
        <table:table-column table:style-name="Table94.A"/>
        <table:table-row>
          <table:table-cell table:style-name="Table94.A1" office:value-type="string">
            <text:p text:style-name="P843"><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943">ls -l rootfile.txt </text:span></text:p>
            <text:p text:style-name="P843">-rw-r----- 1 root root 6 Jun 25 03:04 rootfile.txt</text:p>
            <text:p text:style-name="P843"/>
            <text:p text:style-name="P843"><text:span text:style-name="T80">[</text:span><text:a xlink:type="simple" xlink:href="mailto:linux@users" text:style-name="Internet_20_link" text:visited-style-name="Visited_20_Internet_20_Link"><text:span text:style-name="T81">linux@</text:span><text:span text:style-name="T342">users</text:span></text:a><text:span text:style-name="T80">] sudo chown root:root switcheuid</text:span></text:p>
            <text:p text:style-name="P843"><text:span text:style-name="T80">[</text:span><text:a xlink:type="simple" xlink:href="mailto:linux@users" text:style-name="Internet_20_link" text:visited-style-name="Visited_20_Internet_20_Link"><text:span text:style-name="T81">linux@users</text:span></text:a><text:span text:style-name="T80">] sudo chmod +s switcheuid</text:span></text:p>
            <text:p text:style-name="P843"/>
            <text:p text:style-name="P843"><text:span text:style-name="T80">[</text:span><text:a xlink:type="simple" xlink:href="mailto:linux@users" text:style-name="Internet_20_link" text:visited-style-name="Visited_20_Internet_20_Link"><text:span text:style-name="T81">linux@users</text:span></text:a><text:span text:style-name="T80">] ./</text:span><text:span text:style-name="T943">switcheuid ./rootfile.</text:span><text:span text:style-name="T944">txt</text:span></text:p>
            <text:p text:style-name="P843">Real GID: 1000</text:p>
            <text:p text:style-name="P843">Effective GID: 0</text:p>
            <text:p text:style-name="P844">File opened successfully</text:p>
            <text:p text:style-name="P843"/>
            <text:p text:style-name="P843">Dropping privileges...</text:p>
            <text:p text:style-name="P843">Real GID: 1000</text:p>
            <text:p text:style-name="P844">Effective GID: 1000</text:p>
            <text:p text:style-name="P843">Real UID: 1000</text:p>
            <text:p text:style-name="P844">open: Permission denied</text:p>
            <text:p text:style-name="P844">Effective UID: 1000</text:p>
            <text:p text:style-name="P843"/>
            <text:p text:style-name="P843">Regain privileges...</text:p>
            <text:p text:style-name="P843"><text:soft-page-break/>Real GID: 1000</text:p>
            <text:p text:style-name="P844">Effective GID: 0</text:p>
            <text:p text:style-name="P843">Real UID: 1000</text:p>
            <text:p text:style-name="P844">Effective UID: 0</text:p>
            <text:p text:style-name="P844">File opened successfully</text:p>
            <text:p text:style-name="P843"/>
          </table:table-cell>
        </table:table-row>
      </table:table>
      <text:p text:style-name="P842"/>
      <text:p text:style-name="P845"><text:span text:style-name="T945">The program is executed on a </text:span><text:span text:style-name="T946">root</text:span><text:span text:style-name="T945">-owned file with restricted permissions (</text:span><text:span text:style-name="Source_20_Text"><text:span text:style-name="T946">rw-r-----</text:span></text:span><text:span text:style-name="T945">), meaning only the owner (</text:span><text:span text:style-name="T946">root</text:span><text:span text:style-name="T945">) can access it.</text:span></text:p>
      <text:p text:style-name="P845"><text:span text:style-name="T945">Initially, the program runs with elevated privileges (EUID=0, EGID=0 due to the setuid/setgid bits), allowing the file to be opened successfully. After dropping privileges by setting the effective UID and GID to the real ones, access is denied (</text:span><text:span text:style-name="Source_20_Text"><text:span text:style-name="T947">Permission denied</text:span></text:span><text:span text:style-name="T945">) because the process is now running as a normal user.</text:span></text:p>
      <text:p text:style-name="P845"><text:span text:style-name="T945">When privileges are restored using the saved IDs, the process regains </text:span><text:span text:style-name="T946">root</text:span><text:span text:style-name="T945">-level access (EUID=0, EGID=0), and the file is successfully opened again.</text:span></text:p>
      <text:p text:style-name="P845"><text:span text:style-name="T945">This demonstrates how </text:span><text:span text:style-name="Source_20_Text"><text:span text:style-name="T946">getresuid</text:span></text:span><text:span text:style-name="T945"> and </text:span><text:span text:style-name="Source_20_Text"><text:span text:style-name="T946">getresgid</text:span></text:span><text:span text:style-name="Source_20_Text"><text:span text:style-name="T945">()</text:span></text:span><text:span text:style-name="T945"> allow a program to correctly track and restore real, effective, and saved privileges, enabling controlled privilege dropping and re-acquisition during execution.</text:span></text:p>
      <text:p text:style-name="P800"/>
      <text:p text:style-name="P8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47"><text:soft-page-break/><text:span text:style-name="T948">III.</text:span><text:span text:style-name="T949">7 </text:span><text:span text:style-name="T950">The </text:span><text:span text:style-name="T951">Password </text:span><text:span text:style-name="T950">D</text:span><text:span text:style-name="T951">atabase: </text:span><text:span text:style-name="T952">/etc/shadow</text:span></text:p>
      <text:p text:style-name="P594"/>
      <text:p text:style-name="P848">The <text:span text:style-name="T75">/etc/shadow</text:span><text:span text:style-name="T75"><text:note text:id="ftn69" text:note-class="footnote"><text:note-citation>67</text:note-citation><text:note-body><text:p text:style-name="P849"><text:span text:style-name="T953">See the </text:span><text:span text:style-name="T954">shadow(5)</text:span><text:span text:style-name="T955"> manual page</text:span></text:p></text:note-body></text:note></text:span> file contains the <text:span text:style-name="T956">encrypted passwords of the users and the aging data. </text:span><text:span text:style-name="T957">The functions</text:span><text:span text:style-name="T957"><text:note text:id="ftn70" text:note-class="footnote"><text:note-citation>68</text:note-citation><text:note-body><text:p text:style-name="P849"><text:span text:style-name="T958">See the </text:span><text:span text:style-name="T959">getspnam(3)</text:span><text:span text:style-name="T955"> manual page</text:span></text:p></text:note-body></text:note></text:span><text:span text:style-name="T957"> to work with the database are analogous to those related to the user database.</text:span></text:p>
      <text:p text:style-name="P848"/>
      <table:table table:name="Table99" table:style-name="Table99">
        <table:table-column table:style-name="Table99.A"/>
        <table:table-row>
          <table:table-cell table:style-name="Table99.A1" office:value-type="string">
            <text:p text:style-name="P271"><text:span text:style-name="T115">#include </text:span><text:span text:style-name="T116">&lt;shadow.h&gt;</text:span></text:p>
            <text:p text:style-name="P188"/>
            <text:p text:style-name="P850"><text:span text:style-name="T960">struct</text:span><text:span text:style-name="T879"> </text:span><text:span text:style-name="T960">spwd</text:span><text:span text:style-name="T879"> *</text:span><text:span text:style-name="T880">getspnam</text:span><text:span text:style-name="T879">(</text:span><text:span text:style-name="T960">const</text:span><text:span text:style-name="T879"> </text:span><text:span text:style-name="T960">char</text:span><text:span text:style-name="T879"> </text:span><text:span text:style-name="T961">*name</text:span><text:span text:style-name="T879">);</text:span></text:p>
            <text:p text:style-name="P850"><text:span text:style-name="T960">struct</text:span><text:span text:style-name="T879"> </text:span><text:span text:style-name="T960">spwd</text:span><text:span text:style-name="T879"> *</text:span><text:span text:style-name="T880">getspent</text:span><text:span text:style-name="T879">(</text:span><text:span text:style-name="T960">void</text:span><text:span text:style-name="T879">);</text:span></text:p>
            <text:p text:style-name="P188"/>
            <text:p text:style-name="P186"><text:span text:style-name="T115">void</text:span> <text:span text:style-name="T126">setspent</text:span>(<text:span text:style-name="T115">void</text:span>);</text:p>
            <text:p text:style-name="P186"><text:span text:style-name="T115">void</text:span> <text:span text:style-name="T126">endspent</text:span>(<text:span text:style-name="T115">void</text:span>);</text:p>
            <text:p text:style-name="P188"/>
            <text:p text:style-name="P850"><text:span text:style-name="T960">struct</text:span><text:span text:style-name="T879"> </text:span><text:span text:style-name="T960">spwd</text:span><text:span text:style-name="T879"> *</text:span><text:span text:style-name="T880">fgetspent</text:span><text:span text:style-name="T879">(</text:span><text:span text:style-name="T960">FILE</text:span><text:span text:style-name="T879"> </text:span><text:span text:style-name="T961">*stream</text:span><text:span text:style-name="T879">);</text:span></text:p>
            <text:p text:style-name="P850"><text:span text:style-name="T960">struct</text:span><text:span text:style-name="T879"> </text:span><text:span text:style-name="T960">spwd</text:span><text:span text:style-name="T879"> *</text:span><text:span text:style-name="T880">sgetspent</text:span><text:span text:style-name="T879">(</text:span><text:span text:style-name="T960">const</text:span><text:span text:style-name="T879"> </text:span><text:span text:style-name="T960">char</text:span><text:span text:style-name="T879"> </text:span><text:span text:style-name="T961">*s</text:span><text:span text:style-name="T879">);</text:span></text:p>
            <text:p text:style-name="P188"/>
            <text:p text:style-name="P850"><text:span text:style-name="T960">int</text:span><text:span text:style-name="T879"> </text:span><text:span text:style-name="T880">putspent</text:span><text:span text:style-name="T879">(</text:span><text:span text:style-name="T960">const</text:span><text:span text:style-name="T879"> </text:span><text:span text:style-name="T960">struct</text:span><text:span text:style-name="T879"> </text:span><text:span text:style-name="T960">spwd</text:span><text:span text:style-name="T879"> </text:span><text:span text:style-name="T961">*p</text:span><text:span text:style-name="T879">, </text:span><text:span text:style-name="T960">FILE</text:span><text:span text:style-name="T879"> </text:span><text:span text:style-name="T961">*stream</text:span><text:span text:style-name="T879">);</text:span></text:p>
            <text:p text:style-name="P188"/>
            <text:p text:style-name="P186"><text:span text:style-name="T115">int</text:span> <text:span text:style-name="T126">lckpwdf</text:span>(<text:span text:style-name="T115">void</text:span>);</text:p>
            <text:p text:style-name="P186"><text:span text:style-name="T115">int</text:span> <text:span text:style-name="T126">ulckpwdf</text:span>(<text:span text:style-name="T115">void</text:span>);</text:p>
            <text:p text:style-name="P188"/>
            <text:p text:style-name="P851"><text:s text:c="26"/>/* GNU extension */</text:p>
            <text:p text:style-name="P186"><text:span text:style-name="T115">#include </text:span><text:span text:style-name="T116">&lt;shadow.h&gt;</text:span></text:p>
            <text:p text:style-name="P188"/>
            <text:p text:style-name="P852"><text:span text:style-name="T960">int</text:span><text:span text:style-name="T879"> </text:span><text:span text:style-name="T880">getspent_r</text:span><text:span text:style-name="T879">(</text:span><text:span text:style-name="T960">struct</text:span><text:span text:style-name="T879"> </text:span><text:span text:style-name="T960">spwd</text:span><text:span text:style-name="T879"> </text:span><text:span text:style-name="T961">*spbuf</text:span><text:span text:style-name="T879">, </text:span><text:span text:style-name="T960">char</text:span><text:span text:style-name="T879"> </text:span><text:span text:style-name="T961">buf[.buflen]</text:span><text:span text:style-name="T879">, </text:span><text:span text:style-name="T960">size_t</text:span><text:span text:style-name="T879"> </text:span><text:span text:style-name="T961">buflen</text:span><text:span text:style-name="T879">, </text:span></text:p>
            <text:p text:style-name="P852"><text:span text:style-name="T879"><text:s text:c="15"/></text:span><text:span text:style-name="T960">struct</text:span><text:span text:style-name="T879"> </text:span><text:span text:style-name="T960">spwd</text:span><text:span text:style-name="T879"> </text:span><text:span text:style-name="T961">**spbufp</text:span><text:span text:style-name="T879">);</text:span></text:p>
            <text:p text:style-name="P853"><text:span text:style-name="T960">int</text:span><text:span text:style-name="T879"> </text:span><text:span text:style-name="T880">getspnam_r</text:span><text:span text:style-name="T879">(</text:span><text:span text:style-name="T960">const</text:span><text:span text:style-name="T879"> </text:span><text:span text:style-name="T960">char</text:span><text:span text:style-name="T879"> </text:span><text:span text:style-name="T961">*name</text:span><text:span text:style-name="T879">, </text:span><text:span text:style-name="T960">struct</text:span><text:span text:style-name="T879"> </text:span><text:span text:style-name="T960">spwd</text:span><text:span text:style-name="T879"> </text:span><text:span text:style-name="T961">*spbuf</text:span><text:span text:style-name="T879">, </text:span><text:span text:style-name="T960">char</text:span><text:span text:style-name="T879"> </text:span><text:span text:style-name="T961">buf[.buflen]</text:span><text:span text:style-name="T879">, </text:span></text:p>
            <text:p text:style-name="P853"><text:span text:style-name="T879"><text:s text:c="15"/></text:span><text:span text:style-name="T960">size_t</text:span><text:span text:style-name="T879"> </text:span><text:span text:style-name="T961">buflen</text:span><text:span text:style-name="T879">, </text:span><text:span text:style-name="T960">struct</text:span><text:span text:style-name="T879"> </text:span><text:span text:style-name="T960">spwd</text:span><text:span text:style-name="T879"> </text:span><text:span text:style-name="T961">**spbufp</text:span><text:span text:style-name="T879">);</text:span></text:p>
            <text:p text:style-name="P188"/>
            <text:p text:style-name="P852"><text:span text:style-name="T960">int</text:span><text:span text:style-name="T879"> </text:span><text:span text:style-name="T880">fgetspent_r</text:span><text:span text:style-name="T879">(</text:span><text:span text:style-name="T960">FILE</text:span><text:span text:style-name="T879"> </text:span><text:span text:style-name="T961">*stream</text:span><text:span text:style-name="T879">, </text:span><text:span text:style-name="T960">struct</text:span><text:span text:style-name="T879"> </text:span><text:span text:style-name="T960">spwd</text:span><text:span text:style-name="T879"> </text:span><text:span text:style-name="T961">*spbuf</text:span><text:span text:style-name="T879">, </text:span><text:span text:style-name="T960">char</text:span><text:span text:style-name="T879"> </text:span><text:span text:style-name="T961">buf[.buflen]</text:span><text:span text:style-name="T879">, </text:span></text:p>
            <text:p text:style-name="P854"><text:span text:style-name="T104"><text:s text:c="16"/></text:span><text:span text:style-name="T103">size_t</text:span><text:span text:style-name="T104"> </text:span><text:span text:style-name="T106">buflen</text:span><text:span text:style-name="T104">, </text:span><text:span text:style-name="T103">struct</text:span><text:span text:style-name="T104"> </text:span><text:span text:style-name="T103">spwd</text:span><text:span text:style-name="T104"> </text:span><text:span text:style-name="T106">**spbufp</text:span><text:span text:style-name="T104">);</text:span></text:p>
            <text:p text:style-name="P853"><text:span text:style-name="T960">int</text:span><text:span text:style-name="T879"> </text:span><text:span text:style-name="T880">sgetspent_r</text:span><text:span text:style-name="T879">(</text:span><text:span text:style-name="T960">const</text:span><text:span text:style-name="T879"> </text:span><text:span text:style-name="T960">char</text:span><text:span text:style-name="T879"> </text:span><text:span text:style-name="T961">*s</text:span><text:span text:style-name="T879">, </text:span><text:span text:style-name="T960">struct</text:span><text:span text:style-name="T879"> </text:span><text:span text:style-name="T960">spwd</text:span><text:span text:style-name="T879"> </text:span><text:span text:style-name="T961">*spbuf</text:span><text:span text:style-name="T879">, </text:span><text:span text:style-name="T960">char</text:span><text:span text:style-name="T879"> </text:span><text:span text:style-name="T961">buf[.buflen]</text:span><text:span text:style-name="T879">, </text:span></text:p>
            <text:p text:style-name="P853"><text:span text:style-name="T879"><text:s text:c="16"/></text:span><text:span text:style-name="T960">size_t</text:span><text:span text:style-name="T879"> </text:span><text:span text:style-name="T961">buflen</text:span><text:span text:style-name="T879">, </text:span><text:span text:style-name="T960">struct</text:span><text:span text:style-name="T879"> </text:span><text:span text:style-name="T960">spwd</text:span><text:span text:style-name="T879"> </text:span><text:span text:style-name="T961">**spbufp</text:span><text:span text:style-name="T879">);</text:span></text:p>
            <text:p text:style-name="P855"/>
            <text:p text:style-name="P856">Return: a pointer to a spwd struct, NULL if no match or if error</text:p>
            <text:p text:style-name="P856"><text:s text:c="8"/>0 on success, <text:span text:style-name="T962">o</text:span>n error -<text:span text:style-name="T962">1 </text:span>and errno</text:p>
          </table:table-cell>
        </table:table-row>
      </table:table>
      <text:p text:style-name="P594"/>
      <text:p text:style-name="P857"><text:span text:style-name="T963">The </text:span><text:span text:style-name="T964">getspnam</text:span><text:span text:style-name="T963"> function returns a pointer to a structure containing the broken-out fields of the record in the shadow password database that matches the username </text:span><text:span text:style-name="T964">name</text:span><text:span text:style-name="T963">.</text:span></text:p>
      <text:p text:style-name="P857"><text:span text:style-name="T965">T</text:span><text:span text:style-name="T963">he </text:span><text:span text:style-name="T964">getspent</text:span><text:span text:style-name="T963"> function returns a pointer to the next entry in the shadow password database. <text:s/>The position in the input stream is initialized by </text:span><text:span text:style-name="T964">setspent</text:span><text:span text:style-name="T963">. When </text:span><text:span text:style-name="T965">the </text:span><text:span text:style-name="T963">reading </text:span><text:span text:style-name="T965">is finished</text:span><text:span text:style-name="T963">, the program may call </text:span><text:span text:style-name="T964">endspent</text:span><text:span text:style-name="T963"> </text:span><text:span text:style-name="T965">to </text:span><text:span text:style-name="T963">deallocate </text:span><text:span text:style-name="T965">the resources.</text:span></text:p>
      <text:p text:style-name="P857"><text:span text:style-name="T963">The </text:span><text:span text:style-name="T964">fgetspent</text:span><text:span text:style-name="T963"> function is similar to </text:span><text:span text:style-name="T964">getspent</text:span><text:span text:style-name="T963"> but uses </text:span><text:span text:style-name="T965">a</text:span><text:span text:style-name="T963"> stream instead of the one implicitly opened by </text:span><text:span text:style-name="T964">setspent</text:span><text:span text:style-name="T963">.</text:span></text:p>
      <text:p text:style-name="P857"><text:span text:style-name="T963">The </text:span><text:span text:style-name="T964">sgetspent</text:span><text:span text:style-name="T963"> function parses the string </text:span><text:span text:style-name="T964">s</text:span><text:span text:style-name="T963"> into a struct </text:span><text:span text:style-name="T964">spwd</text:span><text:span text:style-name="T963">.</text:span></text:p>
      <text:p text:style-name="P857"><text:span text:style-name="T963">The <text:s/></text:span><text:span text:style-name="T964">putspent</text:span><text:span text:style-name="T963"> <text:s/>function <text:s/>writes the contents of the supplied struct </text:span><text:span text:style-name="T964">spwd</text:span><text:span text:style-name="T963"> </text:span><text:span text:style-name="T964">*p</text:span><text:span text:style-name="T963"> as a text line in the shadow password file format to </text:span><text:span text:style-name="T965">the file</text:span><text:span text:style-name="T963"> </text:span><text:span text:style-name="T964">stream</text:span><text:span text:style-name="T963">. <text:s/>String entries with value </text:span><text:span text:style-name="T964">NULL</text:span><text:span text:style-name="T963"> and numerical entries with value </text:span><text:span text:style-name="T964">-1</text:span><text:span text:style-name="T963"> are written as an empty string.</text:span></text:p>
      <text:p text:style-name="P857"><text:soft-page-break/><text:span text:style-name="T963">The </text:span><text:span text:style-name="T964">lckpwdf</text:span><text:span text:style-name="T963"> function is intended to protect against multiple simultaneous accesses of the shadow password database. It tries to acquire a lock and returns 0 on success or -1 on failure (lock not obtained within 15 seconds). </text:span></text:p>
      <text:p text:style-name="P857"><text:span text:style-name="T963">The </text:span><text:span text:style-name="T964">ulckpwdf</text:span><text:span text:style-name="T963"> function releases the lock again. </text:span><text:span text:style-name="T965">T</text:span><text:span text:style-name="T963">here is no protection against direct access of the shadow password file </text:span><text:span text:style-name="T965">and o</text:span><text:span text:style-name="T963">nly programs that use </text:span><text:span text:style-name="T964">lckpwdf</text:span><text:span text:style-name="T963"> will notice the lock.</text:span></text:p>
      <text:p text:style-name="P857"><text:span text:style-name="T963">The </text:span><text:span text:style-name="T964">getspnam_r</text:span><text:span text:style-name="T963"> function is like </text:span><text:span text:style-name="T964">getspnam</text:span><text:span text:style-name="T963"> but stores the retrieved shadow password structure in the space pointed to by </text:span><text:span text:style-name="T964">spbuf</text:span><text:span text:style-name="T963">. <text:s/>This shadow password structure contains pointers to strings, and these strings are stored in the buffer </text:span><text:span text:style-name="T964">buf</text:span><text:span text:style-name="T963"> of size </text:span><text:span text:style-name="T964">buflen</text:span><text:span text:style-name="T963">. A pointer to the result (in case of success) or </text:span><text:span text:style-name="T964">NULL</text:span><text:span text:style-name="T963"> (in case no entry was found or an error occurred) is stored in </text:span><text:span text:style-name="T964">*spbufp</text:span><text:span text:style-name="T963">.</text:span></text:p>
      <text:p text:style-name="P857"><text:span text:style-name="T966">T</text:span><text:span text:style-name="T967">he functions </text:span><text:span text:style-name="T964">getspent_r</text:span><text:span text:style-name="T967">, </text:span><text:span text:style-name="T964">fgetspent_r</text:span><text:span text:style-name="T967">, and </text:span><text:span text:style-name="T964">sgetspent_r</text:span><text:span text:style-name="T967"> are similarly analogous to their nonreentrant counterparts.</text:span></text:p>
      <text:p text:style-name="P858"/>
      <text:p text:style-name="P857"><text:span text:style-name="T968">The </text:span><text:span text:style-name="T964">spwd</text:span><text:span text:style-name="T968"> structure (</text:span><text:span text:style-name="T969">shadow password</text:span><text:span text:style-name="T968">) is defined in the </text:span><text:span text:style-name="T964">shadow.h</text:span><text:span text:style-name="T968"> </text:span><text:span text:style-name="T970">header file </text:span><text:span text:style-name="T968">as follow</text:span><text:span text:style-name="T970">s.</text:span></text:p>
      <text:p text:style-name="P859"/>
      <table:table table:name="Table100" table:style-name="Table100">
        <table:table-column table:style-name="Table100.A"/>
        <table:table-row>
          <table:table-cell table:style-name="Table100.A1" office:value-type="string">
            <text:p text:style-name="P554"><text:span text:style-name="T115">struct</text:span> spwd {</text:p>
            <text:p text:style-name="P516"><text:span text:style-name="T115"><text:s text:c="4"/>char</text:span> *sp_namp;<text:span text:style-name="T119"> <text:s text:c="8"/></text:span><text:span text:style-name="T971">/* Login name */</text:span></text:p>
            <text:p text:style-name="P229"><text:span text:style-name="T267"><text:s text:c="4"/>char</text:span><text:span text:style-name="T268"> *sp_pwdp;</text:span><text:span text:style-name="T972"> <text:s text:c="8"/></text:span><text:span text:style-name="T973">/* Encrypted password */</text:span></text:p>
            <text:p text:style-name="P229"><text:span text:style-name="T267"><text:s text:c="4"/>long</text:span><text:span text:style-name="T268"> sp_lstchg;</text:span><text:span text:style-name="T972"> <text:s text:c="7"/></text:span><text:span text:style-name="T973">/* Date of last change (measured in days since Epoch) */</text:span></text:p>
            <text:p text:style-name="P229"><text:span text:style-name="T267"><text:s text:c="4"/>long</text:span><text:span text:style-name="T268"> sp_min;</text:span><text:span text:style-name="T972"> <text:s text:c="10"/></text:span><text:span text:style-name="T973">/* Min # of days between changes */</text:span></text:p>
            <text:p text:style-name="P229"><text:span text:style-name="T267"><text:s text:c="4"/>long</text:span><text:span text:style-name="T268"> sp_max;</text:span><text:span text:style-name="T972"> <text:s text:c="10"/></text:span><text:span text:style-name="T973">/* Max # of days between changes */</text:span></text:p>
            <text:p text:style-name="P229"><text:span text:style-name="T267"><text:s text:c="4"/>long</text:span><text:span text:style-name="T268"> sp_warn;</text:span><text:span text:style-name="T972"> </text:span><text:span text:style-name="T973">/* # of days before password expires to warn user to change it */</text:span></text:p>
            <text:p text:style-name="P229"><text:span text:style-name="T267"><text:s text:c="4"/>long</text:span><text:span text:style-name="T268"> sp_inact;</text:span><text:span text:style-name="T972"> <text:s/></text:span><text:span text:style-name="T973">/* # of days after password expires until account is disabled */</text:span></text:p>
            <text:p text:style-name="P229"><text:span text:style-name="T267"><text:s text:c="4"/>long</text:span><text:span text:style-name="T268"> sp_expire;</text:span><text:span text:style-name="T972"> <text:s text:c="2"/></text:span><text:span text:style-name="T973">/* Date when account expires (measured in days since Epoch) */</text:span></text:p>
            <text:p text:style-name="P229"><text:span text:style-name="T267"><text:s text:c="4"/>unsigned</text:span><text:span text:style-name="T268"> </text:span><text:span text:style-name="T267">long</text:span><text:span text:style-name="T268"> sp_flag;</text:span><text:span text:style-name="T972"> </text:span><text:span text:style-name="T973">/* Reserved */</text:span></text:p>
            <text:p text:style-name="P516">};</text:p>
          </table:table-cell>
        </table:table-row>
      </table:table>
      <text:p text:style-name="P860"/>
      <text:p text:style-name="P857"><text:span text:style-name="T974">In the </text:span><text:span text:style-name="T964">paths.h</text:span><text:span text:style-name="T974"> </text:span><text:span text:style-name="T970">header file, t</text:span><text:span text:style-name="T974">he constant </text:span><text:span text:style-name="T964">_PATH_SHADOW</text:span><text:span text:style-name="T974"> </text:span><text:span text:style-name="T970">is defined and it specifies</text:span><text:span text:style-name="T974"> the pathname of the </text:span><text:span text:style-name="T970">system </text:span><text:span text:style-name="T974">shadow password file.</text:span></text:p>
      <text:p text:style-name="P861"/>
      <text:p text:style-name="P644"><text:span text:style-name="T975">The </text:span><text:span text:style-name="T964">getshadow.c</text:span><text:span text:style-name="T975"> program r</text:span><text:span text:style-name="T974">etrieves the shadow password entry corresponding to the specified user from the system shadow database.</text:span></text:p>
      <text:p text:style-name="Horizontal_20_Line"/>
      <text:p text:style-name="P186"><text:span text:style-name="T976">1 </text:span><text:span text:style-name="T115">#include </text:span><text:span text:style-name="T116">&lt;stdio.h&gt;</text:span></text:p>
      <text:p text:style-name="P862"><text:span text:style-name="T976">2 </text:span><text:span text:style-name="T115">#include </text:span><text:span text:style-name="T116">&lt;stdlib.h&gt;</text:span></text:p>
      <text:p text:style-name="P862"><text:span text:style-name="T976">3 </text:span><text:span text:style-name="T115">#include </text:span><text:span text:style-name="T116">&lt;shadow.h&gt;</text:span></text:p>
      <text:p text:style-name="P188"/>
      <text:p text:style-name="P862"><text:span text:style-name="T976">4 </text:span><text:span text:style-name="T115">int</text:span> main(<text:span text:style-name="T115">int</text:span> argc, <text:span text:style-name="T115">char</text:span> *argv<text:span text:style-name="T115">[]</text:span>) {</text:p>
      <text:p text:style-name="P862"><text:span text:style-name="T976">5 <text:tab/></text:span><text:span text:style-name="T115">if</text:span> (argc != <text:span text:style-name="T127">2</text:span>) {</text:p>
      <text:p text:style-name="P862"><text:span text:style-name="T976">6 <text:tab/><text:tab/></text:span>fprintf(<text:span text:style-name="T115">stderr</text:span>, <text:span text:style-name="T116">"Usage: %s &lt;username&gt;\n"</text:span>, argv[<text:span text:style-name="T127">0</text:span>]);</text:p>
      <text:p text:style-name="P862"><text:span text:style-name="T976">7 <text:tab/><text:tab/></text:span>exit(<text:span text:style-name="T115">EXIT_FAILURE</text:span>);</text:p>
      <text:p text:style-name="P862"><text:span text:style-name="T976">8 <text:tab/></text:span>}</text:p>
      <text:p text:style-name="P188"/>
      <text:p text:style-name="P862"><text:span text:style-name="T976">9 <text:tab/></text:span><text:span text:style-name="T115">const</text:span> <text:span text:style-name="T115">char</text:span> *username = argv[<text:span text:style-name="T127">1</text:span>];</text:p>
      <text:p text:style-name="P863"><text:span text:style-name="T977">10 <text:tab/></text:span><text:span text:style-name="T103">struct</text:span><text:span text:style-name="T104"> </text:span><text:span text:style-name="T103">spwd</text:span><text:span text:style-name="T104"> *shadow_entry;</text:span></text:p>
      <text:p text:style-name="P188"/>
      <text:p text:style-name="P862"><text:span text:style-name="T976">11 <text:tab/></text:span>shadow_entry = <text:span text:style-name="T126">getspnam</text:span>(username);</text:p>
      <text:p text:style-name="P862"><text:span text:style-name="T976">12 <text:tab/></text:span><text:span text:style-name="T115">if</text:span> (!shadow_entry) {</text:p>
      <text:p text:style-name="P862"><text:span text:style-name="T976">13 <text:tab/><text:tab/></text:span>printf(<text:span text:style-name="T116">"\nUser not found or permission error"</text:span>);</text:p>
      <text:p text:style-name="P862"><text:span text:style-name="T976">14 <text:tab/><text:tab/></text:span>exit(<text:span text:style-name="T115">EXIT_FAILURE</text:span>);</text:p>
      <text:p text:style-name="P862"><text:span text:style-name="T976">15 <text:tab/></text:span>}</text:p>
      <text:p text:style-name="P188"><text:soft-page-break/></text:p>
      <text:p text:style-name="P862"><text:span text:style-name="T976">16 <text:tab/></text:span>printf(<text:span text:style-name="T116">"Shadow entry for user: %s\n"</text:span>, username);</text:p>
      <text:p text:style-name="P862"><text:span text:style-name="T976">17 <text:tab/></text:span>printf(<text:span text:style-name="T116">" Encrypted password: %s\n"</text:span>, shadow_entry-&gt;sp_pwdp);</text:p>
      <text:p text:style-name="P862"><text:span text:style-name="T976">18 <text:tab/></text:span>printf(<text:span text:style-name="T116">" Last password change (days since epoch): %ld\n"</text:span>, </text:p>
      <text:p text:style-name="P862"><text:tab/><text:tab/> <text:s/>shadow_entry-&gt;sp_lstchg);</text:p>
      <text:p text:style-name="P862"><text:span text:style-name="T976">19 <text:tab/></text:span>printf(<text:span text:style-name="T116">" Min days between changes: %ld\n"</text:span>, shadow_entry-&gt;sp_min);</text:p>
      <text:p text:style-name="P862"><text:span text:style-name="T976">20 <text:tab/></text:span>printf(<text:span text:style-name="T116">" Max days between changes: %ld\n"</text:span>, shadow_entry-&gt;sp_max);</text:p>
      <text:p text:style-name="P862"><text:span text:style-name="T976">21 <text:tab/></text:span>printf(<text:span text:style-name="T116">" Warning period (days): %ld\n"</text:span>, shadow_entry-&gt;sp_warn);</text:p>
      <text:p text:style-name="P862"><text:span text:style-name="T976">22 <text:tab/></text:span>printf(<text:span text:style-name="T116">" Inactive period (days): %ld\n"</text:span>, shadow_entry-&gt;sp_inact);</text:p>
      <text:p text:style-name="P862"><text:span text:style-name="T976">23 <text:tab/></text:span>printf(<text:span text:style-name="T116">" Account expiration (days since epoch): %ld\n"</text:span>, </text:p>
      <text:p text:style-name="P862"><text:tab/><text:tab/> <text:s/>shadow_entry-&gt;sp_expire);</text:p>
      <text:p text:style-name="P864"><text:span text:style-name="T978">24 <text:tab/></text:span><text:span text:style-name="T124">printf(</text:span><text:span text:style-name="T102">" Reserved field: %lu\n"</text:span><text:span text:style-name="T124">, shadow_entry-&gt;sp_flag);</text:span></text:p>
      <text:p text:style-name="P862"><text:span text:style-name="T976">25 <text:tab/></text:span>exit(<text:span text:style-name="T115">EXIT_SUCCESS</text:span>);</text:p>
      <text:p text:style-name="P864"><text:span text:style-name="T978">26 </text:span><text:span text:style-name="T124">}</text:span></text:p>
      <text:p text:style-name="Horizontal_20_Line"/>
      <text:p text:style-name="P865">getshadow.c<text:span text:style-name="T230"> </text:span></text:p>
      <text:p text:style-name="P307"/>
      <text:p text:style-name="Standard"><text:span text:style-name="Strong_20_Emphasis"><text:span text:style-name="T731">Line 10.</text:span></text:span><text:span text:style-name="T731"> Declares a pointer to a </text:span><text:span text:style-name="Source_20_Text"><text:span text:style-name="T221">spwd</text:span></text:span><text:span text:style-name="T731"> structure, which will hold the retrieved shadow entry</text:span></text:p>
      <text:p text:style-name="Standard"><text:span text:style-name="Strong_20_Emphasis"><text:span text:style-name="T731">Line 11.</text:span></text:span><text:span text:style-name="T731"> Retrieves the shadow password record for the given username using </text:span><text:span text:style-name="Source_20_Text"><text:span text:style-name="T221">getspnam</text:span></text:span></text:p>
      <text:p text:style-name="Standard"><text:span text:style-name="Strong_20_Emphasis"><text:span text:style-name="T731">Line 12–15.</text:span></text:span><text:span text:style-name="T731"> Checks whether the retrieval was successful. If the user does not exist or permission is <text:tab/> <text:s text:c="7"/>denied (since </text:span><text:span text:style-name="Source_20_Text"><text:span text:style-name="T221">/etc/shadow</text:span></text:span><text:span text:style-name="T731"> is restricted), the program prints an error message and <text:tab/> <text:s text:c="7"/>exits</text:span></text:p>
      <text:p text:style-name="Standard"><text:span text:style-name="Strong_20_Emphasis"><text:span text:style-name="T731">Line 16–24.</text:span></text:span><text:span text:style-name="T731"> Prints the fields of the </text:span><text:span text:style-name="Source_20_Text"><text:span text:style-name="T221">spwd</text:span></text:span><text:span text:style-name="T731"> structure, including password aging information, <text:tab/> <text:s text:c="2"/><text:tab/> <text:s text:c="7"/>expiration data, and the encrypted password field</text:span></text:p>
      <text:p text:style-name="P594"/>
      <text:p text:style-name="P866">We execute the program <text:span text:style-name="T979">using</text:span><text:span text:style-name="T980"> </text:span><text:span text:style-name="T981">sudo</text:span></text:p>
      <text:p text:style-name="P866"/>
      <table:table table:name="Table101" table:style-name="Table101">
        <table:table-column table:style-name="Table101.A"/>
        <table:table-row>
          <table:table-cell table:style-name="Table101.A1" office:value-type="string">
            <text:p text:style-name="P867"><text:span text:style-name="T80">[</text:span><text:a xlink:type="simple" xlink:href="mailto:linux@users" text:style-name="Internet_20_link" text:visited-style-name="Visited_20_Internet_20_Link"><text:span text:style-name="T81">linux@users</text:span></text:a><text:span text:style-name="T80">] </text:span><text:span text:style-name="T980">sudo</text:span><text:span text:style-name="T80"> ./</text:span><text:span text:style-name="T980">getshadow users</text:span></text:p>
            <text:p text:style-name="P867">Shadow entry for user: <text:span text:style-name="T980">users</text:span></text:p>
            <text:p text:style-name="P867"><text:s text:c="2"/>Encrypted password: $y$j9<text:span text:style-name="T90">...</text:span></text:p>
            <text:p text:style-name="P867"><text:s text:c="2"/>Last password change (days since epoch): 20257</text:p>
            <text:p text:style-name="P867"><text:s text:c="2"/>Min days between changes: 0</text:p>
            <text:p text:style-name="P867"><text:s text:c="2"/>Max days between changes: 99999</text:p>
            <text:p text:style-name="P867"><text:s text:c="2"/>Warning period (days): 7</text:p>
            <text:p text:style-name="P867"><text:s text:c="2"/>Inactive period (days): -1</text:p>
            <text:p text:style-name="P867"><text:s text:c="2"/>Account expiration (days since epoch): -1</text:p>
            <text:p text:style-name="P867"><text:s text:c="2"/>Reserved field: 18446744073709551615</text:p>
            <text:p text:style-name="P867"/>
          </table:table-cell>
        </table:table-row>
      </table:table>
      <text:p text:style-name="P866"/>
      <text:p text:style-name="P868"><text:span text:style-name="T982">When the program is executed with </text:span><text:span text:style-name="Source_20_Text"><text:span text:style-name="T983">sudo</text:span></text:span><text:span text:style-name="T982">, it successfully accesses the shadow password database and retrieves the record for the specified user. The output shows the encrypted password hash (stored in </text:span><text:span text:style-name="Source_20_Text"><text:span text:style-name="T983">/etc/shadow</text:span></text:span><text:span text:style-name="T982">), along with password aging and account policy information such as last password change, minimum and maximum validity periods, warning time, and expiration values.</text:span></text:p>
      <text:p text:style-name="P868"><text:span text:style-name="T982">As observed, passwords in </text:span><text:span text:style-name="Source_20_Text"><text:span text:style-name="T983">/etc/shadow</text:span></text:span><text:span text:style-name="T982"> are not stored in plain text but as cryptographic hashes. During login, the system hashes the password entered by the user and compares it with the stored hash to verify authenticity, rather than decrypting the stored value.</text:span></text:p>
      <text:p text:style-name="P869"/>
      <text:p text:style-name="P869"/>
      <text:p text:style-name="P869"/>
      <text:p text:style-name="P869"/>
      <text:p text:style-name="P870"><text:soft-page-break/><text:span text:style-name="T984">III.7.1 </text:span>Creat<text:span text:style-name="T985">ing</text:span> <text:span text:style-name="T986">an </text:span>encrypted passphrase: <text:span text:style-name="T987">crypt</text:span></text:p>
      <text:p text:style-name="P869"/>
      <text:p text:style-name="P871"><text:span text:style-name="T988">As we have seen, the password database stores encrypted passwords. The encryption mechanism used by the system is provided through the </text:span><text:span text:style-name="Source_20_Text"><text:span text:style-name="T989">crypt</text:span></text:span><text:span text:style-name="Source_20_Text"><text:span text:style-name="T989"><text:note text:id="ftn71" text:note-class="footnote"><text:note-citation>69</text:note-citation><text:note-body><text:p text:style-name="P250"><text:span text:style-name="T990">See the </text:span><text:span text:style-name="T991">crypt(3)</text:span><text:span text:style-name="T992"> manual page</text:span></text:p></text:note-body></text:note></text:span></text:span><text:span text:style-name="T988"> function, which encapsulates the underlying hashing algorithm and is defined as follows.</text:span></text:p>
      <text:p text:style-name="P869"/>
      <table:table table:name="Table103" table:style-name="Table103">
        <table:table-column table:style-name="Table103.A"/>
        <table:table-row table:style-name="Table103.1">
          <table:table-cell table:style-name="Table103.A1" office:value-type="string">
            <text:p text:style-name="P271"><text:span text:style-name="T115">#include </text:span><text:span text:style-name="T116">&lt;crypt.h&gt;</text:span></text:p>
            <text:p text:style-name="P188"/>
            <text:p text:style-name="P229"><text:span text:style-name="T103">char</text:span><text:span text:style-name="T104"> *</text:span><text:span text:style-name="T105">crypt</text:span><text:span text:style-name="T104">(</text:span><text:span text:style-name="T103">const</text:span><text:span text:style-name="T104"> </text:span><text:span text:style-name="T103">char</text:span><text:span text:style-name="T104"> </text:span><text:span text:style-name="T106">*phrase</text:span><text:span text:style-name="T104">, </text:span><text:span text:style-name="T103">const</text:span><text:span text:style-name="T104"> </text:span><text:span text:style-name="T103">char</text:span><text:span text:style-name="T104"> </text:span><text:span text:style-name="T106">*setting</text:span><text:span text:style-name="T104">);</text:span></text:p>
            <text:p text:style-name="P188"/>
            <text:p text:style-name="P872"><text:span text:style-name="T103">char</text:span><text:span text:style-name="T104"> *</text:span><text:span text:style-name="T105">crypt_r</text:span><text:span text:style-name="T104">(</text:span><text:span text:style-name="T103">const</text:span><text:span text:style-name="T104"> </text:span><text:span text:style-name="T103">char</text:span><text:span text:style-name="T104"> </text:span><text:span text:style-name="T106">*phrase</text:span><text:span text:style-name="T104">, </text:span><text:span text:style-name="T103">const</text:span><text:span text:style-name="T104"> </text:span><text:span text:style-name="T103">char</text:span><text:span text:style-name="T104"> </text:span><text:span text:style-name="T106">*setting</text:span><text:span text:style-name="T104">, </text:span><text:span text:style-name="T103">struct</text:span><text:span text:style-name="T104"> </text:span><text:span text:style-name="T103">crypt_data</text:span><text:span text:style-name="T104"> </text:span></text:p>
            <text:p text:style-name="P872"><text:span text:style-name="T106"><text:s text:c="14"/>*data</text:span><text:span text:style-name="T104">);</text:span></text:p>
            <text:p text:style-name="P188"/>
            <text:p text:style-name="P872"><text:span text:style-name="T103">char</text:span><text:span text:style-name="T104"> *</text:span><text:span text:style-name="T105">crypt_rn</text:span><text:span text:style-name="T104">(</text:span><text:span text:style-name="T103">const</text:span><text:span text:style-name="T104"> </text:span><text:span text:style-name="T103">char</text:span><text:span text:style-name="T104"> </text:span><text:span text:style-name="T106">*phrase</text:span><text:span text:style-name="T104">, </text:span><text:span text:style-name="T103">const</text:span><text:span text:style-name="T104"> </text:span><text:span text:style-name="T103">char</text:span><text:span text:style-name="T104"> </text:span><text:span text:style-name="T106">*setting</text:span><text:span text:style-name="T104">, </text:span><text:span text:style-name="T103">struct </text:span></text:p>
            <text:p text:style-name="P872"><text:span text:style-name="T103"><text:s text:c="15"/>crypt_data</text:span><text:span text:style-name="T104"> </text:span><text:span text:style-name="T106">*data</text:span><text:span text:style-name="T104">, </text:span><text:span text:style-name="T103">int</text:span><text:span text:style-name="T104"> </text:span><text:span text:style-name="T106">size</text:span><text:span text:style-name="T104">);</text:span></text:p>
            <text:p text:style-name="P188"/>
            <text:p text:style-name="P872"><text:span text:style-name="T103">char</text:span><text:span text:style-name="T104"> *</text:span><text:span text:style-name="T105">crypt_ra</text:span><text:span text:style-name="T104">(</text:span><text:span text:style-name="T103">const</text:span><text:span text:style-name="T104"> </text:span><text:span text:style-name="T103">char</text:span><text:span text:style-name="T104"> </text:span><text:span text:style-name="T106">*phrase</text:span><text:span text:style-name="T104">, </text:span><text:span text:style-name="T103">const</text:span><text:span text:style-name="T104"> </text:span><text:span text:style-name="T103">char</text:span><text:span text:style-name="T104"> </text:span><text:span text:style-name="T106">*setting</text:span><text:span text:style-name="T104">, </text:span><text:span text:style-name="T103">void</text:span><text:span text:style-name="T104"> </text:span><text:span text:style-name="T106">**data</text:span><text:span text:style-name="T104">, </text:span><text:span text:style-name="T103">int</text:span><text:span text:style-name="T104"> </text:span></text:p>
            <text:p text:style-name="P873"><text:span text:style-name="T106"><text:s text:c="15"/>*size</text:span><text:span text:style-name="T104">);</text:span></text:p>
            <text:p text:style-name="P874"/>
            <text:p text:style-name="P875"><text:s text:c="6"/>Return: a pointer to a string which encodes the hashed passphrase and the <text:s text:c="5"/></text:p>
            <text:p text:style-name="P875"><text:span text:style-name="T993"><text:s text:c="9"/>s</text:span>ettings used to encode it, <text:span text:style-name="T994">on error an invalid hash </text:span><text:span text:style-name="T995">or a</text:span><text:span text:style-name="T993"> NULL pointer </text:span></text:p>
            <text:p text:style-name="P876"><text:span text:style-name="T993"><text:s text:c="42"/>(crypt_rn, crypt_ra) </text:span><text:span text:style-name="T995">and errno</text:span></text:p>
          </table:table-cell>
        </table:table-row>
      </table:table>
      <text:p text:style-name="P877"/>
      <text:p text:style-name="P878"><text:span text:style-name="T996">These functions create an </text:span><text:span text:style-name="T997">hash</text:span><text:span text:style-name="T996"> from the passed passphrase </text:span><text:span text:style-name="T989">phrase</text:span><text:span text:style-name="T996">. This </text:span><text:span text:style-name="T997">hash</text:span><text:span text:style-name="T996"> can then be stored in the password database </text:span><text:span text:style-name="T989">/etc/shadow</text:span><text:span text:style-name="T996">. Basically an </text:span><text:span text:style-name="T997">hash</text:span><text:span text:style-name="T996"> is a string containing the algorithm (</text:span><text:span text:style-name="T997">hashing method</text:span><text:span text:style-name="T996">) used to encrypt the passed string and the resulting encrypted string. The parameter </text:span><text:span text:style-name="T989">settings</text:span><text:span text:style-name="T996"> represents the </text:span><text:span text:style-name="T997">hashing method</text:span><text:span text:style-name="T996"> to use and also the parameters to pass to the </text:span><text:span text:style-name="T997">hashing method</text:span><text:span text:style-name="T996">. The most important parameter is the </text:span><text:span text:style-name="T997">salt</text:span><text:span text:style-name="T996">, which represents a string used to ensure that no two stored hashes are the same even if the strings </text:span><text:span text:style-name="T989">phrase</text:span><text:span text:style-name="T996"> are the same. </text:span></text:p>
      <text:p text:style-name="P594"/>
      <text:p text:style-name="P871"><text:span text:style-name="T998">The </text:span><text:span text:style-name="T989">crypt_data</text:span><text:span text:style-name="T998"> structure is defined as follows in the </text:span><text:span text:style-name="T989">crypt.h</text:span><text:span text:style-name="T998"> </text:span><text:span text:style-name="T999">header file. </text:span></text:p>
      <text:p text:style-name="P879"/>
      <table:table table:name="Table104" table:style-name="Table104">
        <table:table-column table:style-name="Table104.A"/>
        <table:table-row>
          <table:table-cell table:style-name="Table104.A1" office:value-type="string">
            <text:p text:style-name="P271"><text:span text:style-name="T115">struct</text:span> crypt_data {</text:p>
            <text:p text:style-name="P186"><text:span text:style-name="T115"><text:s text:c="4"/>char</text:span> output[<text:span text:style-name="T115">CRYPT_OUTPUT_SIZE</text:span>];</text:p>
            <text:p text:style-name="P186"><text:span text:style-name="T115"><text:s text:c="4"/>char</text:span> setting[<text:span text:style-name="T115">CRYPT_OUTPUT_SIZE</text:span>];</text:p>
            <text:p text:style-name="P186"><text:span text:style-name="T115"><text:s text:c="4"/>char</text:span> input[<text:span text:style-name="T115">CRYPT_MAX_PASSPHRASE_SIZE</text:span>];</text:p>
            <text:p text:style-name="P186"><text:span text:style-name="T115"><text:s text:c="4"/>char</text:span> initialized;</text:p>
            <text:p text:style-name="P186">};</text:p>
          </table:table-cell>
        </table:table-row>
      </table:table>
      <text:p text:style-name="P879"/>
      <text:p text:style-name="P871"><text:span text:style-name="T998">The </text:span><text:span text:style-name="T989">output</text:span><text:span text:style-name="T998"> field will contain the hashed passphrase after a call to </text:span><text:span text:style-name="T989">crypt_r</text:span><text:span text:style-name="T998">. The input string is stored in the field </text:span><text:span text:style-name="T989">input</text:span><text:span text:style-name="T998"> and the field </text:span><text:span text:style-name="T989">setting</text:span><text:span text:style-name="T998"> contains the passed setting. The </text:span><text:span text:style-name="T989">initialized</text:span><text:span text:style-name="T998"> field must be set to zero before the first time the structure is first used in a call to </text:span><text:span text:style-name="T989">crypt_r</text:span><text:span text:style-name="T998">. </text:span></text:p>
      <text:p text:style-name="P879"/>
      <text:p text:style-name="P878"><text:span text:style-name="T998">The </text:span><text:span text:style-name="T989">data</text:span><text:span text:style-name="T998"> argument to </text:span><text:span text:style-name="T989">crypt_rn</text:span><text:span text:style-name="T998"> should also point to a struct </text:span><text:span text:style-name="T989">crypt_data</text:span><text:span text:style-name="T998"> object, and the parameter </text:span><text:span text:style-name="T989">size</text:span><text:span text:style-name="T998"> is the size of that object, cast to </text:span><text:span text:style-name="T989">int</text:span><text:span text:style-name="T998">. <text:s/>When used with </text:span><text:span text:style-name="T989">crypt_rn</text:span><text:span text:style-name="T998">, the entire data object (except for the <text:s/></text:span><text:span text:style-name="T989">input</text:span><text:span text:style-name="T998"> <text:s/>and <text:s/></text:span><text:span text:style-name="T989">setting</text:span><text:span text:style-name="T998"> <text:s/>fields) must be zeroed before its first use</text:span></text:p>
      <text:p text:style-name="P594"/>
      <text:p text:style-name="P878"><text:span text:style-name="T963">On <text:s/>the <text:s/>first <text:s/>call to </text:span><text:span text:style-name="T989">crypt_ra</text:span><text:span text:style-name="T963">, </text:span><text:span text:style-name="T989">data</text:span><text:span text:style-name="T963"> should be the address of a </text:span><text:span text:style-name="T989">void *</text:span><text:span text:style-name="T963"> variable set to </text:span><text:span text:style-name="T989">NULL</text:span><text:span text:style-name="T963">, and </text:span><text:span text:style-name="T989">size</text:span><text:span text:style-name="T963"> should be the address of an </text:span><text:span text:style-name="T989">int</text:span><text:span text:style-name="T963"> variable set to zero. <text:s/></text:span><text:span text:style-name="T989">crypt_ra</text:span><text:span text:style-name="T963"> will allocate and </text:span><text:soft-page-break/><text:span text:style-name="T963">initialize a struct </text:span><text:span text:style-name="T989">crypt_data</text:span><text:span text:style-name="T963"> object, using </text:span><text:span text:style-name="T989">malloc</text:span><text:span text:style-name="T963">, and write its address and size into the variables pointed to by </text:span><text:span text:style-name="T989">data</text:span><text:span text:style-name="T963"> and </text:span><text:span text:style-name="T989">size</text:span><text:span text:style-name="T963">. <text:s/>These can be reused in subsequent calls. <text:s/>After the application is done hashing passphrases, it should deallocate the struct </text:span><text:span text:style-name="T989">crypt_data</text:span><text:span text:style-name="T963"> object using </text:span><text:span text:style-name="T989">free</text:span><text:span text:style-name="T963">. </text:span></text:p>
      <text:p text:style-name="P880"/>
      <text:p text:style-name="P644"><text:span text:style-name="T1000">The </text:span><text:span text:style-name="T989">crypt</text:span><text:span text:style-name="T963"> </text:span><text:span text:style-name="T1000">function </text:span><text:span text:style-name="T963">places its result in a static storage area, which will be overwritten by subsequent calls to </text:span><text:span text:style-name="T989">crypt</text:span><text:span text:style-name="T963">, </text:span><text:span text:style-name="T1000">so i</text:span><text:span text:style-name="T963">t is not safe to call </text:span><text:span text:style-name="T989">crypt</text:span><text:span text:style-name="T963"> from multiple threads simultaneously.</text:span></text:p>
      <text:p text:style-name="P878"><text:span text:style-name="T1001">The functions </text:span><text:span text:style-name="T989">crypt_r</text:span><text:span text:style-name="T963">, </text:span><text:span text:style-name="T989">crypt_rn</text:span><text:span text:style-name="T963">, and </text:span><text:span text:style-name="T989">crypt_ra</text:span><text:span text:style-name="T963"> place their result in the </text:span><text:span text:style-name="T989">output</text:span><text:span text:style-name="T963"> field of their </text:span><text:span text:style-name="T989">data</text:span><text:span text:style-name="T963"> argument, </text:span><text:span text:style-name="T1001">so i</text:span><text:span text:style-name="T963">t is safe to call them from multiple threads simultaneously, as long as a separate data object is used for each thread.</text:span></text:p>
      <text:p text:style-name="P881"/>
      <text:p text:style-name="P878"><text:span text:style-name="T1002">On error the functions </text:span><text:span text:style-name="T989">crypt_r</text:span><text:span text:style-name="T1002">, </text:span><text:span text:style-name="T989">crypt_rn</text:span><text:span text:style-name="T1002">, and </text:span><text:span text:style-name="T989">crypt_ra</text:span><text:span text:style-name="T1002"> write an invalid hash to the </text:span><text:span text:style-name="T989">output</text:span><text:span text:style-name="T1002"> field of their </text:span><text:span text:style-name="T989">data</text:span><text:span text:style-name="T1002"> argument, and </text:span><text:span text:style-name="T989">crypt</text:span><text:span text:style-name="T1002"> writes an invalid hash to its static storage area. This string will be shorter than 13 characters, will begin with a ‘</text:span><text:span text:style-name="T989">*</text:span><text:span text:style-name="T1002">’, and will not compare equal to </text:span><text:span text:style-name="T989">setting</text:span><text:span text:style-name="T1002">. </text:span></text:p>
      <text:p text:style-name="P882"><text:span text:style-name="T1003">The functions </text:span><text:span text:style-name="T989">crypt_rn</text:span><text:span text:style-name="T1003"> and </text:span><text:span text:style-name="T989">crypt_ra</text:span><text:span text:style-name="T1003"> return a </text:span><text:span text:style-name="T989">NULL</text:span><text:span text:style-name="T1003"> pointer. </text:span><text:span text:style-name="T989">crypt_r</text:span><text:span text:style-name="T1003"> and </text:span><text:span text:style-name="T989">crypt</text:span><text:span text:style-name="T1003"> may also return a </text:span><text:span text:style-name="T989">NULL</text:span><text:span text:style-name="T1003"> pointer, or they may return a pointer to the invalid hash, depending on how </text:span><text:span text:style-name="T989">libcrypt</text:span><text:span text:style-name="T989"><text:note text:id="ftn72" text:note-class="footnote"><text:note-citation>70</text:note-citation><text:note-body><text:p text:style-name="P883"><text:span text:style-name="T1004">The library containing these functions, </text:span><text:span text:style-name="T1005">on Kali Linux the package</text:span><text:span text:style-name="T1006">s </text:span><text:span text:style-name="T1007">libcrypt</text:span><text:span text:style-name="T1008">1</text:span><text:span text:style-name="T1009"> and </text:span><text:span text:style-name="T1007">libcrypt-dev</text:span></text:p></text:note-body></text:note></text:span><text:span text:style-name="T1003"> was configured.</text:span></text:p>
      <text:p text:style-name="P884"/>
      <text:p text:style-name="P644"><text:span text:style-name="T1010">The </text:span><text:span text:style-name="T989">cryptpass.c</text:span><text:span text:style-name="T1003"> </text:span><text:span text:style-name="T1010">program </text:span><text:span text:style-name="T1003">generates a </text:span><text:span text:style-name="T1011">hashed password</text:span><text:span text:style-name="T1003"> (passphrase) using the provided </text:span><text:span text:style-name="T1011">salt</text:span><text:span text:style-name="T1003"> and plaintext password.</text:span></text:p>
      <text:p text:style-name="Horizontal_20_Line"/>
      <text:p text:style-name="P186"><text:span text:style-name="T1012">1 </text:span><text:span text:style-name="T115">#define _XOPEN_SOURCE</text:span></text:p>
      <text:p text:style-name="P885"><text:span text:style-name="T1012">2 </text:span><text:span text:style-name="T115">#include </text:span><text:span text:style-name="T116">&lt;crypt.h&gt;</text:span></text:p>
      <text:p text:style-name="P885"><text:span text:style-name="T1012">3 </text:span><text:span text:style-name="T115">#include </text:span><text:span text:style-name="T116">&lt;stdio.h&gt;</text:span></text:p>
      <text:p text:style-name="P885"><text:span text:style-name="T1012">4 </text:span><text:span text:style-name="T115">#include </text:span><text:span text:style-name="T116">&lt;string.h&gt;</text:span></text:p>
      <text:p text:style-name="P885"><text:span text:style-name="T1012">5 </text:span><text:span text:style-name="T115">#include </text:span><text:span text:style-name="T116">&lt;stdlib.h&gt;</text:span></text:p>
      <text:p text:style-name="P188"/>
      <text:p text:style-name="P886"><text:span text:style-name="T1013">6 </text:span><text:span text:style-name="T101">int</text:span><text:span text:style-name="T124"> main(</text:span><text:span text:style-name="T101">int</text:span><text:span text:style-name="T124"> argc, </text:span><text:span text:style-name="T101">char</text:span><text:span text:style-name="T124"> *argv</text:span><text:span text:style-name="T101">[]</text:span><text:span text:style-name="T124">) {</text:span></text:p>
      <text:p text:style-name="P885"><text:span text:style-name="T1012">7 <text:tab/></text:span><text:span text:style-name="T115">if</text:span> (argc != <text:span text:style-name="T127">3</text:span>) {</text:p>
      <text:p text:style-name="P885"><text:span text:style-name="T1012">8 <text:tab/><text:tab/></text:span>printf(<text:span text:style-name="T116">"\nUsage %s &lt;salt&gt; &lt;password&gt;"</text:span>, argv[<text:span text:style-name="T127">0</text:span>]);</text:p>
      <text:p text:style-name="P885"><text:span text:style-name="T1012">9 <text:tab/><text:tab/></text:span>exit(<text:span text:style-name="T115">EXIT_FAILURE</text:span>);</text:p>
      <text:p text:style-name="P885"><text:span text:style-name="T1012">10 <text:tab/></text:span>}</text:p>
      <text:p text:style-name="P188"/>
      <text:p text:style-name="P885"><text:span text:style-name="T1012">11 <text:tab/></text:span><text:span text:style-name="T115">const</text:span> <text:span text:style-name="T115">char</text:span> *password = argv[<text:span text:style-name="T127">2</text:span>];</text:p>
      <text:p text:style-name="P886"><text:span text:style-name="T1013">12 <text:tab/></text:span><text:span text:style-name="T101">const</text:span><text:span text:style-name="T124"> </text:span><text:span text:style-name="T101">char</text:span><text:span text:style-name="T124"> *salt = argv[</text:span><text:span text:style-name="T335">1</text:span><text:span text:style-name="T124">];</text:span></text:p>
      <text:p text:style-name="P885"><text:span text:style-name="T1012">13 <text:tab/></text:span><text:span text:style-name="T115">char</text:span> *hashed = <text:span text:style-name="T126">crypt</text:span>(password, salt);</text:p>
      <text:p text:style-name="P885"><text:span text:style-name="T1012">14 <text:tab/></text:span><text:span text:style-name="T115">if</text:span> (hashed == <text:span text:style-name="T115">NULL</text:span>) {</text:p>
      <text:p text:style-name="P885"><text:span text:style-name="T1012">15 <text:tab/><text:tab/></text:span>perror(<text:span text:style-name="T116">"crypt"</text:span>);</text:p>
      <text:p text:style-name="P885"><text:span text:style-name="T1012">16 <text:tab/><text:tab/></text:span><text:span text:style-name="T115">return</text:span> <text:span text:style-name="T127">1</text:span>;</text:p>
      <text:p text:style-name="P886"><text:span text:style-name="T1013">17 <text:tab/></text:span><text:span text:style-name="T124">}</text:span></text:p>
      <text:p text:style-name="P885"><text:span text:style-name="T1012">18 <text:tab/></text:span>printf(<text:span text:style-name="T116">"Password: %s\n"</text:span>, password);</text:p>
      <text:p text:style-name="P885"><text:span text:style-name="T1012">19 <text:tab/></text:span>printf(<text:span text:style-name="T116">"Salt: %s\n"</text:span>, salt);</text:p>
      <text:p text:style-name="P886"><text:span text:style-name="T1013">20 <text:tab/></text:span><text:span text:style-name="T124">printf(</text:span><text:span text:style-name="T102">"Hashed: %s\n"</text:span><text:span text:style-name="T124">, hashed);</text:span></text:p>
      <text:p text:style-name="P885"><text:span text:style-name="T1012">21 <text:tab/></text:span><text:span text:style-name="T115">return</text:span> <text:span text:style-name="T127">0</text:span>;</text:p>
      <text:p text:style-name="P886"><text:span text:style-name="T1013">22 </text:span><text:span text:style-name="T124">}</text:span></text:p>
      <text:p text:style-name="Horizontal_20_Line"/>
      <text:p text:style-name="P887">cryptpass.c</text:p>
      <text:p text:style-name="Standard"><text:soft-page-break/><text:span text:style-name="Strong_20_Emphasis"><text:span text:style-name="T731">Line 7–10.</text:span></text:span><text:span text:style-name="T731"> Ensures that exactly two arguments are provided: the </text:span><text:span text:style-name="T221">salt</text:span><text:span text:style-name="T731"> and the </text:span><text:span text:style-name="T221">password</text:span><text:span text:style-name="T731">. If not, </text:span><text:span text:style-name="T1014"><text:tab/> <text:s text:c="5"/></text:span><text:span text:style-name="T731">it prints usage information and exits</text:span></text:p>
      <text:p text:style-name="Standard"><text:span text:style-name="Strong_20_Emphasis"><text:span text:style-name="T731">Line 11–12.</text:span></text:span><text:span text:style-name="T731"> Stores the </text:span><text:span text:style-name="T221">password</text:span><text:span text:style-name="T731"> and </text:span><text:span text:style-name="T221">salt</text:span><text:span text:style-name="T731"> values passed from the command line</text:span></text:p>
      <text:p text:style-name="Standard"><text:span text:style-name="Strong_20_Emphasis"><text:span text:style-name="T731">Line 13.</text:span></text:span><text:span text:style-name="T731"> Calls the </text:span><text:span text:style-name="Source_20_Text"><text:span text:style-name="T221">crypt</text:span></text:span><text:span text:style-name="T731"> function to compute the hashed password using the given </text:span><text:span text:style-name="T221">salt</text:span></text:p>
      <text:p text:style-name="Standard"><text:span text:style-name="Strong_20_Emphasis"><text:span text:style-name="T731">Line 14–17.</text:span></text:span><text:span text:style-name="T731"> Checks whether </text:span><text:span text:style-name="Source_20_Text"><text:span text:style-name="T221">crypt</text:span></text:span><text:span text:style-name="T731"> succeeded. If it returns </text:span><text:span text:style-name="Source_20_Text"><text:span text:style-name="T221">NULL</text:span></text:span><text:span text:style-name="T731">, an error is reported and the <text:tab/> <text:s text:c="7"/>program exits</text:span></text:p>
      <text:p text:style-name="Standard"><text:span text:style-name="Strong_20_Emphasis"><text:span text:style-name="T731">Line 18–20.</text:span></text:span><text:span text:style-name="T731"> Prints the original password</text:span><text:span text:style-name="T1015">, the salt used, and the resulting hashed password</text:span></text:p>
      <text:p text:style-name="P888"/>
      <text:p text:style-name="P882"><text:span text:style-name="T1016">We compile the program </text:span><text:span text:style-name="T1017">linking to </text:span><text:span text:style-name="T999">the</text:span><text:span text:style-name="T1017"> </text:span><text:span text:style-name="T989">libcrypt</text:span><text:span text:style-name="T1016"> </text:span><text:span text:style-name="T999">library.</text:span></text:p>
      <text:p text:style-name="P889"/>
      <table:table table:name="Table105" table:style-name="Table105">
        <table:table-column table:style-name="Table105.A"/>
        <table:table-row>
          <table:table-cell table:style-name="Table105.A1" office:value-type="string">
            <text:p text:style-name="P890"><text:span text:style-name="T80">[</text:span><text:a xlink:type="simple" xlink:href="mailto:linux@users" text:style-name="Internet_20_link" text:visited-style-name="Visited_20_Internet_20_Link"><text:span text:style-name="T81">linux@users</text:span></text:a><text:span text:style-name="T80">] </text:span><text:span text:style-name="T1018">gcc -o cryptpass cryptpass.c -lcrypt</text:span></text:p>
          </table:table-cell>
        </table:table-row>
      </table:table>
      <text:p text:style-name="P889"/>
      <text:p text:style-name="P891">We execute <text:span text:style-name="T986">the program. </text:span></text:p>
      <text:p text:style-name="P892"/>
      <table:table table:name="Table106" table:style-name="Table106">
        <table:table-column table:style-name="Table106.A"/>
        <table:table-row>
          <table:table-cell table:style-name="Table106.A1" office:value-type="string">
            <text:p text:style-name="P893"><text:span text:style-name="T80">[</text:span><text:a xlink:type="simple" xlink:href="mailto:linux@users" text:style-name="Internet_20_link" text:visited-style-name="Visited_20_Internet_20_Link"><text:span text:style-name="T81">linux@users</text:span></text:a><text:span text:style-name="T80">] ./</text:span><text:span text:style-name="T1018">cryptpass '$6$rounds=5000$randsalt' hellocrypt</text:span></text:p>
            <text:p text:style-name="P893">Password: hellocrypt</text:p>
            <text:p text:style-name="P893">Salt: $6$rounds=5000$randsalt</text:p>
            <text:p text:style-name="P893"><text:span text:style-name="T90">Hashed:</text:span> $6$rounds=5000$randsalt$FRyfopyD51r/VM658UTz0j/WZzwMhBXewslQsAzUFP25PHPxyWzEBNOLbx7Z.CgptJxtcN69PjcahUpEwq/JJ0</text:p>
          </table:table-cell>
        </table:table-row>
      </table:table>
      <text:p text:style-name="P892"/>
      <text:p text:style-name="P894"><text:span text:style-name="T1019">I</text:span><text:span text:style-name="T1020">t is better to put the </text:span><text:span text:style-name="T1021">salt</text:span><text:span text:style-name="T1020"> between the </text:span><text:span text:style-name="Source_20_Text"><text:span text:style-name="T1022">‘’</text:span></text:span><text:span text:style-name="T1020"> as it contains special character</text:span><text:span text:style-name="T1019">s</text:span><text:span text:style-name="T1020">. </text:span><text:span text:style-name="T1023">As we can see from the output, the </text:span><text:span text:style-name="T1021">hashed passphrase</text:span><text:span text:style-name="T1023"> contains the </text:span><text:span text:style-name="T1021">salt</text:span><text:span text:style-name="T1023"> and the </text:span><text:span text:style-name="T1021">encrypted </text:span><text:span text:style-name="T1024">passphrase</text:span><text:span text:style-name="T1023">.</text:span></text:p>
      <text:p text:style-name="P895"/>
      <text:p text:style-name="P895">The <text:span text:style-name="T68">salt</text:span> is necessary so that the same passphrase may produce many possible hashes.<text:span text:style-name="T68"> </text:span><text:span text:style-name="T1025">The produced</text:span><text:span text:style-name="T1026"> <text:s/>hashed passphrase</text:span><text:span text:style-name="T1027"> </text:span><text:span text:style-name="T1028">is composed by the </text:span><text:span text:style-name="T1029">following </text:span><text:span text:style-name="T1028">fields</text:span></text:p>
      <text:p text:style-name="P896"/>
      <table:table table:name="Table107" table:style-name="Table107">
        <table:table-column table:style-name="Table107.A"/>
        <table:table-column table:style-name="Table107.B"/>
        <table:table-column table:style-name="Table107.C"/>
        <table:table-row>
          <table:table-cell table:style-name="Table107.A1" office:value-type="string">
            <text:p text:style-name="P897">Field</text:p>
          </table:table-cell>
          <table:table-cell table:style-name="Table107.A1" office:value-type="string">
            <text:p text:style-name="P898">Value</text:p>
          </table:table-cell>
          <table:table-cell table:style-name="Table107.C1" office:value-type="string">
            <text:p text:style-name="P897">Description</text:p>
          </table:table-cell>
        </table:table-row>
        <table:table-row>
          <table:table-cell table:style-name="Table107.A2" office:value-type="string">
            <text:p text:style-name="P899"><text:span text:style-name="Source_20_Text"><text:span text:style-name="T1030">Prefix</text:span></text:span></text:p>
          </table:table-cell>
          <table:table-cell table:style-name="Table107.A2" office:value-type="string">
            <text:p text:style-name="P900"><text:span text:style-name="Source_20_Text"><text:span text:style-name="T1022">$6$</text:span></text:span></text:p>
          </table:table-cell>
          <table:table-cell table:style-name="Table107.C2" office:value-type="string">
            <text:p text:style-name="P900"><text:span text:style-name="T1031">T</text:span><text:span text:style-name="T1032">he </text:span><text:span text:style-name="T1033">hashing method</text:span><text:span text:style-name="T1032"> used to encrypt the </text:span><text:span text:style-name="T1034">passphrase</text:span><text:span text:style-name="T1032"> </text:span><text:span text:style-name="T1031">(</text:span><text:span text:style-name="Source_20_Text"><text:span text:style-name="T1022">sha512crypt</text:span></text:span><text:span text:style-name="T1031">)</text:span></text:p>
          </table:table-cell>
        </table:table-row>
        <table:table-row>
          <table:table-cell table:style-name="Table107.A2" office:value-type="string">
            <text:p text:style-name="P899"><text:span text:style-name="Source_20_Text"><text:span text:style-name="T1030">Options</text:span></text:span></text:p>
          </table:table-cell>
          <table:table-cell table:style-name="Table107.A2" office:value-type="string">
            <text:p text:style-name="P900"><text:span text:style-name="Source_20_Text"><text:span text:style-name="T1022">rounds=5000</text:span></text:span></text:p>
          </table:table-cell>
          <table:table-cell table:style-name="Table107.C2" office:value-type="string">
            <text:p text:style-name="P901"><text:span text:style-name="T1035">The number of </text:span><text:span text:style-name="Strong_20_Emphasis"><text:span text:style-name="T230">how many iterations</text:span></text:span><text:span text:style-name="T230"> of the </text:span><text:span text:style-name="T220">hashing algorithm</text:span><text:span text:style-name="T230"> are applied to the </text:span><text:span text:style-name="T220">password</text:span><text:span text:style-name="T230"> + </text:span><text:span text:style-name="T220">salt</text:span><text:span text:style-name="T230"> combination</text:span></text:p>
          </table:table-cell>
        </table:table-row>
        <table:table-row>
          <table:table-cell table:style-name="Table107.A2" office:value-type="string">
            <text:p text:style-name="P899"><text:span text:style-name="Source_20_Text"><text:span text:style-name="T1030">Salt</text:span></text:span></text:p>
          </table:table-cell>
          <table:table-cell table:style-name="Table107.A2" office:value-type="string">
            <text:p text:style-name="P900"><text:span text:style-name="Source_20_Text"><text:span text:style-name="T1022">randsalt</text:span></text:span></text:p>
          </table:table-cell>
          <table:table-cell table:style-name="Table107.C2" office:value-type="string">
            <text:p text:style-name="P902">The string used as <text:span text:style-name="T68">salt</text:span></text:p>
          </table:table-cell>
        </table:table-row>
        <table:table-row>
          <table:table-cell table:style-name="Table107.A2" office:value-type="string">
            <text:p text:style-name="P903">Hash</text:p>
          </table:table-cell>
          <table:table-cell table:style-name="Table107.A2" office:value-type="string">
            <text:p text:style-name="P900"><text:span text:style-name="Source_20_Text"><text:span text:style-name="T1022">FRyfopyD51r/VM658UTz0j/WZzwMhBXewslQsAzUFP25PHPxyWzEBNOLbx7Z.CgptJxtcN69PjcahUpEwq/JJ0</text:span></text:span></text:p>
          </table:table-cell>
          <table:table-cell table:style-name="Table107.C2" office:value-type="string">
            <text:p text:style-name="P904">The encrypted password</text:p>
          </table:table-cell>
        </table:table-row>
      </table:table>
      <text:p text:style-name="P905"/>
      <text:p text:style-name="P906">Tab 1<text:span text:style-name="T586">5</text:span>. <text:span text:style-name="T230">The </text:span><text:span text:style-name="T1036">hashed passphrase</text:span><text:span text:style-name="T230"> fields</text:span></text:p>
      <text:p text:style-name="P907"/>
      <text:p text:style-name="P907"/>
      <text:p text:style-name="P882"><text:span text:style-name="T1037">The following table lists the hashing methods supported by </text:span><text:span text:style-name="Source_20_Text"><text:span text:style-name="T989">crypt</text:span></text:span><text:span text:style-name="T1037">, which can be used to generate hashed passphrases. The available algorithms are documented in the </text:span><text:span text:style-name="Source_20_Text"><text:span text:style-name="T989">crypt(5)</text:span></text:span><text:span text:style-name="T1037"> manual page.</text:span></text:p>
      <text:p text:style-name="P907"/>
      <text:p text:style-name="P907"/>
      <text:p text:style-name="P908"/>
      <table:table table:name="Table108" table:style-name="Table108">
        <table:table-column table:style-name="Table108.A"/>
        <table:table-column table:style-name="Table108.B"/>
        <text:soft-page-break/>
        <table:table-row>
          <table:table-cell table:style-name="Table108.A1" office:value-type="string">
            <text:p text:style-name="P909">Method</text:p>
          </table:table-cell>
          <table:table-cell table:style-name="Table108.B1" office:value-type="string">
            <text:p text:style-name="P910">Prefix</text:p>
          </table:table-cell>
        </table:table-row>
        <table:table-row>
          <table:table-cell table:style-name="Table108.A2" office:value-type="string">
            <text:p text:style-name="P911"><text:span text:style-name="Source_20_Text"><text:span text:style-name="T1022">yescrypt</text:span></text:span></text:p>
          </table:table-cell>
          <table:table-cell table:style-name="Table108.B2" office:value-type="string">
            <text:p text:style-name="P912"><text:span text:style-name="Source_20_Text"><text:span text:style-name="T1022">$y$</text:span></text:span></text:p>
          </table:table-cell>
        </table:table-row>
        <table:table-row>
          <table:table-cell table:style-name="Table108.A2" office:value-type="string">
            <text:p text:style-name="P911"><text:span text:style-name="Source_20_Text"><text:span text:style-name="T1022">gost-yescrypt</text:span></text:span></text:p>
          </table:table-cell>
          <table:table-cell table:style-name="Table108.B2" office:value-type="string">
            <text:p text:style-name="P912"><text:span text:style-name="Source_20_Text"><text:span text:style-name="T1022">$gy$</text:span></text:span></text:p>
          </table:table-cell>
        </table:table-row>
        <table:table-row>
          <table:table-cell table:style-name="Table108.A2" office:value-type="string">
            <text:p text:style-name="P911"><text:span text:style-name="Source_20_Text"><text:span text:style-name="T1022">scrypt</text:span></text:span></text:p>
          </table:table-cell>
          <table:table-cell table:style-name="Table108.B2" office:value-type="string">
            <text:p text:style-name="P912"><text:span text:style-name="Source_20_Text"><text:span text:style-name="T1022">$7$</text:span></text:span></text:p>
          </table:table-cell>
        </table:table-row>
        <table:table-row>
          <table:table-cell table:style-name="Table108.A2" office:value-type="string">
            <text:p text:style-name="P911"><text:span text:style-name="Source_20_Text"><text:span text:style-name="T1022">bcrypt</text:span></text:span></text:p>
          </table:table-cell>
          <table:table-cell table:style-name="Table108.B2" office:value-type="string">
            <text:p text:style-name="P912"><text:span text:style-name="Source_20_Text"><text:span text:style-name="T1022">$2b$</text:span></text:span></text:p>
          </table:table-cell>
        </table:table-row>
        <table:table-row>
          <table:table-cell table:style-name="Table108.A2" office:value-type="string">
            <text:p text:style-name="P911"><text:span text:style-name="Source_20_Text"><text:span text:style-name="T1022">sha512crypt</text:span></text:span></text:p>
          </table:table-cell>
          <table:table-cell table:style-name="Table108.B2" office:value-type="string">
            <text:p text:style-name="P912"><text:span text:style-name="Source_20_Text"><text:span text:style-name="T1022">$6$</text:span></text:span></text:p>
          </table:table-cell>
        </table:table-row>
        <table:table-row>
          <table:table-cell table:style-name="Table108.A2" office:value-type="string">
            <text:p text:style-name="P911"><text:span text:style-name="Source_20_Text"><text:span text:style-name="T1022">sha256crypt</text:span></text:span></text:p>
          </table:table-cell>
          <table:table-cell table:style-name="Table108.B2" office:value-type="string">
            <text:p text:style-name="P912"><text:span text:style-name="Source_20_Text"><text:span text:style-name="T1022">$5$</text:span></text:span></text:p>
          </table:table-cell>
        </table:table-row>
        <table:table-row>
          <table:table-cell table:style-name="Table108.A2" office:value-type="string">
            <text:p text:style-name="P911"><text:span text:style-name="Source_20_Text"><text:span text:style-name="T1022">sha1crypt</text:span></text:span></text:p>
          </table:table-cell>
          <table:table-cell table:style-name="Table108.B2" office:value-type="string">
            <text:p text:style-name="P912"><text:span text:style-name="Source_20_Text"><text:span text:style-name="T1022">$sha1</text:span></text:span></text:p>
          </table:table-cell>
        </table:table-row>
        <table:table-row>
          <table:table-cell table:style-name="Table108.A2" office:value-type="string">
            <text:p text:style-name="P911"><text:span text:style-name="Source_20_Text"><text:span text:style-name="T1022">SunMD5</text:span></text:span></text:p>
          </table:table-cell>
          <table:table-cell table:style-name="Table108.B2" office:value-type="string">
            <text:p text:style-name="P913"><text:span text:style-name="Source_20_Text"><text:span text:style-name="T1022">$</text:span></text:span><text:span text:style-name="Source_20_Text"><text:span text:style-name="T1038">md5</text:span></text:span></text:p>
          </table:table-cell>
        </table:table-row>
        <table:table-row>
          <table:table-cell table:style-name="Table108.A2" office:value-type="string">
            <text:p text:style-name="P911"><text:span text:style-name="Source_20_Text"><text:span text:style-name="T1022">md5crypt</text:span></text:span></text:p>
          </table:table-cell>
          <table:table-cell table:style-name="Table108.B2" office:value-type="string">
            <text:p text:style-name="P913"><text:span text:style-name="Source_20_Text"><text:span text:style-name="T1022">$</text:span></text:span><text:span text:style-name="Source_20_Text"><text:span text:style-name="T1038">1</text:span></text:span><text:span text:style-name="Source_20_Text"><text:span text:style-name="T1022">$</text:span></text:span></text:p>
          </table:table-cell>
        </table:table-row>
        <table:table-row>
          <table:table-cell table:style-name="Table108.A2" office:value-type="string">
            <text:p text:style-name="P911"><text:span text:style-name="Source_20_Text"><text:span text:style-name="T1022">bsdicrypt</text:span></text:span></text:p>
          </table:table-cell>
          <table:table-cell table:style-name="Table108.B2" office:value-type="string">
            <text:p text:style-name="P914">_</text:p>
          </table:table-cell>
        </table:table-row>
        <table:table-row>
          <table:table-cell table:style-name="Table108.A2" office:value-type="string">
            <text:p text:style-name="P911"><text:span text:style-name="Source_20_Text"><text:span text:style-name="T1022">descrypt</text:span></text:span></text:p>
          </table:table-cell>
          <table:table-cell table:style-name="Table108.B2" office:value-type="string">
            <text:p text:style-name="P913"><text:span text:style-name="Source_20_Text"><text:span text:style-name="T1038">“” (empty string)</text:span></text:span></text:p>
          </table:table-cell>
        </table:table-row>
        <table:table-row>
          <table:table-cell table:style-name="Table108.A2" office:value-type="string">
            <text:p text:style-name="P911"><text:span text:style-name="Source_20_Text"><text:span text:style-name="T1022">bigcrypt</text:span></text:span></text:p>
          </table:table-cell>
          <table:table-cell table:style-name="Table108.B2" office:value-type="string">
            <text:p text:style-name="P913"><text:span text:style-name="Source_20_Text"><text:span text:style-name="T1038">“” (empty string)</text:span></text:span></text:p>
          </table:table-cell>
        </table:table-row>
        <table:table-row>
          <table:table-cell table:style-name="Table108.A2" office:value-type="string">
            <text:p text:style-name="P911"><text:span text:style-name="Source_20_Text"><text:span text:style-name="T1022">NT</text:span></text:span></text:p>
          </table:table-cell>
          <table:table-cell table:style-name="Table108.B2" office:value-type="string">
            <text:p text:style-name="P913"><text:span text:style-name="Source_20_Text"><text:span text:style-name="T1022">$</text:span></text:span><text:span text:style-name="Source_20_Text"><text:span text:style-name="T1038">3</text:span></text:span><text:span text:style-name="Source_20_Text"><text:span text:style-name="T1022">$</text:span></text:span></text:p>
          </table:table-cell>
        </table:table-row>
      </table:table>
      <text:p text:style-name="P908"/>
      <text:p text:style-name="P915">Tab 1<text:span text:style-name="T586">6</text:span>. <text:span text:style-name="T220">Hashing methods</text:span><text:span text:style-name="T1039"> </text:span><text:span text:style-name="T1040">supported by </text:span><text:span text:style-name="T1041">crypt</text:span></text:p>
      <text:p text:style-name="P896"/>
      <text:p text:style-name="P916"><text:span text:style-name="T1042">The </text:span><text:span text:style-name="T1043">hashed passphrase</text:span><text:span text:style-name="T1042"> is composed by: </text:span><text:span text:style-name="T1043">prefix</text:span><text:span text:style-name="T1042">, </text:span><text:span text:style-name="T1043">options</text:span><text:span text:style-name="T1042">, </text:span><text:span text:style-name="T1043">salt</text:span><text:span text:style-name="T1042">, </text:span><text:span text:style-name="T1043">hash</text:span><text:span text:style-name="T1042">. The </text:span><text:span text:style-name="T1043">prefix</text:span><text:span text:style-name="T1042"> and </text:span><text:span text:style-name="T1043">options</text:span><text:span text:style-name="T1042"> field could be empty based on the </text:span><text:span text:style-name="T1043">hashing method</text:span><text:span text:style-name="T1042"> used. The character </text:span><text:span text:style-name="T1044">$</text:span><text:span text:style-name="T1042"> </text:span><text:span text:style-name="T999">separates</text:span><text:span text:style-name="T1042"> the fields. </text:span></text:p>
      <text:p text:style-name="P896"/>
      <text:p text:style-name="P916"><text:span text:style-name="T1045">On Linux systems we can generate a new </text:span><text:span text:style-name="T1046">password hash</text:span><text:span text:style-name="T1045"> on the command line with the </text:span><text:span text:style-name="T1044">mkpasswd</text:span><text:span text:style-name="T1044"><text:note text:id="ftn73" text:note-class="footnote"><text:note-citation>71</text:note-citation><text:note-body><text:p text:style-name="P250"><text:span text:style-name="T1045"><text:s/></text:span><text:span text:style-name="T1047">mkpasswd</text:span><text:span text:style-name="T1048"> is a frontend </text:span><text:span text:style-name="T1049">for</text:span><text:span text:style-name="T1048"> </text:span><text:span text:style-name="T1047">crypt</text:span><text:span text:style-name="T1048">, </text:span><text:span text:style-name="T1049">s</text:span><text:span text:style-name="T1050">ee the </text:span><text:span text:style-name="T1047">mkpasswd(1)</text:span><text:span text:style-name="T1048"> manual page</text:span></text:p></text:note-body></text:note></text:span><text:span text:style-name="T1045"> and </text:span><text:span text:style-name="T1044">openssl</text:span><text:span text:style-name="T1044"><text:note text:id="ftn74" text:note-class="footnote"><text:note-citation>72</text:note-citation><text:note-body><text:p text:style-name="P250"><text:span text:style-name="T1050">See the </text:span><text:span text:style-name="T1051">openssl(1)</text:span> <text:span text:style-name="T1050">manual page</text:span></text:p></text:note-body></text:note></text:span><text:span text:style-name="T1045"> tools.</text:span></text:p>
      <text:p text:style-name="P917"/>
      <table:table table:name="Table109" table:style-name="Table109">
        <table:table-column table:style-name="Table109.A"/>
        <table:table-row>
          <table:table-cell table:style-name="Table109.A1" office:value-type="string">
            <text:p text:style-name="P918"><text:span text:style-name="T80">[</text:span><text:a xlink:type="simple" xlink:href="mailto:linux@users" text:style-name="Internet_20_link" text:visited-style-name="Visited_20_Internet_20_Link"><text:span text:style-name="T81">linux@users</text:span></text:a><text:span text:style-name="T80">] </text:span><text:span text:style-name="T1052">mkpasswd -m sha-512</text:span></text:p>
            <text:p text:style-name="P918">Password:</text:p>
            <text:p text:style-name="P918"><text:span text:style-name="T90">$6$</text:span>k7na4AiyfEIttDeB$NzJfUCWTAX8iF0I1ToFD.gcARO1/yOWIFkKQJ4RYEQ9VGSDYG.Ns7vxxI1wFkRT8bXc9bvCN6p64oQD2kzs.T/</text:p>
            <text:p text:style-name="P918"/>
            <text:p text:style-name="P918"><text:span text:style-name="T80">[</text:span><text:a xlink:type="simple" xlink:href="mailto:linux@users" text:style-name="Internet_20_link" text:visited-style-name="Visited_20_Internet_20_Link"><text:span text:style-name="T81">linux@users</text:span></text:a><text:span text:style-name="T80">] </text:span><text:span text:style-name="T1052">openssl passwd -6</text:span></text:p>
            <text:p text:style-name="P918">Password: </text:p>
            <text:p text:style-name="P918">Verifying - Password: </text:p>
            <text:p text:style-name="P918"><text:span text:style-name="T90">$6$</text:span>FmMFyYTOt5/mZ2Uj$P7oQ3FYcZ/aH.5214T6WXRMhUH/Dfl8buyN50v9BxUVHdYlEJmHJljRL0Ewexpi1GwW/qpnDnL6Bd8hAxlAEK/</text:p>
          </table:table-cell>
        </table:table-row>
      </table:table>
      <text:p text:style-name="P917"/>
      <text:p text:style-name="P919"><text:span text:style-name="T1053">The option </text:span><text:span text:style-name="Source_20_Text"><text:span text:style-name="T989">-m</text:span></text:span><text:span text:style-name="T1053"> of </text:span><text:span text:style-name="Source_20_Text"><text:span text:style-name="T989">mkpasswd</text:span></text:span><text:span text:style-name="T1053"> defines the </text:span><text:span text:style-name="T1054">hashing method</text:span><text:span text:style-name="T1053"> to use, as we can see from the output the prefix is </text:span><text:span text:style-name="Source_20_Text"><text:span text:style-name="T989">$6$</text:span></text:span><text:span text:style-name="T1053"> (</text:span><text:span text:style-name="Source_20_Text"><text:span text:style-name="T989">sha512crypt</text:span></text:span><text:span text:style-name="Source_20_Text"><text:span text:style-name="T1055">)</text:span></text:span><text:span text:style-name="Source_20_Text"><text:span text:style-name="T1056">. </text:span></text:span></text:p>
      <text:p text:style-name="P919"><text:span text:style-name="Source_20_Text"><text:span text:style-name="T1056">The option </text:span></text:span><text:span text:style-name="Source_20_Text"><text:span text:style-name="T989">passwd</text:span></text:span><text:span text:style-name="Source_20_Text"><text:span text:style-name="T1056"> of </text:span></text:span><text:span text:style-name="Source_20_Text"><text:span text:style-name="T989">openssl</text:span></text:span><text:span text:style-name="Source_20_Text"><text:span text:style-name="T1056"> tells </text:span></text:span><text:span text:style-name="Source_20_Text"><text:span text:style-name="T989">openssl</text:span></text:span><text:span text:style-name="Source_20_Text"><text:span text:style-name="T1056"> to generate a new </text:span></text:span><text:span text:style-name="Source_20_Text"><text:span text:style-name="T1057">password hash</text:span></text:span><text:span text:style-name="Source_20_Text"><text:span text:style-name="T1058">, the option </text:span></text:span><text:span text:style-name="Source_20_Text"><text:span text:style-name="T989">-6</text:span></text:span><text:span text:style-name="Source_20_Text"><text:span text:style-name="T1058"> defines the </text:span></text:span><text:span text:style-name="Source_20_Text"><text:span text:style-name="T1057">hashing method</text:span></text:span><text:span text:style-name="Source_20_Text"><text:span text:style-name="T1058">. <text:s/></text:span></text:span></text:p>
      <text:p text:style-name="P919"><text:span text:style-name="Source_20_Text"><text:span text:style-name="T1056"/></text:span></text:p>
      <text:p text:style-name="P920"><text:span text:style-name="Source_20_Text"><text:span text:style-name="T1056">The </text:span></text:span><text:span text:style-name="Source_20_Text"><text:span text:style-name="T989">checkpwd.c</text:span></text:span><text:span text:style-name="Source_20_Text"><text:span text:style-name="T1056"> program verifies user input by comparing it with a previously stored hash.</text:span></text:span></text:p>
      <text:p text:style-name="P920"><text:span text:style-name="Source_20_Text"><text:span text:style-name="T1056"/></text:span></text:p>
      <text:p text:style-name="P919"><text:span text:style-name="Source_20_Text"><text:span text:style-name="T1056">To prepare a valid test case, first generate a password hash using </text:span></text:span><text:span text:style-name="Source_20_Text"><text:span text:style-name="T989">mkpasswd</text:span></text:span><text:span text:style-name="Source_20_Text"><text:span text:style-name="T1056">, including a salt.</text:span></text:span></text:p>
      <table:table table:name="Table110" table:style-name="Table110">
        <table:table-column table:style-name="Table110.A"/>
        <text:soft-page-break/>
        <table:table-row>
          <table:table-cell table:style-name="Table110.A1" office:value-type="string">
            <text:p text:style-name="P921"><text:span text:style-name="T80">[</text:span><text:a xlink:type="simple" xlink:href="mailto:linux@users" text:style-name="Internet_20_link" text:visited-style-name="Visited_20_Internet_20_Link"><text:span text:style-name="T81">linux@users</text:span></text:a><text:span text:style-name="T80">] </text:span><text:span text:style-name="T1052">mkpasswd -m sha-512 –salt=newsaltstr</text:span></text:p>
            <text:p text:style-name="P921">Password: </text:p>
            <text:p text:style-name="P921">$6$newsaltstr$0I05pcgWEWXk1jrSaBBs6hZLISQTtealfWT6VdeD94GYykJ010I8cKg8C08FW099g/YC/GRBL.t./Y.tus/EM0</text:p>
          </table:table-cell>
        </table:table-row>
      </table:table>
      <text:p text:style-name="P922"><text:span text:style-name="Source_20_Text"><text:span text:style-name="T1059"/></text:span></text:p>
      <text:p text:style-name="P919"><text:span text:style-name="Source_20_Text"><text:span text:style-name="T1059">I have chosen the password </text:span></text:span><text:span text:style-name="Source_20_Text"><text:span text:style-name="T989">mars123</text:span></text:span><text:span text:style-name="Source_20_Text"><text:span text:style-name="T1059"> . Now we can use the </text:span></text:span><text:span text:style-name="Source_20_Text"><text:span text:style-name="T1060">generated</text:span></text:span><text:span text:style-name="Source_20_Text"><text:span text:style-name="T1059"> hash in our program.</text:span></text:span></text:p>
      <text:p text:style-name="Horizontal_20_Line"/>
      <text:p text:style-name="P186"><text:span text:style-name="T1061">1 </text:span><text:span text:style-name="T115">#define _XOPEN_SOURCE</text:span></text:p>
      <text:p text:style-name="P923"><text:span text:style-name="T1062">2</text:span><text:span text:style-name="T1061"> </text:span><text:span text:style-name="T115">#include </text:span><text:span text:style-name="T116">&lt;crypt.h&gt;</text:span></text:p>
      <text:p text:style-name="P923"><text:span text:style-name="T1062">3</text:span><text:span text:style-name="T1061"> </text:span><text:span text:style-name="T115">#include </text:span><text:span text:style-name="T116">&lt;stdio.h&gt;</text:span></text:p>
      <text:p text:style-name="P923"><text:span text:style-name="T1062">4</text:span><text:span text:style-name="T1061"> </text:span><text:span text:style-name="T115">#include </text:span><text:span text:style-name="T116">&lt;string.h&gt;</text:span></text:p>
      <text:p text:style-name="P923"><text:span text:style-name="T1062">5</text:span><text:span text:style-name="T1061"> </text:span><text:span text:style-name="T115">#include </text:span><text:span text:style-name="T116">&lt;stdlib.h&gt;</text:span></text:p>
      <text:p text:style-name="P188"/>
      <text:p text:style-name="P923"><text:span text:style-name="T1062">6</text:span><text:span text:style-name="T1061"> </text:span><text:span text:style-name="T115">int</text:span> main() {</text:p>
      <text:p text:style-name="P923"><text:span text:style-name="T1062">7</text:span><text:span text:style-name="T1061"> <text:tab/></text:span><text:span text:style-name="T115">const</text:span> <text:span text:style-name="T115">char</text:span> *stored_hash = <text:tab/><text:tab/><text:span text:style-name="T116">"$6$newsaltstr$0I05pcgWEWXk1jrSaBBs6hZLISQTtealfWT6VdeD94GYykJ010I8<text:tab/> cKg8C08FW099g/YC/GRBL.t./Y.tus/EM0"</text:span>;</text:p>
      <text:p text:style-name="P188"/>
      <text:p text:style-name="P924"><text:span text:style-name="T1063">8</text:span><text:span text:style-name="T1064"> <text:tab/></text:span><text:span text:style-name="T101">char</text:span><text:span text:style-name="T124"> input[</text:span><text:span text:style-name="T335">100</text:span><text:span text:style-name="T124">];</text:span></text:p>
      <text:p text:style-name="P923"><text:span text:style-name="T1062">9</text:span><text:span text:style-name="T1061"> <text:tab/></text:span>printf(<text:span text:style-name="T116">"Enter password: "</text:span>);</text:p>
      <text:p text:style-name="P923"><text:span text:style-name="T1061">1</text:span><text:span text:style-name="T1062">0</text:span><text:span text:style-name="T1061"> <text:tab/></text:span><text:span text:style-name="T115">if</text:span> (fgets(input, <text:span text:style-name="T115">sizeof</text:span>(input), <text:span text:style-name="T115">stdin</text:span>) == <text:span text:style-name="T115">NULL</text:span>) {</text:p>
      <text:p text:style-name="P923"><text:span text:style-name="T1061">1</text:span><text:span text:style-name="T1062">1</text:span><text:span text:style-name="T1061"> <text:tab/><text:tab/></text:span>perror(<text:span text:style-name="T116">"fgets"</text:span>);</text:p>
      <text:p text:style-name="P923"><text:span text:style-name="T1061">1</text:span><text:span text:style-name="T1062">2</text:span><text:span text:style-name="T1061"> <text:tab/><text:tab/></text:span><text:span text:style-name="T115">return</text:span> <text:span text:style-name="T127">1</text:span>;</text:p>
      <text:p text:style-name="P923"><text:span text:style-name="T1061">1</text:span><text:span text:style-name="T1062">3</text:span><text:span text:style-name="T1061"> <text:tab/></text:span>}</text:p>
      <text:p text:style-name="P188"/>
      <text:p text:style-name="P923"><text:span text:style-name="T1061">1</text:span><text:span text:style-name="T1062">4</text:span><text:span text:style-name="T1061"> <text:tab/></text:span>input[strcspn(input, <text:span text:style-name="T116">"\n"</text:span>)] = <text:span text:style-name="T116">'\0'</text:span>;</text:p>
      <text:p text:style-name="P188"/>
      <text:p text:style-name="P923"><text:span text:style-name="T1061">1</text:span><text:span text:style-name="T1062">5</text:span><text:span text:style-name="T1061"> <text:tab/></text:span><text:span text:style-name="T115">char</text:span> salt[<text:span text:style-name="T127">100</text:span>];</text:p>
      <text:p text:style-name="P923"><text:span text:style-name="T1061">1</text:span><text:span text:style-name="T1062">6</text:span><text:span text:style-name="T1061"> <text:tab/></text:span><text:span text:style-name="T115">const</text:span> <text:span text:style-name="T115">char</text:span> *p = stored_hash;</text:p>
      <text:p text:style-name="P923"><text:span text:style-name="T1061">1</text:span><text:span text:style-name="T1062">7</text:span><text:span text:style-name="T1061"> <text:tab/></text:span><text:span text:style-name="T115">int</text:span> dollar_count = <text:span text:style-name="T127">0</text:span>;</text:p>
      <text:p text:style-name="P923"><text:span text:style-name="T1061">1</text:span><text:span text:style-name="T1062">8</text:span><text:span text:style-name="T1061"> <text:tab/></text:span><text:span text:style-name="T115">size_t</text:span> i = <text:span text:style-name="T127">0</text:span>;</text:p>
      <text:p text:style-name="P188"/>
      <text:p text:style-name="P923"><text:span text:style-name="T1061">1</text:span><text:span text:style-name="T1062">9</text:span><text:span text:style-name="T1061"> <text:tab/></text:span><text:span text:style-name="T115">while</text:span> (*p &amp;&amp; dollar_count &lt; <text:span text:style-name="T127">3</text:span> &amp;&amp; i &lt; <text:span text:style-name="T115">sizeof</text:span>(salt) - <text:span text:style-name="T127">1</text:span>) {</text:p>
      <text:p text:style-name="P923"><text:span text:style-name="T1062">20</text:span><text:span text:style-name="T1061"> <text:tab/><text:tab/></text:span>salt[i++] = *p;</text:p>
      <text:p text:style-name="P923"><text:span text:style-name="T1062">2</text:span><text:span text:style-name="T1061">1 <text:tab/><text:tab/></text:span><text:span text:style-name="T115">if</text:span> (*p == <text:span text:style-name="T116">'$'</text:span>) {</text:p>
      <text:p text:style-name="P923"><text:span text:style-name="T1062">22</text:span><text:span text:style-name="T1061"> <text:tab/><text:tab/><text:tab/></text:span>dollar_count++;</text:p>
      <text:p text:style-name="P923"><text:span text:style-name="T1062">23</text:span><text:span text:style-name="T1061"> <text:tab/><text:tab/></text:span>}<text:tab/></text:p>
      <text:p text:style-name="P923"><text:span text:style-name="T1062">24</text:span><text:span text:style-name="T1061"> <text:tab/><text:tab/></text:span>p++;</text:p>
      <text:p text:style-name="P923"><text:span text:style-name="T1062">25</text:span><text:span text:style-name="T1061"> <text:tab/></text:span>}</text:p>
      <text:p text:style-name="P923"><text:span text:style-name="T1062">26</text:span><text:span text:style-name="T1061"> <text:tab/></text:span>salt[i] = <text:span text:style-name="T116">'\0'</text:span>;</text:p>
      <text:p text:style-name="P188"/>
      <text:p text:style-name="P923"><text:span text:style-name="T1062">27</text:span><text:span text:style-name="T1061"> <text:tab/></text:span><text:span text:style-name="T115">char</text:span> *hashed = <text:span text:style-name="T126">crypt</text:span>(input, salt);</text:p>
      <text:p text:style-name="P923"><text:span text:style-name="T1062">28</text:span><text:span text:style-name="T1061"> <text:tab/></text:span><text:span text:style-name="T115">if</text:span> (hashed == <text:span text:style-name="T115">NULL</text:span>) {</text:p>
      <text:p text:style-name="P923"><text:span text:style-name="T1062">29</text:span><text:span text:style-name="T1061"> <text:tab/><text:tab/></text:span>perror(<text:span text:style-name="T116">"crypt"</text:span>);</text:p>
      <text:p text:style-name="P923"><text:span text:style-name="T1062">30</text:span><text:span text:style-name="T1061"> <text:tab/><text:tab/></text:span><text:span text:style-name="T115">return</text:span> <text:span text:style-name="T127">1</text:span>;</text:p>
      <text:p text:style-name="P923"><text:span text:style-name="T1062">3</text:span><text:span text:style-name="T1061">1 <text:tab/></text:span>}</text:p>
      <text:p text:style-name="P188"/>
      <text:p text:style-name="P923"><text:span text:style-name="T1062">32</text:span><text:span text:style-name="T1061"> <text:tab/></text:span><text:span text:style-name="T115">if</text:span> (strcmp(hashed, stored_hash) == <text:span text:style-name="T127">0</text:span>) {</text:p>
      <text:p text:style-name="P923"><text:span text:style-name="T1062">33</text:span><text:span text:style-name="T1061"> <text:tab/><text:tab/></text:span>printf(<text:span text:style-name="T116">" Password correct!\n"</text:span>);</text:p>
      <text:p text:style-name="P923"><text:span text:style-name="T1062">34</text:span><text:span text:style-name="T1061"> <text:tab/></text:span>} <text:span text:style-name="T115">else</text:span> {</text:p>
      <text:p text:style-name="P923"><text:soft-page-break/><text:span text:style-name="T1062">35</text:span><text:span text:style-name="T1061"> <text:tab/><text:tab/></text:span>printf(<text:span text:style-name="T116">" Invalid password.\n"</text:span>);</text:p>
      <text:p text:style-name="P924"><text:span text:style-name="T1063">36</text:span><text:span text:style-name="T1064"> <text:tab/></text:span><text:span text:style-name="T124">}</text:span></text:p>
      <text:p text:style-name="P923"><text:span text:style-name="T1062">37</text:span><text:span text:style-name="T1061"> <text:tab/></text:span><text:span text:style-name="T115">return</text:span> <text:span text:style-name="T127">0</text:span>;</text:p>
      <text:p text:style-name="P924"><text:span text:style-name="T1063">38</text:span><text:span text:style-name="T1064"> </text:span><text:span text:style-name="T124">}</text:span></text:p>
      <text:p text:style-name="Horizontal_20_Line"/>
      <text:p text:style-name="P925"><text:span text:style-name="T90">checkpwd.c</text:span> Check the password</text:p>
      <text:p text:style-name="P896"/>
      <text:p text:style-name="Standard"><text:span text:style-name="Strong_20_Emphasis"><text:span text:style-name="T220">Line 7.</text:span></text:span><text:span text:style-name="T220"> Stores the precomputed hashed password in the constant </text:span><text:span text:style-name="Source_20_Text"><text:span text:style-name="T221">stored_hash</text:span></text:span></text:p>
      <text:p text:style-name="Standard"><text:span text:style-name="Strong_20_Emphasis"><text:span text:style-name="T220">Line 9–13.</text:span></text:span><text:span text:style-name="T220"> Prompts the user for a password and reads it from standard input using </text:span><text:span text:style-name="Source_20_Text"><text:span text:style-name="T221">fgets</text:span></text:span><text:span text:style-name="T220">, storing <text:tab/> <text:s text:c="5"/>it in </text:span><text:span text:style-name="Source_20_Text"><text:span text:style-name="T221">input</text:span></text:span></text:p>
      <text:p text:style-name="P926"><text:span text:style-name="Strong_20_Emphasis"><text:span text:style-name="T220">Line 14.</text:span></text:span><text:span text:style-name="T220"> Removes the trailing newline character from the input string</text:span></text:p>
      <text:p text:style-name="Standard"><text:span text:style-name="Strong_20_Emphasis"><text:span text:style-name="T220">Line 15–26.</text:span></text:span><text:span text:style-name="T220"> Extracts the salt from the stored hash by scanning the string up to the third </text:span><text:span text:style-name="Source_20_Text"><text:span text:style-name="T221">$</text:span></text:span><text:span text:style-name="T220"> delimiter, <text:tab/> <text:s text:c="7"/>reconstructing the correct salt format required by </text:span><text:span text:style-name="Source_20_Text"><text:span text:style-name="T221">crypt</text:span></text:span></text:p>
      <text:p text:style-name="Standard"><text:span text:style-name="Strong_20_Emphasis"><text:span text:style-name="T220">Line 27.</text:span></text:span><text:span text:style-name="T220"> Calls </text:span><text:span text:style-name="Source_20_Text"><text:span text:style-name="T221">crypt</text:span></text:span><text:span text:style-name="T220"> with the user input and extracted salt, producing a new hash stored in <text:tab/> <text:s/><text:tab/> <text:s/></text:span><text:span text:style-name="Source_20_Text"><text:span text:style-name="T221">hashed</text:span></text:span></text:p>
      <text:p text:style-name="Standard"><text:span text:style-name="Strong_20_Emphasis"><text:span text:style-name="T220">Line 32–36.</text:span></text:span><text:span text:style-name="T220"> Compares the computed hash with the stored hash using </text:span><text:span text:style-name="Source_20_Text"><text:span text:style-name="T221">strcmp</text:span></text:span><text:span text:style-name="T220">. If they match, the <text:tab/> <text:s text:c="7"/>password is correct; otherwise, it is rejected</text:span></text:p>
      <text:p text:style-name="P307"/>
      <text:p text:style-name="P927">The program is executed.<text:tab/></text:p>
      <text:p text:style-name="P928"/>
      <table:table table:name="Table111" table:style-name="Table111">
        <table:table-column table:style-name="Table111.A"/>
        <table:table-row>
          <table:table-cell table:style-name="Table111.A1" office:value-type="string">
            <text:p text:style-name="P929"><text:span text:style-name="T80">[</text:span><text:a xlink:type="simple" xlink:href="mailto:linux@users" text:style-name="Internet_20_link" text:visited-style-name="Visited_20_Internet_20_Link"><text:span text:style-name="T81">linux@users</text:span></text:a><text:span text:style-name="T80">] ./</text:span><text:span text:style-name="T1065">checkpwd</text:span></text:p>
            <text:p text:style-name="P929">Enter password: mars123</text:p>
            <text:p text:style-name="P929"><text:s/>Password correct!</text:p>
            <text:p text:style-name="P929"/>
            <text:p text:style-name="P929"><text:span text:style-name="T80">[</text:span><text:a xlink:type="simple" xlink:href="mailto:linux@users" text:style-name="Internet_20_link" text:visited-style-name="Visited_20_Internet_20_Link"><text:span text:style-name="T81">linux@users</text:span></text:a><text:span text:style-name="T80">] ./</text:span><text:span text:style-name="T1065">checkpwd</text:span></text:p>
            <text:p text:style-name="P929">Enter password: mars12</text:p>
            <text:p text:style-name="P929"><text:s/>Invalid password.</text:p>
          </table:table-cell>
        </table:table-row>
      </table:table>
      <text:p text:style-name="P927"/>
      <text:p text:style-name="P927">The program correctly validates the user input by hashing the entered password with the same salt used in the stored hash and comparing the result.</text:p>
      <text:p text:style-name="P930"><text:span text:style-name="T1066">When the correct password (</text:span><text:span text:style-name="Source_20_Text"><text:span text:style-name="T1067">mars123</text:span></text:span><text:span text:style-name="T1066">) is entered, the computed hash matches the stored hash and the program confirms successful authentication. When an incorrect password (</text:span><text:span text:style-name="Source_20_Text"><text:span text:style-name="T1067">mars12</text:span></text:span><text:span text:style-name="T1066">) is entered, the hashes differ and the program correctly rejects the input.</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2"><text:soft-page-break/>III.7.2 Generating a salt: <text:span text:style-name="T75">crypt_gensalt</text:span></text:p>
      <text:p text:style-name="P931"/>
      <text:p text:style-name="P933"><text:span text:style-name="T1068">Before hashing a password with </text:span><text:span text:style-name="Source_20_Text"><text:span text:style-name="T1069">crypt</text:span></text:span><text:span text:style-name="T1068">, it is necessary to generate a salt. A salt is a random value added to the password before hashing in order to produce unique hashes even when two users choose the same password. This mechanism helps protect against precomputed attacks such as rainbow tables.</text:span></text:p>
      <text:p text:style-name="P933"><text:span text:style-name="T1068">The </text:span><text:span text:style-name="Source_20_Text"><text:span text:style-name="T1069">crypt_gensalt</text:span></text:span><text:span text:style-name="Source_20_Text"><text:span text:style-name="T1068"><text:note text:id="ftn75" text:note-class="footnote"><text:note-citation>73</text:note-citation><text:note-body><text:p text:style-name="P934"><text:span text:style-name="T1070">See the </text:span><text:span text:style-name="T1071">crypt_gensalt(3)</text:span><text:span text:style-name="T1072"> manual page</text:span></text:p></text:note-body></text:note></text:span></text:span><text:span text:style-name="T1068"> function can be used to automatically generate salts compatible with the hashing methods supported by </text:span><text:span text:style-name="Source_20_Text"><text:span text:style-name="T1069">crypt</text:span></text:span><text:span text:style-name="T1068">.</text:span></text:p>
      <text:p text:style-name="P931"/>
      <table:table table:name="Table112" table:style-name="Table112">
        <table:table-column table:style-name="Table112.A"/>
        <table:table-row>
          <table:table-cell table:style-name="Table112.A1" office:value-type="string">
            <text:p text:style-name="P271"><text:span text:style-name="T115">#include </text:span><text:span text:style-name="T116">&lt;crypt.h&gt;</text:span></text:p>
            <text:p text:style-name="P935"/>
            <text:p text:style-name="P936"><text:span text:style-name="T115">char</text:span> *<text:span text:style-name="T126">crypt_gensalt</text:span>(<text:span text:style-name="T115">const</text:span> <text:span text:style-name="T115">char</text:span> <text:span text:style-name="T68">*prefix</text:span>, <text:span text:style-name="T115">unsigned</text:span> <text:span text:style-name="T115">long</text:span> <text:span text:style-name="T68">count</text:span>, <text:span text:style-name="T115">const</text:span> <text:span text:style-name="T115">char</text:span> </text:p>
            <text:p text:style-name="P936"><text:span text:style-name="T68"><text:s text:c="20"/>*rbytes</text:span>, <text:span text:style-name="T115">int</text:span> <text:span text:style-name="T68">nrbytes</text:span>);</text:p>
            <text:p text:style-name="P935"/>
            <text:p text:style-name="P937"><text:span text:style-name="T115">char</text:span> *<text:span text:style-name="T126">crypt_gensalt_rn</text:span>(<text:span text:style-name="T115">const</text:span> <text:span text:style-name="T115">char</text:span> <text:span text:style-name="T68">*prefix</text:span>, <text:span text:style-name="T115">unsigned</text:span> <text:span text:style-name="T115">long</text:span> <text:span text:style-name="T68">count</text:span>, <text:span text:style-name="T115">const</text:span> </text:p>
            <text:p text:style-name="P937"><text:span text:style-name="T115"><text:s text:c="23"/>char </text:span><text:span text:style-name="T68">*rbytes</text:span>, <text:span text:style-name="T115">int</text:span> <text:span text:style-name="T68">nrbytes</text:span>, <text:span text:style-name="T115">char</text:span> <text:span text:style-name="T68">*output</text:span>, <text:span text:style-name="T115">int <text:s/></text:span></text:p>
            <text:p text:style-name="P937"><text:span text:style-name="T770"><text:s text:c="23"/></text:span><text:span text:style-name="T68">output_size</text:span>);</text:p>
            <text:p text:style-name="P935"/>
            <text:p text:style-name="P938"><text:span text:style-name="T101">char</text:span><text:span text:style-name="T124"> *</text:span><text:span text:style-name="T216">crypt_gensalt_ra</text:span><text:span text:style-name="T124">(</text:span><text:span text:style-name="T101">const</text:span><text:span text:style-name="T124"> </text:span><text:span text:style-name="T101">char</text:span><text:span text:style-name="T124"> </text:span><text:span text:style-name="T741">*prefix</text:span><text:span text:style-name="T124">, </text:span><text:span text:style-name="T101">unsigned</text:span><text:span text:style-name="T124"> </text:span><text:span text:style-name="T101">long</text:span><text:span text:style-name="T124"> </text:span><text:span text:style-name="T741">count</text:span><text:span text:style-name="T124">, </text:span><text:span text:style-name="T101">const</text:span><text:span text:style-name="T124"> </text:span></text:p>
            <text:p text:style-name="P938"><text:span text:style-name="T124"><text:s text:c="23"/></text:span><text:span text:style-name="T101">char </text:span><text:span text:style-name="T741">*rbytes</text:span><text:span text:style-name="T124">, </text:span><text:span text:style-name="T101">int</text:span><text:span text:style-name="T124"> </text:span><text:span text:style-name="T741">nrbytes</text:span><text:span text:style-name="T124">);</text:span></text:p>
            <text:p text:style-name="P936"/>
            <text:p text:style-name="P939">Return: <text:span text:style-name="T1073">pointer to an encoded setting string, </text:span><text:span text:style-name="T1074">on error a NULL pointer and errno</text:span></text:p>
          </table:table-cell>
        </table:table-row>
      </table:table>
      <text:p text:style-name="P940"/>
      <text:p text:style-name="P933"><text:span text:style-name="T1075">These functions generate a string that can be used as the settings argument for </text:span><text:span text:style-name="Source_20_Text"><text:span text:style-name="T1069">crypt</text:span></text:span><text:span text:style-name="T1075">, </text:span><text:span text:style-name="Source_20_Text"><text:span text:style-name="T1069">crypt_r</text:span></text:span><text:span text:style-name="T1075">, </text:span><text:span text:style-name="Source_20_Text"><text:span text:style-name="T1069">crypt_rn</text:span></text:span><text:span text:style-name="T1075">, and </text:span><text:span text:style-name="Source_20_Text"><text:span text:style-name="T1069">crypt_ra</text:span></text:span><text:span text:style-name="T1075">. The </text:span><text:span text:style-name="Source_20_Text"><text:span text:style-name="T1069">prefix</text:span></text:span><text:span text:style-name="T1075"> argument specifies the hashing method, </text:span><text:span text:style-name="Source_20_Text"><text:span text:style-name="T1075">count</text:span></text:span><text:span text:style-name="T1075"> controls the computational cost of the hash, and </text:span><text:span text:style-name="Source_20_Text"><text:span text:style-name="T1069">rbytes</text:span></text:span><text:span text:style-name="T1075"> points to </text:span><text:span text:style-name="Source_20_Text"><text:span text:style-name="T1069">nrbytes</text:span></text:span><text:span text:style-name="T1075"> cryptographically secure random bytes used to generate the salt.</text:span></text:p>
      <text:p text:style-name="P933"><text:span text:style-name="T1075">The </text:span><text:span text:style-name="Source_20_Text"><text:span text:style-name="T1069">crypt_gensalt_rn</text:span></text:span><text:span text:style-name="T1075"> function stores the generated result in the buffer </text:span><text:span text:style-name="Source_20_Text"><text:span text:style-name="T1069">output</text:span></text:span><text:span text:style-name="T1075">, which has </text:span><text:span text:style-name="Source_20_Text"><text:span text:style-name="T1069">output_size</text:span></text:span><text:span text:style-name="T1075"> bytes available. The value of </text:span><text:span text:style-name="Source_20_Text"><text:span text:style-name="T1069">output_size</text:span></text:span><text:span text:style-name="T1075"> should be greater than or equal to the constant </text:span><text:span text:style-name="Source_20_Text"><text:span text:style-name="T1069">CRYPT_GENSALT_OUTPUT_SIZE</text:span></text:span><text:span text:style-name="T1075">, defined in the </text:span><text:span text:style-name="Source_20_Text"><text:span text:style-name="T1069">crypt.h</text:span></text:span><text:span text:style-name="T1075"> header file.</text:span></text:p>
      <text:p text:style-name="P941"/>
      <text:p text:style-name="P644"><text:span text:style-name="T1075">The </text:span><text:span text:style-name="T1069">gensalt.c</text:span><text:span text:style-name="T1075"> program generates a salt using </text:span><text:span text:style-name="Source_20_Text"><text:span text:style-name="T1069">crypt_gensalt</text:span></text:span><text:span text:style-name="T1075"> and then uses it to hash a password with </text:span><text:span text:style-name="Source_20_Text"><text:span text:style-name="T1069">crypt</text:span></text:span><text:span text:style-name="T1075">.</text:span></text:p>
      <text:p text:style-name="Horizontal_20_Line"/>
      <text:p text:style-name="P186"><text:span text:style-name="T1076">1 </text:span><text:span text:style-name="T115">#include </text:span><text:span text:style-name="T116">&lt;stdio.h&gt;</text:span></text:p>
      <text:p text:style-name="P942"><text:span text:style-name="T1076">2 </text:span><text:span text:style-name="T115">#include </text:span><text:span text:style-name="T116">&lt;crypt.h&gt;</text:span><text:span text:style-name="T115"> </text:span></text:p>
      <text:p text:style-name="P942"><text:span text:style-name="T1076">3 </text:span><text:span text:style-name="T115">#include </text:span><text:span text:style-name="T116">&lt;stdlib.h&gt;</text:span></text:p>
      <text:p text:style-name="P188"/>
      <text:p text:style-name="P942"><text:span text:style-name="T1076">4 </text:span><text:span text:style-name="T115">int</text:span> main(<text:span text:style-name="T115">int</text:span> argc, <text:span text:style-name="T115">char</text:span> *argv<text:span text:style-name="T115">[]</text:span>) {</text:p>
      <text:p text:style-name="P942"><text:span text:style-name="T1076">5 </text:span><text:span text:style-name="T115"><text:tab/>if</text:span> (argc != <text:span text:style-name="T127">2</text:span>) {</text:p>
      <text:p text:style-name="P942"><text:span text:style-name="T1076">6 </text:span><text:tab/><text:tab/>printf(<text:span text:style-name="T116">"\nUsage: %s &lt;password&gt;"</text:span>, argv[<text:span text:style-name="T127">0</text:span>]);</text:p>
      <text:p text:style-name="P942"><text:span text:style-name="T1076">7 </text:span><text:tab/><text:tab/>exit(<text:span text:style-name="T115">EXIT_FAILURE</text:span>);</text:p>
      <text:p text:style-name="P942"><text:span text:style-name="T1076">8 </text:span><text:tab/>}</text:p>
      <text:p text:style-name="P188"/>
      <text:p text:style-name="P943"><text:span text:style-name="T1077">9 </text:span><text:span text:style-name="T101"><text:tab/>const</text:span><text:span text:style-name="T124"> </text:span><text:span text:style-name="T101">char</text:span><text:span text:style-name="T124"> *password = argv[</text:span><text:span text:style-name="T335">1</text:span><text:span text:style-name="T124">];</text:span></text:p>
      <text:p text:style-name="P942"><text:span text:style-name="T1076">10 </text:span><text:span text:style-name="T115"><text:tab/>char</text:span> *salt = <text:span text:style-name="T126">crypt_gensalt</text:span>(<text:span text:style-name="T116">"$6$"</text:span>, <text:span text:style-name="T127">5000</text:span>, <text:span text:style-name="T115">NULL</text:span>, <text:span text:style-name="T127">0</text:span>);</text:p>
      <text:p text:style-name="P942"><text:span text:style-name="T1076">11</text:span><text:span text:style-name="T115"><text:tab/>if</text:span> (salt == <text:span text:style-name="T115">NULL</text:span>) {</text:p>
      <text:p text:style-name="P942"><text:span text:style-name="T1076">12 </text:span><text:tab/><text:tab/>perror(<text:span text:style-name="T116">"crypt_gensalt"</text:span>);</text:p>
      <text:p text:style-name="P942"><text:soft-page-break/><text:span text:style-name="T1076">13 </text:span><text:span text:style-name="T115"><text:tab/><text:tab/></text:span>exit(<text:span text:style-name="T115">EXIT_FAILURE</text:span>);</text:p>
      <text:p text:style-name="P942"><text:span text:style-name="T1076">14 </text:span><text:tab/>}</text:p>
      <text:p text:style-name="P188"/>
      <text:p text:style-name="P943"><text:span text:style-name="T1077">15 </text:span><text:span text:style-name="T124"><text:tab/>printf(</text:span><text:span text:style-name="T102">"Generated salt: %s\n"</text:span><text:span text:style-name="T124">, salt);</text:span></text:p>
      <text:p text:style-name="P942"><text:span text:style-name="T1076">16 </text:span><text:span text:style-name="T115"><text:tab/>char</text:span> *hash = <text:span text:style-name="T126">crypt</text:span>(password, salt);</text:p>
      <text:p text:style-name="P942"><text:span text:style-name="T1076">17 </text:span><text:span text:style-name="T115"><text:tab/>if</text:span> (hash == <text:span text:style-name="T115">NULL</text:span>) {</text:p>
      <text:p text:style-name="P942"><text:span text:style-name="T1076">18 </text:span><text:tab/><text:tab/>perror(<text:span text:style-name="T116">"crypt"</text:span>);</text:p>
      <text:p text:style-name="P944"><text:span text:style-name="T1078">19 </text:span><text:span text:style-name="T103"><text:tab/><text:tab/></text:span><text:span text:style-name="T104">exit(</text:span><text:span text:style-name="T103">EXIT_FAILURE</text:span><text:span text:style-name="T104">);</text:span></text:p>
      <text:p text:style-name="P943"><text:span text:style-name="T1077">20 </text:span><text:span text:style-name="T124"><text:tab/>}</text:span></text:p>
      <text:p text:style-name="P942"><text:span text:style-name="T1076">21 </text:span><text:tab/>printf(<text:span text:style-name="T116">"Password: %s\n"</text:span>, password);</text:p>
      <text:p text:style-name="P943"><text:span text:style-name="T1077">22 </text:span><text:span text:style-name="T124"><text:tab/>printf(</text:span><text:span text:style-name="T102">"Hash: %s\n"</text:span><text:span text:style-name="T124">, hash);</text:span></text:p>
      <text:p text:style-name="P944"><text:span text:style-name="T1078">23 </text:span><text:span text:style-name="T103"><text:tab/></text:span><text:span text:style-name="T104">exit(</text:span><text:span text:style-name="T103">EXIT_SUCCESS</text:span><text:span text:style-name="T104">);</text:span></text:p>
      <text:p text:style-name="P943"><text:span text:style-name="T1077">24 </text:span><text:span text:style-name="T124">}</text:span></text:p>
      <text:p text:style-name="Horizontal_20_Line"/>
      <text:p text:style-name="P945">gensalt.c</text:p>
      <text:p text:style-name="P896"/>
      <text:p text:style-name="Standard"><text:span text:style-name="Source_20_Text"><text:span text:style-name="Strong_20_Emphasis"><text:span text:style-name="T1079">Line 10.</text:span></text:span></text:span><text:span text:style-name="Source_20_Text"><text:span text:style-name="T1079"> Generates a salt using the SHA-512 hashing method (</text:span></text:span><text:span text:style-name="Source_20_Text"><text:span text:style-name="T1080">$6$</text:span></text:span><text:span text:style-name="Source_20_Text"><text:span text:style-name="T1079">) with a processing cost of 5000 <text:tab/> <text:s text:c="2"/>rounds</text:span></text:span></text:p>
      <text:p text:style-name="Standard"><text:span text:style-name="Strong_20_Emphasis"><text:span text:style-name="T731">Line 11–14.</text:span></text:span><text:span text:style-name="T731"> Checks whether the salt generation succeeded. If </text:span><text:span text:style-name="Source_20_Text"><text:span text:style-name="T1080">crypt_gensalt</text:span></text:span><text:span text:style-name="T731"> returns </text:span><text:span text:style-name="Source_20_Text"><text:span text:style-name="T1080">NULL</text:span></text:span><text:span text:style-name="T731">, the <text:tab/> <text:s text:c="7"/>program reports the error and exits</text:span></text:p>
      <text:p text:style-name="Standard"><text:span text:style-name="Strong_20_Emphasis"><text:span text:style-name="T731">Line 15.</text:span></text:span><text:span text:style-name="T731"> Prints the generated salt</text:span></text:p>
      <text:p text:style-name="Standard"><text:span text:style-name="Strong_20_Emphasis"><text:span text:style-name="T731">Line 16.</text:span></text:span><text:span text:style-name="T731"> Hashes the password passed on the command line using the generated salt and stores the <text:tab/> <text:s/>result in </text:span><text:span text:style-name="Source_20_Text"><text:span text:style-name="T731">hash</text:span></text:span></text:p>
      <text:p text:style-name="Standard"><text:span text:style-name="Strong_20_Emphasis"><text:span text:style-name="T731">Line 17–20.</text:span></text:span><text:span text:style-name="T731"> Checks whether the hashing operation succeeded. If </text:span><text:span text:style-name="Source_20_Text"><text:span text:style-name="T1080">crypt</text:span></text:span><text:span text:style-name="T731"> fails, the program prints <text:tab/> <text:s text:c="8"/>an error message and terminates</text:span></text:p>
      <text:p text:style-name="Standard"><text:span text:style-name="Strong_20_Emphasis"><text:span text:style-name="T731">Line 21–22.</text:span></text:span><text:span text:style-name="T731"> Prints the original password and the resulting hash</text:span></text:p>
      <text:p text:style-name="P946"><text:s/></text:p>
      <text:p text:style-name="P947"><text:span text:style-name="T1081">We</text:span> compile and execute <text:span text:style-name="T1081">the program. </text:span></text:p>
      <text:p text:style-name="P947"/>
      <table:table table:name="Table113" table:style-name="Table113">
        <table:table-column table:style-name="Table113.A"/>
        <table:table-row>
          <table:table-cell table:style-name="Table113.A1" office:value-type="string">
            <text:p text:style-name="P948"><text:span text:style-name="T80">[</text:span><text:a xlink:type="simple" xlink:href="mailto:linux@users" text:style-name="Internet_20_link" text:visited-style-name="Visited_20_Internet_20_Link"><text:span text:style-name="T81">linux@users</text:span></text:a><text:span text:style-name="T80">] </text:span><text:span text:style-name="T1082">gcc -o gensalt gensalt.c -lcrypt</text:span></text:p>
            <text:p text:style-name="P948"/>
            <text:p text:style-name="P948"><text:span text:style-name="T80">[</text:span><text:a xlink:type="simple" xlink:href="mailto:linux@users" text:style-name="Internet_20_link" text:visited-style-name="Visited_20_Internet_20_Link"><text:span text:style-name="T81">linux@users</text:span></text:a><text:span text:style-name="T80">] ./</text:span><text:span text:style-name="T1082">gensalt mypwd123</text:span></text:p>
            <text:p text:style-name="P948">Generated salt: $6$2wiE2QdAYJAt1ylT</text:p>
            <text:p text:style-name="P948">Password: mypwd123</text:p>
            <text:p text:style-name="P948">Hash: $6$2wiE2QdAYJAt1ylT$pOCOfmjnMMjjWIiY7653huNPHsmbR9vUzP2Dyiw7/ROTnLJ6oM0p2D8GvOnOnrscqzcMURPV1uZMTFein9xIh0</text:p>
          </table:table-cell>
        </table:table-row>
      </table:table>
      <text:p text:style-name="P947"/>
      <text:p text:style-name="P949"><text:span text:style-name="T1083">The </text:span><text:span text:style-name="T1084">gensalt.c</text:span><text:span text:style-name="T1085"> program </text:span><text:span text:style-name="T1086">can be modified to generate the salt using cryptographically secure random bytes obtained from the system.</text:span></text:p>
      <text:p text:style-name="Horizontal_20_Line"/>
      <text:p text:style-name="P186"><text:span text:style-name="T1087">1 </text:span><text:span text:style-name="T115">#define _GNU_SOURCE</text:span></text:p>
      <text:p text:style-name="P950"><text:span text:style-name="T1087">2 </text:span><text:span text:style-name="T115">#include </text:span><text:span text:style-name="T116">&lt;stdio.h&gt;</text:span></text:p>
      <text:p text:style-name="P950"><text:span text:style-name="T1087">3 </text:span><text:span text:style-name="T115">#include </text:span><text:span text:style-name="T116">&lt;crypt.h&gt;</text:span><text:span text:style-name="T115"> </text:span></text:p>
      <text:p text:style-name="P950"><text:span text:style-name="T1087">4 </text:span><text:span text:style-name="T115">#include </text:span><text:span text:style-name="T116">&lt;stdlib.h&gt;</text:span></text:p>
      <text:p text:style-name="P950"><text:span text:style-name="T1087">5 </text:span><text:span text:style-name="T115">#include </text:span><text:span text:style-name="T116">&lt;sys/random.h&gt;</text:span></text:p>
      <text:p text:style-name="P951"><text:span text:style-name="T1088">6 </text:span><text:span text:style-name="T101">#define SALT_BYTES </text:span><text:span text:style-name="T335">16</text:span></text:p>
      <text:p text:style-name="P188"/>
      <text:p text:style-name="P950"><text:span text:style-name="T1087">7 </text:span><text:span text:style-name="T115">int</text:span> main(<text:span text:style-name="T115">int</text:span> argc, <text:span text:style-name="T115">char</text:span> *argv<text:span text:style-name="T115">[]</text:span>) {</text:p>
      <text:p text:style-name="P950"><text:span text:style-name="T1087">8 <text:tab/></text:span><text:span text:style-name="T115">if</text:span> (argc != <text:span text:style-name="T127">2</text:span>) {</text:p>
      <text:p text:style-name="P950"><text:soft-page-break/><text:span text:style-name="T1087">9 <text:tab/><text:tab/></text:span>printf(<text:span text:style-name="T116">"\nUsage: %s &lt;password&gt;"</text:span>, argv[<text:span text:style-name="T127">0</text:span>]);</text:p>
      <text:p text:style-name="P950"><text:span text:style-name="T1087">10 <text:tab/><text:tab/></text:span>exit(<text:span text:style-name="T115">EXIT_FAILURE</text:span>);</text:p>
      <text:p text:style-name="P950"><text:span text:style-name="T1087">11 <text:tab/></text:span>}</text:p>
      <text:p text:style-name="P188"/>
      <text:p text:style-name="P950"><text:span text:style-name="T1087">12 <text:tab/></text:span><text:span text:style-name="T115">const</text:span> <text:span text:style-name="T115">char</text:span> *password = argv[<text:span text:style-name="T127">1</text:span>];</text:p>
      <text:p text:style-name="P952"><text:span text:style-name="T1089">13 <text:tab/></text:span><text:span text:style-name="T1090">unsigned</text:span><text:span text:style-name="T1091"> </text:span><text:span text:style-name="T1090">char</text:span><text:span text:style-name="T1091"> random_bytes[</text:span><text:span text:style-name="T1090">SALT_BYTES</text:span><text:span text:style-name="T1091">];</text:span></text:p>
      <text:p text:style-name="P953"><text:span text:style-name="T1087">14 <text:tab/></text:span><text:span text:style-name="T115">if</text:span> (<text:span text:style-name="T126">getrandom</text:span>(random_bytes, <text:span text:style-name="T115">SALT_BYTES</text:span>, <text:span text:style-name="T115">GRND_NONBLOCK</text:span>) &lt; <text:span text:style-name="T127">0</text:span>) {</text:p>
      <text:p text:style-name="P950"><text:span text:style-name="T1087">15 <text:tab/><text:tab/></text:span>perror(<text:span text:style-name="T116">"urandom"</text:span>);</text:p>
      <text:p text:style-name="P950"><text:span text:style-name="T1087">16 <text:tab/><text:tab/></text:span><text:span text:style-name="T115">return</text:span> <text:span text:style-name="T127">1</text:span>;</text:p>
      <text:p text:style-name="P950"><text:span text:style-name="T1087">17 <text:tab/></text:span>}</text:p>
      <text:p text:style-name="P188"/>
      <text:p text:style-name="P954"><text:span text:style-name="T1087">18 <text:tab/></text:span><text:span text:style-name="T115">char</text:span> *salt = <text:span text:style-name="T126">crypt_gensalt</text:span>(<text:span text:style-name="T116">"$6$"</text:span>, <text:span text:style-name="T127">10000</text:span>, (<text:span text:style-name="T115">const</text:span> <text:span text:style-name="T115">char</text:span> </text:p>
      <text:p text:style-name="P954"><text:tab/><text:tab/><text:tab/><text:tab/><text:tab/><text:tab/>*)random_bytes, <text:span text:style-name="T115">SALT_BYTES</text:span>);</text:p>
      <text:p text:style-name="P953"><text:span text:style-name="T1087">19 <text:tab/></text:span><text:span text:style-name="T115">if</text:span> (salt == <text:span text:style-name="T115">NULL</text:span>) {</text:p>
      <text:p text:style-name="P950"><text:span text:style-name="T1087">20 <text:tab/><text:tab/></text:span>perror(<text:span text:style-name="T116">"crypt_gensalt"</text:span>);</text:p>
      <text:p text:style-name="P950"><text:span text:style-name="T1087">21 <text:tab/><text:tab/></text:span>exit(<text:span text:style-name="T115">EXIT_FAILURE</text:span>);</text:p>
      <text:p text:style-name="P950"><text:span text:style-name="T1087">22 <text:tab/></text:span>}</text:p>
      <text:p text:style-name="P188"/>
      <text:p text:style-name="P951"><text:span text:style-name="T1088">23 <text:tab/></text:span><text:span text:style-name="T124">printf(</text:span><text:span text:style-name="T102">"Generated salt: %s\n"</text:span><text:span text:style-name="T124">, salt);</text:span></text:p>
      <text:p text:style-name="P950"><text:span text:style-name="T1087">24 <text:tab/></text:span><text:span text:style-name="T115">char</text:span> *hash = <text:span text:style-name="T126">crypt</text:span>(password, salt);</text:p>
      <text:p text:style-name="P950"><text:span text:style-name="T1087">25 <text:tab/></text:span><text:span text:style-name="T115">if</text:span> (hash == <text:span text:style-name="T115">NULL</text:span>) {</text:p>
      <text:p text:style-name="P950"><text:span text:style-name="T1087">26 <text:tab/><text:tab/></text:span>perror(<text:span text:style-name="T116">"crypt"</text:span>);</text:p>
      <text:p text:style-name="P950"><text:span text:style-name="T1087">27 <text:tab/><text:tab/></text:span>exit(<text:span text:style-name="T115">EXIT_FAILURE</text:span>);</text:p>
      <text:p text:style-name="P950"><text:span text:style-name="T1087">28 <text:tab/></text:span>}</text:p>
      <text:p text:style-name="P188"/>
      <text:p text:style-name="P950"><text:span text:style-name="T1087">29 <text:tab/></text:span>printf(<text:span text:style-name="T116">"Password: %s\n"</text:span>, password);</text:p>
      <text:p text:style-name="P951"><text:span text:style-name="T1088">30 <text:tab/></text:span><text:span text:style-name="T124">printf(</text:span><text:span text:style-name="T102">"Hash: %s\n"</text:span><text:span text:style-name="T124">, hash);</text:span><text:span text:style-name="T1092">S</text:span></text:p>
      <text:p text:style-name="P950"><text:span text:style-name="T1087">31 <text:tab/></text:span>exit(<text:span text:style-name="T115">EXIT_SUCCESS</text:span>);</text:p>
      <text:p text:style-name="P951"><text:span text:style-name="T1088">32 </text:span><text:span text:style-name="T124">}</text:span></text:p>
      <text:p text:style-name="Horizontal_20_Line"/>
      <text:p text:style-name="P955">gensalt.c</text:p>
      <text:p text:style-name="P594"/>
      <text:p text:style-name="Standard"><text:span text:style-name="Strong_20_Emphasis"><text:span text:style-name="T220">Line 13.</text:span></text:span><text:span text:style-name="T220"> Declares a buffer used to store the random bytes that will be used for salt generation</text:span></text:p>
      <text:p text:style-name="Standard"><text:span text:style-name="Strong_20_Emphasis"><text:span text:style-name="T220">Line 14.</text:span></text:span><text:span text:style-name="T220"> Calls </text:span><text:span text:style-name="Source_20_Text"><text:span text:style-name="T221">getrandom</text:span></text:span><text:span text:style-name="T220"> to retrieve 16 cryptographically secure random bytes from the kernel <text:tab/> <text:s/>random number generator</text:span></text:p>
      <text:p text:style-name="Standard"><text:span text:style-name="Strong_20_Emphasis"><text:span text:style-name="T220">Line 18.</text:span></text:span><text:span text:style-name="T220"> Generates a SHA-512 salt using </text:span><text:span text:style-name="Source_20_Text"><text:span text:style-name="T221">crypt_gensalt</text:span></text:span><text:span text:style-name="T220">, passing the random bytes as entropy <text:tab/> <text:s/>for the salt generation process</text:span></text:p>
      <text:p text:style-name="Standard"><text:span text:style-name="Strong_20_Emphasis"><text:span text:style-name="T220">Line 19–22.</text:span></text:span><text:span text:style-name="T220"> Checks whether the salt generation succeeded. If </text:span><text:span text:style-name="Source_20_Text"><text:span text:style-name="T221">crypt_gensalt</text:span></text:span><text:span text:style-name="T220"> fails, the program <text:tab/> <text:s text:c="7"/>reports the error and exits</text:span></text:p>
      <text:p text:style-name="Standard"><text:span text:style-name="Strong_20_Emphasis"><text:span text:style-name="T220">Line 23.</text:span></text:span><text:span text:style-name="T220"> Prints the generated salt</text:span></text:p>
      <text:p text:style-name="Standard"><text:span text:style-name="Strong_20_Emphasis"><text:span text:style-name="T220">Line 24.</text:span></text:span><text:span text:style-name="T220"> Hashes the provided password using the generated salt</text:span></text:p>
      <text:p text:style-name="Standard"><text:span text:style-name="Strong_20_Emphasis"><text:span text:style-name="T220">Line 25–27.</text:span></text:span><text:span text:style-name="T220"> Checks whether the hashing operation succeeded and reports any error returned by <text:tab/> <text:s text:c="7"/></text:span><text:span text:style-name="Source_20_Text"><text:span text:style-name="T221">crypt</text:span></text:span></text:p>
      <text:p text:style-name="Standard"><text:span text:style-name="Strong_20_Emphasis"><text:span text:style-name="T220">Line 29–30.</text:span></text:span><text:span text:style-name="T220"> Prints the plaintext password and the resulting hash</text:span></text:p>
      <text:p text:style-name="P956"><text:span text:style-name="Source_20_Text"><text:span text:style-name="T1083"/></text:span></text:p>
      <text:p text:style-name="P956"><text:span text:style-name="Source_20_Text"><text:span text:style-name="T1093">getrandom</text:span></text:span><text:span text:style-name="T1083"> does not directly read from </text:span><text:span text:style-name="Source_20_Text"><text:span text:style-name="T1093">/dev/random</text:span></text:span><text:span text:style-name="T1083">; it accesses the kernel random number generator through a system call interface.</text:span></text:p>
      <text:p text:style-name="P594"/>
      <text:p text:style-name="P957">We execute <text:span text:style-name="T1081">the program</text:span></text:p>
      <text:p text:style-name="P957"/>
      <table:table table:name="Table114" table:style-name="Table114">
        <table:table-column table:style-name="Table114.A"/>
        <text:soft-page-break/>
        <table:table-row>
          <table:table-cell table:style-name="Table114.A1" office:value-type="string">
            <text:p text:style-name="P958"><text:span text:style-name="T80">[</text:span><text:a xlink:type="simple" xlink:href="mailto:linux@users" text:style-name="Internet_20_link" text:visited-style-name="Visited_20_Internet_20_Link"><text:span text:style-name="T81">linux@users</text:span></text:a><text:span text:style-name="T80">] ./</text:span><text:span text:style-name="T1094">gensalt mypwd123</text:span></text:p>
            <text:p text:style-name="P958">Generated salt: $6$rounds=10000$KKGNh2f.6mp4TTc.</text:p>
            <text:p text:style-name="P958">Password: mypwd123</text:p>
            <text:p text:style-name="P958">Hash: $6$rounds=10000$KKGNh2f.6mp4TTc.$TliJPu.QGV1U7QNLm3CcBWDNQAZ8gqnImVo9GBSIWZq9jBuoD8AIWOeAjWULvmd6hKlwJDem8/auka/jqsvw5/</text:p>
          </table:table-cell>
        </table:table-row>
      </table:table>
      <text:p text:style-name="P959"/>
      <text:p text:style-name="P956"><text:span text:style-name="T1083">The program successfully generates a cryptographically secure salt using random bytes obtained from the system random generator and then uses it to hash the provided password with the SHA-512 algorithm (</text:span><text:span text:style-name="Source_20_Text"><text:span text:style-name="T1093">$6$</text:span></text:span><text:span text:style-name="T1083">).</text:span></text:p>
      <text:p text:style-name="P959"/>
      <text:p text:style-name="P959">The generated hash includes:</text:p>
      <text:p text:style-name="P959"/>
      <text:list text:style-name="L12">
        <text:list-item>
          <text:p text:style-name="P960">the hashing method identifier (<text:span text:style-name="Source_20_Text"><text:span text:style-name="T75">$6$</text:span></text:span> for SHA-512)</text:p>
        </text:list-item>
        <text:list-item>
          <text:p text:style-name="P960"><text:span text:style-name="T1083">the number of rounds (</text:span><text:span text:style-name="Source_20_Text"><text:span text:style-name="T1093">rounds=10000</text:span></text:span><text:span text:style-name="T1083">)</text:span></text:p>
        </text:list-item>
        <text:list-item>
          <text:p text:style-name="P960">the number of rounds (<text:span text:style-name="Source_20_Text"><text:span text:style-name="T75">rounds=10000</text:span></text:span>)</text:p>
        </text:list-item>
        <text:list-item>
          <text:p text:style-name="P961">the generated salt</text:p>
        </text:list-item>
        <text:list-item>
          <text:p text:style-name="P961">and the final hashed password</text:p>
        </text:list-item>
      </text:list>
      <text:list text:style-name="L13">
        <text:list-header>
          <text:p text:style-name="P962"/>
        </text:list-header>
      </text:list>
      <text:p text:style-name="P959">Even when the same password is used multiple times, different random salts produce different hashes, improving resistance against precomputed attacks such as rainbow tables.</text:p>
      <text:p text:style-name="P959"/>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3"/>
      <text:p text:style-name="P964"><text:soft-page-break/><text:span text:style-name="T1095">III.7.</text:span><text:span text:style-name="T1096">3</text:span><text:span text:style-name="T1095"> </text:span><text:span text:style-name="T1097">Hiding the input </text:span><text:span text:style-name="T1098">with BSD </text:span><text:span text:style-name="T1099">readpassphrase</text:span></text:p>
      <text:p text:style-name="P963"/>
      <text:p text:style-name="P965">When entering a password on the terminal, it is often useful to hide the typed characters for security reasons. To achieve this, we can use the <text:span text:style-name="Source_20_Text"><text:span text:style-name="T1100">readpassphrase</text:span></text:span><text:span text:style-name="Source_20_Text"><text:span text:style-name="T1100"><text:note text:id="ftn76" text:note-class="footnote"><text:note-citation>74</text:note-citation><text:note-body><text:p text:style-name="P934"><text:span text:style-name="T1101">See the </text:span><text:span text:style-name="T1100">readpassphrase(</text:span><text:span text:style-name="T1102">3bsd</text:span><text:span text:style-name="T1100">)</text:span><text:span text:style-name="T1103"> manual page</text:span></text:p></text:note-body></text:note></text:span></text:span> function, provided by the <text:span text:style-name="Source_20_Text"><text:span text:style-name="T1100">libbsd-dev</text:span></text:span><text:span text:style-name="Source_20_Text"><text:span text:style-name="T1100"><text:note text:id="ftn77" text:note-class="footnote"><text:note-citation>75</text:note-citation><text:note-body><text:p text:style-name="P966">Berkeley Software Distribution Dev<text:span text:style-name="T1104">e</text:span>lopment Library</text:p></text:note-body></text:note></text:span></text:span> package, which is defined as follows.</text:p>
      <text:p text:style-name="P967"/>
      <table:table table:name="Table115" table:style-name="Table115">
        <table:table-column table:style-name="Table115.A"/>
        <table:table-row>
          <table:table-cell table:style-name="Table115.A1" office:value-type="string">
            <text:p text:style-name="P271"><text:span text:style-name="T115">#include </text:span><text:span text:style-name="T116">&lt;readpassphrase.h&gt;</text:span></text:p>
            <text:p text:style-name="P188"/>
            <text:p text:style-name="P968"><text:span text:style-name="T101">char</text:span><text:span text:style-name="T124"> *</text:span><text:span text:style-name="T216">readpassphrase</text:span><text:span text:style-name="T124">(</text:span><text:span text:style-name="T101">const</text:span><text:span text:style-name="T124"> </text:span><text:span text:style-name="T101">char</text:span><text:span text:style-name="T124"> </text:span><text:span text:style-name="T741">*prompt</text:span><text:span text:style-name="T124">, </text:span><text:span text:style-name="T101">char</text:span><text:span text:style-name="T124"> </text:span><text:span text:style-name="T741">*buf</text:span><text:span text:style-name="T124">, </text:span><text:span text:style-name="T101">size_t</text:span><text:span text:style-name="T124"> </text:span><text:span text:style-name="T741">bufsiz</text:span><text:span text:style-name="T124">, </text:span><text:span text:style-name="T101">int</text:span><text:span text:style-name="T124"> </text:span></text:p>
            <text:p text:style-name="P969"><text:s text:c="21"/><text:span text:style-name="T68">flags</text:span>);</text:p>
            <text:p text:style-name="P969"/>
            <text:p text:style-name="P970">Returns: pointer to the passphrase, on error a NULL pointer</text:p>
          </table:table-cell>
        </table:table-row>
      </table:table>
      <text:p text:style-name="P967"/>
      <text:p text:style-name="P963"><text:span text:style-name="T1105">To install the BSD Development library we can use </text:span><text:span text:style-name="T1100">apt</text:span><text:span text:style-name="T1105"> </text:span></text:p>
      <text:p text:style-name="P971"/>
      <table:table table:name="Table116" table:style-name="Table116">
        <table:table-column table:style-name="Table116.A"/>
        <table:table-row>
          <table:table-cell table:style-name="Table116.A1" office:value-type="string">
            <text:p text:style-name="P972"><text:span text:style-name="T80">[</text:span><text:a xlink:type="simple" xlink:href="mailto:linux@users" text:style-name="Internet_20_link" text:visited-style-name="Visited_20_Internet_20_Link"><text:span text:style-name="T81">linux@users</text:span></text:a><text:span text:style-name="T80">] </text:span>sudo apt install libbsd-dev </text:p>
            <text:p text:style-name="P973">...<text:span text:style-name="T1106">output...</text:span></text:p>
          </table:table-cell>
        </table:table-row>
      </table:table>
      <text:p text:style-name="P971"/>
      <text:p text:style-name="P965"><text:span text:style-name="T1107">The </text:span><text:span text:style-name="T1108">libbsd(7)</text:span><text:span text:style-name="T1107"> manual page contains a list of the utility functions from the BSD systems. </text:span><text:span text:style-name="T1109">The </text:span><text:span text:style-name="T1100">readpassphrase</text:span><text:span text:style-name="T1109"> function displays a prompt and reads in a passphrase from the terminal (</text:span><text:span text:style-name="T1100">/dev/tty</text:span><text:span text:style-name="T1109">). The input is stored in the </text:span><text:span text:style-name="T1100">buf</text:span><text:span text:style-name="T1109"> pointer and the function read</text:span><text:span text:style-name="T1110">s</text:span><text:span text:style-name="T1109"> up </text:span><text:span text:style-name="T1100">bufsiz -1</text:span><text:span text:style-name="T1109"> characters. The </text:span><text:span text:style-name="T1100">flags</text:span><text:span text:style-name="T1109"> argument can be the bitwise OR of zero or more of the following </text:span><text:span text:style-name="T1111">values.</text:span></text:p>
      <text:p text:style-name="P974"/>
      <table:table table:name="Table117" table:style-name="Table117">
        <table:table-column table:style-name="Table117.A"/>
        <table:table-column table:style-name="Table117.B"/>
        <table:table-row>
          <table:table-cell table:style-name="Table117.A1" office:value-type="string">
            <text:p text:style-name="P975">RPP_ECHO_OFF</text:p>
          </table:table-cell>
          <table:table-cell table:style-name="Table117.B1" office:value-type="string">
            <text:p text:style-name="P976">Turn off echo (default)</text:p>
          </table:table-cell>
        </table:table-row>
        <table:table-row>
          <table:table-cell table:style-name="Table117.A2" office:value-type="string">
            <text:p text:style-name="P975">RPP_ECHO_ON</text:p>
          </table:table-cell>
          <table:table-cell table:style-name="Table117.B2" office:value-type="string">
            <text:p text:style-name="P976">Leave echo on</text:p>
          </table:table-cell>
        </table:table-row>
        <table:table-row>
          <table:table-cell table:style-name="Table117.A2" office:value-type="string">
            <text:p text:style-name="P975">RPP_REQUIRE_TTY</text:p>
          </table:table-cell>
          <table:table-cell table:style-name="Table117.B2" office:value-type="string">
            <text:p text:style-name="P976">Fail if there is no tty</text:p>
          </table:table-cell>
        </table:table-row>
        <table:table-row>
          <table:table-cell table:style-name="Table117.A2" office:value-type="string">
            <text:p text:style-name="P975">RPP_FORCELOWER</text:p>
          </table:table-cell>
          <table:table-cell table:style-name="Table117.B2" office:value-type="string">
            <text:p text:style-name="P976">Force input to lower case</text:p>
          </table:table-cell>
        </table:table-row>
        <table:table-row>
          <table:table-cell table:style-name="Table117.A2" office:value-type="string">
            <text:p text:style-name="P975">RPP_FORCEUPPER</text:p>
          </table:table-cell>
          <table:table-cell table:style-name="Table117.B2" office:value-type="string">
            <text:p text:style-name="P976">Force input to upper case</text:p>
          </table:table-cell>
        </table:table-row>
        <table:table-row>
          <table:table-cell table:style-name="Table117.A2" office:value-type="string">
            <text:p text:style-name="P975">RPP_SEVENBIT</text:p>
          </table:table-cell>
          <table:table-cell table:style-name="Table117.B2" office:value-type="string">
            <text:p text:style-name="P976">Strip the high bit from input</text:p>
          </table:table-cell>
        </table:table-row>
        <table:table-row>
          <table:table-cell table:style-name="Table117.A2" office:value-type="string">
            <text:p text:style-name="P975">RPP_STDIN</text:p>
          </table:table-cell>
          <table:table-cell table:style-name="Table117.B2" office:value-type="string">
            <text:p text:style-name="P427"><text:span text:style-name="T1112">Read passphrase from </text:span><text:span text:style-name="T1113">stdin</text:span><text:span text:style-name="T1112">, ignore the prompt</text:span></text:p>
          </table:table-cell>
        </table:table-row>
      </table:table>
      <text:p text:style-name="P977"/>
      <text:p text:style-name="P978"><text:span text:style-name="T1114">Tab 1</text:span><text:span text:style-name="T1115">7</text:span><text:span text:style-name="T1114">.</text:span><text:span text:style-name="T1116"> Values for the </text:span><text:span text:style-name="T1113">flags</text:span><text:span text:style-name="T1116"> argument </text:span></text:p>
      <text:p text:style-name="P594"/>
      <text:p text:style-name="P979">We can modify the <text:span text:style-name="T75">checkpwd.c</text:span> program in the following way </text:p>
      <text:p text:style-name="P979"/>
      <text:p text:style-name="P980"><text:span text:style-name="T1090">#include </text:span><text:span text:style-name="T1117">&lt;bsd/readpassphrase.h&gt;</text:span></text:p>
      <text:p text:style-name="P981"/>
      <text:p text:style-name="P982">/* <text:tab/>printf("Enter password: ");</text:p>
      <text:p text:style-name="P851"><text:tab/>if (fgets(input, sizeof(input), stdin) == NULL) {</text:p>
      <text:p text:style-name="P851"><text:tab/><text:tab/>perror("fgets");</text:p>
      <text:p text:style-name="P851"><text:tab/><text:tab/>return 1;</text:p>
      <text:p text:style-name="P851"><text:tab/>}</text:p>
      <text:p text:style-name="P851">*/</text:p>
      <text:p text:style-name="P188"/>
      <text:p text:style-name="P188"/>
      <text:p text:style-name="P186"><text:soft-page-break/><text:span text:style-name="T115">if</text:span>(<text:span text:style-name="T126">readpassphrase</text:span>(<text:span text:style-name="T116">"Password:"</text:span>,input,<text:span text:style-name="T115">sizeof</text:span>(input),<text:span text:style-name="T115">RPP_REQUIRE_TTY</text:span>)==<text:span text:style-name="T115">NULL</text:span>)</text:p>
      <text:p text:style-name="P186"><text:tab/>perror(<text:span text:style-name="T116">"readpassphrase"</text:span>);</text:p>
      <text:p text:style-name="P979"/>
      <text:p text:style-name="P965"><text:span text:style-name="T1118">The program is compiled by linking both the </text:span><text:span text:style-name="Source_20_Text"><text:span text:style-name="T1119">crypt</text:span></text:span><text:span text:style-name="T1118"> and </text:span><text:span text:style-name="Source_20_Text"><text:span text:style-name="T1119">bsd</text:span></text:span><text:span text:style-name="T1118"> libraries, since </text:span><text:span text:style-name="Source_20_Text"><text:span text:style-name="T1119">readpassphrase</text:span></text:span><text:span text:style-name="T1118"> is provided by </text:span><text:span text:style-name="Source_20_Text"><text:span text:style-name="T1119">libbsd</text:span></text:span><text:span text:style-name="Source_20_Text"><text:span text:style-name="T1119"><text:note text:id="ftn78" text:note-class="footnote"><text:note-citation>76</text:note-citation><text:note-body><text:p text:style-name="P934"><text:span text:style-name="T1120">See the </text:span><text:span text:style-name="T1121">libbsd(7)</text:span><text:span text:style-name="T1122"> manual page</text:span></text:p></text:note-body></text:note></text:span></text:span><text:span text:style-name="T1118">.</text:span></text:p>
      <text:p text:style-name="P594"/>
      <table:table table:name="Table118" table:style-name="Table118">
        <table:table-column table:style-name="Table118.A"/>
        <table:table-row>
          <table:table-cell table:style-name="Table118.A1" office:value-type="string">
            <text:p text:style-name="P983"><text:span text:style-name="T80">[</text:span><text:a xlink:type="simple" xlink:href="mailto:linux@users" text:style-name="Internet_20_link" text:visited-style-name="Visited_20_Internet_20_Link"><text:span text:style-name="T81">linux@users</text:span></text:a><text:span text:style-name="T80">] gcc -o checkpwd checkpwd.c -lcrypt -lbsd</text:span></text:p>
            <text:p text:style-name="P983"/>
            <text:p text:style-name="P983"><text:span text:style-name="T80">[</text:span><text:a xlink:type="simple" xlink:href="mailto:linux@users" text:style-name="Internet_20_link" text:visited-style-name="Visited_20_Internet_20_Link"><text:span text:style-name="T81">linux@users</text:span></text:a><text:span text:style-name="T80">] ./</text:span><text:span text:style-name="T1120">checkpwd</text:span></text:p>
            <text:p text:style-name="P983">Password: </text:p>
            <text:p text:style-name="P983"><text:s/>Password correct!</text:p>
          </table:table-cell>
        </table:table-row>
      </table:table>
      <text:p text:style-name="P984"/>
      <text:p text:style-name="P984">During execution, the password prompt does not display the typed characters on the terminal, allowing the user to enter sensitive information securely. After the password is entered, the program hashes the input and compares it with the stored hash to verify correctness.</text:p>
      <text:p text:style-name="P985"><text:s/></text:p>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986"><text:soft-page-break/>III.<text:span text:style-name="T1123">8</text:span> Login</text:p>
      <text:p text:style-name="P594"/>
      <text:p text:style-name="P987">On Linux systems, t<text:span text:style-name="T1124">hree</text:span> files are maintained to keep track of the logins.</text:p>
      <text:p text:style-name="P987"/>
      <table:table table:name="Table119" table:style-name="Table119">
        <table:table-column table:style-name="Table119.A"/>
        <table:table-column table:style-name="Table119.B"/>
        <table:table-row>
          <table:table-cell table:style-name="Table119.A1" office:value-type="string">
            <text:p text:style-name="P975">/<text:span text:style-name="T1125">var/run/utmp</text:span></text:p>
          </table:table-cell>
          <table:table-cell table:style-name="Table119.B1" office:value-type="string">
            <text:p text:style-name="P988">User accounting database, who is currently logged in </text:p>
          </table:table-cell>
        </table:table-row>
        <table:table-row>
          <table:table-cell table:style-name="Table119.A2" office:value-type="string">
            <text:p text:style-name="P975">/var/log/wtmp</text:p>
          </table:table-cell>
          <table:table-cell table:style-name="Table119.B2" office:value-type="string">
            <text:p text:style-name="P988">User accounting log files, tracks all logins and logouts</text:p>
          </table:table-cell>
        </table:table-row>
        <table:table-row>
          <table:table-cell table:style-name="Table119.A2" office:value-type="string">
            <text:p text:style-name="P989">/var/log/<text:span text:style-name="T1124">b</text:span>tmp</text:p>
          </table:table-cell>
          <table:table-cell table:style-name="Table119.B2" office:value-type="string">
            <text:p text:style-name="P990">Tracks failed logins attempts</text:p>
          </table:table-cell>
        </table:table-row>
      </table:table>
      <text:p text:style-name="P987"/>
      <text:p text:style-name="P991"><text:span text:style-name="T1126">Tab 1</text:span><text:span text:style-name="T1115">8</text:span><text:span text:style-name="T1126">.</text:span><text:span text:style-name="T1127"> </text:span><text:span text:style-name="T1113">utmp</text:span><text:span text:style-name="T1128">, </text:span><text:span text:style-name="T1113">wtmp</text:span><text:span text:style-name="T1128"> and </text:span><text:span text:style-name="T1129">btmp</text:span><text:span text:style-name="T1127"> files</text:span></text:p>
      <text:p text:style-name="P594"/>
      <text:p text:style-name="P427"><text:span text:style-name="T1128">These files are not mandatory on a system, some distro use them while others don’t. </text:span><text:span text:style-name="T1130">On </text:span><text:span text:style-name="T1131">Debian-based systems</text:span><text:span text:style-name="T1130"> these files are not used and the management of the logins is performed by the </text:span><text:span text:style-name="T1132">systemd</text:span><text:span text:style-name="T1130"> service. </text:span></text:p>
      <text:p text:style-name="P992"><text:span text:style-name="T1128">When a user log in the </text:span><text:span text:style-name="T1132">login</text:span><text:span text:style-name="T1132"><text:note text:id="ftn79" text:note-class="footnote"><text:note-citation>77</text:note-citation><text:note-body><text:p text:style-name="P993"><text:span text:style-name="T1124">See the </text:span><text:span text:style-name="T1133">login(1)</text:span><text:span text:style-name="T1134"> <text:s/>manual page</text:span></text:p></text:note-body></text:note></text:span><text:span text:style-name="T1128"> program write</text:span><text:span text:style-name="T1131">s</text:span><text:span text:style-name="T1128"> a record in the </text:span><text:span text:style-name="T1132">utmp</text:span><text:span text:style-name="T1128"> file. </text:span><text:span text:style-name="T1135">To store this information the </text:span><text:span text:style-name="T1132">utmp</text:span><text:span text:style-name="T1132"><text:note text:id="ftn80" text:note-class="footnote"><text:note-citation>78</text:note-citation><text:note-body><text:p text:style-name="P993"><text:span text:style-name="T1136">See the </text:span><text:span text:style-name="T1137">utmp(5)</text:span><text:span text:style-name="T1124"> manual page</text:span></text:p></text:note-body></text:note></text:span><text:span text:style-name="T1135"> structure is used, </text:span><text:span text:style-name="T1131">it</text:span><text:span text:style-name="T1135"> is defined as follows </text:span><text:span text:style-name="T1138">in the </text:span><text:span text:style-name="T1132">utmp.h</text:span><text:span text:style-name="T1138"> </text:span><text:span text:style-name="T1131">header </text:span><text:span text:style-name="T1138">file.</text:span></text:p>
      <text:p text:style-name="P994"/>
      <table:table table:name="Table120" table:style-name="Table120">
        <table:table-column table:style-name="Table120.A"/>
        <table:table-row>
          <table:table-cell table:style-name="Table120.A1" office:value-type="string">
            <text:p text:style-name="P271"><text:span text:style-name="T115">struct</text:span> utmp {</text:p>
            <text:p text:style-name="P186"><text:span text:style-name="T115"><text:s text:c="3"/>short</text:span> ut_type;<text:span text:style-name="T119"> <text:s text:c="14"/>/* Type of record */</text:span></text:p>
            <text:p text:style-name="P186"><text:span text:style-name="T115"><text:s text:c="3"/>pid_t</text:span> ut_pid;<text:span text:style-name="T119"> <text:s text:c="15"/>/* PID of login process */</text:span></text:p>
            <text:p text:style-name="P186"><text:span text:style-name="T115"><text:s text:c="3"/>char</text:span> ut_line[UT_LINESIZE];<text:span text:style-name="T119"> <text:s text:c="2"/>/* Device name of tty - "/dev/" */</text:span></text:p>
            <text:p text:style-name="P995"><text:span text:style-name="T115"><text:s text:c="3"/>char</text:span> ut_id[<text:span text:style-name="T127">4</text:span>];<text:span text:style-name="T119"> <text:s text:c="14"/>/* Terminal name suffix, or inittab(5) </text:span></text:p>
            <text:p text:style-name="P996"><text:s text:c="35"/>ID */</text:p>
            <text:p text:style-name="P186"><text:span text:style-name="T115"><text:s text:c="3"/>char</text:span> ut_user[UT_NAMESIZE];<text:span text:style-name="T119"> <text:s text:c="2"/>/* Username */</text:span></text:p>
            <text:p text:style-name="P995"><text:span text:style-name="T115"><text:s text:c="3"/>char</text:span> ut_host[UT_HOSTSIZE];<text:span text:style-name="T119"> <text:s text:c="2"/>/* Hostname for remote login, or kernel </text:span></text:p>
            <text:p text:style-name="P996"><text:s text:c="35"/>version for run-level messages */</text:p>
            <text:p text:style-name="P997"><text:span text:style-name="T103"><text:s text:c="3"/>struct</text:span><text:span text:style-name="T104"> </text:span><text:span text:style-name="T103">exit_status</text:span><text:span text:style-name="T104"> ut_exit;</text:span><text:span text:style-name="T1139"> /* Exit status of a process marked as <text:s/></text:span></text:p>
            <text:p text:style-name="P996"><text:s text:c="34"/>DEAD_PROCESS; not used by Linux </text:p>
            <text:p text:style-name="P996"><text:s text:c="34"/>init(1) */</text:p>
            <text:p text:style-name="P851"/>
            <text:p text:style-name="P186"><text:span text:style-name="T115">#if __WORDSIZE </text:span>==<text:span text:style-name="T115"> </text:span><text:span text:style-name="T127">64</text:span><text:span text:style-name="T115"> </text:span>&amp;&amp;<text:span text:style-name="T115"> defined __WORDSIZE_COMPAT32</text:span></text:p>
            <text:p text:style-name="P186"><text:span text:style-name="T115"><text:s text:c="3"/>int32_t</text:span> ut_session;<text:span text:style-name="T119"> <text:s text:c="8"/>/* Session ID (getsid(2))*/</text:span></text:p>
            <text:p text:style-name="P186"><text:span text:style-name="T115"><text:s text:c="3"/>struct</text:span> {</text:p>
            <text:p text:style-name="P186"><text:span text:style-name="T115"><text:s text:c="6"/>int32_t</text:span> tv_sec;<text:span text:style-name="T119"> <text:s text:c="9"/>/* Seconds */</text:span></text:p>
            <text:p text:style-name="P186"><text:span text:style-name="T115"><text:s text:c="6"/>int32_t</text:span> tv_usec;<text:span text:style-name="T119"> <text:s text:c="8"/>/* Microseconds */</text:span></text:p>
            <text:p text:style-name="P186"><text:s text:c="3"/>} ut_tv;<text:span text:style-name="T119"> <text:s text:c="19"/>/* Time entry was made */</text:span></text:p>
            <text:p text:style-name="P218">#else</text:p>
            <text:p text:style-name="P186"><text:span text:style-name="T115"><text:s text:c="3"/>long</text:span> ut_session;<text:span text:style-name="T119"> <text:s text:c="11"/>/* Session ID */</text:span></text:p>
            <text:p text:style-name="P997"><text:span text:style-name="T103"><text:s text:c="3"/>struct</text:span><text:span text:style-name="T104"> </text:span><text:span text:style-name="T103">timeval</text:span><text:span text:style-name="T104"> ut_tv;</text:span><text:span text:style-name="T1139"> <text:s text:c="6"/>/* Time entry was made */</text:span></text:p>
            <text:p text:style-name="P218">#endif</text:p>
            <text:p text:style-name="P218"/>
            <text:p text:style-name="P995"><text:span text:style-name="T115"><text:s text:c="3"/>int32_t</text:span> ut_addr_v6[<text:span text:style-name="T127">4</text:span>];<text:span text:style-name="T119"> <text:s text:c="5"/>/* Internet address of remote host; IPv4 </text:span></text:p>
            <text:p text:style-name="P996"><text:s text:c="34"/>address uses just ut_addr_v6[0] */</text:p>
            <text:p text:style-name="P186"><text:span text:style-name="T115"><text:s text:c="3"/>char</text:span> __unused[<text:span text:style-name="T127">20</text:span>]; <text:span text:style-name="T119"><text:s text:c="9"/>/* Reserved for future use */</text:span></text:p>
            <text:p text:style-name="P186">};</text:p>
          </table:table-cell>
        </table:table-row>
      </table:table>
      <text:p text:style-name="P994"/>
      <text:p text:style-name="P992"><text:span text:style-name="T1140">The </text:span><text:span text:style-name="T1132">ut_type</text:span><text:span text:style-name="T1140"> field </text:span><text:span text:style-name="T1131">may take</text:span><text:span text:style-name="T1140"> one of the following values.</text:span></text:p>
      <text:p text:style-name="P998"/>
      <table:table table:name="Table121" table:style-name="Table121">
        <table:table-column table:style-name="Table121.A"/>
        <table:table-column table:style-name="Table121.B"/>
        <table:table-column table:style-name="Table121.C"/>
        <table:table-header-rows>
          <text:soft-page-break/>
          <table:table-row>
            <table:table-cell table:style-name="Table121.A1" office:value-type="string">
              <text:p text:style-name="Table_20_Heading">Constant</text:p>
            </table:table-cell>
            <table:table-cell table:style-name="Table121.A1" office:value-type="string">
              <text:p text:style-name="Table_20_Heading">Value</text:p>
            </table:table-cell>
            <table:table-cell table:style-name="Table121.A1" office:value-type="string">
              <text:p text:style-name="P999">Description</text:p>
            </table:table-cell>
          </table:table-row>
        </table:table-header-rows>
        <table:table-row>
          <table:table-cell table:style-name="Table121.A1" office:value-type="string">
            <text:p text:style-name="P427"><text:span text:style-name="Source_20_Text"><text:span text:style-name="T1132">EMPTY</text:span></text:span></text:p>
          </table:table-cell>
          <table:table-cell table:style-name="Table121.A1" office:value-type="string">
            <text:p text:style-name="P978"><text:span text:style-name="Source_20_Text"><text:span text:style-name="T1132">0</text:span></text:span></text:p>
          </table:table-cell>
          <table:table-cell table:style-name="Table121.A1" office:value-type="string">
            <text:p text:style-name="Table_20_Contents">Unused record</text:p>
          </table:table-cell>
        </table:table-row>
        <table:table-row>
          <table:table-cell table:style-name="Table121.A1" office:value-type="string">
            <text:p text:style-name="P427"><text:span text:style-name="Source_20_Text"><text:span text:style-name="T1132">RUN_LVL</text:span></text:span></text:p>
          </table:table-cell>
          <table:table-cell table:style-name="Table121.A1" office:value-type="string">
            <text:p text:style-name="P978"><text:span text:style-name="Source_20_Text"><text:span text:style-name="T1132">1</text:span></text:span></text:p>
          </table:table-cell>
          <table:table-cell table:style-name="Table121.A1" office:value-type="string">
            <text:p text:style-name="Table_20_Contents">Runlevel change</text:p>
          </table:table-cell>
        </table:table-row>
        <table:table-row>
          <table:table-cell table:style-name="Table121.A1" office:value-type="string">
            <text:p text:style-name="P427"><text:span text:style-name="Source_20_Text"><text:span text:style-name="T1132">BOOT_TIME</text:span></text:span></text:p>
          </table:table-cell>
          <table:table-cell table:style-name="Table121.A1" office:value-type="string">
            <text:p text:style-name="P978"><text:span text:style-name="Source_20_Text"><text:span text:style-name="T1132">2</text:span></text:span></text:p>
          </table:table-cell>
          <table:table-cell table:style-name="Table121.A1" office:value-type="string">
            <text:p text:style-name="Table_20_Contents">System boot time</text:p>
          </table:table-cell>
        </table:table-row>
        <table:table-row>
          <table:table-cell table:style-name="Table121.A1" office:value-type="string">
            <text:p text:style-name="P427"><text:span text:style-name="Source_20_Text"><text:span text:style-name="T1132">NEW_TIME</text:span></text:span></text:p>
          </table:table-cell>
          <table:table-cell table:style-name="Table121.A1" office:value-type="string">
            <text:p text:style-name="P978"><text:span text:style-name="Source_20_Text"><text:span text:style-name="T1132">3</text:span></text:span></text:p>
          </table:table-cell>
          <table:table-cell table:style-name="Table121.A1" office:value-type="string">
            <text:p text:style-name="Table_20_Contents">Time after clock change</text:p>
          </table:table-cell>
        </table:table-row>
        <table:table-row>
          <table:table-cell table:style-name="Table121.A1" office:value-type="string">
            <text:p text:style-name="P427"><text:span text:style-name="Source_20_Text"><text:span text:style-name="T1132">OLD_TIME</text:span></text:span></text:p>
          </table:table-cell>
          <table:table-cell table:style-name="Table121.A1" office:value-type="string">
            <text:p text:style-name="P978"><text:span text:style-name="Source_20_Text"><text:span text:style-name="T1132">4</text:span></text:span></text:p>
          </table:table-cell>
          <table:table-cell table:style-name="Table121.A1" office:value-type="string">
            <text:p text:style-name="Table_20_Contents">Time before clock change</text:p>
          </table:table-cell>
        </table:table-row>
        <table:table-row>
          <table:table-cell table:style-name="Table121.A1" office:value-type="string">
            <text:p text:style-name="P427"><text:span text:style-name="Source_20_Text"><text:span text:style-name="T1132">INIT_PROCESS</text:span></text:span></text:p>
          </table:table-cell>
          <table:table-cell table:style-name="Table121.A1" office:value-type="string">
            <text:p text:style-name="P978"><text:span text:style-name="Source_20_Text"><text:span text:style-name="T1132">5</text:span></text:span></text:p>
          </table:table-cell>
          <table:table-cell table:style-name="Table121.A1" office:value-type="string">
            <text:p text:style-name="P427">Process spawned by <text:span text:style-name="Source_20_Text"><text:span text:style-name="T1132">init</text:span></text:span></text:p>
          </table:table-cell>
        </table:table-row>
        <table:table-row>
          <table:table-cell table:style-name="Table121.A1" office:value-type="string">
            <text:p text:style-name="P427"><text:span text:style-name="Source_20_Text"><text:span text:style-name="T1132">LOGIN_PROCESS</text:span></text:span></text:p>
          </table:table-cell>
          <table:table-cell table:style-name="Table121.A1" office:value-type="string">
            <text:p text:style-name="P978"><text:span text:style-name="Source_20_Text"><text:span text:style-name="T1132">6</text:span></text:span></text:p>
          </table:table-cell>
          <table:table-cell table:style-name="Table121.A1" office:value-type="string">
            <text:p text:style-name="Table_20_Contents">Login process</text:p>
          </table:table-cell>
        </table:table-row>
        <table:table-row>
          <table:table-cell table:style-name="Table121.A1" office:value-type="string">
            <text:p text:style-name="P427"><text:span text:style-name="Source_20_Text"><text:span text:style-name="T1132">USER_PROCESS</text:span></text:span></text:p>
          </table:table-cell>
          <table:table-cell table:style-name="Table121.A1" office:value-type="string">
            <text:p text:style-name="P978"><text:span text:style-name="Source_20_Text"><text:span text:style-name="T1132">7</text:span></text:span></text:p>
          </table:table-cell>
          <table:table-cell table:style-name="Table121.A1" office:value-type="string">
            <text:p text:style-name="Table_20_Contents">Normal user process (e.g. shell)</text:p>
          </table:table-cell>
        </table:table-row>
        <table:table-row>
          <table:table-cell table:style-name="Table121.A1" office:value-type="string">
            <text:p text:style-name="P427"><text:span text:style-name="Source_20_Text"><text:span text:style-name="T1132">DEAD_PROCESS</text:span></text:span></text:p>
          </table:table-cell>
          <table:table-cell table:style-name="Table121.A1" office:value-type="string">
            <text:p text:style-name="P978"><text:span text:style-name="Source_20_Text"><text:span text:style-name="T1132">8</text:span></text:span></text:p>
          </table:table-cell>
          <table:table-cell table:style-name="Table121.A1" office:value-type="string">
            <text:p text:style-name="Table_20_Contents">Terminated process</text:p>
          </table:table-cell>
        </table:table-row>
        <table:table-row>
          <table:table-cell table:style-name="Table121.A1" office:value-type="string">
            <text:p text:style-name="P427"><text:span text:style-name="Source_20_Text"><text:span text:style-name="T1132">ACCOUNTING</text:span></text:span></text:p>
          </table:table-cell>
          <table:table-cell table:style-name="Table121.A1" office:value-type="string">
            <text:p text:style-name="P978"><text:span text:style-name="Source_20_Text"><text:span text:style-name="T1132">9</text:span></text:span></text:p>
          </table:table-cell>
          <table:table-cell table:style-name="Table121.A1" office:value-type="string">
            <text:p text:style-name="Table_20_Contents">Not used in most Linux systems</text:p>
          </table:table-cell>
        </table:table-row>
      </table:table>
      <text:p text:style-name="P998"/>
      <text:p text:style-name="P978"><text:span text:style-name="T1141">Tab 1</text:span><text:span text:style-name="T1115">9</text:span><text:span text:style-name="T1141">.</text:span><text:span text:style-name="T1142"> </text:span><text:span text:style-name="Source_20_Text"><text:span text:style-name="T1132">ut_type</text:span></text:span><text:span text:style-name="T1142"> values</text:span></text:p>
      <text:p text:style-name="P594"/>
      <text:p text:style-name="P1000"><text:span text:style-name="T1143">The </text:span><text:span text:style-name="Source_20_Text"><text:span text:style-name="T1144">exit_status</text:span></text:span><text:span text:style-name="Source_20_Text"><text:span text:style-name="T1143"> </text:span></text:span><text:span text:style-name="T1143">structure is defined as follows.</text:span></text:p>
      <text:p text:style-name="P1001"/>
      <table:table table:name="Table122" table:style-name="Table122">
        <table:table-column table:style-name="Table122.A"/>
        <table:table-row>
          <table:table-cell table:style-name="Table122.A1" office:value-type="string">
            <text:p text:style-name="P554"><text:span text:style-name="T115">struct</text:span> exit_status {<text:span text:style-name="T119"> </text:span></text:p>
            <text:p text:style-name="P516"><text:span text:style-name="T115"><text:s text:c="3"/>short</text:span> e_termination;<text:span text:style-name="T119"> <text:s text:c="9"/>/* Process termination status */</text:span></text:p>
            <text:p text:style-name="P516"><text:span text:style-name="T115"><text:s text:c="3"/>short</text:span> e_exit;<text:span text:style-name="T119"> <text:s text:c="16"/>/* Process exit status */</text:span></text:p>
            <text:p text:style-name="P516">};</text:p>
          </table:table-cell>
        </table:table-row>
      </table:table>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2"><text:soft-page-break/><text:span text:style-name="T1145">III.8.1 Working with the utmp file: </text:span><text:span text:style-name="T1146">getutent</text:span><text:span text:style-name="T1145">, </text:span><text:span text:style-name="T1146">getutid</text:span><text:span text:style-name="T1145">, </text:span><text:span text:style-name="T1146">setutent</text:span></text:p>
      <text:p text:style-name="P1003"/>
      <text:p text:style-name="Standard"><text:span text:style-name="T229">To work with the </text:span><text:span text:style-name="Source_20_Text"><text:span text:style-name="T75">utmp</text:span></text:span><text:span text:style-name="T229"> file, which stores information about current logins and system sessions, we can use the following functions</text:span><text:span text:style-name="T229"><text:note text:id="ftn81" text:note-class="footnote"><text:note-citation>79</text:note-citation><text:note-body><text:p text:style-name="P1004"><text:span text:style-name="T1147">See the </text:span><text:span text:style-name="T1148">getutent(3)</text:span><text:span text:style-name="T1149"> manual page</text:span></text:p></text:note-body></text:note></text:span><text:span text:style-name="T229">.</text:span></text:p>
      <text:p text:style-name="P1005"/>
      <table:table table:name="Table123" table:style-name="Table123">
        <table:table-column table:style-name="Table123.A"/>
        <table:table-row>
          <table:table-cell table:style-name="Table123.A1" office:value-type="string">
            <text:p text:style-name="P271"><text:span text:style-name="T115">#include </text:span><text:span text:style-name="T116">&lt;utmp.h&gt;</text:span></text:p>
            <text:p text:style-name="P188"/>
            <text:p text:style-name="P229"><text:span text:style-name="T103">struct</text:span><text:span text:style-name="T104"> </text:span><text:span text:style-name="T103">utmp</text:span><text:span text:style-name="T104"> *</text:span><text:span text:style-name="T105">getutent</text:span><text:span text:style-name="T104">(</text:span><text:span text:style-name="T103">void</text:span><text:span text:style-name="T104">);</text:span></text:p>
            <text:p text:style-name="P229"><text:span text:style-name="T103">struct</text:span><text:span text:style-name="T104"> </text:span><text:span text:style-name="T103">utmp</text:span><text:span text:style-name="T104"> *</text:span><text:span text:style-name="T105">getutid</text:span><text:span text:style-name="T104">(</text:span><text:span text:style-name="T103">const</text:span><text:span text:style-name="T104"> </text:span><text:span text:style-name="T103">struct</text:span><text:span text:style-name="T104"> </text:span><text:span text:style-name="T103">utmp</text:span><text:span text:style-name="T104"> </text:span><text:span text:style-name="T106">*</text:span><text:span text:style-name="T1150">ut</text:span><text:span text:style-name="T104">);</text:span></text:p>
            <text:p text:style-name="P229"><text:span text:style-name="T103">struct</text:span><text:span text:style-name="T104"> </text:span><text:span text:style-name="T103">utmp</text:span><text:span text:style-name="T104"> *</text:span><text:span text:style-name="T105">getutline</text:span><text:span text:style-name="T104">(</text:span><text:span text:style-name="T103">const</text:span><text:span text:style-name="T104"> </text:span><text:span text:style-name="T103">struct</text:span><text:span text:style-name="T104"> </text:span><text:span text:style-name="T103">utmp</text:span><text:span text:style-name="T104"> </text:span><text:span text:style-name="T106">*</text:span><text:span text:style-name="T1150">ut</text:span><text:span text:style-name="T104">);</text:span></text:p>
            <text:p text:style-name="P188"/>
            <text:p text:style-name="P229"><text:span text:style-name="T103">struct</text:span><text:span text:style-name="T104"> </text:span><text:span text:style-name="T103">utmp</text:span><text:span text:style-name="T104"> *</text:span><text:span text:style-name="T105">pututline</text:span><text:span text:style-name="T104">(</text:span><text:span text:style-name="T103">const</text:span><text:span text:style-name="T104"> </text:span><text:span text:style-name="T103">struct</text:span><text:span text:style-name="T104"> </text:span><text:span text:style-name="T103">utmp</text:span><text:span text:style-name="T104"> </text:span><text:span text:style-name="T106">*ut</text:span><text:span text:style-name="T104">);</text:span></text:p>
            <text:p text:style-name="P188"/>
            <text:p text:style-name="P186"><text:span text:style-name="T115">void</text:span> <text:span text:style-name="T126">setutent</text:span>(<text:span text:style-name="T115">void</text:span>);</text:p>
            <text:p text:style-name="P186"><text:span text:style-name="T115">void</text:span> <text:span text:style-name="T126">endutent</text:span>(<text:span text:style-name="T115">void</text:span>);</text:p>
            <text:p text:style-name="P188"/>
            <text:p text:style-name="P229"><text:span text:style-name="T103">int</text:span><text:span text:style-name="T104"> </text:span><text:span text:style-name="T105">utmpname</text:span><text:span text:style-name="T104">(</text:span><text:span text:style-name="T103">const</text:span><text:span text:style-name="T104"> </text:span><text:span text:style-name="T103">char</text:span><text:span text:style-name="T104"> </text:span><text:span text:style-name="T106">*file</text:span><text:span text:style-name="T104">);</text:span></text:p>
            <text:p text:style-name="P186"/>
            <text:p text:style-name="P1006">Return: getutent,getutid,getutline: a pointer to a struct utmp on succes, <text:span text:style-name="T1151">NULL on error, pututline: returns ut, NULL on error utmpname: returns 0 on success, -1 on error </text:span><text:span text:style-name="T1152">and</text:span><text:span text:style-name="T1151"> errno</text:span></text:p>
          </table:table-cell>
        </table:table-row>
      </table:table>
      <text:p text:style-name="P1005"/>
      <text:p text:style-name="P427"><text:span text:style-name="T1153">The </text:span><text:span text:style-name="Source_20_Text"><text:span text:style-name="T1132">utmpname</text:span></text:span><text:span text:style-name="T963"> </text:span><text:span text:style-name="T1153">function</text:span><text:span text:style-name="T963"> sets the name of the </text:span><text:span text:style-name="Source_20_Text"><text:span text:style-name="T1132">utmp</text:span></text:span><text:span text:style-name="T963">-format file for the other </text:span><text:span text:style-name="Source_20_Text"><text:span text:style-name="T1132">utmp</text:span></text:span><text:span text:style-name="T963"> functions to access. If </text:span><text:span text:style-name="Source_20_Text"><text:span text:style-name="T1132">utmpname</text:span></text:span><text:span text:style-name="T963"> is not used to set the filename before the other functions are used, they assume </text:span><text:span text:style-name="Source_20_Text"><text:span text:style-name="T1132">_PATH_UTMP</text:span></text:span><text:span text:style-name="T963">, as defined in </text:span><text:span text:style-name="T1153">the file header </text:span><text:span text:style-name="Source_20_Text"><text:span text:style-name="T1132">paths.h</text:span></text:span><text:span text:style-name="T963">.</text:span></text:p>
      <text:p text:style-name="P427"><text:span text:style-name="T1153">The function </text:span><text:span text:style-name="Source_20_Text"><text:span text:style-name="T1132">setutent</text:span></text:span><text:span text:style-name="T963"> rewinds the file pointer to the beginning of the utmp file </text:span><text:span text:style-name="T1153">while </text:span><text:span text:style-name="Source_20_Text"><text:span text:style-name="T1132">endutent</text:span></text:span><text:span text:style-name="T1153"> closes the utmp file. </text:span></text:p>
      <text:p text:style-name="P427"><text:span text:style-name="T1153">The </text:span><text:span text:style-name="Source_20_Text"><text:span text:style-name="T1132">getutent</text:span></text:span><text:span text:style-name="T963"> </text:span><text:span text:style-name="T1153">function</text:span><text:span text:style-name="T963"> reads a line from the current file position in the </text:span><text:span text:style-name="Source_20_Text"><text:span text:style-name="T1132">utmp</text:span></text:span><text:span text:style-name="T963"> file </text:span><text:span text:style-name="T1153">and</text:span><text:span text:style-name="T963"> returns a pointer to a structure containing the fields of the line.</text:span></text:p>
      <text:p text:style-name="P1007"><text:span text:style-name="T1153">The function </text:span><text:span text:style-name="Source_20_Text"><text:span text:style-name="T1132">getutid</text:span></text:span><text:span text:style-name="T963"> searches forward from the current file position in the utmp file based upon </text:span><text:span text:style-name="Source_20_Text"><text:span text:style-name="T1132">ut</text:span></text:span><text:span text:style-name="T963">. <text:s/>If </text:span><text:span text:style-name="Source_20_Text"><text:span text:style-name="T1132">ut→ut_type</text:span></text:span><text:span text:style-name="T963"> is one of </text:span><text:span text:style-name="Source_20_Text"><text:span text:style-name="T1132">RUN_LVL</text:span></text:span><text:span text:style-name="T963">, </text:span><text:span text:style-name="Source_20_Text"><text:span text:style-name="T1132">BOOT_TIME</text:span></text:span><text:span text:style-name="T963">, </text:span><text:span text:style-name="Source_20_Text"><text:span text:style-name="T1132">NEW_TIME</text:span></text:span><text:span text:style-name="T963">, or </text:span><text:span text:style-name="Source_20_Text"><text:span text:style-name="T1132">OLD_TIME</text:span></text:span><text:span text:style-name="T963">, </text:span><text:span text:style-name="Source_20_Text"><text:span text:style-name="T1132">getutid</text:span></text:span><text:span text:style-name="T963"> will find the first entry whose </text:span><text:span text:style-name="Source_20_Text"><text:span text:style-name="T1132">ut_type</text:span></text:span><text:span text:style-name="T963"> field matches </text:span><text:span text:style-name="Source_20_Text"><text:span text:style-name="T1132">ut→ut_type</text:span></text:span><text:span text:style-name="T963">. If </text:span><text:span text:style-name="Source_20_Text"><text:span text:style-name="T1132">ut→ut_type</text:span></text:span><text:span text:style-name="T963"> is one of </text:span><text:span text:style-name="Source_20_Text"><text:span text:style-name="T1132">INIT_PROCESS</text:span></text:span><text:span text:style-name="T963">, </text:span><text:span text:style-name="Source_20_Text"><text:span text:style-name="T1132">LOGIN_PROCESS</text:span></text:span><text:span text:style-name="T963">, </text:span><text:span text:style-name="Source_20_Text"><text:span text:style-name="T1132">USER_PROCESS</text:span></text:span><text:span text:style-name="T963">, or </text:span><text:span text:style-name="Source_20_Text"><text:span text:style-name="T1132">DEAD_PROCESS</text:span></text:span><text:span text:style-name="T963">, </text:span><text:span text:style-name="Source_20_Text"><text:span text:style-name="T1132">getutid</text:span></text:span><text:span text:style-name="T963"> will find the first entry whose </text:span><text:span text:style-name="Source_20_Text"><text:span text:style-name="T1132">ut_id</text:span></text:span><text:span text:style-name="T963"> field matches </text:span><text:span text:style-name="Source_20_Text"><text:span text:style-name="T1132">u→ut_id</text:span></text:span><text:span text:style-name="T963">.</text:span></text:p>
      <text:p text:style-name="P427"><text:span text:style-name="T1154">The </text:span><text:span text:style-name="Source_20_Text"><text:span text:style-name="T1132">getutline</text:span></text:span><text:span text:style-name="T963"> </text:span><text:span text:style-name="T1154">function</text:span><text:span text:style-name="T963"> searches forward from the current file position in the utmp file. It scans entries whose </text:span><text:span text:style-name="Source_20_Text"><text:span text:style-name="T1132">ut_type</text:span></text:span><text:span text:style-name="T963"> is </text:span><text:span text:style-name="Source_20_Text"><text:span text:style-name="T1132">USER_PROCESS</text:span></text:span><text:span text:style-name="T963"> or </text:span><text:span text:style-name="Source_20_Text"><text:span text:style-name="T1132">LOGIN_PROCESS</text:span></text:span><text:span text:style-name="T963"> and returns the first one whose </text:span><text:span text:style-name="Source_20_Text"><text:span text:style-name="T1132">ut_line</text:span></text:span><text:span text:style-name="T963"> field matches </text:span><text:span text:style-name="Source_20_Text"><text:span text:style-name="T1132">ut→ut_line</text:span></text:span><text:span text:style-name="T963">.</text:span></text:p>
      <text:p text:style-name="P427"><text:span text:style-name="T1154">The </text:span><text:span text:style-name="Source_20_Text"><text:span text:style-name="T1132">pututline</text:span></text:span><text:span text:style-name="T963"> </text:span><text:span text:style-name="T1154">function</text:span><text:span text:style-name="T963"> writes the utmp structure </text:span><text:span text:style-name="Source_20_Text"><text:span text:style-name="T1132">ut</text:span></text:span><text:span text:style-name="T963"> into the utmp file. <text:s/>It uses </text:span><text:span text:style-name="Source_20_Text"><text:span text:style-name="T1132">getutid</text:span></text:span><text:span text:style-name="T963"> to search for the proper place in the file to insert the new entry. If it cannot find an appropriate slot for </text:span><text:span text:style-name="Source_20_Text"><text:span text:style-name="T1132">ut</text:span></text:span><text:span text:style-name="T963">, </text:span><text:span text:style-name="Source_20_Text"><text:span text:style-name="T1132">pututline</text:span></text:span><text:span text:style-name="T963"> will append the new entry to the end of the file.</text:span></text:p>
      <text:p text:style-name="P881"/>
      <text:p text:style-name="P519"><text:span text:style-name="T1155">The </text:span><text:span text:style-name="Source_20_Text"><text:span text:style-name="T1132">readutmp.c</text:span></text:span><text:span text:style-name="T1155"> program </text:span><text:span text:style-name="T1156">rea</text:span><text:span text:style-name="T963">ds and displays entries from the </text:span><text:span text:style-name="Source_20_Text"><text:span text:style-name="T1132">utmp</text:span></text:span><text:span text:style-name="T963"> file related to logged-in user sessions.</text:span></text:p>
      <text:p text:style-name="Horizontal_20_Line"/>
      <text:p text:style-name="P186"><text:span text:style-name="T1157">1 </text:span><text:span text:style-name="T115">#include </text:span><text:span text:style-name="T116">&lt;stdio.h&gt;</text:span></text:p>
      <text:p text:style-name="P1008"><text:span text:style-name="T1157">2 </text:span><text:span text:style-name="T115">#include </text:span><text:span text:style-name="T116">&lt;utmp.h&gt;</text:span></text:p>
      <text:p text:style-name="P1008"><text:span text:style-name="T1157">3 </text:span><text:span text:style-name="T115">#include </text:span><text:span text:style-name="T116">&lt;stdlib.h&gt;</text:span></text:p>
      <text:p text:style-name="P188"/>
      <text:p text:style-name="P1008"><text:soft-page-break/><text:span text:style-name="T1157">4 </text:span><text:span text:style-name="T115">int</text:span> main(<text:span text:style-name="T115">void</text:span>) {</text:p>
      <text:p text:style-name="P1008"><text:span text:style-name="T1157">5 <text:tab/></text:span><text:span text:style-name="T115">struct</text:span> utmp *ut;</text:p>
      <text:p text:style-name="P188"/>
      <text:p text:style-name="P1008"><text:span text:style-name="T1157">6 <text:tab/></text:span><text:span text:style-name="T126">setutent</text:span>(); </text:p>
      <text:p text:style-name="P1008"><text:span text:style-name="T1157">7 <text:tab/></text:span><text:span text:style-name="T115">while</text:span> ((ut = <text:span text:style-name="T126">getutent</text:span>()) != <text:span text:style-name="T115">NULL</text:span>) {</text:p>
      <text:p text:style-name="P1008"><text:span text:style-name="T1157">8 <text:tab/><text:tab/></text:span><text:span text:style-name="T115">if</text:span> (ut-&gt;ut_type == <text:span text:style-name="T115">USER_PROCESS</text:span>) {</text:p>
      <text:p text:style-name="P1008"><text:span text:style-name="T1157">9 <text:tab/><text:tab/><text:tab/></text:span>printf(<text:span text:style-name="T116">"User: %s Line: %s Host: %s Time: %ld\n"</text:span>,</text:p>
      <text:p text:style-name="P1008"><text:span text:style-name="T1157"><text:tab/><text:tab/><text:tab/><text:tab/> <text:s/></text:span>ut-&gt;ut_user, ut-&gt;ut_line, ut-&gt;ut_host, ut-</text:p>
      <text:p text:style-name="P1008"><text:tab/><text:tab/><text:tab/><text:tab/> <text:s/>&gt;ut_tv.tv_sec);</text:p>
      <text:p text:style-name="P1008"><text:span text:style-name="T1157">10 <text:tab/><text:tab/></text:span>}</text:p>
      <text:p text:style-name="P1008"><text:span text:style-name="T1157">11 <text:tab/></text:span>}</text:p>
      <text:p text:style-name="P1008"><text:span text:style-name="T1157">12 <text:tab/></text:span>endutent();</text:p>
      <text:p text:style-name="P1008"><text:span text:style-name="T1157">13 <text:tab/></text:span>exit(<text:span text:style-name="T115">EXIT_SUCCESS</text:span>);</text:p>
      <text:p text:style-name="P1009"><text:span text:style-name="T1158">14 </text:span><text:span text:style-name="T124">}</text:span></text:p>
      <text:p text:style-name="Horizontal_20_Line"/>
      <text:p text:style-name="P1010">readutmp.c</text:p>
      <text:p text:style-name="Standard"/>
      <text:p text:style-name="Standard"><text:span text:style-name="Strong_20_Emphasis"><text:span text:style-name="T220">Line 6.</text:span></text:span><text:span text:style-name="T220"> Calls </text:span><text:span text:style-name="Source_20_Text"><text:span text:style-name="T221">setutent</text:span></text:span><text:span text:style-name="T220"> to reset the file position to the beginning of the </text:span><text:span text:style-name="Source_20_Text"><text:span text:style-name="T221">utmp</text:span></text:span><text:span text:style-name="T220"> database</text:span></text:p>
      <text:p text:style-name="Standard"><text:span text:style-name="Strong_20_Emphasis"><text:span text:style-name="T220">Line 7.</text:span></text:span><text:span text:style-name="T220"> Reads entries one by one from the </text:span><text:span text:style-name="Source_20_Text"><text:span text:style-name="T221">utmp</text:span></text:span><text:span text:style-name="T220"> file using </text:span><text:span text:style-name="Source_20_Text"><text:span text:style-name="T221">getutent</text:span></text:span><text:span text:style-name="T220"> and stores the result in </text:span><text:span text:style-name="Source_20_Text"><text:span text:style-name="T221">ut</text:span></text:span></text:p>
      <text:p text:style-name="Standard"><text:span text:style-name="Strong_20_Emphasis"><text:span text:style-name="T220">Line 8–9.</text:span></text:span><text:span text:style-name="T220"> Checks whether the current entry type is </text:span><text:span text:style-name="Source_20_Text"><text:span text:style-name="T221">USER_PROCESS</text:span></text:span><text:span text:style-name="T220">, meaning it represents an <text:tab/><text:tab/> <text:s text:c="3"/>active user session, and prints information such as the username, terminal line, host, and <text:tab/> <text:s text:c="3"/>login time</text:span></text:p>
      <text:p text:style-name="Standard"><text:span text:style-name="Strong_20_Emphasis"><text:span text:style-name="T220">Line 12.</text:span></text:span><text:span text:style-name="T220"> Calls </text:span><text:span text:style-name="Source_20_Text"><text:span text:style-name="T221">endutent</text:span></text:span><text:span text:style-name="T220"> to close the </text:span><text:span text:style-name="Source_20_Text"><text:span text:style-name="T221">utmp</text:span></text:span><text:span text:style-name="T220"> database</text:span></text:p>
      <text:p text:style-name="Standard"><text:span text:style-name="Source_20_Text"><text:span text:style-name="T221"/></text:span></text:p>
      <text:p text:style-name="P1011">We execute the program </text:p>
      <text:p text:style-name="P1011"/>
      <table:table table:name="Table124" table:style-name="Table124">
        <table:table-column table:style-name="Table124.A"/>
        <table:table-row>
          <table:table-cell table:style-name="Table124.A1" office:value-type="string">
            <text:p text:style-name="P1012"><text:span text:style-name="T80">[</text:span><text:a xlink:type="simple" xlink:href="mailto:linux@users" text:style-name="Internet_20_link" text:visited-style-name="Visited_20_Internet_20_Link"><text:span text:style-name="T81">linux@users</text:span></text:a><text:span text:style-name="T80">] ./</text:span><text:span text:style-name="T1159">readutmp</text:span></text:p>
            <text:p text:style-name="P183">User: <text:span text:style-name="T1159">users</text:span> Line: pts/0 <text:s/>Host: 192.168.1.100 <text:s/>Time: 1720001234</text:p>
          </table:table-cell>
        </table:table-row>
      </table:table>
      <text:p text:style-name="Standard"/>
      <text:p text:style-name="Standard">The program reads the <text:span text:style-name="Source_20_Text"><text:span text:style-name="T75">utmp</text:span></text:span> database and prints information about active user sessions. In the example output:</text:p>
      <text:p text:style-name="Standard"/>
      <text:list text:style-name="L14">
        <text:list-item>
          <text:p text:style-name="P1013"><text:span text:style-name="Source_20_Text"><text:span text:style-name="T75">User</text:span></text:span> is the name of the logged-in user (<text:span text:style-name="Source_20_Text"><text:span text:style-name="T75">users</text:span></text:span>)</text:p>
        </text:list-item>
        <text:list-item>
          <text:p text:style-name="P1013"><text:span text:style-name="Source_20_Text"><text:span text:style-name="T75">Line</text:span></text:span> is the terminal device associated with the session (<text:span text:style-name="Source_20_Text"><text:span text:style-name="T75">pts/0</text:span></text:span>, meaning pseudo-terminal <text:span text:style-name="Source_20_Text"><text:span text:style-name="T75">0</text:span></text:span>)</text:p>
        </text:list-item>
        <text:list-item>
          <text:p text:style-name="P1013"><text:span text:style-name="Source_20_Text"><text:span text:style-name="T75">Host</text:span></text:span> indicates the remote host from which the login originated (<text:span text:style-name="Source_20_Text"><text:span text:style-name="T75">192.168.1.100</text:span></text:span>). This field may be empty for local logins</text:p>
        </text:list-item>
        <text:list-item>
          <text:p text:style-name="P1013"><text:span text:style-name="Source_20_Text"><text:span text:style-name="T75">Time</text:span></text:span> represents the login timestamp stored as UNIX epoch seconds (<text:span text:style-name="Source_20_Text"><text:span text:style-name="T75">1720001234</text:span></text:span>)</text:p>
        </text:list-item>
      </text:list>
      <text:p text:style-name="P1014"/>
      <text:p text:style-name="P519"><text:span text:style-name="T1160">The </text:span><text:span text:style-name="Source_20_Text"><text:span text:style-name="T1132">addremoveutmp.c</text:span></text:span><text:span text:style-name="T1160"> program </text:span><text:span text:style-name="T1161">demonstrates how to manipulate the </text:span><text:span text:style-name="Source_20_Text"><text:span text:style-name="T1132">utmp</text:span></text:span><text:span text:style-name="T1161"> database by adding and removing login session entries. It prints the list of currently logged-in users (using </text:span><text:span text:style-name="Source_20_Text"><text:span text:style-name="T1132">who</text:span></text:span><text:span text:style-name="T1161">), inserts a new </text:span><text:span text:style-name="Source_20_Text"><text:span text:style-name="T1132">USER_PROCESS</text:span></text:span><text:span text:style-name="T1161"> entry, displays the updated list, then marks the entry as </text:span><text:span text:style-name="Source_20_Text"><text:span text:style-name="T1132">DEAD_PROCESS</text:span></text:span><text:span text:style-name="T1161"> to simulate logout, and finally prints the list again. </text:span><text:span text:style-name="T1162"><text:s/></text:span><text:span text:style-name="T1163">The program is taken from the </text:span><text:span text:style-name="Source_20_Text"><text:span text:style-name="T1132">getutent(3)</text:span></text:span><text:span text:style-name="T1163"> manual page.</text:span></text:p>
      <text:p text:style-name="Horizontal_20_Line"/>
      <text:p text:style-name="P186"><text:span text:style-name="T1164">1 </text:span><text:span text:style-name="T115">#include </text:span><text:span text:style-name="T116">&lt;stdio.h&gt;</text:span></text:p>
      <text:p text:style-name="P1015"><text:span text:style-name="T1165">2</text:span><text:span text:style-name="T1164"> </text:span><text:span text:style-name="T115">#include </text:span><text:span text:style-name="T116">&lt;pwd.h&gt;</text:span></text:p>
      <text:p text:style-name="P1015"><text:span text:style-name="T1165">3</text:span><text:span text:style-name="T1164"> </text:span><text:span text:style-name="T115">#include </text:span><text:span text:style-name="T116">&lt;stdlib.h&gt;</text:span></text:p>
      <text:p text:style-name="P1015"><text:span text:style-name="T1165">4</text:span><text:span text:style-name="T1164"> </text:span><text:span text:style-name="T115">#include </text:span><text:span text:style-name="T116">&lt;string.h&gt;</text:span></text:p>
      <text:p text:style-name="P1015"><text:soft-page-break/><text:span text:style-name="T1165">5</text:span><text:span text:style-name="T1164"> </text:span><text:span text:style-name="T115">#include </text:span><text:span text:style-name="T116">&lt;time.h&gt;</text:span></text:p>
      <text:p text:style-name="P1015"><text:span text:style-name="T1165">6</text:span><text:span text:style-name="T1164"> </text:span><text:span text:style-name="T115">#include </text:span><text:span text:style-name="T116">&lt;unistd.h&gt;</text:span></text:p>
      <text:p text:style-name="P1015"><text:span text:style-name="T1165">7</text:span><text:span text:style-name="T1164"> </text:span><text:span text:style-name="T115">#include </text:span><text:span text:style-name="T116">&lt;utmp.h&gt;</text:span></text:p>
      <text:p text:style-name="P188"/>
      <text:p text:style-name="P1015"><text:span text:style-name="T1165">8</text:span><text:span text:style-name="T1164"> </text:span><text:span text:style-name="T115">int</text:span> main(<text:span text:style-name="T115">void</text:span>)</text:p>
      <text:p text:style-name="P1015"><text:span text:style-name="T1165">9</text:span><text:span text:style-name="T1164"> </text:span>{</text:p>
      <text:p text:style-name="P1015"><text:span text:style-name="T1164">1</text:span><text:span text:style-name="T1165">0</text:span><text:span text:style-name="T1164"> <text:tab/></text:span><text:span text:style-name="T115">struct</text:span> utmp entry;</text:p>
      <text:p text:style-name="P188"/>
      <text:p text:style-name="P1015"><text:span text:style-name="T1164">1</text:span><text:span text:style-name="T1165">1</text:span><text:span text:style-name="T1164"> <text:tab/></text:span>system(<text:span text:style-name="T116">"echo before adding entry:;who"</text:span>);</text:p>
      <text:p text:style-name="P1015"><text:span text:style-name="T1164">1</text:span><text:span text:style-name="T1165">2</text:span><text:span text:style-name="T1164"> <text:tab/></text:span>entry.ut_type = <text:span text:style-name="T115">USER_PROCESS</text:span>;</text:p>
      <text:p text:style-name="P1015"><text:span text:style-name="T1164">1</text:span><text:span text:style-name="T1165">3</text:span><text:span text:style-name="T1164"> <text:tab/></text:span>entry.ut_pid = getpid();</text:p>
      <text:p text:style-name="P1015"><text:span text:style-name="T1164">1</text:span><text:span text:style-name="T1165">4</text:span><text:span text:style-name="T1164"> <text:tab/></text:span>strcpy(entry.ut_line, ttyname(<text:span text:style-name="T115">STDIN_FILENO</text:span>) + strlen(<text:span text:style-name="T116">"/dev/"</text:span>));</text:p>
      <text:p text:style-name="P1015"><text:span text:style-name="T1164">1</text:span><text:span text:style-name="T1165">5</text:span><text:span text:style-name="T1164"> <text:tab/></text:span>strcpy(entry.ut_id, ttyname(<text:span text:style-name="T115">STDIN_FILENO</text:span>) + strlen(<text:span text:style-name="T116">"/dev/tty"</text:span>));</text:p>
      <text:p text:style-name="P1016"><text:span text:style-name="T1164">1</text:span><text:span text:style-name="T1166">6</text:span><text:tab/>entry.ut_tv.tv_sec = time(<text:span text:style-name="T115">NULL</text:span>);</text:p>
      <text:p text:style-name="P1016"><text:span text:style-name="T1164">1</text:span><text:span text:style-name="T1166">7</text:span><text:tab/>entry.ut_tv.tv_usec = <text:span text:style-name="T127">0</text:span> ;</text:p>
      <text:p text:style-name="P1015"><text:span text:style-name="T1164">1</text:span><text:span text:style-name="T1166">8</text:span><text:span text:style-name="T1164"> <text:tab/></text:span>strcpy(entry.ut_user, <text:span text:style-name="T126">getpwuid</text:span>(<text:span text:style-name="T126">getuid</text:span>())-&gt;pw_name);</text:p>
      <text:p text:style-name="P1015"><text:span text:style-name="T1164">1</text:span><text:span text:style-name="T1166">9</text:span><text:span text:style-name="T1164"><text:tab/></text:span>memset(entry.ut_host, <text:span text:style-name="T127">0</text:span>, <text:span text:style-name="T115">UT_HOSTSIZE</text:span>);</text:p>
      <text:p text:style-name="P1017"><text:span text:style-name="T1166">20</text:span><text:span text:style-name="T1164"> <text:tab/></text:span><text:span text:style-name="T1167">entry.ut_addr_v6[</text:span><text:span text:style-name="T1168">0</text:span><text:span text:style-name="T1167">] = </text:span><text:span text:style-name="T1168">0</text:span><text:span text:style-name="T1167">;</text:span></text:p>
      <text:p text:style-name="P1015"><text:span text:style-name="T1165">2</text:span><text:span text:style-name="T1166">1</text:span><text:span text:style-name="T1164"> <text:tab/></text:span><text:span text:style-name="T126">setutent</text:span>();</text:p>
      <text:p text:style-name="P1015"><text:span text:style-name="T1165">2</text:span><text:span text:style-name="T1166">2</text:span><text:span text:style-name="T1164"> <text:tab/></text:span><text:span text:style-name="T115">if</text:span> (<text:span text:style-name="T126">pututline</text:span>(&amp;entry) == <text:span text:style-name="T115">NULL</text:span>) {</text:p>
      <text:p text:style-name="P1015"><text:span text:style-name="T1165">2</text:span><text:span text:style-name="T1166">3</text:span><text:span text:style-name="T1164"> <text:tab/><text:tab/></text:span>perror(<text:span text:style-name="T116">"pututline"</text:span>);</text:p>
      <text:p text:style-name="P1015"><text:span text:style-name="T1165">2</text:span><text:span text:style-name="T1166">4</text:span><text:span text:style-name="T1164"> <text:tab/><text:tab/></text:span>exit(<text:span text:style-name="T115">EXIT_FAILURE</text:span>);</text:p>
      <text:p text:style-name="P1015"><text:span text:style-name="T1165">2</text:span><text:span text:style-name="T1166">5</text:span><text:span text:style-name="T1164"> <text:tab/></text:span>}</text:p>
      <text:p text:style-name="P188"/>
      <text:p text:style-name="P1015"><text:span text:style-name="T1165">2</text:span><text:span text:style-name="T1166">6</text:span><text:span text:style-name="T1164"> <text:tab/></text:span>system(<text:span text:style-name="T116">"echo after adding entry:;who"</text:span>);</text:p>
      <text:p text:style-name="P1015"><text:span text:style-name="T1165">2</text:span><text:span text:style-name="T1166">7</text:span><text:span text:style-name="T1164"> <text:tab/></text:span>entry.ut_type = <text:span text:style-name="T115">DEAD_PROCESS</text:span>;</text:p>
      <text:p text:style-name="P1015"><text:span text:style-name="T1165">2</text:span><text:span text:style-name="T1166">8</text:span><text:span text:style-name="T1164"> <text:tab/></text:span>memset(entry.ut_line, <text:span text:style-name="T127">0</text:span>, <text:span text:style-name="T115">UT_LINESIZE</text:span>);</text:p>
      <text:p text:style-name="P1018"><text:span text:style-name="T1165">2</text:span><text:span text:style-name="T1166">9</text:span><text:span text:style-name="T1164"> <text:tab/></text:span><text:span text:style-name="T1169">entry.ut_tv.tv_sec = time(</text:span><text:span text:style-name="T1170">NULL</text:span><text:span text:style-name="T1169">);</text:span></text:p>
      <text:p text:style-name="P1018"><text:span text:style-name="T1171">30</text:span><text:tab/>entry.ut_tv.tv_usec = <text:span text:style-name="T127">0</text:span> ;</text:p>
      <text:p text:style-name="P1015"><text:span text:style-name="T1166">3</text:span><text:span text:style-name="T1171">1</text:span><text:span text:style-name="T1164"> <text:tab/></text:span>memset(entry.ut_user, <text:span text:style-name="T127">0</text:span>, <text:span text:style-name="T115">UT_NAMESIZE</text:span>);</text:p>
      <text:p text:style-name="P1015"><text:span text:style-name="T1165">3</text:span><text:span text:style-name="T1171">2</text:span><text:span text:style-name="T1164"> <text:tab/></text:span><text:span text:style-name="T126">setutent</text:span>();</text:p>
      <text:p text:style-name="P1015"><text:span text:style-name="T1165">3</text:span><text:span text:style-name="T1171">3</text:span><text:span text:style-name="T1164"> <text:tab/></text:span>pututline(&amp;entry);</text:p>
      <text:p text:style-name="P188"/>
      <text:p text:style-name="P1015"><text:span text:style-name="T1165">3</text:span><text:span text:style-name="T1171">4</text:span><text:span text:style-name="T1164"> <text:tab/></text:span>system(<text:span text:style-name="T116">"echo after removing entry:;who"</text:span>);</text:p>
      <text:p text:style-name="P1015"><text:span text:style-name="T1165">3</text:span><text:span text:style-name="T1171">5</text:span><text:span text:style-name="T1164"> <text:tab/></text:span><text:span text:style-name="T126">endutent</text:span>();</text:p>
      <text:p text:style-name="P1015"><text:span text:style-name="T1165">3</text:span><text:span text:style-name="T1171">6</text:span><text:span text:style-name="T1164"> <text:tab/></text:span>exit(<text:span text:style-name="T115">EXIT_SUCCESS</text:span>);</text:p>
      <text:p text:style-name="P1019"><text:span text:style-name="T1172">3</text:span><text:span text:style-name="T1173">7</text:span><text:span text:style-name="T1174"> </text:span><text:span text:style-name="T124">}</text:span></text:p>
      <text:p text:style-name="Horizontal_20_Line"/>
      <text:p text:style-name="P1020">addremoveutmp.c</text:p>
      <text:p text:style-name="P307"/>
      <text:p text:style-name="Standard"><text:span text:style-name="Strong_20_Emphasis"><text:span text:style-name="T220">Line 10.</text:span></text:span><text:span text:style-name="T220"> Declares an </text:span><text:span text:style-name="Source_20_Text"><text:span text:style-name="T221">utmp</text:span></text:span><text:span text:style-name="T220"> structure that will be used to create and modify login entries</text:span></text:p>
      <text:p text:style-name="Standard"><text:span text:style-name="Strong_20_Emphasis"><text:span text:style-name="T220">Line 11.</text:span></text:span><text:span text:style-name="T220"> Executes </text:span><text:span text:style-name="Source_20_Text"><text:span text:style-name="T220">who</text:span></text:span><text:span text:style-name="T220"> to display the current list of logged-in users before modification</text:span></text:p>
      <text:p text:style-name="Standard"><text:span text:style-name="Strong_20_Emphasis"><text:span text:style-name="T220">Line 12.</text:span></text:span><text:span text:style-name="T220"> Sets the entry type to </text:span><text:span text:style-name="Source_20_Text"><text:span text:style-name="T221">USER_PROCESS</text:span></text:span><text:span text:style-name="T220">, indicating an active login session</text:span></text:p>
      <text:p text:style-name="Standard"><text:span text:style-name="Strong_20_Emphasis"><text:span text:style-name="T220">Line 13.</text:span></text:span><text:span text:style-name="T220"> Stores the current process ID in the </text:span><text:span text:style-name="Source_20_Text"><text:span text:style-name="T221">ut_pid</text:span></text:span><text:span text:style-name="T220"> field</text:span></text:p>
      <text:p text:style-name="Standard"><text:span text:style-name="Strong_20_Emphasis"><text:span text:style-name="T220">Line 14.</text:span></text:span><text:span text:style-name="T220"> Retrieves the terminal line name and stores it in </text:span><text:span text:style-name="Source_20_Text"><text:span text:style-name="T221">ut_line</text:span></text:span></text:p>
      <text:p text:style-name="Standard"><text:span text:style-name="Strong_20_Emphasis"><text:span text:style-name="T220">Line 15.</text:span></text:span><text:span text:style-name="T220"> Retrieves the terminal identifier and stores it in </text:span><text:span text:style-name="Source_20_Text"><text:span text:style-name="T221">ut_id</text:span></text:span></text:p>
      <text:p text:style-name="Standard"><text:span text:style-name="Strong_20_Emphasis"><text:span text:style-name="T220">Line 16–17.</text:span></text:span><text:span text:style-name="T220"> Sets the timestamp of the login entry using the current system time</text:span></text:p>
      <text:p text:style-name="Standard"><text:span text:style-name="Strong_20_Emphasis"><text:span text:style-name="T220">Line 18.</text:span></text:span><text:span text:style-name="T220"> Stores the username associated with the current process</text:span></text:p>
      <text:p text:style-name="Standard"><text:span text:style-name="Strong_20_Emphasis"><text:span text:style-name="T220">Line 19–20.</text:span></text:span><text:span text:style-name="T220"> Clears network-related fields (</text:span><text:span text:style-name="Source_20_Text"><text:span text:style-name="T221">ut_host</text:span></text:span><text:span text:style-name="T220"> and </text:span><text:span text:style-name="Source_20_Text"><text:span text:style-name="T221">ut_addr_v6</text:span></text:span><text:span text:style-name="T220">) since this is a local <text:tab/> <text:tab/> <text:s text:c="7"/>session</text:span></text:p>
      <text:p text:style-name="Standard"><text:soft-page-break/><text:span text:style-name="Strong_20_Emphasis"><text:span text:style-name="T220">Line 21.</text:span></text:span><text:span text:style-name="T220"> Positions the utmp database pointer at the beginning using </text:span><text:span text:style-name="Source_20_Text"><text:span text:style-name="T221">setutent</text:span></text:span></text:p>
      <text:p text:style-name="Standard"><text:span text:style-name="Strong_20_Emphasis"><text:span text:style-name="T220">Line 22–25.</text:span></text:span><text:span text:style-name="T220"> Writes the new login entry into the </text:span><text:span text:style-name="Source_20_Text"><text:span text:style-name="T220">utmp</text:span></text:span><text:span text:style-name="T220"> database using </text:span><text:span text:style-name="Source_20_Text"><text:span text:style-name="T221">pututline</text:span></text:span></text:p>
      <text:p text:style-name="Standard"><text:span text:style-name="Strong_20_Emphasis"><text:span text:style-name="T220">Line 26.</text:span></text:span><text:span text:style-name="T220"> Executes </text:span><text:span text:style-name="Source_20_Text"><text:span text:style-name="T221">who</text:span></text:span><text:span text:style-name="T220"> again to show the newly added login session</text:span></text:p>
      <text:p text:style-name="Standard"><text:span text:style-name="Strong_20_Emphasis"><text:span text:style-name="T220">Line 27.</text:span></text:span><text:span text:style-name="T220"> Changes the entry type to </text:span><text:span text:style-name="Source_20_Text"><text:span text:style-name="T221">DEAD_PROCESS</text:span></text:span><text:span text:style-name="T220">, marking the session as terminated</text:span></text:p>
      <text:p text:style-name="Standard"><text:span text:style-name="Strong_20_Emphasis"><text:span text:style-name="T220">Line 28–31.</text:span></text:span><text:span text:style-name="T220"> Clears fields related to the session information</text:span></text:p>
      <text:p text:style-name="Standard"><text:span text:style-name="Strong_20_Emphasis"><text:span text:style-name="T220">Line 32.</text:span></text:span><text:span text:style-name="T220"> Resets the utmp database pointer</text:span></text:p>
      <text:p text:style-name="Standard"><text:span text:style-name="Strong_20_Emphasis"><text:span text:style-name="T220">Line 33.</text:span></text:span><text:span text:style-name="T220"> Writes the updated (logout) entry back into the database</text:span></text:p>
      <text:p text:style-name="Standard"><text:span text:style-name="Strong_20_Emphasis"><text:span text:style-name="T220">Line 34.</text:span></text:span><text:span text:style-name="T220"> Executes </text:span><text:span text:style-name="Source_20_Text"><text:span text:style-name="T221">who</text:span></text:span><text:span text:style-name="T220"> again to confirm that the entry has been removed</text:span></text:p>
      <text:p text:style-name="Standard"><text:span text:style-name="Strong_20_Emphasis"><text:span text:style-name="T220">Line 35.</text:span></text:span><text:span text:style-name="T220"> Closes the utmp database with </text:span><text:span text:style-name="Source_20_Text"><text:span text:style-name="T221">endutent</text:span></text:span></text:p>
      <text:p text:style-name="P1021"/>
      <text:p text:style-name="P1022"><text:span text:style-name="T1175">Since </text:span><text:span text:style-name="Source_20_Text"><text:span text:style-name="T1176">utmp</text:span></text:span><text:span text:style-name="T1175"> can introduce security concerns if it is directly manipulated, Kali Linux typically disables or avoids relying on it, delegating session management to </text:span><text:span text:style-name="Source_20_Text"><text:span text:style-name="T1176">systemd</text:span></text:span><text:span text:style-name="T1175"> services instead. For this reason, the program was tested on a Debian system where </text:span><text:span text:style-name="Source_20_Text"><text:span text:style-name="T1176">utmp</text:span></text:span><text:span text:style-name="T1175"> is still available and used by compatibility tools. </text:span></text:p>
      <text:p text:style-name="P1021"/>
      <text:p text:style-name="P1023">We execute the <text:span text:style-name="T1177">program on a Debian system.</text:span></text:p>
      <text:p text:style-name="P1023"/>
      <table:table table:name="Table125" table:style-name="Table125">
        <table:table-column table:style-name="Table125.A"/>
        <table:table-row>
          <table:table-cell table:style-name="Table125.A1" office:value-type="string">
            <text:p text:style-name="P1024"><text:span text:style-name="T1178">[</text:span><text:span text:style-name="T1179">apli</text:span><text:span text:style-name="T1180">@d</text:span><text:span text:style-name="T1179">ebian</text:span><text:span text:style-name="T1178">] </text:span><text:span text:style-name="T1181">sudo ./addremoveutmp </text:span><text:span text:style-name="T1182"><text:s text:c="32"/>^</text:span></text:p>
            <text:p text:style-name="P1025">before adding entry:</text:p>
            <text:p text:style-name="P1025">apli <text:s text:c="4"/>tty2 <text:s text:c="8"/>2025-07-05 01:27 (tty2)</text:p>
            <text:p text:style-name="P1025">apli <text:s text:c="4"/>pts/1 <text:s text:c="7"/>2025-07-05 01:37</text:p>
            <text:p text:style-name="P1025">after adding entry:</text:p>
            <text:p text:style-name="P1025">apli <text:s text:c="4"/>tty2 <text:s text:c="8"/>2025-07-05 01:27 (tty2)</text:p>
            <text:p text:style-name="P1025">apli <text:s text:c="4"/>pts/1 <text:s text:c="7"/>2025-07-05 01:37</text:p>
            <text:p text:style-name="P1026">root <text:s text:c="4"/>pts/1 <text:s text:c="7"/>2025-07-05 01:37</text:p>
            <text:p text:style-name="P1025">after removing entry:</text:p>
            <text:p text:style-name="P1025">apli <text:s text:c="4"/>tty2 <text:s text:c="8"/>2025-07-05 01:27 (tty2)</text:p>
            <text:p text:style-name="P1025">apli <text:s text:c="4"/>pts/1 <text:s text:c="7"/>2025-07-05 01:37</text:p>
          </table:table-cell>
        </table:table-row>
      </table:table>
      <text:p text:style-name="P1027"/>
      <text:p text:style-name="P1028"><text:span text:style-name="T1183">As shown in the output, after the </text:span><text:span text:style-name="Source_20_Text"><text:span text:style-name="T1184">pututline</text:span></text:span><text:span text:style-name="T1183"> call, an additional entry appears in the </text:span><text:span text:style-name="Source_20_Text"><text:span text:style-name="T1184">utmp</text:span></text:span><text:span text:style-name="T1183"> database (associated with </text:span><text:span text:style-name="Source_20_Text"><text:span text:style-name="T1184">root</text:span></text:span><text:span text:style-name="T1183"> on </text:span><text:span text:style-name="Source_20_Text"><text:span text:style-name="T1184">pts/1</text:span></text:span><text:span text:style-name="T1183">). This entry is then removed when the program marks it as </text:span><text:span text:style-name="Source_20_Text"><text:span text:style-name="T1184">DEAD_PROCESS</text:span></text:span><text:span text:style-name="T1183">.</text:span></text:p>
      <text:p text:style-name="P1029"><text:span text:style-name="T1183">The </text:span><text:span text:style-name="Source_20_Text"><text:span text:style-name="T1184">who</text:span></text:span><text:span text:style-name="Source_20_Text"><text:span text:style-name="T1185"><text:note text:id="ftn82" text:note-class="footnote"><text:note-citation>80</text:note-citation><text:note-body><text:p text:style-name="P1004"><text:span text:style-name="T1186">See the </text:span><text:span text:style-name="T1187">who(1)</text:span><text:span text:style-name="T1188"> manual page</text:span></text:p></text:note-body></text:note></text:span></text:span><text:span text:style-name="T1183"> command reads the </text:span><text:span text:style-name="Source_20_Text"><text:span text:style-name="T1184">utmp</text:span></text:span><text:span text:style-name="T1183"> database to display the list of currently logged-in users. Another useful tool available on Debian systems is </text:span><text:span text:style-name="Source_20_Text"><text:span text:style-name="T1184">utmpdump</text:span></text:span><text:span text:style-name="Source_20_Text"><text:span text:style-name="T1185"><text:note text:id="ftn83" text:note-class="footnote"><text:note-citation>81</text:note-citation><text:note-body><text:p text:style-name="P1004"><text:span text:style-name="T1186">See the </text:span><text:span text:style-name="T1189">utmpdump(1)</text:span><text:span text:style-name="T1186"> manual page</text:span></text:p></text:note-body></text:note></text:span></text:span><text:span text:style-name="T1183">, which reads the binary </text:span><text:span text:style-name="Source_20_Text"><text:span text:style-name="T1184">utmp</text:span></text:span><text:span text:style-name="T1183"> file and prints its contents in a human-readable format.</text:span></text:p>
      <text:p text:style-name="P1028"><text:span text:style-name="T1183">It is important to note that </text:span><text:span text:style-name="Source_20_Text"><text:span text:style-name="T1184">utmp</text:span></text:span><text:span text:style-name="T1183"> is not a text file but a binary database, so it must be parsed before it can be interpreted. Both </text:span><text:span text:style-name="Source_20_Text"><text:span text:style-name="T1184">who</text:span></text:span><text:span text:style-name="T1183"> and </text:span><text:span text:style-name="Source_20_Text"><text:span text:style-name="T1184">utmpdump</text:span></text:span><text:span text:style-name="T1183"> perform this parsing and convert the raw records into readable output for the user.</text:span></text:p>
      <text:p text:style-name="P1027"/>
      <text:p text:style-name="P1028"><text:span text:style-name="T1183">On Kali Linux and other modern Debian-based systems, </text:span><text:span text:style-name="Source_20_Text"><text:span text:style-name="T1184">utmp</text:span></text:span><text:span text:style-name="T1183"> is still present and supported, but it has become partially deprecated in practice and is no longer the main mechanism used for tracking user sessions. The traditional files still exist and continue to be maintained, including </text:span><text:span text:style-name="Source_20_Text"><text:span text:style-name="T1184">/var/run/utmp</text:span></text:span><text:span text:style-name="T1183"> for current login sessions, </text:span><text:span text:style-name="Source_20_Text"><text:span text:style-name="T1184">/var/log/wtmp</text:span></text:span><text:span text:style-name="T1183"> for login history, and </text:span><text:span text:style-name="Source_20_Text"><text:span text:style-name="T1184">/var/log/btmp</text:span></text:span><text:span text:style-name="T1183"> for failed login attempts. These files are still used by standard tools such as </text:span><text:span text:style-name="Source_20_Text"><text:span text:style-name="T1184">who</text:span></text:span><text:span text:style-name="T1183">, </text:span><text:span text:style-name="Source_20_Text"><text:span text:style-name="T1184">w</text:span></text:span><text:span text:style-name="T1183">, and </text:span><text:span text:style-name="Source_20_Text"><text:span text:style-name="T1184">last</text:span></text:span><text:span text:style-name="T1183"> to display user session information.</text:span></text:p>
      <text:p text:style-name="P1028"><text:span text:style-name="T1183">However, even though </text:span><text:span text:style-name="Source_20_Text"><text:span text:style-name="T1184">utmp</text:span></text:span><text:span text:style-name="T1183"> is still available and functional, modern Debian-based systems increasingly rely on </text:span><text:span text:style-name="T1184">systemd</text:span><text:span text:style-name="T1183"> components (such as </text:span><text:span text:style-name="Source_20_Text"><text:span text:style-name="T1184">systemd-logind</text:span></text:span><text:span text:style-name="T1183">) for session management.</text:span><text:span text:style-name="T1190"> </text:span><text:span text:style-name="T1183">As a result, </text:span><text:span text:style-name="Source_20_Text"><text:span text:style-name="T1184">utmp</text:span></text:span><text:span text:style-name="T1183"> should be considered a legacy interface that remains for compatibility rather than the primary source of truth for active sessions.</text:span></text:p>
      <text:p text:style-name="P1030"><text:soft-page-break/><text:span text:style-name="T1191">III.8.</text:span><text:span text:style-name="T1145">2</text:span><text:span text:style-name="T1191"> </text:span><text:span text:style-name="T1145">The l</text:span><text:span text:style-name="T1192">ogin: </text:span><text:span text:style-name="T1146">login</text:span><text:span text:style-name="T1145"> and </text:span><text:span text:style-name="T1146">logout</text:span></text:p>
      <text:p text:style-name="P1031"/>
      <text:p text:style-name="P1032"><text:span text:style-name="T1193">When a user logs into the system, a corresponding record is written to the </text:span><text:span text:style-name="Source_20_Text"><text:span text:style-name="T1194">utmp</text:span></text:span><text:span text:style-name="T1193"> file, which tracks currently active sessions. When the user logs out, a related entry is recorded in the </text:span><text:span text:style-name="Source_20_Text"><text:span text:style-name="T1194">wtmp</text:span></text:span><text:span text:style-name="T1193"> file, which maintains the historical log of login and logout events.</text:span></text:p>
      <text:p text:style-name="P1031">These operations are handled automatically by the following two functions<text:note text:id="ftn84" text:note-class="footnote"><text:note-citation>82</text:note-citation><text:note-body><text:p text:style-name="P1004"><text:span text:style-name="T1195">See the </text:span><text:span text:style-name="T1189">login(3)</text:span><text:span text:style-name="T1196"> manual page</text:span></text:p></text:note-body></text:note>.</text:p>
      <text:p text:style-name="P1033"/>
      <table:table table:name="Table126" table:style-name="Table126">
        <table:table-column table:style-name="Table126.A"/>
        <table:table-row>
          <table:table-cell table:style-name="Table126.A1" office:value-type="string">
            <text:p text:style-name="P271"><text:span text:style-name="T115">#include </text:span><text:span text:style-name="T116">&lt;utmp.h&gt;</text:span></text:p>
            <text:p text:style-name="P188"/>
            <text:p text:style-name="P229"><text:span text:style-name="T103">void</text:span><text:span text:style-name="T104"> </text:span><text:span text:style-name="T105">login</text:span><text:span text:style-name="T104">(</text:span><text:span text:style-name="T103">const</text:span><text:span text:style-name="T104"> </text:span><text:span text:style-name="T103">struct</text:span><text:span text:style-name="T104"> </text:span><text:span text:style-name="T103">utmp</text:span><text:span text:style-name="T104"> </text:span><text:span text:style-name="T106">*ut</text:span><text:span text:style-name="T104">);</text:span></text:p>
            <text:p text:style-name="P229"><text:span text:style-name="T103">int</text:span><text:span text:style-name="T104"> </text:span><text:span text:style-name="T105">logout</text:span><text:span text:style-name="T104">(</text:span><text:span text:style-name="T103">const</text:span><text:span text:style-name="T104"> </text:span><text:span text:style-name="T103">char</text:span><text:span text:style-name="T104"> </text:span><text:span text:style-name="T106">*ut_line</text:span><text:span text:style-name="T104">);</text:span></text:p>
            <text:p text:style-name="P605"/>
            <text:p text:style-name="P1034">Returns: logout, 1 if the entry was written in the db, 0 on error</text:p>
          </table:table-cell>
        </table:table-row>
      </table:table>
      <text:p text:style-name="P1033"/>
      <text:p text:style-name="P1032"><text:span text:style-name="T1193">The </text:span><text:span text:style-name="Source_20_Text"><text:span text:style-name="T1194">login</text:span></text:span><text:span text:style-name="T1193"> function takes a </text:span><text:span text:style-name="Source_20_Text"><text:span text:style-name="T1194">utmp</text:span></text:span><text:span text:style-name="T1193"> structure as an argument and records it in both the </text:span><text:span text:style-name="Source_20_Text"><text:span text:style-name="T1194">utmp</text:span></text:span><text:span text:style-name="T1193"> and </text:span><text:span text:style-name="Source_20_Text"><text:span text:style-name="T1194">wtmp</text:span></text:span><text:span text:style-name="T1193"> files, thereby registering the session as an active login and storing it in the login history. The </text:span><text:span text:style-name="Source_20_Text"><text:span text:style-name="T1194">logout</text:span></text:span><text:span text:style-name="T1193"> function removes or updates the corresponding entry in the </text:span><text:span text:style-name="Source_20_Text"><text:span text:style-name="T1194">wtmp</text:span></text:span><text:span text:style-name="T1193"> file to reflect the end of the session.</text:span></text:p>
      <text:p text:style-name="P1031"/>
      <text:p text:style-name="P644"><text:span text:style-name="T1193">The </text:span><text:span text:style-name="Source_20_Text"><text:span text:style-name="T1194">logincustom.c</text:span></text:span><text:span text:style-name="T1193"> program implements a simplified user login process on a Linux system. It authenticates the user using the shadow password database and, if the authentication succeeds, it updates system login records and starts a shell under the user’s privileges.</text:span><text:span text:style-name="T1193"><text:note text:id="ftn85" text:note-class="footnote"><text:note-citation>83</text:note-citation><text:note-body><text:p text:style-name="P1035">Modern Linux systems use PAM (Pluggable Authentication Modules) to handle login and security-related operations</text:p><text:p text:style-name="P1036"><text:s/></text:p></text:note-body></text:note></text:span></text:p>
      <text:p text:style-name="Horizontal_20_Line"/>
      <text:p text:style-name="P186"><text:span text:style-name="T1197">1 </text:span><text:span text:style-name="T115">#define _GNU_SOURCE</text:span></text:p>
      <text:p text:style-name="P1037"><text:span text:style-name="T1197">2 </text:span><text:span text:style-name="T115">#include </text:span><text:span text:style-name="T116">&lt;stdio.h&gt;</text:span></text:p>
      <text:p text:style-name="P1037"><text:span text:style-name="T1197">3 </text:span><text:span text:style-name="T115">#include </text:span><text:span text:style-name="T116">&lt;unistd.h&gt;</text:span></text:p>
      <text:p text:style-name="P1037"><text:span text:style-name="T1197">4 </text:span><text:span text:style-name="T115">#include </text:span><text:span text:style-name="T116">&lt;pwd.h&gt;</text:span></text:p>
      <text:p text:style-name="P1037"><text:span text:style-name="T1197">5 </text:span><text:span text:style-name="T115">#include </text:span><text:span text:style-name="T116">&lt;shadow.h&gt;</text:span></text:p>
      <text:p text:style-name="P1037"><text:span text:style-name="T1197">6 </text:span><text:span text:style-name="T115">#include </text:span><text:span text:style-name="T116">&lt;string.h&gt;</text:span></text:p>
      <text:p text:style-name="P1037"><text:span text:style-name="T1197">7 </text:span><text:span text:style-name="T115">#include </text:span><text:span text:style-name="T116">&lt;stdlib.h&gt;</text:span></text:p>
      <text:p text:style-name="P1037"><text:span text:style-name="T1197">8 </text:span><text:span text:style-name="T115">#include </text:span><text:span text:style-name="T116">&lt;crypt.h&gt;</text:span></text:p>
      <text:p text:style-name="P1037"><text:span text:style-name="T1197">9 </text:span><text:span text:style-name="T115">#include </text:span><text:span text:style-name="T116">&lt;utmp.h&gt;</text:span></text:p>
      <text:p text:style-name="P1037"><text:span text:style-name="T1197">10 </text:span><text:span text:style-name="T115">#include </text:span><text:span text:style-name="T116">&lt;time.h&gt;</text:span></text:p>
      <text:p text:style-name="P1037"><text:span text:style-name="T1197">11 </text:span><text:span text:style-name="T115">#include </text:span><text:span text:style-name="T116">&lt;sys/types.h&gt;</text:span></text:p>
      <text:p text:style-name="P1037"><text:span text:style-name="T1197">12 </text:span><text:span text:style-name="T115">#include </text:span><text:span text:style-name="T116">&lt;sys/wait.h&gt;</text:span></text:p>
      <text:p text:style-name="P1037"><text:span text:style-name="T1197">13 </text:span><text:span text:style-name="T115">#include </text:span><text:span text:style-name="T116">&lt;errno.h&gt;</text:span></text:p>
      <text:p text:style-name="P1037"><text:span text:style-name="T1197">14 </text:span><text:span text:style-name="T115">#include </text:span><text:span text:style-name="T116">&lt;signal.h&gt;</text:span></text:p>
      <text:p text:style-name="P1037"><text:span text:style-name="T1197">15 </text:span><text:span text:style-name="T115">#include </text:span><text:span text:style-name="T116">&lt;grp.h&gt;</text:span></text:p>
      <text:p text:style-name="P188"/>
      <text:p text:style-name="P1037"><text:span text:style-name="T1197">16 </text:span><text:span text:style-name="T115">void</text:span> do_login_record(<text:span text:style-name="T115">const</text:span> <text:span text:style-name="T115">char</text:span> *username) {</text:p>
      <text:p text:style-name="P1038"><text:span text:style-name="T1198">17 <text:tab/></text:span><text:span text:style-name="T103">struct</text:span><text:span text:style-name="T104"> </text:span><text:span text:style-name="T103">utmp</text:span><text:span text:style-name="T104"> ut;</text:span></text:p>
      <text:p text:style-name="P1037"><text:span text:style-name="T1197">18 <text:tab/></text:span><text:span text:style-name="T115">char</text:span> *tty_full = ttyname(<text:span text:style-name="T115">STDIN_FILENO</text:span>);</text:p>
      <text:p text:style-name="P1039"><text:span text:style-name="T1199">19 <text:tab/></text:span><text:span text:style-name="T101">if</text:span><text:span text:style-name="T124"> (!tty_full) </text:span><text:span text:style-name="T101">return</text:span><text:span text:style-name="T124">;</text:span></text:p>
      <text:p text:style-name="P1037"><text:span text:style-name="T1197">20 <text:tab/></text:span><text:span text:style-name="T115">char</text:span> *tty = tty_full + strlen(<text:span text:style-name="T116">"/dev/"</text:span>);</text:p>
      <text:p text:style-name="P1037"><text:span text:style-name="T1197">21 <text:tab/></text:span>memset(&amp;ut, <text:span text:style-name="T127">0</text:span>, <text:span text:style-name="T115">sizeof</text:span>(ut));</text:p>
      <text:p text:style-name="P1037"><text:span text:style-name="T1197">22 <text:tab/></text:span>ut.ut_type = <text:span text:style-name="T115">USER_PROCESS</text:span>;</text:p>
      <text:p text:style-name="P1037"><text:soft-page-break/><text:span text:style-name="T1197">23 <text:tab/></text:span>ut.ut_pid = getpid();</text:p>
      <text:p text:style-name="P1037"><text:span text:style-name="T1197">24 <text:tab/></text:span>strncpy(ut.ut_line, tty, <text:span text:style-name="T115">sizeof</text:span>(ut.ut_line));</text:p>
      <text:p text:style-name="P1037"><text:span text:style-name="T1197">25 <text:tab/></text:span>strncpy(ut.ut_user, username, <text:span text:style-name="T115">sizeof</text:span>(ut.ut_user));</text:p>
      <text:p text:style-name="P1037"><text:span text:style-name="T1197">26 <text:tab/></text:span>ut.ut_tv.tv_sec = time(<text:span text:style-name="T115">NULL</text:span>);</text:p>
      <text:p text:style-name="P1039"><text:span text:style-name="T1199">27 <text:tab/></text:span><text:span text:style-name="T124">ut.ut_tv.tv_usec = </text:span><text:span text:style-name="T335">0</text:span><text:span text:style-name="T124">;</text:span></text:p>
      <text:p text:style-name="P1037"><text:span text:style-name="T1197">28 <text:tab/></text:span><text:span text:style-name="T126">login</text:span>(&amp;ut);</text:p>
      <text:p text:style-name="P1037"><text:span text:style-name="T1197">29 </text:span>}</text:p>
      <text:p text:style-name="P188"/>
      <text:p text:style-name="P1037"><text:span text:style-name="T1197">30 </text:span><text:span text:style-name="T115">void</text:span> do_logout_record(<text:span text:style-name="T115">void</text:span>) {</text:p>
      <text:p text:style-name="P1037"><text:span text:style-name="T1197">31 <text:tab/></text:span><text:span text:style-name="T115">char</text:span> *tty_full = ttyname(<text:span text:style-name="T115">STDIN_FILENO</text:span>);</text:p>
      <text:p text:style-name="P1037"><text:span text:style-name="T1197">32 <text:tab/></text:span><text:span text:style-name="T115">if</text:span> (tty_full) logout(tty_full + strlen(<text:span text:style-name="T116">"/dev/"</text:span>));</text:p>
      <text:p text:style-name="P1037"><text:span text:style-name="T1197">33 <text:tab/></text:span><text:span text:style-name="T126">endutent</text:span>();</text:p>
      <text:p text:style-name="P1037"><text:span text:style-name="T1197">34 </text:span>}</text:p>
      <text:p text:style-name="P188"/>
      <text:p text:style-name="P1037"><text:span text:style-name="T1197">35 </text:span><text:span text:style-name="T115">int</text:span> main(<text:span text:style-name="T115">void</text:span>) {</text:p>
      <text:p text:style-name="P1037"><text:span text:style-name="T1197">36 <text:tab/></text:span><text:span text:style-name="T115">char</text:span> username[<text:span text:style-name="T127">64</text:span>];</text:p>
      <text:p text:style-name="P1037"><text:span text:style-name="T1197">37 <text:tab/></text:span><text:span text:style-name="T115">char</text:span> *password;</text:p>
      <text:p text:style-name="P1038"><text:span text:style-name="T1198">38 <text:tab/></text:span><text:span text:style-name="T103">struct</text:span><text:span text:style-name="T104"> </text:span><text:span text:style-name="T103">passwd</text:span><text:span text:style-name="T104"> *pw;</text:span></text:p>
      <text:p text:style-name="P1038"><text:span text:style-name="T1198">39 <text:tab/></text:span><text:span text:style-name="T103">struct</text:span><text:span text:style-name="T104"> </text:span><text:span text:style-name="T103">spwd</text:span><text:span text:style-name="T104"> *sp;</text:span></text:p>
      <text:p text:style-name="P1037"><text:span text:style-name="T1197">40 <text:tab/></text:span><text:span text:style-name="T115">char</text:span> *crypted, *input_crypted;</text:p>
      <text:p text:style-name="P188"/>
      <text:p text:style-name="P1037"><text:span text:style-name="T1197">41 <text:tab/></text:span>printf(<text:span text:style-name="T116">"Login: "</text:span>);</text:p>
      <text:p text:style-name="P1037"><text:span text:style-name="T1197">42 <text:tab/></text:span>fflush(<text:span text:style-name="T115">stdout</text:span>);</text:p>
      <text:p text:style-name="P1037"><text:span text:style-name="T1197">43 <text:tab/></text:span><text:span text:style-name="T115">if</text:span> (!fgets(username, <text:span text:style-name="T115">sizeof</text:span>(username), <text:span text:style-name="T115">stdin</text:span>)) <text:span text:style-name="T115">return</text:span> <text:span text:style-name="T127">1</text:span>;</text:p>
      <text:p text:style-name="P1039"><text:span text:style-name="T1199">44 <text:tab/></text:span><text:span text:style-name="T124">username[strcspn(username, </text:span><text:span text:style-name="T102">"\n"</text:span><text:span text:style-name="T124">)] = </text:span><text:span text:style-name="T335">0</text:span><text:span text:style-name="T124">;</text:span></text:p>
      <text:p text:style-name="P1037"><text:span text:style-name="T1197">45 <text:tab/></text:span>password = getpass(<text:span text:style-name="T116">"Password: "</text:span>);</text:p>
      <text:p text:style-name="P188"/>
      <text:p text:style-name="P1037"><text:span text:style-name="T1197">46 <text:tab/></text:span>pw = <text:span text:style-name="T126">getpwnam</text:span>(username);</text:p>
      <text:p text:style-name="P1037"><text:span text:style-name="T1197">47 <text:tab/></text:span><text:span text:style-name="T115">if</text:span> (!pw) {</text:p>
      <text:p text:style-name="P1037"><text:span text:style-name="T1197">48 <text:tab/><text:tab/></text:span>fprintf(<text:span text:style-name="T115">stderr</text:span>, <text:span text:style-name="T116">"Login incorrect.\n"</text:span>);</text:p>
      <text:p text:style-name="P1037"><text:span text:style-name="T1197">49 <text:tab/><text:tab/></text:span><text:span text:style-name="T115">return</text:span> <text:span text:style-name="T127">1</text:span>;</text:p>
      <text:p text:style-name="P1037"><text:span text:style-name="T1197">50 <text:tab/></text:span>}</text:p>
      <text:p text:style-name="P188"/>
      <text:p text:style-name="P1037"><text:span text:style-name="T1197">51 <text:tab/></text:span>sp = <text:span text:style-name="T126">getspnam</text:span>(username);</text:p>
      <text:p text:style-name="P1037"><text:span text:style-name="T1197">52 <text:tab/></text:span><text:span text:style-name="T115">if</text:span> (!sp) {</text:p>
      <text:p text:style-name="P1037"><text:span text:style-name="T1197">53 <text:tab/><text:tab/></text:span>fprintf(<text:span text:style-name="T115">stderr</text:span>, <text:span text:style-name="T116">"Cannot read shadow entry.\n"</text:span>);</text:p>
      <text:p text:style-name="P1037"><text:span text:style-name="T1197">54 <text:tab/><text:tab/></text:span><text:span text:style-name="T115">return</text:span> <text:span text:style-name="T127">1</text:span>;</text:p>
      <text:p text:style-name="P1037"><text:span text:style-name="T1197">55 <text:tab/></text:span>}</text:p>
      <text:p text:style-name="P188"/>
      <text:p text:style-name="P1037"><text:span text:style-name="T1197">56 <text:tab/></text:span>crypted = sp-&gt;sp_pwdp;</text:p>
      <text:p text:style-name="P1037"><text:span text:style-name="T1197">57 <text:tab/></text:span>input_crypted = <text:span text:style-name="T126">crypt</text:span>(password, crypted);</text:p>
      <text:p text:style-name="P188"/>
      <text:p text:style-name="P1037"><text:span text:style-name="T1197">58 <text:tab/></text:span><text:span text:style-name="T115">if</text:span> (strcmp(input_crypted, crypted) != <text:span text:style-name="T127">0</text:span>) {</text:p>
      <text:p text:style-name="P1037"><text:span text:style-name="T1197">59 <text:tab/><text:tab/></text:span>fprintf(<text:span text:style-name="T115">stderr</text:span>, <text:span text:style-name="T116">"Login incorrect.\n"</text:span>);</text:p>
      <text:p text:style-name="P1037"><text:span text:style-name="T1197">60 <text:tab/><text:tab/></text:span><text:span text:style-name="T115">return</text:span> <text:span text:style-name="T127">1</text:span>;</text:p>
      <text:p text:style-name="P1039"><text:span text:style-name="T1199">61 <text:tab/></text:span><text:span text:style-name="T124">}</text:span></text:p>
      <text:p text:style-name="P1037"><text:span text:style-name="T1197">62 <text:tab/></text:span>printf(<text:span text:style-name="T116">"Welcome %s!\n"</text:span>, username);</text:p>
      <text:p text:style-name="P434"/>
      <text:p text:style-name="P1037"><text:span text:style-name="T1197">63 <text:tab/></text:span>do_login_record(username);</text:p>
      <text:p text:style-name="P1040"><text:span text:style-name="T1197">64 <text:tab/></text:span><text:span text:style-name="T115">if</text:span> (<text:span text:style-name="T126">initgroups</text:span>(username, pw-&gt;pw_gid) &lt; <text:span text:style-name="T127">0</text:span> || <text:span text:style-name="T126">setgid</text:span>(pw-&gt;pw_gid) &lt; <text:span text:style-name="T127">0</text:span> <text:tab/> <text:s text:c="3"/>|| <text:span text:style-name="T126">setuid</text:span>(pw-&gt;pw_uid) &lt; <text:span text:style-name="T127">0</text:span>) {</text:p>
      <text:p text:style-name="P1037"><text:soft-page-break/><text:span text:style-name="T1197">65 <text:tab/><text:tab/></text:span>perror(<text:span text:style-name="T116">"Failed to drop privileges"</text:span>);</text:p>
      <text:p text:style-name="P1037"><text:span text:style-name="T1197">66 <text:tab/><text:tab/></text:span><text:span text:style-name="T115">return</text:span> <text:span text:style-name="T127">1</text:span>;</text:p>
      <text:p text:style-name="P1037"><text:span text:style-name="T1197">67 <text:tab/></text:span>}</text:p>
      <text:p text:style-name="P434"/>
      <text:p text:style-name="P1037"><text:span text:style-name="T1197">68 <text:tab/></text:span><text:span text:style-name="T115">char</text:span> *shell = pw-&gt;pw_shell &amp;&amp; pw-&gt;pw_shell[<text:span text:style-name="T127">0</text:span>] ? pw-&gt;pw_shell : <text:tab/><text:tab/><text:tab/><text:tab/> <text:s text:c="2"/><text:span text:style-name="T116">"/bin/sh"</text:span>;</text:p>
      <text:p text:style-name="P1037"><text:span text:style-name="T1197">69 <text:tab/></text:span>execlp(shell, shell, (<text:span text:style-name="T115">char</text:span> *)<text:span text:style-name="T115">NULL</text:span>);</text:p>
      <text:p text:style-name="P1037"><text:span text:style-name="T1197">70 <text:tab/></text:span>perror(<text:span text:style-name="T116">"Failed to exec shell"</text:span>);</text:p>
      <text:p text:style-name="P1037"><text:span text:style-name="T1197">71 <text:tab/></text:span>do_logout_record();</text:p>
      <text:p text:style-name="P1037"><text:span text:style-name="T1197">72 <text:tab/></text:span><text:span text:style-name="T115">return</text:span> <text:span text:style-name="T127">1</text:span>;</text:p>
      <text:p text:style-name="P1039"><text:span text:style-name="T1199">73 </text:span><text:span text:style-name="T124">}</text:span></text:p>
      <text:p text:style-name="Horizontal_20_Line"/>
      <text:p text:style-name="P1041">logincustom.c</text:p>
      <text:p text:style-name="P307"/>
      <text:p text:style-name="Standard"><text:span text:style-name="Strong_20_Emphasis"><text:span text:style-name="T220">Line 16.</text:span></text:span><text:span text:style-name="T220"> Defines a helper function that records a successful login event by adding an entry to the <text:tab/> <text:s/></text:span><text:span text:style-name="Source_20_Text"><text:span text:style-name="T221">utmp</text:span></text:span><text:span text:style-name="T220"> database</text:span></text:p>
      <text:p text:style-name="Standard"><text:span text:style-name="Strong_20_Emphasis"><text:span text:style-name="T220">Line 17–27.</text:span></text:span><text:span text:style-name="T220"> Prepares the </text:span><text:span text:style-name="Source_20_Text"><text:span text:style-name="T221">utmp</text:span></text:span><text:span text:style-name="T220"> structure by filling in fields such as the process ID, terminal line, <text:tab/> <text:s text:c="7"/>username, and login timestamp</text:span></text:p>
      <text:p text:style-name="Standard"><text:span text:style-name="Strong_20_Emphasis"><text:span text:style-name="T220">Line 28.</text:span></text:span><text:span text:style-name="T220"> Calls </text:span><text:span text:style-name="Source_20_Text"><text:span text:style-name="T221">login</text:span></text:span><text:span text:style-name="T220"> to write the entry into both </text:span><text:span text:style-name="Source_20_Text"><text:span text:style-name="T221">utmp</text:span></text:span><text:span text:style-name="T220"> and </text:span><text:span text:style-name="Source_20_Text"><text:span text:style-name="T221">wtmp</text:span></text:span><text:span text:style-name="T220">, registering the session as an <text:tab/> <text:s text:c="2"/>active login</text:span></text:p>
      <text:p text:style-name="Standard"><text:span text:style-name="Strong_20_Emphasis"><text:span text:style-name="T220">Line 30–33.</text:span></text:span><text:span text:style-name="T220"> Defines a logout function that retrieves the current terminal and calls </text:span><text:span text:style-name="Source_20_Text"><text:span text:style-name="T221">logout</text:span></text:span><text:span text:style-name="T220"> to <text:tab/> <text:s text:c="3"/><text:tab/> <text:s text:c="7"/>remove or update the corresponding session entry, then closes the utmp database</text:span></text:p>
      <text:p text:style-name="Standard"><text:span text:style-name="Strong_20_Emphasis"><text:span text:style-name="T220">Line 42–45.</text:span></text:span><text:span text:style-name="T220"> Handles user input: the program flushes output, reads the username from standard <text:tab/> <text:s text:c="2"/><text:tab/> <text:s text:c="7"/>input, removes the newline character, and securely prompts for a password using <text:tab/> <text:s text:c="3"/><text:tab/> <text:s text:c="7"/></text:span><text:span text:style-name="Source_20_Text"><text:span text:style-name="T221">getpass</text:span></text:span></text:p>
      <text:p text:style-name="Standard"><text:span text:style-name="Strong_20_Emphasis"><text:span text:style-name="T220">Line 46–50.</text:span></text:span><text:span text:style-name="T220"> Retrieves the user account information from the system database (</text:span><text:span text:style-name="Source_20_Text"><text:span text:style-name="T221">/etc/passwd</text:span></text:span><text:span text:style-name="T220">). If <text:tab/> <text:s text:c="7"/>the user does not exist, the login attempt is rejected</text:span></text:p>
      <text:p text:style-name="Standard"><text:span text:style-name="Strong_20_Emphasis"><text:span text:style-name="T220">Line 51–55.</text:span></text:span><text:span text:style-name="T220"> Retrieves the corresponding shadow password entry from </text:span><text:span text:style-name="Source_20_Text"><text:span text:style-name="T221">/etc/shadow</text:span></text:span><text:span text:style-name="T220">. If access <text:tab/> <text:s text:c="7"/>fails, the program terminates</text:span></text:p>
      <text:p text:style-name="Standard"><text:span text:style-name="Strong_20_Emphasis"><text:span text:style-name="T220">Line 56–58.</text:span></text:span><text:span text:style-name="T220"> Extracts the stored encrypted password and hashes the user-provided password using <text:tab/> <text:s text:c="7"/></text:span><text:span text:style-name="Source_20_Text"><text:span text:style-name="T221">crypt</text:span></text:span><text:span text:style-name="T220">, then compares both values to verify authentication</text:span></text:p>
      <text:p text:style-name="Standard"><text:span text:style-name="Strong_20_Emphasis"><text:span text:style-name="T220">Line 59–61.</text:span></text:span><text:span text:style-name="T220"> If authentication fails, the login attempt is rejected</text:span></text:p>
      <text:p text:style-name="Standard"><text:span text:style-name="Strong_20_Emphasis"><text:span text:style-name="T220">Line 62.</text:span></text:span><text:span text:style-name="T220"> If authentication succeeds, the user is welcomed</text:span></text:p>
      <text:p text:style-name="Standard"><text:span text:style-name="Strong_20_Emphasis"><text:span text:style-name="T220">Line 63–67.</text:span></text:span><text:span text:style-name="T220"> The program records the login in </text:span><text:span text:style-name="Source_20_Text"><text:span text:style-name="T221">utmp</text:span></text:span><text:span text:style-name="T220">, initializes the supplementary groups with <text:tab/><text:tab/> <text:s text:c="7"/></text:span><text:span text:style-name="Source_20_Text"><text:span text:style-name="T221">initgroups</text:span></text:span><text:span text:style-name="T220">, and drops privileges by setting the group ID and user ID to those of the <text:tab/> <text:s text:c="8"/>authenticated user</text:span></text:p>
      <text:p text:style-name="Standard"><text:span text:style-name="Strong_20_Emphasis"><text:span text:style-name="T220">Line 68–69.</text:span></text:span><text:span text:style-name="T220"> Determines the user’s shell (or defaults to </text:span><text:span text:style-name="Source_20_Text"><text:span text:style-name="T221">/bin/sh</text:span></text:span><text:span text:style-name="T220">) and replaces the current process <text:tab/> <text:s text:c="7"/>with it using </text:span><text:span text:style-name="Source_20_Text"><text:span text:style-name="T221">execlp</text:span></text:span></text:p>
      <text:p text:style-name="Standard"><text:span text:style-name="Strong_20_Emphasis"><text:span text:style-name="T220">Line 70–72.</text:span></text:span><text:span text:style-name="T220"> These lines are only executed if </text:span><text:span text:style-name="Source_20_Text"><text:span text:style-name="T221">execlp</text:span></text:span><text:span text:style-name="T220"> fails, since a successful call replaces the <text:tab/> <text:s text:c="3"/><text:tab/> <text:s text:c="7"/>current process image</text:span></text:p>
      <text:p text:style-name="P1042"/>
      <text:p text:style-name="P1043"><text:span text:style-name="T1200">The line </text:span><text:span text:style-name="T1201">45 </text:span><text:span text:style-name="T1200">uses the </text:span><text:span text:style-name="T1202">getpass</text:span><text:span text:style-name="T1202"><text:note text:id="ftn86" text:note-class="footnote"><text:note-citation>84</text:note-citation><text:note-body><text:p text:style-name="P1004"><text:span text:style-name="T1203">See the </text:span><text:span text:style-name="T1204">getpass(3)</text:span><text:span text:style-name="T1205"> manual page</text:span></text:p></text:note-body></text:note></text:span><text:span text:style-name="T1200"> function that is now deprecated. This function displays a prompt and turns the echo off. It is defined as follows.</text:span></text:p>
      <text:p text:style-name="P1044"/>
      <table:table table:name="Table131" table:style-name="Table131">
        <table:table-column table:style-name="Table131.A"/>
        <table:table-row>
          <table:table-cell table:style-name="Table131.A1" office:value-type="string">
            <text:p text:style-name="P271"><text:span text:style-name="T115">#include </text:span><text:span text:style-name="T116">&lt;unistd.h&gt;</text:span></text:p>
            <text:p text:style-name="P188"/>
            <text:p text:style-name="P229"><text:span text:style-name="T104">[[</text:span><text:span text:style-name="T1206">deprecated</text:span><text:span text:style-name="T104">]] </text:span><text:span text:style-name="T103">char</text:span><text:span text:style-name="T104"> *</text:span><text:span text:style-name="T105">getpass</text:span><text:span text:style-name="T104">(</text:span><text:span text:style-name="T103">const</text:span><text:span text:style-name="T104"> </text:span><text:span text:style-name="T103">char</text:span><text:span text:style-name="T104"> </text:span><text:span text:style-name="T106">*prompt</text:span><text:span text:style-name="T104">);</text:span></text:p>
            <text:p text:style-name="P283"/>
            <text:p text:style-name="P1045">Returns: pointer to the password without the trailing newline</text:p>
          </table:table-cell>
        </table:table-row>
      </table:table>
      <text:p text:style-name="P1046"><text:soft-page-break/><text:span text:style-name="T1207">The line </text:span><text:span text:style-name="T1201">57 </text:span><text:span text:style-name="T1207">calls </text:span><text:span text:style-name="T1208">crypt</text:span><text:span text:style-name="T1207"> passing the </text:span><text:span text:style-name="T1208">password</text:span><text:span text:style-name="T1207"> typed by the user on </text:span><text:span text:style-name="T1208">stdin</text:span><text:span text:style-name="T1207"> and the retrieved shadowed password </text:span><text:span text:style-name="T1208">crypted</text:span><text:span text:style-name="T1207">. </text:span><text:span text:style-name="T1208">crypt</text:span><text:span text:style-name="T1207"> extracts the </text:span><text:span text:style-name="T1209">salt</text:span><text:span text:style-name="T1207"> and the </text:span><text:span text:style-name="T1209">algorithm</text:span><text:span text:style-name="T1207"> from the encrypted password, re-hashes the </text:span><text:span text:style-name="T1208">password</text:span><text:span text:style-name="T1207"> using the same </text:span><text:span text:style-name="T1209">method</text:span><text:span text:style-name="T1207"> and </text:span><text:span text:style-name="T1209">salt</text:span><text:span text:style-name="T1207"> and returns the new generated encrypted string. This value can be compared with the crypted password. If they match the login is allowed. </text:span></text:p>
      <text:p text:style-name="P1047"><text:span text:style-name="T1210">The line </text:span><text:span text:style-name="T1201">69 </text:span><text:span text:style-name="T1210">executes a shell therefore it never returns. </text:span><text:span text:style-name="T1208">execlp</text:span><text:span text:style-name="T1210"> returns only if there is an error.</text:span></text:p>
      <text:p text:style-name="P1048"/>
      <text:p text:style-name="P1046"><text:span text:style-name="T1211">We execute the program on the Debian system. First, </text:span><text:span text:style-name="T1201">we</text:span><text:span text:style-name="T1211"> create a new user </text:span><text:span text:style-name="T1201">using</text:span><text:span text:style-name="T1210"> </text:span><text:span text:style-name="T1208">useradd</text:span></text:p>
      <text:p text:style-name="P1049"/>
      <table:table table:name="Table127" table:style-name="Table127">
        <table:table-column table:style-name="Table127.A"/>
        <table:table-row>
          <table:table-cell table:style-name="Table127.A1" office:value-type="string">
            <text:p text:style-name="P1050"><text:span text:style-name="T338">[</text:span><text:span text:style-name="T1212">apli</text:span><text:span text:style-name="T1213">@d</text:span><text:span text:style-name="T1212">ebian</text:span><text:span text:style-name="T338">] </text:span><text:span text:style-name="T1214">sudo useradd newuser</text:span></text:p>
            <text:p text:style-name="P1050"><text:span text:style-name="T80">[</text:span><text:span text:style-name="T1215">apli</text:span><text:span text:style-name="T1216">@d</text:span><text:span text:style-name="T1215">ebian</text:span><text:span text:style-name="T80">] </text:span>sudo <text:span text:style-name="T1217">passwd</text:span> newuser</text:p>
            <text:p text:style-name="P1051">New password:</text:p>
            <text:p text:style-name="P1051">Retype new password:</text:p>
            <text:p text:style-name="P1051">passwd: password updated successfully</text:p>
            <text:p text:style-name="P1050"/>
            <text:p text:style-name="P1050"><text:span text:style-name="T80">[</text:span><text:span text:style-name="T1215">apli</text:span><text:span text:style-name="T1216">@d</text:span><text:span text:style-name="T1215">ebian</text:span><text:span text:style-name="T80">] </text:span>sudo ./<text:span text:style-name="T1217">logincustom</text:span></text:p>
            <text:p text:style-name="P1051">Login: newuser</text:p>
            <text:p text:style-name="P1051">Password: </text:p>
            <text:p text:style-name="P1051">Welcome newuser!</text:p>
            <text:p text:style-name="P1051"/>
            <text:p text:style-name="P1051">$ whoami</text:p>
            <text:p text:style-name="P1051">newuser</text:p>
            <text:p text:style-name="P1051">$</text:p>
          </table:table-cell>
        </table:table-row>
      </table:table>
      <text:p text:style-name="P1049"/>
      <text:p text:style-name="P1046"><text:span text:style-name="T1211">On another terminal </text:span><text:span text:style-name="T1201">w</text:span><text:span text:style-name="T1211">e </text:span><text:span text:style-name="T1201">run the </text:span><text:span text:style-name="T1208">who</text:span><text:span text:style-name="T1211"> </text:span><text:span text:style-name="T1201">command </text:span><text:span text:style-name="T1211">to </text:span><text:span text:style-name="T1201">display the list of users </text:span><text:span text:style-name="T1211">current</text:span><text:span text:style-name="T1201">ly</text:span><text:span text:style-name="T1211"> logged in</text:span><text:span text:style-name="T1201">to the system</text:span><text:span text:style-name="T1211">.</text:span></text:p>
      <text:p text:style-name="P1052"/>
      <text:p text:style-name="P1052">Shell 2</text:p>
      <table:table table:name="Table128" table:style-name="Table128">
        <table:table-column table:style-name="Table128.A"/>
        <table:table-row>
          <table:table-cell table:style-name="Table128.A1" office:value-type="string">
            <text:p text:style-name="P1050"><text:span text:style-name="T338">[</text:span><text:span text:style-name="T1212">apli</text:span><text:span text:style-name="T1213">@d</text:span><text:span text:style-name="T1212">ebian</text:span><text:span text:style-name="T338">] </text:span><text:span text:style-name="T1214">who</text:span></text:p>
            <text:p text:style-name="P1053">apli <text:s text:c="9"/>tty2 <text:s text:c="8"/>2025-07-05 06:44 (tty2)</text:p>
            <text:p text:style-name="P1053">newuser <text:s/>pts/1 <text:s text:c="7"/>2025-07-05 17:06</text:p>
            <text:p text:style-name="P1050"/>
          </table:table-cell>
        </table:table-row>
      </table:table>
      <text:p text:style-name="P1049"/>
      <text:p text:style-name="P1049">On the first terminal <text:span text:style-name="T1218">we </text:span><text:span text:style-name="T1219">perform</text:span> the logout.</text:p>
      <text:p text:style-name="P1049"/>
      <text:p text:style-name="P1052">Shell 1</text:p>
      <table:table table:name="Table129" table:style-name="Table129">
        <table:table-column table:style-name="Table129.A"/>
        <table:table-row>
          <table:table-cell table:style-name="Table129.A1" office:value-type="string">
            <text:p text:style-name="P1053">$ exit</text:p>
            <text:p text:style-name="P1050"><text:span text:style-name="T80">[</text:span><text:span text:style-name="T1215">apli</text:span><text:span text:style-name="T1216">@d</text:span><text:span text:style-name="T1215">ebian</text:span><text:span text:style-name="T80">]</text:span></text:p>
          </table:table-cell>
        </table:table-row>
      </table:table>
      <text:p text:style-name="P1049"/>
      <text:p text:style-name="P1046"><text:span text:style-name="T1201">I</text:span><text:span text:style-name="T1211">n the second shell </text:span><text:span text:style-name="T1220">we </text:span><text:span text:style-name="T1211">re-execute </text:span><text:span text:style-name="T1208">who</text:span><text:span text:style-name="T1211"> </text:span></text:p>
      <text:p text:style-name="P1049"/>
      <text:p text:style-name="P1052">Shell 2</text:p>
      <table:table table:name="Table130" table:style-name="Table130">
        <table:table-column table:style-name="Table130.A"/>
        <table:table-row>
          <table:table-cell table:style-name="Table130.A1" office:value-type="string">
            <text:p text:style-name="P1050"><text:span text:style-name="T80">[</text:span><text:a xlink:type="simple" xlink:href="mailto:apli@debian" text:style-name="Internet_20_link" text:visited-style-name="Visited_20_Internet_20_Link"><text:span text:style-name="T1215">apli</text:span><text:span text:style-name="T1216">@d</text:span><text:span text:style-name="T1215">ebian</text:span></text:a><text:span text:style-name="T80">] </text:span><text:span text:style-name="T1217">who</text:span></text:p>
            <text:p text:style-name="P1053">apli <text:s text:c="9"/>tty2 <text:s text:c="8"/>2025-07-05 06:44 (tty2)</text:p>
          </table:table-cell>
        </table:table-row>
      </table:table>
      <text:p text:style-name="P1048"/>
      <text:p text:style-name="P1046"><text:span text:style-name="T1211">If a Linux system does not use </text:span><text:span text:style-name="Source_20_Text"><text:span text:style-name="T1221">utmp</text:span></text:span><text:span text:style-name="T1211"> to manage user login records, it is still possible to work with a custom </text:span><text:span text:style-name="Source_20_Text"><text:span text:style-name="T1221">utmp</text:span></text:span><text:span text:style-name="T1211"> file. In such cases, we can create our own </text:span><text:span text:style-name="Source_20_Text"><text:span text:style-name="T1221">utmp</text:span></text:span><text:span text:style-name="T1211"> file and manipulate it using the same functions introduced earlier.</text:span></text:p>
      <text:p text:style-name="P1048"/>
      <text:p text:style-name="P1048"/>
      <text:p text:style-name="P1054"><text:soft-page-break/>III.<text:span text:style-name="T45">9</text:span> <text:span text:style-name="T22">The </text:span><text:span text:style-name="T1222">Host, network, protocol </text:span><text:span text:style-name="T49">and</text:span><text:span text:style-name="T1222"> service</text:span><text:span text:style-name="T1223"> databases</text:span></text:p>
      <text:p text:style-name="P1055"/>
      <text:p text:style-name="P1056"><text:span text:style-name="T1224">The resolution process for system databases such as users, groups, and hosts is controlled by the </text:span><text:span text:style-name="Source_20_Text"><text:span text:style-name="T1225">nsswitch.conf</text:span></text:span><text:span text:style-name="T1224"> configuration file. This file determines the order and sources that the system uses when looking up information like usernames, group names, and network names.</text:span></text:p>
      <text:p text:style-name="P1056"><text:span text:style-name="T1224">For example, when a program queries user or group information (through functions like </text:span><text:span text:style-name="Source_20_Text"><text:span text:style-name="T1225">getpwnam</text:span></text:span><text:span text:style-name="T1224"> or </text:span><text:span text:style-name="Source_20_Text"><text:span text:style-name="T1225">getgrnam</text:span></text:span><text:span text:style-name="T1224">), the system does not access only </text:span><text:span text:style-name="Source_20_Text"><text:span text:style-name="T1225">/etc/passwd</text:span></text:span><text:span text:style-name="T1224"> or </text:span><text:span text:style-name="Source_20_Text"><text:span text:style-name="T1225">/etc/group</text:span></text:span><text:span text:style-name="T1224">. Instead, it follows the rules defined in </text:span><text:span text:style-name="Source_20_Text"><text:span text:style-name="T1225">nsswitch.conf</text:span></text:span><text:span text:style-name="T1224">, which may include local files, network services such as LDAP, or other name service providers. This allows Linux systems to be flexible and support multiple identity sources transparently.</text:span></text:p>
      <text:p text:style-name="P1055"/>
      <text:p text:style-name="P1057"><text:span text:style-name="T1226">III.9.1 </text:span><text:span text:style-name="T1227">The host database:</text:span><text:span text:style-name="T1226"> </text:span><text:span text:style-name="T75">/</text:span><text:span text:style-name="T1228">etc/hosts</text:span></text:p>
      <text:p text:style-name="P1055"/>
      <text:p text:style-name="P1058"><text:span text:style-name="T1224">The </text:span><text:span text:style-name="Source_20_Text"><text:span text:style-name="T1225">/etc/hosts</text:span></text:span><text:span text:style-name="T1224"> file is a local host database</text:span><text:span text:style-name="T1224"><text:note text:id="ftn87" text:note-class="footnote"><text:note-citation>85</text:note-citation><text:note-body><text:p text:style-name="P1059"><text:span text:style-name="T1229">See the </text:span><text:span text:style-name="T1230">hosts(5)</text:span><text:span text:style-name="T1231"> manual page</text:span></text:p></text:note-body></text:note></text:span><text:span text:style-name="T1224"> that maps IP addresses to hostnames. It provides a simple, static name resolution mechanism that is checked before querying DNS.</text:span></text:p>
      <text:p text:style-name="P1055"/>
      <text:p text:style-name="P1056"><text:span text:style-name="T1224">If the system’s </text:span><text:span text:style-name="Source_20_Text"><text:span text:style-name="T1225">nsswitch.conf</text:span></text:span><text:span text:style-name="T1224"> is configured as:</text:span></text:p>
      <text:p text:style-name="P1055"/>
      <text:p text:style-name="P1060">hosts: <text:s text:c="2"/>files dns</text:p>
      <text:p text:style-name="P1055"/>
      <text:p text:style-name="P1058"><text:span text:style-name="T1224">this means that the Name Service Switch (NSS) will first attempt to resolve hostnames using local files (such as </text:span><text:span text:style-name="Source_20_Text"><text:span text:style-name="T1225">/etc/hosts</text:span></text:span><text:span text:style-name="T1224">). Only if the name is not found there will it proceed to query external DNS servers.</text:span></text:p>
      <text:p text:style-name="P1061"><text:s/></text:p>
      <text:p text:style-name="P1055">For each host a single line should be present with the following information:</text:p>
      <text:p text:style-name="P1055"/>
      <text:p text:style-name="P1056"><text:span text:style-name="T1224"><text:s text:c="12"/></text:span><text:span text:style-name="T1225">IP_address canonical_hostname [aliases...]</text:span></text:p>
      <text:p text:style-name="P1055"/>
      <text:p text:style-name="P1062">An example of the host database is the following<text:note text:id="ftn88" text:note-class="footnote"><text:note-citation>86</text:note-citation><text:note-body><text:p text:style-name="P1059"><text:span text:style-name="T1232">From the </text:span><text:span text:style-name="T1230">hosts(5)</text:span><text:span text:style-name="T1229"> manual page</text:span></text:p></text:note-body></text:note></text:p>
      <text:p text:style-name="P1055"/>
      <text:p text:style-name="P1063"><text:tab/> <text:s/># The following lines are desirable for IPv4 capable hosts</text:p>
      <text:p text:style-name="P1063"><text:s text:c="7"/>127.0.0.1 <text:s text:c="6"/>localhost</text:p>
      <text:p text:style-name="P1063"/>
      <text:p text:style-name="P1063"><text:s text:c="7"/># 127.0.1.1 is often used for the FQDN of the machine</text:p>
      <text:p text:style-name="P1063"><text:s text:c="7"/>127.0.1.1 <text:s text:c="6"/>thishost.example.org <text:s text:c="2"/>thishost</text:p>
      <text:p text:style-name="P1063"><text:s text:c="7"/>192.168.1.10 <text:s text:c="3"/>foo.example.org <text:s text:c="7"/>foo</text:p>
      <text:p text:style-name="P1063"><text:s text:c="7"/>192.168.1.13 <text:s text:c="3"/>bar.example.org <text:s text:c="7"/>bar</text:p>
      <text:p text:style-name="P1063"><text:s text:c="7"/>146.82.138.7 <text:s text:c="3"/>master.debian.org <text:s text:c="5"/>master</text:p>
      <text:p text:style-name="P1063"><text:s text:c="7"/>209.237.226.90 <text:s/>www.opensource.org</text:p>
      <text:p text:style-name="P1063"/>
      <text:p text:style-name="P1063"><text:s text:c="7"/># The following lines are desirable for IPv6 capable hosts</text:p>
      <text:p text:style-name="P1063"><text:s text:c="7"/>::1 <text:s text:c="12"/>localhost ip6-localhost ip6-loopback</text:p>
      <text:p text:style-name="P1063"><text:s text:c="7"/>ff02::1 <text:s text:c="8"/>ip6-allnodes</text:p>
      <text:p text:style-name="P1063"><text:s text:c="7"/>ff02::2 <text:s text:c="8"/>ip6-allrouters</text:p>
      <text:p text:style-name="P1064"/>
      <text:p text:style-name="P1065"><text:soft-page-break/><text:span text:style-name="T1233">T</text:span><text:span text:style-name="T1234">he first column is the IP address and the second is the </text:span><text:span text:style-name="T1235">canonical </text:span><text:span text:style-name="T1234">hostname. Both the IPv4 and IPv6 addresses are settable in the file. </text:span><text:span text:style-name="T1236">To query the host database we can use the </text:span><text:span text:style-name="T1237">gethostent</text:span><text:span text:style-name="T1236"> function</text:span><text:span text:style-name="T1236"><text:note text:id="ftn89" text:note-class="footnote"><text:note-citation>87</text:note-citation><text:note-body><text:p text:style-name="P1059"><text:span text:style-name="T1238">See the </text:span><text:span text:style-name="T1239">ge</text:span><text:span text:style-name="T1230">thostbyname</text:span><text:span text:style-name="T1239">(3)</text:span><text:span text:style-name="T1231"> manual page</text:span></text:p></text:note-body></text:note></text:span><text:span text:style-name="T1236">, </text:span><text:span text:style-name="T1233">which is</text:span><text:span text:style-name="T1236"> defined in the </text:span><text:span text:style-name="T1225">netdb.h</text:span><text:span text:style-name="T1236"> </text:span><text:span text:style-name="T1233">header file </text:span><text:span text:style-name="T1240">as follows.</text:span></text:p>
      <text:p text:style-name="P1066"/>
      <table:table table:name="Table155" table:style-name="Table155">
        <table:table-column table:style-name="Table155.A"/>
        <table:table-row>
          <table:table-cell table:style-name="Table155.A1" office:value-type="string">
            <text:p text:style-name="P271"><text:span text:style-name="T115">#include </text:span><text:span text:style-name="T116">&lt;netdb.h&gt;</text:span></text:p>
            <text:p text:style-name="P188"/>
            <text:p text:style-name="P186"><text:span text:style-name="T115">void</text:span> <text:span text:style-name="T126">sethostent</text:span>(<text:span text:style-name="T115">int</text:span> <text:span text:style-name="T68">stayopen</text:span>);</text:p>
            <text:p text:style-name="P228"><text:span text:style-name="T101">void</text:span><text:span text:style-name="T124"> </text:span><text:span text:style-name="T216">endhostent</text:span><text:span text:style-name="T124">(</text:span><text:span text:style-name="T101">void</text:span><text:span text:style-name="T124">);</text:span></text:p>
            <text:p text:style-name="P229"><text:span text:style-name="T103">struct</text:span><text:span text:style-name="T104"> </text:span><text:span text:style-name="T103">hostent</text:span><text:span text:style-name="T104"> *</text:span><text:span text:style-name="T105">gethostent</text:span><text:span text:style-name="T104">(</text:span><text:span text:style-name="T103">void</text:span><text:span text:style-name="T104">);</text:span></text:p>
            <text:p text:style-name="P186"/>
            <text:p text:style-name="P1067"><text:span text:style-name="T103">int</text:span><text:span text:style-name="T104"> </text:span><text:span text:style-name="T105">gethostent_r</text:span><text:span text:style-name="T104">(</text:span><text:span text:style-name="T103">struct</text:span><text:span text:style-name="T104"> </text:span><text:span text:style-name="T103">hostent</text:span><text:span text:style-name="T104"> *</text:span><text:span text:style-name="T103">restrict</text:span><text:span text:style-name="T104"> </text:span><text:span text:style-name="T106">ret</text:span><text:span text:style-name="T104">, </text:span><text:span text:style-name="T103">char</text:span><text:span text:style-name="T104"> <text:s text:c="2"/></text:span></text:p>
            <text:p text:style-name="P1067"><text:span text:style-name="T104"><text:s text:c="17"/></text:span><text:span text:style-name="T106">buf[restrict .buflen]</text:span><text:span text:style-name="T104">, </text:span><text:span text:style-name="T103">size_t</text:span><text:span text:style-name="T104"> </text:span><text:span text:style-name="T106">buflen</text:span><text:span text:style-name="T104">, </text:span><text:span text:style-name="T103">struct</text:span><text:span text:style-name="T104"> </text:span><text:span text:style-name="T103">hostent</text:span><text:span text:style-name="T104"> </text:span></text:p>
            <text:p text:style-name="P1067"><text:span text:style-name="T104"><text:s text:c="17"/>**</text:span><text:span text:style-name="T103">restrict</text:span><text:span text:style-name="T104"> </text:span><text:span text:style-name="T106">result</text:span><text:span text:style-name="T104">, </text:span><text:span text:style-name="T103">int</text:span><text:span text:style-name="T104"> *</text:span><text:span text:style-name="T103">restrict</text:span><text:span text:style-name="T104"> </text:span><text:span text:style-name="T106">h_errnop</text:span><text:span text:style-name="T104">);</text:span></text:p>
            <text:p text:style-name="P1068"/>
            <text:p text:style-name="P1069"><text:span text:style-name="T1241"><text:s text:c="34"/>Return: </text:span><text:span text:style-name="T1242">an hostent structure, NULL on failure </text:span></text:p>
            <text:p text:style-name="P1070">0 on success, nonzero on failure</text:p>
          </table:table-cell>
        </table:table-row>
      </table:table>
      <text:p text:style-name="P1071"/>
      <text:p text:style-name="P1058"><text:span text:style-name="T1243">The </text:span><text:span text:style-name="T1237">hostent</text:span><text:span text:style-name="T1243"> structure is defined as follows.</text:span></text:p>
      <text:p text:style-name="P1072"/>
      <table:table table:name="Table156" table:style-name="Table156">
        <table:table-column table:style-name="Table156.A"/>
        <table:table-row>
          <table:table-cell table:style-name="Table156.A1" office:value-type="string">
            <text:p text:style-name="P515"><text:span text:style-name="T115">struct</text:span> hostent {</text:p>
            <text:p text:style-name="P516"><text:span text:style-name="T115"><text:s text:c="3"/>char</text:span> *h_name;<text:span text:style-name="T119"> <text:s text:c="8"/>/* official name of host */</text:span></text:p>
            <text:p text:style-name="P516"><text:span text:style-name="T115"><text:s text:c="3"/>char</text:span> **h_aliases;<text:span text:style-name="T119"> <text:s text:c="4"/>/* alias list */</text:span></text:p>
            <text:p text:style-name="P516"><text:span text:style-name="T115"><text:s text:c="3"/>int</text:span> h_addrtype;<text:span text:style-name="T119"> <text:s text:c="6"/>/* host address type */</text:span></text:p>
            <text:p text:style-name="P516"><text:span text:style-name="T115"><text:s text:c="3"/>int</text:span> h_length;<text:span text:style-name="T119"> <text:s text:c="8"/>/* length of address */</text:span></text:p>
            <text:p text:style-name="P516"><text:span text:style-name="T115"><text:s text:c="3"/>char</text:span> **h_addr_list;<text:span text:style-name="T119"> <text:s text:c="2"/>/* list of addresses */</text:span></text:p>
            <text:p text:style-name="P516">}</text:p>
            <text:p text:style-name="P1073"><text:span text:style-name="T101">#define h_addr h_addr_list[</text:span><text:span text:style-name="T335">0</text:span><text:span text:style-name="T101">]</text:span><text:span text:style-name="T212"> <text:s text:c="2"/>/* for backward compatibility */</text:span></text:p>
          </table:table-cell>
        </table:table-row>
      </table:table>
      <text:p text:style-name="P1072"/>
      <text:p text:style-name="P1058"><text:span text:style-name="T1244">The </text:span><text:span text:style-name="T1237">gethostent</text:span><text:span text:style-name="T1244"> function returns the next entry in the host database. The </text:span><text:span text:style-name="T1237">gethostent_r</text:span><text:span text:style-name="T1244"> function is the reentrant version of </text:span><text:span text:style-name="T1237">gethostent</text:span><text:span text:style-name="T1244"> that supplies a </text:span><text:span text:style-name="T1237">hostent</text:span><text:span text:style-name="T1244"> structure </text:span><text:span text:style-name="T1237">ret</text:span><text:span text:style-name="T1244"> which will be filled in on success, and a temporary work buffer <text:s/></text:span><text:span text:style-name="T1237">buf</text:span><text:span text:style-name="T1244"> <text:s/>of size <text:s/></text:span><text:span text:style-name="T1237">buflen</text:span><text:span text:style-name="T1244">. <text:s/>After the call, </text:span><text:span text:style-name="T1237">result</text:span><text:span text:style-name="T1244"> will point to the </text:span><text:span text:style-name="T1237">result</text:span><text:span text:style-name="T1244"> on success. <text:s/>In case of an error or if no entry is found </text:span><text:span text:style-name="T1237">result</text:span><text:span text:style-name="T1244"> will be </text:span><text:span text:style-name="T1237">NULL</text:span><text:span text:style-name="T1244">. <text:s/>The functions return </text:span><text:span text:style-name="T1237">0</text:span><text:span text:style-name="T1244"> on success and a nonzero error number on failure. </text:span></text:p>
      <text:p text:style-name="P1074"/>
      <text:p text:style-name="P1056"><text:span text:style-name="T1245">The </text:span><text:span text:style-name="T1237">sethostent</text:span><text:span text:style-name="T1245"> function specifies, if </text:span><text:span text:style-name="T1237">stayopen</text:span><text:span text:style-name="T1245"> is true (</text:span><text:span text:style-name="T1237">1</text:span><text:span text:style-name="T1245">), that </text:span><text:span text:style-name="T1246">the file must kept open between calls, </text:span><text:span text:style-name="T1233">and that </text:span><text:span text:style-name="T1246">if </text:span><text:span text:style-name="T1237">stayopen</text:span><text:span text:style-name="T1246"> is false (</text:span><text:span text:style-name="T1237">0</text:span><text:span text:style-name="T1246">), the file will be closed after each call. </text:span></text:p>
      <text:p text:style-name="P1058"><text:span text:style-name="T1247">The </text:span><text:span text:style-name="T1237">endhostent</text:span><text:span text:style-name="T1247"> function closes the file. </text:span></text:p>
      <text:p text:style-name="P1075"/>
      <text:p text:style-name="P1058"><text:span text:style-name="T1248">The </text:span><text:span text:style-name="T1237">gethost.c</text:span><text:span text:style-name="T1248"> program </text:span>demonstrates how to access and read the host database using the system’s network name service functions.</text:p>
      <text:p text:style-name="Horizontal_20_Line"/>
      <text:p text:style-name="P1076"><text:span text:style-name="T1249">1 </text:span><text:span text:style-name="T115">#include </text:span><text:span text:style-name="T116">&lt;stdio.h&gt;</text:span></text:p>
      <text:p text:style-name="P1077"><text:span text:style-name="T1250">2 </text:span><text:span text:style-name="T115">#include </text:span><text:span text:style-name="T116">&lt;netdb.h&gt;</text:span></text:p>
      <text:p text:style-name="P1077"><text:span text:style-name="T1250">3 </text:span><text:span text:style-name="T115">#include </text:span><text:span text:style-name="T116">&lt;arpa/inet.h&gt;</text:span></text:p>
      <text:p text:style-name="P1077"><text:span text:style-name="T1250">4 </text:span><text:span text:style-name="T115">#include </text:span><text:span text:style-name="T116">&lt;string.h&gt;</text:span></text:p>
      <text:p text:style-name="P188"/>
      <text:p text:style-name="P1077"><text:span text:style-name="T1250">5 </text:span><text:span text:style-name="T115">int</text:span> main(<text:span text:style-name="T115">void</text:span>) {</text:p>
      <text:p text:style-name="P1078"><text:span text:style-name="T1251">6 </text:span><text:span text:style-name="T103"><text:tab/>struct</text:span><text:span text:style-name="T104"> </text:span><text:span text:style-name="T103">hostent</text:span><text:span text:style-name="T104"> *host;</text:span></text:p>
      <text:p text:style-name="P1079"><text:span text:style-name="T1252">7 </text:span><text:span text:style-name="T124"><text:tab/></text:span><text:span text:style-name="T216">sethostent</text:span><text:span text:style-name="T124">(</text:span><text:span text:style-name="T335">0</text:span><text:span text:style-name="T124">);</text:span><text:span text:style-name="T212"> </text:span></text:p>
      <text:p text:style-name="P1077"><text:soft-page-break/><text:span text:style-name="T1250">8 </text:span><text:span text:style-name="T115"><text:tab/>while</text:span> ((host = <text:span text:style-name="T126">gethostent</text:span>()) != <text:span text:style-name="T115">NULL</text:span>) {</text:p>
      <text:p text:style-name="P1079"><text:span text:style-name="T1252">9 </text:span><text:span text:style-name="T124"><text:tab/><text:tab/>printf(</text:span><text:span text:style-name="T102">"Name: %s\n"</text:span><text:span text:style-name="T124">, host-&gt;h_name);</text:span></text:p>
      <text:p text:style-name="P1077"><text:span text:style-name="T1250">10 </text:span><text:span text:style-name="T115"><text:tab/><text:tab/>for</text:span> (<text:span text:style-name="T115">char</text:span> **alias = host-&gt;h_aliases; *alias != <text:span text:style-name="T115">NULL</text:span>; alias++) <text:span text:style-name="T1250">11 </text:span><text:tab/><text:tab/>{</text:p>
      <text:p text:style-name="P1077"><text:span text:style-name="T1250">12 </text:span><text:tab/><text:tab/><text:tab/>printf(<text:span text:style-name="T116">" Alias: %s\n"</text:span>, *alias);</text:p>
      <text:p text:style-name="P1079"><text:span text:style-name="T1252">13 </text:span><text:span text:style-name="T124"><text:tab/><text:tab/>}</text:span></text:p>
      <text:p text:style-name="P1077"><text:span text:style-name="T1250">14 </text:span><text:span text:style-name="T115"><text:tab/><text:tab/>for</text:span> (<text:span text:style-name="T115">int</text:span> i = <text:span text:style-name="T127">0</text:span>; host-&gt;h_addr_list[i] != <text:span text:style-name="T115">NULL</text:span>; i++) {</text:p>
      <text:p text:style-name="P1077"><text:span text:style-name="T1250">15 </text:span><text:span text:style-name="T115"><text:tab/><text:tab/><text:tab/>char</text:span> ip[<text:span text:style-name="T115">INET_ADDRSTRLEN</text:span>];</text:p>
      <text:p text:style-name="P1077"><text:span text:style-name="T1250">16 </text:span><text:tab/><text:tab/><text:tab/>inet_ntop(<text:span text:style-name="T115">AF_INET</text:span>, host-&gt;h_addr_list[i], ip,<text:span text:style-name="T115">sizeof</text:span>(ip));</text:p>
      <text:p text:style-name="P1077"><text:span text:style-name="T1250">17 </text:span><text:tab/><text:tab/><text:tab/>printf(<text:span text:style-name="T116">" Address: %s\n"</text:span>, ip);</text:p>
      <text:p text:style-name="P1077"><text:span text:style-name="T1250">18 </text:span><text:tab/><text:tab/>}</text:p>
      <text:p text:style-name="P1080"><text:span text:style-name="T1252">19 </text:span><text:tab/><text:span text:style-name="T124"><text:tab/>printf(</text:span><text:span text:style-name="T102">"\n"</text:span><text:span text:style-name="T124">);</text:span></text:p>
      <text:p text:style-name="P1079"><text:span text:style-name="T1252">20 </text:span><text:span text:style-name="T124"><text:tab/>}</text:span></text:p>
      <text:p text:style-name="P1077"><text:span text:style-name="T1250">21 </text:span><text:tab/><text:span text:style-name="T126">endhostent</text:span>();</text:p>
      <text:p text:style-name="P1077"><text:span text:style-name="T1250">22 </text:span><text:span text:style-name="T115"><text:tab/>return </text:span><text:span text:style-name="T127">0</text:span>;</text:p>
      <text:p text:style-name="P1081"><text:span text:style-name="T1253">23 </text:span><text:span text:style-name="T1254">}</text:span></text:p>
      <text:p text:style-name="Horizontal_20_Line"/>
      <text:p text:style-name="P1082">gethost.c</text:p>
      <text:p text:style-name="P307"/>
      <text:p text:style-name="Standard"><text:span text:style-name="Strong_20_Emphasis"><text:span text:style-name="T220">Line 6.</text:span></text:span><text:span text:style-name="T220"> Declares a pointer to a </text:span><text:span text:style-name="Source_20_Text"><text:span text:style-name="T221">hostent</text:span></text:span><text:span text:style-name="T220"> structure, which will store each host entry retrieved from <text:tab/>the database</text:span></text:p>
      <text:p text:style-name="Standard"><text:span text:style-name="Strong_20_Emphasis"><text:span text:style-name="T220">Line 7.</text:span></text:span><text:span text:style-name="T220"> Calls </text:span><text:span text:style-name="Source_20_Text"><text:span text:style-name="T221">sethostent(0)</text:span></text:span><text:span text:style-name="T220"> to open the host database and configure it to not keep the file <text:tab/> <text:tab/> open between reads</text:span></text:p>
      <text:p text:style-name="Standard"><text:span text:style-name="Strong_20_Emphasis"><text:span text:style-name="T220">Line 8.</text:span></text:span><text:span text:style-name="T220"> Iterates through all entries in the host database using </text:span><text:span text:style-name="Source_20_Text"><text:span text:style-name="T221">gethostent</text:span></text:span><text:span text:style-name="T220"> until no more records <text:tab/>are available</text:span></text:p>
      <text:p text:style-name="Standard"><text:span text:style-name="Strong_20_Emphasis"><text:span text:style-name="T220">Line 9.</text:span></text:span><text:span text:style-name="T220"> Prints the canonical hostname of the current entry</text:span></text:p>
      <text:p text:style-name="Standard"><text:span text:style-name="Strong_20_Emphasis"><text:span text:style-name="T220">Line 10–13.</text:span></text:span><text:span text:style-name="T220"> Iterates through the list of aliases associated with the hostname and prints each one</text:span></text:p>
      <text:p text:style-name="Standard"><text:span text:style-name="Strong_20_Emphasis"><text:span text:style-name="T220">Line 14–18.</text:span></text:span><text:span text:style-name="T220"> Iterates through all IP addresses associated with the host. Each binary address is <text:tab/> <text:s/><text:tab/> <text:s text:c="7"/>converted into a human-readable string using </text:span><text:span text:style-name="Source_20_Text"><text:span text:style-name="T221">inet_ntop</text:span></text:span><text:span text:style-name="T220"> before being printed</text:span></text:p>
      <text:p text:style-name="Standard"><text:span text:style-name="Strong_20_Emphasis"><text:span text:style-name="T220">Line 21.</text:span></text:span><text:span text:style-name="T220"> Closes the host database using </text:span><text:span text:style-name="Source_20_Text"><text:span text:style-name="T221">endhostent</text:span></text:span></text:p>
      <text:p text:style-name="P1083"/>
      <text:p text:style-name="P1084"><text:span text:style-name="T1255">Since a hostname can have multiple addresses, </text:span><text:span text:style-name="T1256">gethostent</text:span><text:span text:style-name="T1255"> returns a list of structures containing these addresses. <text:s/>The line </text:span><text:span text:style-name="T1233">14 </text:span><text:span text:style-name="T1255">iterates over the list of IP addresses associated with the given host.</text:span></text:p>
      <text:p text:style-name="P1085"/>
      <text:p text:style-name="P1058"><text:span text:style-name="T1255">The </text:span><text:span text:style-name="T1256">INET_ADDRSTRLEN</text:span><text:span text:style-name="T1255"> constant is defined with a value of </text:span><text:span text:style-name="T1256">16</text:span><text:span text:style-name="T1255"> to hold an IP address in the file header </text:span><text:span text:style-name="T1256">netinet/in.h</text:span><text:span text:style-name="T1255"> that is imported by </text:span><text:span text:style-name="T1256">netdb.h</text:span><text:span text:style-name="T1255"> and </text:span><text:span text:style-name="T1256">arpa/inet.h</text:span><text:span text:style-name="T1255">. </text:span></text:p>
      <text:p text:style-name="P1084"><text:span text:style-name="T1257">The function </text:span><text:span text:style-name="T1256">inet_ntop</text:span><text:span text:style-name="T1256"><text:note text:id="ftn90" text:note-class="footnote"><text:note-citation>88</text:note-citation><text:note-body><text:p text:style-name="P1086"><text:span text:style-name="T1258">See the </text:span><text:span text:style-name="T1259">inet_ntop(3)</text:span><text:span text:style-name="T1260"> manual page</text:span></text:p></text:note-body></text:note></text:span><text:span text:style-name="T1257"> </text:span><text:span text:style-name="T1261">of the line 16 </text:span><text:span text:style-name="T1257">converts IPv4 and IPv6 addresses from binary to text form and is explained in the </text:span><text:span text:style-name="T1262">Theory </text:span><text:span text:style-name="T1263">and</text:span><text:span text:style-name="T1262"> </text:span><text:span text:style-name="T1263">i</text:span><text:span text:style-name="T1262">nsights</text:span><text:span text:style-name="T1257"> section. </text:span></text:p>
      <text:p text:style-name="P1087"/>
      <text:p text:style-name="P1088">We execute the program </text:p>
      <text:p text:style-name="P1088"/>
      <table:table table:name="Table157" table:style-name="Table157">
        <table:table-column table:style-name="Table157.A"/>
        <table:table-row>
          <table:table-cell table:style-name="Table157.A1" office:value-type="string">
            <text:p text:style-name="P1089"><text:span text:style-name="T80">[</text:span><text:a xlink:type="simple" xlink:href="mailto:linux@users" text:style-name="Internet_20_link" text:visited-style-name="Visited_20_Internet_20_Link"><text:span text:style-name="T81">linux@users</text:span></text:a><text:span text:style-name="T80">] ./</text:span><text:span text:style-name="T1264">gethost</text:span></text:p>
            <text:p text:style-name="P1089">Name: localhost</text:p>
            <text:p text:style-name="P1089"><text:s text:c="2"/>Address: 127.0.0.1</text:p>
            <text:p text:style-name="P1089"/>
            <text:p text:style-name="P1089">Name: kali</text:p>
            <text:p text:style-name="P1089"><text:s text:c="2"/>Address: 127.0.1.1</text:p>
            <text:p text:style-name="P1089"/>
            <text:p text:style-name="P1089">Name: localhost</text:p>
            <text:p text:style-name="P1089"><text:soft-page-break/><text:s text:c="2"/>Alias: ip6-localhost</text:p>
            <text:p text:style-name="P1089"><text:s text:c="2"/>Alias: ip6-loopback</text:p>
            <text:p text:style-name="P1089"><text:s text:c="2"/>Address: 127.0.0.1</text:p>
          </table:table-cell>
        </table:table-row>
      </table:table>
      <text:p text:style-name="P1087"/>
      <text:p text:style-name="P1084"><text:span text:style-name="T1257">The output shows the entries stored in the host database as resolved by the system. For each host, the program prints its canonical name, followed by any aliases, and then the associated IP addresses. For example, </text:span><text:span text:style-name="Source_20_Text"><text:span text:style-name="T1265">localhost</text:span></text:span><text:span text:style-name="T1257"> is mapped to the loopback address </text:span><text:span text:style-name="Source_20_Text"><text:span text:style-name="T1265">127.0.0.1</text:span></text:span><text:span text:style-name="T1257">, while the system hostname </text:span><text:span text:style-name="Source_20_Text"><text:span text:style-name="T1265">kali</text:span></text:span><text:span text:style-name="T1257"> is mapped to </text:span><text:span text:style-name="Source_20_Text"><text:span text:style-name="T1265">127.0.1.1</text:span></text:span><text:span text:style-name="T1257"> as defined in the local configuration.</text:span></text:p>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7"/>
      <text:p text:style-name="P1085"/>
      <text:p text:style-name="P1085"/>
      <text:p text:style-name="P1085"/>
      <text:p text:style-name="P1085"/>
      <text:p text:style-name="P1085"/>
      <text:p text:style-name="P1085"/>
      <text:p text:style-name="P1090"><text:soft-page-break/>III.9.2 <text:span text:style-name="T1227">The </text:span><text:span text:style-name="T1266">network database: </text:span><text:span text:style-name="T75">/</text:span><text:span text:style-name="T1228">etc/</text:span><text:span text:style-name="T1267">networks</text:span></text:p>
      <text:p text:style-name="P1085"/>
      <text:p text:style-name="P1091"><text:span text:style-name="T1268">The </text:span><text:span text:style-name="T1269">/etc/networks</text:span><text:span text:style-name="T1268"> file</text:span><text:span text:style-name="T1268"><text:note text:id="ftn91" text:note-class="footnote"><text:note-citation>89</text:note-citation><text:note-body><text:p text:style-name="P1059"><text:span text:style-name="T1229">See the </text:span><text:span text:style-name="T1270">networks(5)</text:span><text:span text:style-name="T1231"> manual page</text:span></text:p></text:note-body></text:note></text:span><text:span text:style-name="T1268"> contains the list of the networks of the system. Each line represents a network and has the following structure</text:span></text:p>
      <text:p text:style-name="P1092"/>
      <text:p text:style-name="P1092"><text:tab/><text:span text:style-name="T75">name number aliases ...</text:span></text:p>
      <text:p text:style-name="P1093"/>
      <text:p text:style-name="P1091"><text:span text:style-name="T1271">The </text:span><text:span text:style-name="Emphasis"><text:span text:style-name="T1269">name</text:span></text:span><text:span text:style-name="T1271"> field represents the symbolic name of the network, the </text:span><text:span text:style-name="Emphasis"><text:span text:style-name="T1269">number</text:span></text:span><text:span text:style-name="T1271"> field corresponds to its network address, and the </text:span><text:span text:style-name="Emphasis"><text:span text:style-name="T1269">aliases</text:span></text:span><text:span text:style-name="T1271"> field contains any optional alternative names that the network may have.</text:span></text:p>
      <text:p text:style-name="P1093"/>
      <text:p text:style-name="P1093">An example of this file is the following</text:p>
      <text:p text:style-name="P1093"/>
      <text:p text:style-name="P1093"><text:tab/><text:span text:style-name="T75">default<text:tab/><text:tab/>0.0.0.0</text:span></text:p>
      <text:p text:style-name="P1094"><text:tab/>loopback<text:tab/><text:tab/>127.0.0.0</text:p>
      <text:p text:style-name="P1094"><text:tab/>link-local<text:tab/>169.254.0.0</text:p>
      <text:p text:style-name="P1095"/>
      <text:p text:style-name="P1096">To work with the network database, we can use the following functions<text:note text:id="ftn92" text:note-class="footnote"><text:note-citation>90</text:note-citation><text:note-body><text:p text:style-name="P1059"><text:span text:style-name="T1272">See the </text:span><text:span text:style-name="T1273">getnetent(3)</text:span><text:span text:style-name="T1229"> manual page</text:span></text:p></text:note-body></text:note>.</text:p>
      <text:p text:style-name="P1097"/>
      <table:table table:name="Table158" table:style-name="Table158">
        <table:table-column table:style-name="Table158.A"/>
        <table:table-row>
          <table:table-cell table:style-name="Table158.A1" office:value-type="string">
            <text:p text:style-name="P271"><text:span text:style-name="T115">#include </text:span><text:span text:style-name="T116">&lt;netdb.h&gt;</text:span></text:p>
            <text:p text:style-name="P188"/>
            <text:p text:style-name="P850"><text:span text:style-name="T960">struct</text:span><text:span text:style-name="T879"> </text:span><text:span text:style-name="T960">netent</text:span><text:span text:style-name="T879"> *</text:span><text:span text:style-name="T880">getnetent</text:span><text:span text:style-name="T879">(</text:span><text:span text:style-name="T960">void</text:span><text:span text:style-name="T879">);</text:span></text:p>
            <text:p text:style-name="P188"/>
            <text:p text:style-name="P850"><text:span text:style-name="T960">struct</text:span><text:span text:style-name="T879"> </text:span><text:span text:style-name="T960">netent</text:span><text:span text:style-name="T879"> *</text:span><text:span text:style-name="T880">getnetbyname</text:span><text:span text:style-name="T879">(</text:span><text:span text:style-name="T960">const</text:span><text:span text:style-name="T879"> </text:span><text:span text:style-name="T960">char</text:span><text:span text:style-name="T879"> </text:span><text:span text:style-name="T961">*name</text:span><text:span text:style-name="T879">);</text:span></text:p>
            <text:p text:style-name="P850"><text:span text:style-name="T960">struct</text:span><text:span text:style-name="T879"> </text:span><text:span text:style-name="T960">netent</text:span><text:span text:style-name="T879"> *</text:span><text:span text:style-name="T880">getnetbyaddr</text:span><text:span text:style-name="T879">(</text:span><text:span text:style-name="T960">uint32_t</text:span><text:span text:style-name="T879"> </text:span><text:span text:style-name="T961">net</text:span><text:span text:style-name="T879">, </text:span><text:span text:style-name="T960">int</text:span><text:span text:style-name="T879"> </text:span><text:span text:style-name="T961">type</text:span><text:span text:style-name="T879">);</text:span></text:p>
            <text:p text:style-name="P188"/>
            <text:p text:style-name="P850"><text:span text:style-name="T960">void</text:span><text:span text:style-name="T879"> </text:span><text:span text:style-name="T880">setnetent</text:span><text:span text:style-name="T879">(</text:span><text:span text:style-name="T960">int</text:span><text:span text:style-name="T879"> </text:span><text:span text:style-name="T961">stayopen</text:span><text:span text:style-name="T879">);</text:span></text:p>
            <text:p text:style-name="P186"><text:span text:style-name="T115">void</text:span> <text:span text:style-name="T126">endnetent</text:span>(<text:span text:style-name="T115">void</text:span>);</text:p>
            <text:p text:style-name="P534"/>
            <text:p text:style-name="P1098">Return: <text:span text:style-name="T1274">a pointer to a netent struct, NULL on error or EOF</text:span></text:p>
          </table:table-cell>
        </table:table-row>
      </table:table>
      <text:p text:style-name="P1097"/>
      <text:p text:style-name="P1099"><text:span text:style-name="T1275">While the </text:span><text:span text:style-name="T1276">-ent</text:span><text:span text:style-name="T1275"> functions are the analogous of the same functions we have seen for the hosts database, the </text:span><text:span text:style-name="T1276">getnetbyname</text:span><text:span text:style-name="T1275"> and </text:span><text:span text:style-name="T1276">getnetbyaddr</text:span><text:span text:style-name="T1275"> functions retrieve a specific entry based on the passed parameters. </text:span><text:span text:style-name="T1276">getnetbyname</text:span><text:span text:style-name="T1277"> return</text:span><text:span text:style-name="T1278">s</text:span><text:span text:style-name="T1277"> the entry that matches the network name </text:span><text:span text:style-name="T1276">name</text:span><text:span text:style-name="T1277">, </text:span><text:span text:style-name="T1276">getnetbyaddr</text:span><text:span text:style-name="T1277"> returns the entry that matches the network number </text:span><text:span text:style-name="T1276">net</text:span><text:span text:style-name="T1277"> of type </text:span><text:span text:style-name="T1276">type</text:span><text:span text:style-name="T1277">. </text:span></text:p>
      <text:p text:style-name="P1100"/>
      <text:p text:style-name="P1101"><text:span text:style-name="T1279">The </text:span><text:span text:style-name="T1276">netent</text:span><text:span text:style-name="T1279"> structure is defined in the </text:span><text:span text:style-name="T1276">netdb.h</text:span><text:span text:style-name="T1279"> header </text:span><text:span text:style-name="T1278">file </text:span><text:span text:style-name="T1279">as follows.</text:span></text:p>
      <text:p text:style-name="P1102"/>
      <table:table table:name="Table159" table:style-name="Table159">
        <table:table-column table:style-name="Table159.A"/>
        <table:table-row>
          <table:table-cell table:style-name="Table159.A1" office:value-type="string">
            <text:p text:style-name="P271"><text:span text:style-name="T115">struct</text:span> netent {</text:p>
            <text:p text:style-name="P186"><text:span text:style-name="T115"><text:s text:c="4"/>char</text:span> *n_name;<text:span text:style-name="T119"> <text:s text:c="8"/>/* official network name */</text:span></text:p>
            <text:p text:style-name="P186"><text:span text:style-name="T115"><text:s text:c="4"/>char</text:span> **n_aliases;<text:span text:style-name="T119"> <text:s text:c="4"/>/* alias list */</text:span></text:p>
            <text:p text:style-name="P186"><text:span text:style-name="T115"><text:s text:c="4"/>int</text:span> n_addrtype;<text:span text:style-name="T119"> <text:s text:c="6"/>/* net address type */</text:span></text:p>
            <text:p text:style-name="P186"><text:span text:style-name="T115"><text:s text:c="4"/>uint32_t</text:span> n_net;<text:span text:style-name="T119"> <text:s text:c="6"/>/* network number */</text:span></text:p>
            <text:p text:style-name="P186">}</text:p>
          </table:table-cell>
        </table:table-row>
      </table:table>
      <text:p text:style-name="P1102"/>
      <text:p text:style-name="P1101"><text:span text:style-name="T1280">The </text:span><text:span text:style-name="T1276">n_addrtype</text:span><text:span text:style-name="T1280"> field has always the value </text:span><text:span text:style-name="T1276">AF_INET</text:span><text:span text:style-name="T1280">. </text:span></text:p>
      <text:p text:style-name="P1103"/>
      <text:p text:style-name="P1104"/>
      <text:p text:style-name="P644"><text:soft-page-break/><text:span text:style-name="T1281">The </text:span><text:span text:style-name="T1276">getnetbyname.c</text:span><text:span text:style-name="T1281"> program </text:span><text:span text:style-name="T1282">retrieves a network entry from the system networks database based on the name provided as a command-line argument.</text:span></text:p>
      <text:p text:style-name="Horizontal_20_Line"/>
      <text:p text:style-name="P186"><text:span text:style-name="T1283">1 </text:span><text:span text:style-name="T115">#include </text:span><text:span text:style-name="T116">&lt;stdlib.h&gt;</text:span></text:p>
      <text:p text:style-name="P1105"><text:span text:style-name="T1283">2 </text:span><text:span text:style-name="T115">#include </text:span><text:span text:style-name="T116">&lt;stdio.h&gt;</text:span></text:p>
      <text:p text:style-name="P1105"><text:span text:style-name="T1283">3 </text:span><text:span text:style-name="T115">#include </text:span><text:span text:style-name="T116">&lt;netdb.h&gt;</text:span></text:p>
      <text:p text:style-name="P1105"><text:span text:style-name="T1283">4 </text:span><text:span text:style-name="T115">#include </text:span><text:span text:style-name="T116">&lt;arpa/inet.h&gt;</text:span></text:p>
      <text:p text:style-name="P188"/>
      <text:p text:style-name="P1105"><text:span text:style-name="T1283">5 </text:span><text:span text:style-name="T115">int</text:span> main(<text:span text:style-name="T115">int</text:span> argc, <text:span text:style-name="T115">char</text:span> *argv<text:span text:style-name="T115">[]</text:span>) {</text:p>
      <text:p text:style-name="P188"/>
      <text:p text:style-name="P1105"><text:span text:style-name="T1283">6 <text:tab/></text:span><text:span text:style-name="T115">if</text:span> (argc != <text:span text:style-name="T127">2</text:span>) {</text:p>
      <text:p text:style-name="P1105"><text:span text:style-name="T1283">7 <text:tab/><text:tab/></text:span>printf(<text:span text:style-name="T116">"\nUsage %s &lt;net_name&gt;"</text:span>, argv[<text:span text:style-name="T127">0</text:span>]);</text:p>
      <text:p text:style-name="P1105"><text:span text:style-name="T1283">8 <text:tab/><text:tab/></text:span>exit(<text:span text:style-name="T115">EXIT_FAILURE</text:span>);</text:p>
      <text:p text:style-name="P1105"><text:span text:style-name="T1283">9 <text:tab/></text:span>}</text:p>
      <text:p text:style-name="P188"/>
      <text:p text:style-name="P1106"><text:span text:style-name="T1284">10 <text:tab/></text:span><text:span text:style-name="T103">struct</text:span><text:span text:style-name="T104"> </text:span><text:span text:style-name="T103">netent</text:span><text:span text:style-name="T104"> *net = </text:span><text:span text:style-name="T105">getnetbyname</text:span><text:span text:style-name="T104">(argv[</text:span><text:span text:style-name="T128">1</text:span><text:span text:style-name="T104">]);</text:span></text:p>
      <text:p text:style-name="P1105"><text:span text:style-name="T1283">11 <text:tab/></text:span><text:span text:style-name="T115">if</text:span> (net == <text:span text:style-name="T115">NULL</text:span>) {</text:p>
      <text:p text:style-name="P1105"><text:span text:style-name="T1283">12 <text:tab/><text:tab/></text:span>printf(<text:span text:style-name="T116">"\nNetwork %s not found"</text:span>, argv[<text:span text:style-name="T127">1</text:span>]);</text:p>
      <text:p text:style-name="P1105"><text:span text:style-name="T1283">13 <text:tab/><text:tab/></text:span>exit(<text:span text:style-name="T115">EXIT_FAILURE</text:span>);</text:p>
      <text:p text:style-name="P1105"><text:span text:style-name="T1283">14 <text:tab/></text:span>} <text:span text:style-name="T115">else</text:span> {</text:p>
      <text:p text:style-name="P1105"><text:span text:style-name="T1283">15 <text:tab/><text:tab/></text:span>printf(<text:span text:style-name="T116">"\n Network %s found \n\n"</text:span>, net-&gt;n_name);</text:p>
      <text:p text:style-name="P1105"><text:span text:style-name="T1283">16 <text:tab/><text:tab/></text:span>printf(<text:span text:style-name="T116">" Official Name: %s\n"</text:span>, net-&gt;n_name);</text:p>
      <text:p text:style-name="P1107"><text:span text:style-name="T1284">17 <text:tab/><text:tab/></text:span><text:span text:style-name="T104">printf(</text:span><text:span text:style-name="T403">" Address : %s\n"</text:span><text:span text:style-name="T104">, inet_ntoa((</text:span><text:span text:style-name="T103">struct</text:span><text:span text:style-name="T104"> </text:span><text:span text:style-name="T103">in_addr</text:span><text:span text:style-name="T104">)</text:span></text:p>
      <text:p text:style-name="P1108"><text:tab/><text:tab/><text:tab/> <text:s/>{htonl(net-&gt;n_net)}));</text:p>
      <text:p text:style-name="P1105"><text:span text:style-name="T1283">18 <text:tab/><text:tab/></text:span><text:span text:style-name="T115">for</text:span> (<text:span text:style-name="T115">char</text:span> **alias = net-&gt;n_aliases; *alias != <text:span text:style-name="T115">NULL</text:span>; alias++) {</text:p>
      <text:p text:style-name="P1105"><text:span text:style-name="T1283">19 <text:tab/><text:tab/><text:tab/></text:span>printf(<text:span text:style-name="T116">" Alias : %s\n"</text:span>, *alias);</text:p>
      <text:p text:style-name="P1105"><text:span text:style-name="T1283">20<text:tab/> <text:tab/></text:span>}</text:p>
      <text:p text:style-name="P1109"><text:span text:style-name="T1285">21 <text:tab/></text:span><text:span text:style-name="T124">}</text:span></text:p>
      <text:p text:style-name="P1105"><text:span text:style-name="T1286">22</text:span><text:span text:style-name="T1283"> <text:tab/></text:span>exit(<text:span text:style-name="T115">EXIT_SUCCESS</text:span>);</text:p>
      <text:p text:style-name="P1109"><text:span text:style-name="T1287">23</text:span><text:span text:style-name="T1285"> </text:span><text:span text:style-name="T124">}</text:span></text:p>
      <text:p text:style-name="Horizontal_20_Line"><text:s/></text:p>
      <text:p text:style-name="P1110">getnetbyname.c</text:p>
      <text:p text:style-name="Standard"><text:span text:style-name="Strong_20_Emphasis"><text:span text:style-name="T220">Line 10.</text:span></text:span><text:span text:style-name="T220"> Calls </text:span><text:span text:style-name="Source_20_Text"><text:span text:style-name="T221">getnetbyname</text:span></text:span><text:span text:style-name="T220"> to search the network database for an entry matching the given <text:tab/> <text:s/>network name</text:span></text:p>
      <text:p text:style-name="Standard"><text:span text:style-name="Strong_20_Emphasis"><text:span text:style-name="T220">Line 11–14.</text:span></text:span><text:span text:style-name="T220"> Checks whether the lookup succeeded. If no matching network is found, the program <text:tab/> <text:s text:c="7"/>prints an error message and exits</text:span></text:p>
      <text:p text:style-name="Standard"><text:span text:style-name="Strong_20_Emphasis"><text:span text:style-name="T220">Line 15–16.</text:span></text:span><text:span text:style-name="T220"> Prints the official name of the network as stored in the database</text:span></text:p>
      <text:p text:style-name="Standard"><text:span text:style-name="Strong_20_Emphasis"><text:span text:style-name="T220">Line 17.</text:span></text:span><text:span text:style-name="T220"> Converts the network number into a human-readable IP-style format and prints it</text:span></text:p>
      <text:p text:style-name="Standard"><text:span text:style-name="Strong_20_Emphasis"><text:span text:style-name="T220">Line 18–20.</text:span></text:span><text:span text:style-name="T220"> Iterates through the list of aliases associated with the network and prints each one</text:span></text:p>
      <text:p text:style-name="P196"/>
      <text:p text:style-name="P1111"><text:span text:style-name="T1288">The line </text:span><text:span text:style-name="T1289">27 </text:span><text:span text:style-name="T1288">converts the </text:span><text:span text:style-name="T603">net→n_ne</text:span><text:span text:style-name="T1290">t</text:span><text:span text:style-name="T1288"> value from the host byte order to the network byte order with </text:span><text:span text:style-name="T1291">htonl</text:span><text:span text:style-name="T1291"><text:note text:id="ftn93" text:note-class="footnote"><text:note-citation>91</text:note-citation><text:note-body><text:p text:style-name="P250"><text:span text:style-name="T1292">See the </text:span><text:span text:style-name="T1293">byteorder(3)</text:span><text:span text:style-name="T1294"> manual page</text:span></text:p></text:note-body></text:note></text:span><text:span text:style-name="T1288">, the</text:span><text:span text:style-name="T1289">n it</text:span><text:span text:style-name="T1288"> converts the internet address (given in network byte order) to a string in IPv4 dotted-decimal notation </text:span><text:span text:style-name="T1292">with </text:span><text:span text:style-name="T603">inet_ntoa</text:span><text:span text:style-name="T1292"><text:note text:id="ftn94" text:note-class="footnote"><text:note-citation>92</text:note-citation><text:note-body><text:p text:style-name="P250"><text:span text:style-name="T1292">See the </text:span><text:span text:style-name="T1295">inet(3)</text:span><text:span text:style-name="T1294"> manual page</text:span></text:p></text:note-body></text:note></text:span><text:span text:style-name="T1288">. </text:span><text:span text:style-name="T1296">Before this last conversion the value is casted to a structure of type </text:span><text:span text:style-name="T603">in_addr</text:span><text:span text:style-name="T1296">. This structure represent</text:span><text:span text:style-name="T1289">s</text:span><text:span text:style-name="T1296"> an </text:span><text:span text:style-name="T1297">Internet Address</text:span><text:span text:style-name="T1296"> and is defined as follows in the </text:span><text:span text:style-name="T603">netinet/in.h</text:span><text:span text:style-name="T1296"> </text:span><text:span text:style-name="T1289">header file.</text:span></text:p>
      <text:p text:style-name="P1111"/>
      <text:p text:style-name="P1111"/>
      <table:table table:name="Table160" table:style-name="Table160">
        <table:table-column table:style-name="Table160.A"/>
        <text:soft-page-break/>
        <table:table-row>
          <table:table-cell table:style-name="Table160.A1" office:value-type="string">
            <text:p text:style-name="P851">/* Internet address. */</text:p>
            <text:p text:style-name="P186"><text:span text:style-name="T115">typedef</text:span> <text:span text:style-name="T115">uint32_t</text:span> <text:span text:style-name="T115">in_addr_t</text:span>;</text:p>
            <text:p text:style-name="P186"><text:span text:style-name="T115">struct</text:span> in_addr</text:p>
            <text:p text:style-name="P186">{</text:p>
            <text:p text:style-name="P186"><text:span text:style-name="T115"><text:s text:c="4"/>in_addr_t</text:span> s_addr;</text:p>
            <text:p text:style-name="P186">};</text:p>
          </table:table-cell>
        </table:table-row>
      </table:table>
      <text:p text:style-name="Standard"/>
      <text:p text:style-name="P1101"><text:span text:style-name="T1298">The </text:span><text:span text:style-name="T603">in_addr_t</text:span><text:span text:style-name="T1298"> type is a 32 bytes </text:span><text:span text:style-name="T603">unsigned</text:span><text:span text:style-name="T1298"> </text:span><text:span text:style-name="T603">integer</text:span><text:span text:style-name="T1298"> that store</text:span><text:span text:style-name="T1289">s</text:span><text:span text:style-name="T1298"> the value of the IP </text:span><text:span text:style-name="T1299">address. </text:span><text:span text:style-name="T1298"><text:s/></text:span></text:p>
      <text:p text:style-name="Standard"/>
      <text:p text:style-name="P1112">We execute the program </text:p>
      <text:p text:style-name="P1112"/>
      <table:table table:name="Table161" table:style-name="Table161">
        <table:table-column table:style-name="Table161.A"/>
        <table:table-row>
          <table:table-cell table:style-name="Table161.A1" office:value-type="string">
            <text:p text:style-name="P1113"><text:span text:style-name="T80">[</text:span><text:a xlink:type="simple" xlink:href="mailto:linux@users" text:style-name="Internet_20_link" text:visited-style-name="Visited_20_Internet_20_Link"><text:span text:style-name="T81">linux@users</text:span></text:a><text:span text:style-name="T80">] ./</text:span><text:span text:style-name="T1300">getnetbyname loopback</text:span></text:p>
            <text:p text:style-name="P1113"><text:s/>Network loopback found </text:p>
            <text:p text:style-name="P1113"/>
            <text:p text:style-name="P1113"><text:s text:c="2"/>Official Name: loopback</text:p>
            <text:p text:style-name="P1113"><text:s text:c="2"/>Address <text:s text:c="5"/>: <text:s/>127.0.0.0</text:p>
            <text:p text:style-name="P1113"/>
            <text:p text:style-name="P1114"><text:span text:style-name="T80">[</text:span><text:a xlink:type="simple" xlink:href="mailto:linux@users" text:style-name="Internet_20_link" text:visited-style-name="Visited_20_Internet_20_Link"><text:span text:style-name="T81">linux@users</text:span></text:a><text:span text:style-name="T80">] ./</text:span><text:span text:style-name="T1300">getnetbyname l</text:span><text:span text:style-name="T1301">ink-local</text:span></text:p>
            <text:p text:style-name="P1114"><text:s/>Network link-local found </text:p>
            <text:p text:style-name="P1114"/>
            <text:p text:style-name="P1114"><text:s text:c="2"/>Official Name: link-local</text:p>
            <text:p text:style-name="P1114"><text:s text:c="2"/>Address <text:s text:c="5"/>: <text:s/>169.254.0.0</text:p>
          </table:table-cell>
        </table:table-row>
      </table:table>
      <text:p text:style-name="P1115"/>
      <text:p text:style-name="P1101"><text:span text:style-name="T1302">The output shows the result of querying the networks database using the network names provided as input. For each network, the program prints the official name and its corresponding network address in human-readable form. For example, the </text:span><text:span text:style-name="Emphasis"><text:span text:style-name="T1302">loopback</text:span></text:span><text:span text:style-name="T1302"> network corresponds to </text:span><text:span text:style-name="Source_20_Text"><text:span text:style-name="T603">127.0.0.0</text:span></text:span><text:span text:style-name="T1302">, while the </text:span><text:span text:style-name="Emphasis"><text:span text:style-name="T1302">link-local</text:span></text:span><text:span text:style-name="T1302"> network corresponds to </text:span><text:span text:style-name="Source_20_Text"><text:span text:style-name="T603">169.254.0.0</text:span></text:span><text:span text:style-name="T1302">.</text:span></text:p>
      <text:p text:style-name="P1116"/>
      <text:p text:style-name="P1116">To perform a lookup based on the network address instead of the network name, we can replace</text:p>
      <text:p text:style-name="P1115"/>
      <text:p text:style-name="P1117"><text:span text:style-name="T1284">10</text:span><text:span text:style-name="T1303"> <text:tab/></text:span><text:span text:style-name="T103">struct</text:span><text:span text:style-name="T104"> </text:span><text:span text:style-name="T103">netent</text:span><text:span text:style-name="T104"> *net = </text:span><text:span text:style-name="T105">getnetbyname</text:span><text:span text:style-name="T104">(argv[</text:span><text:span text:style-name="T128">1</text:span><text:span text:style-name="T104">]);</text:span></text:p>
      <text:p text:style-name="P1118"/>
      <text:p text:style-name="P1119">with the following</text:p>
      <text:p text:style-name="P1119"/>
      <text:p text:style-name="P1117"><text:span text:style-name="T1304">struct</text:span><text:span text:style-name="T1305"> </text:span><text:span text:style-name="T103">in_addr</text:span><text:span text:style-name="T1305"> addr;</text:span></text:p>
      <text:p text:style-name="P186"><text:span text:style-name="T115">if</text:span> (!inet_aton(argv[<text:span text:style-name="T127">1</text:span>], &amp;addr)) {</text:p>
      <text:p text:style-name="P186"><text:tab/>fprintf(<text:span text:style-name="T115">stderr</text:span>, <text:span text:style-name="T116">"Invalid IP address: %s\n"</text:span>, argv[<text:span text:style-name="T127">1</text:span>]);</text:p>
      <text:p text:style-name="P186"><text:span text:style-name="T115"><text:tab/>return</text:span> <text:span text:style-name="T127">1</text:span>;</text:p>
      <text:p text:style-name="P186">}</text:p>
      <text:p text:style-name="P188"/>
      <text:p text:style-name="P186"><text:span text:style-name="T115">uint32_t</text:span> net_num = ntohl(addr.s_addr);</text:p>
      <text:p text:style-name="P1117"><text:span text:style-name="T103">struct</text:span><text:span text:style-name="T104"> </text:span><text:span text:style-name="T103">netent</text:span><text:span text:style-name="T104"> *net = getnetbyaddr(net_num, </text:span><text:span text:style-name="T103">AF_INET</text:span><text:span text:style-name="T104">);</text:span></text:p>
      <text:p text:style-name="P1119"/>
      <text:p text:style-name="P644"><text:span text:style-name="T1306">The </text:span><text:span text:style-name="T603">inet_aton</text:span><text:span text:style-name="T603"><text:note text:id="ftn95" text:note-class="footnote"><text:note-citation>93</text:note-citation><text:note-body><text:p text:style-name="P1059"><text:span text:style-name="T1307">See the </text:span><text:span text:style-name="T1308">inet(3)</text:span><text:span text:style-name="T1309"> manual page</text:span></text:p></text:note-body></text:note></text:span><text:span text:style-name="T1310"> </text:span><text:span text:style-name="T1306">function </text:span><text:span text:style-name="T1310">converts the </text:span><text:span text:style-name="T1306">passed </text:span><text:span text:style-name="T1310">Internet host address from the IPv4 numbers-and-dots notation into binary form (in network byte order) and stores it in the structure </text:span><text:span text:style-name="T1306">passed as second argument. </text:span></text:p>
      <text:p text:style-name="P1120"/>
      <text:p text:style-name="P1120"/>
      <text:p text:style-name="P1120"/>
      <text:p text:style-name="P1121"><text:soft-page-break/><text:span text:style-name="T1311">III.9.3 </text:span><text:span text:style-name="T1312">T</text:span><text:span text:style-name="T1313">he </text:span><text:span text:style-name="T1314">protocol</text:span><text:span text:style-name="T1315"> database: </text:span><text:span text:style-name="T1316">/</text:span><text:span text:style-name="T1317">etc/</text:span><text:span text:style-name="T1318">protocols</text:span></text:p>
      <text:p text:style-name="P1120"/>
      <text:p text:style-name="P1122"><text:span text:style-name="T1319">The file </text:span><text:span text:style-name="Source_20_Text"><text:span text:style-name="T1269">/etc/protocols</text:span></text:span><text:span text:style-name="T1319"> is the system’s protocols database</text:span><text:span text:style-name="T1319"><text:note text:id="ftn96" text:note-class="footnote"><text:note-citation>94</text:note-citation><text:note-body><text:p text:style-name="P1059"><text:span text:style-name="T1229">See the </text:span><text:span text:style-name="T1320">protocols(5)</text:span><text:span text:style-name="T1231"> manual page</text:span></text:p></text:note-body></text:note></text:span><text:span text:style-name="T1319">. It contains a list of the various DARPA Internet protocols supported by the TCP/IP subsystem, mapping protocol names to their corresponding numerical identifiers.</text:span></text:p>
      <text:p text:style-name="P1123"><text:span text:style-name="T1319">This file allows applications and system libraries to translate between human-readable protocol names (such as </text:span><text:span text:style-name="Source_20_Text"><text:span text:style-name="T1319">tcp</text:span></text:span><text:span text:style-name="T1319">, </text:span><text:span text:style-name="Source_20_Text"><text:span text:style-name="T1319">udp</text:span></text:span><text:span text:style-name="T1319">, or </text:span><text:span text:style-name="Source_20_Text"><text:span text:style-name="T1319">icmp</text:span></text:span><text:span text:style-name="T1319">) and their numeric protocol values used internally by the network stack.</text:span></text:p>
      <text:p text:style-name="P1124">Each line is of the following format:</text:p>
      <text:p text:style-name="P1124"/>
      <text:p text:style-name="P1123"><text:span text:style-name="T1319"><text:s text:c="14"/></text:span><text:span text:style-name="T1269">protocol number aliases ...</text:span></text:p>
      <text:p text:style-name="P1125"/>
      <text:p text:style-name="P1122"><text:span text:style-name="T1321">The </text:span><text:span text:style-name="T1269">protocol</text:span><text:span text:style-name="T1321"> field is the native name of the protocol, </text:span><text:span text:style-name="T1322">while</text:span><text:span text:style-name="T1321"> </text:span><text:span text:style-name="T1269">num</text:span><text:span text:style-name="T1323">b</text:span><text:span text:style-name="T1269">er</text:span><text:span text:style-name="T1321"> is the official number of the protocol and </text:span><text:span text:style-name="T1269">aliases</text:span><text:span text:style-name="T1321"> defines the optional aliases the protocol can have. </text:span></text:p>
      <text:p text:style-name="P1126">The file has a fixed content and any changes to it would result in incorrect IP packages. The protocol numbers and names are specified by the IANA (Internet Assigned Numbers Authority).</text:p>
      <text:p text:style-name="P1126"/>
      <text:p text:style-name="P1127">The first 4 lines of the file are <text:span text:style-name="T1324">as follows:</text:span></text:p>
      <text:p text:style-name="P1127"/>
      <text:p text:style-name="P1128">ip<text:tab/><text:tab/>0<text:tab/>IP<text:tab/># internet protocol, pseudo protocol number</text:p>
      <text:p text:style-name="P1128">hopopt<text:tab/>0<text:tab/>HOPOPT<text:tab/># IPv6 Hop-by-Hop Option [RFC1883]</text:p>
      <text:p text:style-name="P1128">icmp<text:tab/>1<text:tab/>ICMP<text:tab/><text:tab/># internet control message protocol</text:p>
      <text:p text:style-name="P1128">igmp<text:tab/>2<text:tab/>IGMP<text:tab/><text:tab/># Internet Group Management</text:p>
      <text:p text:style-name="P1127"/>
      <text:p text:style-name="P1129">To work with the protocol database the following functions<text:note text:id="ftn97" text:note-class="footnote"><text:note-citation>95</text:note-citation><text:note-body><text:p text:style-name="P1059"><text:span text:style-name="T1229">See the </text:span><text:span text:style-name="T1325">getprotoent(3)</text:span><text:span text:style-name="T1231"> manual page</text:span></text:p></text:note-body></text:note> <text:span text:style-name="T1324">are available.</text:span></text:p>
      <text:p text:style-name="P1127"/>
      <table:table table:name="Table162" table:style-name="Table162">
        <table:table-column table:style-name="Table162.A"/>
        <table:table-row>
          <table:table-cell table:style-name="Table162.A1" office:value-type="string">
            <text:p text:style-name="P271"><text:span text:style-name="T115">#include </text:span><text:span text:style-name="T116">&lt;netdb.h&gt;</text:span></text:p>
            <text:p text:style-name="P188"/>
            <text:p text:style-name="P229"><text:span text:style-name="T103">struct</text:span><text:span text:style-name="T104"> </text:span><text:span text:style-name="T103">protoent</text:span><text:span text:style-name="T104"> *</text:span><text:span text:style-name="T105">getprotoent</text:span><text:span text:style-name="T104">(</text:span><text:span text:style-name="T103">void</text:span><text:span text:style-name="T104">);</text:span></text:p>
            <text:p text:style-name="P188"/>
            <text:p text:style-name="P229"><text:span text:style-name="T103">struct</text:span><text:span text:style-name="T104"> </text:span><text:span text:style-name="T103">protoent</text:span><text:span text:style-name="T104"> *</text:span><text:span text:style-name="T105">getprotobyname</text:span><text:span text:style-name="T104">(</text:span><text:span text:style-name="T103">const</text:span><text:span text:style-name="T104"> </text:span><text:span text:style-name="T103">char</text:span><text:span text:style-name="T104"> </text:span><text:span text:style-name="T106">*name</text:span><text:span text:style-name="T104">);</text:span></text:p>
            <text:p text:style-name="P229"><text:span text:style-name="T103">struct</text:span><text:span text:style-name="T104"> </text:span><text:span text:style-name="T103">protoent</text:span><text:span text:style-name="T104"> *</text:span><text:span text:style-name="T105">getprotobynumber</text:span><text:span text:style-name="T104">(</text:span><text:span text:style-name="T103">int</text:span><text:span text:style-name="T104"> </text:span><text:span text:style-name="T106">proto</text:span><text:span text:style-name="T104">);</text:span></text:p>
            <text:p text:style-name="P188"/>
            <text:p text:style-name="P229"><text:span text:style-name="T103">void</text:span><text:span text:style-name="T104"> </text:span><text:span text:style-name="T105">setprotoent</text:span><text:span text:style-name="T104">(</text:span><text:span text:style-name="T103">int</text:span><text:span text:style-name="T104"> </text:span><text:span text:style-name="T106">stayopen</text:span><text:span text:style-name="T104">);</text:span></text:p>
            <text:p text:style-name="P228"><text:span text:style-name="T101">void</text:span><text:span text:style-name="T124"> </text:span><text:span text:style-name="T216">endprotoent</text:span><text:span text:style-name="T124">(</text:span><text:span text:style-name="T101">void</text:span><text:span text:style-name="T124">);</text:span></text:p>
            <text:p text:style-name="P186"/>
            <text:p text:style-name="P1130"><text:s text:c="11"/>Return: <text:span text:style-name="T1326">a pointer to a protoent struct, NULL on error or EOF</text:span></text:p>
          </table:table-cell>
        </table:table-row>
      </table:table>
      <text:p text:style-name="P1127"/>
      <text:p text:style-name="P1131"><text:span text:style-name="T1327">The </text:span><text:span text:style-name="T1328">protoent</text:span><text:span text:style-name="T1327"> structure is defined as follows. <text:s/></text:span></text:p>
      <text:p text:style-name="P1132"/>
      <table:table table:name="Table163" table:style-name="Table163">
        <table:table-column table:style-name="Table163.A"/>
        <table:table-row>
          <table:table-cell table:style-name="Table163.A1" office:value-type="string">
            <text:p text:style-name="P271"><text:span text:style-name="T115">struct</text:span> protoent {</text:p>
            <text:p text:style-name="P186"><text:span text:style-name="T115"><text:s text:c="4"/>char</text:span> *p_name;<text:span text:style-name="T119"> <text:s text:c="9"/>/* official protocol name */</text:span></text:p>
            <text:p text:style-name="P186"><text:span text:style-name="T115"><text:s text:c="4"/>char</text:span> **p_aliases;<text:span text:style-name="T119"> <text:s text:c="5"/>/* alias list */</text:span></text:p>
            <text:p text:style-name="P186"><text:span text:style-name="T115"><text:s text:c="4"/>int</text:span> p_proto;<text:span text:style-name="T119"> <text:s text:c="14"/>/* protocol number */</text:span></text:p>
            <text:p text:style-name="P186">}</text:p>
          </table:table-cell>
        </table:table-row>
      </table:table>
      <text:p text:style-name="P1132"/>
      <text:p text:style-name="P1133"/>
      <text:p text:style-name="P1133"/>
      <text:p text:style-name="P1134"><text:soft-page-break/><text:span text:style-name="T1329">The </text:span><text:span text:style-name="T1328">getprotonum.c</text:span><text:span text:style-name="T1329"> program </text:span><text:span text:style-name="T1330">retrieves information about a network protocol from the system protocols database based on the numeric protocol identifier provided as input.</text:span></text:p>
      <text:p text:style-name="Horizontal_20_Line"/>
      <text:p text:style-name="P186"><text:span text:style-name="T1331">1 </text:span><text:span text:style-name="T115">#include </text:span><text:span text:style-name="T116">&lt;stdio.h&gt;</text:span></text:p>
      <text:p text:style-name="P1135"><text:span text:style-name="T1332">2</text:span><text:span text:style-name="T1331"> </text:span><text:span text:style-name="T115">#include </text:span><text:span text:style-name="T116">&lt;stdlib.h&gt;</text:span></text:p>
      <text:p text:style-name="P1135"><text:span text:style-name="T1332">3</text:span><text:span text:style-name="T1331"> </text:span><text:span text:style-name="T115">#include </text:span><text:span text:style-name="T116">&lt;netdb.h&gt;</text:span></text:p>
      <text:p text:style-name="P188"/>
      <text:p text:style-name="P1135"><text:span text:style-name="T1332">4</text:span><text:span text:style-name="T1331"> </text:span><text:span text:style-name="T115">int</text:span> main(<text:span text:style-name="T115">int</text:span> argc, <text:span text:style-name="T115">char</text:span> *argv<text:span text:style-name="T115">[]</text:span>) {</text:p>
      <text:p text:style-name="P1135"><text:span text:style-name="T1332">5</text:span><text:span text:style-name="T1331"> <text:tab/></text:span><text:span text:style-name="T115">if</text:span> (argc != <text:span text:style-name="T127">2</text:span>) {</text:p>
      <text:p text:style-name="P1135"><text:span text:style-name="T1332">6</text:span><text:span text:style-name="T1331"> <text:tab/><text:tab/></text:span>fprintf(<text:span text:style-name="T115">stderr</text:span>, <text:span text:style-name="T116">"Usage: %s &lt;protocol_number&gt;\n"</text:span>, argv[<text:span text:style-name="T127">0</text:span>]);</text:p>
      <text:p text:style-name="P1135"><text:span text:style-name="T1332">7</text:span><text:span text:style-name="T1331"> <text:tab/><text:tab/></text:span>exit(<text:span text:style-name="T115">EXIT_FAILURE</text:span>);</text:p>
      <text:p text:style-name="P1135"><text:span text:style-name="T1332">8</text:span><text:span text:style-name="T1331"> <text:tab/></text:span>}</text:p>
      <text:p text:style-name="P188"/>
      <text:p text:style-name="P1136"><text:span text:style-name="T1333">9</text:span><text:span text:style-name="T1334"> <text:tab/></text:span><text:span text:style-name="T101">int</text:span><text:span text:style-name="T124"> proto_num = atoi(argv[</text:span><text:span text:style-name="T335">1</text:span><text:span text:style-name="T124">]);</text:span></text:p>
      <text:p text:style-name="P1137"><text:span text:style-name="T1335">1</text:span><text:span text:style-name="T1336">0</text:span><text:span text:style-name="T1335"> <text:tab/></text:span><text:span text:style-name="T103">struct</text:span><text:span text:style-name="T104"> </text:span><text:span text:style-name="T103">protoent</text:span><text:span text:style-name="T104"> *proto = </text:span><text:span text:style-name="T105">getprotobynumber</text:span><text:span text:style-name="T104">(proto_num);</text:span></text:p>
      <text:p text:style-name="P1135"><text:span text:style-name="T1331">1</text:span><text:span text:style-name="T1332">1</text:span><text:span text:style-name="T1331"> <text:tab/></text:span><text:span text:style-name="T115">if</text:span> (proto == <text:span text:style-name="T115">NULL</text:span>) {</text:p>
      <text:p text:style-name="P1135"><text:span text:style-name="T1331">1</text:span><text:span text:style-name="T1332">2</text:span><text:span text:style-name="T1331"> <text:tab/><text:tab/></text:span>printf(<text:span text:style-name="T116">" Protocol number %d not found.\n"</text:span>, proto_num);</text:p>
      <text:p text:style-name="P1135"><text:span text:style-name="T1331">1</text:span><text:span text:style-name="T1332">3</text:span><text:span text:style-name="T1331"> <text:tab/><text:tab/></text:span>exit(<text:span text:style-name="T115">EXIT_FAILURE</text:span>);</text:p>
      <text:p text:style-name="P1136"><text:span text:style-name="T1334">1</text:span><text:span text:style-name="T1333">4</text:span><text:span text:style-name="T1334"> <text:tab/></text:span><text:span text:style-name="T124">}</text:span></text:p>
      <text:p text:style-name="P1135"><text:span text:style-name="T1331">1</text:span><text:span text:style-name="T1332">5</text:span><text:span text:style-name="T1331"> <text:tab/></text:span>printf(<text:span text:style-name="T116">" Protocol number %d:\n"</text:span>, proto_num);</text:p>
      <text:p text:style-name="P1135"><text:span text:style-name="T1331">1</text:span><text:span text:style-name="T1332">6</text:span><text:span text:style-name="T1331"> <text:tab/></text:span>printf(<text:span text:style-name="T116">" Name : %s\n"</text:span>, proto-&gt;p_name);</text:p>
      <text:p text:style-name="P1135"><text:span text:style-name="T1331">1</text:span><text:span text:style-name="T1332">7</text:span><text:span text:style-name="T1331"> <text:tab/></text:span><text:span text:style-name="T115">for</text:span> (<text:span text:style-name="T115">char</text:span> **alias = proto-&gt;p_aliases; *alias != <text:span text:style-name="T115">NULL</text:span>; alias++) {</text:p>
      <text:p text:style-name="P1135"><text:span text:style-name="T1331">1</text:span><text:span text:style-name="T1332">8</text:span><text:span text:style-name="T1331"> <text:tab/><text:tab/></text:span>printf(<text:span text:style-name="T116">" Alias : %s\n"</text:span>, *alias);</text:p>
      <text:p text:style-name="P1136"><text:span text:style-name="T1334">1</text:span><text:span text:style-name="T1333">9</text:span><text:span text:style-name="T1334"> <text:tab/></text:span><text:span text:style-name="T124">}</text:span></text:p>
      <text:p text:style-name="P1135"><text:span text:style-name="T1332">20<text:tab/></text:span><text:span text:style-name="T1331"> </text:span>exit(<text:span text:style-name="T115">EXIT_SUCCESS</text:span>);</text:p>
      <text:p text:style-name="P1136"><text:span text:style-name="T1333">2</text:span><text:span text:style-name="T1334">1 </text:span><text:span text:style-name="T124">}</text:span></text:p>
      <text:p text:style-name="Horizontal_20_Line"/>
      <text:p text:style-name="P1138">getprotonum.c</text:p>
      <text:p text:style-name="P1138"/>
      <text:p text:style-name="Standard"><text:span text:style-name="Strong_20_Emphasis"><text:span text:style-name="T220">Line 9.</text:span></text:span><text:span text:style-name="T220"> Converts the command-line argument from a string to an integer representing the protocol <text:tab/>number</text:span></text:p>
      <text:p text:style-name="Standard"><text:span text:style-name="Strong_20_Emphasis"><text:span text:style-name="T220">Line 10.</text:span></text:span><text:span text:style-name="T220"> Calls </text:span><text:span text:style-name="Source_20_Text"><text:span text:style-name="T221">getprotobynumber</text:span></text:span><text:span text:style-name="T220"> to search the protocols database (</text:span><text:span text:style-name="Source_20_Text"><text:span text:style-name="T221">/etc/protocols</text:span></text:span><text:span text:style-name="T220">) for <text:tab/> <text:s/>a matching protocol entry</text:span></text:p>
      <text:p text:style-name="P307"/>
      <text:p text:style-name="P1139">We execute the program </text:p>
      <text:p text:style-name="P1139"/>
      <table:table table:name="Table164" table:style-name="Table164">
        <table:table-column table:style-name="Table164.A"/>
        <table:table-row>
          <table:table-cell table:style-name="Table164.A1" office:value-type="string">
            <text:p text:style-name="P1140"><text:span text:style-name="T80">[</text:span><text:a xlink:type="simple" xlink:href="mailto:linux@users" text:style-name="Internet_20_link" text:visited-style-name="Visited_20_Internet_20_Link"><text:span text:style-name="T81">linux@users</text:span></text:a><text:span text:style-name="T80">] ./</text:span><text:span text:style-name="T1300">get</text:span><text:span text:style-name="T1337">protonum 0</text:span></text:p>
            <text:p text:style-name="P1140"><text:s/>Protocol number 0:</text:p>
            <text:p text:style-name="P1140"><text:s text:c="2"/>Name <text:s/>: ip</text:p>
            <text:p text:style-name="P1140"><text:s text:c="2"/>Alias : IP</text:p>
            <text:p text:style-name="P1140"/>
            <text:p text:style-name="P1141"><text:span text:style-name="T80">[</text:span><text:a xlink:type="simple" xlink:href="mailto:linux@users" text:style-name="Internet_20_link" text:visited-style-name="Visited_20_Internet_20_Link"><text:span text:style-name="T81">linux@users</text:span></text:a><text:span text:style-name="T80">] ./</text:span><text:span text:style-name="T1300">get</text:span><text:span text:style-name="T1337">protonum </text:span><text:span text:style-name="T1338">1</text:span></text:p>
            <text:p text:style-name="P1141"><text:s/>Protocol number 1:</text:p>
            <text:p text:style-name="P1141"><text:s text:c="2"/>Name <text:s/>: icmp</text:p>
            <text:p text:style-name="P1141"><text:s text:c="2"/>Alias : ICMP</text:p>
          </table:table-cell>
        </table:table-row>
      </table:table>
      <text:p text:style-name="P1139"/>
      <text:p text:style-name="P1142"><text:span text:style-name="T1339">The output shows the protocol information retrieved from the system protocols database (</text:span><text:span text:style-name="Source_20_Text"><text:span text:style-name="T1340">/etc/protocols</text:span></text:span><text:span text:style-name="T1339">). Each protocol number is mapped to its corresponding name and optional aliases. For example, protocol </text:span><text:span text:style-name="Source_20_Text"><text:span text:style-name="T1340">0</text:span></text:span><text:span text:style-name="T1339"> corresponds to </text:span><text:span text:style-name="Source_20_Text"><text:span text:style-name="T1340">ip</text:span></text:span><text:span text:style-name="T1339">, while protocol </text:span><text:span text:style-name="Source_20_Text"><text:span text:style-name="T1340">1</text:span></text:span><text:span text:style-name="Source_20_Text"><text:span text:style-name="T1341"> </text:span></text:span><text:span text:style-name="T1339">corresponds to </text:span><text:span text:style-name="Source_20_Text"><text:span text:style-name="T1340">icmp</text:span></text:span><text:span text:style-name="T1339">.</text:span></text:p>
      <text:p text:style-name="P1139"/>
      <text:p text:style-name="P1057"><text:soft-page-break/><text:span text:style-name="T1342">III.9.4 </text:span><text:span text:style-name="T1227">The </text:span><text:span text:style-name="T1343">service</text:span><text:span text:style-name="T1266"> database: </text:span><text:span text:style-name="T75">/</text:span><text:span text:style-name="T1228">etc/</text:span><text:span text:style-name="T1344">services</text:span></text:p>
      <text:p text:style-name="P1139"/>
      <text:p text:style-name="P644"><text:span text:style-name="T1345">The </text:span><text:span text:style-name="T1328">/etc/services</text:span><text:span text:style-name="T1345"> file is the service database</text:span><text:span text:style-name="T1345"><text:note text:id="ftn98" text:note-class="footnote"><text:note-citation>96</text:note-citation><text:note-body><text:p text:style-name="P1059"><text:span text:style-name="T1346">See the </text:span><text:span text:style-name="T1347">services(5)</text:span><text:span text:style-name="T1348"> manual page</text:span></text:p></text:note-body></text:note></text:span><text:span text:style-name="T1345">. </text:span><text:span text:style-name="T1349">It provides the mapping between internet services and their assigned port numbers and protocol types. Port numbers are assigned by the IANA, and the current policy is to assign both TCP and UDP protocols when assigning a port number. </text:span><text:span text:style-name="T1350">The p</text:span><text:span text:style-name="T1349">ort numbers below 1024 (so-called "low numbered" ports) can be bound to only by </text:span><text:span text:style-name="T1351">the </text:span><text:span text:style-name="T1328">root</text:span><text:span text:style-name="T1349"> </text:span><text:span text:style-name="T1351">user</text:span><text:span text:style-name="T1349">. </text:span><text:span text:style-name="T1352">In the file header </text:span><text:span text:style-name="T1328">netdb.h</text:span><text:span text:style-name="T1352"> is defined the </text:span><text:span text:style-name="T1328">_PATH_SERVICES</text:span><text:span text:style-name="T1352"> constant that specifies the path of the services file. </text:span></text:p>
      <text:p text:style-name="P1143">Each line of the file has the following format:</text:p>
      <text:p text:style-name="P1144"/>
      <text:p text:style-name="P1145"><text:tab/>service-name <text:s text:c="2"/>port/protocol <text:s text:c="2"/>[aliases ...] </text:p>
      <text:p text:style-name="P1139"/>
      <text:p text:style-name="P1146">A sample service file look as follows:</text:p>
      <text:p text:style-name="P1146"/>
      <text:p text:style-name="P1145">netstat <text:s text:c="8"/>15/tcp</text:p>
      <text:p text:style-name="P1145">qotd <text:s text:c="11"/>17/tcp <text:s text:c="7"/>quote</text:p>
      <text:p text:style-name="P1145">msp <text:s text:c="12"/>18/tcp <text:s text:c="7"/># message send protocol</text:p>
      <text:p text:style-name="P1145">msp <text:s text:c="12"/>18/udp <text:s text:c="7"/># message send protocol</text:p>
      <text:p text:style-name="P1145">chargen <text:s text:c="8"/>19/tcp <text:s text:c="7"/>ttytst source</text:p>
      <text:p text:style-name="P1145">chargen <text:s text:c="8"/>19/udp <text:s text:c="7"/>ttytst source</text:p>
      <text:p text:style-name="P1145">ftp <text:s text:c="12"/>21/tcp</text:p>
      <text:p text:style-name="P1145"># 22 - unassigned</text:p>
      <text:p text:style-name="P1145">telnet <text:s text:c="9"/>23/tcp</text:p>
      <text:p text:style-name="P1145"/>
      <text:p text:style-name="P1147">To work with the service database <text:span text:style-name="T1353">the following functions</text:span><text:note text:id="ftn99" text:note-class="footnote"><text:note-citation>97</text:note-citation><text:note-body><text:p text:style-name="P1059"><text:span text:style-name="T1354">See the </text:span><text:span text:style-name="T1355">getservent(3)</text:span><text:span text:style-name="T1348"> manual page</text:span></text:p></text:note-body></text:note><text:span text:style-name="T1353"> </text:span>are available. </text:p>
      <text:p text:style-name="P1148"/>
      <table:table table:name="Table165" table:style-name="Table165">
        <table:table-column table:style-name="Table165.A"/>
        <table:table-row>
          <table:table-cell table:style-name="Table165.A1" office:value-type="string">
            <text:p text:style-name="P271"><text:span text:style-name="T115">#include </text:span><text:span text:style-name="T116">&lt;netdb.h&gt;</text:span></text:p>
            <text:p text:style-name="P188"/>
            <text:p text:style-name="P229"><text:span text:style-name="T103">struct</text:span><text:span text:style-name="T104"> </text:span><text:span text:style-name="T103">servent</text:span><text:span text:style-name="T104"> *</text:span><text:span text:style-name="T105">getservent</text:span><text:span text:style-name="T104">(</text:span><text:span text:style-name="T103">void</text:span><text:span text:style-name="T104">);</text:span></text:p>
            <text:p text:style-name="P188"/>
            <text:p text:style-name="P229"><text:span text:style-name="T103">struct</text:span><text:span text:style-name="T104"> </text:span><text:span text:style-name="T103">servent</text:span><text:span text:style-name="T104"> *</text:span><text:span text:style-name="T105">getservbyname</text:span><text:span text:style-name="T104">(</text:span><text:span text:style-name="T103">const</text:span><text:span text:style-name="T104"> </text:span><text:span text:style-name="T103">char</text:span><text:span text:style-name="T104"> </text:span><text:span text:style-name="T106">*name</text:span><text:span text:style-name="T104">, </text:span><text:span text:style-name="T103">const</text:span><text:span text:style-name="T104"> </text:span><text:span text:style-name="T103">char</text:span><text:span text:style-name="T104"> </text:span><text:span text:style-name="T106">*proto</text:span><text:span text:style-name="T104">);</text:span></text:p>
            <text:p text:style-name="P229"><text:span text:style-name="T103">struct</text:span><text:span text:style-name="T104"> </text:span><text:span text:style-name="T103">servent</text:span><text:span text:style-name="T104"> *</text:span><text:span text:style-name="T105">getservbyport</text:span><text:span text:style-name="T104">(</text:span><text:span text:style-name="T103">int</text:span><text:span text:style-name="T104"> </text:span><text:span text:style-name="T106">port</text:span><text:span text:style-name="T104">, </text:span><text:span text:style-name="T103">const</text:span><text:span text:style-name="T104"> </text:span><text:span text:style-name="T103">char</text:span><text:span text:style-name="T104"> </text:span><text:span text:style-name="T106">*proto</text:span><text:span text:style-name="T104">);</text:span></text:p>
            <text:p text:style-name="P188"/>
            <text:p text:style-name="P229"><text:span text:style-name="T103">void</text:span><text:span text:style-name="T104"> </text:span><text:span text:style-name="T105">setservent</text:span><text:span text:style-name="T104">(</text:span><text:span text:style-name="T103">int</text:span><text:span text:style-name="T104"> </text:span><text:span text:style-name="T106">stayopen</text:span><text:span text:style-name="T104">);</text:span></text:p>
            <text:p text:style-name="P228"><text:span text:style-name="T101">void</text:span><text:span text:style-name="T124"> </text:span><text:span text:style-name="T216">endservent</text:span><text:span text:style-name="T124">(</text:span><text:span text:style-name="T101">void</text:span><text:span text:style-name="T124">);</text:span></text:p>
          </table:table-cell>
        </table:table-row>
      </table:table>
      <text:p text:style-name="P1148"/>
      <text:p text:style-name="P1149"><text:span text:style-name="T1356">The </text:span><text:span text:style-name="T1328">servent</text:span><text:span text:style-name="T1356"> structure is defined as follows.</text:span></text:p>
      <text:p text:style-name="P1150"/>
      <table:table table:name="Table166" table:style-name="Table166">
        <table:table-column table:style-name="Table166.A"/>
        <table:table-row>
          <table:table-cell table:style-name="Table166.A1" office:value-type="string">
            <text:p text:style-name="P228"><text:span text:style-name="T101">struct</text:span><text:span text:style-name="T124"> servent {</text:span></text:p>
            <text:p text:style-name="P186"><text:span text:style-name="T115"><text:s text:c="4"/>char</text:span> *s_name;<text:span text:style-name="T119"> <text:s text:c="6"/>/* official service name */</text:span></text:p>
            <text:p text:style-name="P186"><text:span text:style-name="T115"><text:s text:c="4"/>char</text:span> **s_aliases;<text:span text:style-name="T119"> <text:s text:c="2"/>/* alias list */</text:span></text:p>
            <text:p text:style-name="P186"><text:span text:style-name="T115"><text:s text:c="4"/>int</text:span> s_port;<text:span text:style-name="T119"> <text:s text:c="8"/>/* port number */ <text:s/></text:span></text:p>
            <text:p text:style-name="P186"><text:span text:style-name="T115"><text:s text:c="4"/>char</text:span> *s_proto;<text:span text:style-name="T119"> <text:s text:c="5"/>/* protocol to use */</text:span></text:p>
            <text:p text:style-name="P186">}</text:p>
          </table:table-cell>
        </table:table-row>
      </table:table>
      <text:p text:style-name="P1150"/>
      <text:p text:style-name="P1151"/>
      <text:p text:style-name="P1151"/>
      <text:p text:style-name="P1151"/>
      <text:p text:style-name="P1152"><text:soft-page-break/><text:span text:style-name="T1357">The </text:span><text:span text:style-name="T1328">getservice.c</text:span><text:span text:style-name="T1357"> </text:span><text:span text:style-name="T1358">program </text:span><text:span text:style-name="T1359">r</text:span>etrieves information about a network service from the system services database based on the service name and transport protocol provided by the user.</text:p>
      <text:p text:style-name="Horizontal_20_Line"/>
      <text:p text:style-name="P186"><text:span text:style-name="T1360">1 </text:span><text:span text:style-name="T115">#include </text:span><text:span text:style-name="T116">&lt;stdio.h&gt;</text:span></text:p>
      <text:p text:style-name="P1153"><text:span text:style-name="T1361">2</text:span><text:span text:style-name="T1360"> </text:span><text:span text:style-name="T115">#include </text:span><text:span text:style-name="T116">&lt;stdlib.h&gt;</text:span></text:p>
      <text:p text:style-name="P1153"><text:span text:style-name="T1361">3</text:span><text:span text:style-name="T1360"> </text:span><text:span text:style-name="T115">#include </text:span><text:span text:style-name="T116">&lt;string.h&gt;</text:span></text:p>
      <text:p text:style-name="P1153"><text:span text:style-name="T1361">4</text:span><text:span text:style-name="T1360"> </text:span><text:span text:style-name="T115">#include </text:span><text:span text:style-name="T116">&lt;netdb.h&gt;</text:span></text:p>
      <text:p text:style-name="P1153"><text:span text:style-name="T1361">5</text:span><text:span text:style-name="T1360"> </text:span><text:span text:style-name="T115">#include </text:span><text:span text:style-name="T116">&lt;arpa/inet.h&gt;</text:span></text:p>
      <text:p text:style-name="P188"/>
      <text:p text:style-name="P1153"><text:span text:style-name="T1361">6</text:span><text:span text:style-name="T1360"> </text:span><text:span text:style-name="T115">int</text:span> main(<text:span text:style-name="T115">int</text:span> argc, <text:span text:style-name="T115">char</text:span> *argv<text:span text:style-name="T115">[]</text:span>) {</text:p>
      <text:p text:style-name="P1153"><text:span text:style-name="T1361">7</text:span><text:span text:style-name="T1360"> <text:tab/></text:span><text:span text:style-name="T115">if</text:span> (argc != <text:span text:style-name="T127">3</text:span>) {</text:p>
      <text:p text:style-name="P1154"><text:span text:style-name="T1361">8</text:span><text:span text:style-name="T1360"> <text:tab/><text:tab/></text:span>fprintf(<text:span text:style-name="T115">stderr</text:span>, <text:span text:style-name="T116">"Usage: %s &lt;service_name&gt; &lt;tcp|udp&gt;\n"</text:span>, </text:p>
      <text:p text:style-name="P1154"><text:tab/><text:tab/><text:tab/> <text:s text:c="2"/>argv[<text:span text:style-name="T127">0</text:span>]);</text:p>
      <text:p text:style-name="P1153"><text:span text:style-name="T1361">9</text:span><text:span text:style-name="T1360"> <text:tab/><text:tab/></text:span><text:span text:style-name="T115">return</text:span> <text:span text:style-name="T115">EXIT_FAILURE</text:span>;</text:p>
      <text:p text:style-name="P1153"><text:span text:style-name="T1360">1</text:span><text:span text:style-name="T1361">0</text:span><text:span text:style-name="T1360"> <text:tab/></text:span>}</text:p>
      <text:p text:style-name="P188"/>
      <text:p text:style-name="P1153"><text:span text:style-name="T1360">1</text:span><text:span text:style-name="T1361">1</text:span><text:span text:style-name="T1360"> <text:tab/></text:span><text:span text:style-name="T115">const</text:span> <text:span text:style-name="T115">char</text:span> *service = argv[<text:span text:style-name="T127">1</text:span>];</text:p>
      <text:p text:style-name="P1153"><text:span text:style-name="T1360">1</text:span><text:span text:style-name="T1361">2</text:span><text:span text:style-name="T1360"> <text:tab/></text:span><text:span text:style-name="T115">const</text:span> <text:span text:style-name="T115">char</text:span> *protocol = argv[<text:span text:style-name="T127">2</text:span>];</text:p>
      <text:p text:style-name="P188"/>
      <text:p text:style-name="P1153"><text:span text:style-name="T1361">13</text:span><text:span text:style-name="T1360"> <text:tab/></text:span><text:span text:style-name="T115">if</text:span> (strcmp(protocol, <text:span text:style-name="T116">"tcp"</text:span>) != <text:span text:style-name="T127">0</text:span> &amp;&amp; strcmp(protocol, <text:span text:style-name="T116">"udp"</text:span>) != <text:span text:style-name="T127">0</text:span>) {</text:p>
      <text:p text:style-name="P1153"><text:span text:style-name="T1361">14</text:span><text:span text:style-name="T1360"> <text:tab/><text:tab/></text:span>fprintf(<text:span text:style-name="T115">stderr</text:span>, <text:span text:style-name="T116">" Protocol must be 'tcp' or 'udp'\n"</text:span>);</text:p>
      <text:p text:style-name="P1153"><text:span text:style-name="T1360">1</text:span><text:span text:style-name="T1361">5</text:span><text:span text:style-name="T1360"> <text:tab/><text:tab/></text:span><text:span text:style-name="T115">return</text:span> <text:span text:style-name="T115">EXIT_FAILURE</text:span>;</text:p>
      <text:p text:style-name="P1153"><text:span text:style-name="T1360">1</text:span><text:span text:style-name="T1361">6</text:span><text:span text:style-name="T1360"> <text:tab/></text:span>}</text:p>
      <text:p text:style-name="P188"/>
      <text:p text:style-name="P1155"><text:span text:style-name="T1362">1</text:span><text:span text:style-name="T1363">7</text:span><text:span text:style-name="T1362"> <text:tab/></text:span><text:span text:style-name="T103">struct</text:span><text:span text:style-name="T104"> </text:span><text:span text:style-name="T103">servent</text:span><text:span text:style-name="T104"> *svc = </text:span><text:span text:style-name="T105">getservbyname</text:span><text:span text:style-name="T104">(service, protocol);</text:span></text:p>
      <text:p text:style-name="P1153"><text:span text:style-name="T1360">1</text:span><text:span text:style-name="T1361">8</text:span><text:span text:style-name="T1360"> <text:tab/></text:span><text:span text:style-name="T115">if</text:span> (svc == <text:span text:style-name="T115">NULL</text:span>) {</text:p>
      <text:p text:style-name="P1153"><text:span text:style-name="T1360">1</text:span><text:span text:style-name="T1361">9</text:span><text:span text:style-name="T1360"> <text:tab/><text:tab/></text:span>printf(<text:span text:style-name="T116">" No service found for '%s/%s'\n"</text:span>, service,protocol);</text:p>
      <text:p text:style-name="P1153"><text:span text:style-name="T1361">20</text:span><text:span text:style-name="T1360"> <text:tab/><text:tab/></text:span><text:span text:style-name="T115">return</text:span> <text:span text:style-name="T115">EXIT_FAILURE</text:span>;</text:p>
      <text:p text:style-name="P1153"><text:span text:style-name="T1361">2</text:span><text:span text:style-name="T1360">1 <text:tab/></text:span>}</text:p>
      <text:p text:style-name="P188"/>
      <text:p text:style-name="P1156"><text:span text:style-name="T1361">22</text:span><text:span text:style-name="T1360"> <text:tab/></text:span>printf(<text:span text:style-name="T116">" Service: %s\n"</text:span>, svc→s_name);</text:p>
      <text:p text:style-name="P1156"><text:span text:style-name="T1361">23</text:span><text:span text:style-name="T1360"> <text:tab/></text:span>printf(<text:span text:style-name="T116">" Port : %d\n"</text:span>, ntohs(svc-&gt;s_port));</text:p>
      <text:p text:style-name="P1153"><text:span text:style-name="T1361">24</text:span><text:span text:style-name="T1360"> <text:tab/></text:span>printf(<text:span text:style-name="T116">" Proto : %s\n"</text:span>, svc-&gt;s_proto);</text:p>
      <text:p text:style-name="P188"/>
      <text:p text:style-name="P1153"><text:span text:style-name="T1361">25</text:span><text:span text:style-name="T1360"> <text:tab/></text:span><text:span text:style-name="T115">for</text:span> (<text:span text:style-name="T115">char</text:span> **alias = svc-&gt;s_aliases; *alias != <text:span text:style-name="T115">NULL</text:span>; alias++) {</text:p>
      <text:p text:style-name="P1153"><text:span text:style-name="T1361">26</text:span><text:span text:style-name="T1360"> <text:tab/><text:tab/></text:span>printf(<text:span text:style-name="T116">" Alias : %s\n"</text:span>, *alias);</text:p>
      <text:p text:style-name="P1157"><text:span text:style-name="T1364">27</text:span><text:span text:style-name="T1365"> <text:tab/></text:span><text:span text:style-name="T124">}</text:span></text:p>
      <text:p text:style-name="P1153"><text:span text:style-name="T1361">28</text:span><text:span text:style-name="T1360"> <text:tab/></text:span><text:span text:style-name="T115">return</text:span> <text:span text:style-name="T115">EXIT_SUCCESS</text:span>;</text:p>
      <text:p text:style-name="P1157"><text:span text:style-name="T1364">29</text:span><text:span text:style-name="T1365"> </text:span><text:span text:style-name="T124">}</text:span></text:p>
      <text:p text:style-name="Horizontal_20_Line"/>
      <text:p text:style-name="P1158">getservice.c</text:p>
      <text:p text:style-name="Standard"/>
      <text:p text:style-name="Standard"><text:span text:style-name="Strong_20_Emphasis"><text:span text:style-name="T220">Line 17.</text:span></text:span><text:span text:style-name="T220"> Calls </text:span><text:span text:style-name="Source_20_Text"><text:span text:style-name="T221">getservbyname</text:span></text:span><text:span text:style-name="T220"> with the service name and protocol (TCP or UDP) to search the services database (typically </text:span><text:span text:style-name="Source_20_Text"><text:span text:style-name="T221">/etc/services</text:span></text:span><text:span text:style-name="T220">) and obtain the corresponding service entry</text:span></text:p>
      <text:p text:style-name="Standard"/>
      <text:p text:style-name="P1159">We execute the program.</text:p>
      <text:p text:style-name="P1159"/>
      <table:table table:name="Table167" table:style-name="Table167">
        <table:table-column table:style-name="Table167.A"/>
        <table:table-row>
          <table:table-cell table:style-name="Table167.A1" office:value-type="string">
            <text:p text:style-name="P1160"><text:span text:style-name="T80">[</text:span><text:a xlink:type="simple" xlink:href="mailto:linux@users" text:style-name="Internet_20_link" text:visited-style-name="Visited_20_Internet_20_Link"><text:span text:style-name="T81">linux@users</text:span></text:a><text:span text:style-name="T80">] ./</text:span><text:span text:style-name="T1300">get</text:span><text:span text:style-name="T1366">service ftp tcp</text:span></text:p>
            <text:p text:style-name="P1160"><text:s/>Service: ftp</text:p>
            <text:p text:style-name="P1160"><text:soft-page-break/><text:s text:c="2"/>Port <text:s text:c="2"/>: 21</text:p>
            <text:p text:style-name="P1160"><text:s text:c="2"/>Proto <text:s/>: tcp</text:p>
            <text:p text:style-name="P1160"/>
            <text:p text:style-name="P1160"><text:span text:style-name="T80">[</text:span><text:a xlink:type="simple" xlink:href="mailto:linux@users" text:style-name="Internet_20_link" text:visited-style-name="Visited_20_Internet_20_Link"><text:span text:style-name="T81">linux@users</text:span></text:a><text:span text:style-name="T80">] ./</text:span><text:span text:style-name="T1300">get</text:span><text:span text:style-name="T1366">service ssh tcp</text:span></text:p>
            <text:p text:style-name="P1160"><text:s/>Service: ssh</text:p>
            <text:p text:style-name="P1160"><text:s text:c="2"/>Port <text:s text:c="2"/>: 22</text:p>
            <text:p text:style-name="P1160"><text:s text:c="2"/>Proto <text:s/>: tcp</text:p>
            <text:p text:style-name="P1160"/>
            <text:p text:style-name="P1160"><text:span text:style-name="T80">[</text:span><text:a xlink:type="simple" xlink:href="mailto:linux@users" text:style-name="Internet_20_link" text:visited-style-name="Visited_20_Internet_20_Link"><text:span text:style-name="T81">linux@users</text:span></text:a><text:span text:style-name="T80">] ./</text:span><text:span text:style-name="T1300">get</text:span><text:span text:style-name="T1366">service sip udp</text:span></text:p>
            <text:p text:style-name="P1160"><text:s/>Service: sip</text:p>
            <text:p text:style-name="P1160"><text:s text:c="2"/>Port <text:s text:c="2"/>: 5060</text:p>
            <text:p text:style-name="P1160"><text:s text:c="2"/>Proto <text:s/>: udp</text:p>
          </table:table-cell>
        </table:table-row>
      </table:table>
      <text:p text:style-name="P1159"/>
      <text:p text:style-name="P1161"><text:span text:style-name="T1367">The output shows the result of querying the system services database (typically </text:span><text:span text:style-name="Source_20_Text"><text:span text:style-name="T1368">/etc/services</text:span></text:span><text:span text:style-name="T1367">) using the service name and protocol provided as input. Each service is mapped to its corresponding well-known port number and transport protocol. For example, </text:span><text:span text:style-name="Source_20_Text"><text:span text:style-name="T1368">ftp</text:span></text:span><text:span text:style-name="T1367"> uses port </text:span><text:span text:style-name="Source_20_Text"><text:span text:style-name="T1368">21</text:span></text:span><text:span text:style-name="T1367"> over </text:span><text:span text:style-name="Source_20_Text"><text:span text:style-name="T1367">TCP</text:span></text:span><text:span text:style-name="T1367">, </text:span><text:span text:style-name="Source_20_Text"><text:span text:style-name="T1368">ssh</text:span></text:span><text:span text:style-name="T1367"> uses port </text:span><text:span text:style-name="Source_20_Text"><text:span text:style-name="T1368">22</text:span></text:span><text:span text:style-name="T1367"> over TCP, and </text:span><text:span text:style-name="Source_20_Text"><text:span text:style-name="T1368">sip</text:span></text:span><text:span text:style-name="T1367"> uses port </text:span><text:span text:style-name="Source_20_Text"><text:span text:style-name="T1368">5060</text:span></text:span><text:span text:style-name="T1367"> over UDP.</text:span></text:p>
      <text:p text:style-name="P1159"/>
      <text:p text:style-name="P115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1139"/>
      <text:p text:style-name="P466"><text:soft-page-break/>III.<text:span text:style-name="T1369">1</text:span><text:span text:style-name="T1370">0</text:span> System identification</text:p>
      <text:p text:style-name="P1162"/>
      <text:p text:style-name="P1163">III.10.1 Getting system information: <text:span text:style-name="T75">uname</text:span></text:p>
      <text:p text:style-name="P1164"/>
      <text:p text:style-name="P1165"><text:span text:style-name="T1371">On Linux systems we can get information about the identity of the system through the </text:span><text:span text:style-name="T1372">uname</text:span><text:span text:style-name="T1372"><text:note text:id="ftn100" text:note-class="footnote"><text:note-citation>98</text:note-citation><text:note-body><text:p text:style-name="P1059"><text:span text:style-name="T1373">See the </text:span><text:span text:style-name="T1374">uname(1)</text:span><text:span text:style-name="T1375"> manual page</text:span></text:p></text:note-body></text:note></text:span><text:span text:style-name="T1371"> command, </text:span><text:span text:style-name="T1376">which</text:span><text:span text:style-name="T1371"> is implemented with the </text:span><text:span text:style-name="T1372">uname</text:span><text:span text:style-name="T1372"><text:note text:id="ftn101" text:note-class="footnote"><text:note-citation>99</text:note-citation><text:note-body><text:p text:style-name="P1059"><text:span text:style-name="T1373">See the </text:span><text:span text:style-name="T1377">uname(3POSIX)</text:span><text:span text:style-name="T1375"> manual page</text:span></text:p></text:note-body></text:note></text:span><text:span text:style-name="T1371"> system call, defined as follows.</text:span></text:p>
      <text:p text:style-name="P1164"/>
      <table:table table:name="Table168" table:style-name="Table168">
        <table:table-column table:style-name="Table168.A"/>
        <table:table-row>
          <table:table-cell table:style-name="Table168.A1" office:value-type="string">
            <text:p text:style-name="P271"><text:span text:style-name="T115">#include </text:span><text:span text:style-name="T116">&lt;sys/utsname.h&gt;</text:span></text:p>
            <text:p text:style-name="P188"/>
            <text:p text:style-name="P229"><text:span text:style-name="T103">int</text:span><text:span text:style-name="T104"> </text:span><text:span text:style-name="T105">uname</text:span><text:span text:style-name="T104">(</text:span><text:span text:style-name="T103">struct</text:span><text:span text:style-name="T104"> </text:span><text:span text:style-name="T103">utsname</text:span><text:span text:style-name="T104"> </text:span><text:span text:style-name="T106">*name</text:span><text:span text:style-name="T104">);</text:span></text:p>
            <text:p text:style-name="P283"/>
            <text:p text:style-name="P1166">Returns: <text:span text:style-name="T1378">a non-negative value on success, </text:span><text:span text:style-name="T1379">on </text:span><text:span text:style-name="T1378">error -</text:span><text:span text:style-name="T1379">1 </text:span><text:span text:style-name="T1378">and errno</text:span></text:p>
          </table:table-cell>
        </table:table-row>
      </table:table>
      <text:p text:style-name="P1164"/>
      <text:p text:style-name="P1167"><text:span text:style-name="T1380">The </text:span><text:span text:style-name="T1372">utsname</text:span><text:span text:style-name="T1380"> structure is defined as follows in the </text:span><text:span text:style-name="T1372">sys/utsname.h</text:span><text:span text:style-name="T1380"> header file. </text:span></text:p>
      <text:p text:style-name="P1168"/>
      <table:table table:name="Table169" table:style-name="Table169">
        <table:table-column table:style-name="Table169.A"/>
        <table:table-row>
          <table:table-cell table:style-name="Table169.A1" office:value-type="string">
            <text:p text:style-name="P271"><text:span text:style-name="T115">#define __NEW_UTS_LEN </text:span><text:span text:style-name="T127">64</text:span></text:p>
            <text:p text:style-name="P1169"/>
            <text:p text:style-name="P271"><text:span text:style-name="T115">struct</text:span> new_utsname {</text:p>
            <text:p text:style-name="P186"><text:span text:style-name="T115"><text:s text:c="3"/>char</text:span> sysname[__NEW_UTS_LEN + <text:span text:style-name="T127">1</text:span>];</text:p>
            <text:p text:style-name="P186"><text:span text:style-name="T115"><text:s text:c="3"/>char</text:span> nodename[__NEW_UTS_LEN + <text:span text:style-name="T127">1</text:span>];</text:p>
            <text:p text:style-name="P186"><text:span text:style-name="T115"><text:s text:c="3"/>char</text:span> release[__NEW_UTS_LEN + <text:span text:style-name="T127">1</text:span>];</text:p>
            <text:p text:style-name="P186"><text:span text:style-name="T115"><text:s text:c="3"/>char</text:span> version[__NEW_UTS_LEN + <text:span text:style-name="T127">1</text:span>];</text:p>
            <text:p text:style-name="P186"><text:span text:style-name="T115"><text:s text:c="3"/>char</text:span> machine[__NEW_UTS_LEN + <text:span text:style-name="T127">1</text:span>];</text:p>
            <text:p text:style-name="P186"><text:span text:style-name="T115"><text:s text:c="3"/>char</text:span> domainname[__NEW_UTS_LEN + <text:span text:style-name="T127">1</text:span>];</text:p>
            <text:p text:style-name="P186">};</text:p>
          </table:table-cell>
        </table:table-row>
      </table:table>
      <text:p text:style-name="P1168"/>
      <text:p text:style-name="P1170">The fields of the structure <text:span text:style-name="T1381">are listed in the following table.</text:span> </text:p>
      <text:p text:style-name="P1170"/>
      <table:table table:name="Table170" table:style-name="Table170">
        <table:table-column table:style-name="Table170.A"/>
        <table:table-column table:style-name="Table170.B"/>
        <table:table-row>
          <table:table-cell table:style-name="Table170.A1" office:value-type="string">
            <text:p text:style-name="P1171">sysname</text:p>
          </table:table-cell>
          <table:table-cell table:style-name="Table170.B1" office:value-type="string">
            <text:p text:style-name="P183">System name</text:p>
          </table:table-cell>
        </table:table-row>
        <table:table-row>
          <table:table-cell table:style-name="Table170.A2" office:value-type="string">
            <text:p text:style-name="P1171">nodename</text:p>
          </table:table-cell>
          <table:table-cell table:style-name="Table170.B2" office:value-type="string">
            <text:p text:style-name="P183">Host name</text:p>
          </table:table-cell>
        </table:table-row>
        <table:table-row>
          <table:table-cell table:style-name="Table170.A2" office:value-type="string">
            <text:p text:style-name="P1171">release</text:p>
          </table:table-cell>
          <table:table-cell table:style-name="Table170.B2" office:value-type="string">
            <text:p text:style-name="P183">OS <text:span text:style-name="T1382">Rel</text:span>ease </text:p>
          </table:table-cell>
        </table:table-row>
        <table:table-row>
          <table:table-cell table:style-name="Table170.A2" office:value-type="string">
            <text:p text:style-name="P1171">version</text:p>
          </table:table-cell>
          <table:table-cell table:style-name="Table170.B2" office:value-type="string">
            <text:p text:style-name="P1172">OS version</text:p>
          </table:table-cell>
        </table:table-row>
        <table:table-row>
          <table:table-cell table:style-name="Table170.A2" office:value-type="string">
            <text:p text:style-name="P1171">machine</text:p>
          </table:table-cell>
          <table:table-cell table:style-name="Table170.B2" office:value-type="string">
            <text:p text:style-name="P1172">Hardware identifier</text:p>
          </table:table-cell>
        </table:table-row>
        <table:table-row>
          <table:table-cell table:style-name="Table170.A2" office:value-type="string">
            <text:p text:style-name="P1171">domainname</text:p>
          </table:table-cell>
          <table:table-cell table:style-name="Table170.B2" office:value-type="string">
            <text:p text:style-name="P1172">Network domain name</text:p>
          </table:table-cell>
        </table:table-row>
      </table:table>
      <text:p text:style-name="P1170"><text:tab/><text:tab/></text:p>
      <text:p text:style-name="P1173"><text:span text:style-name="T1383">Tab </text:span><text:span text:style-name="T503">20</text:span><text:span text:style-name="T1383">.</text:span><text:span text:style-name="T1384"> Fields of the </text:span><text:span text:style-name="T104">utsname</text:span><text:span text:style-name="T1384"> structure</text:span></text:p>
      <text:p text:style-name="P1162"/>
      <text:p text:style-name="P644"><text:span text:style-name="T1385">The </text:span><text:span text:style-name="T1386">systemid.c</text:span><text:span text:style-name="T1385"> program </text:span>demonstrates how to retrieve basic system identification information using the <text:span text:style-name="Source_20_Text"><text:span text:style-name="T1386">uname</text:span></text:span> system call.</text:p>
      <text:p text:style-name="Horizontal_20_Line"/>
      <text:p text:style-name="P186"><text:span text:style-name="T1387">1 </text:span><text:span text:style-name="T115">#define _GNU_SOURCE</text:span></text:p>
      <text:p text:style-name="P1174"><text:span text:style-name="T1387">2 </text:span><text:span text:style-name="T115">#include </text:span><text:span text:style-name="T116">&lt;stdio.h&gt;</text:span></text:p>
      <text:p text:style-name="P1174"><text:span text:style-name="T1387">3 </text:span><text:span text:style-name="T115">#include </text:span><text:span text:style-name="T116">&lt;sys/utsname.h&gt;</text:span></text:p>
      <text:p text:style-name="P188"/>
      <text:p text:style-name="P1175"><text:span text:style-name="T1388">4 </text:span><text:span text:style-name="T101">int</text:span><text:span text:style-name="T124"> main(</text:span><text:span text:style-name="T101">void</text:span><text:span text:style-name="T124">) {</text:span></text:p>
      <text:p text:style-name="P1176"><text:soft-page-break/></text:p>
      <text:p text:style-name="P1177"><text:span text:style-name="T1389">5 <text:tab/></text:span><text:span text:style-name="T103">struct</text:span><text:span text:style-name="T104"> </text:span><text:span text:style-name="T103">utsname</text:span><text:span text:style-name="T104"> sysinfo;</text:span></text:p>
      <text:p text:style-name="P1174"><text:span text:style-name="T1387">6 <text:tab/></text:span><text:span text:style-name="T115">if</text:span> (<text:span text:style-name="T126">uname</text:span>(&amp;sysinfo) == -<text:span text:style-name="T127">1</text:span>) {</text:p>
      <text:p text:style-name="P1174"><text:span text:style-name="T1387">7 <text:tab/><text:tab/></text:span>perror(<text:span text:style-name="T116">"uname"</text:span>);</text:p>
      <text:p text:style-name="P1174"><text:span text:style-name="T1387">8 <text:tab/><text:tab/></text:span><text:span text:style-name="T115">return</text:span> <text:span text:style-name="T127">1</text:span>;</text:p>
      <text:p text:style-name="P1174"><text:span text:style-name="T1387">9 <text:tab/></text:span>}</text:p>
      <text:p text:style-name="P188"/>
      <text:p text:style-name="P1174"><text:span text:style-name="T1387">10 <text:tab/></text:span>printf(<text:span text:style-name="T116">"System Information:\n"</text:span>);</text:p>
      <text:p text:style-name="P1174"><text:span text:style-name="T1387">11 <text:tab/></text:span>printf(<text:span text:style-name="T116">" Sysname : %s\n"</text:span>, sysinfo.sysname);</text:p>
      <text:p text:style-name="P1174"><text:span text:style-name="T1387">12 <text:tab/></text:span>printf(<text:span text:style-name="T116">" Nodename: %s\n"</text:span>, sysinfo.nodename);</text:p>
      <text:p text:style-name="P1174"><text:span text:style-name="T1387">13 <text:tab/></text:span>printf(<text:span text:style-name="T116">" Release : %s\n"</text:span>, sysinfo.release);<text:span text:style-name="T119"> </text:span></text:p>
      <text:p text:style-name="P1174"><text:span text:style-name="T1387">14 <text:tab/></text:span>printf(<text:span text:style-name="T116">" Version : %s\n"</text:span>, sysinfo.version);<text:span text:style-name="T119"> </text:span></text:p>
      <text:p text:style-name="P1174"><text:span text:style-name="T1387">15 <text:tab/></text:span>printf(<text:span text:style-name="T116">" Machine : %s\n"</text:span>, sysinfo.machine);<text:span text:style-name="T119"> </text:span></text:p>
      <text:p text:style-name="P1175"><text:span text:style-name="T1388">16 <text:tab/></text:span><text:span text:style-name="T124">printf(</text:span><text:span text:style-name="T102">" Domainname: %s\n"</text:span><text:span text:style-name="T124">, sysinfo.domainname);</text:span><text:span text:style-name="T212"> </text:span></text:p>
      <text:p text:style-name="P1174"><text:span text:style-name="T1387">17 <text:tab/></text:span><text:span text:style-name="T115">return</text:span> <text:span text:style-name="T127">0</text:span>;</text:p>
      <text:p text:style-name="P1175"><text:span text:style-name="T1388">18 </text:span><text:span text:style-name="T124">}</text:span></text:p>
      <text:p text:style-name="Horizontal_20_Line"/>
      <text:p text:style-name="P1178">systemid.c</text:p>
      <text:p text:style-name="P307"/>
      <text:p text:style-name="Standard"><text:span text:style-name="Strong_20_Emphasis"><text:span text:style-name="T220">Line 5.</text:span></text:span><text:span text:style-name="T220"> Declares a </text:span><text:span text:style-name="Source_20_Text"><text:span text:style-name="T221">utsname</text:span></text:span><text:span text:style-name="T220"> structure that will hold system information such as the kernel and <text:tab/> machine details</text:span></text:p>
      <text:p text:style-name="Standard"><text:span text:style-name="Strong_20_Emphasis"><text:span text:style-name="T220">Line 6–9.</text:span></text:span><text:span text:style-name="T220"> Calls </text:span><text:span text:style-name="Source_20_Text"><text:span text:style-name="T221">uname</text:span></text:span><text:span text:style-name="T220"> to fill the structure with information about the current system. If the call <text:tab/> <text:s text:c="3"/>fails, an error message is printed and the program exits</text:span></text:p>
      <text:p text:style-name="Standard"><text:span text:style-name="Strong_20_Emphasis"><text:span text:style-name="T220">Line 10–16.</text:span></text:span><text:span text:style-name="T220"> Prints various system identification fields, including operating system name, node <text:tab/> <text:s text:c="7"/><text:tab/> <text:s text:c="7"/>name (hostname), kernel release, kernel version, machine architecture, domain nam</text:span><text:span text:style-name="T1390">e</text:span></text:p>
      <text:p text:style-name="P1162"/>
      <text:p text:style-name="P1179">We execute the program </text:p>
      <text:p text:style-name="P1179"/>
      <table:table table:name="Table171" table:style-name="Table171">
        <table:table-column table:style-name="Table171.A"/>
        <table:table-row>
          <table:table-cell table:style-name="Table171.A1" office:value-type="string">
            <text:p text:style-name="P1180"><text:span text:style-name="T80">[</text:span><text:a xlink:type="simple" xlink:href="mailto:linux@users" text:style-name="Internet_20_link" text:visited-style-name="Visited_20_Internet_20_Link"><text:span text:style-name="T81">linux@users</text:span></text:a><text:span text:style-name="T80">] ./</text:span><text:span text:style-name="T1391">systemid </text:span></text:p>
            <text:p text:style-name="P1180">System Information:</text:p>
            <text:p text:style-name="P1180"><text:s text:c="2"/>Sysname : Linux</text:p>
            <text:p text:style-name="P1180"><text:s text:c="2"/>Nodename: kali</text:p>
            <text:p text:style-name="P1180"><text:s text:c="2"/>Release : 6.12.33+kali-amd64</text:p>
            <text:p text:style-name="P1180"><text:s text:c="2"/>Version : #1 SMP PREEMPT_DYNAMIC Kali 6.12.33-1kali1 (2025-06-25)</text:p>
            <text:p text:style-name="P1180"><text:s text:c="2"/>Machine : x86_64</text:p>
            <text:p text:style-name="P1180"><text:s text:c="2"/>Domainname: (none)</text:p>
          </table:table-cell>
        </table:table-row>
      </table:table>
      <text:p text:style-name="P1181"/>
      <text:p text:style-name="P1182"><text:span text:style-name="T1392">The output displays key information about the running system obtained through the </text:span><text:span text:style-name="Source_20_Text"><text:span text:style-name="T1386">uname</text:span></text:span><text:span text:style-name="T1392"> system call. It includes the operating system name (</text:span><text:span text:style-name="Source_20_Text"><text:span text:style-name="T1386">Linux</text:span></text:span><text:span text:style-name="T1392">), the hostname (</text:span><text:span text:style-name="Source_20_Text"><text:span text:style-name="T1386">kali</text:span></text:span><text:span text:style-name="T1392">), the kernel release and version, the machine architecture (</text:span><text:span text:style-name="Source_20_Text"><text:span text:style-name="T1386">x86_64</text:span></text:span><text:span text:style-name="T1392">), and the domain name (which is not set in this case, shown as </text:span><text:span text:style-name="Source_20_Text"><text:span text:style-name="T1392">(</text:span></text:span><text:span text:style-name="Source_20_Text"><text:span text:style-name="T1386">none</text:span></text:span><text:span text:style-name="Source_20_Text"><text:span text:style-name="T1392">)</text:span></text:span><text:span text:style-name="T1392">).</text:span></text:p>
      <text:p text:style-name="P1182"><text:span text:style-name="T1392">The </text:span><text:span text:style-name="T1386">domainname</text:span><text:span text:style-name="T1392"> field is not a POSIX feature but a GNU extension, therefore to </text:span><text:span text:style-name="T1376">retrieve</text:span><text:span text:style-name="T1392"> this value we </text:span><text:span text:style-name="T1376">need</text:span><text:span text:style-name="T1392"> to define the feature test macro </text:span><text:span text:style-name="T1386">_GNU_SOURCE</text:span><text:span text:style-name="T1392"> or compile </text:span><text:span text:style-name="T1376">as follows</text:span><text:span text:style-name="T1392"> </text:span></text:p>
      <text:p text:style-name="P1181"/>
      <text:p text:style-name="P1182"><text:span text:style-name="T1392"><text:tab/></text:span><text:span text:style-name="T1386">gcc -D_GNU_SOURCE -o systemid systemid.c</text:span></text:p>
      <text:p text:style-name="P1183"/>
      <text:p text:style-name="P1182"><text:span text:style-name="T1376">On the command line, we can use the </text:span><text:span text:style-name="Source_20_Text"><text:span text:style-name="T1386">uname</text:span></text:span><text:span text:style-name="T1376"> utility to retrieve system information. When it is executed with the </text:span><text:span text:style-name="Source_20_Text"><text:span text:style-name="T1386">-a</text:span></text:span><text:span text:style-name="T1376"> option, it prints a complete overview of the system, including the kernel name, hostname, kernel version, build information, machine architecture, and operating system type.</text:span></text:p>
      <table:table table:name="Table172" table:style-name="Table172">
        <table:table-column table:style-name="Table172.A"/>
        <text:soft-page-break/>
        <table:table-row>
          <table:table-cell table:style-name="Table172.A1" office:value-type="string">
            <text:p text:style-name="P1184"><text:span text:style-name="T80">[</text:span><text:a xlink:type="simple" xlink:href="mailto:linux@users" text:style-name="Internet_20_link" text:visited-style-name="Visited_20_Internet_20_Link"><text:span text:style-name="T81">linux@users</text:span></text:a><text:span text:style-name="T80">] </text:span><text:span text:style-name="T1393">uname -a </text:span></text:p>
            <text:p text:style-name="P1184">Linux kali 6.12.33+kali-amd64 #1 SMP PREEMPT_DYNAMIC Kali 6.12.33-1kali1 (2025-06-25) x86_64 GNU/Linux</text:p>
          </table:table-cell>
        </table:table-row>
      </table:table>
      <text:p text:style-name="P1185"/>
      <text:p text:style-name="P1186"><text:span text:style-name="T1394">Under the </text:span><text:span text:style-name="T1386">/proc</text:span><text:span text:style-name="T1394"> filesystem there are the following files contain</text:span><text:span text:style-name="T1395">ing</text:span><text:span text:style-name="T1394"> the same information </text:span><text:span text:style-name="T1395">we can obtain with </text:span><text:span text:style-name="T1386">uname</text:span><text:span text:style-name="T1395">. </text:span></text:p>
      <text:p text:style-name="P1187"/>
      <table:table table:name="Table173" table:style-name="Table173">
        <table:table-column table:style-name="Table173.A"/>
        <table:table-column table:style-name="Table173.B"/>
        <table:table-column table:style-name="Table173.C"/>
        <table:table-row>
          <table:table-cell table:style-name="Table173.A1" office:value-type="string">
            <text:p text:style-name="P1188">/proc/sys/kernel/ostype</text:p>
          </table:table-cell>
          <table:table-cell table:style-name="Table173.A1" office:value-type="string">
            <text:p text:style-name="P1189">Sysname</text:p>
          </table:table-cell>
          <table:table-cell table:style-name="Table173.C1" office:value-type="string">
            <text:p text:style-name="P1189">Linux</text:p>
          </table:table-cell>
        </table:table-row>
        <table:table-row>
          <table:table-cell table:style-name="Table173.A2" office:value-type="string">
            <text:p text:style-name="P1188">/proc/sys/kernel/osrelease</text:p>
          </table:table-cell>
          <table:table-cell table:style-name="Table173.A2" office:value-type="string">
            <text:p text:style-name="P1189">Release</text:p>
          </table:table-cell>
          <table:table-cell table:style-name="Table173.C2" office:value-type="string">
            <text:p text:style-name="P183">6.12.33+kali-amd64</text:p>
          </table:table-cell>
        </table:table-row>
        <table:table-row>
          <table:table-cell table:style-name="Table173.A2" office:value-type="string">
            <text:p text:style-name="P1188">/proc/sys/kernel/version</text:p>
          </table:table-cell>
          <table:table-cell table:style-name="Table173.A2" office:value-type="string">
            <text:p text:style-name="P1189">OS version</text:p>
          </table:table-cell>
          <table:table-cell table:style-name="Table173.C2" office:value-type="string">
            <text:p text:style-name="P1190">#1 SMP PREEMPT_DYNAMIC Kali 6.12.33-1kali1 (2025-06-25)</text:p>
          </table:table-cell>
        </table:table-row>
        <table:table-row>
          <table:table-cell table:style-name="Table173.A2" office:value-type="string">
            <text:p text:style-name="P1188">/proc/version</text:p>
          </table:table-cell>
          <table:table-cell table:style-name="Table173.A2" office:value-type="string">
            <text:p text:style-name="P1191">OS name, release, <text:span text:style-name="T1396">machine </text:span>and version</text:p>
          </table:table-cell>
          <table:table-cell table:style-name="Table173.C2" office:value-type="string">
            <text:p text:style-name="P1190">Linux version 6.12.33+kali-amd64 (devel@kali.org) (x86_64-linux-gnu-gcc-14 (Debian 14.2.0-19) 14.2.0, GNU ld (GNU Binutils for Debian) 2.44) #1 SMP PREEMPT_DYNAMIC Kali 6.12.33-1kali1 (2025-06-25)</text:p>
          </table:table-cell>
        </table:table-row>
      </table:table>
      <text:p text:style-name="P1187"/>
      <text:p text:style-name="P1192"><text:span text:style-name="T90">Tab 2</text:span><text:span text:style-name="T361">1</text:span><text:span text:style-name="T90">.</text:span> Files related to <text:span text:style-name="T75">uname</text:span></text:p>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79"/>
      <text:p text:style-name="P1193"><text:soft-page-break/><text:span text:style-name="T1397">III.10.</text:span><text:span text:style-name="T1398">2 Getting and setting h</text:span><text:span text:style-name="T1399">ostname: </text:span><text:span text:style-name="T1400">gethostname</text:span><text:span text:style-name="T1398"> and </text:span><text:span text:style-name="T1400">sethostent</text:span></text:p>
      <text:p text:style-name="P1162"/>
      <text:p text:style-name="P1194">The following functions<text:note text:id="ftn102" text:note-class="footnote"><text:note-citation>100</text:note-citation><text:note-body><text:p text:style-name="P250"><text:span text:style-name="T1401">See the </text:span><text:span text:style-name="T1402">gethostname(2)</text:span><text:span text:style-name="T1401"> and </text:span><text:span text:style-name="T1403">getdomainname(2)</text:span><text:span text:style-name="T1404"> manual pages</text:span></text:p></text:note-body></text:note> can be used to <text:span text:style-name="T1381">retrieve</text:span> and set the hostname <text:span text:style-name="T1405">and the NIS domain name.</text:span></text:p>
      <text:p text:style-name="P1194"/>
      <table:table table:name="Table174" table:style-name="Table174">
        <table:table-column table:style-name="Table174.A"/>
        <table:table-row>
          <table:table-cell table:style-name="Table174.A1" office:value-type="string">
            <text:p text:style-name="P271"><text:span text:style-name="T115">#include </text:span><text:span text:style-name="T116">&lt;unistd.h&gt;</text:span></text:p>
            <text:p text:style-name="P188"/>
            <text:p text:style-name="P186"><text:span text:style-name="T115">int</text:span> <text:span text:style-name="T126">gethostname</text:span>(<text:span text:style-name="T115">char</text:span> <text:span text:style-name="T68">*name</text:span>, <text:span text:style-name="T115">size_t</text:span> <text:span text:style-name="T68">len</text:span>);</text:p>
            <text:p text:style-name="P186"><text:span text:style-name="T115">int</text:span> <text:span text:style-name="T126">sethostname</text:span>(<text:span text:style-name="T115">const</text:span> <text:span text:style-name="T115">char</text:span> <text:span text:style-name="T68">*name</text:span>, <text:span text:style-name="T115">size_t</text:span> <text:span text:style-name="T68">len</text:span>);</text:p>
            <text:p text:style-name="P186"/>
            <text:p text:style-name="P1195"><text:span text:style-name="T115">int</text:span> <text:span text:style-name="T126">getdomainname</text:span>(<text:span text:style-name="T115">char</text:span> <text:span text:style-name="T68">*name</text:span>, <text:span text:style-name="T115">size_t</text:span> <text:span text:style-name="T68">len</text:span>);</text:p>
            <text:p text:style-name="P1196"><text:span text:style-name="T103">int</text:span><text:span text:style-name="T104"> </text:span><text:span text:style-name="T105">setdomainname</text:span><text:span text:style-name="T104">(</text:span><text:span text:style-name="T103">const</text:span><text:span text:style-name="T104"> </text:span><text:span text:style-name="T103">char</text:span><text:span text:style-name="T104"> </text:span><text:span text:style-name="T106">*name</text:span><text:span text:style-name="T104">, </text:span><text:span text:style-name="T103">size_t</text:span><text:span text:style-name="T104"> </text:span><text:span text:style-name="T106">len</text:span><text:span text:style-name="T104">);</text:span></text:p>
            <text:p text:style-name="P188"/>
            <text:p text:style-name="P1197">Return: <text:span text:style-name="T1406">0 on success, on error -</text:span><text:span text:style-name="T1379">1 </text:span><text:span text:style-name="T1406">and errno</text:span></text:p>
          </table:table-cell>
        </table:table-row>
      </table:table>
      <text:p text:style-name="P1194"/>
      <text:p text:style-name="P1167"><text:span text:style-name="T1407">The </text:span><text:span text:style-name="T1408">gethostname</text:span><text:span text:style-name="T1407"> function returns the name of the host in the </text:span><text:span text:style-name="T1408">name</text:span><text:span text:style-name="T1407"> </text:span><text:span text:style-name="T1376">argument</text:span><text:span text:style-name="T1407">. The </text:span><text:span text:style-name="T1408">getdomainname</text:span><text:span text:style-name="T1407"> function returns the domain name in the </text:span><text:span text:style-name="T1408">name</text:span><text:span text:style-name="T1407"> </text:span><text:span text:style-name="T1376">argument</text:span><text:span text:style-name="T1407">. </text:span></text:p>
      <text:p text:style-name="P1198"/>
      <text:p text:style-name="P644"><text:span text:style-name="T1409">The </text:span><text:span text:style-name="T1408">gethostdom.c</text:span><text:span text:style-name="T1409"> program </text:span>demonstrates how to retrieve and display the system’s hostname and domain name using standard system calls.</text:p>
      <text:p text:style-name="Horizontal_20_Line"/>
      <text:p text:style-name="P186"><text:span text:style-name="T1410">1 </text:span><text:span text:style-name="T115">#define _GNU_SOURCE </text:span></text:p>
      <text:p text:style-name="P1199"><text:span text:style-name="T1410">2 </text:span><text:span text:style-name="T115">#include </text:span><text:span text:style-name="T116">&lt;stdio.h&gt;</text:span></text:p>
      <text:p text:style-name="P1199"><text:span text:style-name="T1410">3 </text:span><text:span text:style-name="T115">#include </text:span><text:span text:style-name="T116">&lt;unistd.h&gt;</text:span></text:p>
      <text:p text:style-name="P1199"><text:span text:style-name="T1410">4 </text:span><text:span text:style-name="T115">#include </text:span><text:span text:style-name="T116">&lt;limits.h&gt;</text:span></text:p>
      <text:p text:style-name="P1199"><text:span text:style-name="T1410">5 </text:span><text:span text:style-name="T115">#include </text:span><text:span text:style-name="T116">&lt;string.h&gt;</text:span></text:p>
      <text:p text:style-name="P1199"><text:span text:style-name="T1410">6 </text:span><text:span text:style-name="T115">#include </text:span><text:span text:style-name="T116">&lt;errno.h&gt;</text:span></text:p>
      <text:p text:style-name="P188"/>
      <text:p text:style-name="P1199"><text:span text:style-name="T1410">7 </text:span><text:span text:style-name="T115">int</text:span> main(<text:span text:style-name="T115">void</text:span>) {</text:p>
      <text:p text:style-name="P1199"><text:span text:style-name="T1410">8 <text:tab/></text:span><text:span text:style-name="T115">char</text:span> hostname[<text:span text:style-name="T115">HOST_NAME_MAX</text:span> + <text:span text:style-name="T127">1</text:span>];</text:p>
      <text:p text:style-name="P1199"><text:span text:style-name="T1410">9 <text:tab/></text:span><text:span text:style-name="T115">char</text:span> domainname[<text:span text:style-name="T115">HOST_NAME_MAX</text:span> + <text:span text:style-name="T127">1</text:span>];</text:p>
      <text:p text:style-name="P188"/>
      <text:p text:style-name="P1199"><text:span text:style-name="T1410">10 <text:tab/></text:span><text:span text:style-name="T115">if</text:span> (<text:span text:style-name="T126">gethostname</text:span>(hostname, <text:span text:style-name="T115">sizeof</text:span>(hostname)) == -<text:span text:style-name="T127">1</text:span>) {</text:p>
      <text:p text:style-name="P1199"><text:span text:style-name="T1410">11 <text:tab/><text:tab/></text:span>perror(<text:span text:style-name="T116">"gethostname"</text:span>);</text:p>
      <text:p text:style-name="P1199"><text:span text:style-name="T1410">12 <text:tab/><text:tab/></text:span><text:span text:style-name="T115">return</text:span> <text:span text:style-name="T127">1</text:span>;</text:p>
      <text:p text:style-name="P1200"><text:span text:style-name="T1411">13 <text:tab/></text:span><text:span text:style-name="T124">}</text:span></text:p>
      <text:p text:style-name="P1199"><text:span text:style-name="T1410">14 <text:tab/></text:span><text:span text:style-name="T115">if</text:span> (<text:span text:style-name="T126">getdomainname</text:span>(domainname, <text:span text:style-name="T115">sizeof</text:span>(domainname)) == -<text:span text:style-name="T127">1</text:span>) {</text:p>
      <text:p text:style-name="P1199"><text:span text:style-name="T1410">15 <text:tab/><text:tab/></text:span>perror(<text:span text:style-name="T116">"getdomainname"</text:span>);</text:p>
      <text:p text:style-name="P1199"><text:span text:style-name="T1410">16 <text:tab/><text:tab/></text:span><text:span text:style-name="T115">return</text:span> <text:span text:style-name="T127">1</text:span>;</text:p>
      <text:p text:style-name="P1199"><text:span text:style-name="T1410">17 <text:tab/></text:span>}</text:p>
      <text:p text:style-name="P188"/>
      <text:p text:style-name="P1199"><text:span text:style-name="T1410">18 <text:tab/></text:span>printf(<text:span text:style-name="T116">"Hostname : %s\n"</text:span>, hostname);</text:p>
      <text:p text:style-name="P1200"><text:span text:style-name="T1411">19 <text:tab/></text:span><text:span text:style-name="T124">printf(</text:span><text:span text:style-name="T102">"Domain name : %s\n"</text:span><text:span text:style-name="T124">, domainname);</text:span></text:p>
      <text:p text:style-name="P1199"><text:span text:style-name="T1410">20 <text:tab/></text:span><text:span text:style-name="T115">return</text:span> <text:span text:style-name="T127">0</text:span>;</text:p>
      <text:p text:style-name="P1200"><text:span text:style-name="T1411">21 </text:span><text:span text:style-name="T124">}</text:span></text:p>
      <text:p text:style-name="Horizontal_20_Line"/>
      <text:p text:style-name="P1201">gethostdom.c</text:p>
      <text:p text:style-name="P1202"/>
      <text:p text:style-name="Standard"><text:soft-page-break/><text:span text:style-name="Strong_20_Emphasis"><text:span text:style-name="T220">Line 8–9.</text:span></text:span><text:span text:style-name="T220"> Declares buffers to store the hostname and domain name, each with a size defined by <text:tab/> <text:s text:c="2"/><text:tab/> <text:s text:c="3"/></text:span><text:span text:style-name="Source_20_Text"><text:span text:style-name="T221">HOST_NAME_MAX + 1</text:span></text:span><text:span text:style-name="T220"> to ensure sufficient space</text:span></text:p>
      <text:p text:style-name="Standard"><text:span text:style-name="Strong_20_Emphasis"><text:span text:style-name="T220">Line 10–13.</text:span></text:span><text:span text:style-name="T220"> Calls </text:span><text:span text:style-name="Source_20_Text"><text:span text:style-name="T221">gethostname</text:span></text:span><text:span text:style-name="T220"> to obtain the system’s hostname. If the call fails, an error is <text:tab/> <text:s text:c="2"/><text:tab/> <text:s text:c="7"/>printed and the program exits</text:span></text:p>
      <text:p text:style-name="Standard"><text:span text:style-name="Strong_20_Emphasis"><text:span text:style-name="T220">Line 14–17.</text:span></text:span><text:span text:style-name="T220"> Calls </text:span><text:span text:style-name="Source_20_Text"><text:span text:style-name="T221">getdomainname</text:span></text:span><text:span text:style-name="T220"> to retrieve the system’s domain name. Similarly, if it fails, an <text:tab/> <text:s text:c="7"/>error message is displayed and the program terminates</text:span></text:p>
      <text:p text:style-name="Standard"><text:span text:style-name="Strong_20_Emphasis"><text:span text:style-name="T220">Line 18–19.</text:span></text:span><text:span text:style-name="T220"> Prints the retrieved hostname and domain name</text:span></text:p>
      <text:p text:style-name="P307"/>
      <text:p text:style-name="P1203">We execute <text:span text:style-name="T1381">the program.</text:span></text:p>
      <text:p text:style-name="P1203"/>
      <table:table table:name="Table175" table:style-name="Table175">
        <table:table-column table:style-name="Table175.A"/>
        <table:table-row>
          <table:table-cell table:style-name="Table175.A1" office:value-type="string">
            <text:p text:style-name="P1204"><text:span text:style-name="T80">[</text:span><text:a xlink:type="simple" xlink:href="mailto:linux@users" text:style-name="Internet_20_link" text:visited-style-name="Visited_20_Internet_20_Link"><text:span text:style-name="T81">linux@users</text:span></text:a><text:span text:style-name="T80">] ./</text:span><text:span text:style-name="T1412">gethostdom</text:span></text:p>
            <text:p text:style-name="P1204">Hostname <text:s text:c="3"/>: kali</text:p>
            <text:p text:style-name="P1204">Domain name : (none)</text:p>
          </table:table-cell>
        </table:table-row>
      </table:table>
      <text:p text:style-name="P1203"/>
      <text:p text:style-name="P1205"><text:span text:style-name="T1409">The two corresponding command for these system calls are </text:span><text:span text:style-name="T1408">hostname</text:span><text:span text:style-name="T1409"> and </text:span><text:span text:style-name="T1408">domainname</text:span></text:p>
      <text:p text:style-name="P1206"/>
      <table:table table:name="Table176" table:style-name="Table176">
        <table:table-column table:style-name="Table176.A"/>
        <table:table-row>
          <table:table-cell table:style-name="Table176.A1" office:value-type="string">
            <text:p text:style-name="P1207"><text:span text:style-name="T80">[</text:span><text:a xlink:type="simple" xlink:href="mailto:linux@users" text:style-name="Internet_20_link" text:visited-style-name="Visited_20_Internet_20_Link"><text:span text:style-name="T81">linux@users</text:span></text:a><text:span text:style-name="T80">] </text:span><text:span text:style-name="T1413">hostname</text:span></text:p>
            <text:p text:style-name="P1208">kali</text:p>
            <text:p text:style-name="P1208"/>
            <text:p text:style-name="P1207"><text:span text:style-name="T80">[</text:span><text:a xlink:type="simple" xlink:href="mailto:linux@users" text:style-name="Internet_20_link" text:visited-style-name="Visited_20_Internet_20_Link"><text:span text:style-name="T81">linux@users</text:span></text:a><text:span text:style-name="T80">] </text:span><text:span text:style-name="T1413">domainname</text:span></text:p>
            <text:p text:style-name="P1208">(none)</text:p>
          </table:table-cell>
        </table:table-row>
      </table:table>
      <text:p text:style-name="P1209"/>
      <text:p text:style-name="P1210">We can add the following code after the line 19 in <text:span text:style-name="T1381">order</text:span> to change the hostname</text:p>
      <text:p text:style-name="P1210"/>
      <text:p text:style-name="P1211"><text:span text:style-name="T115">if</text:span> (<text:span text:style-name="T126">sethostname</text:span>(<text:span text:style-name="T116">"linux"</text:span>, <text:span text:style-name="T127">5</text:span>) == -<text:span text:style-name="T127">1</text:span>) {</text:p>
      <text:p text:style-name="P186"><text:tab/>perror(<text:span text:style-name="T116">"sethostname"</text:span>);</text:p>
      <text:p text:style-name="P186"><text:span text:style-name="T115"><text:tab/>return</text:span> <text:span text:style-name="T127">1</text:span>;</text:p>
      <text:p text:style-name="P186">}</text:p>
      <text:p text:style-name="P186"><text:span text:style-name="T115">if</text:span> (<text:span text:style-name="T126">gethostname</text:span>(hostname, <text:span text:style-name="T115">sizeof</text:span>(hostname)) == -<text:span text:style-name="T127">1</text:span>) {</text:p>
      <text:p text:style-name="P186"><text:tab/>perror(<text:span text:style-name="T116">"gethostname"</text:span>);</text:p>
      <text:p text:style-name="P186"><text:span text:style-name="T115"><text:tab/>return</text:span> <text:span text:style-name="T127">1</text:span>;</text:p>
      <text:p text:style-name="P186">}</text:p>
      <text:p text:style-name="P228"><text:span text:style-name="T124">printf(</text:span><text:span text:style-name="T102">"Hostname : %s\n"</text:span><text:span text:style-name="T124">, hostname);</text:span></text:p>
      <text:p text:style-name="P186"><text:span text:style-name="T115">return</text:span> <text:span text:style-name="T127">0</text:span>;</text:p>
      <text:p text:style-name="P1210"><text:s/></text:p>
      <text:p text:style-name="P229"><text:span text:style-name="T1414">We execute </text:span><text:span text:style-name="T1376">the program using</text:span><text:span text:style-name="T1414"> </text:span><text:span text:style-name="T1291">sudo</text:span></text:p>
      <text:p text:style-name="P1212"/>
      <table:table table:name="Table177" table:style-name="Table177">
        <table:table-column table:style-name="Table177.A"/>
        <table:table-row>
          <table:table-cell table:style-name="Table177.A1" office:value-type="string">
            <text:p text:style-name="P1213"><text:span text:style-name="T80">[</text:span><text:a xlink:type="simple" xlink:href="mailto:linux@users" text:style-name="Internet_20_link" text:visited-style-name="Visited_20_Internet_20_Link"><text:span text:style-name="T81">linux@users</text:span></text:a><text:span text:style-name="T80">] </text:span><text:span text:style-name="T1415">sudo </text:span><text:span text:style-name="T80">./</text:span><text:span text:style-name="T1415">gethostdom</text:span></text:p>
            <text:p text:style-name="P1213">Hostname <text:s text:c="3"/>: <text:span text:style-name="T1415">kali</text:span></text:p>
            <text:p text:style-name="P1213">Domain name : (none)</text:p>
            <text:p text:style-name="P1213">Hostname <text:s text:c="3"/>: linux</text:p>
            <text:p text:style-name="P1213"/>
            <text:p text:style-name="P1214"><text:span text:style-name="T80">[</text:span><text:a xlink:type="simple" xlink:href="mailto:linux@users" text:style-name="Internet_20_link" text:visited-style-name="Visited_20_Internet_20_Link"><text:span text:style-name="T81">linux@users</text:span></text:a><text:span text:style-name="T80">] </text:span><text:span text:style-name="T1416">hostname </text:span></text:p>
            <text:p text:style-name="P1215">linux</text:p>
          </table:table-cell>
        </table:table-row>
      </table:table>
      <text:p text:style-name="P1216"/>
      <text:p text:style-name="P229"><text:span text:style-name="T1414">If we run the </text:span><text:span text:style-name="Source_20_Text"><text:span text:style-name="T1417">hostname</text:span></text:span><text:span text:style-name="T1414"> command after executing the program, we can observe the updated system hostname reflected in the output.</text:span></text:p>
      <text:p text:style-name="P1216"/>
      <text:p text:style-name="P229"><text:span text:style-name="T1414">The </text:span><text:span text:style-name="Source_20_Text"><text:span text:style-name="T1417">/etc/hostname</text:span></text:span><text:span text:style-name="T1414"> file contains the system’s configured hostname, which is applied during boot. When the system starts, this value is read and used to set the machine’s hostname.</text:span></text:p>
      <text:p text:style-name="P229"><text:soft-page-break/><text:span text:style-name="T1414">If the system is rebooted, the hostname defined in </text:span><text:span text:style-name="Source_20_Text"><text:span text:style-name="T1417">/etc/hostname</text:span></text:span><text:span text:style-name="T1414"> becomes the active hostname again, overriding any temporary changes made during the previous session.</text:span></text:p>
      <text:p text:style-name="P1217"/>
      <table:table table:name="Table178" table:style-name="Table178">
        <table:table-column table:style-name="Table178.A"/>
        <table:table-row>
          <table:table-cell table:style-name="Table178.A1" office:value-type="string">
            <text:p text:style-name="P1218"><text:span text:style-name="T80">[</text:span><text:a xlink:type="simple" xlink:href="mailto:linux@users" text:style-name="Internet_20_link" text:visited-style-name="Visited_20_Internet_20_Link"><text:span text:style-name="T81">linux@users</text:span></text:a><text:span text:style-name="T80">] </text:span><text:span text:style-name="T1418">cat /etc/hostname</text:span></text:p>
            <text:p text:style-name="P1219">kali</text:p>
          </table:table-cell>
        </table:table-row>
      </table:table>
      <text:p text:style-name="P1217"/>
      <text:p text:style-name="P1220"><text:span text:style-name="T1419">The </text:span><text:span text:style-name="T1291">sethostname</text:span><text:span text:style-name="T1419"> function does not change the content of the </text:span><text:span text:style-name="T1291">/etc/hostname</text:span><text:span text:style-name="T1419"> file, </text:span><text:span text:style-name="T1420">instead it change</text:span><text:span text:style-name="T1421">s</text:span><text:span text:style-name="T1420"> the </text:span><text:span text:style-name="T1291">/proc/sys/kernel/hostname</text:span><text:span text:style-name="T1420"> value. This will be the value until the next reboot or the next change.</text:span></text:p>
      <text:p text:style-name="P1221"/>
      <table:table table:name="Table180" table:style-name="Table180">
        <table:table-column table:style-name="Table180.A"/>
        <table:table-row>
          <table:table-cell table:style-name="Table180.A1" office:value-type="string">
            <text:p text:style-name="P1222"><text:span text:style-name="T80">[</text:span><text:a xlink:type="simple" xlink:href="mailto:linux@users" text:style-name="Internet_20_link" text:visited-style-name="Visited_20_Internet_20_Link"><text:span text:style-name="T81">linux@users</text:span></text:a><text:span text:style-name="T80">] </text:span><text:span text:style-name="T1422">cat </text:span><text:span text:style-name="T1423">/proc/sys/kernel/hostname</text:span></text:p>
            <text:p text:style-name="P1223">linux</text:p>
          </table:table-cell>
        </table:table-row>
      </table:table>
      <text:p text:style-name="P1224"/>
      <text:p text:style-name="P1225"><text:span text:style-name="T1421">T</text:span><text:span text:style-name="T1419">he same value </text:span><text:span text:style-name="T1421">can be retrieve from the</text:span><text:span text:style-name="T1419"> system configuration </text:span><text:span text:style-name="T1421">using the</text:span><text:span text:style-name="T1419"> </text:span><text:span text:style-name="T1291">sysctl</text:span><text:span text:style-name="T1291"><text:note text:id="ftn103" text:note-class="footnote"><text:note-citation>101</text:note-citation><text:note-body><text:p text:style-name="P1226"><text:span text:style-name="T1424">See the </text:span><text:span text:style-name="T1425">sysctl(8)</text:span><text:span text:style-name="T1426"> manual page</text:span></text:p></text:note-body></text:note></text:span><text:span text:style-name="T1419"> </text:span><text:span text:style-name="T1421">command.</text:span></text:p>
      <text:p text:style-name="P1227"/>
      <table:table table:name="Table179" table:style-name="Table179">
        <table:table-column table:style-name="Table179.A"/>
        <table:table-row>
          <table:table-cell table:style-name="Table179.A1" office:value-type="string">
            <text:p text:style-name="P1218"><text:span text:style-name="T80">[</text:span><text:a xlink:type="simple" xlink:href="mailto:linux@users" text:style-name="Internet_20_link" text:visited-style-name="Visited_20_Internet_20_Link"><text:span text:style-name="T81">linux@users</text:span></text:a><text:span text:style-name="T80">] sudo sysctl kernel.hostname</text:span></text:p>
            <text:p text:style-name="P1219">kernel.hostname = <text:span text:style-name="T1427">linux</text:span></text:p>
          </table:table-cell>
        </table:table-row>
      </table:table>
      <text:p text:style-name="P1228"/>
      <text:p text:style-name="P1228">The table below summarizes the different places where the hostname is stored and how it can be modified.</text:p>
      <text:p text:style-name="P1229"/>
      <table:table table:name="Table181" table:style-name="Table181">
        <table:table-column table:style-name="Table181.A"/>
        <table:table-column table:style-name="Table181.B"/>
        <table:table-column table:style-name="Table181.C"/>
        <table:table-row>
          <table:table-cell table:style-name="Table181.A1" office:value-type="string">
            <text:p text:style-name="P1230">File / System setting</text:p>
          </table:table-cell>
          <table:table-cell table:style-name="Table181.A1" office:value-type="string">
            <text:p text:style-name="P1230">Description</text:p>
          </table:table-cell>
          <table:table-cell table:style-name="Table181.C1" office:value-type="string">
            <text:p text:style-name="P1230">Change with</text:p>
          </table:table-cell>
        </table:table-row>
        <table:table-row>
          <table:table-cell table:style-name="Table181.A2" office:value-type="string">
            <text:p text:style-name="P1231">/<text:span text:style-name="T1427">etc/hostname</text:span></text:p>
          </table:table-cell>
          <table:table-cell table:style-name="Table181.A2" office:value-type="string">
            <text:p text:style-name="P1232">Global configuration read at the boot</text:p>
          </table:table-cell>
          <table:table-cell table:style-name="Table181.C2" office:value-type="string">
            <text:p text:style-name="P1232">Edit the file to change the value</text:p>
          </table:table-cell>
        </table:table-row>
        <table:table-row>
          <table:table-cell table:style-name="Table181.A2" office:value-type="string">
            <text:p text:style-name="P1231">/<text:span text:style-name="T1427">proc/sys/kernel/hostname</text:span></text:p>
          </table:table-cell>
          <table:table-cell table:style-name="Table181.A2" office:value-type="string">
            <text:p text:style-name="P1232">Kernel memory value</text:p>
          </table:table-cell>
          <table:table-cell table:style-name="Table181.C2" office:value-type="string">
            <text:p text:style-name="P1233">sethostname, hostname</text:p>
          </table:table-cell>
        </table:table-row>
        <table:table-row>
          <table:table-cell table:style-name="Table181.A2" office:value-type="string">
            <text:p text:style-name="P1234">kernel.hostname</text:p>
          </table:table-cell>
          <table:table-cell table:style-name="Table181.A2" office:value-type="string">
            <text:p text:style-name="P1232">Kernel memory value</text:p>
          </table:table-cell>
          <table:table-cell table:style-name="Table181.C2" office:value-type="string">
            <text:p text:style-name="P1233">sethostname, hostname</text:p>
          </table:table-cell>
        </table:table-row>
      </table:table>
      <text:p text:style-name="P1229"/>
      <text:p text:style-name="P1235"><text:span text:style-name="T90">Tab 2</text:span><text:span text:style-name="T361">2</text:span><text:span text:style-name="T90">.</text:span> File and settings related to the hostname</text:p>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236"><text:soft-page-break/>III.1<text:span text:style-name="T1428">1</text:span><text:span text:style-name="T1370"> </text:span><text:span text:style-name="T1429">Pluggable Authentication Modules</text:span></text:p>
      <text:p text:style-name="P1237"/>
      <text:p text:style-name="P1238"><text:span text:style-name="T1430">The login process on Linux is managed by the PAM</text:span><text:span text:style-name="T1430"><text:note text:id="ftn104" text:note-class="footnote"><text:note-citation>102</text:note-citation><text:note-body><text:p text:style-name="P1239"><text:span text:style-name="T1431">See the </text:span><text:span text:style-name="T1432">pam(7)</text:span><text:span text:style-name="T1433"> manual page</text:span></text:p></text:note-body></text:note></text:span><text:span text:style-name="T1430">. </text:span><text:span text:style-name="T1434">Linux-PAM is a system of libraries designed to handle the authentication of the applications. Also the </text:span><text:span text:style-name="T1435">login</text:span><text:span text:style-name="T1434"> program uses PAM to authenticate the user. The authentication process of PAM is configurable in a way that the system administrator can choose how an application will authenticate the users. The main configuratio</text:span><text:span text:style-name="T1436">n</text:span><text:span text:style-name="T1434"> file is </text:span><text:span text:style-name="T1435">/etc/pam.conf</text:span><text:span text:style-name="T1434"> and in the </text:span><text:span text:style-name="T1435">/etc/pam.d</text:span><text:span text:style-name="T1434"> folder there are the files related to the applications authentication configuration. If this directory exists, PAM will ignore the </text:span><text:span text:style-name="T1435">pam.conf</text:span><text:span text:style-name="T1434"> file. The</text:span></text:p>
      <text:p text:style-name="P1238"><text:span text:style-name="T1434">c</text:span><text:span text:style-name="T1430">onfiguration files </text:span><text:span text:style-name="T1434">in </text:span><text:span text:style-name="T1435">/etc/pam.d</text:span><text:span text:style-name="T1434"> </text:span><text:span text:style-name="T1430">define the connection between </text:span><text:span text:style-name="T1434">the </text:span><text:span text:style-name="T1430">applications (services) and the pluggable authentication modules (PAMs) that perform the actual authentication tasks.</text:span></text:p>
      <text:p text:style-name="P1240"/>
      <text:p text:style-name="P1240">The authentication tasks are separated in four groups: </text:p>
      <text:p text:style-name="P1240"/>
      <table:table table:name="Table182" table:style-name="Table182">
        <table:table-column table:style-name="Table182.A"/>
        <table:table-column table:style-name="Table182.B"/>
        <table:table-row>
          <table:table-cell table:style-name="Table182.A1" office:value-type="string">
            <text:p text:style-name="P1241">Account management</text:p>
          </table:table-cell>
          <table:table-cell table:style-name="Table182.B1" office:value-type="string">
            <text:p text:style-name="P183"><text:span text:style-name="T1437">A</text:span>ccount verification types of service: has the user's password expired?, is this user permitted access to the requested service?</text:p>
          </table:table-cell>
        </table:table-row>
        <table:table-row>
          <table:table-cell table:style-name="Table182.A2" office:value-type="string">
            <text:p text:style-name="P1241">Authentication management</text:p>
          </table:table-cell>
          <table:table-cell table:style-name="Table182.B2" office:value-type="string">
            <text:p text:style-name="P183"><text:span text:style-name="T1438">A</text:span>uthenticate a user and set up user credentials</text:p>
          </table:table-cell>
        </table:table-row>
        <table:table-row>
          <table:table-cell table:style-name="Table182.A2" office:value-type="string">
            <text:p text:style-name="P1241">Password management</text:p>
          </table:table-cell>
          <table:table-cell table:style-name="Table182.B2" office:value-type="string">
            <text:p text:style-name="P1242">Update authentication mechanism</text:p>
          </table:table-cell>
        </table:table-row>
        <table:table-row>
          <table:table-cell table:style-name="Table182.A2" office:value-type="string">
            <text:p text:style-name="P1241">Session management</text:p>
          </table:table-cell>
          <table:table-cell table:style-name="Table182.B2" office:value-type="string">
            <text:p text:style-name="P183"><text:span text:style-name="T1439">T</text:span>hings that should be done prior to a service being given and after it is withdrawn, <text:span text:style-name="T1439">e.g. mounting of the user home directory</text:span></text:p>
          </table:table-cell>
        </table:table-row>
      </table:table>
      <text:p text:style-name="P1240"/>
      <text:p text:style-name="P1243"><text:span text:style-name="T90">Tab 23.</text:span> PAM authentication tasks</text:p>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5"><text:soft-page-break/><text:span text:style-name="T1440">III.11.1 </text:span>PAM Authentication: <text:span text:style-name="T1441">pam_authenticate</text:span></text:p>
      <text:p text:style-name="P1244"/>
      <text:p text:style-name="P1246"><text:span text:style-name="T1442">To integrate PAM into the </text:span><text:span text:style-name="Source_20_Text"><text:span text:style-name="T1435">logincustom.c</text:span></text:span><text:span text:style-name="T1442"> program, we modify it so that authentication and session handling are delegated to PAM modules instead of manually checking </text:span><text:span text:style-name="Source_20_Text"><text:span text:style-name="T1435">/etc/shadow</text:span></text:span><text:span text:style-name="T1442"> and managing login logic ourselves. To support this change, we also create a PAM configuration file for the new </text:span><text:span text:style-name="Source_20_Text"><text:span text:style-name="T1435">loginpam.c</text:span></text:span><text:span text:style-name="T1442"> program.</text:span></text:p>
      <text:p text:style-name="P1247"/>
      <table:table table:name="Table183" table:style-name="Table183">
        <table:table-column table:style-name="Table183.A"/>
        <table:table-row>
          <table:table-cell table:style-name="Table183.A1" office:value-type="string">
            <text:p text:style-name="P1248"><text:span text:style-name="T80">[</text:span><text:a xlink:type="simple" xlink:href="mailto:linux@users" text:style-name="Internet_20_link" text:visited-style-name="Visited_20_Internet_20_Link"><text:span text:style-name="T81">linux@users</text:span></text:a><text:span text:style-name="T80">] </text:span><text:span text:style-name="T1443">sudo vi /etc/pam.d/</text:span><text:span text:style-name="T1444">loginpam</text:span></text:p>
            <text:p text:style-name="P1249"># /etc/pam.d/<text:span text:style-name="T1445">loginpam</text:span></text:p>
            <text:p text:style-name="P1249">auth <text:s text:c="9"/>required <text:s text:c="2"/>pam_unix.so</text:p>
            <text:p text:style-name="P1249">account <text:s text:c="3"/>required <text:s text:c="2"/>pam_unix.so</text:p>
          </table:table-cell>
        </table:table-row>
      </table:table>
      <text:p text:style-name="P1247"/>
      <text:p text:style-name="P1238"><text:span text:style-name="T1446">We have defined </text:span><text:span text:style-name="T1447">in the file </text:span><text:span text:style-name="T1448">loginpam</text:span><text:span text:style-name="T1447">,</text:span><text:span text:style-name="T1446"> two groups: </text:span><text:span text:style-name="T1435">auth</text:span><text:span text:style-name="T1446"> and </text:span><text:span text:style-name="T1435">account</text:span><text:span text:style-name="T1446">. </text:span><text:span text:style-name="T1447">The first column is the authentication task to perform, t</text:span><text:span text:style-name="T1446">he second column tells PAM that the module of the third column is required, </text:span><text:span text:style-name="T1447">t</text:span><text:span text:style-name="T1446">he third column is the library that will be used to manage the authentication task. </text:span></text:p>
      <text:p text:style-name="P1250"/>
      <text:p text:style-name="P1238"><text:span text:style-name="T1446">We modify the original </text:span><text:span text:style-name="Source_20_Text"><text:span text:style-name="T1448">logincustom.c</text:span></text:span><text:span text:style-name="T1446"> program so that it uses PAM (Pluggable Authentication Modules) instead of directly accessing </text:span><text:span text:style-name="Source_20_Text"><text:span text:style-name="T1448">/etc/shadow</text:span></text:span><text:span text:style-name="T1446"> via </text:span><text:span text:style-name="Source_20_Text"><text:span text:style-name="T1448">getspnam</text:span></text:span><text:span text:style-name="T1446"> and performing password verification with </text:span><text:span text:style-name="Source_20_Text"><text:span text:style-name="T1448">crypt</text:span></text:span><text:span text:style-name="T1446">. This results in a new version of the program called </text:span><text:span text:style-name="Source_20_Text"><text:span text:style-name="T1448">loginpam.c</text:span></text:span><text:span text:style-name="T1446">.</text:span></text:p>
      <text:p text:style-name="P1238"><text:span text:style-name="T1446">In this updated version, authentication is delegated to PAM, which provides a standardized and secure framework for handling user login requests. As a consequence, the manual retrieval of shadow entries and password hashing is removed from the code. However, the functions </text:span><text:span text:style-name="Source_20_Text"><text:span text:style-name="T1448">do_login_record</text:span></text:span><text:span text:style-name="T1446"> and </text:span><text:span text:style-name="Source_20_Text"><text:span text:style-name="T1448">do_logout_record</text:span></text:span><text:span text:style-name="T1446"> remain unchanged, since they are responsible for updating the </text:span><text:span text:style-name="Source_20_Text"><text:span text:style-name="T1448">utmp/wtmp</text:span></text:span><text:span text:style-name="T1446"> records and are independent of the authentication mechanism used.</text:span></text:p>
      <text:p text:style-name="P1250">This separation of concerns allows PAM to handle security and authentication, while the program continues to manage session accounting as before.</text:p>
      <text:p text:style-name="Horizontal_20_Line"/>
      <text:p text:style-name="P186"><text:span text:style-name="T1449">1 </text:span><text:span text:style-name="T115">#define _GNU_SOURCE</text:span></text:p>
      <text:p text:style-name="P1251"><text:span text:style-name="T1450">2</text:span><text:span text:style-name="T1449"> </text:span><text:span text:style-name="T115">#include </text:span><text:span text:style-name="T116">&lt;stdio.h&gt;</text:span></text:p>
      <text:p text:style-name="P1251"><text:span text:style-name="T1450">3</text:span><text:span text:style-name="T1449"> </text:span><text:span text:style-name="T115">#include </text:span><text:span text:style-name="T116">&lt;stdlib.h&gt;</text:span></text:p>
      <text:p text:style-name="P1251"><text:span text:style-name="T1450">4</text:span><text:span text:style-name="T1449"> </text:span><text:span text:style-name="T115">#include </text:span><text:span text:style-name="T116">&lt;string.h&gt;</text:span></text:p>
      <text:p text:style-name="P1251"><text:span text:style-name="T1450">5</text:span><text:span text:style-name="T1449"> </text:span><text:span text:style-name="T115">#include </text:span><text:span text:style-name="T116">&lt;unistd.h&gt;</text:span></text:p>
      <text:p text:style-name="P1251"><text:span text:style-name="T1450">6</text:span><text:span text:style-name="T1449"> </text:span><text:span text:style-name="T115">#include </text:span><text:span text:style-name="T116">&lt;pwd.h&gt;</text:span></text:p>
      <text:p text:style-name="P1251"><text:span text:style-name="T1450">7</text:span><text:span text:style-name="T1449"> </text:span><text:span text:style-name="T115">#include </text:span><text:span text:style-name="T116">&lt;grp.h&gt;</text:span></text:p>
      <text:p text:style-name="P1251"><text:span text:style-name="T1450">8</text:span><text:span text:style-name="T1449"> </text:span><text:span text:style-name="T115">#include </text:span><text:span text:style-name="T116">&lt;errno.h&gt;</text:span></text:p>
      <text:p text:style-name="P1251"><text:span text:style-name="T1450">9</text:span><text:span text:style-name="T1449"> </text:span><text:span text:style-name="T115">#include </text:span><text:span text:style-name="T116">&lt;utmp.h&gt;</text:span></text:p>
      <text:p text:style-name="P1251"><text:span text:style-name="T1450">10</text:span><text:span text:style-name="T1449"> </text:span><text:span text:style-name="T115">#include </text:span><text:span text:style-name="T116">&lt;time.h&gt;</text:span></text:p>
      <text:p text:style-name="P1251"><text:span text:style-name="T1449">1</text:span><text:span text:style-name="T1450">1</text:span><text:span text:style-name="T1449"> </text:span><text:span text:style-name="T115">#include </text:span><text:span text:style-name="T116">&lt;sys/types.h&gt;</text:span></text:p>
      <text:p text:style-name="P1251"><text:span text:style-name="T1449">1</text:span><text:span text:style-name="T1450">2</text:span><text:span text:style-name="T1449"> </text:span><text:span text:style-name="T115">#include </text:span><text:span text:style-name="T116">&lt;security/pam_appl.h&gt;</text:span></text:p>
      <text:p text:style-name="P1251"><text:span text:style-name="T1449">1</text:span><text:span text:style-name="T1450">3</text:span><text:span text:style-name="T1449"> </text:span><text:span text:style-name="T115">#include </text:span><text:span text:style-name="T116">&lt;security/pam_misc.h&gt;</text:span></text:p>
      <text:p text:style-name="P188"/>
      <text:p text:style-name="P1252"><text:span text:style-name="T1451">1</text:span><text:span text:style-name="T1452">4</text:span><text:span text:style-name="T1451"> </text:span><text:span text:style-name="T103">static</text:span><text:span text:style-name="T104"> </text:span><text:span text:style-name="T103">struct</text:span><text:span text:style-name="T104"> </text:span><text:span text:style-name="T103">pam_conv</text:span><text:span text:style-name="T104"> conv = {</text:span></text:p>
      <text:p text:style-name="P1251"><text:span text:style-name="T1449">1</text:span><text:span text:style-name="T1450">5</text:span><text:span text:style-name="T1449"> <text:tab/></text:span>misc_conv,<text:span text:style-name="T119"> </text:span></text:p>
      <text:p text:style-name="P1253"><text:span text:style-name="T1449">1</text:span><text:span text:style-name="T1450">6</text:span><text:span text:style-name="T1449"> <text:tab/></text:span>NULL</text:p>
      <text:p text:style-name="P1251"><text:span text:style-name="T1449">1</text:span><text:span text:style-name="T1450">7</text:span><text:span text:style-name="T1449"> </text:span>};</text:p>
      <text:p text:style-name="P188"/>
      <text:p text:style-name="P1251"><text:span text:style-name="T1449">1</text:span><text:span text:style-name="T1450">8</text:span><text:span text:style-name="T1449"> </text:span><text:span text:style-name="T115">int</text:span> main(<text:span text:style-name="T115">void</text:span>) {</text:p>
      <text:p text:style-name="P1251"><text:span text:style-name="T1449">1</text:span><text:span text:style-name="T1450">9</text:span><text:span text:style-name="T1449"> <text:tab/></text:span><text:span text:style-name="T115">char</text:span> username[<text:span text:style-name="T127">64</text:span>];</text:p>
      <text:p text:style-name="P1251"><text:span text:style-name="T1450">20</text:span><text:span text:style-name="T1449"> <text:tab/></text:span><text:span text:style-name="T115">struct</text:span> passwd *pw;</text:p>
      <text:p text:style-name="P1252"><text:span text:style-name="T1452">21</text:span><text:span text:style-name="T1451"> <text:tab/></text:span><text:span text:style-name="T103">pam_handle_t</text:span><text:span text:style-name="T104"> *pamh = </text:span><text:span text:style-name="T103">NULL</text:span><text:span text:style-name="T104">;</text:span></text:p>
      <text:p text:style-name="P1251"><text:soft-page-break/><text:span text:style-name="T1450">22</text:span><text:span text:style-name="T1449"> <text:tab/></text:span><text:span text:style-name="T115">int</text:span> pam_result;</text:p>
      <text:p text:style-name="P188"/>
      <text:p text:style-name="P1251"><text:span text:style-name="T1450">23</text:span><text:span text:style-name="T1449"> <text:tab/></text:span>printf(<text:span text:style-name="T116">"Login: "</text:span>);</text:p>
      <text:p text:style-name="P1251"><text:span text:style-name="T1450">24</text:span><text:span text:style-name="T1449"> <text:tab/></text:span>fflush(<text:span text:style-name="T115">stdout</text:span>);</text:p>
      <text:p text:style-name="P1251"><text:span text:style-name="T1450">25</text:span><text:span text:style-name="T1449"> <text:tab/></text:span><text:span text:style-name="T115">if</text:span> (!fgets(username, <text:span text:style-name="T115">sizeof</text:span>(username), <text:span text:style-name="T115">stdin</text:span>)) <text:span text:style-name="T115">return</text:span> <text:span text:style-name="T127">1</text:span>;</text:p>
      <text:p text:style-name="P1251"><text:span text:style-name="T1450">26</text:span><text:span text:style-name="T1449"> <text:tab/></text:span>username[strcspn(username, <text:span text:style-name="T116">"\n"</text:span>)] = <text:span text:style-name="T127">0</text:span>;</text:p>
      <text:p text:style-name="P188"/>
      <text:p text:style-name="P1251"><text:span text:style-name="T1450">27</text:span><text:span text:style-name="T1449"> <text:tab/></text:span>pam_result = <text:span text:style-name="T126">pam_start</text:span>(<text:span text:style-name="T116">"</text:span><text:span text:style-name="T1453">loginpam</text:span><text:span text:style-name="T116">"</text:span>, username, &amp;conv, &amp;pamh);</text:p>
      <text:p text:style-name="P1251"><text:span text:style-name="T1450">28</text:span><text:span text:style-name="T1449"> <text:tab/></text:span><text:span text:style-name="T115">if</text:span> (pam_result != <text:span text:style-name="T115">PAM_SUCCESS</text:span>) {</text:p>
      <text:p text:style-name="P1254"><text:span text:style-name="T1450">29</text:span><text:span text:style-name="T1449"> <text:tab/><text:tab/></text:span>fprintf(<text:span text:style-name="T115">stderr</text:span>, <text:span text:style-name="T116">"pam_start failed: %s\n"</text:span>, <text:span text:style-name="T1454">pam_strerror</text:span>(pamh, </text:p>
      <text:p text:style-name="P1254"><text:tab/><text:tab/><text:tab/> <text:s text:c="2"/>pam_result));</text:p>
      <text:p text:style-name="P1251"><text:span text:style-name="T1450">30</text:span><text:span text:style-name="T1449"> <text:tab/><text:tab/></text:span><text:span text:style-name="T115">return</text:span> <text:span text:style-name="T127">1</text:span>;</text:p>
      <text:p text:style-name="P1251"><text:span text:style-name="T1450">3</text:span><text:span text:style-name="T1449">1 <text:tab/></text:span>}</text:p>
      <text:p text:style-name="P188"/>
      <text:p text:style-name="P1252"><text:span text:style-name="T1452">32</text:span><text:span text:style-name="T1451"> <text:tab/></text:span><text:span text:style-name="T104">pam_result = </text:span><text:span text:style-name="T105">pam_authenticate</text:span><text:span text:style-name="T104">(pamh, </text:span><text:span text:style-name="T128">0</text:span><text:span text:style-name="T104">);</text:span></text:p>
      <text:p text:style-name="P1251"><text:span text:style-name="T1450">33</text:span><text:span text:style-name="T1449"> <text:tab/></text:span><text:span text:style-name="T115">if</text:span> (pam_result != <text:span text:style-name="T115">PAM_SUCCESS</text:span>) {</text:p>
      <text:p text:style-name="P1254"><text:span text:style-name="T1450">34</text:span><text:span text:style-name="T1449"> <text:tab/><text:tab/></text:span>fprintf(<text:span text:style-name="T115">stderr</text:span>, <text:span text:style-name="T116">"Authentication failed: %s\n"</text:span>, </text:p>
      <text:p text:style-name="P1255"><text:span text:style-name="T104"><text:tab/><text:tab/><text:tab/> <text:s text:c="2"/></text:span><text:span text:style-name="T1455">pam_strerror</text:span><text:span text:style-name="T104">(pamh, pam_result));</text:span></text:p>
      <text:p text:style-name="P1252"><text:span text:style-name="T1452">35</text:span><text:span text:style-name="T1451"> <text:tab/><text:tab/></text:span><text:span text:style-name="T105">pam_end</text:span><text:span text:style-name="T104">(pamh, pam_result);</text:span></text:p>
      <text:p text:style-name="P1251"><text:span text:style-name="T1450">36</text:span><text:span text:style-name="T1449"> <text:tab/></text:span><text:span text:style-name="T115">return</text:span> <text:span text:style-name="T127">1</text:span>;</text:p>
      <text:p text:style-name="P1251"><text:span text:style-name="T1450">37</text:span><text:span text:style-name="T1449"> <text:tab/></text:span>}</text:p>
      <text:p text:style-name="P188"/>
      <text:p text:style-name="P1252"><text:span text:style-name="T1452">38</text:span><text:span text:style-name="T1451"> <text:tab/></text:span><text:span text:style-name="T104">pam_result = </text:span><text:span text:style-name="T105">pam_acct_mgmt</text:span><text:span text:style-name="T104">(pamh, </text:span><text:span text:style-name="T128">0</text:span><text:span text:style-name="T104">);</text:span></text:p>
      <text:p text:style-name="P1251"><text:span text:style-name="T1450">39</text:span><text:span text:style-name="T1449"> <text:tab/></text:span><text:span text:style-name="T115">if</text:span> (pam_result != <text:span text:style-name="T115">PAM_SUCCESS</text:span>) {</text:p>
      <text:p text:style-name="P1255"><text:span text:style-name="T1452">40</text:span><text:span text:style-name="T1451"> <text:tab/><text:tab/></text:span><text:span text:style-name="T104">fprintf(</text:span><text:span text:style-name="T103">stderr</text:span><text:span text:style-name="T104">, </text:span><text:span text:style-name="T403">"Account not permitted: %s\n"</text:span><text:span text:style-name="T104">, <text:tab/><text:tab/><text:tab/><text:tab/><text:tab/><text:tab/> <text:s text:c="2"/></text:span><text:span text:style-name="T1455">pam_strerror</text:span><text:span text:style-name="T104">(pamh, </text:span><text:span text:style-name="T1451">1 </text:span><text:span text:style-name="T104">pam_result));</text:span></text:p>
      <text:p text:style-name="P1252"><text:span text:style-name="T1452">4</text:span><text:span text:style-name="T1451">1 <text:tab/><text:tab/></text:span><text:span text:style-name="T105">pam_end</text:span><text:span text:style-name="T104">(pamh, pam_result);</text:span></text:p>
      <text:p text:style-name="P1251"><text:span text:style-name="T1450">42</text:span><text:span text:style-name="T1449"> <text:tab/><text:tab/></text:span><text:span text:style-name="T115">return</text:span> <text:span text:style-name="T127">1</text:span>;</text:p>
      <text:p text:style-name="P1251"><text:span text:style-name="T1450">43</text:span><text:span text:style-name="T1449"> <text:tab/></text:span>}</text:p>
      <text:p text:style-name="P188"/>
      <text:p text:style-name="P1251"><text:span text:style-name="T1450">44</text:span><text:span text:style-name="T1449"> <text:tab/></text:span>printf(<text:span text:style-name="T116">"Welcome %s!\n"</text:span>, username);</text:p>
      <text:p text:style-name="P188"/>
      <text:p text:style-name="P1251"><text:span text:style-name="T1450">45</text:span><text:span text:style-name="T1449"> <text:tab/></text:span>pw = getpwnam(username);</text:p>
      <text:p text:style-name="P1251"><text:span text:style-name="T1450">46</text:span><text:span text:style-name="T1449"> <text:tab/></text:span><text:span text:style-name="T115">if</text:span> (!pw) {</text:p>
      <text:p text:style-name="P1251"><text:span text:style-name="T1450">47</text:span><text:span text:style-name="T1449"> <text:tab/><text:tab/></text:span>fprintf(<text:span text:style-name="T115">stderr</text:span>, <text:span text:style-name="T116">"getpwnam failed.\n"</text:span>);</text:p>
      <text:p text:style-name="P1252"><text:span text:style-name="T1452">48</text:span><text:span text:style-name="T1451"> <text:tab/><text:tab/></text:span><text:span text:style-name="T105">pam_end</text:span><text:span text:style-name="T104">(pamh, </text:span><text:span text:style-name="T103">PAM_SUCCESS</text:span><text:span text:style-name="T104">);</text:span></text:p>
      <text:p text:style-name="P1251"><text:span text:style-name="T1450">49</text:span><text:span text:style-name="T1449"> <text:tab/><text:tab/></text:span><text:span text:style-name="T115">return</text:span> <text:span text:style-name="T127">1</text:span>;</text:p>
      <text:p text:style-name="P1251"><text:span text:style-name="T1450">50</text:span><text:span text:style-name="T1449"> <text:tab/></text:span>}</text:p>
      <text:p text:style-name="P188"/>
      <text:p text:style-name="P1251"><text:span text:style-name="T1450">51</text:span><text:span text:style-name="T1449"> <text:tab/></text:span>do_login_record(username);</text:p>
      <text:p text:style-name="P188"/>
      <text:p text:style-name="P1254"><text:span text:style-name="T1450">52</text:span><text:span text:style-name="T1449"> <text:tab/></text:span><text:span text:style-name="T115">if</text:span> (initgroups(username, pw-&gt;pw_gid) &lt; <text:span text:style-name="T127">0</text:span> || setgid(pw-&gt;pw_gid) &lt; <text:span text:style-name="T127">0</text:span> </text:p>
      <text:p text:style-name="P1254"><text:tab/> <text:s text:c="3"/>|| setuid(pw-&gt;pw_uid) &lt; <text:span text:style-name="T127">0</text:span>) {</text:p>
      <text:p text:style-name="P1251"><text:span text:style-name="T1450">53<text:tab/> <text:s text:c="2"/></text:span><text:span text:style-name="T1449"><text:s/><text:tab/> </text:span>perror(<text:span text:style-name="T116">"Failed to drop privileges"</text:span>);</text:p>
      <text:p text:style-name="P1252"><text:span text:style-name="T1452">54</text:span><text:span text:style-name="T1451"> <text:tab/><text:tab/> </text:span><text:span text:style-name="T105">pam_end</text:span><text:span text:style-name="T104">(pamh, </text:span><text:span text:style-name="T103">PAM_SUCCESS</text:span><text:span text:style-name="T104">);</text:span></text:p>
      <text:p text:style-name="P1251"><text:span text:style-name="T1450">55</text:span><text:span text:style-name="T1449"> <text:tab/><text:tab/> </text:span><text:span text:style-name="T115">return</text:span> <text:span text:style-name="T127">1</text:span>;</text:p>
      <text:p text:style-name="P1251"><text:span text:style-name="T1450">56</text:span><text:span text:style-name="T1449"> <text:tab/></text:span>}</text:p>
      <text:p text:style-name="P188"/>
      <text:p text:style-name="P1254"><text:span text:style-name="T1450">57</text:span><text:span text:style-name="T1449"> <text:tab/></text:span><text:span text:style-name="T115">char</text:span> *shell = pw-&gt;pw_shell &amp;&amp; pw-&gt;pw_shell[<text:span text:style-name="T127">0</text:span>] ? pw-&gt;pw_shell : </text:p>
      <text:p text:style-name="P1254"><text:span text:style-name="T116"><text:tab/><text:tab/><text:tab/> <text:s text:c="2"/>"/bin/sh"</text:span>;</text:p>
      <text:p text:style-name="P1256"><text:span text:style-name="T1456">58</text:span><text:span text:style-name="T1457"> <text:tab/></text:span><text:span text:style-name="T124">execlp(shell, shell, (</text:span><text:span text:style-name="T101">char</text:span><text:span text:style-name="T124"> *)</text:span><text:span text:style-name="T101">NULL</text:span><text:span text:style-name="T124">);</text:span></text:p>
      <text:p text:style-name="P1251"><text:soft-page-break/><text:span text:style-name="T1450">59</text:span><text:span text:style-name="T1449"> <text:tab/></text:span>perror(<text:span text:style-name="T116">"Failed to exec shell"</text:span>);</text:p>
      <text:p text:style-name="P1251"><text:span text:style-name="T1450">60</text:span><text:span text:style-name="T1449"> <text:tab/></text:span>do_logout_record();</text:p>
      <text:p text:style-name="P1252"><text:span text:style-name="T1452">6</text:span><text:span text:style-name="T1451">1 <text:tab/></text:span><text:span text:style-name="T105">pam_end</text:span><text:span text:style-name="T104">(pamh, </text:span><text:span text:style-name="T103">PAM_SUCCESS</text:span><text:span text:style-name="T104">);</text:span></text:p>
      <text:p text:style-name="P1251"><text:span text:style-name="T1450">62</text:span><text:span text:style-name="T1449"> <text:tab/></text:span><text:span text:style-name="T115">return</text:span> <text:span text:style-name="T127">1</text:span>;</text:p>
      <text:p text:style-name="P1256"><text:span text:style-name="T1456">63</text:span><text:span text:style-name="T1457"> </text:span><text:span text:style-name="T124">}</text:span></text:p>
      <text:p text:style-name="Horizontal_20_Line"/>
      <text:p text:style-name="P1257"><text:span text:style-name="T90">loginpam.c</text:span> Login using PAM</text:p>
      <text:p text:style-name="P307"/>
      <text:p text:style-name="Standard"><text:span text:style-name="Strong_20_Emphasis"><text:span text:style-name="T731">Line 14–17.</text:span></text:span><text:span text:style-name="T731"> Defines the PAM conversation structure, which uses </text:span><text:span text:style-name="Source_20_Text"><text:span text:style-name="T221">misc_conv</text:span></text:span><text:span text:style-name="T731"> to interact with the <text:tab/> <text:s text:c="7"/>user (for example, to prompt for a password)</text:span></text:p>
      <text:p text:style-name="Standard"><text:span text:style-name="Strong_20_Emphasis"><text:span text:style-name="T731">Line 23–26.</text:span></text:span><text:span text:style-name="T731"> Prompts the user for a username and removes the trailing newline from the input</text:span></text:p>
      <text:p text:style-name="Standard"><text:span text:style-name="Strong_20_Emphasis"><text:span text:style-name="T731">Line 27–31.</text:span></text:span><text:span text:style-name="T731"> Initializes a PAM transaction using </text:span><text:span text:style-name="Source_20_Text"><text:span text:style-name="T221">pam_start</text:span></text:span><text:span text:style-name="T731"> with the service name </text:span><text:span text:style-name="Source_20_Text"><text:span text:style-name="T731">"</text:span></text:span><text:span text:style-name="Source_20_Text"><text:span text:style-name="T221">loginpam</text:span></text:span><text:span text:style-name="Source_20_Text"><text:span text:style-name="T1458">"</text:span></text:span><text:span text:style-name="T731">. <text:tab/> <text:s text:c="7"/>If initialization fails, the program terminates with an error</text:span></text:p>
      <text:p text:style-name="Standard"><text:span text:style-name="Strong_20_Emphasis"><text:span text:style-name="T731">Line 32–37.</text:span></text:span><text:span text:style-name="T731"> Performs authentication using </text:span><text:span text:style-name="Source_20_Text"><text:span text:style-name="T221">pam_authenticate</text:span></text:span><text:span text:style-name="T731">. If authentication fails, the PAM <text:tab/> <text:s text:c="7"/>session is properly closed with </text:span><text:span text:style-name="Source_20_Text"><text:span text:style-name="T221">pam_end</text:span></text:span><text:span text:style-name="T731"> and the program exits</text:span></text:p>
      <text:p text:style-name="Standard"><text:span text:style-name="Strong_20_Emphasis"><text:span text:style-name="T731">Line 38–43.</text:span></text:span><text:span text:style-name="T731"> Performs account management checks using </text:span><text:span text:style-name="Source_20_Text"><text:span text:style-name="T221">pam_acct_mgmt</text:span></text:span><text:span text:style-name="T731">, which verifies <text:tab/> <text:s text:c="2"/><text:tab/> <text:s text:c="7"/>whether the account is permitted to log in (e.g., not expired or disabled)</text:span></text:p>
      <text:p text:style-name="Standard"><text:span text:style-name="Strong_20_Emphasis"><text:span text:style-name="T731">Line 44.</text:span></text:span><text:span text:style-name="T731"> Prints a welcome message if authentication succeeds</text:span></text:p>
      <text:p text:style-name="Standard"><text:span text:style-name="Strong_20_Emphasis"><text:span text:style-name="T731">Line 45–50.</text:span></text:span><text:span text:style-name="T731"> Retrieves the user’s system entry from </text:span><text:span text:style-name="Source_20_Text"><text:span text:style-name="T221">/etc/passwd</text:span></text:span><text:span text:style-name="T731"> using </text:span><text:span text:style-name="Source_20_Text"><text:span text:style-name="T221">getpwnam</text:span></text:span><text:span text:style-name="T731">. This is <text:tab/> <text:tab/> <text:s text:c="7"/>needed to obtain UID, GID, and shell information</text:span></text:p>
      <text:p text:style-name="Standard"><text:span text:style-name="Strong_20_Emphasis"><text:span text:style-name="T731">Line 51.</text:span></text:span><text:span text:style-name="T731"> Calls </text:span><text:span text:style-name="Source_20_Text"><text:span text:style-name="T221">do_login_record</text:span></text:span><text:span text:style-name="T731"> to record the login event in </text:span><text:span text:style-name="Source_20_Text"><text:span text:style-name="T221">utmp/wtmp</text:span></text:span></text:p>
      <text:p text:style-name="Standard"><text:span text:style-name="Strong_20_Emphasis"><text:span text:style-name="T731">Line 52–56.</text:span></text:span><text:span text:style-name="T731"> Sets group membership (</text:span><text:span text:style-name="Source_20_Text"><text:span text:style-name="T221">initgroups</text:span></text:span><text:span text:style-name="T731">) and drops privileges by switching to the <text:tab/> <text:s text:c="3"/><text:tab/> <text:s text:c="7"/>user’s UID and GID</text:span></text:p>
      <text:p text:style-name="Standard"><text:span text:style-name="Strong_20_Emphasis"><text:span text:style-name="T731">Line 57–58.</text:span></text:span><text:span text:style-name="T731"> Launches the user’s login shell using </text:span><text:span text:style-name="Source_20_Text"><text:span text:style-name="T221">execlp</text:span></text:span><text:span text:style-name="T731">, replacing the current process image</text:span></text:p>
      <text:p text:style-name="Standard"><text:span text:style-name="Strong_20_Emphasis"><text:span text:style-name="T731">Line 59–62.</text:span></text:span><text:span text:style-name="T731"> These lines execute only if </text:span><text:span text:style-name="Source_20_Text"><text:span text:style-name="T221">execlp</text:span></text:span><text:span text:style-name="T731"> fails. In that case, the program prints an error, <text:tab/> <text:s text:c="7"/>records logout, and ends the PAM session</text:span></text:p>
      <text:p text:style-name="P1258"/>
      <text:p text:style-name="P1259"><text:span text:style-name="T1459">To access the manual pages and development resources for PAM-related functions, it is necessary to install the </text:span><text:span text:style-name="Source_20_Text"><text:span text:style-name="T1460">libpam0g-dev</text:span></text:span><text:span text:style-name="T1459"> package. This package provides the headers, documentation, and development files required to work with PAM APIs such as </text:span><text:span text:style-name="Source_20_Text"><text:span text:style-name="T1460">pam_start</text:span></text:span><text:span text:style-name="T1459">, </text:span><text:span text:style-name="Source_20_Text"><text:span text:style-name="T1460">pam_authenticate</text:span></text:span><text:span text:style-name="T1459">, and </text:span><text:span text:style-name="Source_20_Text"><text:span text:style-name="T1460">pam_acct_mgmt</text:span></text:span><text:span text:style-name="T1459">, as well as their corresponding manual pages.</text:span></text:p>
      <text:p text:style-name="P1260"/>
      <table:table table:name="Table184" table:style-name="Table184">
        <table:table-column table:style-name="Table184.A"/>
        <table:table-row>
          <table:table-cell table:style-name="Table184.A1" office:value-type="string">
            <text:p text:style-name="P1261"><text:span text:style-name="T80">[</text:span><text:a xlink:type="simple" xlink:href="mailto:linux@users" text:style-name="Internet_20_link" text:visited-style-name="Visited_20_Internet_20_Link"><text:span text:style-name="T81">linux@users</text:span></text:a><text:span text:style-name="T80">] </text:span><text:span text:style-name="T1443">sudo </text:span><text:span text:style-name="T1461">apt install libpam0g-dev</text:span></text:p>
            <text:p text:style-name="P1262"/>
          </table:table-cell>
        </table:table-row>
      </table:table>
      <text:p text:style-name="P1260"/>
      <text:p text:style-name="P1258"><text:span text:style-name="T1462">The prototypes of</text:span> <text:span text:style-name="T1463">the used</text:span> functions <text:span text:style-name="T1462">are as follows.</text:span></text:p>
      <text:p text:style-name="P1258"/>
      <table:table table:name="Table185" table:style-name="Table185">
        <table:table-column table:style-name="Table185.A"/>
        <table:table-row>
          <table:table-cell table:style-name="Table185.A1" office:value-type="string">
            <text:p text:style-name="P271"><text:span text:style-name="T115">#include </text:span><text:span text:style-name="T116">&lt;security/pam_appl.h&gt;</text:span></text:p>
            <text:p text:style-name="P188"/>
            <text:p text:style-name="P1263"><text:span text:style-name="T103">int</text:span><text:span text:style-name="T104"> </text:span><text:span text:style-name="T105">pam_start</text:span><text:span text:style-name="T104">(</text:span><text:span text:style-name="T103">const</text:span><text:span text:style-name="T104"> </text:span><text:span text:style-name="T103">char</text:span><text:span text:style-name="T104"> </text:span><text:span text:style-name="T106">*service_name</text:span><text:span text:style-name="T104">, </text:span><text:span text:style-name="T103">const</text:span><text:span text:style-name="T104"> </text:span><text:span text:style-name="T103">char</text:span><text:span text:style-name="T104"> </text:span><text:span text:style-name="T106">*user</text:span><text:span text:style-name="T104">, </text:span><text:span text:style-name="T103">const</text:span><text:span text:style-name="T104"> </text:span><text:span text:style-name="T103">struct</text:span><text:span text:style-name="T104"> </text:span></text:p>
            <text:p text:style-name="P1263"><text:span text:style-name="T104"><text:s text:c="14"/></text:span><text:span text:style-name="T103">pam_conv</text:span><text:span text:style-name="T104"> </text:span><text:span text:style-name="T106">*pam_conversation</text:span><text:span text:style-name="T104">, </text:span><text:span text:style-name="T103">pam_handle_t</text:span><text:span text:style-name="T104"> </text:span><text:span text:style-name="T106">**pamh</text:span><text:span text:style-name="T104">);</text:span></text:p>
            <text:p text:style-name="P188"/>
            <text:p text:style-name="P1263"><text:span text:style-name="T103">int</text:span><text:span text:style-name="T104"> </text:span><text:span text:style-name="T105">pam_start_confdir</text:span><text:span text:style-name="T104">(</text:span><text:span text:style-name="T103">const</text:span><text:span text:style-name="T104"> </text:span><text:span text:style-name="T103">char</text:span><text:span text:style-name="T104"> </text:span><text:span text:style-name="T106">*service_name</text:span><text:span text:style-name="T104">, </text:span><text:span text:style-name="T103">const</text:span><text:span text:style-name="T104"> </text:span><text:span text:style-name="T103">char</text:span><text:span text:style-name="T104"> </text:span><text:span text:style-name="T106">*user</text:span><text:span text:style-name="T104">, </text:span><text:span text:style-name="T103">const</text:span><text:span text:style-name="T104"> </text:span></text:p>
            <text:p text:style-name="P1263"><text:span text:style-name="T104"><text:s text:c="22"/></text:span><text:span text:style-name="T103">struct</text:span><text:span text:style-name="T104"> </text:span><text:span text:style-name="T103">pam_conv</text:span><text:span text:style-name="T104"> </text:span><text:span text:style-name="T106">*pam_conversation</text:span><text:span text:style-name="T104">, </text:span><text:span text:style-name="T103">const</text:span><text:span text:style-name="T104"> </text:span><text:span text:style-name="T103">char</text:span><text:span text:style-name="T104"> <text:s/></text:span></text:p>
            <text:p text:style-name="P1263"><text:span text:style-name="T106"><text:s text:c="22"/>*confdir</text:span><text:span text:style-name="T104">, </text:span><text:span text:style-name="T103">pam_handle_t</text:span><text:span text:style-name="T104"> </text:span><text:span text:style-name="T106">**pamh</text:span><text:span text:style-name="T104">);</text:span></text:p>
            <text:p text:style-name="P283"/>
            <text:p text:style-name="P1264">Return: PAM_SUCCESS <text:span text:style-name="T1464">| PAM_ABORT | PAM_BUF_ERR | PAM_SYSTEM_ERR</text:span></text:p>
          </table:table-cell>
        </table:table-row>
      </table:table>
      <text:p text:style-name="P1258"/>
      <text:p text:style-name="P1265"><text:soft-page-break/><text:span text:style-name="T1465">The </text:span><text:span text:style-name="T1466">pam_start</text:span><text:span text:style-name="T1465"><text:note text:id="ftn105" text:note-class="footnote"><text:note-citation>103</text:note-citation><text:note-body><text:p text:style-name="P250"><text:span text:style-name="T1467">See the </text:span><text:span text:style-name="T1468">pam_start(3)</text:span><text:span text:style-name="T1469"> manual page</text:span></text:p></text:note-body></text:note></text:span><text:span text:style-name="T1465"> function creates the PAM context and initiates the PAM transaction. </text:span><text:span text:style-name="T1470">The </text:span><text:span text:style-name="T1466">service_name</text:span><text:span text:style-name="T1471"> argument is the name of the application for which the context will be created and</text:span><text:span text:style-name="T1470"> it will be stored as a </text:span><text:span text:style-name="T1466">PAM_SERVICE</text:span><text:span text:style-name="T1470">, the argument </text:span><text:span text:style-name="T1466">user</text:span><text:span text:style-name="T1470"> specifies the target user and it will be stored as </text:span><text:span text:style-name="T1466">PAM_USER</text:span><text:span text:style-name="T1470"> in the context, the </text:span><text:span text:style-name="T1466">pam_conversation</text:span><text:span text:style-name="T1470"> argument defines the conversation function to use (it is needed for the direct communication between a loaded module and the application), the </text:span><text:span text:style-name="T1466">pamh</text:span><text:span text:style-name="T1470"> argument is the handle that contains the PAM context after a successful call (</text:span><text:span text:style-name="T1466">PAM_SUCCESS</text:span><text:span text:style-name="T1470">). </text:span></text:p>
      <text:p text:style-name="P1265"><text:span text:style-name="T1472">The </text:span><text:span text:style-name="T1466">pam_start_confdir</text:span><text:span text:style-name="T1472"> works like </text:span><text:span text:style-name="T1466">pam_start</text:span><text:span text:style-name="T1472"> but allows to specify a configuration directory to use at the place of </text:span><text:span text:style-name="T1466">/etc/pam.d</text:span><text:span text:style-name="T1472"> (default). </text:span><text:span text:style-name="T1470"><text:s/></text:span></text:p>
      <text:p text:style-name="P1266"/>
      <text:p text:style-name="P644"><text:span text:style-name="T1473">The </text:span><text:span text:style-name="T1466">pam_authenticate</text:span><text:span text:style-name="T1466"><text:note text:id="ftn106" text:note-class="footnote"><text:note-citation>104</text:note-citation><text:note-body><text:p text:style-name="P1239"><text:span text:style-name="T1474">See the </text:span><text:span text:style-name="T1475">pam_authenticate(3)</text:span><text:span text:style-name="T1476"> manual page</text:span></text:p></text:note-body></text:note></text:span><text:span text:style-name="T1473"> function performs the account authentication and is defined as follows. </text:span></text:p>
      <text:p text:style-name="P1266"/>
      <table:table table:name="Table186" table:style-name="Table186">
        <table:table-column table:style-name="Table186.A"/>
        <table:table-row>
          <table:table-cell table:style-name="Table186.A1" office:value-type="string">
            <text:p text:style-name="P271"><text:span text:style-name="T115">#include </text:span><text:span text:style-name="T116">&lt;security/pam_appl.h&gt;</text:span></text:p>
            <text:p text:style-name="P188"/>
            <text:p text:style-name="P201"><text:span text:style-name="T103">int</text:span><text:span text:style-name="T104"> </text:span><text:span text:style-name="T105">pam_authenticate</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flags</text:span><text:span text:style-name="T104">);</text:span></text:p>
            <text:p text:style-name="P188"/>
            <text:p text:style-name="P1267">Returns: PAM_SUCCESS | PAM_ABORT | PAM_AUTH_ERR | PAM_CRED_INSUFFICIENT | PAM_AUTHINFO_UNAVAIL | PAM_MAXTRIES | PAM_USER_UNKNOWN</text:p>
          </table:table-cell>
        </table:table-row>
      </table:table>
      <text:p text:style-name="P1266"/>
      <text:p text:style-name="P1268"><text:span text:style-name="T1477">The </text:span><text:span text:style-name="T1466">pamh</text:span><text:span text:style-name="T1477"> argument is the handle returned by a previous call to </text:span><text:span text:style-name="T1466">pam_start</text:span><text:span text:style-name="T1477">, </text:span><text:span text:style-name="T1478">and </text:span><text:span text:style-name="T1477">the </text:span><text:span text:style-name="T1466">flags</text:span><text:span text:style-name="T1477"> argument </text:span><text:span text:style-name="T1479">can be zero or more of the following values:</text:span></text:p>
      <text:p text:style-name="P1269"/>
      <table:table table:name="Table187" table:style-name="Table187">
        <table:table-column table:style-name="Table187.A"/>
        <table:table-column table:style-name="Table187.B"/>
        <table:table-row>
          <table:table-cell table:style-name="Table187.A1" office:value-type="string">
            <text:p text:style-name="P1270">PAM_SILENT</text:p>
          </table:table-cell>
          <table:table-cell table:style-name="Table187.B1" office:value-type="string">
            <text:p text:style-name="P183">Do not emit any messages</text:p>
          </table:table-cell>
        </table:table-row>
        <table:table-row>
          <table:table-cell table:style-name="Table187.A2" office:value-type="string">
            <text:p text:style-name="P1270">PAM_DISALLOW_NULL_AUTHTOK</text:p>
          </table:table-cell>
          <table:table-cell table:style-name="Table187.B2" office:value-type="string">
            <text:p text:style-name="P1265"><text:span text:style-name="T456">The PAM module service should return </text:span><text:span text:style-name="T1466">PAM_AUTH_ERR</text:span><text:span text:style-name="T456"> if the user does not have a registered authentication token</text:span></text:p>
          </table:table-cell>
        </table:table-row>
      </table:table>
      <text:p text:style-name="P1269"/>
      <text:p text:style-name="P1271"><text:span text:style-name="T1480">Tab 2</text:span><text:span text:style-name="T503">4</text:span><text:span text:style-name="T1480">.</text:span><text:span text:style-name="T1479"> Values of the </text:span><text:span text:style-name="T1466">flags</text:span><text:span text:style-name="T1479"> argument</text:span></text:p>
      <text:p text:style-name="P1266"/>
      <text:p text:style-name="P1265"><text:span text:style-name="T1466">pam_authenticate</text:span><text:span text:style-name="T1481"> authenticate</text:span><text:span text:style-name="T1478">s</text:span><text:span text:style-name="T1481"> the user with the name passed before to </text:span><text:span text:style-name="T1466">pam_start</text:span><text:span text:style-name="T1481">.</text:span></text:p>
      <text:p text:style-name="P1272"/>
      <text:p text:style-name="P1265"><text:span text:style-name="T1481">The </text:span><text:span text:style-name="T1466">pam_acct_mgmt</text:span><text:span text:style-name="T1466"><text:note text:id="ftn107" text:note-class="footnote"><text:note-citation>105</text:note-citation><text:note-body><text:p text:style-name="P1239"><text:span text:style-name="T1482">See the </text:span><text:span text:style-name="T1483">pam_acct_mgmt(3)</text:span><text:span text:style-name="T1476"> manual page</text:span></text:p></text:note-body></text:note></text:span><text:span text:style-name="T1481"> </text:span><text:span text:style-name="T1478">function </text:span><text:span text:style-name="T1481">validates the account and is defined as follows.</text:span></text:p>
      <text:p text:style-name="P1273"/>
      <table:table table:name="Table188" table:style-name="Table188">
        <table:table-column table:style-name="Table188.A"/>
        <table:table-row>
          <table:table-cell table:style-name="Table188.A1" office:value-type="string">
            <text:p text:style-name="P1274"><text:span text:style-name="T101">#include </text:span><text:span text:style-name="T102">&lt;security/pam_appl.h&gt;</text:span></text:p>
            <text:p text:style-name="P1275"/>
            <text:p text:style-name="P229"><text:span text:style-name="T1484">int</text:span><text:span text:style-name="T1485"> </text:span><text:span text:style-name="T1486">pam_acct_mgmt</text:span><text:span text:style-name="T1485">(</text:span><text:span text:style-name="T1484">pam_handle_t</text:span><text:span text:style-name="T1485"> </text:span><text:span text:style-name="T1487">*pamh</text:span><text:span text:style-name="T1485">, </text:span><text:span text:style-name="T1484">int</text:span><text:span text:style-name="T1485"> </text:span><text:span text:style-name="T1487">flags</text:span><text:span text:style-name="T1485">);</text:span></text:p>
            <text:p text:style-name="P183"/>
            <text:p text:style-name="P1276">Returns: PAM_SUCCESS <text:span text:style-name="T1488">| PAM_ACCT_EXPIRED | PAM_AUTH_ERR | PAM_NEW_AUTHTOK_REQD | PAM_PERM_DENIED | PAM_USER_UNKNOWN</text:span></text:p>
          </table:table-cell>
        </table:table-row>
      </table:table>
      <text:p text:style-name="P1273"/>
      <text:p text:style-name="P1277">The function checks if the user’s account is valid. It checks: the authentication token (password, finger print, etc..), the account expiration and access restriction. </text:p>
      <text:p text:style-name="P1268"><text:span text:style-name="T1489">The </text:span><text:span text:style-name="T1466">pamh</text:span><text:span text:style-name="T1489"> parameter is the handle, </text:span><text:span text:style-name="T1478">and </text:span><text:span text:style-name="T1466">flags</text:span><text:span text:style-name="T1489"> </text:span><text:span text:style-name="T1478">may take </text:span><text:span text:style-name="T1489">the values listed in the </text:span><text:span text:style-name="T1478">T</text:span><text:span text:style-name="T1489">able 22. </text:span></text:p>
      <text:p text:style-name="P1240"/>
      <text:p text:style-name="P1268"><text:span text:style-name="T1490">The </text:span><text:span text:style-name="T1466">pam_end</text:span><text:span text:style-name="T1490"><text:note text:id="ftn108" text:note-class="footnote"><text:note-citation>106</text:note-citation><text:note-body><text:p text:style-name="P1239"><text:span text:style-name="T1482">See the </text:span><text:span text:style-name="T1483">pam_end(3)</text:span><text:span text:style-name="T1476"> manual page</text:span></text:p></text:note-body></text:note></text:span><text:span text:style-name="T1490"> function </text:span><text:span text:style-name="T1491">terminates the PAM transaction. It is the last function an application should call in the PAM context and is defined as follows.</text:span></text:p>
      <table:table table:name="Table189" table:style-name="Table189">
        <table:table-column table:style-name="Table189.A"/>
        <text:soft-page-break/>
        <table:table-row>
          <table:table-cell table:style-name="Table189.A1" office:value-type="string">
            <text:p text:style-name="P1278"><text:span text:style-name="T101">#include </text:span><text:span text:style-name="T102">&lt;security/pam_appl.h&gt;</text:span></text:p>
            <text:p text:style-name="P1279"/>
            <text:p text:style-name="P1280"><text:span text:style-name="T103">int</text:span><text:span text:style-name="T104"> </text:span><text:span text:style-name="T105">pam_end</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pam_status</text:span><text:span text:style-name="T104">);</text:span></text:p>
            <text:p text:style-name="P1281"/>
            <text:p text:style-name="P1282">Returns: PAM_SUCCESS <text:span text:style-name="T1492">| PAM_SYSTEM_ERR</text:span></text:p>
          </table:table-cell>
        </table:table-row>
      </table:table>
      <text:p text:style-name="P1283"/>
      <text:p text:style-name="P1265"><text:span text:style-name="T1493">The </text:span><text:span text:style-name="T1466">pam_status</text:span><text:span text:style-name="T1493"> argument should be set to the value returned to the application by the last PAM library call </text:span><text:span text:style-name="T1494">and it will be passed to the module callback function in a way the module can know if the last PAM call has terminated successfully or </text:span><text:span text:style-name="T1495">i</text:span><text:span text:style-name="T1496">f </text:span><text:span text:style-name="T1494">it has failed. </text:span><text:span text:style-name="T1497">This function free all the memory for the items associated with the handle. </text:span></text:p>
      <text:p text:style-name="P1284"/>
      <text:p text:style-name="P644"><text:span text:style-name="T1498">The </text:span><text:span text:style-name="T1466">pam_strerror</text:span><text:span text:style-name="T1498"> function returns a pointer to a string describing the PAM error code.</text:span></text:p>
      <text:p text:style-name="P1285"/>
      <table:table table:name="Table190" table:style-name="Table190">
        <table:table-column table:style-name="Table190.A"/>
        <table:table-row>
          <table:table-cell table:style-name="Table190.A1" office:value-type="string">
            <text:p text:style-name="P271"><text:span text:style-name="T115">#include </text:span><text:span text:style-name="T116">&lt;security/pam_appl.h&gt;</text:span></text:p>
            <text:p text:style-name="P188"/>
            <text:p text:style-name="P229"><text:span text:style-name="T103">const</text:span><text:span text:style-name="T104"> </text:span><text:span text:style-name="T103">char</text:span><text:span text:style-name="T104"> *</text:span><text:span text:style-name="T105">pam_strerror</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errnum</text:span><text:span text:style-name="T104">);</text:span></text:p>
            <text:p text:style-name="P186"/>
            <text:p text:style-name="P1286">Returns: a pointer to string describing the error</text:p>
          </table:table-cell>
        </table:table-row>
      </table:table>
      <text:p text:style-name="P1287"/>
      <text:p text:style-name="P1288"><text:span text:style-name="T1499">We compile the program by linking it against the PAM-related libraries (</text:span><text:span text:style-name="Source_20_Text"><text:span text:style-name="T1500">libpam</text:span></text:span><text:span text:style-name="T1499">, </text:span><text:span text:style-name="Source_20_Text"><text:span text:style-name="T1500">libpam_misc</text:span></text:span><text:span text:style-name="T1499">) and the utility library (</text:span><text:span text:style-name="Source_20_Text"><text:span text:style-name="T1500">libutil</text:span></text:span><text:span text:style-name="T1499">), since the program relies on PAM functions and helper utilities for authentication and session handling. To execute the program correctly, it must be run with elevated privileges because it performs authentication and changes the user’s identity.</text:span></text:p>
      <text:p text:style-name="P1289"/>
      <table:table table:name="Table191" table:style-name="Table191">
        <table:table-column table:style-name="Table191.A"/>
        <table:table-row>
          <table:table-cell table:style-name="Table191.A1" office:value-type="string">
            <text:p text:style-name="P1290"><text:span text:style-name="T80">[</text:span><text:a xlink:type="simple" xlink:href="mailto:linux@users" text:style-name="Internet_20_link" text:visited-style-name="Visited_20_Internet_20_Link"><text:span text:style-name="T81">linux@users</text:span></text:a><text:span text:style-name="T80">] gcc -o loginpam loginpam.c -lpam -lpam_misc -lutil</text:span></text:p>
            <text:p text:style-name="P1290"/>
            <text:p text:style-name="P1291"><text:span text:style-name="T80">[</text:span><text:a xlink:type="simple" xlink:href="mailto:linux@users" text:style-name="Internet_20_link" text:visited-style-name="Visited_20_Internet_20_Link"><text:span text:style-name="T81">linux@users</text:span></text:a><text:span text:style-name="T80">] </text:span><text:span text:style-name="T1501">sudo </text:span><text:span text:style-name="T80">./</text:span><text:span text:style-name="T1502">loginpam</text:span></text:p>
            <text:p text:style-name="P1291">Login: newuser</text:p>
            <text:p text:style-name="P1291">Password: </text:p>
            <text:p text:style-name="P1291">Welcome newuser!</text:p>
            <text:p text:style-name="P1291">$ whoami</text:p>
            <text:p text:style-name="P1291">newuser</text:p>
          </table:table-cell>
        </table:table-row>
      </table:table>
      <text:p text:style-name="P1292"/>
      <text:p text:style-name="P1288"><text:span text:style-name="T1499">The output shows that after successful PAM authentication, the program starts a shell under the authenticated user’s identity. This is confirmed by the </text:span><text:span text:style-name="Source_20_Text"><text:span text:style-name="T1500">whoami</text:span></text:span><text:span text:style-name="T1499"> command, which returns </text:span><text:span text:style-name="Source_20_Text"><text:span text:style-name="T1500">newuser</text:span></text:span><text:span text:style-name="T1499">, indicating that the privilege switch and session setup were correctly applied.</text:span></text:p>
      <text:p text:style-name="P1289"/>
      <text:p text:style-name="P1288"><text:span text:style-name="T1499">The lines </text:span><text:span text:style-name="T1478">14-17 </text:span><text:span text:style-name="T1499">define a struct of type </text:span><text:span text:style-name="T1466">pam_conv</text:span><text:span text:style-name="T1499"> to specify how the application will handle the authentication prompts. The structure </text:span><text:span text:style-name="T1466">pam_conv</text:span><text:span text:style-name="T1499"> is defined in the file header </text:span><text:span text:style-name="T1466">security/_pam_types.h</text:span><text:span text:style-name="T1499"> as follows </text:span></text:p>
      <text:p text:style-name="P1292"/>
      <table:table table:name="Table192" table:style-name="Table192">
        <table:table-column table:style-name="Table192.A"/>
        <table:table-row>
          <table:table-cell table:style-name="Table192.A1" office:value-type="string">
            <text:p text:style-name="P1293"><text:span text:style-name="T115">struct</text:span> pam_conv {</text:p>
            <text:p text:style-name="P1294"><text:span text:style-name="T1484"><text:s text:c="4"/>int</text:span><text:span text:style-name="T1485"> (*conv)(</text:span><text:span text:style-name="T1484">int</text:span><text:span text:style-name="T1485"> </text:span><text:span text:style-name="T1487">num_msg</text:span><text:span text:style-name="T1485">, </text:span><text:span text:style-name="T1484">const</text:span><text:span text:style-name="T1485"> </text:span><text:span text:style-name="T1484">struct</text:span><text:span text:style-name="T1485"> </text:span><text:span text:style-name="T1484">pam_message</text:span><text:span text:style-name="T1485"> </text:span><text:span text:style-name="T1487">**msg</text:span><text:span text:style-name="T1485">, </text:span><text:span text:style-name="T1484">struct</text:span><text:span text:style-name="T1485"> <text:s/></text:span></text:p>
            <text:p text:style-name="P1294"><text:span text:style-name="T1485"><text:s text:c="16"/></text:span><text:span text:style-name="T1484">pam_response</text:span><text:span text:style-name="T1485"> </text:span><text:span text:style-name="T1487">**resp</text:span><text:span text:style-name="T1485">, </text:span><text:span text:style-name="T1484">void</text:span><text:span text:style-name="T1485"> </text:span><text:span text:style-name="T1487">*appdata_ptr</text:span><text:span text:style-name="T1485">);</text:span></text:p>
            <text:p text:style-name="P1295"><text:span text:style-name="T115"><text:s text:c="4"/>void</text:span> *appdata_ptr;</text:p>
            <text:p text:style-name="P1295">};</text:p>
          </table:table-cell>
        </table:table-row>
      </table:table>
      <text:p text:style-name="P1296"/>
      <text:p text:style-name="P1265"><text:span text:style-name="Source_20_Text"><text:span text:style-name="T1466">conv</text:span></text:span><text:span text:style-name="T1503"> is a pointer to a </text:span><text:span text:style-name="Strong_20_Emphasis"><text:span text:style-name="T1503">callback function</text:span></text:span><text:span text:style-name="T1503"> that PAM uses to ask questions (like password prompts).</text:span></text:p>
      <text:p text:style-name="P1265"><text:span text:style-name="Source_20_Text"><text:span text:style-name="T1466">appdata_ptr</text:span></text:span><text:span text:style-name="T1503"> is user-defined data </text:span><text:span text:style-name="T1504">we</text:span><text:span text:style-name="T1503"> can pass to </text:span><text:span text:style-name="T1504">the</text:span><text:span text:style-name="T1503"> callback.</text:span></text:p>
      <text:p text:style-name="P1265"><text:soft-page-break/><text:span text:style-name="Source_20_Text"><text:span text:style-name="T1466">misc_conv</text:span></text:span><text:span text:style-name="T1503"> is a </text:span><text:span text:style-name="Strong_20_Emphasis"><text:span text:style-name="T1503">standard implementation</text:span></text:span><text:span text:style-name="T1503"> provided by the </text:span><text:span text:style-name="Source_20_Text"><text:span text:style-name="T1466">libpam_misc</text:span></text:span><text:span text:style-name="T1503"> library </text:span><text:span text:style-name="T1505">that </text:span><text:span text:style-name="T1506">automatically handles PAM prompts (like "Password:") using </text:span><text:span text:style-name="Source_20_Text"><text:span text:style-name="T1466">getpass</text:span></text:span><text:span text:style-name="T1506"> for hidden input </text:span><text:span text:style-name="T1507">and </text:span><text:span text:style-name="Source_20_Text"><text:span text:style-name="T1466">printf</text:span></text:span><text:span text:style-name="T1506"> for </text:span><text:span text:style-name="T1507">the</text:span><text:span text:style-name="T1506"> messages.</text:span></text:p>
      <text:p text:style-name="P1297"/>
      <text:p text:style-name="P1297">Internally PAM will execute</text:p>
      <text:p text:style-name="P1297"/>
      <text:p text:style-name="P1298"><text:span text:style-name="T126">conv</text:span>(<text:span text:style-name="T127">1</text:span>, &amp;msg, &amp;resp, <text:span text:style-name="T115">NULL</text:span>);</text:p>
      <text:p text:style-name="P1297"/>
      <text:p text:style-name="P1299"><text:span text:style-name="T1508">and this will display the prompt. </text:span><text:span text:style-name="T1509">If we want to personalize the prompt we have to use a custom </text:span><text:span text:style-name="T1510">pam_conv</text:span><text:span text:style-name="T1509"> function.</text:span></text:p>
      <text:p text:style-name="P1300"/>
      <text:p text:style-name="P1268"><text:span text:style-name="T1509">The structures </text:span><text:span text:style-name="T1510">pam_message</text:span><text:span text:style-name="T1509"> and </text:span><text:span text:style-name="T1510">pam_response</text:span><text:span text:style-name="T1509"> are defined as follows in the </text:span><text:span text:style-name="T1510">security/_pam_types.h</text:span><text:span text:style-name="T1509"> header file. </text:span></text:p>
      <text:p text:style-name="P1301"/>
      <table:table table:name="Table193" table:style-name="Table193">
        <table:table-column table:style-name="Table193.A"/>
        <table:table-row>
          <table:table-cell table:style-name="Table193.A1" office:value-type="string">
            <text:p text:style-name="P1302"><text:span text:style-name="T115">struct</text:span> pam_message {</text:p>
            <text:p text:style-name="P516"><text:span text:style-name="T115"><text:s text:c="3"/>int</text:span> msg_style;</text:p>
            <text:p text:style-name="P516"><text:span text:style-name="T115"><text:s text:c="3"/>const</text:span> <text:span text:style-name="T115">char</text:span> *msg;</text:p>
            <text:p text:style-name="P516">};</text:p>
            <text:p text:style-name="P555"/>
            <text:p text:style-name="P516"><text:span text:style-name="T115">struct</text:span> pam_response {</text:p>
            <text:p text:style-name="P516"><text:span text:style-name="T115"><text:s text:c="3"/>char</text:span> *resp;</text:p>
            <text:p text:style-name="P516"><text:span text:style-name="T115"><text:s text:c="3"/>int</text:span> resp_retcode;</text:p>
            <text:p text:style-name="P516">};</text:p>
          </table:table-cell>
        </table:table-row>
      </table:table>
      <text:p text:style-name="P1301"/>
      <text:p text:style-name="P1299"><text:span text:style-name="T1511">T</text:span><text:span text:style-name="T1512">he </text:span><text:span text:style-name="T1510">msg_style</text:span><text:span text:style-name="T1512"> field can be one of the following </text:span><text:span text:style-name="T1511">values.</text:span></text:p>
      <text:p text:style-name="P1303"/>
      <table:table table:name="Table194" table:style-name="Table194">
        <table:table-column table:style-name="Table194.A"/>
        <table:table-column table:style-name="Table194.B"/>
        <table:table-row>
          <table:table-cell table:style-name="Table194.A1" office:value-type="string">
            <text:p text:style-name="P1304">PAM_PROMPT_ECHO_OFF</text:p>
          </table:table-cell>
          <table:table-cell table:style-name="Table194.B1" office:value-type="string">
            <text:p text:style-name="P1305">Turn off the echo</text:p>
          </table:table-cell>
        </table:table-row>
        <table:table-row>
          <table:table-cell table:style-name="Table194.A2" office:value-type="string">
            <text:p text:style-name="P1304">PAM_PROMPT_ECHO_ON</text:p>
          </table:table-cell>
          <table:table-cell table:style-name="Table194.B2" office:value-type="string">
            <text:p text:style-name="P1305">Turn on the echo</text:p>
          </table:table-cell>
        </table:table-row>
        <table:table-row>
          <table:table-cell table:style-name="Table194.A2" office:value-type="string">
            <text:p text:style-name="P1304">PAM_ERROR_MSG</text:p>
          </table:table-cell>
          <table:table-cell table:style-name="Table194.B2" office:value-type="string">
            <text:p text:style-name="P1305">Error message style</text:p>
          </table:table-cell>
        </table:table-row>
        <table:table-row>
          <table:table-cell table:style-name="Table194.A2" office:value-type="string">
            <text:p text:style-name="P1304">PAM_TEXT_INFO</text:p>
          </table:table-cell>
          <table:table-cell table:style-name="Table194.B2" office:value-type="string">
            <text:p text:style-name="P1305">Informational message style</text:p>
          </table:table-cell>
        </table:table-row>
      </table:table>
      <text:p text:style-name="P1303"/>
      <text:p text:style-name="P1306"><text:span text:style-name="T1513">Tab 2</text:span><text:span text:style-name="T1514">5</text:span><text:span text:style-name="T1513">.</text:span><text:span text:style-name="T1512"> </text:span><text:span text:style-name="T1510">msg_style</text:span><text:span text:style-name="T1512"> values</text:span></text:p>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1307"><text:soft-page-break/><text:span text:style-name="T1515">III.11.2 </text:span><text:span text:style-name="T1516">PAM </text:span><text:span text:style-name="T1517">Session: </text:span><text:span text:style-name="T1518">pam_open_session</text:span><text:span text:style-name="T1519"> and </text:span><text:span text:style-name="T1518">pam_close_session</text:span></text:p>
      <text:p text:style-name="P1308"/>
      <text:p text:style-name="P1299"><text:span text:style-name="T1520">If we want our program to behave like a real login and ensure full PAM compatibility, we must add the session management. With the session management we can integrate the logging, the resource limit, the environment and we can ensure the login session is recognized by </text:span><text:span text:style-name="T1510">systemd</text:span><text:span text:style-name="T1520">. </text:span></text:p>
      <text:p text:style-name="P1303"/>
      <text:p text:style-name="P1309">We will use the following functions<text:note text:id="ftn109" text:note-class="footnote"><text:note-citation>107</text:note-citation><text:note-body><text:p text:style-name="P1239"><text:span text:style-name="T1521">See the </text:span><text:span text:style-name="T1522">pam_open_sessio</text:span><text:span text:style-name="T1523">n(3)</text:span><text:span text:style-name="T1521"> and </text:span><text:span text:style-name="T1522">pam_close_session(3)</text:span><text:span text:style-name="T1524"> manual page</text:span><text:span text:style-name="T1525">s</text:span></text:p></text:note-body></text:note>.</text:p>
      <text:p text:style-name="P1309"/>
      <table:table table:name="Table195" table:style-name="Table195">
        <table:table-column table:style-name="Table195.A"/>
        <table:table-row>
          <table:table-cell table:style-name="Table195.A1" office:value-type="string">
            <text:p text:style-name="P271"><text:span text:style-name="T115">#include </text:span><text:span text:style-name="T116">&lt;security/pam_appl.h&gt;</text:span></text:p>
            <text:p text:style-name="P188"/>
            <text:p text:style-name="P229"><text:span text:style-name="T103">int</text:span><text:span text:style-name="T104"> </text:span><text:span text:style-name="T105">pam_open_session</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flags</text:span><text:span text:style-name="T104">);</text:span></text:p>
            <text:p text:style-name="P605"/>
            <text:p text:style-name="P229"><text:span text:style-name="T103">int</text:span><text:span text:style-name="T104"> </text:span><text:span text:style-name="T105">pam_close_session</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flags</text:span><text:span text:style-name="T104">);</text:span></text:p>
            <text:p text:style-name="P283"/>
            <text:p text:style-name="P1310">Return: PAM_SUCCESS | PAM_ABORT | PAM_BUF_ERR | PAM_SESSION_ERR</text:p>
          </table:table-cell>
        </table:table-row>
      </table:table>
      <text:p text:style-name="P1309"/>
      <text:p text:style-name="P1299"><text:span text:style-name="T1526">The </text:span><text:span text:style-name="T1510">pam_open_session</text:span><text:span text:style-name="T1526"> function sets up a user session for a previously authenticated user </text:span><text:span text:style-name="T1527">(create/mount the user home directory, sets the environment, etc..)</text:span><text:span text:style-name="T1526">. The </text:span><text:span text:style-name="T1510">flags</text:span><text:span text:style-name="T1526"> argument can have the value </text:span><text:span text:style-name="T1510">PAM_SILENT</text:span><text:span text:style-name="T1526"> (do not emit any messages). </text:span></text:p>
      <text:p text:style-name="P1299"><text:span text:style-name="T1527">The </text:span><text:span text:style-name="T1510">pam_open_session</text:span><text:span text:style-name="T1527"> ends an authenticated session (unmount the user home directory, etc..). </text:span></text:p>
      <text:p text:style-name="P1311"/>
      <text:p text:style-name="P1299"><text:span text:style-name="T1528">When we create a session we can also set the environment with the </text:span><text:span text:style-name="T1510">pam_getenvlist</text:span><text:span text:style-name="T1528"> function</text:span><text:span text:style-name="T1528"><text:note text:id="ftn110" text:note-class="footnote"><text:note-citation>108</text:note-citation><text:note-body><text:p text:style-name="P1239"><text:span text:style-name="T1529">See the </text:span><text:span text:style-name="T1530">pam_getenvlist(3)</text:span><text:span text:style-name="T1524"> manual page</text:span></text:p></text:note-body></text:note></text:span><text:span text:style-name="T1528">, </text:span><text:span text:style-name="T1531">which</text:span><text:span text:style-name="T1528"> is defined as follows.</text:span></text:p>
      <text:p text:style-name="P1312"/>
      <table:table table:name="Table196" table:style-name="Table196">
        <table:table-column table:style-name="Table196.A"/>
        <table:table-row>
          <table:table-cell table:style-name="Table196.A1" office:value-type="string">
            <text:p text:style-name="P271"><text:span text:style-name="T115">#include </text:span><text:span text:style-name="T116">&lt;security/pam_appl.h&gt;</text:span></text:p>
            <text:p text:style-name="P188"/>
            <text:p text:style-name="P229"><text:span text:style-name="T103">char</text:span><text:span text:style-name="T104"> **</text:span><text:span text:style-name="T105">pam_getenvlist</text:span><text:span text:style-name="T104">(</text:span><text:span text:style-name="T103">pam_handle_t</text:span><text:span text:style-name="T104"> </text:span><text:span text:style-name="T106">*pamh</text:span><text:span text:style-name="T104">);</text:span></text:p>
            <text:p text:style-name="P186"/>
            <text:p text:style-name="P1313">Returns: the PAM environment, NULL on failure</text:p>
          </table:table-cell>
        </table:table-row>
      </table:table>
      <text:p text:style-name="P1314"/>
      <text:p text:style-name="P644"><text:span text:style-name="T1528">The </text:span><text:span text:style-name="Source_20_Text"><text:span text:style-name="T1510">pam_getenvlist</text:span></text:span><text:span text:style-name="T1528"> function returns the PAM environment associated with a given </text:span><text:span text:style-name="Source_20_Text"><text:span text:style-name="T1510">pamh</text:span></text:span><text:span text:style-name="T1528"> PAM context. This environment is provided as an array of strings (</text:span><text:span text:style-name="Source_20_Text"><text:span text:style-name="T1510">char **</text:span></text:span><text:span text:style-name="T1528">), where each element represents an environment variable in the standard </text:span><text:span text:style-name="Source_20_Text"><text:span text:style-name="T1510">NAME=value</text:span></text:span><text:span text:style-name="T1528"> format.</text:span></text:p>
      <text:p text:style-name="P1299"><text:span text:style-name="T1528">The structure of the returned array is compatible with the format required by functions such as </text:span><text:span text:style-name="Source_20_Text"><text:span text:style-name="T1510">execle</text:span></text:span><text:span text:style-name="T1528">, meaning it can be directly passed as the environment argument when executing a new program. This allows a process started under PAM control to inherit or propagate environment variables established during the authentication session.</text:span></text:p>
      <text:p text:style-name="P1314"/>
      <text:p text:style-name="P1299"><text:span text:style-name="T1532">Except the </text:span><text:span text:style-name="T1510">main</text:span><text:span text:style-name="T1532"> function the rest of the program remains unchanged, so the code below contains the updated </text:span><text:span text:style-name="T1510">main</text:span><text:span text:style-name="T1532"> of </text:span><text:span text:style-name="T1510">loginpam.c</text:span><text:span text:style-name="T1528">. </text:span></text:p>
      <text:p text:style-name="Horizontal_20_Line"/>
      <text:p text:style-name="P186"><text:span text:style-name="T1533">18 </text:span><text:span text:style-name="T115">int</text:span> main(<text:span text:style-name="T115">void</text:span>) {</text:p>
      <text:p text:style-name="P1315"><text:span text:style-name="T1533">19 </text:span><text:span text:style-name="T115"><text:tab/>char</text:span> username[<text:span text:style-name="T127">64</text:span>];</text:p>
      <text:p text:style-name="P1315"><text:span text:style-name="T1534">20</text:span><text:span text:style-name="T1533"> </text:span><text:span text:style-name="T115"><text:tab/>struct</text:span> passwd *pw;</text:p>
      <text:p text:style-name="P1316"><text:span text:style-name="T1535">21</text:span><text:span text:style-name="T1536"> </text:span><text:span text:style-name="T104"><text:tab/></text:span><text:span text:style-name="T103">pam_handle_t</text:span><text:span text:style-name="T104"> *pamh = </text:span><text:span text:style-name="T103">NULL</text:span><text:span text:style-name="T104">;</text:span></text:p>
      <text:p text:style-name="P1315"><text:span text:style-name="T1534">22</text:span><text:span text:style-name="T1533"> </text:span><text:span text:style-name="T115"><text:tab/>int</text:span> pam_result;</text:p>
      <text:p text:style-name="P188"/>
      <text:p text:style-name="P1315"><text:span text:style-name="T1534">23</text:span><text:span text:style-name="T1533"> </text:span><text:tab/>printf(<text:span text:style-name="T116">"Login: "</text:span>);</text:p>
      <text:p text:style-name="P1315"><text:soft-page-break/><text:span text:style-name="T1534">24</text:span><text:span text:style-name="T1533"> </text:span><text:tab/>fflush(<text:span text:style-name="T115">stdout</text:span>);</text:p>
      <text:p text:style-name="P1315"><text:span text:style-name="T1534">25</text:span><text:span text:style-name="T1533"> </text:span><text:span text:style-name="T115"><text:tab/>if</text:span> (!fgets(username, <text:span text:style-name="T115">sizeof</text:span>(username), <text:span text:style-name="T115">stdin</text:span>)) <text:span text:style-name="T115">return</text:span> <text:span text:style-name="T127">1</text:span>;</text:p>
      <text:p text:style-name="P1317"><text:span text:style-name="T1537">26</text:span><text:span text:style-name="T1538"> </text:span><text:span text:style-name="T124"><text:tab/>username[strcspn(username, </text:span><text:span text:style-name="T102">"\n"</text:span><text:span text:style-name="T124">)] = </text:span><text:span text:style-name="T335">0</text:span><text:span text:style-name="T124">;</text:span></text:p>
      <text:p text:style-name="P1315"><text:span text:style-name="T1534">27</text:span><text:span text:style-name="T1533"> </text:span><text:tab/>pam_result = <text:span text:style-name="T126">pam_start</text:span>(<text:span text:style-name="T116">"</text:span><text:span text:style-name="T1539">loginpam</text:span><text:span text:style-name="T116">"</text:span>, username, &amp;conv, &amp;pamh);</text:p>
      <text:p text:style-name="P1315"><text:span text:style-name="T1534">28</text:span><text:span text:style-name="T1533"> </text:span><text:span text:style-name="T115"><text:tab/>if</text:span> (pam_result != <text:span text:style-name="T115">PAM_SUCCESS</text:span>) {</text:p>
      <text:p text:style-name="P1315"><text:span text:style-name="T1534">29</text:span><text:span text:style-name="T1533"> </text:span><text:tab/><text:tab/>fprintf(<text:span text:style-name="T115">stderr</text:span>, <text:span text:style-name="T116">"pam_start failed: %s\n"</text:span>, <text:span text:style-name="T126">pam_strerror</text:span>(pamh, <text:span text:style-name="T1533"><text:s/></text:span></text:p>
      <text:p text:style-name="P1315"><text:span text:style-name="T1533"><text:s text:c="21"/></text:span>pam_result));</text:p>
      <text:p text:style-name="P1315"><text:span text:style-name="T1534">30</text:span><text:span text:style-name="T1533"> </text:span><text:span text:style-name="T115"><text:tab/><text:tab/>return</text:span> <text:span text:style-name="T127">1</text:span>;</text:p>
      <text:p text:style-name="P1315"><text:span text:style-name="T1534">31</text:span><text:span text:style-name="T1533"> </text:span><text:tab/>}</text:p>
      <text:p text:style-name="P188"/>
      <text:p text:style-name="P1315"><text:span text:style-name="T1534">32</text:span><text:span text:style-name="T1533"> </text:span><text:tab/>pam_result = <text:span text:style-name="T126">pam_authenticate</text:span>(pamh, <text:span text:style-name="T127">0</text:span>);</text:p>
      <text:p text:style-name="P1315"><text:span text:style-name="T1534">33</text:span><text:span text:style-name="T1533"> </text:span><text:span text:style-name="T115"><text:tab/>if</text:span> (pam_result != <text:span text:style-name="T115">PAM_SUCCESS</text:span>) {</text:p>
      <text:p text:style-name="P1315"><text:span text:style-name="T1534">34</text:span><text:span text:style-name="T1533"> </text:span><text:tab/><text:tab/>fprintf(<text:span text:style-name="T115">stderr</text:span>, <text:span text:style-name="T116">"Authentication failed: %s\n"</text:span>, <text:tab/><text:tab/><text:tab/><text:tab/></text:p>
      <text:p text:style-name="P1315"><text:span text:style-name="T1533"><text:s/></text:span><text:tab/><text:tab/><text:tab/> <text:s text:c="2"/><text:span text:style-name="T126">pam_strerror</text:span>(pamh, pam_result));</text:p>
      <text:p text:style-name="P1315"><text:span text:style-name="T1534">35</text:span><text:span text:style-name="T1533"> </text:span><text:tab/><text:tab/><text:span text:style-name="T126">pam_end</text:span>(pamh, pam_result);</text:p>
      <text:p text:style-name="P1315"><text:span text:style-name="T1534">36</text:span><text:span text:style-name="T1533"> </text:span><text:span text:style-name="T115"><text:tab/><text:tab/>return</text:span> <text:span text:style-name="T127">1</text:span>;</text:p>
      <text:p text:style-name="P1315"><text:span text:style-name="T1534">37</text:span><text:span text:style-name="T1533"> </text:span><text:tab/>}</text:p>
      <text:p text:style-name="P188"/>
      <text:p text:style-name="P1315"><text:span text:style-name="T1534">38</text:span><text:span text:style-name="T1533"> </text:span><text:tab/>pam_result = <text:span text:style-name="T126">pam_acct_mgmt</text:span>(pamh, <text:span text:style-name="T127">0</text:span>);</text:p>
      <text:p text:style-name="P1315"><text:span text:style-name="T1534">39</text:span><text:span text:style-name="T1533"> </text:span><text:span text:style-name="T115"><text:tab/>if</text:span> (pam_result != <text:span text:style-name="T115">PAM_SUCCESS</text:span>) {</text:p>
      <text:p text:style-name="P1315"><text:span text:style-name="T1534">40</text:span><text:span text:style-name="T1533"> </text:span><text:tab/><text:tab/>fprintf(<text:span text:style-name="T115">stderr</text:span>, <text:span text:style-name="T116">"Account check failed: %s\n"</text:span>, </text:p>
      <text:p text:style-name="P1315"><text:tab/><text:tab/><text:tab/> <text:s text:c="2"/><text:span text:style-name="T126">pam_strerror</text:span>(pamh, pam_result));</text:p>
      <text:p text:style-name="P1315"><text:span text:style-name="T1534">41</text:span><text:span text:style-name="T1533"> </text:span><text:tab/><text:tab/><text:span text:style-name="T126">pam_end</text:span>(pamh, pam_result);</text:p>
      <text:p text:style-name="P1315"><text:span text:style-name="T1534">42</text:span><text:span text:style-name="T1533"> </text:span><text:span text:style-name="T115"><text:tab/><text:tab/>return</text:span> <text:span text:style-name="T127">1</text:span>;</text:p>
      <text:p text:style-name="P1317"><text:span text:style-name="T1537">43</text:span><text:span text:style-name="T1538"> </text:span><text:span text:style-name="T124"><text:tab/>}</text:span></text:p>
      <text:p text:style-name="P1315"/>
      <text:p text:style-name="P1315"><text:span text:style-name="T1534">44</text:span><text:span text:style-name="T1533"> </text:span><text:tab/>pam_result = <text:span text:style-name="T126">pam_open_session</text:span>(pamh, <text:span text:style-name="T127">0</text:span>);</text:p>
      <text:p text:style-name="P1315"><text:span text:style-name="T1534">45</text:span><text:span text:style-name="T1533"> </text:span><text:span text:style-name="T115"><text:tab/>if</text:span> (pam_result != <text:span text:style-name="T115">PAM_SUCCESS</text:span>) {</text:p>
      <text:p text:style-name="P1315"><text:span text:style-name="T1534">46</text:span><text:span text:style-name="T1533"> </text:span><text:tab/><text:tab/>fprintf(<text:span text:style-name="T115">stderr</text:span>, <text:span text:style-name="T116">"Failed to open PAM session: %s\n"</text:span>, </text:p>
      <text:p text:style-name="P1318"><text:tab/><text:tab/><text:tab/> <text:s text:c="2"/><text:span text:style-name="T126">pam_strerror</text:span>(pamh, pam_result));</text:p>
      <text:p text:style-name="P1315"><text:span text:style-name="T1534">47</text:span><text:span text:style-name="T1533"> </text:span><text:tab/><text:tab/><text:span text:style-name="T126">pam_end</text:span>(pamh, pam_result);</text:p>
      <text:p text:style-name="P1315"><text:span text:style-name="T1534">48</text:span><text:span text:style-name="T1533"> </text:span><text:span text:style-name="T115"><text:tab/><text:tab/>return</text:span> <text:span text:style-name="T127">1</text:span>;</text:p>
      <text:p text:style-name="P1315"><text:span text:style-name="T1534">49</text:span><text:span text:style-name="T1533"> </text:span><text:tab/>}</text:p>
      <text:p text:style-name="P1319"/>
      <text:p text:style-name="P1320"><text:span text:style-name="T1534">50</text:span><text:span text:style-name="T1533"> </text:span><text:tab/>pw = getpwnam(username);</text:p>
      <text:p text:style-name="P1315"><text:span text:style-name="T1534">51</text:span><text:span text:style-name="T1533"> </text:span><text:span text:style-name="T115"><text:tab/>if</text:span> (!pw) {</text:p>
      <text:p text:style-name="P1315"><text:span text:style-name="T1534">52</text:span><text:span text:style-name="T1533"> </text:span><text:tab/><text:tab/>fprintf(<text:span text:style-name="T115">stderr</text:span>, <text:span text:style-name="T116">"getpwnam failed.\n"</text:span>);</text:p>
      <text:p text:style-name="P1315"><text:span text:style-name="T1534">53</text:span><text:span text:style-name="T1533"> </text:span><text:tab/><text:tab/><text:span text:style-name="T126">pam_close_session</text:span>(pamh, <text:span text:style-name="T127">0</text:span>);</text:p>
      <text:p text:style-name="P1315"><text:span text:style-name="T1534">54</text:span><text:span text:style-name="T1533"> </text:span><text:tab/><text:tab/><text:span text:style-name="T126">pam_end</text:span>(pamh, <text:span text:style-name="T115">PAM_SUCCESS</text:span>);</text:p>
      <text:p text:style-name="P1315"><text:span text:style-name="T1534">55</text:span><text:span text:style-name="T1533"> </text:span><text:span text:style-name="T115"><text:tab/><text:tab/>return</text:span> <text:span text:style-name="T127">1</text:span>;</text:p>
      <text:p text:style-name="P1317"><text:span text:style-name="T1537">56</text:span><text:span text:style-name="T1538"> </text:span><text:span text:style-name="T124"><text:tab/>}</text:span></text:p>
      <text:p text:style-name="P1317"><text:span text:style-name="T1537">57</text:span><text:span text:style-name="T1538"> </text:span><text:span text:style-name="T124"><text:tab/>do_login_record(username);</text:span></text:p>
      <text:p text:style-name="P1316"><text:span text:style-name="T1535">5</text:span><text:span text:style-name="T1540">8</text:span><text:span text:style-name="T1535"><text:tab/></text:span><text:span text:style-name="T105">setgid</text:span><text:span text:style-name="T104">(pw-&gt;pw_gid);</text:span></text:p>
      <text:p text:style-name="P1321"><text:span text:style-name="T1534">5</text:span><text:span text:style-name="T1541">9</text:span><text:span text:style-name="T1534"><text:tab/></text:span><text:span text:style-name="T115">if</text:span> (initgroups(username, pw-&gt;pw_gid) &lt; <text:span text:style-name="T127">0</text:span> || setgid(pw-&gt;pw_gid) &lt; <text:span text:style-name="T127">0</text:span> </text:p>
      <text:p text:style-name="P1321"><text:tab/> <text:s text:c="3"/>|| setuid(pw-&gt;pw_uid) &lt; <text:span text:style-name="T127">0</text:span>) {</text:p>
      <text:p text:style-name="P1321"><text:span text:style-name="T1541">60</text:span><text:span text:style-name="T1534"><text:tab/><text:tab/></text:span>perror(<text:span text:style-name="T116">"Failed to drop privileges"</text:span>);</text:p>
      <text:p text:style-name="P1321"><text:span text:style-name="T1541">61</text:span><text:span text:style-name="T1534"><text:tab/><text:tab/></text:span>pam_close_session(pamh, <text:span text:style-name="T127">0</text:span>);</text:p>
      <text:p text:style-name="P1321"><text:span text:style-name="T1541">62</text:span><text:span text:style-name="T1534"><text:tab/><text:tab/></text:span>pam_end(pamh, <text:span text:style-name="T115">PAM_SUCCESS</text:span>);</text:p>
      <text:p text:style-name="P1321"><text:span text:style-name="T1541">63</text:span><text:span text:style-name="T1534"><text:tab/><text:tab/></text:span><text:span text:style-name="T115">return</text:span> <text:span text:style-name="T127">1</text:span>;</text:p>
      <text:p text:style-name="P1321"><text:span text:style-name="T1541">64</text:span><text:span text:style-name="T1534"><text:tab/></text:span>}</text:p>
      <text:p text:style-name="P188"/>
      <text:p text:style-name="P1316"><text:soft-page-break/><text:span text:style-name="T1540">65</text:span><text:span text:style-name="T1535"><text:tab/></text:span><text:span text:style-name="T105">setuid</text:span><text:span text:style-name="T104">(pw-&gt;pw_uid);</text:span></text:p>
      <text:p text:style-name="P1316"><text:span text:style-name="T1540">66</text:span><text:span text:style-name="T1535"><text:tab/></text:span><text:span text:style-name="T105">setenv</text:span><text:span text:style-name="T104">(</text:span><text:span text:style-name="T403">"HOME"</text:span><text:span text:style-name="T104">, pw-&gt;pw_dir, </text:span><text:span text:style-name="T128">1</text:span><text:span text:style-name="T104">);</text:span></text:p>
      <text:p text:style-name="P1316"><text:span text:style-name="T1540">6</text:span><text:span text:style-name="T1535">7<text:tab/></text:span><text:span text:style-name="T105">setenv</text:span><text:span text:style-name="T104">(</text:span><text:span text:style-name="T403">"USER"</text:span><text:span text:style-name="T104">, pw-&gt;pw_name, </text:span><text:span text:style-name="T128">1</text:span><text:span text:style-name="T104">);</text:span></text:p>
      <text:p text:style-name="P1316"><text:span text:style-name="T1540">68</text:span><text:span text:style-name="T1535"><text:tab/></text:span><text:span text:style-name="T105">setenv</text:span><text:span text:style-name="T104">(</text:span><text:span text:style-name="T403">"LOGNAME"</text:span><text:span text:style-name="T104">, pw-&gt;pw_name, </text:span><text:span text:style-name="T128">1</text:span><text:span text:style-name="T104">);</text:span></text:p>
      <text:p text:style-name="P1316"><text:span text:style-name="T1540">69</text:span><text:span text:style-name="T1535"><text:tab/></text:span><text:span text:style-name="T105">setenv</text:span><text:span text:style-name="T104">(</text:span><text:span text:style-name="T403">"SHELL"</text:span><text:span text:style-name="T104">, pw-&gt;pw_shell, </text:span><text:span text:style-name="T128">1</text:span><text:span text:style-name="T104">); </text:span></text:p>
      <text:p text:style-name="P1321"/>
      <text:p text:style-name="P1316"><text:span text:style-name="T1540">7</text:span><text:span text:style-name="T1542">0</text:span><text:span text:style-name="T1535"><text:tab/></text:span><text:span text:style-name="T103">char</text:span><text:span text:style-name="T104"> **envlist = </text:span><text:span text:style-name="T105">pam_getenvlist</text:span><text:span text:style-name="T104">(pamh);</text:span></text:p>
      <text:p text:style-name="P1321"><text:span text:style-name="T1541">7</text:span><text:span text:style-name="T1543">1</text:span><text:span text:style-name="T1534"><text:tab/></text:span><text:span text:style-name="T115">if</text:span> (envlist) {</text:p>
      <text:p text:style-name="P1321"><text:span text:style-name="T1541">7</text:span><text:span text:style-name="T1543">2</text:span><text:span text:style-name="T1534"><text:tab/><text:tab/></text:span><text:span text:style-name="T115">for</text:span> (<text:span text:style-name="T115">char</text:span> **env = envlist; *env; ++env) {</text:p>
      <text:p text:style-name="P1316"><text:span text:style-name="T1535">7</text:span><text:span text:style-name="T1542">3</text:span><text:span text:style-name="T1535"><text:tab/><text:tab/><text:tab/></text:span><text:span text:style-name="T105">putenv</text:span><text:span text:style-name="T104">(*env); </text:span></text:p>
      <text:p text:style-name="P1321"><text:span text:style-name="T1534">7</text:span><text:span text:style-name="T1543">4</text:span><text:span text:style-name="T1534"><text:tab/><text:tab/></text:span>}</text:p>
      <text:p text:style-name="P1316"><text:span text:style-name="T1535">7</text:span><text:span text:style-name="T1542">5</text:span><text:span text:style-name="T1535"><text:tab/><text:tab/></text:span><text:span text:style-name="T105">free</text:span><text:span text:style-name="T104">(envlist);</text:span></text:p>
      <text:p text:style-name="P1322"><text:span text:style-name="T1537">7</text:span><text:span text:style-name="T1544">6</text:span><text:span text:style-name="T1537"><text:tab/></text:span><text:span text:style-name="T124">}</text:span></text:p>
      <text:p text:style-name="P1321"/>
      <text:p text:style-name="P1316"><text:span text:style-name="T1535">7</text:span><text:span text:style-name="T1542">7</text:span><text:span text:style-name="T103"><text:tab/>if</text:span><text:span text:style-name="T104"> (</text:span><text:span text:style-name="T105">chdir</text:span><text:span text:style-name="T104">(pw-&gt;pw_dir) &lt; </text:span><text:span text:style-name="T128">0</text:span><text:span text:style-name="T104">) {</text:span></text:p>
      <text:p text:style-name="P1323"><text:span text:style-name="T1534">7</text:span><text:span text:style-name="T1543">8</text:span><text:tab/><text:tab/>fprintf(<text:span text:style-name="T115">stderr</text:span>, <text:span text:style-name="T116">"Warning: Failed to change to home directory <text:tab/><text:tab/><text:tab/> <text:s text:c="2"/>%s\n"</text:span>, pw-&gt;pw_dir);</text:p>
      <text:p text:style-name="P1323"><text:span text:style-name="T1534">7</text:span><text:span text:style-name="T1543">9</text:span><text:tab/>}</text:p>
      <text:p text:style-name="P1321"/>
      <text:p text:style-name="P1321"/>
      <text:p text:style-name="P1322"><text:span text:style-name="T1545">80</text:span><text:span text:style-name="T1537"><text:tab/></text:span><text:span text:style-name="T124">printf(</text:span><text:span text:style-name="T102">"Welcome %s!\n"</text:span><text:span text:style-name="T124">, username);</text:span></text:p>
      <text:p text:style-name="P1321"><text:span text:style-name="T1541">8</text:span><text:span text:style-name="T1546">1</text:span><text:span text:style-name="T1534"><text:tab/></text:span><text:span text:style-name="T115">char</text:span> *shell = pw-&gt;pw_shell &amp;&amp; pw-&gt;pw_shell[<text:span text:style-name="T127">0</text:span>] ? pw-&gt;pw_shell : </text:p>
      <text:p text:style-name="P1321"><text:span text:style-name="T116"><text:tab/><text:tab/><text:tab/> <text:s text:c="2"/>"/bin/sh"</text:span>;</text:p>
      <text:p text:style-name="P1316"><text:span text:style-name="T1540">8</text:span><text:span text:style-name="T1547">2</text:span><text:span text:style-name="T1535"><text:tab/></text:span><text:span text:style-name="T105">execvp</text:span><text:span text:style-name="T104">(shell, (</text:span><text:span text:style-name="T103">char</text:span><text:span text:style-name="T104"> *</text:span><text:span text:style-name="T103">[]</text:span><text:span text:style-name="T104">){ shell, </text:span><text:span text:style-name="T103">NULL</text:span><text:span text:style-name="T104"> });</text:span></text:p>
      <text:p text:style-name="P1321"><text:span text:style-name="T1541">8</text:span><text:span text:style-name="T1546">3</text:span><text:span text:style-name="T1534"><text:tab/></text:span>perror(<text:span text:style-name="T116">"Failed to exec shell"</text:span>);</text:p>
      <text:p text:style-name="P1321"><text:span text:style-name="T1541">8</text:span><text:span text:style-name="T1546">4</text:span><text:span text:style-name="T1534"><text:tab/></text:span>do_logout_record();</text:p>
      <text:p text:style-name="P1316"><text:span text:style-name="T1540">8</text:span><text:span text:style-name="T1547">5</text:span><text:span text:style-name="T1535"><text:tab/></text:span><text:span text:style-name="T105">pam_close_session</text:span><text:span text:style-name="T104">(pamh, </text:span><text:span text:style-name="T128">0</text:span><text:span text:style-name="T104">);</text:span></text:p>
      <text:p text:style-name="P1316"><text:span text:style-name="T1540">8</text:span><text:span text:style-name="T1547">6</text:span><text:span text:style-name="T1535"><text:tab/></text:span><text:span text:style-name="T105">pam_end</text:span><text:span text:style-name="T104">(pamh, </text:span><text:span text:style-name="T103">PAM_SUCCESS</text:span><text:span text:style-name="T104">);</text:span></text:p>
      <text:p text:style-name="P1321"><text:span text:style-name="T1541">8</text:span><text:span text:style-name="T1546">7</text:span><text:span text:style-name="T1533"> </text:span><text:span text:style-name="T115"><text:tab/>return</text:span> <text:span text:style-name="T127">1</text:span>;</text:p>
      <text:p text:style-name="P1322"><text:span text:style-name="T1548">8</text:span><text:span text:style-name="T1545">8</text:span><text:span text:style-name="T1538"> </text:span><text:span text:style-name="T124">}</text:span></text:p>
      <text:p text:style-name="Horizontal_20_Line"/>
      <text:p text:style-name="P1324">loginpam.c</text:p>
      <text:p text:style-name="P307"/>
      <text:p text:style-name="Standard"><text:span text:style-name="Strong_20_Emphasis"><text:span text:style-name="T220">Line 27.</text:span></text:span><text:span text:style-name="T220"> Initializes the PAM context for the </text:span><text:span text:style-name="Source_20_Text"><text:span text:style-name="T220">"</text:span></text:span><text:span text:style-name="Source_20_Text"><text:span text:style-name="T221">loginpam</text:span></text:span><text:span text:style-name="Source_20_Text"><text:span text:style-name="T220">"</text:span></text:span><text:span text:style-name="T220"> service and associates it with the <text:tab/> <text:s/><text:tab/> <text:s/>provided usernam</text:span><text:span text:style-name="T1549">e</text:span></text:p>
      <text:p text:style-name="Standard"><text:span text:style-name="Strong_20_Emphasis"><text:span text:style-name="T220">Line 32.</text:span></text:span><text:span text:style-name="T220"> Authenticates the user using PAM modules configured in the system</text:span></text:p>
      <text:p text:style-name="Standard"><text:span text:style-name="Strong_20_Emphasis"><text:span text:style-name="T220">Line 38.</text:span></text:span><text:span text:style-name="T220"> Performs account management checks, such as verifying whether the account is allowed to <text:tab/> <text:s/>log in</text:span></text:p>
      <text:p text:style-name="Standard"><text:span text:style-name="Strong_20_Emphasis"><text:span text:style-name="T220">Line 44.</text:span></text:span><text:span text:style-name="T220"> Opens a PAM session, allowing session-related modules to execute (e.g., logging, <text:tab/> <text:s text:c="2"/><text:tab/> <text:s/>environment setup)</text:span></text:p>
      <text:p text:style-name="Standard"><text:span text:style-name="Strong_20_Emphasis"><text:span text:style-name="T220">Line 50.</text:span></text:span><text:span text:style-name="T220"> Retrieves the user’s system account entry from the password database</text:span></text:p>
      <text:p text:style-name="Standard"><text:span text:style-name="Strong_20_Emphasis"><text:span text:style-name="T220">Line 57.</text:span></text:span><text:span text:style-name="T220"> Records the login event in the system using </text:span><text:span text:style-name="Source_20_Text"><text:span text:style-name="T221">utmp</text:span></text:span><text:span text:style-name="T220"> accounting functions</text:span></text:p>
      <text:p text:style-name="Standard"><text:span text:style-name="Strong_20_Emphasis"><text:span text:style-name="T220">Line 58.</text:span></text:span><text:span text:style-name="T220"> Sets the primary group ID for the user</text:span></text:p>
      <text:p text:style-name="Standard"><text:span text:style-name="Strong_20_Emphasis"><text:span text:style-name="T220">Line 59.</text:span></text:span><text:span text:style-name="T220"> Initializes supplementary group memberships and switches both group ID and user ID to <text:tab/> <text:s/>those of the authenticated user</text:span></text:p>
      <text:p text:style-name="Standard"><text:span text:style-name="Strong_20_Emphasis"><text:span text:style-name="T220">Line 65.</text:span></text:span><text:span text:style-name="T220"> Ensures the process runs under the correct user ID after privilege changes</text:span></text:p>
      <text:p text:style-name="Standard"><text:span text:style-name="Strong_20_Emphasis"><text:span text:style-name="T220">Line 66–69.</text:span></text:span><text:span text:style-name="T220"> Manually sets key environment variables such as </text:span><text:span text:style-name="Source_20_Text"><text:span text:style-name="T221">HOME</text:span></text:span><text:span text:style-name="T220">, </text:span><text:span text:style-name="Source_20_Text"><text:span text:style-name="T221">USER</text:span></text:span><text:span text:style-name="T220">, </text:span><text:span text:style-name="Source_20_Text"><text:span text:style-name="T221">LOGNAME</text:span></text:span><text:span text:style-name="T220">, and <text:tab/> <text:s text:c="2"/><text:tab/> <text:s text:c="7"/></text:span><text:span text:style-name="Source_20_Text"><text:span text:style-name="T221">SHELL</text:span></text:span><text:span text:style-name="T220"> for the new user session</text:span></text:p>
      <text:p text:style-name="Standard"><text:span text:style-name="Strong_20_Emphasis"><text:span text:style-name="T220">Line 70.</text:span></text:span><text:span text:style-name="T220"> Retrieves the environment variables provided by PAM via </text:span><text:span text:style-name="Source_20_Text"><text:span text:style-name="T221">pam_getenvlist</text:span></text:span></text:p>
      <text:p text:style-name="Standard"><text:soft-page-break/><text:span text:style-name="Strong_20_Emphasis"><text:span text:style-name="T220">Line 71–73.</text:span></text:span><text:span text:style-name="T220"> Iterates through the PAM environment list and imports each variable into the current <text:tab/> <text:s text:c="7"/>process environment using </text:span><text:span text:style-name="Source_20_Text"><text:span text:style-name="T221">putenv</text:span></text:span></text:p>
      <text:p text:style-name="Standard"><text:span text:style-name="Strong_20_Emphasis"><text:span text:style-name="T220">Line 75.</text:span></text:span><text:span text:style-name="T220"> Frees the memory allocated for the PAM environment list</text:span></text:p>
      <text:p text:style-name="Standard"><text:span text:style-name="Strong_20_Emphasis"><text:span text:style-name="T220">Line 77–79.</text:span></text:span><text:span text:style-name="T220"> Changes the current working directory to the user’s home directory, if possible</text:span></text:p>
      <text:p text:style-name="Standard"><text:span text:style-name="Strong_20_Emphasis"><text:span text:style-name="T220">Line 80.</text:span></text:span><text:span text:style-name="T220"> Prints a welcome message after successful authentication and setup</text:span></text:p>
      <text:p text:style-name="Standard"><text:span text:style-name="Strong_20_Emphasis"><text:span text:style-name="T220">Line 81–82.</text:span></text:span><text:span text:style-name="T220"> Determines the user’s shell and replaces the current process with it using </text:span><text:span text:style-name="Source_20_Text"><text:span text:style-name="T221">execvp</text:span></text:span></text:p>
      <text:p text:style-name="Standard"><text:span text:style-name="Strong_20_Emphasis"><text:span text:style-name="T220">Line 83–87.</text:span></text:span><text:span text:style-name="T220"> These lines are executed only if </text:span><text:span text:style-name="Source_20_Text"><text:span text:style-name="T221">execvp</text:span></text:span><text:span text:style-name="T220"> fails; they handle error reporting, close the <text:tab/> <text:s text:c="7"/>PAM session, and clean up before exiting</text:span></text:p>
      <text:p text:style-name="P1325"/>
      <text:p text:style-name="P1326">First, <text:span text:style-name="T1550">we</text:span> update the <text:span text:style-name="T75">/etc/pam.d/loginpam</text:span> file to add the session module.</text:p>
      <text:p text:style-name="P1326"/>
      <table:table table:name="Table197" table:style-name="Table197">
        <table:table-column table:style-name="Table197.A"/>
        <table:table-row>
          <table:table-cell table:style-name="Table197.A1" office:value-type="string">
            <text:p text:style-name="P1327"><text:span text:style-name="T80">[</text:span><text:a xlink:type="simple" xlink:href="mailto:linux@users" text:style-name="Internet_20_link" text:visited-style-name="Visited_20_Internet_20_Link"><text:span text:style-name="T81">linux@users</text:span></text:a><text:span text:style-name="T80">] </text:span><text:span text:style-name="T1443">sudo vi /etc/pam.d/</text:span><text:span text:style-name="T1444">loginpam</text:span></text:p>
            <text:p text:style-name="P1328"># /etc/pam.d/<text:span text:style-name="T1445">loginpam</text:span></text:p>
            <text:p text:style-name="P1328">auth <text:s text:c="9"/>required <text:s text:c="2"/>pam_unix.so</text:p>
            <text:p text:style-name="P1328">account <text:s text:c="3"/>required <text:s text:c="2"/>pam_unix.so</text:p>
            <text:p text:style-name="P1329">session <text:s text:c="4"/>required <text:s text:c="2"/><text:span text:style-name="T1551">pam_unix.so</text:span></text:p>
          </table:table-cell>
        </table:table-row>
      </table:table>
      <text:p text:style-name="P1326"/>
      <text:p text:style-name="P1330"><text:span text:style-name="T1550">We</text:span> compile and execute <text:span text:style-name="T1550">the program.</text:span></text:p>
      <text:p text:style-name="P1331"/>
      <table:table table:name="Table198" table:style-name="Table198">
        <table:table-column table:style-name="Table198.A"/>
        <table:table-row>
          <table:table-cell table:style-name="Table198.A1" office:value-type="string">
            <text:p text:style-name="P1332"><text:span text:style-name="T80">[</text:span><text:a xlink:type="simple" xlink:href="mailto:linux@users" text:style-name="Internet_20_link" text:visited-style-name="Visited_20_Internet_20_Link"><text:span text:style-name="T81">linux@users</text:span></text:a><text:span text:style-name="T80">] </text:span><text:span text:style-name="T1444">gcc -o loginpam loginpam.c -lpam -lpam_misc -lutil</text:span></text:p>
            <text:p text:style-name="P1333"/>
            <text:p text:style-name="P1334"><text:span text:style-name="T80">[</text:span><text:a xlink:type="simple" xlink:href="mailto:linux@users" text:style-name="Internet_20_link" text:visited-style-name="Visited_20_Internet_20_Link"><text:span text:style-name="T81">linux@users</text:span></text:a><text:span text:style-name="T80">] </text:span><text:span text:style-name="T1552">sudo </text:span><text:span text:style-name="T80">./</text:span><text:span text:style-name="T1552">loginpam</text:span></text:p>
            <text:p text:style-name="P1334">Login: newuser</text:p>
            <text:p text:style-name="P1334">Password: </text:p>
            <text:p text:style-name="P1334">Welcome newuser!</text:p>
            <text:p text:style-name="P1334"/>
            <text:p text:style-name="P1335"><text:span text:style-name="T1178">[</text:span><text:a xlink:type="simple" xlink:href="mailto:linux@users" text:style-name="Internet_20_link" text:visited-style-name="Visited_20_Internet_20_Link"><text:span text:style-name="T1553">linux@</text:span></text:a><text:span text:style-name="T1554">newuser</text:span><text:span text:style-name="T1178">] </text:span><text:span text:style-name="T1555">pwd</text:span></text:p>
            <text:p text:style-name="P1334">/home/newuser</text:p>
            <text:p text:style-name="P1334"/>
            <text:p text:style-name="P1335"><text:span text:style-name="T1178">[</text:span><text:a xlink:type="simple" xlink:href="mailto:linux@users" text:style-name="Internet_20_link" text:visited-style-name="Visited_20_Internet_20_Link"><text:span text:style-name="T1553">linux@</text:span></text:a><text:span text:style-name="T1554">newuser</text:span><text:span text:style-name="T1178">] </text:span><text:span text:style-name="T1555">whoami</text:span></text:p>
            <text:p text:style-name="P1336">newuser</text:p>
            <text:p text:style-name="P1334"/>
          </table:table-cell>
        </table:table-row>
      </table:table>
      <text:p text:style-name="P1337"/>
      <text:p text:style-name="P1338">We use the lines </text:p>
      <text:p text:style-name="P1338"/>
      <text:p text:style-name="P1339"><text:span text:style-name="T1540">66</text:span><text:span text:style-name="T1535"><text:tab/></text:span><text:span text:style-name="T105">setenv</text:span><text:span text:style-name="T104">(</text:span><text:span text:style-name="T403">"HOME"</text:span><text:span text:style-name="T104">, pw-&gt;pw_dir, </text:span><text:span text:style-name="T128">1</text:span><text:span text:style-name="T104">);</text:span></text:p>
      <text:p text:style-name="P1339"><text:span text:style-name="T1540">6</text:span><text:span text:style-name="T1535">7<text:tab/></text:span><text:span text:style-name="T105">setenv</text:span><text:span text:style-name="T104">(</text:span><text:span text:style-name="T403">"USER"</text:span><text:span text:style-name="T104">, pw-&gt;pw_name, </text:span><text:span text:style-name="T128">1</text:span><text:span text:style-name="T104">);</text:span></text:p>
      <text:p text:style-name="P1339"><text:span text:style-name="T1540">68</text:span><text:span text:style-name="T1535"><text:tab/></text:span><text:span text:style-name="T105">setenv</text:span><text:span text:style-name="T104">(</text:span><text:span text:style-name="T403">"LOGNAME"</text:span><text:span text:style-name="T104">, pw-&gt;pw_name, </text:span><text:span text:style-name="T128">1</text:span><text:span text:style-name="T104">);</text:span></text:p>
      <text:p text:style-name="P1339"><text:span text:style-name="T1556">69</text:span><text:span text:style-name="T1557"><text:tab/></text:span><text:span text:style-name="T706">setenv</text:span><text:span text:style-name="T707">(</text:span><text:span text:style-name="T1558">"SHELL"</text:span><text:span text:style-name="T707">, pw-&gt;pw_shell, </text:span><text:span text:style-name="T1559">1</text:span><text:span text:style-name="T707">);</text:span></text:p>
      <text:p text:style-name="P1340"/>
      <text:p text:style-name="P1341"><text:span text:style-name="T1560">to set the environment variables in a </text:span><text:span text:style-name="T1531">order</text:span><text:span text:style-name="T1560"> </text:span><text:span text:style-name="T1561">to</text:span><text:span text:style-name="T1560"> have </text:span><text:span text:style-name="T1562">the correct environment of the user </text:span><text:span text:style-name="T1563">newuser</text:span><text:span text:style-name="T1562">. </text:span><text:span text:style-name="T1531">T</text:span><text:span text:style-name="T1562">his because the environment is inherited </text:span><text:span text:style-name="T1564">from</text:span><text:span text:style-name="T1562"> </text:span><text:span text:style-name="T1563">root</text:span><text:span text:style-name="T1562">, therefore we must override these values to get </text:span><text:span text:style-name="T1531">the environment of</text:span><text:span text:style-name="T1562"> </text:span><text:span text:style-name="T1563">newuser</text:span><text:span text:style-name="T1562">. </text:span></text:p>
      <text:p text:style-name="P1342"/>
      <text:p text:style-name="P1343">The line<text:span text:style-name="T1565">s</text:span></text:p>
      <text:p text:style-name="P1343"/>
      <text:p text:style-name="P1344"><text:span text:style-name="T1535">7</text:span><text:span text:style-name="T1542">7</text:span><text:span text:style-name="T103"><text:tab/>if</text:span><text:span text:style-name="T104"> (</text:span><text:span text:style-name="T105">chdir</text:span><text:span text:style-name="T104">(pw-&gt;pw_dir) &lt; </text:span><text:span text:style-name="T128">0</text:span><text:span text:style-name="T104">) {</text:span></text:p>
      <text:p text:style-name="P1345"><text:span text:style-name="T1534">7</text:span><text:span text:style-name="T1543">8</text:span><text:tab/><text:tab/>fprintf(<text:span text:style-name="T115">stderr</text:span>, <text:span text:style-name="T116">"Warning: Failed to change to home directory <text:tab/><text:tab/><text:tab/> <text:s text:c="2"/>%s\n"</text:span>, pw-&gt;pw_dir);</text:p>
      <text:p text:style-name="P1345"><text:span text:style-name="T1534">7</text:span><text:span text:style-name="T1543">9</text:span><text:tab/>}</text:p>
      <text:p text:style-name="P1342"/>
      <text:p text:style-name="P1346"><text:soft-page-break/><text:span text:style-name="T1566">changes the CWD (current working directory) to that one defined in the </text:span><text:span text:style-name="T1563">/etc/passwd</text:span><text:span text:style-name="T1566"> for the user </text:span><text:span text:style-name="T1563">newuser</text:span><text:span text:style-name="T1566">. In this way we will be in the </text:span><text:span text:style-name="T1563">/home/newuser</text:span><text:span text:style-name="T1566"> folder after the login.</text:span></text:p>
      <text:p text:style-name="P1343"/>
      <text:p text:style-name="P1347"><text:span text:style-name="T1566">Since the program is now integrated with PAM, login sessions are properly recorded by the system’s authentication and session management infrastructure. As a result, these login events can be observed in system accounting tools such as </text:span><text:span text:style-name="Source_20_Text"><text:span text:style-name="T1563">last</text:span></text:span><text:span text:style-name="Source_20_Text"><text:span text:style-name="T1563"><text:note text:id="ftn111" text:note-class="footnote"><text:note-citation>109</text:note-citation><text:note-body><text:p text:style-name="P1239"><text:span text:style-name="T1567">See the </text:span><text:span text:style-name="T1568">wtmpdb(8)</text:span><text:span text:style-name="T1569"> manual page</text:span></text:p></text:note-body></text:note></text:span></text:span><text:span text:style-name="T1566">.</text:span></text:p>
      <text:p text:style-name="P1346"><text:span text:style-name="T1566">By running the </text:span><text:span text:style-name="Source_20_Text"><text:span text:style-name="T1566">last</text:span></text:span><text:span text:style-name="T1566"> command, we can see the user sessions created through the PAM-based login program, along with their login time, logout time, and originating terminal. This confirms that the session is being correctly registered in the system logs (typically stored in </text:span><text:span text:style-name="Source_20_Text"><text:span text:style-name="T1563">/var/log/wtmp</text:span></text:span><text:span text:style-name="T1566">).</text:span></text:p>
      <text:p text:style-name="P1348"/>
      <text:p text:style-name="P1349">Shell 1</text:p>
      <table:table table:name="Table199" table:style-name="Table199">
        <table:table-column table:style-name="Table199.A"/>
        <table:table-row>
          <table:table-cell table:style-name="Table199.A1" office:value-type="string">
            <text:p text:style-name="P1350"><text:span text:style-name="T80">[</text:span><text:a xlink:type="simple" xlink:href="mailto:linux@users" text:style-name="Internet_20_link" text:visited-style-name="Visited_20_Internet_20_Link"><text:span text:style-name="T81">linux@users</text:span></text:a><text:span text:style-name="T80">] </text:span><text:span text:style-name="T1570">sudo ./loginpam</text:span></text:p>
            <text:p text:style-name="P1350">Login: newuser</text:p>
            <text:p text:style-name="P1350">Password: </text:p>
            <text:p text:style-name="P1350">Welcome newuser!</text:p>
            <text:p text:style-name="P1350"/>
            <text:p text:style-name="P1351"><text:span text:style-name="T338">[</text:span><text:a xlink:type="simple" xlink:href="mailto:linux@users" text:style-name="Internet_20_link" text:visited-style-name="Visited_20_Internet_20_Link"><text:span text:style-name="T1571">linux@</text:span></text:a><text:span text:style-name="T1572">newuser</text:span><text:span text:style-name="T338">] </text:span></text:p>
            <text:p text:style-name="P1352"/>
          </table:table-cell>
        </table:table-row>
      </table:table>
      <text:p text:style-name="P1353"/>
      <text:p text:style-name="P1349">Shell 2</text:p>
      <table:table table:name="Table200" table:style-name="Table200">
        <table:table-column table:style-name="Table200.A"/>
        <table:table-row>
          <table:table-cell table:style-name="Table200.A1" office:value-type="string">
            <text:p text:style-name="P1350"><text:span text:style-name="T80">[</text:span><text:a xlink:type="simple" xlink:href="mailto:linux@users" text:style-name="Internet_20_link" text:visited-style-name="Visited_20_Internet_20_Link"><text:span text:style-name="T81">linux@users</text:span></text:a><text:span text:style-name="T80">] </text:span><text:span text:style-name="T1570">last</text:span></text:p>
            <text:p text:style-name="P1354">newuser <text:s text:c="30"/>Wed Jul <text:s/>9 03:29 - still logged in</text:p>
            <text:p text:style-name="P1352">users <text:s text:c="3"/>tty2 <text:s text:c="26"/>Wed Jul <text:s/>9 03:23 - still logged in</text:p>
            <text:p text:style-name="P1352">Debian-g tty1 <text:s text:c="22"/>Wed Jul <text:s/>9 03:22 - 03:23 <text:s/>(00:00)</text:p>
          </table:table-cell>
        </table:table-row>
      </table:table>
      <text:p text:style-name="P1353"/>
      <text:p text:style-name="P1347"><text:span text:style-name="T1573">We can also observe active and historical login sessions using the </text:span><text:span text:style-name="Source_20_Text"><text:span text:style-name="T1563">loginctl</text:span></text:span><text:span text:style-name="Source_20_Text"><text:span text:style-name="T1574"><text:note text:id="ftn112" text:note-class="footnote"><text:note-citation>110</text:note-citation><text:note-body><text:p text:style-name="P1355"><text:span text:style-name="T1575">See the</text:span><text:span text:style-name="T1576">loginctl(1)</text:span><text:span text:style-name="T1577"> manual page </text:span></text:p></text:note-body></text:note></text:span></text:span><text:span text:style-name="T1573"> command, which is part of systemd’s session management system.</text:span></text:p>
      <text:p text:style-name="P1356"/>
      <text:p text:style-name="P1357">Shell 2</text:p>
      <table:table table:name="Table201" table:style-name="Table201">
        <table:table-column table:style-name="Table201.A"/>
        <table:table-row>
          <table:table-cell table:style-name="Table201.A1" office:value-type="string">
            <text:p text:style-name="P1358"><text:span text:style-name="T80">[</text:span><text:a xlink:type="simple" xlink:href="mailto:linux@users" text:style-name="Internet_20_link" text:visited-style-name="Visited_20_Internet_20_Link"><text:span text:style-name="T81">linux@users</text:span></text:a><text:span text:style-name="T80">] </text:span><text:span text:style-name="T1573">loginctl</text:span></text:p>
            <text:p text:style-name="P1358">SESSION <text:s/>UID USER <text:s text:c="3"/>SEAT <text:s/>LEADER CLASS <text:s text:c="5"/>TTY <text:s/>IDLE SINCE</text:p>
            <text:p text:style-name="P1358"><text:s text:c="6"/>2 1000 <text:span text:style-name="T1578">users</text:span> <text:s text:c="2"/>seat0 1951 <text:s text:c="2"/>user <text:s text:c="6"/>tty2 no <text:s text:c="2"/>- <text:s text:c="3"/></text:p>
            <text:p text:style-name="P1358"><text:s text:c="6"/>3 1000 <text:span text:style-name="T1578">users</text:span> <text:s text:c="2"/>- <text:s text:c="4"/>1961 <text:s text:c="2"/>manager <text:s text:c="3"/>- <text:s text:c="3"/>no <text:s text:c="2"/>- <text:s text:c="3"/></text:p>
            <text:p text:style-name="P1358"><text:s text:c="6"/>5 1005 newuser - <text:s text:c="4"/>4820 <text:s text:c="2"/>manager <text:s text:c="3"/>- <text:s text:c="3"/>no <text:s text:c="2"/>- <text:s text:c="3"/></text:p>
            <text:p text:style-name="P1358"><text:s text:c="5"/>c2 1005 newuser - <text:s text:c="4"/>4792 <text:s text:c="2"/>background - <text:s text:c="3"/>no <text:s text:c="2"/>- <text:s text:c="3"/></text:p>
            <text:p text:style-name="P1358"/>
            <text:p text:style-name="P1358">4 sessions listed.</text:p>
          </table:table-cell>
        </table:table-row>
      </table:table>
      <text:p text:style-name="P1347"><text:span text:style-name="T1579"/></text:p>
      <text:p text:style-name="P1347"><text:span text:style-name="T1579">When executed, </text:span><text:span text:style-name="Source_20_Text"><text:span text:style-name="T1563">loginctl</text:span></text:span><text:span text:style-name="T1579"> displays a list of current sessions along with details such as the user ID, username, associated seat, session leader process, session class, and terminal information. This provides a more structured and </text:span><text:span text:style-name="Source_20_Text"><text:span text:style-name="T1563">systemd</text:span></text:span><text:span text:style-name="T1579">-integrated view of user logins compared to traditional tools like </text:span><text:span text:style-name="Source_20_Text"><text:span text:style-name="T1563">who</text:span></text:span><text:span text:style-name="T1579"> or </text:span><text:span text:style-name="Source_20_Text"><text:span text:style-name="T1563">last</text:span></text:span><text:span text:style-name="T1579">.</text:span></text:p>
      <text:p text:style-name="P1359"/>
      <text:p text:style-name="P1359"/>
      <text:p text:style-name="P1359"/>
      <text:p text:style-name="P1359"/>
      <text:p text:style-name="P1359"/>
      <text:p text:style-name="P1359"/>
      <text:p text:style-name="P1360"><text:soft-page-break/><text:span text:style-name="T1580">III.11.3 </text:span><text:span text:style-name="T1581">Process environment and PAM environment: </text:span><text:span text:style-name="T1582">pam_getenv</text:span><text:span text:style-name="T1583">, </text:span><text:span text:style-name="T1582">pam_putenv</text:span></text:p>
      <text:p text:style-name="P1359"/>
      <text:p text:style-name="P1346"><text:span text:style-name="T1584">The PAM library provides additional functions</text:span><text:span text:style-name="T1584"><text:note text:id="ftn113" text:note-class="footnote"><text:note-citation>111</text:note-citation><text:note-body><text:p text:style-name="P1361"><text:span text:style-name="T1585">See the </text:span><text:span text:style-name="T1586">pam_getenv(3)</text:span><text:span text:style-name="T1585"> and </text:span><text:span text:style-name="T1586">pam_</text:span><text:span text:style-name="T1587">putenv(3)</text:span><text:span text:style-name="T1585"> manual pages</text:span></text:p></text:note-body></text:note></text:span><text:span text:style-name="T1584"> for working with the PAM environment beyond </text:span><text:span text:style-name="Source_20_Text"><text:span text:style-name="T1563">pam_getenvlist</text:span></text:span><text:span text:style-name="T1584">. These functions allow programs to directly query and modify environment variables associated with a PAM session.</text:span></text:p>
      <text:p text:style-name="P1362"/>
      <table:table table:name="Table202" table:style-name="Table202">
        <table:table-column table:style-name="Table202.A"/>
        <table:table-row>
          <table:table-cell table:style-name="Table202.A1" office:value-type="string">
            <text:p text:style-name="P271"><text:span text:style-name="T115">#include </text:span><text:span text:style-name="T116">&lt;security/pam_appl.h&gt;</text:span></text:p>
            <text:p text:style-name="P188"/>
            <text:p text:style-name="P191"><text:span text:style-name="T103">const</text:span><text:span text:style-name="T104"> </text:span><text:span text:style-name="T103">char</text:span><text:span text:style-name="T104"> *</text:span><text:span text:style-name="T105">pam_getenv</text:span><text:span text:style-name="T104">(</text:span><text:span text:style-name="T103">pam_handle_t</text:span><text:span text:style-name="T104"> </text:span><text:span text:style-name="T106">*pamh</text:span><text:span text:style-name="T104">, </text:span><text:span text:style-name="T103">const</text:span><text:span text:style-name="T104"> </text:span><text:span text:style-name="T103">char</text:span><text:span text:style-name="T104"> </text:span><text:span text:style-name="T106">*name</text:span><text:span text:style-name="T104">);</text:span></text:p>
            <text:p text:style-name="P188"/>
            <text:p text:style-name="P191"><text:span text:style-name="T103">int</text:span><text:span text:style-name="T104"> </text:span><text:span text:style-name="T105">pam_putenv</text:span><text:span text:style-name="T104">(</text:span><text:span text:style-name="T103">pam_handle_t</text:span><text:span text:style-name="T104"> </text:span><text:span text:style-name="T106">*pamh</text:span><text:span text:style-name="T104">, </text:span><text:span text:style-name="T103">const</text:span><text:span text:style-name="T104"> </text:span><text:span text:style-name="T103">char</text:span><text:span text:style-name="T104"> </text:span><text:span text:style-name="T106">*name_value</text:span><text:span text:style-name="T104">);</text:span></text:p>
            <text:p text:style-name="P283"/>
            <text:p text:style-name="P1363">Return: <text:span text:style-name="T1588">a pointer to the value of the variable,</text:span> </text:p>
            <text:p text:style-name="P1363"><text:s text:c="8"/>PAM_SUCCESS <text:span text:style-name="T1589">| PAM_PERM_DENIED | PAM_BAD_ITEM | PAM_ABORT | PAM_BUF_ERR</text:span></text:p>
          </table:table-cell>
        </table:table-row>
      </table:table>
      <text:p text:style-name="P1359"/>
      <text:p text:style-name="P1346"><text:span text:style-name="T1590">The </text:span><text:span text:style-name="T1563">pam_getenv</text:span><text:span text:style-name="T1590"> function retrieves the value of the variable </text:span><text:span text:style-name="T1563">name</text:span><text:span text:style-name="T1590"> from the PAM context </text:span><text:span text:style-name="T1563">pamh</text:span><text:span text:style-name="T1590">. </text:span></text:p>
      <text:p text:style-name="P1346"><text:span text:style-name="T1590">The function </text:span><text:span text:style-name="T1563">pam_putenv</text:span><text:span text:style-name="T1590"> sets the variable </text:span><text:span text:style-name="T1563">name_value</text:span><text:span text:style-name="T1590"> in the PAM context </text:span><text:span text:style-name="T1563">pamh</text:span><text:span text:style-name="T1590">. The </text:span><text:span text:style-name="T1563">name_value</text:span><text:span text:style-name="T1590"> argument </text:span><text:span text:style-name="T1591">can be passed in one of</text:span><text:span text:style-name="T1590"> the following forms:</text:span></text:p>
      <text:p text:style-name="P1364"/>
      <text:list xml:id="list3062509065" text:style-name="L15">
        <text:list-item>
          <text:p text:style-name="P1365">NAME=value</text:p>
        </text:list-item>
      </text:list>
      <text:p text:style-name="P1364"><text:span text:style-name="T1588"><text:tab/>T</text:span>he environment variable NAME is set to the indicated value. If <text:span text:style-name="T1588">the</text:span> variable already <text:span text:style-name="T1588">exists <text:tab/>and has a value,</text:span> it is overwritten, <text:span text:style-name="T1588">o</text:span>therwise it is added to the PAM environment</text:p>
      <text:p text:style-name="P1364"/>
      <text:list text:style-name="L16">
        <text:list-item>
          <text:p text:style-name="P1366">NAME=</text:p>
        </text:list-item>
      </text:list>
      <text:p text:style-name="P1364"><text:span text:style-name="T1588"><text:tab/>S</text:span>ets the variable to an empty value</text:p>
      <text:p text:style-name="P1364"/>
      <text:list text:style-name="L17">
        <text:list-item>
          <text:p text:style-name="P1367">NAME</text:p>
        </text:list-item>
      </text:list>
      <text:list text:continue-list="list3062509065" text:style-name="L15">
        <text:list-header>
          <text:p text:style-name="P1368"><text:span text:style-name="T1590">Without </text:span><text:span text:style-name="T1592">the</text:span><text:span text:style-name="T1590"> '</text:span><text:span text:style-name="T1563">=</text:span><text:span text:style-name="T1590">', </text:span><text:span text:style-name="T1563">pam_putenv</text:span><text:span text:style-name="T1590"> will delete the corresponding variable from the PAM environment</text:span></text:p>
        </text:list-header>
      </text:list>
      <text:p text:style-name="P1364"/>
      <text:p text:style-name="P1346"><text:span text:style-name="T1593">The </text:span><text:span text:style-name="T1563">pam_putenv</text:span><text:span text:style-name="T1590"> </text:span><text:span text:style-name="T1593">function </text:span><text:span text:style-name="T1590">operates on a copy of </text:span><text:span text:style-name="T1563">name_value</text:span><text:span text:style-name="T1590">, which means in contrast to </text:span><text:span text:style-name="T1563">putenv</text:span><text:span text:style-name="T1590">, the application is responsible for freeing the data.</text:span></text:p>
      <text:p text:style-name="P1369"><text:span text:style-name="T1594">The PAM environment is not the process environment. In the process environment we get/set the variables with </text:span><text:span text:style-name="T1563">getenv</text:span><text:span text:style-name="T1594"> and </text:span><text:span text:style-name="T1563">setenv</text:span><text:span text:style-name="T1594">/</text:span><text:span text:style-name="T1563">putenv</text:span><text:span text:style-name="T1590">. </text:span><text:span text:style-name="T1595">The following table shows a summary of the functions used to set the environment variables.</text:span></text:p>
      <text:p text:style-name="P1370"><text:s/></text:p>
      <table:table table:name="Table203" table:style-name="Table203">
        <table:table-column table:style-name="Table203.A"/>
        <table:table-column table:style-name="Table203.B"/>
        <table:table-column table:style-name="Table203.C"/>
        <table:table-row>
          <table:table-cell table:style-name="Table203.A1" office:value-type="string">
            <text:p text:style-name="P1371">Functions</text:p>
          </table:table-cell>
          <table:table-cell table:style-name="Table203.A1" office:value-type="string">
            <text:p text:style-name="P1371">Purpose</text:p>
          </table:table-cell>
          <table:table-cell table:style-name="Table203.C1" office:value-type="string">
            <text:p text:style-name="P1371">Affects</text:p>
          </table:table-cell>
        </table:table-row>
        <table:table-row>
          <table:table-cell table:style-name="Table203.A2" office:value-type="string">
            <text:p text:style-name="P1372">getenv, setenv, putenv</text:p>
          </table:table-cell>
          <table:table-cell table:style-name="Table203.A2" office:value-type="string">
            <text:p text:style-name="P1373">Gets or sets/changes an environment variable in current process</text:p>
          </table:table-cell>
          <table:table-cell table:style-name="Table203.C2" office:value-type="string">
            <text:p text:style-name="P1374"><text:span text:style-name="T1596">Real process environment (</text:span><text:span text:style-name="T1563">environ</text:span><text:span text:style-name="T1596">)</text:span></text:p>
          </table:table-cell>
        </table:table-row>
        <table:table-row>
          <table:table-cell table:style-name="Table203.A2" office:value-type="string">
            <text:p text:style-name="P1372">pam_getenvlist, pam_getenv, pam_putenv</text:p>
          </table:table-cell>
          <table:table-cell table:style-name="Table203.A2" office:value-type="string">
            <text:p text:style-name="P1375"><text:span text:style-name="T1597">G</text:span>ets/<text:span text:style-name="T1597">sets</text:span> a PAM-managed environment variable</text:p>
          </table:table-cell>
          <table:table-cell table:style-name="Table203.C2" office:value-type="string">
            <text:p text:style-name="P1374"><text:span text:style-name="T1596">PAM environment (not </text:span><text:span text:style-name="T1563">environ</text:span><text:span text:style-name="T1596">)</text:span></text:p>
          </table:table-cell>
        </table:table-row>
      </table:table>
      <text:p text:style-name="P1376"/>
      <text:p text:style-name="P1377"><text:span text:style-name="T90">Tab 2</text:span><text:span text:style-name="T361">6</text:span><text:span text:style-name="T90">.</text:span> Functions of <text:span text:style-name="T1598">the</text:span> process <text:span text:style-name="T1598">environment </text:span>and PAM environment</text:p>
      <text:p text:style-name="P1377"/>
      <text:p text:style-name="P1346"><text:span text:style-name="T1599">PAM maintains an </text:span><text:span text:style-name="T1600">internal environment, </text:span><text:span text:style-name="T1601">separate from the process real </text:span><text:span text:style-name="T1563">environ</text:span><text:span text:style-name="T1601">, to store variables that PAM modules set during authentication and session setup. The PAM environment is private to the PAM handle/context and exists only during the lifetime of the PAM session. </text:span></text:p>
      <text:p text:style-name="P1378"><text:soft-page-break/>The following table <text:span text:style-name="T1585">lists</text:span> some PAM modules that can populate environment variables.</text:p>
      <text:p text:style-name="P1378"/>
      <table:table table:name="Table204" table:style-name="Table204">
        <table:table-column table:style-name="Table204.A"/>
        <table:table-column table:style-name="Table204.B"/>
        <table:table-header-rows>
          <table:table-row>
            <table:table-cell table:style-name="Table204.A1" office:value-type="string">
              <text:p text:style-name="P1379">Module</text:p>
            </table:table-cell>
            <table:table-cell table:style-name="Table204.A1" office:value-type="string">
              <text:p text:style-name="P1379">Environment variables it may set</text:p>
            </table:table-cell>
          </table:table-row>
        </table:table-header-rows>
        <table:table-row>
          <table:table-cell table:style-name="Table204.A1" office:value-type="string">
            <text:p text:style-name="P1346"><text:span text:style-name="Source_20_Text"><text:span text:style-name="T1563">pam_env.so</text:span></text:span></text:p>
          </table:table-cell>
          <table:table-cell table:style-name="Table204.A1" office:value-type="string">
            <text:p text:style-name="P1380"><text:span text:style-name="T1601">From </text:span><text:span text:style-name="Source_20_Text"><text:span text:style-name="T1563">/etc/environment</text:span></text:span><text:span text:style-name="T1601">, </text:span><text:span text:style-name="Source_20_Text"><text:span text:style-name="T1563">/etc/security/pam_env.conf</text:span></text:span></text:p>
          </table:table-cell>
        </table:table-row>
        <table:table-row>
          <table:table-cell table:style-name="Table204.A1" office:value-type="string">
            <text:p text:style-name="P1346"><text:span text:style-name="Source_20_Text"><text:span text:style-name="T1563">pam_krb5.so</text:span></text:span></text:p>
          </table:table-cell>
          <table:table-cell table:style-name="Table204.A1" office:value-type="string">
            <text:p text:style-name="P1378">Kerberos ticket cache variables</text:p>
          </table:table-cell>
        </table:table-row>
        <table:table-row>
          <table:table-cell table:style-name="Table204.A1" office:value-type="string">
            <text:p text:style-name="P1346"><text:span text:style-name="Source_20_Text"><text:span text:style-name="T1563">pam_systemd.so</text:span></text:span></text:p>
          </table:table-cell>
          <table:table-cell table:style-name="Table204.A1" office:value-type="string">
            <text:p text:style-name="P1380"><text:span text:style-name="Source_20_Text"><text:span text:style-name="T1563">XDG_SESSION_ID</text:span></text:span><text:span text:style-name="T1601">, </text:span><text:span text:style-name="Source_20_Text"><text:span text:style-name="T1563">XDG_RUNTIME_DIR</text:span></text:span><text:span text:style-name="T1601">, etc.</text:span></text:p>
          </table:table-cell>
        </table:table-row>
        <table:table-row>
          <table:table-cell table:style-name="Table204.A1" office:value-type="string">
            <text:p text:style-name="P1346"><text:span text:style-name="Source_20_Text"><text:span text:style-name="T1563">pam_mail.so</text:span></text:span></text:p>
          </table:table-cell>
          <table:table-cell table:style-name="Table204.A1" office:value-type="string">
            <text:p text:style-name="P1380"><text:span text:style-name="Source_20_Text"><text:span text:style-name="T1563">MAIL=/var/mail/username</text:span></text:span></text:p>
          </table:table-cell>
        </table:table-row>
        <table:table-row>
          <table:table-cell table:style-name="Table204.A1" office:value-type="string">
            <text:p text:style-name="P1378">Custom modules</text:p>
          </table:table-cell>
          <table:table-cell table:style-name="Table204.A1" office:value-type="string">
            <text:p text:style-name="P1378">Any app-defined variables</text:p>
          </table:table-cell>
        </table:table-row>
      </table:table>
      <text:p text:style-name="P1378"/>
      <text:p text:style-name="P1381"><text:span text:style-name="T90">Tab 2</text:span><text:span text:style-name="T361">7</text:span><text:span text:style-name="T90">.</text:span> PAM modules and variables</text:p>
      <text:p text:style-name="P1382"/>
      <text:p text:style-name="P1383">Without the lines <text:span text:style-name="T1585">(</text:span><text:span text:style-name="T1586">loginpam.c</text:span><text:span text:style-name="T1585">)</text:span></text:p>
      <text:p text:style-name="P1383"/>
      <text:p text:style-name="P1384"><text:span text:style-name="T1540">7</text:span><text:span text:style-name="T1542">0</text:span><text:span text:style-name="T1535"><text:tab/></text:span><text:span text:style-name="T103">char</text:span><text:span text:style-name="T104"> **envlist = </text:span><text:span text:style-name="T105">pam_getenvlist</text:span><text:span text:style-name="T104">(pamh);</text:span></text:p>
      <text:p text:style-name="P1385"><text:span text:style-name="T1541">7</text:span><text:span text:style-name="T1543">1</text:span><text:span text:style-name="T1534"><text:tab/></text:span><text:span text:style-name="T115">if</text:span> (envlist) {</text:p>
      <text:p text:style-name="P1385"><text:span text:style-name="T1541">7</text:span><text:span text:style-name="T1543">2</text:span><text:span text:style-name="T1534"><text:tab/><text:tab/></text:span><text:span text:style-name="T115">for</text:span> (<text:span text:style-name="T115">char</text:span> **env = envlist; *env; ++env) {</text:p>
      <text:p text:style-name="P1384"><text:span text:style-name="T1535">7</text:span><text:span text:style-name="T1542">3</text:span><text:span text:style-name="T1535"><text:tab/><text:tab/><text:tab/></text:span><text:span text:style-name="T105">putenv</text:span><text:span text:style-name="T104">(*env); </text:span></text:p>
      <text:p text:style-name="P1385"><text:span text:style-name="T1534">7</text:span><text:span text:style-name="T1543">4</text:span><text:span text:style-name="T1534"><text:tab/><text:tab/></text:span>}</text:p>
      <text:p text:style-name="P1384"><text:span text:style-name="T1535">7</text:span><text:span text:style-name="T1542">5</text:span><text:span text:style-name="T1535"><text:tab/><text:tab/></text:span><text:span text:style-name="T105">free</text:span><text:span text:style-name="T104">(envlist);</text:span></text:p>
      <text:p text:style-name="P1386"><text:span text:style-name="T1602">7</text:span><text:span text:style-name="T1603">6</text:span><text:span text:style-name="T1602"><text:tab/></text:span><text:span text:style-name="T1091">}</text:span></text:p>
      <text:p text:style-name="P1382"/>
      <text:p text:style-name="P1387"><text:span text:style-name="T1604">the child shell </text:span><text:span text:style-name="T1605">could</text:span><text:span text:style-name="T1604"> not have </text:span><text:span text:style-name="T1606">the </text:span><text:span text:style-name="Source_20_Text"><text:span text:style-name="T1563">XDG_</text:span></text:span><text:span text:style-name="T1604"> variables (used by desktop services). </text:span><text:span text:style-name="T1607"><text:s/></text:span></text:p>
      <text:p text:style-name="P1388">If we add the line </text:p>
      <text:p text:style-name="P1388"/>
      <text:p text:style-name="P1384"><text:span text:style-name="T1608"><text:tab/></text:span><text:span text:style-name="T105">printf</text:span><text:span text:style-name="T1608">(</text:span><text:span text:style-name="T1609">" %s\n"</text:span><text:span text:style-name="T1608">, *env);</text:span></text:p>
      <text:p text:style-name="P1388"/>
      <text:p text:style-name="P1389">before the line 73 we <text:span text:style-name="T1585">can</text:span> print all the PAM environment variables.</text:p>
      <text:p text:style-name="P1390"/>
      <table:table table:name="Table205" table:style-name="Table205">
        <table:table-column table:style-name="Table205.A"/>
        <table:table-row>
          <table:table-cell table:style-name="Table205.A1" office:value-type="string">
            <text:p text:style-name="P1391"><text:span text:style-name="T80">[</text:span><text:a xlink:type="simple" xlink:href="mailto:linux@users" text:style-name="Internet_20_link" text:visited-style-name="Visited_20_Internet_20_Link"><text:span text:style-name="T81">linux@users</text:span></text:a><text:span text:style-name="T80">] </text:span><text:span text:style-name="T1610">sudo ./loginpam</text:span></text:p>
            <text:p text:style-name="P1391">Login: newuser</text:p>
            <text:p text:style-name="P1391">Password: </text:p>
            <text:p text:style-name="P1391"><text:s text:c="2"/>XDG_SESSION_ID=c5</text:p>
            <text:p text:style-name="P1391"><text:s text:c="2"/>XDG_RUNTIME_DIR=/run/user/1005</text:p>
            <text:p text:style-name="P1391"><text:s text:c="2"/>DBUS_SESSION_BUS_ADDRESS=unix:path=/run/user/1005/bus</text:p>
            <text:p text:style-name="P1391"><text:s text:c="2"/>XDG_SESSION_TYPE=unspecified</text:p>
            <text:p text:style-name="P1391"><text:s text:c="2"/>XDG_SESSION_CLASS=background</text:p>
            <text:p text:style-name="P1391">Welcome newuser!</text:p>
          </table:table-cell>
        </table:table-row>
      </table:table>
      <text:p text:style-name="P1389"/>
      <text:p text:style-name="P1392"><text:span text:style-name="T1611">These variables are ultimately sourced from </text:span><text:span text:style-name="Source_20_Text"><text:span text:style-name="T1612">/etc/environment</text:span></text:span><text:span text:style-name="T1611">, which is one of the system-wide configuration files used to define global environment variables on Linux systems.</text:span></text:p>
      <text:p text:style-name="P1392"><text:span text:style-name="T1611">During session initialization, PAM (typically through modules like </text:span><text:span text:style-name="Source_20_Text"><text:span text:style-name="T1612">pam_env</text:span></text:span><text:span text:style-name="T1611">) reads </text:span><text:span text:style-name="Source_20_Text"><text:span text:style-name="T1612">/etc/environment</text:span></text:span><text:span text:style-name="T1611"> and other related configuration files, then loads the defined variables into the PAM environment. These variables can later be accessed through functions such as </text:span><text:span text:style-name="Source_20_Text"><text:span text:style-name="T1612">pam_getenv</text:span></text:span><text:span text:style-name="T1611"> or </text:span><text:span text:style-name="Source_20_Text"><text:span text:style-name="T1612">pam_getenvlist</text:span></text:span><text:span text:style-name="T1611">, or viewed via tools that inspect the PAM session environment.</text:span></text:p>
      <text:p text:style-name="P1389"/>
      <text:p text:style-name="P1392"><text:span text:style-name="T1611">In this way, </text:span><text:span text:style-name="Source_20_Text"><text:span text:style-name="T1612">/etc/environment</text:span></text:span><text:span text:style-name="T1611"> serves as a central place for defining system-wide environment variables that are propagated into user sessions at login.</text:span></text:p>
      <text:p text:style-name="P1393"/>
      <text:p text:style-name="P1393"/>
      <text:p text:style-name="P1387"><text:soft-page-break/><text:span text:style-name="T1611">The </text:span><text:span text:style-name="Source_20_Text"><text:span text:style-name="T1563">pam_getenv</text:span></text:span><text:span text:style-name="T1611"> command-line tool provides a shell-level equivalent to the </text:span><text:span text:style-name="Source_20_Text"><text:span text:style-name="T1563">pam_getenv</text:span></text:span><text:span text:style-name="T1611"> function in the PAM library.</text:span></text:p>
      <text:p text:style-name="P1387"><text:span text:style-name="T1611">It allows users or scripts to query a specific environment variable from the current PAM session, instead of accessing the full environment list returned by </text:span><text:span text:style-name="Source_20_Text"><text:span text:style-name="T1563">pam_getenvlist</text:span></text:span><text:span text:style-name="T1611">. In this way, it behaves similarly to the function version, but is usable directly from the command line for inspection and debugging of PAM-managed session variables.</text:span></text:p>
      <text:p text:style-name="P1394"/>
      <table:table table:name="Table218" table:style-name="Table218">
        <table:table-column table:style-name="Table218.A"/>
        <table:table-row>
          <table:table-cell table:style-name="Table218.A1" office:value-type="string">
            <text:p text:style-name="P1395"><text:span text:style-name="T80">[</text:span><text:a xlink:type="simple" xlink:href="mailto:linux@users" text:style-name="Internet_20_link" text:visited-style-name="Visited_20_Internet_20_Link"><text:span text:style-name="T81">linux@users</text:span></text:a><text:span text:style-name="T80">] </text:span><text:span text:style-name="T1613">pam_getenv PATH</text:span></text:p>
            <text:p text:style-name="P1395">/usr/local/sbin:/usr/local/bin:/usr/sbin:/usr/bin:/sbin:/bin:/usr/local/games:/usr/games</text:p>
          </table:table-cell>
        </table:table-row>
      </table:table>
      <text:p text:style-name="P1396"/>
      <text:p text:style-name="P1397"/>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8"/>
      <text:p text:style-name="P1399"><text:soft-page-break/><text:span text:style-name="T1440">III.11.4 </text:span>PAM items: <text:span text:style-name="T1614">pam_get_item and pam_set_item</text:span></text:p>
      <text:p text:style-name="P1398"/>
      <text:p text:style-name="P1400">PAM items are the named data elements inside the PAM context that we can read and write. They are represented by the following constants <text:span text:style-name="T1615">defined in the </text:span><text:span text:style-name="T1616">security/_pam_types.h</text:span><text:span text:style-name="T1615"> header file.</text:span></text:p>
      <text:p text:style-name="P1401"/>
      <table:table table:name="Table206" table:style-name="Table206">
        <table:table-column table:style-name="Table206.A"/>
        <table:table-column table:style-name="Table206.B"/>
        <table:table-column table:style-name="Table206.C"/>
        <table:table-header-rows>
          <table:table-row>
            <table:table-cell table:style-name="Table206.A1" office:value-type="string">
              <text:p text:style-name="P1402">Value</text:p>
            </table:table-cell>
            <table:table-cell table:style-name="Table206.A1" office:value-type="string">
              <text:p text:style-name="Table_20_Heading">Constant</text:p>
            </table:table-cell>
            <table:table-cell table:style-name="Table206.A1" office:value-type="string">
              <text:p text:style-name="Table_20_Heading">Purpose</text:p>
            </table:table-cell>
          </table:table-row>
        </table:table-header-rows>
        <table:table-row>
          <table:table-cell table:style-name="Table206.A1" office:value-type="string">
            <text:p text:style-name="P1403"><text:span text:style-name="Source_20_Text"><text:span text:style-name="T1563">1</text:span></text:span></text:p>
          </table:table-cell>
          <table:table-cell table:style-name="Table206.A1" office:value-type="string">
            <text:p text:style-name="P1404"><text:span text:style-name="Source_20_Text"><text:span text:style-name="T1563">PAM_SERVICE</text:span></text:span></text:p>
          </table:table-cell>
          <table:table-cell table:style-name="Table206.A1" office:value-type="string">
            <text:p text:style-name="P1404"><text:span text:style-name="Source_20_Text"><text:span text:style-name="T1617">PAM service name</text:span></text:span></text:p>
          </table:table-cell>
        </table:table-row>
        <table:table-row>
          <table:table-cell table:style-name="Table206.A1" office:value-type="string">
            <text:p text:style-name="P1403"><text:span text:style-name="Source_20_Text"><text:span text:style-name="T1563">2</text:span></text:span></text:p>
          </table:table-cell>
          <table:table-cell table:style-name="Table206.A1" office:value-type="string">
            <text:p text:style-name="P1404"><text:span text:style-name="Source_20_Text"><text:span text:style-name="T1563">PAM_USER</text:span></text:span></text:p>
          </table:table-cell>
          <table:table-cell table:style-name="Table206.A1" office:value-type="string">
            <text:p text:style-name="P1404"><text:span text:style-name="Source_20_Text"><text:span text:style-name="T1617">The username</text:span></text:span></text:p>
          </table:table-cell>
        </table:table-row>
        <table:table-row>
          <table:table-cell table:style-name="Table206.A1" office:value-type="string">
            <text:p text:style-name="P1403"><text:span text:style-name="Source_20_Text"><text:span text:style-name="T1563">3</text:span></text:span></text:p>
          </table:table-cell>
          <table:table-cell table:style-name="Table206.A1" office:value-type="string">
            <text:p text:style-name="P1404"><text:span text:style-name="Source_20_Text"><text:span text:style-name="T1563">PAM_TTY</text:span></text:span></text:p>
          </table:table-cell>
          <table:table-cell table:style-name="Table206.A1" office:value-type="string">
            <text:p text:style-name="P1404"><text:span text:style-name="Source_20_Text"><text:span text:style-name="T1617">The terminal</text:span></text:span></text:p>
          </table:table-cell>
        </table:table-row>
        <table:table-row>
          <table:table-cell table:style-name="Table206.A1" office:value-type="string">
            <text:p text:style-name="P1403"><text:span text:style-name="Source_20_Text"><text:span text:style-name="T1563">4</text:span></text:span></text:p>
          </table:table-cell>
          <table:table-cell table:style-name="Table206.A1" office:value-type="string">
            <text:p text:style-name="P1404"><text:span text:style-name="Source_20_Text"><text:span text:style-name="T1563">PAM_RHOST</text:span></text:span></text:p>
          </table:table-cell>
          <table:table-cell table:style-name="Table206.A1" office:value-type="string">
            <text:p text:style-name="P1404"><text:span text:style-name="Source_20_Text"><text:span text:style-name="T1617">Remote hostname</text:span></text:span></text:p>
          </table:table-cell>
        </table:table-row>
        <table:table-row>
          <table:table-cell table:style-name="Table206.A1" office:value-type="string">
            <text:p text:style-name="P1403"><text:span text:style-name="Source_20_Text"><text:span text:style-name="T1563">5</text:span></text:span></text:p>
          </table:table-cell>
          <table:table-cell table:style-name="Table206.A1" office:value-type="string">
            <text:p text:style-name="P1387"><text:span text:style-name="Source_20_Text"><text:span text:style-name="T1563">PAM_CONV</text:span></text:span></text:p>
          </table:table-cell>
          <table:table-cell table:style-name="Table206.A1" office:value-type="string">
            <text:p text:style-name="P1405"><text:span text:style-name="Source_20_Text"><text:span text:style-name="T1617">Conversation structure</text:span></text:span></text:p>
          </table:table-cell>
        </table:table-row>
        <table:table-row>
          <table:table-cell table:style-name="Table206.A1" office:value-type="string">
            <text:p text:style-name="P1403"><text:span text:style-name="Source_20_Text"><text:span text:style-name="T1563">6</text:span></text:span></text:p>
          </table:table-cell>
          <table:table-cell table:style-name="Table206.A1" office:value-type="string">
            <text:p text:style-name="P1404"><text:span text:style-name="Source_20_Text"><text:span text:style-name="T1563">PAM_AUTHTOK</text:span></text:span></text:p>
          </table:table-cell>
          <table:table-cell table:style-name="Table206.A1" office:value-type="string">
            <text:p text:style-name="P1406"><text:span text:style-name="Source_20_Text"><text:span text:style-name="T1617">Authentication token (password)</text:span></text:span></text:p>
          </table:table-cell>
        </table:table-row>
        <table:table-row>
          <table:table-cell table:style-name="Table206.A1" office:value-type="string">
            <text:p text:style-name="P1403"><text:span text:style-name="Source_20_Text"><text:span text:style-name="T1563">7</text:span></text:span></text:p>
          </table:table-cell>
          <table:table-cell table:style-name="Table206.A1" office:value-type="string">
            <text:p text:style-name="P1404"><text:span text:style-name="Source_20_Text"><text:span text:style-name="T1563">PAM_OLDAUTHTOK</text:span></text:span></text:p>
          </table:table-cell>
          <table:table-cell table:style-name="Table206.A1" office:value-type="string">
            <text:p text:style-name="P1404"><text:span text:style-name="Source_20_Text"><text:span text:style-name="T1617">Old </text:span></text:span><text:span text:style-name="Source_20_Text"><text:span text:style-name="T1618">a</text:span></text:span><text:span text:style-name="Source_20_Text"><text:span text:style-name="T1617">uthentication token (password)</text:span></text:span></text:p>
          </table:table-cell>
        </table:table-row>
        <table:table-row>
          <table:table-cell table:style-name="Table206.A1" office:value-type="string">
            <text:p text:style-name="P1403"><text:span text:style-name="Source_20_Text"><text:span text:style-name="T1563">8</text:span></text:span></text:p>
          </table:table-cell>
          <table:table-cell table:style-name="Table206.A1" office:value-type="string">
            <text:p text:style-name="P1404"><text:span text:style-name="Source_20_Text"><text:span text:style-name="T1563">PAM_RUSER </text:span></text:span></text:p>
          </table:table-cell>
          <table:table-cell table:style-name="Table206.A1" office:value-type="string">
            <text:p text:style-name="P1404"><text:span text:style-name="Source_20_Text"><text:span text:style-name="T1617">Remote user (e.g. </text:span></text:span><text:span text:style-name="Source_20_Text"><text:span text:style-name="T1563">SSH</text:span></text:span><text:span text:style-name="Source_20_Text"><text:span text:style-name="T1617">)</text:span></text:span></text:p>
          </table:table-cell>
        </table:table-row>
        <table:table-row>
          <table:table-cell table:style-name="Table206.A1" office:value-type="string">
            <text:p text:style-name="P1403"><text:span text:style-name="Source_20_Text"><text:span text:style-name="T1563">9</text:span></text:span></text:p>
          </table:table-cell>
          <table:table-cell table:style-name="Table206.A1" office:value-type="string">
            <text:p text:style-name="P1387"><text:span text:style-name="Source_20_Text"><text:span text:style-name="T1563">PAM_USER_PROMPT</text:span></text:span></text:p>
          </table:table-cell>
          <table:table-cell table:style-name="Table206.A1" office:value-type="string">
            <text:p text:style-name="P1407">Prompt for getting a username</text:p>
          </table:table-cell>
        </table:table-row>
        <table:table-row>
          <table:table-cell table:style-name="Table206.A1" office:value-type="string">
            <text:p text:style-name="P1403"><text:span text:style-name="Source_20_Text"><text:span text:style-name="T1563">10</text:span></text:span></text:p>
          </table:table-cell>
          <table:table-cell table:style-name="Table206.A1" office:value-type="string">
            <text:p text:style-name="P1408"><text:span text:style-name="Source_20_Text"><text:span text:style-name="T1619">PAM_FAIL_DELAY</text:span></text:span></text:p>
          </table:table-cell>
          <table:table-cell table:style-name="Table206.A1" office:value-type="string">
            <text:p text:style-name="P1409">App supplied function to ovverride failure delays</text:p>
          </table:table-cell>
        </table:table-row>
        <table:table-row>
          <table:table-cell table:style-name="Table206.A1" office:value-type="string">
            <text:p text:style-name="P1403"><text:span text:style-name="Source_20_Text"><text:span text:style-name="T1563">11</text:span></text:span></text:p>
          </table:table-cell>
          <table:table-cell table:style-name="Table206.A1" office:value-type="string">
            <text:p text:style-name="P1408"><text:span text:style-name="Source_20_Text"><text:span text:style-name="T1619">PAM_XDISPLAY</text:span></text:span></text:p>
          </table:table-cell>
          <table:table-cell table:style-name="Table206.A1" office:value-type="string">
            <text:p text:style-name="P1409">X display name</text:p>
          </table:table-cell>
        </table:table-row>
        <table:table-row>
          <table:table-cell table:style-name="Table206.A1" office:value-type="string">
            <text:p text:style-name="P1403"><text:span text:style-name="Source_20_Text"><text:span text:style-name="T1563">12</text:span></text:span></text:p>
          </table:table-cell>
          <table:table-cell table:style-name="Table206.A1" office:value-type="string">
            <text:p text:style-name="P1408"><text:span text:style-name="Source_20_Text"><text:span text:style-name="T1619">PAM_XAUTHDATA</text:span></text:span></text:p>
          </table:table-cell>
          <table:table-cell table:style-name="Table206.A1" office:value-type="string">
            <text:p text:style-name="P1409">X server authentication data</text:p>
          </table:table-cell>
        </table:table-row>
        <table:table-row>
          <table:table-cell table:style-name="Table206.A1" office:value-type="string">
            <text:p text:style-name="P1403"><text:span text:style-name="Source_20_Text"><text:span text:style-name="T1563">13</text:span></text:span></text:p>
          </table:table-cell>
          <table:table-cell table:style-name="Table206.A1" office:value-type="string">
            <text:p text:style-name="P1408"><text:span text:style-name="Source_20_Text"><text:span text:style-name="T1619">PAM_AUTHOK_TYPE</text:span></text:span></text:p>
          </table:table-cell>
          <table:table-cell table:style-name="Table206.A1" office:value-type="string">
            <text:p text:style-name="P1404"><text:span text:style-name="T1620">Type for </text:span><text:span text:style-name="Source_20_Text"><text:span text:style-name="T1563">pam_get_authtok</text:span></text:span><text:span text:style-name="Source_20_Text"><text:span text:style-name="T1563"><text:note text:id="ftn114" text:note-class="footnote"><text:note-citation>112</text:note-citation><text:note-body><text:p text:style-name="P1355"><text:span text:style-name="T1621">See the </text:span><text:span text:style-name="T1622">pam_get_authtok(3)</text:span><text:span text:style-name="T1623"> manual page</text:span></text:p></text:note-body></text:note></text:span></text:span></text:p>
          </table:table-cell>
        </table:table-row>
      </table:table>
      <text:p text:style-name="P1401"/>
      <text:p text:style-name="P1410"><text:span text:style-name="T90">Tab 2</text:span><text:span text:style-name="T361">8</text:span><text:span text:style-name="T90">.</text:span> PAM items</text:p>
      <text:p text:style-name="P1398"/>
      <text:p text:style-name="P1387"><text:soft-page-break/><text:span text:style-name="T1624">We can read and write these items with the </text:span><text:span text:style-name="Source_20_Text"><text:span text:style-name="T1563">pam_get_item</text:span></text:span><text:span text:style-name="T1624"><text:note text:id="ftn115" text:note-class="footnote"><text:note-citation>113</text:note-citation><text:note-body><text:p text:style-name="P1355"><text:span text:style-name="T1625">See the </text:span><text:span text:style-name="T1626">pam_get_item(3)</text:span><text:span text:style-name="T1623"> manual page</text:span></text:p></text:note-body></text:note></text:span><text:span text:style-name="T1624"> and </text:span><text:span text:style-name="Source_20_Text"><text:span text:style-name="T1563">pam_set_item</text:span></text:span><text:span text:style-name="T1624"><text:note text:id="ftn116" text:note-class="footnote"><text:note-citation>114</text:note-citation><text:note-body><text:p text:style-name="P1355"><text:span text:style-name="T1625">See the </text:span><text:span text:style-name="T1622">pam_set_item(3)</text:span><text:span text:style-name="T1621"> manual page</text:span></text:p></text:note-body></text:note></text:span><text:span text:style-name="T1624"> functions, </text:span><text:span text:style-name="T1627">which</text:span><text:span text:style-name="T1624"> are defined as follows.</text:span></text:p>
      <text:p text:style-name="P1398"/>
      <table:table table:name="Table207" table:style-name="Table207">
        <table:table-column table:style-name="Table207.A"/>
        <table:table-row>
          <table:table-cell table:style-name="Table207.A1" office:value-type="string">
            <text:p text:style-name="P271"><text:span text:style-name="T115">#include </text:span><text:span text:style-name="T116">&lt;security/pam_modules.h&gt;</text:span></text:p>
            <text:p text:style-name="P188"/>
            <text:p text:style-name="P229"><text:span text:style-name="T103">int</text:span><text:span text:style-name="T104"> </text:span><text:span text:style-name="T105">pam_get_item</text:span><text:span text:style-name="T104">(</text:span><text:span text:style-name="T103">const</text:span><text:span text:style-name="T104"> </text:span><text:span text:style-name="T103">pam_handle_t</text:span><text:span text:style-name="T104"> </text:span><text:span text:style-name="T106">*pamh</text:span><text:span text:style-name="T104">, </text:span><text:span text:style-name="T103">int</text:span><text:span text:style-name="T104"> </text:span><text:span text:style-name="T106">item_type</text:span><text:span text:style-name="T104">, </text:span><text:span text:style-name="T103">const</text:span><text:span text:style-name="T104"> </text:span><text:span text:style-name="T103">void</text:span><text:span text:style-name="T104"> <text:line-break/> <text:s text:c="16"/></text:span><text:span text:style-name="T106">**item</text:span><text:span text:style-name="T104">);</text:span></text:p>
            <text:p text:style-name="P605"/>
            <text:p text:style-name="P229"><text:span text:style-name="T103">int</text:span><text:span text:style-name="T104"> </text:span><text:span text:style-name="T105">pam_set_item</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item_type</text:span><text:span text:style-name="T104">, </text:span><text:span text:style-name="T103">const</text:span><text:span text:style-name="T104"> </text:span><text:span text:style-name="T103">void</text:span><text:span text:style-name="T104"> </text:span><text:span text:style-name="T106">*item</text:span><text:span text:style-name="T104">);</text:span></text:p>
            <text:p text:style-name="P283"/>
            <text:p text:style-name="P1411">Return: PAM_SUCCESS<text:span text:style-name="T1628">|PAM_BAD_ITEM|PAM_BUF_ERR|PAM_PERM_DENIED|PAM_SYSTEM_ERR</text:span></text:p>
            <text:p text:style-name="P1411"><text:s text:c="8"/>PAM_SUCCESS <text:span text:style-name="T1629">| PAM_BAD_ITEM | PAM_BUF_ERR | PAM_SYSTEM_ERR</text:span></text:p>
          </table:table-cell>
        </table:table-row>
      </table:table>
      <text:p text:style-name="P1398"/>
      <text:p text:style-name="P1412"><text:span text:style-name="T1630">A </text:span><text:span text:style-name="T1631">PAM service</text:span><text:span text:style-name="T1632"> is a file that defines </text:span><text:span text:style-name="Strong_20_Emphasis"><text:span text:style-name="T230">how authentication, authorization, session setup, and password management should work</text:span></text:span><text:span text:style-name="T230"> for a specific application or system component. </text:span></text:p>
      <text:p text:style-name="P1413"/>
      <text:p text:style-name="P1413">The following table <text:span text:style-name="T1633">lists</text:span> some of the PAM services we can find on a Linux system.</text:p>
      <text:p text:style-name="P1413"/>
      <table:table table:name="Table208" table:style-name="Table208">
        <table:table-column table:style-name="Table208.A"/>
        <table:table-column table:style-name="Table208.B"/>
        <table:table-column table:style-name="Table208.C"/>
        <table:table-row>
          <table:table-cell table:style-name="Table208.A1" office:value-type="string">
            <text:p text:style-name="P1414">File</text:p>
          </table:table-cell>
          <table:table-cell table:style-name="Table208.A1" office:value-type="string">
            <text:p text:style-name="P1414">PAM service name</text:p>
          </table:table-cell>
          <table:table-cell table:style-name="Table208.C1" office:value-type="string">
            <text:p text:style-name="P1414">Used by</text:p>
          </table:table-cell>
        </table:table-row>
        <table:table-row>
          <table:table-cell table:style-name="Table208.A2" office:value-type="string">
            <text:p text:style-name="P427"><text:span text:style-name="Source_20_Text"><text:span text:style-name="T75">/etc/pam.d/login</text:span></text:span></text:p>
          </table:table-cell>
          <table:table-cell table:style-name="Table208.A2" office:value-type="string">
            <text:p text:style-name="P427"><text:span text:style-name="Source_20_Text"><text:span text:style-name="T75">login</text:span></text:span></text:p>
          </table:table-cell>
          <table:table-cell table:style-name="Table208.C2" office:value-type="string">
            <text:p text:style-name="P1415"><text:span text:style-name="T1634">Console login (</text:span><text:span text:style-name="Source_20_Text"><text:span text:style-name="T75">/bin/login</text:span></text:span><text:span text:style-name="T1634">)</text:span></text:p>
          </table:table-cell>
        </table:table-row>
        <table:table-row>
          <table:table-cell table:style-name="Table208.A2" office:value-type="string">
            <text:p text:style-name="P427"><text:span text:style-name="Source_20_Text"><text:span text:style-name="T75">/etc/pam.d/sshd</text:span></text:span></text:p>
          </table:table-cell>
          <table:table-cell table:style-name="Table208.A2" office:value-type="string">
            <text:p text:style-name="P427"><text:span text:style-name="Source_20_Text"><text:span text:style-name="T75">sshd</text:span></text:span></text:p>
          </table:table-cell>
          <table:table-cell table:style-name="Table208.C2" office:value-type="string">
            <text:p text:style-name="P1416">OpenSSH</text:p>
          </table:table-cell>
        </table:table-row>
        <table:table-row>
          <table:table-cell table:style-name="Table208.A2" office:value-type="string">
            <text:p text:style-name="P427"><text:span text:style-name="Source_20_Text"><text:span text:style-name="T75">/etc/pam.d/sudo</text:span></text:span></text:p>
          </table:table-cell>
          <table:table-cell table:style-name="Table208.A2" office:value-type="string">
            <text:p text:style-name="P427"><text:span text:style-name="Source_20_Text"><text:span text:style-name="T75">sudo</text:span></text:span></text:p>
          </table:table-cell>
          <table:table-cell table:style-name="Table208.C2" office:value-type="string">
            <text:p text:style-name="P1416">Privilege escalation</text:p>
          </table:table-cell>
        </table:table-row>
        <table:table-row>
          <table:table-cell table:style-name="Table208.A2" office:value-type="string">
            <text:p text:style-name="P427"><text:span text:style-name="Source_20_Text"><text:span text:style-name="T75">/etc/pam.d/gdm-password</text:span></text:span></text:p>
          </table:table-cell>
          <table:table-cell table:style-name="Table208.A2" office:value-type="string">
            <text:p text:style-name="P427"><text:span text:style-name="Source_20_Text"><text:span text:style-name="T75">gdm-password</text:span></text:span></text:p>
          </table:table-cell>
          <table:table-cell table:style-name="Table208.C2" office:value-type="string">
            <text:p text:style-name="P1416">Gnome Display Manager</text:p>
          </table:table-cell>
        </table:table-row>
        <table:table-row>
          <table:table-cell table:style-name="Table208.A2" office:value-type="string">
            <text:p text:style-name="P427"><text:span text:style-name="Source_20_Text"><text:span text:style-name="T75">/etc/pam.d/myservice</text:span></text:span></text:p>
          </table:table-cell>
          <table:table-cell table:style-name="Table208.A2" office:value-type="string">
            <text:p text:style-name="P427"><text:span text:style-name="Source_20_Text"><text:span text:style-name="T75">myservice</text:span></text:span></text:p>
          </table:table-cell>
          <table:table-cell table:style-name="Table208.C2" office:value-type="string">
            <text:p text:style-name="P1416">Custom service</text:p>
          </table:table-cell>
        </table:table-row>
      </table:table>
      <text:p text:style-name="P1413"/>
      <text:p text:style-name="P1417"><text:span text:style-name="T90">Tab 2</text:span><text:span text:style-name="T361">9</text:span><text:span text:style-name="T90">.</text:span> PAM services example</text:p>
      <text:p text:style-name="P1417"/>
      <text:p text:style-name="P427"><text:span text:style-name="T1635">We can get the values of all the PAM items with the two functions mentioned above except </text:span><text:span text:style-name="Source_20_Text"><text:span text:style-name="T75">PAM_AUTHTOK</text:span></text:span><text:span text:style-name="T1635"> because this is a sensitive data. </text:span></text:p>
      <text:p text:style-name="P1418"/>
      <text:p text:style-name="P1419"><text:span text:style-name="T1636">We</text:span><text:span text:style-name="T1637"> modify our </text:span><text:span text:style-name="Source_20_Text"><text:span text:style-name="T75">loginpam.c</text:span></text:span><text:span text:style-name="T1637"> program </text:span><text:span text:style-name="T1636">to</text:span><text:span text:style-name="T1637"> retrieve the user and the service item from the context.</text:span></text:p>
      <text:p text:style-name="P1419"><text:span text:style-name="T1638">We add the following lines after </text:span><text:span text:style-name="Source_20_Text"><text:span text:style-name="T1638">line 76</text:span></text:span></text:p>
      <text:p text:style-name="P1420"/>
      <text:p text:style-name="P1421"><text:span text:style-name="T115">const</text:span> <text:span text:style-name="T115">void</text:span> *user, *service;</text:p>
      <text:p text:style-name="P188"/>
      <text:p text:style-name="P186">ret = <text:span text:style-name="T126">pam_get_item</text:span>(pamh, <text:span text:style-name="T115">PAM_USER</text:span>, &amp;user);</text:p>
      <text:p text:style-name="P186"><text:span text:style-name="T115">if</text:span> (ret != <text:span text:style-name="T115">PAM_SUCCESS</text:span> || !user) {</text:p>
      <text:p text:style-name="P1422"><text:s text:c="3"/>fprintf(<text:span text:style-name="T115">stderr</text:span>, <text:span text:style-name="T116">"pam_get_item failed: %s\n"</text:span>, <text:span text:style-name="T126">pam_strerror</text:span>(pamh, ret));</text:p>
      <text:p text:style-name="P186"><text:s text:c="3"/><text:span text:style-name="T126">pam_end</text:span>(pamh, ret);</text:p>
      <text:p text:style-name="P186">} <text:span text:style-name="T115">else</text:span> {</text:p>
      <text:p text:style-name="P186"><text:s text:c="3"/>printf(<text:span text:style-name="T116">"\nPAM USER: %s"</text:span>, user);</text:p>
      <text:p text:style-name="P186">}</text:p>
      <text:p text:style-name="P188"/>
      <text:p text:style-name="P186">ret = <text:span text:style-name="T126">pam_get_item</text:span>(pamh, <text:span text:style-name="T115">PAM_SERVICE</text:span>, &amp;service);</text:p>
      <text:p text:style-name="P186"><text:span text:style-name="T115">if</text:span> (ret != <text:span text:style-name="T115">PAM_SUCCESS</text:span> || !service) {</text:p>
      <text:p text:style-name="P1422"><text:s text:c="3"/>fprintf(<text:span text:style-name="T115">stderr</text:span>, <text:span text:style-name="T116">"pam_get_item failed: %s\n"</text:span>, <text:span text:style-name="T126">pam_strerror</text:span>(pamh, ret));</text:p>
      <text:p text:style-name="P186"><text:soft-page-break/><text:s text:c="3"/><text:span text:style-name="T126">pam_end</text:span>(pamh, ret);</text:p>
      <text:p text:style-name="P186">} <text:span text:style-name="T115">else</text:span> {</text:p>
      <text:p text:style-name="P186"><text:s text:c="3"/>printf(<text:span text:style-name="T116">"\nPAM SERVICE: %s"</text:span>, service);</text:p>
      <text:p text:style-name="P186">}</text:p>
      <text:p text:style-name="P1423"/>
      <text:p text:style-name="P1423">By doing this, the program becomes more tightly integrated with PAM, since it no longer depends solely on local variables, but instead extracts authentication-related information directly from the PAM transaction context.</text:p>
      <text:p text:style-name="P605"/>
      <table:table table:name="Table209" table:style-name="Table209">
        <table:table-column table:style-name="Table209.A"/>
        <table:table-row>
          <table:table-cell table:style-name="Table209.A1" office:value-type="string">
            <text:p text:style-name="P1424"><text:span text:style-name="T80">[</text:span><text:a xlink:type="simple" xlink:href="mailto:linux@users" text:style-name="Internet_20_link" text:visited-style-name="Visited_20_Internet_20_Link"><text:span text:style-name="T81">linux@users</text:span></text:a><text:span text:style-name="T80">] </text:span><text:span text:style-name="T1639">sudo ./loginpam</text:span></text:p>
            <text:p text:style-name="P1425">Login: newuser</text:p>
            <text:p text:style-name="P1425">Password: </text:p>
            <text:p text:style-name="P1425"><text:s text:c="2"/>PATH=/usr/local/sbin:/usr/local/bin:/usr/sbin:/usr/bin:/sbin:/bin:/usr/local/games:/usr/games</text:p>
            <text:p text:style-name="P1425"><text:s text:c="2"/>COMMAND_NOT_FOUND_INSTALL_PROMPT=1</text:p>
            <text:p text:style-name="P1425"><text:s text:c="2"/>POWERSHELL_UPDATECHECK=Off</text:p>
            <text:p text:style-name="P1425"><text:s text:c="2"/>POWERSHELL_TELEMETRY_OPTOUT=1</text:p>
            <text:p text:style-name="P1425"><text:s text:c="2"/>DOTNET_CLI_TELEMETRY_OPTOUT=1</text:p>
            <text:p text:style-name="P1425"><text:s text:c="2"/>XDG_SESSION_ID=c39</text:p>
            <text:p text:style-name="P1425"><text:s text:c="2"/>XDG_RUNTIME_DIR=/run/user/1005</text:p>
            <text:p text:style-name="P1425"><text:s text:c="2"/>DBUS_SESSION_BUS_ADDRESS=unix:path=/run/user/1005/bus</text:p>
            <text:p text:style-name="P1425"><text:s text:c="2"/>XDG_SESSION_TYPE=unspecified</text:p>
            <text:p text:style-name="P1425"><text:s text:c="2"/>XDG_SESSION_CLASS=background</text:p>
            <text:p text:style-name="P1426">PAM USER: newuser</text:p>
            <text:p text:style-name="P1426">PAM SERVICE: loginpam</text:p>
            <text:p text:style-name="P1425">Welcome newuser!</text:p>
          </table:table-cell>
        </table:table-row>
      </table:table>
      <text:p text:style-name="P1427"><text:span text:style-name="T1635">As we have said before, we cannot retrieve the value of </text:span><text:span text:style-name="T104">PAM_AUTHTOK</text:span><text:span text:style-name="T1635"> directly because it is a sensitive data. </text:span><text:span text:style-name="T1640">This means PAM does not save it after the call to </text:span><text:span text:style-name="T104">pam_authenticate</text:span><text:span text:style-name="T1640"> because it is intended for internal use. Therefore if we want, for example, to store the password typed by the user, we </text:span><text:span text:style-name="T1636">need</text:span><text:span text:style-name="T1635"> to use </text:span><text:span text:style-name="T1641">a custom conversation function.</text:span></text:p>
      <text:p text:style-name="P1428"/>
      <text:p text:style-name="P1427"><text:span text:style-name="T1640">The following </text:span><text:span text:style-name="T104">pam_conversation</text:span><text:span text:style-name="T1640"> function is an example we can use with the </text:span><text:span text:style-name="T104">loginpam.c</text:span><text:span text:style-name="T1640"> program.</text:span></text:p>
      <text:p text:style-name="Horizontal_20_Line"/>
      <text:p text:style-name="P228"><text:span text:style-name="T1642">1 </text:span><text:span text:style-name="T101">char</text:span><text:span text:style-name="T124"> *captured_password = </text:span><text:span text:style-name="T101">NULL</text:span><text:span text:style-name="T124">;</text:span></text:p>
      <text:p text:style-name="P1429"><text:span text:style-name="T1643">2</text:span><text:span text:style-name="T1644"> </text:span><text:span text:style-name="T115">static</text:span> <text:span text:style-name="T115">int</text:span> pam_conversation(<text:span text:style-name="T115">int</text:span> num_msg, <text:span text:style-name="T115">const</text:span> <text:span text:style-name="T115">struct</text:span> pam_message </text:p>
      <text:p text:style-name="P1430"><text:span text:style-name="T104"><text:tab/><text:tab/><text:tab/><text:tab/><text:tab/> <text:s text:c="2"/>**msg, </text:span><text:span text:style-name="T103">struct</text:span><text:span text:style-name="T104"> </text:span><text:span text:style-name="T103">pam_response</text:span><text:span text:style-name="T104"> **resp, </text:span><text:span text:style-name="T103">void</text:span><text:span text:style-name="T104"> </text:span></text:p>
      <text:p text:style-name="P1429"><text:tab/><text:tab/><text:tab/><text:tab/><text:tab/> <text:s text:c="2"/>*appdata_ptr) </text:p>
      <text:p text:style-name="P1429"><text:span text:style-name="T1643">3</text:span><text:span text:style-name="T1644"> </text:span>{</text:p>
      <text:p text:style-name="P1430"><text:span text:style-name="T1645">4</text:span><text:span text:style-name="T1646"> <text:tab/></text:span><text:span text:style-name="T103">struct</text:span><text:span text:style-name="T104"> </text:span><text:span text:style-name="T103">pam_response</text:span><text:span text:style-name="T104"> *reply = calloc(num_msg, </text:span><text:span text:style-name="T103">sizeof</text:span><text:span text:style-name="T104">(</text:span><text:span text:style-name="T103">struct</text:span><text:span text:style-name="T104"> </text:span></text:p>
      <text:p text:style-name="P1429"><text:tab/><text:tab/><text:tab/><text:tab/><text:tab/><text:tab/><text:tab/> <text:s text:c="3"/>pam_response));</text:p>
      <text:p text:style-name="P1429"><text:span text:style-name="T1643">5</text:span><text:span text:style-name="T1644"> <text:tab/></text:span><text:span text:style-name="T115">if</text:span> (!reply) </text:p>
      <text:p text:style-name="P1431"><text:span text:style-name="T1647">6</text:span><text:span text:style-name="T1642"> <text:tab/><text:tab/></text:span><text:span text:style-name="T101">return</text:span><text:span text:style-name="T124"> </text:span><text:span text:style-name="T101">PAM_CONV_ERR</text:span><text:span text:style-name="T124">;</text:span></text:p>
      <text:p text:style-name="P1429"><text:span text:style-name="T1643">7</text:span><text:span text:style-name="T1644"> <text:tab/></text:span><text:span text:style-name="T115">for</text:span> (<text:span text:style-name="T115">int</text:span> i = <text:span text:style-name="T127">0</text:span>; i &lt; num_msg; ++i) {</text:p>
      <text:p text:style-name="P1429"><text:span text:style-name="T1643">8</text:span><text:span text:style-name="T1644"> <text:tab/><text:tab/></text:span><text:span text:style-name="T115">switch</text:span> (msg[i]-&gt;msg_style) {</text:p>
      <text:p text:style-name="P1429"><text:span text:style-name="T1643">9</text:span><text:span text:style-name="T1644"> <text:tab/><text:tab/><text:tab/></text:span><text:span text:style-name="T115">case</text:span> <text:span text:style-name="T115">PAM_PROMPT_ECHO_OFF</text:span>: {</text:p>
      <text:p text:style-name="P1429"><text:span text:style-name="T1643">10</text:span><text:span text:style-name="T1644"> <text:tab/><text:tab/><text:tab/><text:tab/></text:span><text:span text:style-name="T115">char</text:span> *input = getpass(msg[i]-&gt;msg);</text:p>
      <text:p text:style-name="P1429"><text:span text:style-name="T1644">1</text:span><text:span text:style-name="T1643">1</text:span><text:span text:style-name="T1644"> <text:tab/><text:tab/><text:tab/><text:tab/></text:span>reply[i].resp = input ? strdup(input) : <text:span text:style-name="T115">NULL</text:span>;</text:p>
      <text:p text:style-name="P1429"><text:span text:style-name="T1644">1</text:span><text:span text:style-name="T1643">2</text:span><text:span text:style-name="T1644"> <text:tab/><text:tab/><text:tab/><text:tab/></text:span>reply[i].resp_retcode = <text:span text:style-name="T127">0</text:span>;</text:p>
      <text:p text:style-name="P1429"><text:span text:style-name="T1644">1</text:span><text:span text:style-name="T1643">3</text:span><text:span text:style-name="T1644"> <text:tab/><text:tab/><text:tab/><text:tab/></text:span><text:span text:style-name="T115">if</text:span> (captured_password) {</text:p>
      <text:p text:style-name="P1429"><text:span text:style-name="T1644">1</text:span><text:span text:style-name="T1643">4</text:span><text:span text:style-name="T1644"> <text:tab/><text:tab/><text:tab/><text:tab/><text:tab/></text:span>free(captured_password);</text:p>
      <text:p text:style-name="P1429"><text:soft-page-break/><text:span text:style-name="T1644">1</text:span><text:span text:style-name="T1643">5</text:span><text:span text:style-name="T1644"> <text:tab/><text:tab/><text:tab/><text:tab/></text:span>}</text:p>
      <text:p text:style-name="P1429"><text:span text:style-name="T1644">1</text:span><text:span text:style-name="T1643">6</text:span><text:span text:style-name="T1644"> <text:tab/><text:tab/><text:tab/><text:tab/></text:span>captured_password = strdup(input);</text:p>
      <text:p text:style-name="P1429"><text:span text:style-name="T1644">1</text:span><text:span text:style-name="T1643">7</text:span><text:span text:style-name="T1644"><text:tab/><text:tab/><text:tab/><text:tab/></text:span><text:span text:style-name="T115">break</text:span>;</text:p>
      <text:p text:style-name="P1429"><text:span text:style-name="T1644">1</text:span><text:span text:style-name="T1643">8</text:span><text:span text:style-name="T1644"> <text:tab/><text:tab/><text:tab/></text:span>}</text:p>
      <text:p text:style-name="P1429"><text:span text:style-name="T1644">1</text:span><text:span text:style-name="T1643">9</text:span><text:span text:style-name="T1644"> <text:tab/><text:tab/><text:tab/></text:span><text:span text:style-name="T115">case</text:span> <text:span text:style-name="T115">PAM_PROMPT_ECHO_ON</text:span>: {</text:p>
      <text:p text:style-name="P1429"><text:span text:style-name="T1643">20</text:span><text:span text:style-name="T1644"> <text:tab/><text:tab/><text:tab/><text:tab/></text:span><text:span text:style-name="T115">char</text:span> buffer[<text:span text:style-name="T127">512</text:span>];</text:p>
      <text:p text:style-name="P1429"><text:span text:style-name="T1643">2</text:span><text:span text:style-name="T1644">1 <text:tab/><text:tab/><text:tab/><text:tab/></text:span>printf(<text:span text:style-name="T116">"%s"</text:span>, msg[i]-&gt;msg);</text:p>
      <text:p text:style-name="P1429"><text:span text:style-name="T1643">22</text:span><text:span text:style-name="T1644"> <text:tab/><text:tab/><text:tab/><text:tab/></text:span><text:span text:style-name="T115">if</text:span> (!fgets(buffer, <text:span text:style-name="T115">sizeof</text:span>(buffer), <text:span text:style-name="T115">stdin</text:span>)) </text:p>
      <text:p text:style-name="P1432"><text:span text:style-name="T1643">23</text:span><text:span text:style-name="T115"><text:tab/><text:tab/><text:tab/><text:tab/><text:tab/>return</text:span> <text:span text:style-name="T115">PAM_CONV_ERR</text:span>;</text:p>
      <text:p text:style-name="P1429"><text:span text:style-name="T1643">24</text:span><text:span text:style-name="T1644"><text:tab/><text:tab/><text:tab/><text:tab/></text:span>buffer[strcspn(buffer, <text:span text:style-name="T116">"\n"</text:span>)] = <text:span text:style-name="T127">0</text:span>;</text:p>
      <text:p text:style-name="P1429"><text:span text:style-name="T1643">25</text:span><text:span text:style-name="T1644"><text:tab/><text:tab/><text:tab/><text:tab/></text:span>reply[i].resp = strdup(buffer);</text:p>
      <text:p text:style-name="P1429"><text:span text:style-name="T1643">26</text:span><text:span text:style-name="T1644"><text:tab/><text:tab/><text:tab/><text:tab/></text:span>reply[i].resp_retcode = <text:span text:style-name="T127">0</text:span>;</text:p>
      <text:p text:style-name="P1429"><text:span text:style-name="T1643">27</text:span><text:span text:style-name="T1644"><text:tab/><text:tab/><text:tab/><text:tab/></text:span><text:span text:style-name="T115">break</text:span>;</text:p>
      <text:p text:style-name="P1429"><text:span text:style-name="T1643">28</text:span><text:span text:style-name="T1644"><text:tab/><text:tab/><text:tab/></text:span>}</text:p>
      <text:p text:style-name="P1429"><text:span text:style-name="T1643">29</text:span><text:span text:style-name="T1644"><text:tab/><text:tab/><text:tab/></text:span><text:span text:style-name="T115">case</text:span> <text:span text:style-name="T115">PAM_TEXT_INFO</text:span>:</text:p>
      <text:p text:style-name="P1429"><text:span text:style-name="T1643">30</text:span><text:span text:style-name="T1644"><text:tab/><text:tab/><text:tab/><text:tab/></text:span>printf(<text:span text:style-name="T116">"%s\n"</text:span>, msg[i]-&gt;msg);</text:p>
      <text:p text:style-name="P1429"><text:span text:style-name="T1643">3</text:span><text:span text:style-name="T1644">1 <text:tab/><text:tab/><text:tab/><text:tab/></text:span><text:span text:style-name="T115">break</text:span>;</text:p>
      <text:p text:style-name="P1429"><text:span text:style-name="T1643">32</text:span><text:span text:style-name="T1644"> <text:tab/><text:tab/><text:tab/></text:span><text:span text:style-name="T115">case</text:span> <text:span text:style-name="T115">PAM_ERROR_MSG</text:span>:</text:p>
      <text:p text:style-name="P1429"><text:span text:style-name="T1643">33</text:span><text:span text:style-name="T1644"> <text:tab/><text:tab/><text:tab/><text:tab/></text:span>fprintf(<text:span text:style-name="T115">stderr</text:span>, <text:span text:style-name="T116">"%s\n"</text:span>, msg[i]-&gt;msg);</text:p>
      <text:p text:style-name="P1429"><text:span text:style-name="T1643">34</text:span><text:span text:style-name="T1644"> <text:tab/><text:tab/><text:tab/><text:tab/></text:span><text:span text:style-name="T115">break</text:span>;</text:p>
      <text:p text:style-name="P1429"><text:span text:style-name="T1643">35</text:span><text:span text:style-name="T1644"> <text:tab/><text:tab/><text:tab/></text:span><text:span text:style-name="T115">default</text:span>:</text:p>
      <text:p text:style-name="P1429"><text:span text:style-name="T1643">36</text:span><text:span text:style-name="T1644"> <text:tab/><text:tab/><text:tab/><text:tab/></text:span>free(reply);</text:p>
      <text:p text:style-name="P1429"><text:span text:style-name="T1643">37</text:span><text:span text:style-name="T1644"> <text:tab/><text:tab/><text:tab/><text:tab/></text:span><text:span text:style-name="T115">return</text:span> <text:span text:style-name="T115">PAM_CONV_ERR</text:span>;</text:p>
      <text:p text:style-name="P1429"><text:span text:style-name="T1643">38</text:span><text:span text:style-name="T1644"> <text:tab/><text:tab/></text:span>}</text:p>
      <text:p text:style-name="P1431"><text:span text:style-name="T1647">39</text:span><text:span text:style-name="T1642"> <text:tab/></text:span><text:span text:style-name="T124">}</text:span></text:p>
      <text:p text:style-name="P1429"><text:span text:style-name="T1643">40</text:span><text:span text:style-name="T1644"> <text:tab/></text:span>*resp = reply;</text:p>
      <text:p text:style-name="P1429"><text:span text:style-name="T1643">4</text:span><text:span text:style-name="T1644">1 <text:tab/></text:span><text:span text:style-name="T115">return</text:span> <text:span text:style-name="T115">PAM_SUCCESS</text:span>;</text:p>
      <text:p text:style-name="P1431"><text:span text:style-name="T1647">42</text:span><text:span text:style-name="T1642"> </text:span><text:span text:style-name="T124">}</text:span></text:p>
      <text:p text:style-name="Horizontal_20_Line"><text:s/></text:p>
      <text:p text:style-name="P1433">pam_conversation()</text:p>
      <text:p text:style-name="P307"/>
      <text:p text:style-name="Standard"><text:span text:style-name="Strong_20_Emphasis"><text:span text:style-name="T220">Line 4.</text:span></text:span><text:span text:style-name="T220"> Allocates memory for an array of </text:span><text:span text:style-name="Source_20_Text"><text:span text:style-name="T221">pam_response</text:span></text:span><text:span text:style-name="T220"> structures, one for each message <text:tab/> <text:tab/>received from PAM</text:span></text:p>
      <text:p text:style-name="Standard"><text:span text:style-name="Strong_20_Emphasis"><text:span text:style-name="T220">Line 7.</text:span></text:span><text:span text:style-name="T220"> Iterates through all messages sent by the PAM module </text:span></text:p>
      <text:p text:style-name="Standard"><text:span text:style-name="Strong_20_Emphasis"><text:span text:style-name="T220">Line 8.</text:span></text:span><text:span text:style-name="T220"> Checks the type of each message to determine how it should be handled </text:span></text:p>
      <text:p text:style-name="Standard"><text:span text:style-name="Strong_20_Emphasis"><text:span text:style-name="T220">Line 9–18 (</text:span></text:span><text:span text:style-name="Source_20_Text"><text:span text:style-name="T221">PAM_PROMPT_ECHO_OFF</text:span></text:span><text:span text:style-name="Strong_20_Emphasis"><text:span text:style-name="T1648">). </text:span></text:span><text:span text:style-name="T220">Handles password prompts where input must not be <text:tab/> <text:s text:c="2"/><text:tab/> <text:s text:c="4"/>displayed. The function uses </text:span><text:span text:style-name="Source_20_Text"><text:span text:style-name="T221">getpass</text:span></text:span><text:span text:style-name="T220"> to securely read the password. The response is <text:tab/> <text:s text:c="4"/>duplicated and stored in the </text:span><text:span text:style-name="Source_20_Text"><text:span text:style-name="T221">reply</text:span></text:span><text:span text:style-name="T220"> structure. Additionally, the password is saved in the <text:tab/> <text:s text:c="4"/>global variable </text:span><text:span text:style-name="Source_20_Text"><text:span text:style-name="T221">captured_password</text:span></text:span><text:span text:style-name="T220">, replacing any previous value</text:span></text:p>
      <text:p text:style-name="Standard"><text:span text:style-name="Strong_20_Emphasis"><text:span text:style-name="T220">Line 19–28 (</text:span></text:span><text:span text:style-name="Source_20_Text"><text:span text:style-name="T221">PAM_PROMPT_ECHO_ON</text:span></text:span><text:span text:style-name="Strong_20_Emphasis"><text:span text:style-name="T1648">). </text:span></text:span><text:span text:style-name="T220">Handles prompts where user input should be visible. The <text:tab/> <text:s text:c="6"/>program prints the prompt message and reads input using </text:span><text:span text:style-name="Source_20_Text"><text:span text:style-name="T221">fgets</text:span></text:span><text:span text:style-name="T220">. The response is then <text:tab/> <text:s text:c="6"/>stored in the </text:span><text:span text:style-name="Source_20_Text"><text:span text:style-name="T221">pam_response</text:span></text:span><text:span text:style-name="T220"> structure</text:span></text:p>
      <text:p text:style-name="Standard"><text:span text:style-name="Strong_20_Emphasis"><text:span text:style-name="T220">Line 29–31 (</text:span></text:span><text:span text:style-name="Source_20_Text"><text:span text:style-name="T221">PAM_TEXT_INFO</text:span></text:span><text:span text:style-name="Strong_20_Emphasis"><text:span text:style-name="T1648">). </text:span></text:span><text:span text:style-name="T220">Displays informational messages provided by PAM</text:span></text:p>
      <text:p text:style-name="Standard"><text:span text:style-name="Strong_20_Emphasis"><text:span text:style-name="T220">Line 32–34 (</text:span></text:span><text:span text:style-name="Source_20_Text"><text:span text:style-name="T221">PAM_ERROR_MSG</text:span></text:span><text:span text:style-name="Strong_20_Emphasis"><text:span text:style-name="T1648">). </text:span></text:span><text:span text:style-name="T220">Displays error messages sent by PAM to standard error</text:span></text:p>
      <text:p text:style-name="Standard"><text:span text:style-name="Strong_20_Emphasis"><text:span text:style-name="T220">Line 35–38 (default case). </text:span></text:span><text:span text:style-name="T220">Handles unexpected message types by freeing allocated memory and <text:tab/> <text:s text:c="6"/>returning an error</text:span></text:p>
      <text:p text:style-name="Standard"><text:span text:style-name="Strong_20_Emphasis"><text:span text:style-name="T220">Line 40–41.</text:span></text:span><text:span text:style-name="T220">Returns the array of responses back to PAM and signals successful completion of the <text:tab/> <text:s text:c="6"/>conversation</text:span></text:p>
      <text:p text:style-name="P1434"/>
      <text:p text:style-name="P229"><text:span text:style-name="T1649">We can add this code before the </text:span><text:span text:style-name="T1291">main</text:span><text:span text:style-name="T1649"> and the following lines before the </text:span><text:span text:style-name="T1291">chdir</text:span><text:span text:style-name="T1649"> call. </text:span></text:p>
      <text:p text:style-name="P1435"><text:soft-page-break/></text:p>
      <text:p text:style-name="P1436"><text:span text:style-name="T115">if</text:span> (captured_password) {</text:p>
      <text:p text:style-name="P186"><text:tab/>printf(<text:span text:style-name="T116">"\nPassword captured: %s\n"</text:span>, captured_password); </text:p>
      <text:p text:style-name="P186"><text:tab/>free(captured_password);</text:p>
      <text:p text:style-name="P186">} <text:span text:style-name="T115">else</text:span> {</text:p>
      <text:p text:style-name="P186"><text:tab/>printf(<text:span text:style-name="T116">"\nPassword not captured.\n"</text:span>);</text:p>
      <text:p text:style-name="P1437">}</text:p>
      <text:p text:style-name="P1438"/>
      <text:p text:style-name="P1439"><text:span text:style-name="T456">The full code is available in the </text:span><text:span text:style-name="T1650">Theory </text:span><text:span text:style-name="T1651">and</text:span><text:span text:style-name="T1650"> Insights</text:span><text:span text:style-name="T456"> section. </text:span><text:span text:style-name="T1652">We execute </text:span><text:span text:style-name="T1653">the program.</text:span></text:p>
      <text:p text:style-name="P1440"/>
      <table:table table:name="Table210" table:style-name="Table210">
        <table:table-column table:style-name="Table210.A"/>
        <table:table-row>
          <table:table-cell table:style-name="Table210.A1" office:value-type="string">
            <text:p text:style-name="P1441"><text:span text:style-name="T80">[</text:span><text:a xlink:type="simple" xlink:href="mailto:linux@users" text:style-name="Internet_20_link" text:visited-style-name="Visited_20_Internet_20_Link"><text:span text:style-name="T81">linux@users</text:span></text:a><text:span text:style-name="T80">] </text:span><text:span text:style-name="T1639">sudo ./loginpam</text:span></text:p>
            <text:p text:style-name="P1442">Login: newuser</text:p>
            <text:p text:style-name="P1442">Password: </text:p>
            <text:p text:style-name="P1442"><text:s text:c="2"/>PATH=/usr/local/sbin:/usr/local/bin:/usr/sbin:/usr/bin:/sbin:/bin:/usr/local/games:/usr/games</text:p>
            <text:p text:style-name="P1442"><text:s text:c="2"/>COMMAND_NOT_FOUND_INSTALL_PROMPT=1</text:p>
            <text:p text:style-name="P1442"><text:s text:c="2"/>POWERSHELL_UPDATECHECK=Off</text:p>
            <text:p text:style-name="P1442"><text:s text:c="2"/>POWERSHELL_TELEMETRY_OPTOUT=1</text:p>
            <text:p text:style-name="P1442"><text:s text:c="2"/>DOTNET_CLI_TELEMETRY_OPTOUT=1</text:p>
            <text:p text:style-name="P1442"><text:s text:c="2"/>XDG_SESSION_ID=c2</text:p>
            <text:p text:style-name="P1442"><text:s text:c="2"/>XDG_RUNTIME_DIR=/run/user/1005</text:p>
            <text:p text:style-name="P1442"><text:s text:c="2"/>DBUS_SESSION_BUS_ADDRESS=unix:path=/run/user/1005/bus</text:p>
            <text:p text:style-name="P1442"><text:s text:c="2"/>XDG_SESSION_TYPE=unspecified</text:p>
            <text:p text:style-name="P1442"><text:s text:c="2"/>XDG_SESSION_CLASS=background</text:p>
            <text:p text:style-name="P1442"/>
            <text:p text:style-name="P1442">PAM USER: newuser</text:p>
            <text:p text:style-name="P1442">PAM SERVICE: loginpam</text:p>
            <text:p text:style-name="P1443">Password captured: newuser</text:p>
            <text:p text:style-name="P1442"/>
            <text:p text:style-name="P1442">Welcome newuser!</text:p>
          </table:table-cell>
        </table:table-row>
      </table:table>
      <text:p text:style-name="Standard"/>
      <text:p text:style-name="P201">With this modification, the program is extended to make use of information that is already available inside the PAM conversation context. Instead of only using PAM for authentication and then discarding the interaction details, the updated version now explicitly retrieves data that has been captured during the PAM exchange.</text:p>
      <text:p text:style-name="P1427">In particular, the <text:span text:style-name="Source_20_Text"><text:span text:style-name="T1291">pam_conversation</text:span></text:span> function stores the password entered by the user in a global variable (<text:span text:style-name="Source_20_Text"><text:span text:style-name="T1291">captured_password</text:span></text:span>) when handling a <text:span text:style-name="Source_20_Text"><text:span text:style-name="T1291">PAM_PROMPT_ECHO_OFF</text:span></text:span> request. This allows the program to retain a copy of the password that was provided during authentication.</text:p>
      <text:p text:style-name="P1427">Before changing the working directory with <text:span text:style-name="Source_20_Text"><text:span text:style-name="T1291">chdir</text:span></text:span>, the program checks whether this value exists. If the password has been successfully captured, it is printed and then freed from memory; otherwise, a message indicates that no password was stored.</text:p>
      <text:p text:style-name="P201">This change highlights how PAM’s conversation mechanism can be used not only to interact with the user during authentication, but also to extract and reuse contextual information exchanged during the login process, such as the password entered by the user.</text:p>
      <text:p text:style-name="Standard"/>
      <text:p text:style-name="Standard"/>
      <text:p text:style-name="Standard"/>
      <text:p text:style-name="P1440"/>
      <text:p text:style-name="P1440"/>
      <text:p text:style-name="P1440"/>
      <text:p text:style-name="P1440"/>
      <text:p text:style-name="P1440"/>
      <text:p text:style-name="P1440"><text:soft-page-break/></text:p>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0"/>
      <text:p text:style-name="P1444"><text:span text:style-name="T1440">III.11.5 </text:span>Chang<text:span text:style-name="T1614">ing</text:span> password: <text:span text:style-name="T1441">pam_chauthtok</text:span></text:p>
      <text:p text:style-name="P1445"/>
      <text:p text:style-name="P1446">The <text:span text:style-name="T75">pam_chauthtok</text:span><text:span text:style-name="T75"><text:note text:id="ftn117" text:note-class="footnote"><text:note-citation>115</text:note-citation><text:note-body><text:p text:style-name="P1355"><text:span text:style-name="T1654">See the </text:span><text:span text:style-name="T1655">pam_chauthtok(3)</text:span><text:span text:style-name="T1656"> manual page</text:span></text:p></text:note-body></text:note></text:span> function can be used to change the password of the user, it is defined as follows.</text:p>
      <text:p text:style-name="P1447"/>
      <table:table table:name="Table211" table:style-name="Table211">
        <table:table-column table:style-name="Table211.A"/>
        <table:table-row>
          <table:table-cell table:style-name="Table211.A1" office:value-type="string">
            <text:p text:style-name="P271"><text:span text:style-name="T115">#include </text:span><text:span text:style-name="T116">&lt;security/pam_appl.h&gt;</text:span></text:p>
            <text:p text:style-name="P188"/>
            <text:p text:style-name="P229"><text:span text:style-name="T103">int</text:span><text:span text:style-name="T104"> </text:span><text:span text:style-name="T105">pam_chauthtok</text:span><text:span text:style-name="T104">(</text:span><text:span text:style-name="T103">pam_handle_t</text:span><text:span text:style-name="T104"> </text:span><text:span text:style-name="T106">*pamh</text:span><text:span text:style-name="T104">, </text:span><text:span text:style-name="T103">int</text:span><text:span text:style-name="T104"> </text:span><text:span text:style-name="T106">flags</text:span><text:span text:style-name="T104">);</text:span></text:p>
            <text:p text:style-name="P283"/>
            <text:p text:style-name="P1448">Returns: PAM_SUCCESS|PAM_AUTHTOK_ERR|PAM_AUTHTOK_RECOVERY_ERR|PAM_AUTHTOK_LOCK_BUSY|PAM_AUTHTOK_DISABLE_AGING|PAM_PERM_DENIED|PAM_TRY_AGAIN|PAM_USER_UNKNOWN</text:p>
          </table:table-cell>
        </table:table-row>
      </table:table>
      <text:p text:style-name="P1447"/>
      <text:p text:style-name="P1449"><text:span text:style-name="T1657">The function changes the authentication token for a given user. The argument </text:span><text:span text:style-name="T1658">flags</text:span><text:span text:style-name="T1657"> can be </text:span><text:span text:style-name="T1658">PAM_SILENT</text:span><text:span text:style-name="T1657"> or </text:span><text:span text:style-name="T1658">PAM_CHANGE_EXPIRED_AUTHTOK</text:span><text:span text:style-name="T1657"> (the user's authentication token should only be changed if it has expired). </text:span></text:p>
      <text:p text:style-name="P1447"/>
      <text:p text:style-name="P1450"><text:span text:style-name="T1659">The </text:span><text:span text:style-name="T1658">pamchangepwd.c</text:span><text:span text:style-name="T1659"> program allows a user to change his password. </text:span><text:span text:style-name="T1660">The function </text:span><text:span text:style-name="T1658">my_conv</text:span><text:span text:style-name="T1660"> is the same as </text:span><text:span text:style-name="T1661">the function </text:span><text:span text:style-name="T1658">pam_conversation</text:span><text:span text:style-name="T1661"> of the</text:span><text:span text:style-name="T1660"> </text:span><text:span text:style-name="T1658">loginpam.c</text:span><text:span text:style-name="T1660"> program (except for the lines related to capture the password that have been removed), so it will not listed here. </text:span></text:p>
      <text:p text:style-name="Horizontal_20_Line"/>
      <text:p text:style-name="P1451"><text:span text:style-name="T1662">1 </text:span><text:span text:style-name="T1663">int</text:span><text:span text:style-name="T1254"> main() {</text:span></text:p>
      <text:p text:style-name="P1452"><text:span text:style-name="T1664">2 <text:tab/></text:span><text:span text:style-name="T115">const</text:span> <text:span text:style-name="T115">char</text:span> *service = <text:span text:style-name="T116">"passwd"</text:span>; </text:p>
      <text:p text:style-name="P1452"><text:soft-page-break/><text:span text:style-name="T1664">3 <text:tab/></text:span><text:span text:style-name="T115">char</text:span> username[<text:span text:style-name="T127">64</text:span>];</text:p>
      <text:p text:style-name="P1453"><text:span text:style-name="T1665">4 <text:tab/></text:span><text:span text:style-name="T103">pam_handle_t</text:span><text:span text:style-name="T104"> *pamh = </text:span><text:span text:style-name="T103">NULL</text:span><text:span text:style-name="T104">;</text:span></text:p>
      <text:p text:style-name="P1453"><text:span text:style-name="T1665">5 <text:tab/></text:span><text:span text:style-name="T103">struct</text:span><text:span text:style-name="T104"> </text:span><text:span text:style-name="T103">pam_conv</text:span><text:span text:style-name="T104"> conv = { my_conv, </text:span><text:span text:style-name="T103">NULL</text:span><text:span text:style-name="T104"> };</text:span></text:p>
      <text:p text:style-name="P1452"><text:span text:style-name="T1664">6 <text:tab/></text:span><text:span text:style-name="T115">int</text:span> ret;</text:p>
      <text:p text:style-name="P188"/>
      <text:p text:style-name="P1452"><text:span text:style-name="T1664">7 <text:tab/></text:span>printf(<text:span text:style-name="T116">"Username: "</text:span>);</text:p>
      <text:p text:style-name="P1452"><text:span text:style-name="T1664">8 <text:tab/></text:span>fflush(<text:span text:style-name="T115">stdout</text:span>);</text:p>
      <text:p text:style-name="P1452"><text:span text:style-name="T1664">9 <text:tab/></text:span><text:span text:style-name="T115">if</text:span> (!fgets(username, <text:span text:style-name="T115">sizeof</text:span>(username), <text:span text:style-name="T115">stdin</text:span>)) <text:span text:style-name="T115">return</text:span> <text:span text:style-name="T127">1</text:span>;</text:p>
      <text:p text:style-name="P1452"><text:span text:style-name="T1664">10<text:tab/></text:span>username[strcspn(username, <text:span text:style-name="T116">"\n"</text:span>)] = <text:span text:style-name="T127">0</text:span>;</text:p>
      <text:p text:style-name="P188"/>
      <text:p text:style-name="P1452"><text:span text:style-name="T1664">11 <text:tab/></text:span>ret = <text:span text:style-name="T126">pam_start</text:span>(service, username, &amp;conv, &amp;pamh);</text:p>
      <text:p text:style-name="P1452"><text:span text:style-name="T1664">12 <text:tab/></text:span><text:span text:style-name="T115">if</text:span> (ret != <text:span text:style-name="T115">PAM_SUCCESS</text:span>) {</text:p>
      <text:p text:style-name="P1454"><text:span text:style-name="T1664">13 <text:tab/><text:tab/></text:span>fprintf(<text:span text:style-name="T115">stderr</text:span>, <text:span text:style-name="T116">"pam_start failed: %s\n"</text:span>, <text:span text:style-name="T126">pam_strerror</text:span>(pamh, </text:p>
      <text:p text:style-name="P1454"><text:tab/><text:tab/><text:tab/> <text:s text:c="2"/>ret));</text:p>
      <text:p text:style-name="P1452"><text:span text:style-name="T1664">14 <text:tab/><text:tab/></text:span><text:span text:style-name="T115">return</text:span> <text:span text:style-name="T127">1</text:span>;</text:p>
      <text:p text:style-name="P1452"><text:span text:style-name="T1664">15 <text:tab/></text:span>}</text:p>
      <text:p text:style-name="P188"/>
      <text:p text:style-name="P1452"><text:span text:style-name="T1664">16 <text:tab/></text:span>ret = <text:span text:style-name="T126">pam_authenticate</text:span>(pamh, <text:span text:style-name="T127">0</text:span>);</text:p>
      <text:p text:style-name="P1452"><text:span text:style-name="T1664">17 <text:tab/></text:span><text:span text:style-name="T115">if</text:span> (ret != <text:span text:style-name="T115">PAM_SUCCESS</text:span>) {</text:p>
      <text:p text:style-name="P1454"><text:span text:style-name="T1664">18 <text:tab/><text:tab/></text:span>fprintf(<text:span text:style-name="T115">stderr</text:span>, <text:span text:style-name="T116">"Authentication failed: %s\n"</text:span>, </text:p>
      <text:p text:style-name="P1454"><text:tab/><text:tab/><text:tab/> <text:s text:c="2"/><text:span text:style-name="T126">pam_strerror</text:span>(pamh, ret));</text:p>
      <text:p text:style-name="P1452"><text:span text:style-name="T1664">19 <text:tab/><text:tab/></text:span><text:span text:style-name="T126">pam_end</text:span>(pamh, ret);</text:p>
      <text:p text:style-name="P1452"><text:span text:style-name="T1664">20 <text:tab/><text:tab/></text:span><text:span text:style-name="T115">return</text:span> <text:span text:style-name="T127">1</text:span>;</text:p>
      <text:p text:style-name="P1452"><text:span text:style-name="T1664">21 <text:tab/></text:span>}</text:p>
      <text:p text:style-name="P188"/>
      <text:p text:style-name="P1452"><text:span text:style-name="T1664">22 <text:tab/></text:span>ret = <text:span text:style-name="T126">pam_acct_mgmt</text:span>(pamh, <text:span text:style-name="T127">0</text:span>);</text:p>
      <text:p text:style-name="P1452"><text:span text:style-name="T1664">23 <text:tab/></text:span><text:span text:style-name="T115">if</text:span> (ret != <text:span text:style-name="T115">PAM_SUCCESS</text:span>) {</text:p>
      <text:p text:style-name="P1454"><text:span text:style-name="T1664">24 <text:tab/><text:tab/></text:span>fprintf(<text:span text:style-name="T115">stderr</text:span>, <text:span text:style-name="T116">"Account check failed: %s\n"</text:span>, </text:p>
      <text:p text:style-name="P1454"><text:tab/><text:tab/><text:tab/> <text:s text:c="2"/><text:span text:style-name="T126">pam_strerror</text:span>(pamh, ret));</text:p>
      <text:p text:style-name="P1452"><text:span text:style-name="T1664">25 <text:tab/><text:tab/></text:span><text:span text:style-name="T126">pam_end</text:span>(pamh, ret);</text:p>
      <text:p text:style-name="P1452"><text:span text:style-name="T1664">26 <text:tab/><text:tab/></text:span><text:span text:style-name="T115">return</text:span> <text:span text:style-name="T127">1</text:span>;</text:p>
      <text:p text:style-name="P1452"><text:span text:style-name="T1664">27 <text:tab/></text:span>}</text:p>
      <text:p text:style-name="P188"/>
      <text:p text:style-name="P1452"><text:span text:style-name="T1664">28 <text:tab/></text:span>ret = <text:span text:style-name="T126">pam_chauthtok</text:span>(pamh, <text:span text:style-name="T115">PAM_SILENT</text:span>);</text:p>
      <text:p text:style-name="P1452"><text:span text:style-name="T1664">29 <text:tab/></text:span><text:span text:style-name="T115">if</text:span> (ret != <text:span text:style-name="T115">PAM_SUCCESS</text:span>) {</text:p>
      <text:p text:style-name="P1454"><text:span text:style-name="T1664">30 <text:tab/><text:tab/></text:span>fprintf(<text:span text:style-name="T115">stderr</text:span>, <text:span text:style-name="T116">"Password change failed: %s\n"</text:span>, </text:p>
      <text:p text:style-name="P1454"><text:tab/><text:tab/><text:tab/> <text:s text:c="2"/><text:span text:style-name="T126">pam_strerror</text:span>(pamh, ret));</text:p>
      <text:p text:style-name="P1452"><text:span text:style-name="T1664">31 <text:tab/></text:span>} <text:span text:style-name="T115">else</text:span> {</text:p>
      <text:p text:style-name="P1452"><text:span text:style-name="T1664">32 <text:tab/><text:tab/></text:span>printf(<text:span text:style-name="T116">"Password changed successfully.\n"</text:span>);</text:p>
      <text:p text:style-name="P1455"><text:span text:style-name="T1666">33 <text:tab/></text:span><text:span text:style-name="T124">}</text:span></text:p>
      <text:p text:style-name="P1452"><text:span text:style-name="T1664">34 <text:tab/></text:span><text:span text:style-name="T126">pam_end</text:span>(pamh, <text:span text:style-name="T115">PAM_SUCCESS</text:span>);</text:p>
      <text:p text:style-name="P1452"><text:span text:style-name="T1664">35 <text:tab/></text:span><text:span text:style-name="T115">return</text:span> <text:span text:style-name="T127">0</text:span>;</text:p>
      <text:p text:style-name="P1452"><text:span text:style-name="T1664">36 </text:span>}</text:p>
      <text:p text:style-name="Horizontal_20_Line"/>
      <text:p text:style-name="P1456">pamchangepwd.c</text:p>
      <text:p text:style-name="P1457"/>
      <text:p text:style-name="P1458"><text:span text:style-name="T1667">At the beginning, the program defines the PAM service name (</text:span><text:span text:style-name="Source_20_Text"><text:span text:style-name="T1668">passwd</text:span></text:span><text:span text:style-name="T1667">), which tells PAM which configuration rules to apply. It then reads the username from standard input and removes the trailing newline so it can be safely used in subsequent PAM calls.</text:span></text:p>
      <text:p text:style-name="P1458"><text:soft-page-break/><text:span text:style-name="T1667">Next, the PAM session is initialized using </text:span><text:span text:style-name="Source_20_Text"><text:span text:style-name="T1668">pam_start</text:span></text:span><text:span text:style-name="T1667">, which creates a PAM transaction associated with the given user and service. If this step fails, the program terminates immediately.</text:span></text:p>
      <text:p text:style-name="P1458"><text:span text:style-name="T1667">Authentication is then performed using </text:span><text:span text:style-name="Source_20_Text"><text:span text:style-name="T1668">pam_authenticate</text:span></text:span><text:span text:style-name="T1667">, ensuring that the user is correctly verified before any sensitive operation is allowed. This is followed by </text:span><text:span text:style-name="Source_20_Text"><text:span text:style-name="T1668">pam_acct_mgmt</text:span></text:span><text:span text:style-name="T1667">, which checks whether the account is valid and permitted to perform the requested action (for example, not locked or expired).</text:span></text:p>
      <text:p text:style-name="P1458"><text:span text:style-name="T1667">Once authentication and account validation succeed, the program calls </text:span><text:span text:style-name="Source_20_Text"><text:span text:style-name="T1668">pam_chauthtok</text:span></text:span><text:span text:style-name="T1667">, which is the PAM function responsible for changing authentication tokens, in this case the user’s password. The </text:span><text:span text:style-name="Source_20_Text"><text:span text:style-name="T1668">PAM_SILENT</text:span></text:span><text:span text:style-name="T1667"> flag is used to reduce unnecessary output during the process, since PAM modules typically handle their own prompts.</text:span></text:p>
      <text:p text:style-name="P1457">If the password change is successful, a confirmation message is printed; otherwise, an error message is displayed describing the failure.</text:p>
      <text:p text:style-name="P1458"><text:span text:style-name="T1667">Finally, </text:span><text:span text:style-name="Source_20_Text"><text:span text:style-name="T1668">pam_end</text:span></text:span><text:span text:style-name="T1667"> is called to close the PAM session and release all associated resources.</text:span></text:p>
      <text:p text:style-name="P1459"/>
      <text:p text:style-name="P1457"><text:span text:style-name="T1669">We e</text:span>xecute the program </text:p>
      <text:p text:style-name="P1457"/>
      <table:table table:name="Table212" table:style-name="Table212">
        <table:table-column table:style-name="Table212.A"/>
        <table:table-row>
          <table:table-cell table:style-name="Table212.A1" office:value-type="string">
            <text:p text:style-name="P1460"><text:span text:style-name="T80">[</text:span><text:a xlink:type="simple" xlink:href="mailto:linux@users" text:style-name="Internet_20_link" text:visited-style-name="Visited_20_Internet_20_Link"><text:span text:style-name="T81">linux@users</text:span></text:a><text:span text:style-name="T80">] </text:span><text:span text:style-name="T1639">sudo ./</text:span><text:span text:style-name="T1670">pamchangepwd</text:span></text:p>
            <text:p text:style-name="P183">Username: newuser</text:p>
            <text:p text:style-name="P183">Password: </text:p>
            <text:p text:style-name="P183">New password: </text:p>
            <text:p text:style-name="P183">Retype new password: </text:p>
            <text:p text:style-name="P183">Password changed successfully.</text:p>
          </table:table-cell>
        </table:table-row>
      </table:table>
      <text:p text:style-name="P1457"/>
      <text:p text:style-name="P1458"><text:span text:style-name="T1667">This output shows the typical interaction flow of </text:span><text:span text:style-name="Source_20_Text"><text:span text:style-name="T1668">pam_chauthtok</text:span></text:span><text:span text:style-name="T1667">, which delegates password management to PAM modules. After the user is authenticated, PAM enforces the system’s password policy by prompting for the current password and then requesting the new password twice for confirmation.</text:span></text:p>
      <text:p text:style-name="P1461">III.<text:span text:style-name="T45">1</text:span><text:span text:style-name="T1671">2</text:span> Theory <text:span text:style-name="T10">and</text:span> <text:span text:style-name="T10">i</text:span>nsights</text:p>
      <text:p text:style-name="P1462"/>
      <text:p text:style-name="P1463"><text:span text:style-name="T1672">III.12.1 </text:span><text:span text:style-name="T1673">The </text:span>Process Execution Environment</text:p>
      <text:p text:style-name="P1162"/>
      <text:p text:style-name="P1464"><text:span text:style-name="T1674">The </text:span><text:span text:style-name="T1675">Process Execution Environmen</text:span><text:span text:style-name="T1676">t</text:span><text:span text:style-name="T1677"> is the context in which a program runs. When an ELF binary is executed via </text:span><text:span text:style-name="T1678">execve</text:span><text:span text:style-name="T1677">, the kernel prepare</text:span><text:span text:style-name="T1679">s</text:span><text:span text:style-name="T1677"> the following context </text:span><text:span text:style-name="T1680">in the memory.</text:span></text:p>
      <text:p text:style-name="P1162"/>
      <text:p text:style-name="P1162"><text:s text:c="2"/>┌──────────────────────┐</text:p>
      <text:p text:style-name="P1465"><text:span text:style-name="T1674"><text:s text:c="2"/>│ </text:span><text:span text:style-name="T1678">argc</text:span><text:span text:style-name="T1674"> <text:s text:c="15"/><text:tab/><text:tab/><text:tab/> <text:s text:c="7"/>│→ command-line arguments </text:span><text:span text:style-name="T1679">count</text:span></text:p>
      <text:p text:style-name="P1162"><text:s text:c="2"/>├──────────────────────┤</text:p>
      <text:p text:style-name="P1466"><text:span text:style-name="T1674"><text:s text:c="2"/>│ </text:span><text:span text:style-name="T1678">argv[0]</text:span><text:span text:style-name="T1674"> ... </text:span><text:span text:style-name="T1678">argv[n]</text:span><text:span text:style-name="T1674"> <text:tab/><text:tab/> <text:s text:c="7"/>│→ command-line arguments </text:span><text:span text:style-name="T1679">vector</text:span></text:p>
      <text:p text:style-name="P1467"><text:s text:c="2"/>├──────────────────────┤</text:p>
      <text:p text:style-name="P1466"><text:span text:style-name="T1674"><text:s text:c="2"/>│ </text:span><text:span text:style-name="T1678">envp[0]</text:span><text:span text:style-name="T1674"> ... </text:span><text:span text:style-name="T1678">envp[n] </text:span><text:span text:style-name="T1674"><text:s text:c="12"/><text:tab/> <text:s text:c="7"/>│→ environment variables </text:span><text:span text:style-name="T1679">vector</text:span></text:p>
      <text:p text:style-name="P1162"><text:s text:c="2"/>├──────────────────────┤</text:p>
      <text:p text:style-name="P1466"><text:span text:style-name="T1674"><text:s text:c="2"/>│ </text:span><text:span text:style-name="T1678">auxv[]</text:span><text:span text:style-name="T1674"> <text:s text:c="15"/><text:tab/><text:tab/> <text:s text:c="7"/>│→ auxiliary vector (</text:span><text:span text:style-name="T1678">AT_*</text:span><text:span text:style-name="T1674"> entries)</text:span></text:p>
      <text:p text:style-name="P1162"><text:s text:c="2"/>└──────────────────────┘</text:p>
      <text:p text:style-name="P1468"/>
      <text:p text:style-name="P1469"><text:span text:style-name="T90">Fig. </text:span><text:span text:style-name="T1681">1</text:span> Process Execution Environment</text:p>
      <text:p text:style-name="P1162"/>
      <text:p text:style-name="P1470"><text:span text:style-name="T1677">The </text:span><text:span text:style-name="T1676">auxiliary vector</text:span><text:span text:style-name="T1677"> is a part of the PXE passed by the kernel when the program is executed. </text:span><text:span text:style-name="Strong_20_Emphasis"><text:span text:style-name="T1677">It</text:span></text:span><text:span text:style-name="T1677"> is an array of key-value pairs</text:span><text:span text:style-name="T1682"> (</text:span><text:span text:style-name="Source_20_Text"><text:span text:style-name="T1682">type</text:span></text:span><text:span text:style-name="T1682">, </text:span><text:span text:style-name="Source_20_Text"><text:span text:style-name="T1682">value</text:span></text:span><text:span text:style-name="T1682">) </text:span><text:span text:style-name="T1677">describing low-level information about the process environment. </text:span><text:span text:style-name="T1683">These information are related to </text:span><text:span text:style-name="Strong_20_Emphasis"><text:span text:style-name="T1683">how and where the program is run and are </text:span></text:span><text:span text:style-name="T1683">useful</text:span><text:span text:style-name="T1677"> for system-level or secure programming. Each entry in the </text:span><text:span text:style-name="T1676">auxiliary vector</text:span><text:span text:style-name="T1677"> has the following form </text:span><text:span text:style-name="T1684">as defined in the </text:span><text:span text:style-name="T1678">elf.h</text:span><text:span text:style-name="T1684"> file header</text:span></text:p>
      <text:p text:style-name="P1471"><text:soft-page-break/></text:p>
      <table:table table:name="Table214" table:style-name="Table214">
        <table:table-column table:style-name="Table214.A"/>
        <table:table-row>
          <table:table-cell table:style-name="Table214.A1" office:value-type="string">
            <text:p text:style-name="P271"><text:span text:style-name="T115">typedef</text:span> <text:span text:style-name="T115">struct</text:span></text:p>
            <text:p text:style-name="P186">{</text:p>
            <text:p text:style-name="P186"><text:span text:style-name="T115"><text:s text:c="4"/>uint64_t</text:span> a_type;<text:span text:style-name="T119"> <text:s text:c="7"/>/* Entry type */</text:span></text:p>
            <text:p text:style-name="P218"><text:s text:c="4"/>union</text:p>
            <text:p text:style-name="P186"><text:s text:c="4"/>{</text:p>
            <text:p text:style-name="P186"><text:span text:style-name="T115"><text:s text:c="8"/>uint64_t</text:span> a_val;<text:span text:style-name="T119"> <text:s text:c="4"/>/* Integer value */</text:span></text:p>
            <text:p text:style-name="P186"><text:s text:c="4"/>} a_un;</text:p>
            <text:p text:style-name="P201"><text:span text:style-name="T104">} </text:span><text:span text:style-name="T103">Elf64_auxv_t</text:span><text:span text:style-name="T104">;</text:span></text:p>
          </table:table-cell>
        </table:table-row>
      </table:table>
      <text:p text:style-name="P1471"/>
      <text:p text:style-name="P1465"><text:span text:style-name="T1685">Where the </text:span><text:span text:style-name="T1678">a_type</text:span><text:span text:style-name="T1685"> field is the entry type and </text:span><text:span text:style-name="T1678">a_val</text:span><text:span text:style-name="T1685"> represents the value. </text:span><text:span text:style-name="T1686">The following table </text:span><text:span text:style-name="T1679">lists</text:span><text:span text:style-name="T1686"> the types </text:span><text:span text:style-name="T1687">available</text:span><text:span text:style-name="T1688">.</text:span></text:p>
      <text:p text:style-name="P1472"/>
      <table:table table:name="Table215" table:style-name="Table215">
        <table:table-column table:style-name="Table215.A"/>
        <table:table-column table:style-name="Table215.B"/>
        <table:table-row>
          <table:table-cell table:style-name="Table215.A1" office:value-type="string">
            <text:p text:style-name="P1473">AT_BASE</text:p>
          </table:table-cell>
          <table:table-cell table:style-name="Table215.B1" office:value-type="string">
            <text:p text:style-name="P1474">The base address of the program interpreter (usually, the dynamic linker)</text:p>
          </table:table-cell>
        </table:table-row>
        <table:table-row>
          <table:table-cell table:style-name="Table215.A2" office:value-type="string">
            <text:p text:style-name="P1473">AT_BASE_PLATFORM</text:p>
          </table:table-cell>
          <table:table-cell table:style-name="Table215.B2" office:value-type="string">
            <text:p text:style-name="P1474">A pointer to a string (PowerPC and MIPS only)</text:p>
          </table:table-cell>
        </table:table-row>
        <table:table-row>
          <table:table-cell table:style-name="Table215.A2" office:value-type="string">
            <text:p text:style-name="P1473">AT_CLKTCK</text:p>
          </table:table-cell>
          <table:table-cell table:style-name="Table215.B2" office:value-type="string">
            <text:p text:style-name="P1464"><text:span text:style-name="T456">The frequency with which </text:span><text:span text:style-name="T1689">the</text:span><text:span text:style-name="T456"> </text:span><text:span text:style-name="T1678">times</text:span><text:span text:style-name="T1678"><text:note text:id="ftn118" text:note-class="footnote"><text:note-citation>116</text:note-citation><text:note-body><text:p text:style-name="P1475"><text:span text:style-name="T1690">See the </text:span><text:span text:style-name="T1691">times(2)</text:span><text:span text:style-name="T1692"> manual page</text:span></text:p></text:note-body></text:note></text:span><text:span text:style-name="T456"> </text:span><text:span text:style-name="T1689">function </text:span><text:span text:style-name="T456">counts. This value can also be obtained via </text:span><text:span text:style-name="T1678">sysconf(_SC_CLK_TCK)</text:span></text:p>
          </table:table-cell>
        </table:table-row>
        <table:table-row>
          <table:table-cell table:style-name="Table215.A2" office:value-type="string">
            <text:p text:style-name="P1473">AT_DCACHEBSIZE</text:p>
          </table:table-cell>
          <table:table-cell table:style-name="Table215.B2" office:value-type="string">
            <text:p text:style-name="P1474">The data cache block size</text:p>
          </table:table-cell>
        </table:table-row>
        <table:table-row>
          <table:table-cell table:style-name="Table215.A2" office:value-type="string">
            <text:p text:style-name="P1473">AT_EGID</text:p>
          </table:table-cell>
          <table:table-cell table:style-name="Table215.B2" office:value-type="string">
            <text:p text:style-name="P1474">The effective group ID of the thread</text:p>
          </table:table-cell>
        </table:table-row>
        <table:table-row>
          <table:table-cell table:style-name="Table215.A2" office:value-type="string">
            <text:p text:style-name="P1473">AT_ENTRY</text:p>
          </table:table-cell>
          <table:table-cell table:style-name="Table215.B2" office:value-type="string">
            <text:p text:style-name="P1474">The entry address of the executable</text:p>
          </table:table-cell>
        </table:table-row>
        <table:table-row>
          <table:table-cell table:style-name="Table215.A2" office:value-type="string">
            <text:p text:style-name="P1473">AT_EUID</text:p>
          </table:table-cell>
          <table:table-cell table:style-name="Table215.B2" office:value-type="string">
            <text:p text:style-name="P1474">The effective user ID of the thread</text:p>
          </table:table-cell>
        </table:table-row>
        <table:table-row>
          <table:table-cell table:style-name="Table215.A2" office:value-type="string">
            <text:p text:style-name="P1473">AT_EXECFD</text:p>
          </table:table-cell>
          <table:table-cell table:style-name="Table215.B2" office:value-type="string">
            <text:p text:style-name="P1474">File descriptor of program</text:p>
          </table:table-cell>
        </table:table-row>
        <table:table-row>
          <table:table-cell table:style-name="Table215.A2" office:value-type="string">
            <text:p text:style-name="P1473">AT_EXECFN</text:p>
          </table:table-cell>
          <table:table-cell table:style-name="Table215.B2" office:value-type="string">
            <text:p text:style-name="P1474">A pointer to a string containing the pathname used to execute the program</text:p>
          </table:table-cell>
        </table:table-row>
        <table:table-row>
          <table:table-cell table:style-name="Table215.A2" office:value-type="string">
            <text:p text:style-name="P1473">AT_FLAGS</text:p>
          </table:table-cell>
          <table:table-cell table:style-name="Table215.B2" office:value-type="string">
            <text:p text:style-name="P1474">Flags (unused)</text:p>
          </table:table-cell>
        </table:table-row>
        <table:table-row>
          <table:table-cell table:style-name="Table215.A2" office:value-type="string">
            <text:p text:style-name="P1473">AT_FPUCW</text:p>
          </table:table-cell>
          <table:table-cell table:style-name="Table215.B2" office:value-type="string">
            <text:p text:style-name="P1474">Used FPU control word (SuperH architecture only)</text:p>
          </table:table-cell>
        </table:table-row>
        <table:table-row>
          <table:table-cell table:style-name="Table215.A2" office:value-type="string">
            <text:p text:style-name="P1473">AT_GID</text:p>
          </table:table-cell>
          <table:table-cell table:style-name="Table215.B2" office:value-type="string">
            <text:p text:style-name="P1474">The real group ID of the thread</text:p>
          </table:table-cell>
        </table:table-row>
        <table:table-row>
          <table:table-cell table:style-name="Table215.A2" office:value-type="string">
            <text:p text:style-name="P1473">AT_HWCAP</text:p>
          </table:table-cell>
          <table:table-cell table:style-name="Table215.B2" office:value-type="string">
            <text:p text:style-name="P1476">An <text:s/>architecture and ABI dependent bit-mask whose settings indicate detailed processor capabilities<text:note text:id="ftn119" text:note-class="footnote"><text:note-citation>117</text:note-citation><text:note-body><text:p text:style-name="P1476"><text:span text:style-name="T872"><text:s text:c="2"/>The contents of the bit mask are hardware dependent (for example, </text:span><text:span text:style-name="T1693">the source file</text:span><text:span text:style-name="T872"> </text:span><text:span text:style-name="T1694">arch/x86/include/asm/cpufeature.h</text:span><text:span text:style-name="T1693"> in the kern</text:span><text:span text:style-name="T872">el source </text:span><text:span text:style-name="T1693">contains details </text:span><text:span text:style-name="T872">relating to the Intel x86 architecture; the value returned is the first 32-bit word of the array described there). <text:s/>A human-readable version of the same information is available via </text:span><text:span text:style-name="T1694">/proc/cpuinfo</text:span></text:p></text:note-body></text:note></text:p>
          </table:table-cell>
        </table:table-row>
        <table:table-row>
          <table:table-cell table:style-name="Table215.A2" office:value-type="string">
            <text:p text:style-name="P1473">AT_HWCAP2</text:p>
          </table:table-cell>
          <table:table-cell table:style-name="Table215.B2" office:value-type="string">
            <text:p text:style-name="P1474">Further machine-dependent hints about processor capabilities</text:p>
          </table:table-cell>
        </table:table-row>
        <table:table-row>
          <table:table-cell table:style-name="Table215.A2" office:value-type="string">
            <text:p text:style-name="P1473">AT_ICACHEBSIZE</text:p>
          </table:table-cell>
          <table:table-cell table:style-name="Table215.B2" office:value-type="string">
            <text:p text:style-name="P1474">The instruction cache block size</text:p>
          </table:table-cell>
        </table:table-row>
        <table:table-row>
          <table:table-cell table:style-name="Table215.A2" office:value-type="string">
            <text:p text:style-name="P1473">AT_L1D_CACHEGEOMETRY</text:p>
          </table:table-cell>
          <table:table-cell table:style-name="Table215.B2" office:value-type="string">
            <text:p text:style-name="P1474">Geometry of the L1 data cache</text:p>
          </table:table-cell>
        </table:table-row>
        <table:table-row>
          <table:table-cell table:style-name="Table215.A2" office:value-type="string">
            <text:p text:style-name="P1473">AT_L1D_CACHESIZE</text:p>
          </table:table-cell>
          <table:table-cell table:style-name="Table215.B2" office:value-type="string">
            <text:p text:style-name="P1474">The L1 data cache size</text:p>
          </table:table-cell>
        </table:table-row>
        <table:table-row>
          <table:table-cell table:style-name="Table215.A2" office:value-type="string">
            <text:p text:style-name="P1473">AT_L1I_CACHEGEOMETRY</text:p>
          </table:table-cell>
          <table:table-cell table:style-name="Table215.B2" office:value-type="string">
            <text:p text:style-name="P1464"><text:span text:style-name="T456">Geometry of the L1 instruction cache, encoded as for </text:span><text:span text:style-name="T1678">AT_L1D_CACHEGEOMETRY</text:span></text:p>
          </table:table-cell>
        </table:table-row>
        <table:table-row>
          <table:table-cell table:style-name="Table215.A2" office:value-type="string">
            <text:p text:style-name="P1473">AT_L1I_CACHESIZE</text:p>
          </table:table-cell>
          <table:table-cell table:style-name="Table215.B2" office:value-type="string">
            <text:p text:style-name="P1474">The L1 instruction cache size</text:p>
          </table:table-cell>
        </table:table-row>
        <table:table-row>
          <table:table-cell table:style-name="Table215.A2" office:value-type="string">
            <text:p text:style-name="P1473">AT_L2_CACHEGEOMETRY</text:p>
          </table:table-cell>
          <table:table-cell table:style-name="Table215.B2" office:value-type="string">
            <text:p text:style-name="P1464"><text:span text:style-name="T456">Geometry of the L2 cache, encoded as for </text:span><text:span text:style-name="T1678">AT_L1D_CACHEGEOMETRY</text:span></text:p>
          </table:table-cell>
        </table:table-row>
        <table:table-row>
          <table:table-cell table:style-name="Table215.A2" office:value-type="string">
            <text:p text:style-name="P1473">AT_L2_CACHESIZE</text:p>
          </table:table-cell>
          <table:table-cell table:style-name="Table215.B2" office:value-type="string">
            <text:p text:style-name="P1474">The L2 cache size</text:p>
          </table:table-cell>
        </table:table-row>
        <text:soft-page-break/>
        <table:table-row>
          <table:table-cell table:style-name="Table215.A2" office:value-type="string">
            <text:p text:style-name="P1473">AT_L3_CACHEGEOMETRY</text:p>
          </table:table-cell>
          <table:table-cell table:style-name="Table215.B2" office:value-type="string">
            <text:p text:style-name="P1464"><text:span text:style-name="T456">Geometry of the L3 cache, encoded as for </text:span><text:span text:style-name="T1678">AT_L1D_CACHEGEOMETRY</text:span></text:p>
          </table:table-cell>
        </table:table-row>
        <table:table-row>
          <table:table-cell table:style-name="Table215.A2" office:value-type="string">
            <text:p text:style-name="P1473">AT_L3_CACHESIZE</text:p>
          </table:table-cell>
          <table:table-cell table:style-name="Table215.B2" office:value-type="string">
            <text:p text:style-name="P1474">The L3 cache size</text:p>
          </table:table-cell>
        </table:table-row>
        <table:table-row>
          <table:table-cell table:style-name="Table215.A2" office:value-type="string">
            <text:p text:style-name="P1473">AT_PAGESZ</text:p>
          </table:table-cell>
          <table:table-cell table:style-name="Table215.B2" office:value-type="string">
            <text:p text:style-name="P1477"><text:span text:style-name="T456">The system page siz</text:span><text:span text:style-name="T1695">e</text:span><text:span text:style-name="T1678"><text:note text:id="ftn120" text:note-class="footnote"><text:note-citation>118</text:note-citation><text:note-body><text:p text:style-name="P1478"><text:s text:c="2"/><text:span text:style-name="T1696">T</text:span>he same value returned by <text:span text:style-name="T1697">sysconf(_SC_PAGESIZE</text:span><text:span text:style-name="T1698">)</text:span></text:p></text:note-body></text:note></text:span></text:p>
          </table:table-cell>
        </table:table-row>
        <table:table-row>
          <table:table-cell table:style-name="Table215.A2" office:value-type="string">
            <text:p text:style-name="P1473">AT_PHDR</text:p>
          </table:table-cell>
          <table:table-cell table:style-name="Table215.B2" office:value-type="string">
            <text:p text:style-name="P1474">The address of the program headers of the executable</text:p>
          </table:table-cell>
        </table:table-row>
        <table:table-row>
          <table:table-cell table:style-name="Table215.A2" office:value-type="string">
            <text:p text:style-name="P1473">AT_PHENT</text:p>
          </table:table-cell>
          <table:table-cell table:style-name="Table215.B2" office:value-type="string">
            <text:p text:style-name="P1474">The size of program header entry</text:p>
          </table:table-cell>
        </table:table-row>
        <table:table-row>
          <table:table-cell table:style-name="Table215.A2" office:value-type="string">
            <text:p text:style-name="P1473">AT_PHNUM</text:p>
          </table:table-cell>
          <table:table-cell table:style-name="Table215.B2" office:value-type="string">
            <text:p text:style-name="P1479">The number of program headers</text:p>
          </table:table-cell>
        </table:table-row>
        <table:table-row>
          <table:table-cell table:style-name="Table215.A2" office:value-type="string">
            <text:p text:style-name="P1473">AT_PLATFORM</text:p>
          </table:table-cell>
          <table:table-cell table:style-name="Table215.B2" office:value-type="string">
            <text:p text:style-name="P1474">A pointer to a string that identifies the hardware platform that the program is running on</text:p>
          </table:table-cell>
        </table:table-row>
        <table:table-row>
          <table:table-cell table:style-name="Table215.A2" office:value-type="string">
            <text:p text:style-name="P1473">AT_RANDOM</text:p>
          </table:table-cell>
          <table:table-cell table:style-name="Table215.B2" office:value-type="string">
            <text:p text:style-name="P1474">The address of sixteen bytes containing a random value</text:p>
          </table:table-cell>
        </table:table-row>
        <table:table-row>
          <table:table-cell table:style-name="Table215.A2" office:value-type="string">
            <text:p text:style-name="P1473">AT_SECURE</text:p>
          </table:table-cell>
          <table:table-cell table:style-name="Table215.B2" office:value-type="string">
            <text:p text:style-name="P1480">Has <text:s/>a <text:s/>nonzero <text:s/>value if this executable should be treated securely<text:note text:id="ftn121" text:note-class="footnote"><text:note-citation>119</text:note-citation><text:note-body><text:p text:style-name="P1481"><text:s/><text:span text:style-name="T872">Most commonly, a nonzero value indicates that the process is executing a set-user-ID or set-group-ID binary (so that its real and effective UIDs or GIDs differ from one another), or that it gained capabilities by executing a binary file that has capabilities. <text:s/>Alternatively, a nonzero value may be triggered by a Linux Security Module. <text:s/>When this <text:s/>value is nonzero, the dynamic linker disables the use of certain environment variables (see </text:span><text:span text:style-name="T1699">the manual page</text:span><text:span text:style-name="T872"> </text:span><text:span text:style-name="T1694">ld-linux.so(8)</text:span><text:span text:style-name="T872">) and glibc changes other aspects of its behavior. <text:s/>See also </text:span><text:span text:style-name="T1699">the</text:span><text:span text:style-name="T872"> </text:span><text:span text:style-name="T1694">secure_getenv(3)</text:span><text:span text:style-name="T872"> manual page</text:span></text:p></text:note-body></text:note> </text:p>
          </table:table-cell>
        </table:table-row>
        <table:table-row>
          <table:table-cell table:style-name="Table215.A2" office:value-type="string">
            <text:p text:style-name="P1473">AT_SYSINFO</text:p>
          </table:table-cell>
          <table:table-cell table:style-name="Table215.B2" office:value-type="string">
            <text:p text:style-name="P1474">The entry point to the system call function in the vDSO<text:note text:id="ftn122" text:note-class="footnote"><text:note-citation>120</text:note-citation><text:note-body><text:p text:style-name="P1482">The Virtual Dynamic Shared Object is a kernel feature </text:p></text:note-body></text:note>. <text:s/>Not present on all architectures (e.g., absent on x86-64)</text:p>
          </table:table-cell>
        </table:table-row>
        <table:table-row>
          <table:table-cell table:style-name="Table215.A2" office:value-type="string">
            <text:p text:style-name="P1473">AT_SYSINFO_EHDR</text:p>
          </table:table-cell>
          <table:table-cell table:style-name="Table215.B2" office:value-type="string">
            <text:p text:style-name="P1474">The address of a page containing the vDSO</text:p>
          </table:table-cell>
        </table:table-row>
        <table:table-row>
          <table:table-cell table:style-name="Table215.A2" office:value-type="string">
            <text:p text:style-name="P1473">AT_UCACHEBSIZE</text:p>
          </table:table-cell>
          <table:table-cell table:style-name="Table215.B2" office:value-type="string">
            <text:p text:style-name="P1474">The unified cache block size</text:p>
          </table:table-cell>
        </table:table-row>
        <table:table-row>
          <table:table-cell table:style-name="Table215.A2" office:value-type="string">
            <text:p text:style-name="P1473">AT_UID</text:p>
          </table:table-cell>
          <table:table-cell table:style-name="Table215.B2" office:value-type="string">
            <text:p text:style-name="P1474">The real user ID of the thread</text:p>
          </table:table-cell>
        </table:table-row>
      </table:table>
      <text:p text:style-name="P1472"/>
      <text:p text:style-name="P1483"><text:span text:style-name="T90">Tab </text:span><text:span text:style-name="T361">30</text:span><text:span text:style-name="T90">.</text:span> Auxiliary vector types</text:p>
      <text:p text:style-name="P1472"/>
      <text:p text:style-name="P1464"><text:soft-page-break/><text:span text:style-name="T1700">To retrieve these values </text:span><text:span text:style-name="T1679">we can use </text:span><text:span text:style-name="T1700">the </text:span><text:span text:style-name="T1678">getauxval</text:span><text:span text:style-name="T1678"><text:note text:id="ftn123" text:note-class="footnote"><text:note-citation>121</text:note-citation><text:note-body><text:p text:style-name="P1484"><text:span text:style-name="T1701">See th</text:span><text:span text:style-name="T1702">e</text:span><text:span text:style-name="T1701"> </text:span><text:span text:style-name="T1703">getauxval(3)</text:span><text:span text:style-name="T1704"> manual page</text:span></text:p></text:note-body></text:note></text:span><text:span text:style-name="T1700"> system call, </text:span><text:span text:style-name="T1679">which</text:span><text:span text:style-name="T1700"> is defined as follows.</text:span></text:p>
      <text:p text:style-name="P1485"/>
      <table:table table:name="Table18" table:style-name="Table18">
        <table:table-column table:style-name="Table18.A"/>
        <table:table-row>
          <table:table-cell table:style-name="Table18.A1" office:value-type="string">
            <text:p text:style-name="P536"><text:span text:style-name="T101">#include </text:span><text:span text:style-name="T102">&lt;sys/auxv.h&gt;</text:span></text:p>
            <text:p text:style-name="P535"/>
            <text:p text:style-name="P534"><text:span text:style-name="T115">unsigned</text:span> <text:span text:style-name="T115">long</text:span> <text:span text:style-name="T126">getauxval</text:span>(<text:span text:style-name="T115">unsigned</text:span> <text:span text:style-name="T115">long</text:span> <text:span text:style-name="T68">type</text:span>);</text:p>
            <text:p text:style-name="P975"/>
            <text:p text:style-name="P1486">Returns: <text:span text:style-name="T1705">on success the value corresponding to type, 0 if type is not found</text:span></text:p>
          </table:table-cell>
        </table:table-row>
      </table:table>
      <text:p text:style-name="P1487"/>
      <text:p text:style-name="P1464"><text:span text:style-name="T1700">The program </text:span><text:span text:style-name="Source_20_Text"><text:span text:style-name="T1706">auxvec.c</text:span></text:span><text:span text:style-name="T1700"> demonstrates how to retrieve information from the </text:span><text:span text:style-name="Strong_20_Emphasis"><text:span text:style-name="T1700">auxiliary vector.</text:span></text:span></text:p>
      <text:p text:style-name="Horizontal_20_Line"/>
      <text:p text:style-name="P186"><text:span text:style-name="T1707">1 </text:span><text:span text:style-name="T115">#include </text:span><text:span text:style-name="T116">&lt;stdio.h&gt;</text:span></text:p>
      <text:p text:style-name="P1488"><text:span text:style-name="T1707">2 </text:span><text:span text:style-name="T115">#include </text:span><text:span text:style-name="T116">&lt;sys/auxv.h&gt;</text:span></text:p>
      <text:p text:style-name="P188"/>
      <text:p text:style-name="P1488"><text:span text:style-name="T1707">3 </text:span><text:span text:style-name="T115">int</text:span> main() {</text:p>
      <text:p text:style-name="P1488"><text:span text:style-name="T1707">4 </text:span><text:span text:style-name="T115"><text:tab/>unsigned</text:span> <text:span text:style-name="T115">long</text:span> uid = <text:span text:style-name="T126">getauxval</text:span>(<text:span text:style-name="T115">AT_UID</text:span>);</text:p>
      <text:p text:style-name="P1488"><text:span text:style-name="T1707">5 </text:span><text:span text:style-name="T115"><text:tab/>unsigned</text:span> <text:span text:style-name="T115">long</text:span> pagesz = <text:span text:style-name="T126">getauxval</text:span>(<text:span text:style-name="T115">AT_PAGESZ</text:span>); </text:p>
      <text:p text:style-name="P1488"><text:span text:style-name="T1707">6 </text:span><text:span text:style-name="T115"><text:tab/>unsigned</text:span> <text:span text:style-name="T115">long</text:span> secure = <text:span text:style-name="T126">getauxval</text:span>(<text:span text:style-name="T115">AT_SECURE</text:span>);</text:p>
      <text:p text:style-name="P1488"><text:span text:style-name="T1707">7 </text:span><text:span text:style-name="T115"><text:tab/>unsigned</text:span> <text:span text:style-name="T115">long</text:span> entry = <text:span text:style-name="T126">getauxval</text:span>(<text:span text:style-name="T115">AT_ENTRY</text:span>);</text:p>
      <text:p text:style-name="P1488"><text:span text:style-name="T1707">8 </text:span><text:span text:style-name="T115"><text:tab/>unsigned</text:span> <text:span text:style-name="T115">long</text:span> base = <text:span text:style-name="T126">getauxval</text:span>(<text:span text:style-name="T115">AT_BASE</text:span>);</text:p>
      <text:p text:style-name="P1488"><text:span text:style-name="T1707">9 </text:span><text:span text:style-name="T115"><text:tab/>const</text:span> <text:span text:style-name="T115">char</text:span> *execfn = (<text:span text:style-name="T115">const</text:span> <text:span text:style-name="T115">char</text:span> *) <text:span text:style-name="T126">getauxval</text:span>(<text:span text:style-name="T115">AT_EXECFN</text:span>); </text:p>
      <text:p text:style-name="P186"/>
      <text:p text:style-name="P1488"><text:span text:style-name="T1707">10 </text:span><text:tab/>printf(<text:span text:style-name="T116">"AT_BASE = 0x%lx\n"</text:span>, base);</text:p>
      <text:p text:style-name="P1488"><text:span text:style-name="T1707">11 </text:span><text:tab/>printf(<text:span text:style-name="T116">"AT_EXECFN = %s\n"</text:span>, execfn);</text:p>
      <text:p text:style-name="P1488"><text:span text:style-name="T1707">12 </text:span><text:tab/>printf(<text:span text:style-name="T116">"AT_UID = %lu\n"</text:span>, uid);</text:p>
      <text:p text:style-name="P1488"><text:span text:style-name="T1707">13 </text:span><text:tab/>printf(<text:span text:style-name="T116">"AT_PAGESZ = %lu bytes\n"</text:span>, pagesz);</text:p>
      <text:p text:style-name="P1488"><text:span text:style-name="T1707">14 </text:span><text:tab/>printf(<text:span text:style-name="T116">"AT_SECURE = %lu\n"</text:span>, secure);</text:p>
      <text:p text:style-name="P1489"><text:span text:style-name="T1708">15 </text:span><text:span text:style-name="T124"><text:tab/>printf(</text:span><text:span text:style-name="T102">"AT_ENTRY = 0x%lx\n"</text:span><text:span text:style-name="T124">, entry);</text:span></text:p>
      <text:p text:style-name="P1488"><text:span text:style-name="T1707">16 </text:span><text:span text:style-name="T115"><text:tab/>return</text:span> <text:span text:style-name="T127">0</text:span>;</text:p>
      <text:p text:style-name="P1489"><text:span text:style-name="T1708">17 </text:span><text:span text:style-name="T124">}</text:span></text:p>
      <text:p text:style-name="Horizontal_20_Line"/>
      <text:p text:style-name="P1490"><text:span text:style-name="T90">auxvec.c</text:span> Retrieves some values from the <text:span text:style-name="T68">auxiliary vector</text:span></text:p>
      <text:p text:style-name="P1472"/>
      <text:p text:style-name="Standard"><text:span text:style-name="Strong_20_Emphasis"><text:span text:style-name="T220">Line 4–8. </text:span></text:span><text:span text:style-name="T220">The function </text:span><text:span text:style-name="Source_20_Text"><text:span text:style-name="T221">getauxval</text:span></text:span><text:span text:style-name="T220"> is used to extract different entries from the auxiliary vector:</text:span></text:p>
      <text:p text:style-name="P307"/>
      <text:list text:style-name="L18">
        <text:list-item>
          <text:p text:style-name="P1491"><text:span text:style-name="Source_20_Text"><text:span text:style-name="T75">AT_UID</text:span></text:span> returns the real user ID of the process</text:p>
        </text:list-item>
        <text:list-item>
          <text:p text:style-name="P1491"><text:span text:style-name="Source_20_Text"><text:span text:style-name="T75">AT_PAGESZ</text:span></text:span><text:span text:style-name="T220"> returns the system page size</text:span></text:p>
        </text:list-item>
        <text:list-item>
          <text:p text:style-name="P1491"><text:span text:style-name="Source_20_Text"><text:span text:style-name="T75">AT_SECURE</text:span></text:span> indicates whether the process is running in a secure-execution mode</text:p>
        </text:list-item>
        <text:list-item>
          <text:p text:style-name="P1491"><text:span text:style-name="Source_20_Text"><text:span text:style-name="T75">AT_ENTRY</text:span></text:span><text:span text:style-name="T220"> gives the program’s entry point address</text:span></text:p>
        </text:list-item>
        <text:list-item>
          <text:p text:style-name="P1491"><text:span text:style-name="Source_20_Text"><text:span text:style-name="T75">AT_BASE</text:span></text:span> provides the base address of the program interpreter or shared libraries</text:p>
        </text:list-item>
      </text:list>
      <text:p text:style-name="Standard"><text:soft-page-break/><text:span text:style-name="Strong_20_Emphasis"><text:span text:style-name="T220">Line 9. </text:span></text:span><text:span text:style-name="T220">The value associated with </text:span><text:span text:style-name="Source_20_Text"><text:span text:style-name="T221">AT_EXECFN</text:span></text:span><text:span text:style-name="T220"> is cast to a string (</text:span><text:span text:style-name="Source_20_Text"><text:span text:style-name="T221">const char *</text:span></text:span><text:span text:style-name="T220">) because it <text:tab/> contains the pathname of the executable file that was used to launch the program.</text:span></text:p>
      <text:p text:style-name="Standard"><text:span text:style-name="Strong_20_Emphasis"><text:span text:style-name="T220">Line 10–15. </text:span></text:span><text:span text:style-name="T220">The retrieved values are then printed in a human-readable format, showing both <text:tab/> <text:s text:c="2"/><text:tab/> <text:s text:c="7"/>memory-related information (such as addresses and page size) and execution context <text:tab/> <text:s text:c="7"/>details (such as the executable path and security status).</text:span></text:p>
      <text:p text:style-name="P1492"/>
      <text:p text:style-name="P1493">We execute the program.</text:p>
      <text:p text:style-name="P1493"/>
      <table:table table:name="Table216" table:style-name="Table216">
        <table:table-column table:style-name="Table216.A"/>
        <table:table-row>
          <table:table-cell table:style-name="Table216.A1" office:value-type="string">
            <text:p text:style-name="P1494"><text:span text:style-name="T80">[</text:span><text:a xlink:type="simple" xlink:href="mailto:linux@users" text:style-name="Internet_20_link" text:visited-style-name="Visited_20_Internet_20_Link"><text:span text:style-name="T81">linux@users</text:span></text:a><text:span text:style-name="T80">] </text:span><text:span text:style-name="T1639">./</text:span><text:span text:style-name="T1709">auxvec</text:span></text:p>
            <text:p text:style-name="P1495">AT_BASE <text:s text:c="3"/>= 0x7f537a28a000</text:p>
            <text:p text:style-name="P1495">AT_EXECFN <text:s/>= ./auxvec</text:p>
            <text:p text:style-name="P1495">AT_UID <text:s text:c="4"/>= 1000</text:p>
            <text:p text:style-name="P1495">AT_PAGESZ <text:s/>= 4096 bytes</text:p>
            <text:p text:style-name="P1495">AT_SECURE <text:s/>= 0</text:p>
            <text:p text:style-name="P1495">AT_ENTRY <text:s text:c="2"/>= 0x5613f86e8060</text:p>
          </table:table-cell>
        </table:table-row>
      </table:table>
      <text:p text:style-name="P1493"/>
      <text:p text:style-name="P1496"><text:span text:style-name="T1710">The fields have been retrieved and printed on </text:span><text:span text:style-name="T1711">stdout</text:span><text:span text:style-name="T1710">.</text:span></text:p>
      <text:p text:style-name="P1497"/>
      <text:p text:style-name="P1496"><text:span text:style-name="T1712">The </text:span><text:span text:style-name="T1713">auxiliary vector</text:span><text:span text:style-name="T1712"> is also available via the binary file </text:span><text:span text:style-name="T1711">/proc/self/auxv</text:span><text:span text:style-name="T1712">. To read the file we can use the </text:span><text:span text:style-name="T1711">hexdump</text:span><text:span text:style-name="T1712"><text:note text:id="ftn124" text:note-class="footnote"><text:note-citation>122</text:note-citation><text:note-body><text:p text:style-name="P250"><text:span text:style-name="T1714">Display file contents in hexadecimal, decimal, octal or ascii, see the </text:span><text:span text:style-name="T1715">hexdump(1)</text:span><text:span text:style-name="T1716"> manual page</text:span></text:p></text:note-body></text:note></text:span><text:span text:style-name="T1712"> program.</text:span></text:p>
      <text:p text:style-name="P1472"/>
      <table:table table:name="Table217" table:style-name="Table217">
        <table:table-column table:style-name="Table217.A"/>
        <table:table-row>
          <table:table-cell table:style-name="Table217.A1" office:value-type="string">
            <text:p text:style-name="P1498"><text:span text:style-name="T80">[</text:span><text:a xlink:type="simple" xlink:href="mailto:linux@users" text:style-name="Internet_20_link" text:visited-style-name="Visited_20_Internet_20_Link"><text:span text:style-name="T81">linux@users</text:span></text:a><text:span text:style-name="T80">] </text:span><text:span text:style-name="T1717">hexdump -C /proc/self/auxv</text:span></text:p>
            <text:p text:style-name="P1499">00000000 <text:s/>21 00 00 00 00 00 00 00 <text:s/>00 10 fd b8 c5 7f 00 00 <text:s text:c="2"/>|!...............|</text:p>
            <text:p text:style-name="P1499">00000010 <text:s/>33 00 00 00 00 00 00 00 <text:s/>f0 07 00 00 00 00 00 00 <text:s/>|3...............|</text:p>
            <text:p text:style-name="P1499">00000020 <text:s/>10 00 00 00 00 00 00 00 <text:s/>ff fb eb bf 00 00 00 00 <text:s text:c="3"/>|................|</text:p>
            <text:p text:style-name="P1500">...<text:span text:style-name="T1718">output...</text:span></text:p>
          </table:table-cell>
        </table:table-row>
      </table:table>
      <text:p text:style-name="P1472"/>
      <text:p text:style-name="P1501"><text:span text:style-name="T1719">The program </text:span><text:span text:style-name="T1720">auxvec2.c</text:span><text:span text:style-name="T1719"> </text:span><text:span text:style-name="T1721">demonstrates how to manually read the </text:span><text:span text:style-name="Strong_20_Emphasis"><text:span text:style-name="T1722">auxiliary vector</text:span></text:span><text:span text:style-name="T1721"> of a running Linux process by accessing the special file </text:span><text:span text:style-name="Source_20_Text"><text:span text:style-name="T1711">/proc/self/auxv</text:span></text:span><text:span text:style-name="T1721">. Unlike </text:span><text:span text:style-name="Source_20_Text"><text:span text:style-name="T1711">getauxval</text:span></text:span><text:span text:style-name="T1721">, which provides a high-level API, this approach reads the raw kernel-provided data directly from the proc filesystem.</text:span></text:p>
      <text:p text:style-name="Horizontal_20_Line"/>
      <text:p text:style-name="P186"><text:span text:style-name="T1723">1 </text:span><text:span text:style-name="T115">#include </text:span><text:span text:style-name="T116">&lt;fcntl.h&gt;</text:span></text:p>
      <text:p text:style-name="P1502"><text:span text:style-name="T1723">2 </text:span><text:span text:style-name="T115">#include </text:span><text:span text:style-name="T116">&lt;unistd.h&gt;</text:span></text:p>
      <text:p text:style-name="P1502"><text:span text:style-name="T1723">3 </text:span><text:span text:style-name="T115">#include </text:span><text:span text:style-name="T116">&lt;elf.h&gt;</text:span></text:p>
      <text:p text:style-name="P1503"><text:span text:style-name="T1724">4 </text:span><text:span text:style-name="T101">#include </text:span><text:span text:style-name="T102">&lt;stdio.h&gt;</text:span></text:p>
      <text:p text:style-name="P1504"/>
      <text:p text:style-name="P1503"><text:span text:style-name="T1724">5 </text:span><text:span text:style-name="T101">int</text:span><text:span text:style-name="T124"> main () {</text:span></text:p>
      <text:p text:style-name="P1502"><text:span text:style-name="T1723">6 </text:span><text:span text:style-name="T115"><text:tab/>int</text:span> fd = open(<text:span text:style-name="T116">"/proc/self/auxv"</text:span>, <text:span text:style-name="T115">O_RDONLY</text:span>);</text:p>
      <text:p text:style-name="P1505"><text:span text:style-name="T1725">7 </text:span><text:span text:style-name="T104"><text:tab/></text:span><text:span text:style-name="T103">Elf64_auxv_t</text:span><text:span text:style-name="T104"> aux;</text:span></text:p>
      <text:p text:style-name="P1502"><text:span text:style-name="T1723">8 </text:span><text:span text:style-name="T115"><text:tab/>while</text:span> (read(fd, &amp;aux, <text:span text:style-name="T115">sizeof</text:span>(aux)) == <text:span text:style-name="T115">sizeof</text:span>(aux)) {</text:p>
      <text:p text:style-name="P1502"><text:span text:style-name="T1723">9 </text:span><text:tab/><text:tab/>printf(<text:span text:style-name="T116">"Type: %lu, Value: %lx\n"</text:span>, aux.a_type, aux.a_un.a_val);</text:p>
      <text:p text:style-name="P1502"><text:span text:style-name="T1723">10 </text:span><text:tab/>}</text:p>
      <text:p text:style-name="P188"/>
      <text:p text:style-name="P1502"><text:span text:style-name="T1723">11 </text:span><text:span text:style-name="T115"><text:tab/>return</text:span> <text:span text:style-name="T127">0</text:span>;</text:p>
      <text:p text:style-name="P1503"><text:span text:style-name="T1724">12 </text:span><text:span text:style-name="T124">}</text:span></text:p>
      <text:p text:style-name="Horizontal_20_Line"/>
      <text:p text:style-name="P1506">auxvec2.c</text:p>
      <text:p text:style-name="Standard"><text:soft-page-break/><text:span text:style-name="Strong_20_Emphasis"><text:span text:style-name="T1726">Line 6. </text:span></text:span><text:span text:style-name="T1726">The program opens </text:span><text:span text:style-name="Source_20_Text"><text:span text:style-name="T1727">/proc/self/auxv</text:span></text:span><text:span text:style-name="T1726">, which represents the auxiliary vector of the <text:tab/>current process (</text:span><text:span text:style-name="Source_20_Text"><text:span text:style-name="T1727">self</text:span></text:span><text:span text:style-name="T1726">). This file contains a sequence of key–value pairs describing <text:tab/>execution parameters passed by the kernel at program startup</text:span></text:p>
      <text:p text:style-name="Standard"><text:span text:style-name="Strong_20_Emphasis"><text:span text:style-name="T1726">Line 7. </text:span></text:span><text:span text:style-name="T1726">An </text:span><text:span text:style-name="Source_20_Text"><text:span text:style-name="T1727">Elf64_auxv_t</text:span></text:span><text:span text:style-name="T1726"> structure is declared. This structure represents a single entry in the <text:tab/>auxiliary vector, containing a type (</text:span><text:span text:style-name="Source_20_Text"><text:span text:style-name="T1727">a_type</text:span></text:span><text:span text:style-name="T1726">) and a corresponding value (</text:span><text:span text:style-name="Source_20_Text"><text:span text:style-name="T1727">a_un.a_val</text:span></text:span><text:span text:style-name="T1726">)</text:span></text:p>
      <text:p text:style-name="Standard"><text:span text:style-name="Strong_20_Emphasis"><text:span text:style-name="T1726">Line 8–10. </text:span></text:span><text:span text:style-name="T1726">The program repeatedly reads entries from the file, one structure at a time. For each <text:tab/>successfully read entry, it prints:</text:span></text:p>
      <text:p text:style-name="P1507"/>
      <text:list text:style-name="L19">
        <text:list-item>
          <text:p text:style-name="P1508">the <text:span text:style-name="Strong_20_Emphasis"><text:span text:style-name="T230">type</text:span></text:span> of the auxiliary vector entry (<text:span text:style-name="Source_20_Text"><text:span text:style-name="T75">a_type</text:span></text:span>)</text:p>
        </text:list-item>
        <text:list-item>
          <text:p text:style-name="P1508"><text:span text:style-name="T1726">the </text:span><text:span text:style-name="Strong_20_Emphasis"><text:span text:style-name="T1726">value</text:span></text:span><text:span text:style-name="T1726"> associated with that type (</text:span><text:span text:style-name="Source_20_Text"><text:span text:style-name="T1727">a_un.a_val</text:span></text:span><text:span text:style-name="T1726">)</text:span></text:p>
        </text:list-item>
      </text:list>
      <text:list text:style-name="L20">
        <text:list-header>
          <text:p text:style-name="P1509"><text:s/></text:p>
        </text:list-header>
      </text:list>
      <text:p text:style-name="P1510"><text:tab/>This continues until all entries have been processed.</text:p>
      <text:p text:style-name="P1510"/>
      <text:p text:style-name="P1511">We execute the program.</text:p>
      <text:p text:style-name="P1510"/>
      <table:table table:name="Table221" table:style-name="Table221">
        <table:table-column table:style-name="Table221.A"/>
        <table:table-row>
          <table:table-cell table:style-name="Table221.A1" office:value-type="string">
            <text:p text:style-name="P1512"><text:span text:style-name="T80">[</text:span><text:a xlink:type="simple" xlink:href="mailto:linux@users" text:style-name="Internet_20_link" text:visited-style-name="Visited_20_Internet_20_Link"><text:span text:style-name="T81">linux@users</text:span></text:a><text:span text:style-name="T80">] ./</text:span><text:span text:style-name="T1728">auxvec2 </text:span></text:p>
            <text:p text:style-name="P1512">Type: 33, Value: 7fb1234b5000</text:p>
            <text:p text:style-name="P1512">Type: 51, Value: 7f0</text:p>
            <text:p text:style-name="P1512">Type: 16, Value: bfebfbff</text:p>
            <text:p text:style-name="P1512">Type: 6, Value: 1000</text:p>
            <text:p text:style-name="P1512">Type: 17, Value: 64</text:p>
            <text:p text:style-name="P1512">Type: 3, Value: 555c1710d040</text:p>
            <text:p text:style-name="P1512">Type: 4, Value: 38</text:p>
            <text:p text:style-name="P1512">Type: 5, Value: e</text:p>
            <text:p text:style-name="P1512">Type: 7, Value: 7fb1234b7000</text:p>
            <text:p text:style-name="P1512">Type: 8, Value: 0</text:p>
            <text:p text:style-name="P1512">Type: 9, Value: 555c1710e070</text:p>
            <text:p text:style-name="P1512">Type: 11, Value: 3e8</text:p>
            <text:p text:style-name="P1512">Type: 12, Value: 3e8</text:p>
            <text:p text:style-name="P1512">Type: 13, Value: 3e8</text:p>
            <text:p text:style-name="P1512">Type: 14, Value: 3e8</text:p>
            <text:p text:style-name="P1512">Type: 23, Value: 0</text:p>
            <text:p text:style-name="P1512">Type: 25, Value: 7ffdd22d4fc9</text:p>
            <text:p text:style-name="P1512">Type: 26, Value: 2</text:p>
            <text:p text:style-name="P1512">Type: 31, Value: 7ffdd22d7fee</text:p>
            <text:p text:style-name="P1512">Type: 15, Value: 7ffdd22d4fd9</text:p>
            <text:p text:style-name="P1512">Type: 27, Value: 1c</text:p>
            <text:p text:style-name="P1512">Type: 28, Value: 20</text:p>
            <text:p text:style-name="P1512">Type: 0, Value: 0</text:p>
          </table:table-cell>
        </table:table-row>
      </table:table>
      <text:p text:style-name="P1513"/>
      <text:p text:style-name="P1514"><text:span text:style-name="T1729">The output of the program shows the raw contents of the </text:span><text:span text:style-name="Strong_20_Emphasis"><text:span text:style-name="T1729">auxiliary vector</text:span></text:span><text:span text:style-name="T1729"> for the current process, as read from </text:span><text:span text:style-name="Source_20_Text"><text:span text:style-name="T1730">/proc/self/auxv</text:span></text:span><text:span text:style-name="T1729">. Each line corresponds to a kernel-provided entry composed of a numeric </text:span><text:span text:style-name="Strong_20_Emphasis"><text:span text:style-name="T1729">type identifier</text:span></text:span><text:span text:style-name="T1729"> and its associated </text:span><text:span text:style-name="Strong_20_Emphasis"><text:span text:style-name="T1729">value</text:span></text:span><text:span text:style-name="T1729">.</text:span></text:p>
      <text:p text:style-name="P1513">These entries describe low-level execution details such as memory layout, system configuration, and process metadata. For example, some values represent memory addresses (such as program segments or the stack), while others encode system limits, hardware capabilities, or security-related flags.</text:p>
      <text:p text:style-name="P1513"/>
      <text:p text:style-name="P1513">The final entry:</text:p>
      <text:p text:style-name="P1513"/>
      <text:p text:style-name="P1515"><text:span text:style-name="Source_20_Text"><text:span text:style-name="T75">Type: 0, Value: 0</text:span></text:span></text:p>
      <text:p text:style-name="P1513"><text:soft-page-break/>marks the end of the auxiliary vector.</text:p>
      <text:p text:style-name="P1514"><text:span text:style-name="T1729">Because the output uses numeric identifiers (e.g., </text:span><text:span text:style-name="Source_20_Text"><text:span text:style-name="T1730">33</text:span></text:span><text:span text:style-name="T1729">, </text:span><text:span text:style-name="Source_20_Text"><text:span text:style-name="T1730">51</text:span></text:span><text:span text:style-name="T1729">, </text:span><text:span text:style-name="Source_20_Text"><text:span text:style-name="T1730">16</text:span></text:span><text:span text:style-name="T1729">), it reflects the raw ELF-level representation rather than human-readable labels. These numbers correspond to constants defined in system headers such as </text:span><text:span text:style-name="Source_20_Text"><text:span text:style-name="T1730">elf.h</text:span></text:span><text:span text:style-name="T1729">, which map each type to a meaningful symbolic name (e.g., </text:span><text:span text:style-name="Source_20_Text"><text:span text:style-name="T1730">AT_BASE</text:span></text:span><text:span text:style-name="T1729">, </text:span><text:span text:style-name="Source_20_Text"><text:span text:style-name="T1730">AT_ENTRY</text:span></text:span><text:span text:style-name="T1729">, </text:span><text:span text:style-name="Source_20_Text"><text:span text:style-name="T1730">AT_UID</text:span></text:span><text:span text:style-name="T1729">, etc.).</text:span></text:p>
      <text:p text:style-name="P1514"><text:span text:style-name="T1729">Overall, this execution demonstrates how the Linux kernel passes essential runtime information to user-space programs at startup, and how this information can be inspected directly through the </text:span><text:span text:style-name="Source_20_Text"><text:span text:style-name="T1730">/proc</text:span></text:span><text:span text:style-name="T1729"> filesystem.</text:span></text:p>
      <text:p text:style-name="P1516"/>
      <text:p text:style-name="P1514"><text:span text:style-name="T1729">The first program that uses the </text:span><text:span text:style-name="T1731">auxiliary vector</text:span><text:span text:style-name="T1729"> is the dynamic linker </text:span><text:span text:style-name="T1732">ld-linux.so</text:span><text:span text:style-name="T1732"><text:note text:id="ftn125" text:note-class="footnote"><text:note-citation>123</text:note-citation><text:note-body><text:p text:style-name="P250"><text:span text:style-name="T1733">See the </text:span><text:span text:style-name="T1734">ld.so(8)</text:span><text:span text:style-name="T1735"> manual page</text:span></text:p></text:note-body></text:note></text:span><text:span text:style-name="T1729">. </text:span></text:p>
      <text:p text:style-name="P1514"><text:span text:style-name="T1736">To see the </text:span><text:span text:style-name="T1731">auxiliary vector</text:span><text:span text:style-name="T1736"> supplied to a program we can use the </text:span><text:span text:style-name="T1732">LD_SHOW_AUXV</text:span><text:span text:style-name="T1736"> variable </text:span><text:span text:style-name="T1737">as follows.</text:span></text:p>
      <text:p text:style-name="P1517"/>
      <table:table table:name="Table219" table:style-name="Table219">
        <table:table-column table:style-name="Table219.A"/>
        <table:table-row>
          <table:table-cell table:style-name="Table219.A1" office:value-type="string">
            <text:p text:style-name="P1518"><text:span text:style-name="T80">[</text:span><text:a xlink:type="simple" xlink:href="mailto:linux@users" text:style-name="Internet_20_link" text:visited-style-name="Visited_20_Internet_20_Link"><text:span text:style-name="T81">linux@users</text:span></text:a><text:span text:style-name="T80">] </text:span><text:span text:style-name="T1738">LD_SHOW_AUXV=1 ls</text:span></text:p>
            <text:p text:style-name="P1519">AT_SYSINFO_EHDR: <text:s text:c="5"/>0x7feb295eb000</text:p>
            <text:p text:style-name="P1520">AT_MINSIGSTKSZ: <text:s text:c="6"/>2032</text:p>
            <text:p text:style-name="P1520">AT_HWCAP: <text:s text:c="12"/>0xbfebfbff</text:p>
            <text:p text:style-name="P1520">AT_PAGESZ: <text:s text:c="11"/>4096</text:p>
            <text:p text:style-name="P1520">AT_CLKTCK: <text:s text:c="11"/>100</text:p>
            <text:p text:style-name="P1520">AT_PHDR: <text:s text:c="13"/>0x55eaf52e2040</text:p>
            <text:p text:style-name="P1520">AT_PHENT: <text:s text:c="12"/>56</text:p>
            <text:p text:style-name="P1520">AT_PHNUM: <text:s text:c="12"/>14</text:p>
            <text:p text:style-name="P1520">AT_BASE: <text:s text:c="13"/>0x7feb295ed000</text:p>
            <text:p text:style-name="P1520">AT_FLAGS: <text:s text:c="12"/>0x0</text:p>
            <text:p text:style-name="P1520">AT_ENTRY: <text:s text:c="12"/>0x55eaf52e8760</text:p>
            <text:p text:style-name="P1520">AT_UID: <text:s text:c="14"/>1000</text:p>
            <text:p text:style-name="P1520">AT_EUID: <text:s text:c="13"/>1000</text:p>
            <text:p text:style-name="P1520">AT_GID: <text:s text:c="14"/>1000</text:p>
            <text:p text:style-name="P1520">AT_EGID: <text:s text:c="13"/>1000</text:p>
            <text:p text:style-name="P1520">AT_SECURE: <text:s text:c="11"/>0</text:p>
            <text:p text:style-name="P1520">AT_RANDOM: <text:s text:c="11"/>0x7ffffaa8e199</text:p>
            <text:p text:style-name="P1520">AT_HWCAP2: <text:s text:c="11"/>0x2</text:p>
            <text:p text:style-name="P1520">AT_EXECFN: <text:s text:c="11"/>/usr/bin/ls</text:p>
            <text:p text:style-name="P1520">AT_PLATFORM: <text:s text:c="9"/>x86_64</text:p>
            <text:p text:style-name="P1520">AT_RSEQ_FEATURE_SIZE: 28</text:p>
            <text:p text:style-name="P1520">AT_RSEQ_ALIGN: <text:s text:c="7"/>32</text:p>
            <text:p text:style-name="P1521"><text:span text:style-name="T182">Desktop</text:span> <text:s/><text:span text:style-name="T182">Downloads</text:span> <text:s/><text:span text:style-name="T182">Screenshots</text:span></text:p>
          </table:table-cell>
        </table:table-row>
      </table:table>
      <text:p text:style-name="P1513"/>
      <text:p text:style-name="P1514"><text:span text:style-name="T1729">If we set the environment variable </text:span><text:span text:style-name="Source_20_Text"><text:span text:style-name="T1732">LD_SHOW_AUXV</text:span></text:span><text:span text:style-name="T1729"> to any value, the </text:span><text:span text:style-name="T1731">dynamic linker</text:span><text:span text:style-name="T1729"> will print the </text:span><text:span text:style-name="Strong_20_Emphasis"><text:span text:style-name="T1731">auxiliary vector</text:span></text:span><text:span text:style-name="T1729"> before executing the target program. Before the normal output of </text:span><text:span text:style-name="Source_20_Text"><text:span text:style-name="T1732">ls</text:span></text:span><text:span text:style-name="T1729">, the system will display a list of </text:span><text:span text:style-name="T1731">auxiliary vector entries</text:span><text:span text:style-name="T1729">.</text:span></text:p>
      <text:p text:style-name="P1514"><text:span text:style-name="T1729">This happens because the dynamic loader (</text:span><text:span text:style-name="Source_20_Text"><text:span text:style-name="T1732">ld.so</text:span></text:span><text:span text:style-name="T1729">) checks for the presence of </text:span><text:span text:style-name="Source_20_Text"><text:span text:style-name="T1732">LD_SHOW_AUXV</text:span></text:span><text:span text:style-name="T1729"> and, when it is set, prints the auxiliary vector during program startup for debugging purposes.</text:span></text:p>
      <text:p text:style-name="P1514"><text:span text:style-name="T1729">After this diagnostic output, the command proceeds normally and the standard </text:span><text:span text:style-name="Source_20_Text"><text:span text:style-name="T1732">ls</text:span></text:span><text:span text:style-name="T1729"> output is displayed.</text:span></text:p>
      <text:p text:style-name="P201"/>
      <text:p text:style-name="P201"><text:span text:style-name="T1736">Each process in Linux has its own </text:span><text:span text:style-name="Strong_20_Emphasis"><text:span text:style-name="T1736">auxiliary vector</text:span></text:span><text:span text:style-name="T1736">, which is stored by the kernel and can be accessed through the proc filesystem at </text:span><text:span text:style-name="T1732">/proc/&lt;pid&gt;/auxv</text:span><text:span text:style-name="T1739">.</text:span></text:p>
      <text:p text:style-name="Standard"/>
      <text:p text:style-name="Standard"><text:soft-page-break/>For example, we can inspect the auxiliary vector of a running shell process.</text:p>
      <text:p text:style-name="Standard"/>
      <table:table table:name="Table220" table:style-name="Table220">
        <table:table-column table:style-name="Table220.A"/>
        <table:table-row>
          <table:table-cell table:style-name="Table220.A1" office:value-type="string">
            <text:p text:style-name="P1522"><text:span text:style-name="T80">[</text:span><text:a xlink:type="simple" xlink:href="mailto:linux@users" text:style-name="Internet_20_link" text:visited-style-name="Visited_20_Internet_20_Link"><text:span text:style-name="T81">linux@users</text:span></text:a><text:span text:style-name="T80">] </text:span><text:span text:style-name="T1740">ps</text:span></text:p>
            <text:p text:style-name="P1522"><text:s text:c="4"/>PID TTY <text:s text:c="9"/>TIME CMD</text:p>
            <text:p text:style-name="P1522"><text:s/>607608 pts/1 <text:s text:c="3"/>00:00:07 zsh</text:p>
            <text:p text:style-name="P1522"><text:s/>632150 pts/1 <text:s text:c="3"/>00:00:00 ps</text:p>
            <text:p text:style-name="P1522"/>
            <text:p text:style-name="P1523"><text:span text:style-name="T80">[</text:span><text:a xlink:type="simple" xlink:href="mailto:linux@users" text:style-name="Internet_20_link" text:visited-style-name="Visited_20_Internet_20_Link"><text:span text:style-name="T81">linux@users</text:span></text:a><text:span text:style-name="T80">] hexdump -C <text:s/>/proc/</text:span><text:span text:style-name="T1741">607608</text:span><text:span text:style-name="T80">/auxv</text:span></text:p>
            <text:p text:style-name="P1524">00000000 <text:s/>21 00 00 00 00 00 00 00 <text:s/>00 70 36 9b da 7f 00 00 <text:s/>|!........p6.....|</text:p>
            <text:p text:style-name="P1525">00000010 <text:s/>33 00 00 00 00 00 00 00 <text:s/>f0 07 00 00 00 00 00 00 <text:s/>|3...............|</text:p>
            <text:p text:style-name="P1525">00000020 <text:s/>10 00 00 00 00 00 00 00 <text:s/>ff fb eb bf 00 00 00 00 <text:s/>|................|</text:p>
            <text:p text:style-name="P1525">00000030 <text:s/>06 00 00 00 00 00 00 00 <text:s/>00 10 00 00 00 00 00 00 <text:s/>|................|</text:p>
            <text:p text:style-name="P1525">00000040 <text:s/>11 00 00 00 00 00 00 00 <text:s/>64 00 00 00 00 00 00 00 <text:s/>|........d.......|</text:p>
            <text:p text:style-name="P1525">00000050 <text:s/>03 00 00 00 00 00 00 00 <text:s/>40 30 ac dd d2 55 00 00 <text:s/>|........@0...U..|</text:p>
            <text:p text:style-name="P1525">00000060 <text:s/>04 00 00 00 00 00 00 00 <text:s/>38 00 00 00 00 00 00 00 <text:s/>|........8.......|</text:p>
            <text:p text:style-name="P1525">00000070 <text:s/>05 00 00 00 00 00 00 00 <text:s/>0e 00 00 00 00 00 00 00 <text:s/>|................|</text:p>
            <text:p text:style-name="P1525">00000080 <text:s/>07 00 00 00 00 00 00 00 <text:s/>00 90 36 9b da 7f 00 00 <text:s/>|..........6.....|</text:p>
            <text:p text:style-name="P1525">00000090 <text:s/>08 00 00 00 00 00 00 00 <text:s/>00 00 00 00 00 00 00 00 <text:s/>|................|</text:p>
            <text:p text:style-name="P1525">000000a0 <text:s/>09 00 00 00 00 00 00 00 <text:s/>20 ad ad dd d2 55 00 00 <text:s/>|........ ....U..|</text:p>
            <text:p text:style-name="P1525">000000b0 <text:s/>0b 00 00 00 00 00 00 00 <text:s/>e8 03 00 00 00 00 00 00 <text:s/>|................|</text:p>
            <text:p text:style-name="P1525">000000c0 <text:s/>0c 00 00 00 00 00 00 00 <text:s/>e8 03 00 00 00 00 00 00 <text:s/>|................|</text:p>
            <text:p text:style-name="P1525">000000d0 <text:s/>0d 00 00 00 00 00 00 00 <text:s/>e8 03 00 00 00 00 00 00 <text:s/>|................|</text:p>
            <text:p text:style-name="P1525">000000e0 <text:s/>0e 00 00 00 00 00 00 00 <text:s/>e8 03 00 00 00 00 00 00 <text:s/>|................|</text:p>
            <text:p text:style-name="P1525">000000f0 <text:s/>17 00 00 00 00 00 00 00 <text:s/>00 00 00 00 00 00 00 00 <text:s/>|................|</text:p>
            <text:p text:style-name="P1525">00000100 <text:s/>19 00 00 00 00 00 00 00 <text:s/>49 39 d9 fb ff 7f 00 00 <text:s/>|........I9......|</text:p>
            <text:p text:style-name="P1525">00000110 <text:s/>1a 00 00 00 00 00 00 00 <text:s/>02 00 00 00 00 00 00 00 <text:s/>|................|</text:p>
            <text:p text:style-name="P1525">00000120 <text:s/>1f 00 00 00 00 00 00 00 <text:s/>eb 3f d9 fb ff 7f 00 00 <text:s/>|.........?......|</text:p>
            <text:p text:style-name="P1525">00000130 <text:s/>0f 00 00 00 00 00 00 00 <text:s/>59 39 d9 fb ff 7f 00 00 <text:s/>|........Y9......|</text:p>
            <text:p text:style-name="P1525">00000140 <text:s/>1b 00 00 00 00 00 00 00 <text:s/>1c 00 00 00 00 00 00 00 <text:s/>|................|</text:p>
            <text:p text:style-name="P1525">00000150 <text:s/>1c 00 00 00 00 00 00 00 <text:s/>20 00 00 00 00 00 00 00 <text:s/>|........ .......|</text:p>
            <text:p text:style-name="P1526">00000160 <text:s/>00 00 00 00 00 00 00 00 <text:s/>00 00 00 00 00 00 00 00 <text:s/>|................|</text:p>
          </table:table-cell>
        </table:table-row>
      </table:table>
      <text:p text:style-name="Standard"/>
      <text:p text:style-name="P1527">This output shows the <text:span text:style-name="Strong_20_Emphasis"><text:span text:style-name="T230">raw auxiliary vector (</text:span></text:span><text:span text:style-name="Strong_20_Emphasis"><text:span text:style-name="T236">auxv</text:span></text:span><text:span text:style-name="Strong_20_Emphasis"><text:span text:style-name="T230">)</text:span></text:span> of the process with PID <text:span text:style-name="Strong_20_Emphasis"><text:span text:style-name="T236">607608</text:span></text:span>, read directly from <text:span text:style-name="Strong_20_Emphasis"><text:span text:style-name="T236">/proc/607608/auxv</text:span></text:span>.</text:p>
      <text:p text:style-name="P1528"/>
      <text:p text:style-name="P1527"><text:span text:style-name="T1742">The </text:span><text:span text:style-name="Strong_20_Emphasis"><text:span text:style-name="T236">auxv</text:span></text:span><text:span text:style-name="T1742"> file is not text: it is a </text:span><text:span text:style-name="Strong_20_Emphasis"><text:span text:style-name="T1742">binary sequence of key–value pairs</text:span></text:span><text:span text:style-name="T1742">, where each entry has:</text:span></text:p>
      <text:p text:style-name="P1529"/>
      <text:list text:style-name="L21">
        <text:list-item>
          <text:p text:style-name="P1530">a <text:span text:style-name="Strong_20_Emphasis"><text:span text:style-name="T230">type</text:span></text:span> (first 8 bytes) </text:p>
        </text:list-item>
        <text:list-item>
          <text:p text:style-name="P1531"><text:span text:style-name="T1742">a </text:span><text:span text:style-name="Strong_20_Emphasis"><text:span text:style-name="T1742">value</text:span></text:span><text:span text:style-name="T1742"> (next 8 bytes)</text:span></text:p>
        </text:list-item>
      </text:list>
      <text:p text:style-name="P1532">On a 64-bit system, each entry is 16 bytes.</text:p>
      <text:p text:style-name="P1527"><text:span text:style-name="T1743">To retrieve a human-readable format, we can use </text:span><text:span text:style-name="Strong_20_Emphasis"><text:span text:style-name="T236">gdb</text:span></text:span><text:span text:style-name="T1743"> with the </text:span><text:span text:style-name="Strong_20_Emphasis"><text:span text:style-name="T236">-p</text:span></text:span><text:span text:style-name="T1743"> option to inspect the auxiliary vector of a running process.</text:span></text:p>
      <text:p text:style-name="P1533"/>
      <table:table table:name="Table222" table:style-name="Table222">
        <table:table-column table:style-name="Table222.A"/>
        <table:table-row>
          <table:table-cell table:style-name="Table222.A1" office:value-type="string">
            <text:p text:style-name="Standard"><text:span text:style-name="T1178">[</text:span><text:a xlink:type="simple" xlink:href="mailto:linux@users" text:style-name="Internet_20_link" text:visited-style-name="Visited_20_Internet_20_Link"><text:span text:style-name="T1744">linux@users</text:span></text:a><text:span text:style-name="T1178">] </text:span><text:span text:style-name="T1745">gdb -q -p</text:span><text:span text:style-name="T1746"> </text:span><text:span text:style-name="Strong_20_Emphasis"><text:span text:style-name="T1746">607608</text:span></text:span></text:p>
            <text:p text:style-name="Preformatted_20_Text">Attaching to process 607608</text:p>
            <text:p text:style-name="Preformatted_20_Text">Reading symbols from <text:span text:style-name="T1747">/usr/bin/zsh</text:span>...</text:p>
            <text:p text:style-name="Preformatted_20_Text">(No debugging symbols found in <text:span text:style-name="T1747">/usr/bin/zsh</text:span>)</text:p>
            <text:p text:style-name="P1534">...<text:span text:style-name="T1743">output...</text:span></text:p>
            <text:p text:style-name="Preformatted_20_Text">[Thread debugging using libthread_db enabled]</text:p>
            <text:p text:style-name="Preformatted_20_Text">Using host libthread_db library "<text:span text:style-name="T1747">/usr/lib/x86_64-linux-gnu/libthread_db.so.1</text:span>".</text:p>
            <text:p text:style-name="Preformatted_20_Text"><text:span text:style-name="T1748">0x00007fda9b0a4e92</text:span> in <text:span text:style-name="T1749">??</text:span> () from <text:span text:style-name="T1747">/usr/lib/x86_64-linux-gnu/libc.so.6</text:span></text:p>
            <text:p text:style-name="Preformatted_20_Text">(gdb) <text:span text:style-name="T90">info auxv</text:span></text:p>
            <text:p text:style-name="Preformatted_20_Text">33 <text:s text:c="2"/>AT_SYSINFO_EHDR <text:s text:c="5"/>System-supplied DSO's ELF header 0x7fda9b367000</text:p>
            <text:p text:style-name="Preformatted_20_Text">51 <text:s text:c="2"/>AT_MINSIGSTKSZ <text:s text:c="6"/>Minimum stack size for signal delivery 0x7f0</text:p>
            <text:p text:style-name="Preformatted_20_Text"><text:soft-page-break/>16 <text:s text:c="2"/>AT_HWCAP <text:s text:c="12"/>Machine-dependent CPU capability hints 0xbfebfbff</text:p>
            <text:p text:style-name="Preformatted_20_Text">6 <text:s text:c="3"/>AT_PAGESZ <text:s text:c="11"/>System page size <text:s text:c="14"/>4096</text:p>
            <text:p text:style-name="Preformatted_20_Text">17 <text:s text:c="2"/>AT_CLKTCK <text:s text:c="11"/>Frequency of times() <text:s text:c="10"/>100</text:p>
            <text:p text:style-name="Preformatted_20_Text">3 <text:s text:c="3"/>AT_PHDR <text:s text:c="13"/>Program headers for program <text:s text:c="3"/>0x55d2ddac3040</text:p>
            <text:p text:style-name="Preformatted_20_Text">4 <text:s text:c="3"/>AT_PHENT <text:s text:c="12"/>Size of program header entry <text:s text:c="2"/>56</text:p>
            <text:p text:style-name="Preformatted_20_Text">5 <text:s text:c="3"/>AT_PHNUM <text:s text:c="12"/>Number of program headers <text:s text:c="5"/>14</text:p>
            <text:p text:style-name="Preformatted_20_Text">7 <text:s text:c="3"/>AT_BASE <text:s text:c="13"/>Base address of interpreter <text:s text:c="3"/>0x7fda9b369000</text:p>
            <text:p text:style-name="Preformatted_20_Text">8 <text:s text:c="3"/>AT_FLAGS <text:s text:c="12"/>Flags <text:s text:c="25"/>0x0</text:p>
            <text:p text:style-name="Preformatted_20_Text">9 <text:s text:c="3"/>AT_ENTRY <text:s text:c="12"/>Entry point of program <text:s text:c="8"/>0x55d2ddadad20</text:p>
            <text:p text:style-name="Preformatted_20_Text">11 <text:s text:c="2"/>AT_UID <text:s text:c="14"/>Real user ID <text:s text:c="18"/>1000</text:p>
            <text:p text:style-name="Preformatted_20_Text">12 <text:s text:c="2"/>AT_EUID <text:s text:c="13"/>Effective user ID <text:s text:c="13"/>1000</text:p>
            <text:p text:style-name="Preformatted_20_Text">13 <text:s text:c="2"/>AT_GID <text:s text:c="14"/>Real group ID <text:s text:c="17"/>1000</text:p>
            <text:p text:style-name="Preformatted_20_Text">14 <text:s text:c="2"/>AT_EGID <text:s text:c="13"/>Effective group ID <text:s text:c="12"/>1000</text:p>
            <text:p text:style-name="Preformatted_20_Text">23 <text:s text:c="2"/>AT_SECURE <text:s text:c="11"/>Boolean, was exec setuid-like? 0</text:p>
            <text:p text:style-name="Preformatted_20_Text">25 <text:s text:c="2"/>AT_RANDOM <text:s text:c="11"/>Address of 16 random bytes <text:s text:c="4"/>0x7ffffbd93949</text:p>
            <text:p text:style-name="Preformatted_20_Text">26 <text:s text:c="2"/>AT_HWCAP2 <text:s text:c="11"/>Extension of AT_HWCAP <text:s text:c="9"/>0x2</text:p>
            <text:p text:style-name="Preformatted_20_Text">31 <text:s text:c="2"/>AT_EXECFN <text:s text:c="11"/>File name of executable <text:s text:c="7"/>0x7ffffbd93feb "/usr/bin/zsh"</text:p>
            <text:p text:style-name="Preformatted_20_Text">15 <text:s text:c="2"/>AT_PLATFORM <text:s text:c="9"/>String identifying platform <text:s text:c="3"/>0x7ffffbd93959 "x86_64"</text:p>
            <text:p text:style-name="Preformatted_20_Text">27 <text:s text:c="2"/>AT_RSEQ_FEATURE_SIZE rseq supported feature size <text:s text:c="3"/>28</text:p>
            <text:p text:style-name="Preformatted_20_Text">28 <text:s text:c="2"/>AT_RSEQ_ALIGN <text:s text:c="7"/>rseq allocation alignment <text:s text:c="5"/>32</text:p>
            <text:p text:style-name="Preformatted_20_Text">0 <text:s text:c="3"/>AT_NULL <text:s text:c="13"/>End of vector <text:s text:c="17"/>0x0</text:p>
            <text:p text:style-name="P1535">(gdb) </text:p>
          </table:table-cell>
        </table:table-row>
      </table:table>
      <text:p text:style-name="P1533"/>
      <text:p text:style-name="P1536"><text:span text:style-name="T1743">The </text:span><text:span text:style-name="T1750">gdb</text:span><text:span text:style-name="T1743"> command </text:span><text:span text:style-name="T1750">info</text:span><text:span text:style-name="T1743"> </text:span><text:span text:style-name="T1750">auxv</text:span><text:span text:style-name="T1743"> </text:span><text:span text:style-name="T1751">retrieves the </text:span><text:span text:style-name="Strong_20_Emphasis"><text:span text:style-name="T1751">entire auxiliary vector</text:span></text:span><text:span text:style-name="T1751"> of the process currently being debugged and prints it in a readable format directly inside the GDB session.</text:span></text:p>
      <text:p text:style-name="P1537"/>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9"><text:soft-page-break/><text:span text:style-name="T1752">III.12.2 </text:span><text:span text:style-name="T1753">The </text:span><text:span text:style-name="T1754">intmax_t</text:span><text:span text:style-name="T1753"> and </text:span><text:span text:style-name="T1754">uintmax_t</text:span><text:span text:style-name="T1753"> data types</text:span></text:p>
      <text:p text:style-name="Standard"/>
      <text:p text:style-name="Standard"><text:span text:style-name="T230">The types </text:span><text:span text:style-name="Source_20_Text"><text:span text:style-name="T236">intmax_t</text:span></text:span><text:span text:style-name="T230"> and </text:span><text:span text:style-name="Source_20_Text"><text:span text:style-name="T236">uintmax_t</text:span></text:span><text:span text:style-name="T230"> are defined in the header file </text:span><text:span text:style-name="Source_20_Text"><text:span text:style-name="T236">stdint.h</text:span></text:span><text:span text:style-name="T230"> and represent the </text:span><text:span text:style-name="Strong_20_Emphasis"><text:span text:style-name="T230">largest standard signed and unsigned integer types available on the platform</text:span></text:span><text:span text:style-name="T230">.</text:span> </text:p>
      <text:p text:style-name="P1540"/>
      <table:table table:name="Table60" table:style-name="Table60">
        <table:table-column table:style-name="Table60.A"/>
        <table:table-row>
          <table:table-cell table:style-name="Table60.A1" office:value-type="string">
            <text:p text:style-name="P1541"><text:span text:style-name="T115">#include </text:span><text:span text:style-name="T116">&lt;stdint.h&gt;</text:span></text:p>
            <text:p text:style-name="P1542"/>
            <text:p text:style-name="P1543"><text:span text:style-name="T115">typedef</text:span><text:span text:style-name="T119"> </text:span><text:span text:style-name="T115">intmax_t</text:span>;</text:p>
            <text:p text:style-name="P1543"><text:span text:style-name="T115">typedef</text:span><text:span text:style-name="T119"> </text:span><text:span text:style-name="T115">uintmax_t</text:span>;</text:p>
            <text:p text:style-name="P1542"/>
            <text:p text:style-name="P1543"><text:span text:style-name="T115">#define INTMAX_WIDTH</text:span><text:span text:style-name="T119"> </text:span></text:p>
            <text:p text:style-name="P1544">#define UINTMAX_WIDTH INTMAX_WIDTH</text:p>
            <text:p text:style-name="P1542"/>
            <text:p text:style-name="P1543"><text:span text:style-name="T115">#define INTMAX_MAX</text:span><text:span text:style-name="T119"> </text:span></text:p>
            <text:p text:style-name="P1543"><text:span text:style-name="T115">#define INTMAX_MIN</text:span><text:span text:style-name="T119"> </text:span></text:p>
            <text:p text:style-name="P1543"><text:span text:style-name="T115">#define UINTMAX_MAX</text:span><text:span text:style-name="T119"> </text:span></text:p>
            <text:p text:style-name="P1542"/>
            <text:p text:style-name="P1543"><text:span text:style-name="T115">#define INTMAX_C(c) c ##</text:span><text:span text:style-name="T119"> </text:span></text:p>
            <text:p text:style-name="P1545"><text:span text:style-name="T101">#define UINTMAX_C(c) c ##</text:span><text:span text:style-name="T212"> </text:span></text:p>
          </table:table-cell>
        </table:table-row>
      </table:table>
      <text:p text:style-name="P1540"/>
      <text:p text:style-name="P1546"><text:span text:style-name="T1755">The following </text:span><text:span text:style-name="T1756">table</text:span><text:span text:style-name="T1755"> describe the</text:span><text:span text:style-name="T1757">se</text:span><text:span text:style-name="T1755"> types</text:span><text:span text:style-name="T1755"><text:note text:id="ftn126" text:note-class="footnote"><text:note-citation>124</text:note-citation><text:note-body><text:p text:style-name="P1547"><text:span text:style-name="T1758">F</text:span>rom the <text:span text:style-name="T75">intmax_t(3type)</text:span> manual page</text:p></text:note-body></text:note></text:span><text:span text:style-name="T1755">.</text:span></text:p>
      <text:p text:style-name="P1540"/>
      <table:table table:name="Table61" table:style-name="Table61">
        <table:table-column table:style-name="Table61.A"/>
        <table:table-column table:style-name="Table61.B"/>
        <table:table-row>
          <table:table-cell table:style-name="Table61.A1" office:value-type="string">
            <text:p text:style-name="P1541">intmax_t</text:p>
          </table:table-cell>
          <table:table-cell table:style-name="Table61.B1" office:value-type="string">
            <text:p text:style-name="P1548"><text:span text:style-name="T1759">S</text:span><text:span text:style-name="T1182">igned integer type capable of representing any value of any basic signed integer type supported by the implementation. <text:s/>It is capable of storing values in the range </text:span><text:span text:style-name="T104">[INTMAX_MIN, INTMAX_MAX]</text:span></text:p>
          </table:table-cell>
        </table:table-row>
        <table:table-row>
          <table:table-cell table:style-name="Table61.A2" office:value-type="string">
            <text:p text:style-name="P1541">uintmax_t</text:p>
          </table:table-cell>
          <table:table-cell table:style-name="Table61.B2" office:value-type="string">
            <text:p text:style-name="P1548"><text:span text:style-name="T1759">U</text:span><text:span text:style-name="T1182">nsigned integer type capable of representing any value of any basic unsigned integer type supported by the implementation. <text:s/>It is capable of storing values in the range </text:span><text:span text:style-name="T104">[0, UINTMAX_MAX]</text:span></text:p>
          </table:table-cell>
        </table:table-row>
        <table:table-row>
          <table:table-cell table:style-name="Table61.A2" office:value-type="string">
            <text:p text:style-name="P1541">[U]INTMAX_WIDTH</text:p>
          </table:table-cell>
          <table:table-cell table:style-name="Table61.B2" office:value-type="string">
            <text:p text:style-name="P1549"><text:span text:style-name="T1760">E</text:span>xpand<text:span text:style-name="T1760">s</text:span> to the width in bits of these type</text:p>
          </table:table-cell>
        </table:table-row>
        <table:table-row>
          <table:table-cell table:style-name="Table61.A2" office:value-type="string">
            <text:p text:style-name="P1541">[U]INTMAX_MAX</text:p>
          </table:table-cell>
          <table:table-cell table:style-name="Table61.B2" office:value-type="string">
            <text:p text:style-name="P1549"><text:span text:style-name="T1760">E</text:span>xpand<text:span text:style-name="T1760">s</text:span> to the maximum value that these types can hold</text:p>
          </table:table-cell>
        </table:table-row>
        <table:table-row>
          <table:table-cell table:style-name="Table61.A2" office:value-type="string">
            <text:p text:style-name="P1541">INTMAX_MIN</text:p>
          </table:table-cell>
          <table:table-cell table:style-name="Table61.B2" office:value-type="string">
            <text:p text:style-name="P1548"><text:span text:style-name="T1759">E</text:span><text:span text:style-name="T1182">xpands to the minimum value that </text:span><text:span text:style-name="T104">intmax_t</text:span><text:span text:style-name="T1182"> can hold</text:span></text:p>
          </table:table-cell>
        </table:table-row>
        <table:table-row>
          <table:table-cell table:style-name="Table61.A2" office:value-type="string">
            <text:p text:style-name="P1541">[U]INTMAX_C()</text:p>
          </table:table-cell>
          <table:table-cell table:style-name="Table61.B2" office:value-type="string">
            <text:p text:style-name="P1548"><text:span text:style-name="T1759">E</text:span><text:span text:style-name="T1182">xpand their argument to an integer constant of type </text:span><text:span text:style-name="T104">[u]intmax_t</text:span></text:p>
          </table:table-cell>
        </table:table-row>
      </table:table>
      <text:p text:style-name="P1540"/>
      <text:p text:style-name="P1539"><text:span text:style-name="T1761">Tab </text:span><text:span text:style-name="T1762">31</text:span><text:span text:style-name="T1761">.</text:span><text:span text:style-name="T1763"> </text:span><text:span text:style-name="T104">intmax_t</text:span><text:span text:style-name="T1763"> and </text:span><text:span text:style-name="T104">uintmax_t</text:span><text:span text:style-name="T1763"> types</text:span></text:p>
      <text:p text:style-name="P1550"/>
      <text:p text:style-name="P1551"/>
      <text:p text:style-name="P1551"/>
      <text:p text:style-name="P1551"/>
      <text:p text:style-name="P1551"/>
      <text:p text:style-name="P1551"/>
      <text:p text:style-name="P1551"/>
      <text:p text:style-name="P1551"/>
      <text:p text:style-name="P1551"/>
      <text:p text:style-name="P1551"/>
      <text:p text:style-name="P1551"/>
      <text:p text:style-name="P1551"/>
      <text:p text:style-name="P1551"><text:soft-page-break/><text:span text:style-name="T1672">III.12.3 </text:span>Using <text:span text:style-name="T75">initgroups</text:span> to set up the supplementary groups</text:p>
      <text:p text:style-name="P1551"/>
      <text:p text:style-name="P1552"><text:span text:style-name="T1764">The program </text:span><text:span text:style-name="T1765">test_access.c</text:span><text:span text:style-name="T1764"> use </text:span><text:span text:style-name="T1765">initgroups</text:span><text:span text:style-name="T1764"> to set the supplementary groups of the caller process with the goal to open the passed file. </text:span></text:p>
      <text:p text:style-name="Horizontal_20_Line"/>
      <text:p text:style-name="P186"><text:span text:style-name="T1766">1</text:span><text:span text:style-name="T1767"> </text:span><text:span text:style-name="T115">#include </text:span><text:span text:style-name="T116">&lt;stdio.h&gt;</text:span></text:p>
      <text:p text:style-name="P1553"><text:span text:style-name="T1766">2</text:span><text:span text:style-name="T1767"> </text:span><text:span text:style-name="T115">#include </text:span><text:span text:style-name="T116">&lt;stdlib.h&gt;</text:span></text:p>
      <text:p text:style-name="P1553"><text:span text:style-name="T1766">3</text:span><text:span text:style-name="T1767"> </text:span><text:span text:style-name="T115">#include </text:span><text:span text:style-name="T116">&lt;unistd.h&gt;</text:span></text:p>
      <text:p text:style-name="P1553"><text:span text:style-name="T1766">4</text:span><text:span text:style-name="T1767"> </text:span><text:span text:style-name="T115">#include </text:span><text:span text:style-name="T116">&lt;pwd.h&gt;</text:span></text:p>
      <text:p text:style-name="P1553"><text:span text:style-name="T1766">5</text:span><text:span text:style-name="T1767"> </text:span><text:span text:style-name="T115">#include </text:span><text:span text:style-name="T116">&lt;grp.h&gt;</text:span></text:p>
      <text:p text:style-name="P1553"><text:span text:style-name="T1766">6</text:span><text:span text:style-name="T1767"> </text:span><text:span text:style-name="T115">#include </text:span><text:span text:style-name="T116">&lt;errno.h&gt;</text:span></text:p>
      <text:p text:style-name="P1553"><text:span text:style-name="T1766">7</text:span><text:span text:style-name="T1767"> </text:span><text:span text:style-name="T115">#include </text:span><text:span text:style-name="T116">&lt;string.h&gt;</text:span></text:p>
      <text:p text:style-name="P1553"><text:span text:style-name="T1766">8</text:span><text:span text:style-name="T1767"> </text:span><text:span text:style-name="T115">#include </text:span><text:span text:style-name="T116">&lt;sys/types.h&gt;</text:span></text:p>
      <text:p text:style-name="P1553"><text:span text:style-name="T1766">9</text:span><text:span text:style-name="T1767"> </text:span><text:span text:style-name="T115">#include </text:span><text:span text:style-name="T116">&lt;fcntl.h&gt;</text:span></text:p>
      <text:p text:style-name="P188"/>
      <text:p text:style-name="P1553"><text:span text:style-name="T1766">10</text:span><text:span text:style-name="T1767"> </text:span><text:span text:style-name="T115">int</text:span> main(<text:span text:style-name="T115">int</text:span> argc, <text:span text:style-name="T115">char</text:span> *argv<text:span text:style-name="T115">[]</text:span>) {</text:p>
      <text:p text:style-name="P1553"><text:span text:style-name="T1766">11</text:span><text:span text:style-name="T1767"> <text:s text:c="2"/></text:span><text:span text:style-name="T115">if</text:span> (argc &lt; <text:span text:style-name="T127">3</text:span> || argc &gt; <text:span text:style-name="T127">4</text:span>) {</text:p>
      <text:p text:style-name="P1554"><text:span text:style-name="T1766">12</text:span><text:span text:style-name="T1767"> <text:tab/></text:span>fprintf(<text:span text:style-name="T115">stderr</text:span>, <text:span text:style-name="T116">"Usage: %s &lt;username&gt; &lt;filepath&gt; [--no-initgroups]</text:span></text:p>
      <text:p text:style-name="P1554"><text:span text:style-name="T116"><text:tab/><text:tab/> <text:s text:c="2"/>\n"</text:span>, argv[<text:span text:style-name="T127">0</text:span>]);</text:p>
      <text:p text:style-name="P1553"><text:span text:style-name="T1766">13</text:span><text:span text:style-name="T1767"> <text:tab/></text:span><text:span text:style-name="T115">return</text:span> <text:span text:style-name="T115">EXIT_FAILURE</text:span>;</text:p>
      <text:p text:style-name="P1553"><text:span text:style-name="T1766">14</text:span><text:span text:style-name="T1767"> <text:s text:c="2"/></text:span>}</text:p>
      <text:p text:style-name="P188"/>
      <text:p text:style-name="P1553"><text:span text:style-name="T1766">15</text:span><text:span text:style-name="T1767"> <text:tab/></text:span><text:span text:style-name="T115">const</text:span> <text:span text:style-name="T115">char</text:span> *username = argv[<text:span text:style-name="T127">1</text:span>];</text:p>
      <text:p text:style-name="P1553"><text:span text:style-name="T1766">16</text:span><text:span text:style-name="T1767"> <text:tab/></text:span><text:span text:style-name="T115">const</text:span> <text:span text:style-name="T115">char</text:span> *filepath = argv[<text:span text:style-name="T127">2</text:span>];</text:p>
      <text:p text:style-name="P1555"><text:span text:style-name="T1768">17</text:span><text:span text:style-name="T1769"> <text:tab/></text:span><text:span text:style-name="T101">int</text:span><text:span text:style-name="T124"> use_initgroups = </text:span><text:span text:style-name="T335">1</text:span><text:span text:style-name="T124">;</text:span></text:p>
      <text:p text:style-name="P1553"><text:span text:style-name="T1766">18</text:span><text:span text:style-name="T1767"> <text:tab/></text:span><text:span text:style-name="T115">if</text:span> (argc == <text:span text:style-name="T127">4</text:span> &amp;&amp; strcmp(argv[<text:span text:style-name="T127">3</text:span>], <text:span text:style-name="T116">"--no-initgroups"</text:span>) == <text:span text:style-name="T127">0</text:span>) {</text:p>
      <text:p text:style-name="P1553"><text:span text:style-name="T1766">19</text:span><text:span text:style-name="T1767"> <text:tab/><text:tab/></text:span>use_initgroups = <text:span text:style-name="T127">0</text:span>;</text:p>
      <text:p text:style-name="P1553"><text:span text:style-name="T1766">20</text:span><text:span text:style-name="T1767"> <text:tab/></text:span>}</text:p>
      <text:p text:style-name="P188"/>
      <text:p text:style-name="P1553"><text:span text:style-name="T1766">21</text:span><text:span text:style-name="T1767"> <text:tab/></text:span><text:span text:style-name="T115">struct</text:span> passwd *pw = <text:span text:style-name="T126">getpwnam</text:span>(username);</text:p>
      <text:p text:style-name="P1553"><text:span text:style-name="T1766">22</text:span><text:span text:style-name="T1767"> <text:tab/></text:span><text:span text:style-name="T115">if</text:span> (!pw) {</text:p>
      <text:p text:style-name="P1553"><text:span text:style-name="T1766">23</text:span><text:span text:style-name="T1767"> <text:tab/><text:tab/></text:span>perror(<text:span text:style-name="T116">"getpwnam"</text:span>);</text:p>
      <text:p text:style-name="P1553"><text:span text:style-name="T1766">24</text:span><text:span text:style-name="T1767"> <text:tab/><text:tab/></text:span><text:span text:style-name="T115">return</text:span> <text:span text:style-name="T115">EXIT_FAILURE</text:span>;</text:p>
      <text:p text:style-name="P1553"><text:span text:style-name="T1766">25</text:span><text:span text:style-name="T1767"> <text:tab/></text:span>}</text:p>
      <text:p text:style-name="P188"/>
      <text:p text:style-name="P1556"><text:span text:style-name="T1766">26</text:span><text:span text:style-name="T1767"> <text:tab/></text:span>printf(<text:span text:style-name="T116">"Switching to user: %s (UID: %d, GID: %d)\n"</text:span>, </text:p>
      <text:p text:style-name="P1556"><text:tab/><text:tab/> <text:s/>username,pw&gt;pw_uid, pw-&gt;pw_gid);</text:p>
      <text:p text:style-name="P1553"><text:span text:style-name="T1766">27</text:span><text:span text:style-name="T1767"> <text:tab/></text:span><text:span text:style-name="T115">if</text:span> (use_initgroups) {</text:p>
      <text:p text:style-name="P1553"><text:span text:style-name="T1766">28</text:span><text:span text:style-name="T1767"> <text:tab/><text:tab/></text:span>printf(<text:span text:style-name="T116">"Calling initgroups()...\n"</text:span>);</text:p>
      <text:p text:style-name="P1553"><text:span text:style-name="T1766">29</text:span><text:span text:style-name="T1767"> <text:tab/><text:tab/></text:span><text:span text:style-name="T115">if</text:span> (<text:span text:style-name="T126">initgroups</text:span>(username, pw-&gt;pw_gid) != <text:span text:style-name="T127">0</text:span>) {</text:p>
      <text:p text:style-name="P1553"><text:span text:style-name="T1766">30</text:span><text:span text:style-name="T1767"> <text:tab/><text:tab/><text:tab/></text:span>perror(<text:span text:style-name="T116">"initgroups"</text:span>);</text:p>
      <text:p text:style-name="P1553"><text:span text:style-name="T1766">31</text:span><text:span text:style-name="T1767"> <text:tab/><text:tab/><text:tab/></text:span><text:span text:style-name="T115">return</text:span> <text:span text:style-name="T115">EXIT_FAILURE</text:span>;</text:p>
      <text:p text:style-name="P1553"><text:span text:style-name="T1766">32</text:span><text:span text:style-name="T1767"> <text:tab/><text:tab/></text:span>}</text:p>
      <text:p text:style-name="P1553"><text:span text:style-name="T1766">33</text:span><text:span text:style-name="T1767"> <text:tab/></text:span>} <text:span text:style-name="T115">else</text:span> {</text:p>
      <text:p text:style-name="P1553"><text:span text:style-name="T1766">34</text:span><text:span text:style-name="T1767"> <text:tab/><text:tab/></text:span>printf(<text:span text:style-name="T116">"Skipping initgroups()...\n"</text:span>);</text:p>
      <text:p text:style-name="P1553"><text:span text:style-name="T1766">35</text:span><text:span text:style-name="T1767"> <text:tab/></text:span>}</text:p>
      <text:p text:style-name="P188"/>
      <text:p text:style-name="P1553"><text:span text:style-name="T1766">36</text:span><text:span text:style-name="T1767"> <text:tab/></text:span><text:span text:style-name="T115">if</text:span> (<text:span text:style-name="T126">setgid</text:span>(pw-&gt;pw_gid) != <text:span text:style-name="T127">0</text:span>) {</text:p>
      <text:p text:style-name="P1553"><text:span text:style-name="T1766">37</text:span><text:span text:style-name="T1767"> <text:tab/><text:tab/></text:span>perror(<text:span text:style-name="T116">"setgid"</text:span>);</text:p>
      <text:p text:style-name="P1553"><text:span text:style-name="T1766">38</text:span><text:span text:style-name="T1767"> <text:tab/><text:tab/></text:span><text:span text:style-name="T115">return</text:span> <text:span text:style-name="T115">EXIT_FAILURE</text:span>;</text:p>
      <text:p text:style-name="P1553"><text:soft-page-break/><text:span text:style-name="T1766">39</text:span><text:span text:style-name="T1767"> <text:tab/></text:span>}</text:p>
      <text:p text:style-name="P188"/>
      <text:p text:style-name="P1553"><text:span text:style-name="T1766">40</text:span><text:span text:style-name="T1767"> <text:tab/></text:span><text:span text:style-name="T115">if</text:span> (<text:span text:style-name="T126">setuid</text:span>(pw-&gt;pw_uid) != <text:span text:style-name="T127">0</text:span>) {</text:p>
      <text:p text:style-name="P1553"><text:span text:style-name="T1766">41</text:span><text:span text:style-name="T1767"> <text:tab/><text:tab/></text:span>perror(<text:span text:style-name="T116">"setuid"</text:span>);</text:p>
      <text:p text:style-name="P1553"><text:span text:style-name="T1766">42</text:span><text:span text:style-name="T1767"> <text:tab/><text:tab/></text:span><text:span text:style-name="T115">return</text:span> <text:span text:style-name="T115">EXIT_FAILURE</text:span>;</text:p>
      <text:p text:style-name="P1553"><text:span text:style-name="T1766">43</text:span><text:span text:style-name="T1767"> <text:tab/></text:span>}</text:p>
      <text:p text:style-name="P188"/>
      <text:p text:style-name="P1555"><text:span text:style-name="T1768">44</text:span><text:span text:style-name="T1769"> <text:tab/></text:span><text:span text:style-name="T124">printf(</text:span><text:span text:style-name="T102">"Trying to open file: %s\n"</text:span><text:span text:style-name="T124">, filepath);</text:span></text:p>
      <text:p text:style-name="P1553"><text:span text:style-name="T1766">45</text:span><text:span text:style-name="T1767"> <text:tab/></text:span><text:span text:style-name="T115">int</text:span> fd = open(filepath, <text:span text:style-name="T115">O_RDONLY</text:span>);</text:p>
      <text:p text:style-name="P1553"><text:span text:style-name="T1766">46</text:span><text:span text:style-name="T1767"> <text:tab/></text:span><text:span text:style-name="T115">if</text:span> (fd == -<text:span text:style-name="T127">1</text:span>) {</text:p>
      <text:p text:style-name="P1553"><text:span text:style-name="T1766">47</text:span><text:span text:style-name="T1767"> <text:tab/><text:tab/></text:span>perror(<text:span text:style-name="T116">"open"</text:span>);</text:p>
      <text:p text:style-name="P1553"><text:span text:style-name="T1766">48</text:span><text:span text:style-name="T1767"> <text:tab/><text:tab/></text:span>printf(<text:span text:style-name="T116">"Access failed.\n"</text:span>);</text:p>
      <text:p text:style-name="P1553"><text:span text:style-name="T1766">49</text:span><text:span text:style-name="T1767"> <text:tab/></text:span>} <text:span text:style-name="T115">else</text:span> {</text:p>
      <text:p text:style-name="P1553"><text:span text:style-name="T1766">50</text:span><text:span text:style-name="T1767"> <text:tab/><text:tab/></text:span>printf(<text:span text:style-name="T116">"Access successful! File opened.\n"</text:span>);</text:p>
      <text:p text:style-name="P1553"><text:span text:style-name="T1766">51</text:span><text:span text:style-name="T1767"> <text:tab/><text:tab/></text:span>close(fd);</text:p>
      <text:p text:style-name="P1555"><text:span text:style-name="T1768">52</text:span><text:span text:style-name="T1769"> <text:tab/></text:span><text:span text:style-name="T124">}</text:span></text:p>
      <text:p text:style-name="P1553"><text:span text:style-name="T1766">53</text:span><text:span text:style-name="T1767"> <text:tab/></text:span><text:span text:style-name="T115">return</text:span> <text:span text:style-name="T127">0</text:span>;</text:p>
      <text:p text:style-name="P1555"><text:span text:style-name="T1768">54</text:span><text:span text:style-name="T1769"> </text:span><text:span text:style-name="T124">}</text:span></text:p>
      <text:p text:style-name="Horizontal_20_Line"/>
      <text:p text:style-name="P1557">test_access.c</text:p>
      <text:p text:style-name="P1558"/>
      <text:p text:style-name="Standard"><text:span text:style-name="Strong_20_Emphasis"><text:span text:style-name="T220">Line 21. </text:span></text:span><text:span text:style-name="T220">The program retrieves the user’s account information from the system database using <text:tab/> <text:tab/> <text:s/></text:span><text:span text:style-name="Source_20_Text"><text:span text:style-name="T221">getpwnam</text:span></text:span><text:span text:style-name="T220">. This provides the password entry structure containing the user’s UID, <text:tab/> <text:s/><text:tab/> <text:s/>primary GID, and other related account details</text:span></text:p>
      <text:p text:style-name="Standard"><text:span text:style-name="Strong_20_Emphasis"><text:span text:style-name="T220">Line 29. </text:span></text:span><text:span text:style-name="T220">The function </text:span><text:span text:style-name="Source_20_Text"><text:span text:style-name="T221">initgroups</text:span></text:span><text:span text:style-name="T220"> is used to set the supplementary group list of the process to <text:tab/> <text:s/>match those of the specified user. This ensures that the process inherits all additional group <text:tab/> <text:s/>memberships defined in </text:span><text:span text:style-name="Source_20_Text"><text:span text:style-name="T221">/etc/group</text:span></text:span><text:span text:style-name="T220">, which are important for file access control</text:span></text:p>
      <text:p text:style-name="Standard"><text:span text:style-name="Strong_20_Emphasis"><text:span text:style-name="T220">Line 36. </text:span></text:span><text:span text:style-name="T220">The program sets the process’s primary group ID using </text:span><text:span text:style-name="Source_20_Text"><text:span text:style-name="T221">setgid</text:span></text:span><text:span text:style-name="T220">, aligning it with the <text:tab/> <text:s text:c="3"/><text:tab/> <text:s/>user’s primary group as defined in the system account database </text:span></text:p>
      <text:p text:style-name="Standard"><text:span text:style-name="Strong_20_Emphasis"><text:span text:style-name="T220">Line 40. </text:span></text:span><text:span text:style-name="T220">The process’s user ID is changed using </text:span><text:span text:style-name="Source_20_Text"><text:span text:style-name="T221">setuid</text:span></text:span><text:span text:style-name="T220">, effectively dropping privileges and <text:tab/> <text:s text:c="2"/><text:tab/> <text:s/>making the process run under the identity of the specified user</text:span></text:p>
      <text:p text:style-name="Standard"><text:span text:style-name="Strong_20_Emphasis"><text:span text:style-name="T220">Line 44–52. </text:span></text:span><text:span text:style-name="T220">Finally, the program attempts to open the specified file. The success or failure of this <text:tab/> <text:s text:c="7"/>operation depends on the permissions associated with the file and the effective user <text:tab/> <text:s text:c="7"/>and group identities of the process after the privilege change</text:span> </text:p>
      <text:p text:style-name="P1559"/>
      <text:p text:style-name="P1560"><text:span text:style-name="T1770">We</text:span><text:span text:style-name="T1771"> create a temporary file and set the permissions to </text:span><text:span text:style-name="T1772">root</text:span><text:span text:style-name="T1771"> for the owner and </text:span><text:span text:style-name="T1772">audio</text:span><text:span text:style-name="T1771"> for the group.</text:span></text:p>
      <text:p text:style-name="P1561"/>
      <table:table table:name="Table74" table:style-name="Table74">
        <table:table-column table:style-name="Table74.A"/>
        <table:table-row>
          <table:table-cell table:style-name="Table74.A1" office:value-type="string">
            <text:p text:style-name="P1562"><text:span text:style-name="T80">[</text:span><text:a xlink:type="simple" xlink:href="mailto:linux@users" text:style-name="Internet_20_link" text:visited-style-name="Visited_20_Internet_20_Link"><text:span text:style-name="T81">linux@</text:span><text:span text:style-name="T342">users</text:span></text:a><text:span text:style-name="T80">] sudo touch /tmp/testfile</text:span></text:p>
            <text:p text:style-name="P1562"/>
            <text:p text:style-name="P1562"><text:span text:style-name="T80">[</text:span><text:a xlink:type="simple" xlink:href="mailto:linux@users" text:style-name="Internet_20_link" text:visited-style-name="Visited_20_Internet_20_Link"><text:span text:style-name="T81">linux@</text:span><text:span text:style-name="T342">users</text:span></text:a><text:span text:style-name="T80">] sudo chown root:audio /tmp/testfile</text:span></text:p>
            <text:p text:style-name="P1562"/>
            <text:p text:style-name="P1562"><text:span text:style-name="T80">[</text:span><text:a xlink:type="simple" xlink:href="mailto:linux@users" text:style-name="Internet_20_link" text:visited-style-name="Visited_20_Internet_20_Link"><text:span text:style-name="T81">linux@</text:span><text:span text:style-name="T342">users</text:span></text:a><text:span text:style-name="T80">] sudo chmod 640 /tmp/testfile</text:span></text:p>
          </table:table-cell>
        </table:table-row>
      </table:table>
      <text:p text:style-name="P1561"/>
      <text:p text:style-name="P1563"><text:span text:style-name="T1770">We check whether </text:span><text:span text:style-name="T1773">the user is in the </text:span><text:span text:style-name="T1772">audio</text:span><text:span text:style-name="T1773"> group.</text:span></text:p>
      <text:p text:style-name="P1564"/>
      <table:table table:name="Table75" table:style-name="Table75">
        <table:table-column table:style-name="Table75.A"/>
        <table:table-row>
          <table:table-cell table:style-name="Table75.A1" office:value-type="string">
            <text:p text:style-name="P156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1774">groups users</text:span></text:p>
            <text:p text:style-name="P1565"><text:span text:style-name="T1774">users</text:span> : <text:span text:style-name="T1774">users</text:span> adm dialout cdrom floppy sudo <text:span text:style-name="T90">audio</text:span> dip video plugdev <text:span text:style-name="T90">...</text:span></text:p>
            <text:p text:style-name="P1565"/>
            <text:p text:style-name="P1565"><text:span text:style-name="T80">[</text:span><text:a xlink:type="simple" xlink:href="mailto:linux@users" text:style-name="Internet_20_link" text:visited-style-name="Visited_20_Internet_20_Link"><text:span text:style-name="T81">linux@</text:span><text:span text:style-name="T342">users</text:span></text:a><text:span text:style-name="T80">] </text:span><text:span text:style-name="T1774">groups newuser</text:span></text:p>
            <text:p text:style-name="P1565">newuser : newuser</text:p>
          </table:table-cell>
        </table:table-row>
      </table:table>
      <text:p text:style-name="P1560"><text:soft-page-break/><text:span text:style-name="T1773">The user </text:span><text:span text:style-name="T1772">users</text:span><text:span text:style-name="T1773"> belong to the group </text:span><text:span text:style-name="T1772">audio</text:span><text:span text:style-name="T1773"> while the user </text:span><text:span text:style-name="T1772">newuser</text:span><text:span text:style-name="T1773"> </text:span><text:span text:style-name="T1770">does </text:span><text:span text:style-name="T1773">not. </text:span></text:p>
      <text:p text:style-name="P1566"/>
      <text:p text:style-name="P1566">We execute the program.</text:p>
      <text:p text:style-name="P1566"/>
      <table:table table:name="Table76" table:style-name="Table76">
        <table:table-column table:style-name="Table76.A"/>
        <table:table-row>
          <table:table-cell table:style-name="Table76.A1" office:value-type="string">
            <text:p text:style-name="P1565"><text:span text:style-name="T80">[</text:span><text:a xlink:type="simple" xlink:href="mailto:linux@users" text:style-name="Internet_20_link" text:visited-style-name="Visited_20_Internet_20_Link"><text:span text:style-name="T81">linux@</text:span><text:span text:style-name="T342">users</text:span></text:a><text:span text:style-name="T80">] sudo ./testaccess </text:span><text:span text:style-name="T1774">users</text:span><text:span text:style-name="T80"> /tmp/testfile <text:s text:c="2"/></text:span></text:p>
            <text:p text:style-name="P1565">Switching to user: <text:span text:style-name="T1775">users</text:span> (UID: 1000, GID: 1000)</text:p>
            <text:p text:style-name="P1565">Calling initgroups()...</text:p>
            <text:p text:style-name="P1565">Trying to open file: /tmp/testfile</text:p>
            <text:p text:style-name="P1567">Access successful! File opened.</text:p>
            <text:p text:style-name="P1565"/>
            <text:p text:style-name="P1565"><text:span text:style-name="T80">[</text:span><text:a xlink:type="simple" xlink:href="mailto:linux@users" text:style-name="Internet_20_link" text:visited-style-name="Visited_20_Internet_20_Link"><text:span text:style-name="T81">linux@</text:span><text:span text:style-name="T342">users</text:span></text:a><text:span text:style-name="T80">] sudo ./testaccess </text:span><text:span text:style-name="T1774">newuser</text:span><text:span text:style-name="T80"> /tmp/testfile <text:s text:c="2"/></text:span></text:p>
            <text:p text:style-name="P1565">Switching to user: <text:span text:style-name="T90">newuser</text:span> (UID: 1001, GID: 1002)</text:p>
            <text:p text:style-name="P1565">Calling initgroups()...</text:p>
            <text:p text:style-name="P1565">Trying to open file: /tmp/testfile</text:p>
            <text:p text:style-name="P1567">open: Permission denied</text:p>
            <text:p text:style-name="P1567">Access failed.</text:p>
          </table:table-cell>
        </table:table-row>
      </table:table>
      <text:p text:style-name="P1566"/>
      <text:p text:style-name="P1560"><text:span text:style-name="T1773">As we can see, once the supplementary groups of the process are correctly set, the file can be opened only if the specified user belongs to the relevant group (in this case, </text:span><text:span text:style-name="Source_20_Text"><text:span text:style-name="T1772">audio</text:span></text:span><text:span text:style-name="T1773">). Otherwise, as in the case of </text:span><text:span text:style-name="Source_20_Text"><text:span text:style-name="T1772">newuser</text:span></text:span><text:span text:style-name="T1773">, access is denied. If </text:span><text:span text:style-name="Source_20_Text"><text:span text:style-name="T1772">newuser</text:span></text:span><text:span text:style-name="T1773"> is added to the </text:span><text:span text:style-name="Source_20_Text"><text:span text:style-name="T1772">audio</text:span></text:span><text:span text:style-name="T1773"> group, the file can also be accessed when running the program with that user.</text:span></text:p>
      <text:p text:style-name="P1560"><text:span text:style-name="T1773">It is also important to note that the program explicitly switches both the user and the primary group of the process using </text:span><text:span text:style-name="Source_20_Text"><text:span text:style-name="T1772">setuid</text:span></text:span><text:span text:style-name="T1773"> and </text:span><text:span text:style-name="Source_20_Text"><text:span text:style-name="T1772">setgid</text:span></text:span><text:span text:style-name="T1773">. Without this step, the program would retain elevated privileges from </text:span><text:span text:style-name="Source_20_Text"><text:span text:style-name="T1772">sudo</text:span></text:span><text:span text:style-name="T1773">, and file access would always succeed regardless of the target user’s permissions, defeating the purpose of the experiment.</text:span></text:p>
      <text:p text:style-name="P1568"/>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6"/>
      <text:p text:style-name="P1569"><text:soft-page-break/><text:span text:style-name="T1672">III.12.4 </text:span>Command line tools for the groups</text:p>
      <text:p text:style-name="P1570"/>
      <text:p text:style-name="P1571">To deal with the groups on a Linux system are available several commands. The following table lists some of the most common used.</text:p>
      <text:p text:style-name="P1571"/>
      <table:table table:name="Table88" table:style-name="Table88">
        <table:table-column table:style-name="Table88.A"/>
        <table:table-column table:style-name="Table88.B"/>
        <table:table-column table:style-name="Table88.C"/>
        <table:table-row>
          <table:table-cell table:style-name="Table88.A1" office:value-type="string">
            <text:p text:style-name="P1572">Command</text:p>
          </table:table-cell>
          <table:table-cell table:style-name="Table88.A1" office:value-type="string">
            <text:p text:style-name="P1573">Description</text:p>
          </table:table-cell>
          <table:table-cell table:style-name="Table88.C1" office:value-type="string">
            <text:p text:style-name="P1573">Example</text:p>
          </table:table-cell>
        </table:table-row>
        <table:table-row>
          <table:table-cell table:style-name="Table88.A2" office:value-type="string">
            <text:p text:style-name="P1574">chgrp<text:note text:id="ftn127" text:note-class="footnote"><text:note-citation>125</text:note-citation><text:note-body><text:p text:style-name="P250"><text:span text:style-name="T1776">See the </text:span><text:span text:style-name="T1777">chgrp(1)</text:span><text:span text:style-name="T1778"> manual page</text:span></text:p></text:note-body></text:note> </text:p>
          </table:table-cell>
          <table:table-cell table:style-name="Table88.A2" office:value-type="string">
            <text:p text:style-name="P1575">Change group ownership</text:p>
          </table:table-cell>
          <table:table-cell table:style-name="Table88.C2" office:value-type="string">
            <text:p text:style-name="P1574">chgrp newuser file.txt</text:p>
          </table:table-cell>
        </table:table-row>
        <table:table-row>
          <table:table-cell table:style-name="Table88.A2" office:value-type="string">
            <text:p text:style-name="P1574">groups<text:note text:id="ftn128" text:note-class="footnote"><text:note-citation>126</text:note-citation><text:note-body><text:p text:style-name="P250"><text:span text:style-name="T1776">See the </text:span><text:span text:style-name="T1779">groups(1) </text:span><text:span text:style-name="T1776">manual</text:span><text:span text:style-name="T1779"> </text:span><text:span text:style-name="T1776">page</text:span></text:p></text:note-body></text:note></text:p>
          </table:table-cell>
          <table:table-cell table:style-name="Table88.A2" office:value-type="string">
            <text:p text:style-name="P1576">Prints the groups a user belongs</text:p>
          </table:table-cell>
          <table:table-cell table:style-name="Table88.C2" office:value-type="string">
            <text:p text:style-name="P1574">groups </text:p>
          </table:table-cell>
        </table:table-row>
        <table:table-row>
          <table:table-cell table:style-name="Table88.A2" office:value-type="string">
            <text:p text:style-name="P1574">newgrp<text:note text:id="ftn129" text:note-class="footnote"><text:note-citation>127</text:note-citation><text:note-body><text:p text:style-name="P250"><text:span text:style-name="T1776">See the </text:span><text:span text:style-name="T1779">newgrp(1) </text:span><text:span text:style-name="T1776">manual</text:span><text:span text:style-name="T1779"> </text:span><text:span text:style-name="T1776">page</text:span><text:span text:style-name="T1779"> </text:span></text:p></text:note-body></text:note></text:p>
          </table:table-cell>
          <table:table-cell table:style-name="Table88.A2" office:value-type="string">
            <text:p text:style-name="P1576">Log in to a new group</text:p>
          </table:table-cell>
          <table:table-cell table:style-name="Table88.C2" office:value-type="string">
            <text:p text:style-name="P1574">newgrp root</text:p>
          </table:table-cell>
        </table:table-row>
        <table:table-row>
          <table:table-cell table:style-name="Table88.A2" office:value-type="string">
            <text:p text:style-name="P1574">groupadd<text:note text:id="ftn130" text:note-class="footnote"><text:note-citation>128</text:note-citation><text:note-body><text:p text:style-name="P250"><text:span text:style-name="T1776">See the </text:span><text:span text:style-name="T1779">groupadd(8) </text:span><text:span text:style-name="T1776">manual</text:span><text:span text:style-name="T1779"> </text:span><text:span text:style-name="T1776">page</text:span></text:p></text:note-body></text:note></text:p>
          </table:table-cell>
          <table:table-cell table:style-name="Table88.A2" office:value-type="string">
            <text:p text:style-name="P1576">Creates a new group</text:p>
          </table:table-cell>
          <table:table-cell table:style-name="Table88.C2" office:value-type="string">
            <text:p text:style-name="P1574">groupadd newjobgroup</text:p>
          </table:table-cell>
        </table:table-row>
        <table:table-row>
          <table:table-cell table:style-name="Table88.A2" office:value-type="string">
            <text:p text:style-name="P1577">groupdel<text:note text:id="ftn131" text:note-class="footnote"><text:note-citation>129</text:note-citation><text:note-body><text:p text:style-name="P250"><text:span text:style-name="T1776">See the </text:span><text:span text:style-name="T1779">group</text:span><text:span text:style-name="T1780">del</text:span><text:span text:style-name="T1779">(8) </text:span><text:span text:style-name="T1776">manual</text:span><text:span text:style-name="T1779"> </text:span><text:span text:style-name="T1776">page</text:span></text:p></text:note-body></text:note></text:p>
          </table:table-cell>
          <table:table-cell table:style-name="Table88.A2" office:value-type="string">
            <text:p text:style-name="P1578">Delete a group</text:p>
          </table:table-cell>
          <table:table-cell table:style-name="Table88.C2" office:value-type="string">
            <text:p text:style-name="P1577">groupdel <text:span text:style-name="T1781">newjobgroup</text:span></text:p>
          </table:table-cell>
        </table:table-row>
        <table:table-row>
          <table:table-cell table:style-name="Table88.A2" office:value-type="string">
            <text:p text:style-name="P1577">groupmod<text:note text:id="ftn132" text:note-class="footnote"><text:note-citation>130</text:note-citation><text:note-body><text:p text:style-name="P250"><text:span text:style-name="T1776">See the </text:span><text:span text:style-name="T1779">group</text:span><text:span text:style-name="T1780">mod</text:span><text:span text:style-name="T1779">(8) </text:span><text:span text:style-name="T1776">manual</text:span><text:span text:style-name="T1779"> </text:span><text:span text:style-name="T1776">page</text:span></text:p></text:note-body></text:note></text:p>
          </table:table-cell>
          <table:table-cell table:style-name="Table88.A2" office:value-type="string">
            <text:p text:style-name="P1578">Modify a group</text:p>
          </table:table-cell>
          <table:table-cell table:style-name="Table88.C2" office:value-type="string">
            <text:p text:style-name="P1579">groupmod -U newuser newjobgroup</text:p>
          </table:table-cell>
        </table:table-row>
        <table:table-row>
          <table:table-cell table:style-name="Table88.A2" office:value-type="string">
            <text:p text:style-name="P1574"><text:span text:style-name="T1782">addgroup</text:span><text:span text:style-name="T1782"><text:note text:id="ftn133" text:note-class="footnote"><text:note-citation>131</text:note-citation><text:note-body><text:p text:style-name="P250"><text:span text:style-name="T1776">See the </text:span><text:span text:style-name="T1779">adduser(8) </text:span><text:span text:style-name="T1776">manual</text:span><text:span text:style-name="T1779"> </text:span><text:span text:style-name="T1776">page</text:span></text:p></text:note-body></text:note></text:span></text:p>
          </table:table-cell>
          <table:table-cell table:style-name="Table88.A2" office:value-type="string">
            <text:p text:style-name="P1576">Add/change users and groups</text:p>
          </table:table-cell>
          <table:table-cell table:style-name="Table88.C2" office:value-type="string">
            <text:p text:style-name="P1574">addgroup newteam</text:p>
          </table:table-cell>
        </table:table-row>
        <table:table-row>
          <table:table-cell table:style-name="Table88.A2" office:value-type="string">
            <text:p text:style-name="P1574"><text:span text:style-name="T1783">id</text:span><text:span text:style-name="T1783"><text:note text:id="ftn134" text:note-class="footnote"><text:note-citation>132</text:note-citation><text:note-body><text:p text:style-name="P250"><text:span text:style-name="T1776">See the </text:span><text:span text:style-name="T1779">id(1) </text:span><text:span text:style-name="T1776">manual</text:span><text:span text:style-name="T1779"> </text:span><text:span text:style-name="T1776">page</text:span></text:p></text:note-body></text:note></text:span></text:p>
          </table:table-cell>
          <table:table-cell table:style-name="Table88.A2" office:value-type="string">
            <text:p text:style-name="P1576">Print real and effective user and group IDs</text:p>
          </table:table-cell>
          <table:table-cell table:style-name="Table88.C2" office:value-type="string">
            <text:p text:style-name="P1574">id </text:p>
          </table:table-cell>
        </table:table-row>
        <table:table-row>
          <table:table-cell table:style-name="Table88.A2" office:value-type="string">
            <text:p text:style-name="P1574"><text:span text:style-name="T1783">getent</text:span><text:span text:style-name="T1783"><text:note text:id="ftn135" text:note-class="footnote"><text:note-citation>133</text:note-citation><text:note-body><text:p text:style-name="P250"><text:span text:style-name="T1776">See the </text:span><text:span text:style-name="T1779">getent(1) </text:span><text:span text:style-name="T1776">manual</text:span><text:span text:style-name="T1779"> </text:span><text:span text:style-name="T1776">page</text:span></text:p></text:note-body></text:note></text:span></text:p>
          </table:table-cell>
          <table:table-cell table:style-name="Table88.A2" office:value-type="string">
            <text:p text:style-name="P1576">Get entries from the NSS<text:note text:id="ftn136" text:note-class="footnote"><text:note-citation>134</text:note-citation><text:note-body><text:p text:style-name="P250"><text:span text:style-name="T1776">See the </text:span><text:span text:style-name="T1779">nss(5) </text:span><text:span text:style-name="T1776">manual</text:span><text:span text:style-name="T1779"> </text:span><text:span text:style-name="T1776">page</text:span></text:p></text:note-body></text:note> databases</text:p>
          </table:table-cell>
          <table:table-cell table:style-name="Table88.C2" office:value-type="string">
            <text:p text:style-name="P1574">getent group newuser</text:p>
          </table:table-cell>
        </table:table-row>
      </table:table>
      <text:p text:style-name="P1570"/>
      <text:p text:style-name="P1580"><text:span text:style-name="T90">Tab </text:span><text:span text:style-name="T1784">3</text:span><text:span text:style-name="T361">2</text:span><text:span text:style-name="T90">.</text:span> Groups commands</text:p>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0"/>
      <text:p text:style-name="P1581"><text:soft-page-break/><text:span text:style-name="T1672">III.12.5 </text:span>The Name Service Switch </text:p>
      <text:p text:style-name="P1582"/>
      <text:p text:style-name="P1583">The <text:span text:style-name="T68">Name Service Switch</text:span> (NSS) is an interface used by Linux systems to manage and access system-wide databases such as users, groups, passwords, networks, and related configuration data. Instead of relying on a single source, NSS allows this information to be obtained from multiple backends, including local files, system services, and network-based directory services.</text:p>
      <text:p text:style-name="P1583"/>
      <text:p text:style-name="P1584"><text:span text:style-name="T1785">In this model, each system database (for example, users, groups, or hosts) is associated with specific modules that implement the logic for retrieving the corresponding information. When a program calls a function such as </text:span><text:span text:style-name="Source_20_Text"><text:span text:style-name="T1786">getpwnam</text:span></text:span><text:span text:style-name="T1785"> or </text:span><text:span text:style-name="Source_20_Text"><text:span text:style-name="T1786">getgrnam</text:span></text:span><text:span text:style-name="T1785">, the request is not handled directly by the application. Instead, it is processed by the NSS framework within the GNU C Library, which determines where and how to retrieve the required data.</text:span></text:p>
      <text:p text:style-name="P1583"/>
      <text:p text:style-name="P1583">The behavior of NSS is configured through two main configuration files, which define the lookup order and sources used for each database.</text:p>
      <text:p text:style-name="P1583"/>
      <text:p text:style-name="P1585"/>
      <table:table table:name="Table90" table:style-name="Table90">
        <table:table-column table:style-name="Table90.A"/>
        <table:table-column table:style-name="Table90.B"/>
        <table:table-row>
          <table:table-cell table:style-name="Table90.A1" office:value-type="string">
            <text:p text:style-name="P1586">/<text:span text:style-name="T1787">etc/default/nss</text:span></text:p>
          </table:table-cell>
          <table:table-cell table:style-name="Table90.B1" office:value-type="string">
            <text:p text:style-name="P1587">General<text:span text:style-name="T1788"> </text:span>configuration</text:p>
          </table:table-cell>
        </table:table-row>
        <table:table-row>
          <table:table-cell table:style-name="Table90.A2" office:value-type="string">
            <text:p text:style-name="P1586">/etc/nsswitch.conf</text:p>
          </table:table-cell>
          <table:table-cell table:style-name="Table90.B2" office:value-type="string">
            <text:p text:style-name="P1588"><text:span text:style-name="T1788">Functionalities</text:span> configuration</text:p>
          </table:table-cell>
        </table:table-row>
      </table:table>
      <text:p text:style-name="P1589"/>
      <text:p text:style-name="P1589"><text:s/><text:span text:style-name="T1789">Tab </text:span><text:span text:style-name="T1784">3</text:span><text:span text:style-name="T361">3</text:span><text:span text:style-name="T1789">.</text:span><text:span text:style-name="T1790"> </text:span><text:span text:style-name="T1787">NSS files</text:span></text:p>
      <text:p text:style-name="P1589"/>
      <text:p text:style-name="P1590">The NSS is composed by modules, where each module is responsible of a database. The following table shows the system databases managed by NSS.</text:p>
      <text:p text:style-name="P1590"/>
      <table:table table:name="Table91" table:style-name="Table91">
        <table:table-column table:style-name="Table91.A"/>
        <table:table-column table:style-name="Table91.B"/>
        <table:table-column table:style-name="Table91.C"/>
        <table:table-row>
          <table:table-cell table:style-name="Table91.A1" office:value-type="string">
            <text:p text:style-name="P1591">passwd</text:p>
          </table:table-cell>
          <table:table-cell table:style-name="Table91.A1" office:value-type="string">
            <text:p text:style-name="P1592">User database</text:p>
          </table:table-cell>
          <table:table-cell table:style-name="Table91.C1" office:value-type="string">
            <text:p text:style-name="P1586">/etc/passwd</text:p>
          </table:table-cell>
        </table:table-row>
        <table:table-row>
          <table:table-cell table:style-name="Table91.A2" office:value-type="string">
            <text:p text:style-name="P1591">group</text:p>
          </table:table-cell>
          <table:table-cell table:style-name="Table91.A2" office:value-type="string">
            <text:p text:style-name="P1592">Group database</text:p>
          </table:table-cell>
          <table:table-cell table:style-name="Table91.C2" office:value-type="string">
            <text:p text:style-name="P1586">/etc/group</text:p>
          </table:table-cell>
        </table:table-row>
        <table:table-row>
          <table:table-cell table:style-name="Table91.A2" office:value-type="string">
            <text:p text:style-name="P1591">shadow</text:p>
          </table:table-cell>
          <table:table-cell table:style-name="Table91.A2" office:value-type="string">
            <text:p text:style-name="P1592">Password database</text:p>
          </table:table-cell>
          <table:table-cell table:style-name="Table91.C2" office:value-type="string">
            <text:p text:style-name="P1586">/etc/shadow</text:p>
          </table:table-cell>
        </table:table-row>
        <table:table-row>
          <table:table-cell table:style-name="Table91.A2" office:value-type="string">
            <text:p text:style-name="P1591">gshadow</text:p>
          </table:table-cell>
          <table:table-cell table:style-name="Table91.A2" office:value-type="string">
            <text:p text:style-name="P1592">Group password database</text:p>
          </table:table-cell>
          <table:table-cell table:style-name="Table91.C2" office:value-type="string">
            <text:p text:style-name="P1586">/etc/gshadow</text:p>
          </table:table-cell>
        </table:table-row>
        <table:table-row>
          <table:table-cell table:style-name="Table91.A2" office:value-type="string">
            <text:p text:style-name="P1591">hosts</text:p>
          </table:table-cell>
          <table:table-cell table:style-name="Table91.A2" office:value-type="string">
            <text:p text:style-name="P1592">Hostname database</text:p>
          </table:table-cell>
          <table:table-cell table:style-name="Table91.C2" office:value-type="string">
            <text:p text:style-name="P1586">/etc/hosts</text:p>
          </table:table-cell>
        </table:table-row>
        <table:table-row>
          <table:table-cell table:style-name="Table91.A2" office:value-type="string">
            <text:p text:style-name="P1591">networks</text:p>
          </table:table-cell>
          <table:table-cell table:style-name="Table91.A2" office:value-type="string">
            <text:p text:style-name="P1592">Network database</text:p>
          </table:table-cell>
          <table:table-cell table:style-name="Table91.C2" office:value-type="string">
            <text:p text:style-name="P1586">/etc/networks</text:p>
          </table:table-cell>
        </table:table-row>
        <table:table-row>
          <table:table-cell table:style-name="Table91.A2" office:value-type="string">
            <text:p text:style-name="P1591">protocols</text:p>
          </table:table-cell>
          <table:table-cell table:style-name="Table91.A2" office:value-type="string">
            <text:p text:style-name="P1592">Protocol database</text:p>
          </table:table-cell>
          <table:table-cell table:style-name="Table91.C2" office:value-type="string">
            <text:p text:style-name="P1586">/etc/protocols</text:p>
          </table:table-cell>
        </table:table-row>
        <table:table-row>
          <table:table-cell table:style-name="Table91.A2" office:value-type="string">
            <text:p text:style-name="P1591">services</text:p>
          </table:table-cell>
          <table:table-cell table:style-name="Table91.A2" office:value-type="string">
            <text:p text:style-name="P1592">Service database</text:p>
          </table:table-cell>
          <table:table-cell table:style-name="Table91.C2" office:value-type="string">
            <text:p text:style-name="P1586">/etc/services</text:p>
          </table:table-cell>
        </table:table-row>
        <table:table-row>
          <table:table-cell table:style-name="Table91.A2" office:value-type="string">
            <text:p text:style-name="P1591">ethers</text:p>
          </table:table-cell>
          <table:table-cell table:style-name="Table91.A2" office:value-type="string">
            <text:p text:style-name="P1592">Ethernet addresses database</text:p>
          </table:table-cell>
          <table:table-cell table:style-name="Table91.C2" office:value-type="string">
            <text:p text:style-name="P1586">/etc/ethers</text:p>
          </table:table-cell>
        </table:table-row>
        <table:table-row>
          <table:table-cell table:style-name="Table91.A2" office:value-type="string">
            <text:p text:style-name="P1591">rpc</text:p>
          </table:table-cell>
          <table:table-cell table:style-name="Table91.A2" office:value-type="string">
            <text:p text:style-name="P1592">Remote procedure call database</text:p>
          </table:table-cell>
          <table:table-cell table:style-name="Table91.C2" office:value-type="string">
            <text:p text:style-name="P1586">/etc/rpc</text:p>
          </table:table-cell>
        </table:table-row>
        <table:table-row>
          <table:table-cell table:style-name="Table91.A2" office:value-type="string">
            <text:p text:style-name="P1591">netgroup</text:p>
          </table:table-cell>
          <table:table-cell table:style-name="Table91.A2" office:value-type="string">
            <text:p text:style-name="P1592">Network groups database</text:p>
          </table:table-cell>
          <table:table-cell table:style-name="Table91.C2" office:value-type="string">
            <text:p text:style-name="P1586">/etc/netgroup</text:p>
          </table:table-cell>
        </table:table-row>
      </table:table>
      <text:p text:style-name="P1590"/>
      <text:p text:style-name="P1593">Tab <text:span text:style-name="T1598">3</text:span><text:span text:style-name="T586">4</text:span>. <text:span text:style-name="T230">NSS databases</text:span></text:p>
      <text:p text:style-name="P1590"/>
      <text:p text:style-name="P1594"><text:span text:style-name="T1791">Each of these databases has a dedicated manual page in the section 5: </text:span><text:span text:style-name="T1792">passwd(5)</text:span><text:span text:style-name="T1791">, </text:span><text:span text:style-name="T1792">group(5)</text:span><text:span text:style-name="T1791">, </text:span><text:span text:style-name="T1792">host(5)</text:span><text:span text:style-name="T1791">, </text:span><text:span text:style-name="T1792">services(5)</text:span><text:span text:style-name="T1793">, </text:span><text:span text:style-name="T1794">while the main manual page for NSS is </text:span><text:span text:style-name="T1792">nss(5)</text:span><text:span text:style-name="T1794">.</text:span></text:p>
      <text:p text:style-name="P1566"/>
      <text:p text:style-name="P1595"><text:span text:style-name="T1795">The </text:span><text:span text:style-name="T1792">/etc/nsswitch.conf</text:span><text:span text:style-name="T1795"> file has the following format:</text:span></text:p>
      <text:p text:style-name="P1596"/>
      <text:p text:style-name="P1596"/>
      <table:table table:name="Table102" table:style-name="Table102">
        <table:table-column table:style-name="Table102.A"/>
        <text:soft-page-break/>
        <table:table-row>
          <table:table-cell table:style-name="Table102.A1" office:value-type="string">
            <text:p text:style-name="P975">passwd: <text:s text:c="8"/>files systemd winbind</text:p>
            <text:p text:style-name="P975">group: <text:s text:c="9"/>files systemd winbind</text:p>
            <text:p text:style-name="P975">shadow: <text:s text:c="8"/>files systemd</text:p>
            <text:p text:style-name="P975">gshadow: <text:s text:c="7"/>files systemd</text:p>
            <text:p text:style-name="P975"/>
            <text:p text:style-name="P975">hosts: <text:s text:c="7"/>files myhostname mdns4_minimal [NOTFOUND=return] dns</text:p>
            <text:p text:style-name="P975">networks: <text:s text:c="6"/>files</text:p>
            <text:p text:style-name="P975"/>
            <text:p text:style-name="P975">protocols: <text:s text:c="5"/>db files</text:p>
            <text:p text:style-name="P975">services: <text:s text:c="6"/>db files</text:p>
            <text:p text:style-name="P975">ethers: <text:s text:c="8"/>db files</text:p>
            <text:p text:style-name="P975">rpc: <text:s text:c="11"/>db files</text:p>
            <text:p text:style-name="P975"/>
            <text:p text:style-name="P975">netgroup: <text:s text:c="6"/>nis</text:p>
          </table:table-cell>
        </table:table-row>
      </table:table>
      <text:p text:style-name="P1596"/>
      <text:p text:style-name="P427"><text:span text:style-name="T1795">where the first column is the database and the rest of the line specifies how the lookup process works. E.g. for the </text:span><text:span text:style-name="T1113">passwd</text:span><text:span text:style-name="T1795"> database will be used first the file, then the </text:span><text:span text:style-name="T1113">systemd</text:span><text:span text:style-name="T1113"><text:note text:id="ftn137" text:note-class="footnote"><text:note-citation>135</text:note-citation><text:note-body><text:p text:style-name="P1484"><text:span text:style-name="T1796">See the </text:span><text:span text:style-name="T1797">systemd(1)</text:span><text:span text:style-name="T1798"> manual page</text:span></text:p></text:note-body></text:note></text:span><text:span text:style-name="T1795"> service and then the </text:span><text:span text:style-name="T1113">winbind</text:span><text:span text:style-name="T1113"><text:note text:id="ftn138" text:note-class="footnote"><text:note-citation>136</text:note-citation><text:note-body><text:p text:style-name="P1484"><text:span text:style-name="T1796">See the </text:span><text:span text:style-name="T1797">winbindd(8)</text:span><text:span text:style-name="T1798"> manual page</text:span></text:p></text:note-body></text:note></text:span><text:span text:style-name="T1795"> service. </text:span></text:p>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7"/>
      <text:p text:style-name="P1598"><text:soft-page-break/><text:span text:style-name="T1799">III.12.6 </text:span><text:span text:style-name="T1800">Command line tools for the users</text:span></text:p>
      <text:p text:style-name="Standard"/>
      <text:p text:style-name="Standard">To manage users on a Linux system, several standard commands are available. The table below summarizes some of the most commonly used ones.</text:p>
      <text:p text:style-name="Standard"/>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599">adduser<text:note text:id="ftn139" text:note-class="footnote"><text:note-citation>137</text:note-citation><text:note-body><text:p text:style-name="P1484"><text:span text:style-name="T1801">See the </text:span><text:span text:style-name="T1802">adduser(1)</text:span><text:span text:style-name="T1803"> manual page</text:span></text:p></text:note-body></text:note></text:p>
          </table:table-cell>
          <table:table-cell table:style-name="Table95.A1" office:value-type="string">
            <text:p text:style-name="P1600">Add a user to the system</text:p>
          </table:table-cell>
          <table:table-cell table:style-name="Table95.C1" office:value-type="string">
            <text:p text:style-name="P1601">adduser newuser</text:p>
          </table:table-cell>
        </table:table-row>
        <table:table-row table:style-name="Table95.1">
          <table:table-cell table:style-name="Table95.A2" office:value-type="string">
            <text:p text:style-name="P1602">deluser<text:note text:id="ftn140" text:note-class="footnote"><text:note-citation>138</text:note-citation><text:note-body><text:p text:style-name="P1484"><text:span text:style-name="T1801">See the <text:s/></text:span><text:span text:style-name="T1797">deluser(1)</text:span><text:span text:style-name="T1801"> manual page</text:span></text:p></text:note-body></text:note></text:p>
          </table:table-cell>
          <table:table-cell table:style-name="Table95.B2" office:value-type="string">
            <text:p text:style-name="P1600">Delete a user </text:p>
          </table:table-cell>
          <table:table-cell table:style-name="Table95.C2" office:value-type="string">
            <text:p text:style-name="P1601">deluser newuser</text:p>
          </table:table-cell>
        </table:table-row>
        <table:table-row table:style-name="Table95.1">
          <table:table-cell table:style-name="Table95.A2" office:value-type="string">
            <text:p text:style-name="P1602">useradd<text:note text:id="ftn141" text:note-class="footnote"><text:note-citation>139</text:note-citation><text:note-body><text:p text:style-name="P1484"><text:span text:style-name="T1801">See the <text:s/></text:span><text:span text:style-name="T1797">useradd(1)</text:span><text:span text:style-name="T1801"> manual page</text:span></text:p></text:note-body></text:note> </text:p>
          </table:table-cell>
          <table:table-cell table:style-name="Table95.B3" office:value-type="string">
            <text:p text:style-name="P1600">Create a new user</text:p>
          </table:table-cell>
          <table:table-cell table:style-name="Table95.C2" office:value-type="string">
            <text:p text:style-name="P1601">useradd newuser </text:p>
          </table:table-cell>
        </table:table-row>
        <table:table-row table:style-name="Table95.1">
          <table:table-cell table:style-name="Table95.A2" office:value-type="string">
            <text:p text:style-name="P1602">usermod<text:note text:id="ftn142" text:note-class="footnote"><text:note-citation>140</text:note-citation><text:note-body><text:p text:style-name="P1484"><text:span text:style-name="T1801">See the <text:s/></text:span><text:span text:style-name="T1797">usermod(1)</text:span><text:span text:style-name="T1801"> manual page</text:span></text:p></text:note-body></text:note></text:p>
          </table:table-cell>
          <table:table-cell table:style-name="Table95.B4" office:value-type="string">
            <text:p text:style-name="P1600">Modify a user account</text:p>
          </table:table-cell>
          <table:table-cell table:style-name="Table95.C1" office:value-type="string">
            <text:p text:style-name="P1603">usermod -G newjobgroup newuser</text:p>
          </table:table-cell>
        </table:table-row>
        <table:table-row table:style-name="Table95.1">
          <table:table-cell table:style-name="Table95.A5" office:value-type="string">
            <text:p text:style-name="P1602">userdel<text:note text:id="ftn143" text:note-class="footnote"><text:note-citation>141</text:note-citation><text:note-body><text:p text:style-name="P1484"><text:span text:style-name="T1801">See the <text:s/></text:span><text:span text:style-name="T1797">userdel(1)</text:span><text:span text:style-name="T1803"> manual page</text:span></text:p></text:note-body></text:note></text:p>
          </table:table-cell>
          <table:table-cell table:style-name="Table95.B5" office:value-type="string">
            <text:p text:style-name="P1600">Delete a user</text:p>
          </table:table-cell>
          <table:table-cell table:style-name="Table95.C2" office:value-type="string">
            <text:p text:style-name="P1601">userdel newuser</text:p>
          </table:table-cell>
        </table:table-row>
      </table:table>
      <text:p text:style-name="P1604"/>
      <text:p text:style-name="P1605"><text:span text:style-name="T90">Tab </text:span><text:span text:style-name="T1784">3</text:span><text:span text:style-name="T361">5</text:span><text:span text:style-name="T90">.</text:span> Users commands</text:p>
      <text:p text:style-name="P1605"/>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6"/>
      <text:p text:style-name="P1607"><text:soft-page-break/><text:span text:style-name="T1804">III.12.7 </text:span><text:span text:style-name="T1805">The login process</text:span></text:p>
      <text:p text:style-name="P1608"/>
      <text:p text:style-name="P1609">The following diagram <text:span text:style-name="T1806">illustrates th</text:span>e login process.</text:p>
      <text:p text:style-name="P1610"/>
      <text:p text:style-name="P1610"><draw:frame draw:style-name="fr1" draw:name="Image2" text:anchor-type="char" svg:x="1.5661in" svg:y="0.0161in" svg:width="3.9953in" svg:height="7.0689in" draw:z-index="0"><draw:image xlink:href="Pictures/1000000000000400000006009F4CA102.png" xlink:type="simple" xlink:show="embed" xlink:actuate="onLoad" draw:mime-type="image/png"/></draw:frame></text:p>
      <text:p text:style-name="P1610"/>
      <text:p text:style-name="P1610"/>
      <text:p text:style-name="P1610"/>
      <text:p text:style-name="P1610"/>
      <text:p text:style-name="P1610"/>
      <text:p text:style-name="P1610"/>
      <text:p text:style-name="P1610"/>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1"/>
      <text:p text:style-name="P1612"><text:span text:style-name="T90">Fig </text:span><text:span text:style-name="T1681">2</text:span><text:span text:style-name="T90">.</text:span> Login process</text:p>
      <text:p text:style-name="P1610"/>
      <text:p text:style-name="P1610"/>
      <text:p text:style-name="P1613"/>
      <text:p text:style-name="P1613"/>
      <text:p text:style-name="P1613"/>
      <text:p text:style-name="P1613"/>
      <text:p text:style-name="P1613"/>
      <text:p text:style-name="P1613"/>
      <text:p text:style-name="P1613"/>
      <text:p text:style-name="P1613"><text:soft-page-break/>The following table <text:span text:style-name="T1806">lists </text:span>the most common<text:span text:style-name="T1806">ly</text:span> used program related to the login <text:span text:style-name="T1806">process. </text:span></text:p>
      <text:p text:style-name="P1613"/>
      <table:table table:name="Table132" table:style-name="Table132">
        <table:table-column table:style-name="Table132.A"/>
        <table:table-column table:style-name="Table132.B"/>
        <table:table-column table:style-name="Table132.C"/>
        <table:table-header-rows>
          <table:table-row>
            <table:table-cell table:style-name="Table132.A1" office:value-type="string">
              <text:p text:style-name="P1614">Program</text:p>
            </table:table-cell>
            <table:table-cell table:style-name="Table132.A1" office:value-type="string">
              <text:p text:style-name="P1614">Category</text:p>
            </table:table-cell>
            <table:table-cell table:style-name="Table132.A1" office:value-type="string">
              <text:p text:style-name="P1614">Description</text:p>
            </table:table-cell>
          </table:table-row>
        </table:table-header-rows>
        <table:table-row>
          <table:table-cell table:style-name="Table132.A1" office:value-type="string">
            <text:p text:style-name="P1615"><text:span text:style-name="Source_20_Text"><text:span text:style-name="T75">login</text:span></text:span></text:p>
          </table:table-cell>
          <table:table-cell table:style-name="Table132.A1" office:value-type="string">
            <text:p text:style-name="P1615">Login</text:p>
          </table:table-cell>
          <table:table-cell table:style-name="Table132.A1" office:value-type="string">
            <text:p text:style-name="P1615">Handles console login; prompts for <text:span text:style-name="Source_20_Text"><text:span text:style-name="T75">user/password</text:span></text:span></text:p>
          </table:table-cell>
        </table:table-row>
        <table:table-row>
          <table:table-cell table:style-name="Table132.A1" office:value-type="string">
            <text:p text:style-name="P1615"><text:span text:style-name="Source_20_Text"><text:span text:style-name="T75">passwd</text:span></text:span></text:p>
          </table:table-cell>
          <table:table-cell table:style-name="Table132.A1" office:value-type="string">
            <text:p text:style-name="P1615">Password Management</text:p>
          </table:table-cell>
          <table:table-cell table:style-name="Table132.A1" office:value-type="string">
            <text:p text:style-name="P1615">Changes user's password; updates <text:span text:style-name="Source_20_Text"><text:span text:style-name="T75">/etc/shadow</text:span></text:span></text:p>
          </table:table-cell>
        </table:table-row>
        <table:table-row>
          <table:table-cell table:style-name="Table132.A1" office:value-type="string">
            <text:p text:style-name="P1615"><text:span text:style-name="Source_20_Text"><text:span text:style-name="T75">su</text:span></text:span></text:p>
          </table:table-cell>
          <table:table-cell table:style-name="Table132.A1" office:value-type="string">
            <text:p text:style-name="P1615">Authentication</text:p>
          </table:table-cell>
          <table:table-cell table:style-name="Table132.A1" office:value-type="string">
            <text:p text:style-name="P1615">Switch user (usually to root); prompts for password</text:p>
          </table:table-cell>
        </table:table-row>
        <table:table-row>
          <table:table-cell table:style-name="Table132.A1" office:value-type="string">
            <text:p text:style-name="P1615"><text:span text:style-name="Source_20_Text"><text:span text:style-name="T75">sudo</text:span></text:span></text:p>
          </table:table-cell>
          <table:table-cell table:style-name="Table132.A1" office:value-type="string">
            <text:p text:style-name="P1615">Privilege Escalation</text:p>
          </table:table-cell>
          <table:table-cell table:style-name="Table132.A1" office:value-type="string">
            <text:p text:style-name="P1615">Runs commands as another user (often root)</text:p>
          </table:table-cell>
        </table:table-row>
        <table:table-row>
          <table:table-cell table:style-name="Table132.A1" office:value-type="string">
            <text:p text:style-name="P1615"><text:span text:style-name="Source_20_Text"><text:span text:style-name="T75">logout</text:span></text:span><text:span text:style-name="T75"> / </text:span><text:span text:style-name="Source_20_Text"><text:span text:style-name="T75">exit</text:span></text:span></text:p>
          </table:table-cell>
          <table:table-cell table:style-name="Table132.A1" office:value-type="string">
            <text:p text:style-name="P1615">Logout</text:p>
          </table:table-cell>
          <table:table-cell table:style-name="Table132.A1" office:value-type="string">
            <text:p text:style-name="P1615">Ends the current shell session</text:p>
          </table:table-cell>
        </table:table-row>
        <table:table-row>
          <table:table-cell table:style-name="Table132.A1" office:value-type="string">
            <text:p text:style-name="P1615"><text:span text:style-name="Source_20_Text"><text:span text:style-name="T75">who</text:span></text:span></text:p>
          </table:table-cell>
          <table:table-cell table:style-name="Table132.A1" office:value-type="string">
            <text:p text:style-name="P1615">User Accounting</text:p>
          </table:table-cell>
          <table:table-cell table:style-name="Table132.A1" office:value-type="string">
            <text:p text:style-name="P1615">Shows users currently logged in (<text:span text:style-name="Source_20_Text"><text:span text:style-name="T75">utmp</text:span></text:span>)</text:p>
          </table:table-cell>
        </table:table-row>
        <table:table-row>
          <table:table-cell table:style-name="Table132.A1" office:value-type="string">
            <text:p text:style-name="P1615"><text:span text:style-name="Source_20_Text"><text:span text:style-name="T75">w</text:span></text:span></text:p>
          </table:table-cell>
          <table:table-cell table:style-name="Table132.A1" office:value-type="string">
            <text:p text:style-name="P1615">User Accounting</text:p>
          </table:table-cell>
          <table:table-cell table:style-name="Table132.A1" office:value-type="string">
            <text:p text:style-name="P1615">Shows logged-in users and what they are doing</text:p>
          </table:table-cell>
        </table:table-row>
        <table:table-row>
          <table:table-cell table:style-name="Table132.A1" office:value-type="string">
            <text:p text:style-name="P1615"><text:span text:style-name="Source_20_Text"><text:span text:style-name="T75">last</text:span></text:span></text:p>
          </table:table-cell>
          <table:table-cell table:style-name="Table132.A1" office:value-type="string">
            <text:p text:style-name="P1615">Session History</text:p>
          </table:table-cell>
          <table:table-cell table:style-name="Table132.A1" office:value-type="string">
            <text:p text:style-name="P1615">Reads <text:span text:style-name="Source_20_Text"><text:span text:style-name="T75">/var/log/wtmp</text:span></text:span> for previous login sessions</text:p>
          </table:table-cell>
        </table:table-row>
        <table:table-row>
          <table:table-cell table:style-name="Table132.A1" office:value-type="string">
            <text:p text:style-name="P1615"><text:span text:style-name="Source_20_Text"><text:span text:style-name="T75">lastlog</text:span></text:span></text:p>
          </table:table-cell>
          <table:table-cell table:style-name="Table132.A1" office:value-type="string">
            <text:p text:style-name="P1615">Login Info</text:p>
          </table:table-cell>
          <table:table-cell table:style-name="Table132.A1" office:value-type="string">
            <text:p text:style-name="P1615">Shows last login per user from <text:span text:style-name="Source_20_Text"><text:span text:style-name="T75">/var/log/lastlog</text:span></text:span></text:p>
          </table:table-cell>
        </table:table-row>
        <table:table-row>
          <table:table-cell table:style-name="Table132.A1" office:value-type="string">
            <text:p text:style-name="P1615"><text:span text:style-name="Source_20_Text"><text:span text:style-name="T75">utmpdump</text:span></text:span></text:p>
          </table:table-cell>
          <table:table-cell table:style-name="Table132.A1" office:value-type="string">
            <text:p text:style-name="P1615">Debug/Analysis</text:p>
          </table:table-cell>
          <table:table-cell table:style-name="Table132.A1" office:value-type="string">
            <text:p text:style-name="P1615">Dumps raw <text:span text:style-name="Source_20_Text"><text:span text:style-name="T75">utmp</text:span></text:span>, <text:span text:style-name="Source_20_Text"><text:span text:style-name="T75">wtmp</text:span></text:span>, or custom <text:span text:style-name="Source_20_Text"><text:span text:style-name="T75">utmp</text:span></text:span> files</text:p>
          </table:table-cell>
        </table:table-row>
        <table:table-row>
          <table:table-cell table:style-name="Table132.A1" office:value-type="string">
            <text:p text:style-name="P1615"><text:span text:style-name="Source_20_Text"><text:span text:style-name="T75">whoami</text:span></text:span></text:p>
          </table:table-cell>
          <table:table-cell table:style-name="Table132.A1" office:value-type="string">
            <text:p text:style-name="P1615">Info Utility</text:p>
          </table:table-cell>
          <table:table-cell table:style-name="Table132.A1" office:value-type="string">
            <text:p text:style-name="P1615">Displays current effective username</text:p>
          </table:table-cell>
        </table:table-row>
        <table:table-row>
          <table:table-cell table:style-name="Table132.A1" office:value-type="string">
            <text:p text:style-name="P1615"><text:span text:style-name="Source_20_Text"><text:span text:style-name="T75">id</text:span></text:span></text:p>
          </table:table-cell>
          <table:table-cell table:style-name="Table132.A1" office:value-type="string">
            <text:p text:style-name="P1615">Info Utility</text:p>
          </table:table-cell>
          <table:table-cell table:style-name="Table132.A1" office:value-type="string">
            <text:p text:style-name="P1615">Shows UID, GID, and groups for a user</text:p>
          </table:table-cell>
        </table:table-row>
        <table:table-row>
          <table:table-cell table:style-name="Table132.A1" office:value-type="string">
            <text:p text:style-name="P1615"><text:span text:style-name="Source_20_Text"><text:span text:style-name="T75">getent</text:span></text:span></text:p>
          </table:table-cell>
          <table:table-cell table:style-name="Table132.A1" office:value-type="string">
            <text:p text:style-name="P1615">NSS Utility</text:p>
          </table:table-cell>
          <table:table-cell table:style-name="Table132.A1" office:value-type="string">
            <text:p text:style-name="P1615">Retrieves user, group, shadow, or host info from databases</text:p>
          </table:table-cell>
        </table:table-row>
        <table:table-row>
          <table:table-cell table:style-name="Table132.A1" office:value-type="string">
            <text:p text:style-name="P1615"><text:span text:style-name="Source_20_Text"><text:span text:style-name="T75">pam-auth-update</text:span></text:span></text:p>
          </table:table-cell>
          <table:table-cell table:style-name="Table132.A1" office:value-type="string">
            <text:p text:style-name="P1615">PAM Config Tool</text:p>
          </table:table-cell>
          <table:table-cell table:style-name="Table132.A1" office:value-type="string">
            <text:p text:style-name="P1615">Enables/disables PAM modules on Debian-based systems</text:p>
          </table:table-cell>
        </table:table-row>
        <table:table-row>
          <table:table-cell table:style-name="Table132.A1" office:value-type="string">
            <text:p text:style-name="P1615"><text:span text:style-name="Source_20_Text"><text:span text:style-name="T75">faillog</text:span></text:span></text:p>
          </table:table-cell>
          <table:table-cell table:style-name="Table132.A1" office:value-type="string">
            <text:p text:style-name="P1615">Security / Auditing</text:p>
          </table:table-cell>
          <table:table-cell table:style-name="Table132.A1" office:value-type="string">
            <text:p text:style-name="P1615">Shows login failures and controls fail counts</text:p>
          </table:table-cell>
        </table:table-row>
        <table:table-row>
          <table:table-cell table:style-name="Table132.A1" office:value-type="string">
            <text:p text:style-name="P1615"><text:span text:style-name="Source_20_Text"><text:span text:style-name="T75">loginctl</text:span></text:span></text:p>
          </table:table-cell>
          <table:table-cell table:style-name="Table132.A1" office:value-type="string">
            <text:p text:style-name="P1615">Session Manager</text:p>
          </table:table-cell>
          <table:table-cell table:style-name="Table132.A1" office:value-type="string">
            <text:p text:style-name="P1615">Lists sessions via <text:span text:style-name="Source_20_Text"><text:span text:style-name="T75">systemd-logind</text:span></text:span> (modern alternative to <text:span text:style-name="Source_20_Text"><text:span text:style-name="T75">who</text:span></text:span>)</text:p>
          </table:table-cell>
        </table:table-row>
      </table:table>
      <text:p text:style-name="P1613"/>
      <text:p text:style-name="P1616"><text:span text:style-name="T90">Tab </text:span><text:span text:style-name="T1784">3</text:span><text:span text:style-name="T361">6</text:span><text:span text:style-name="T90">.</text:span> Login related commands</text:p>
      <text:p text:style-name="P1609"/>
      <text:p text:style-name="P1617"><text:span text:style-name="T1806">For</text:span> further details about these commands, the user <text:span text:style-name="T1806">is encouraged to</text:span> read the related manual pages.</text:p>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
      <text:p text:style-name="P1617"><text:soft-page-break/>The following table list<text:span text:style-name="T1806">s</text:span> <text:span text:style-name="T1806">t</text:span>he files related to the login process.</text:p>
      <text:p text:style-name="P1617"/>
      <table:table table:name="Table133" table:style-name="Table133">
        <table:table-column table:style-name="Table133.A"/>
        <table:table-column table:style-name="Table133.B"/>
        <table:table-column table:style-name="Table133.C"/>
        <table:table-header-rows>
          <table:table-row>
            <table:table-cell table:style-name="Table133.A1" office:value-type="string">
              <text:p text:style-name="P1618"><text:span text:style-name="Strong_20_Emphasis">File Path</text:span></text:p>
            </table:table-cell>
            <table:table-cell table:style-name="Table133.A1" office:value-type="string">
              <text:p text:style-name="P1618"><text:span text:style-name="Strong_20_Emphasis">Description</text:span></text:p>
            </table:table-cell>
            <table:table-cell table:style-name="Table133.A1" office:value-type="string">
              <text:p text:style-name="P1618"><text:span text:style-name="Strong_20_Emphasis">Used </text:span><text:span text:style-name="Strong_20_Emphasis"><text:span text:style-name="T1807">b</text:span></text:span><text:span text:style-name="Strong_20_Emphasis">y</text:span></text:p>
            </table:table-cell>
          </table:table-row>
        </table:table-header-rows>
        <table:table-row>
          <table:table-cell table:style-name="Table133.A1" office:value-type="string">
            <text:p text:style-name="P1615"><text:span text:style-name="Source_20_Text"><text:span text:style-name="T75">/etc/passwd</text:span></text:span></text:p>
          </table:table-cell>
          <table:table-cell table:style-name="Table133.A1" office:value-type="string">
            <text:p text:style-name="P1615">Basic user account information (username, UID, GID, home, shell)</text:p>
          </table:table-cell>
          <table:table-cell table:style-name="Table133.A1" office:value-type="string">
            <text:p text:style-name="P1619"><text:span text:style-name="Source_20_Text"><text:span text:style-name="T1808">l</text:span></text:span><text:span text:style-name="Source_20_Text"><text:span text:style-name="T75">ogin, su, id, getent</text:span></text:span></text:p>
          </table:table-cell>
        </table:table-row>
        <table:table-row>
          <table:table-cell table:style-name="Table133.A1" office:value-type="string">
            <text:p text:style-name="P1615"><text:span text:style-name="Source_20_Text"><text:span text:style-name="T75">/etc/shadow</text:span></text:span></text:p>
          </table:table-cell>
          <table:table-cell table:style-name="Table133.A1" office:value-type="string">
            <text:p text:style-name="P1615">Secure password hashes, password aging and expiration settings</text:p>
          </table:table-cell>
          <table:table-cell table:style-name="Table133.A1" office:value-type="string">
            <text:p text:style-name="P1619"><text:span text:style-name="Source_20_Text"><text:span text:style-name="T1808">l</text:span></text:span><text:span text:style-name="Source_20_Text"><text:span text:style-name="T75">ogin, passwd, chage,crypt</text:span></text:span></text:p>
          </table:table-cell>
        </table:table-row>
        <table:table-row>
          <table:table-cell table:style-name="Table133.A1" office:value-type="string">
            <text:p text:style-name="P1615"><text:span text:style-name="Source_20_Text"><text:span text:style-name="T75">/etc/group</text:span></text:span></text:p>
          </table:table-cell>
          <table:table-cell table:style-name="Table133.A1" office:value-type="string">
            <text:p text:style-name="P1615">Group definitions (GID, group members)</text:p>
          </table:table-cell>
          <table:table-cell table:style-name="Table133.A1" office:value-type="string">
            <text:p text:style-name="P1619"><text:span text:style-name="Source_20_Text"><text:span text:style-name="T75">id,groups,getent</text:span></text:span></text:p>
          </table:table-cell>
        </table:table-row>
        <table:table-row>
          <table:table-cell table:style-name="Table133.A1" office:value-type="string">
            <text:p text:style-name="P1615"><text:span text:style-name="Source_20_Text"><text:span text:style-name="T75">/etc/gshadow</text:span></text:span></text:p>
          </table:table-cell>
          <table:table-cell table:style-name="Table133.A1" office:value-type="string">
            <text:p text:style-name="P1615">Secure group passwords and admin info</text:p>
          </table:table-cell>
          <table:table-cell table:style-name="Table133.A1" office:value-type="string">
            <text:p text:style-name="P1619"><text:span text:style-name="Source_20_Text"><text:span text:style-name="T75">groupadd,gpasswd</text:span></text:span></text:p>
          </table:table-cell>
        </table:table-row>
        <table:table-row>
          <table:table-cell table:style-name="Table133.A1" office:value-type="string">
            <text:p text:style-name="P1615"><text:span text:style-name="Source_20_Text"><text:span text:style-name="T1809">/run/utmp</text:span></text:span></text:p>
          </table:table-cell>
          <table:table-cell table:style-name="Table133.A1" office:value-type="string">
            <text:p text:style-name="P1615"><text:span text:style-name="T230">Tracks </text:span><text:span text:style-name="Strong_20_Emphasis"><text:span text:style-name="T230">current</text:span></text:span><text:span text:style-name="T230"> user sessions and logins</text:span></text:p>
          </table:table-cell>
          <table:table-cell table:style-name="Table133.A1" office:value-type="string">
            <text:p text:style-name="P1619"><text:span text:style-name="Source_20_Text"><text:span text:style-name="T1810">w</text:span></text:span><text:span text:style-name="Source_20_Text"><text:span text:style-name="T1809">ho, w,login,logout</text:span></text:span></text:p>
          </table:table-cell>
        </table:table-row>
        <table:table-row>
          <table:table-cell table:style-name="Table133.A1" office:value-type="string">
            <text:p text:style-name="P1615"><text:span text:style-name="Source_20_Text"><text:span text:style-name="T1809">/var/log/wtmp</text:span></text:span></text:p>
          </table:table-cell>
          <table:table-cell table:style-name="Table133.A1" office:value-type="string">
            <text:p text:style-name="P1615"><text:span text:style-name="T1742">Stores </text:span><text:span text:style-name="Strong_20_Emphasis"><text:span text:style-name="T1742">login/logout history</text:span></text:span><text:span text:style-name="T1742"> across reboots</text:span></text:p>
          </table:table-cell>
          <table:table-cell table:style-name="Table133.A1" office:value-type="string">
            <text:p text:style-name="P1619"><text:span text:style-name="Source_20_Text"><text:span text:style-name="T1811">L</text:span></text:span><text:span text:style-name="Source_20_Text"><text:span text:style-name="T1809">ast, login</text:span></text:span></text:p>
          </table:table-cell>
        </table:table-row>
        <table:table-row table:style-name="Table133.8">
          <table:table-cell table:style-name="Table133.A8" office:value-type="string">
            <text:p text:style-name="P1615"><text:span text:style-name="Source_20_Text"><text:span text:style-name="T1809">/var/log/btmp</text:span></text:span></text:p>
          </table:table-cell>
          <table:table-cell table:style-name="Table133.A1" office:value-type="string">
            <text:p text:style-name="P1615"><text:span text:style-name="T1742">Records </text:span><text:span text:style-name="Strong_20_Emphasis"><text:span text:style-name="T1742">failed login attempts</text:span></text:span></text:p>
          </table:table-cell>
          <table:table-cell table:style-name="Table133.A1" office:value-type="string">
            <text:p text:style-name="P1619"><text:span text:style-name="Source_20_Text"><text:span text:style-name="T1809">lastb, faillog</text:span></text:span></text:p>
          </table:table-cell>
        </table:table-row>
        <table:table-row table:style-name="Table133.8">
          <table:table-cell table:style-name="Table133.A8" office:value-type="string">
            <text:p text:style-name="P1615"><text:span text:style-name="Source_20_Text"><text:span text:style-name="T1809">/var/log/lastlog</text:span></text:span></text:p>
          </table:table-cell>
          <table:table-cell table:style-name="Table133.A1" office:value-type="string">
            <text:p text:style-name="P1615"><text:span text:style-name="T1742">Stores each user’s </text:span><text:span text:style-name="Strong_20_Emphasis"><text:span text:style-name="T1742">most recent login time</text:span></text:span></text:p>
          </table:table-cell>
          <table:table-cell table:style-name="Table133.A1" office:value-type="string">
            <text:p text:style-name="P1619"><text:span text:style-name="Source_20_Text"><text:span text:style-name="T1809">lastlog, login</text:span></text:span></text:p>
          </table:table-cell>
        </table:table-row>
        <table:table-row table:style-name="Table133.8">
          <table:table-cell table:style-name="Table133.A8" office:value-type="string">
            <text:p text:style-name="P1615"><text:span text:style-name="Source_20_Text"><text:span text:style-name="T1809">/var/log/auth.log</text:span></text:span></text:p>
          </table:table-cell>
          <table:table-cell table:style-name="Table133.A1" office:value-type="string">
            <text:p text:style-name="P1620">General authentication logs (PAM, sudo, ssh, etc.) <text:s/><text:span text:style-name="T1807">(Debian-based OS)</text:span></text:p>
          </table:table-cell>
          <table:table-cell table:style-name="Table133.A1" office:value-type="string">
            <text:p text:style-name="P1619"><text:span text:style-name="Source_20_Text"><text:span text:style-name="T1809">syslog, rsyslog</text:span></text:span></text:p>
          </table:table-cell>
        </table:table-row>
        <table:table-row table:style-name="Table133.8">
          <table:table-cell table:style-name="Table133.A8" office:value-type="string">
            <text:p text:style-name="P1615"><text:span text:style-name="Source_20_Text"><text:span text:style-name="T1809">/var/log/secure</text:span></text:span></text:p>
          </table:table-cell>
          <table:table-cell table:style-name="Table133.A1" office:value-type="string">
            <text:p text:style-name="P1615"><text:span text:style-name="T1742">Same </text:span><text:span text:style-name="Source_20_Text"><text:span text:style-name="T1809">auth.log</text:span></text:span><text:span text:style-name="T1742"> </text:span><text:span text:style-name="T1812">(</text:span><text:span text:style-name="Strong_20_Emphasis"><text:span text:style-name="T1742">Red Hat-based</text:span></text:span><text:span text:style-name="T1742"> </text:span><text:span text:style-name="T1812">OS)</text:span></text:p>
          </table:table-cell>
          <table:table-cell table:style-name="Table133.A1" office:value-type="string">
            <text:p text:style-name="P1619"><text:span text:style-name="Source_20_Text"><text:span text:style-name="T1809">syslog, rsyslog</text:span></text:span></text:p>
          </table:table-cell>
        </table:table-row>
        <table:table-row table:style-name="Table133.8">
          <table:table-cell table:style-name="Table133.A8" office:value-type="string">
            <text:p text:style-name="P1615"><text:span text:style-name="Source_20_Text"><text:span text:style-name="T1809">/etc/login.defs</text:span></text:span></text:p>
          </table:table-cell>
          <table:table-cell table:style-name="Table133.A1" office:value-type="string">
            <text:p text:style-name="P1620">Configuration for login utilities (password aging, UID ranges)</text:p>
          </table:table-cell>
          <table:table-cell table:style-name="Table133.A1" office:value-type="string">
            <text:p text:style-name="P1619"><text:span text:style-name="Source_20_Text"><text:span text:style-name="T1809">login, passwd, useradd</text:span></text:span></text:p>
          </table:table-cell>
        </table:table-row>
        <table:table-row table:style-name="Table133.8">
          <table:table-cell table:style-name="Table133.A8" office:value-type="string">
            <text:p text:style-name="P1615"><text:span text:style-name="Source_20_Text"><text:span text:style-name="T1809">/etc/nologin</text:span></text:span></text:p>
          </table:table-cell>
          <table:table-cell table:style-name="Table133.A1" office:value-type="string">
            <text:p text:style-name="P1620">If present, prevents non-root logins (used during shutdowns)</text:p>
          </table:table-cell>
          <table:table-cell table:style-name="Table133.A1" office:value-type="string">
            <text:p text:style-name="P1619"><text:span text:style-name="Source_20_Text"><text:span text:style-name="T1809">login</text:span></text:span></text:p>
          </table:table-cell>
        </table:table-row>
        <table:table-row table:style-name="Table133.8">
          <table:table-cell table:style-name="Table133.A8" office:value-type="string">
            <text:p text:style-name="P1615"><text:span text:style-name="Source_20_Text"><text:span text:style-name="T1809">/etc/pam.d/</text:span></text:span></text:p>
          </table:table-cell>
          <table:table-cell table:style-name="Table133.A1" office:value-type="string">
            <text:p text:style-name="P1620">Directory with PAM (Pluggable Authentication Modules) configs for login, ssh, etc.</text:p>
          </table:table-cell>
          <table:table-cell table:style-name="Table133.A1" office:value-type="string">
            <text:p text:style-name="P1619"><text:span text:style-name="Source_20_Text"><text:span text:style-name="T1809">login, sudo, sshd</text:span></text:span></text:p>
          </table:table-cell>
        </table:table-row>
        <table:table-row table:style-name="Table133.8">
          <table:table-cell table:style-name="Table133.A8" office:value-type="string">
            <text:p text:style-name="P1615"><text:span text:style-name="Source_20_Text"><text:span text:style-name="T1809">/var/run/faillock/</text:span></text:span></text:p>
          </table:table-cell>
          <table:table-cell table:style-name="Table133.A1" office:value-type="string">
            <text:p text:style-name="P1615"><text:span text:style-name="T1742">Tracks temporary lockouts after failed login attempts (used by PAM </text:span><text:span text:style-name="Source_20_Text"><text:span text:style-name="T1809">pam_faillock</text:span></text:span><text:span text:style-name="T1742">)</text:span></text:p>
          </table:table-cell>
          <table:table-cell table:style-name="Table133.A1" office:value-type="string">
            <text:p text:style-name="P1619"><text:span text:style-name="Source_20_Text"><text:span text:style-name="T1809">faillock, login</text:span></text:span></text:p>
          </table:table-cell>
        </table:table-row>
        <table:table-row table:style-name="Table133.8">
          <table:table-cell table:style-name="Table133.A8" office:value-type="string">
            <text:p text:style-name="P1615"><text:span text:style-name="Source_20_Text"><text:span text:style-name="T1809">/etc/security/limits.conf</text:span></text:span></text:p>
          </table:table-cell>
          <table:table-cell table:style-name="Table133.A1" office:value-type="string">
            <text:p text:style-name="P1620">User resource limits (max logins, processes, etc.)</text:p>
          </table:table-cell>
          <table:table-cell table:style-name="Table133.A1" office:value-type="string">
            <text:p text:style-name="P1619"><text:span text:style-name="Source_20_Text"><text:span text:style-name="T1809">PAM modules</text:span></text:span></text:p>
          </table:table-cell>
        </table:table-row>
        <table:table-row table:style-name="Table133.8">
          <table:table-cell table:style-name="Table133.A8" office:value-type="string">
            <text:p text:style-name="P1615"><text:span text:style-name="Source_20_Text"><text:span text:style-name="T1809">/etc/security/access.conf</text:span></text:span></text:p>
          </table:table-cell>
          <table:table-cell table:style-name="Table133.A1" office:value-type="string">
            <text:p text:style-name="P1620">Restrict login access by user or group</text:p>
          </table:table-cell>
          <table:table-cell table:style-name="Table133.A1" office:value-type="string">
            <text:p text:style-name="P1619"><text:span text:style-name="Source_20_Text"><text:span text:style-name="T1809">PAM pam_access</text:span></text:span></text:p>
          </table:table-cell>
        </table:table-row>
      </table:table>
      <text:p text:style-name="P1617"/>
      <text:p text:style-name="P1621"><text:span text:style-name="T90">Tab </text:span><text:span text:style-name="T1784">3</text:span><text:span text:style-name="T361">7</text:span><text:span text:style-name="T90">.</text:span> Files related to login</text:p>
      <text:p text:style-name="P1610"/>
      <text:p text:style-name="P1610"/>
      <text:p text:style-name="P1610"/>
      <text:p text:style-name="P1610"/>
      <text:p text:style-name="P1610"/>
      <text:p text:style-name="P1610"/>
      <text:p text:style-name="P1610"/>
      <text:p text:style-name="P1610"/>
      <text:p text:style-name="P1610"/>
      <text:p text:style-name="P1622"><text:soft-page-break/><text:span text:style-name="T1672">III.12.8 </text:span>PAM <text:span text:style-name="T1813">functions summary</text:span></text:p>
      <text:p text:style-name="Standard"/>
      <text:p text:style-name="Standard">The table below provides an overview of the most commonly used PAM (Pluggable Authentication Modules) functions and their roles within the authentication framework. </text:p>
      <text:p text:style-name="Standard"/>
      <table:table table:name="Table213" table:style-name="Table213">
        <table:table-column table:style-name="Table213.A"/>
        <table:table-column table:style-name="Table213.B"/>
        <table:table-column table:style-name="Table213.C"/>
        <table:table-header-rows>
          <table:table-row>
            <table:table-cell table:style-name="Table213.A1" office:value-type="string">
              <text:p text:style-name="P1623"><text:span text:style-name="Strong_20_Emphasis">Function</text:span></text:p>
            </table:table-cell>
            <table:table-cell table:style-name="Table213.A1" office:value-type="string">
              <text:p text:style-name="P1623"><text:span text:style-name="Strong_20_Emphasis">Description</text:span></text:p>
            </table:table-cell>
            <table:table-cell table:style-name="Table213.A1" office:value-type="string">
              <text:p text:style-name="P1623"><text:span text:style-name="Strong_20_Emphasis">Typical Use</text:span></text:p>
            </table:table-cell>
          </table:table-row>
        </table:table-header-rows>
        <table:table-row>
          <table:table-cell table:style-name="Table213.A1" office:value-type="string">
            <text:p text:style-name="P1615"><text:span text:style-name="Source_20_Text"><text:span text:style-name="T1814">pam_start</text:span></text:span></text:p>
          </table:table-cell>
          <table:table-cell table:style-name="Table213.A1" office:value-type="string">
            <text:p text:style-name="P1624">Initializes a PAM transaction with a specified service, user, and conversation function</text:p>
          </table:table-cell>
          <table:table-cell table:style-name="Table213.A1" office:value-type="string">
            <text:p text:style-name="P1624">Required at the start of PAM usage</text:p>
          </table:table-cell>
        </table:table-row>
        <table:table-row>
          <table:table-cell table:style-name="Table213.A1" office:value-type="string">
            <text:p text:style-name="P1615"><text:span text:style-name="Source_20_Text"><text:span text:style-name="T1814">pam_end</text:span></text:span></text:p>
          </table:table-cell>
          <table:table-cell table:style-name="Table213.A1" office:value-type="string">
            <text:p text:style-name="P1624">Terminates a PAM transaction and releases resources</text:p>
          </table:table-cell>
          <table:table-cell table:style-name="Table213.A1" office:value-type="string">
            <text:p text:style-name="P1624">Called at the end of PAM operations</text:p>
          </table:table-cell>
        </table:table-row>
        <table:table-row>
          <table:table-cell table:style-name="Table213.A1" office:value-type="string">
            <text:p text:style-name="P1615"><text:span text:style-name="Source_20_Text"><text:span text:style-name="T1814">pam_authenticate</text:span></text:span></text:p>
          </table:table-cell>
          <table:table-cell table:style-name="Table213.A1" office:value-type="string">
            <text:p text:style-name="P1625">Authenticates the user (e.g., checks password, biometrics, etc.)</text:p>
          </table:table-cell>
          <table:table-cell table:style-name="Table213.A1" office:value-type="string">
            <text:p text:style-name="P1615"><text:span text:style-name="Source_20_Text"><text:span text:style-name="T1113">login</text:span></text:span><text:span text:style-name="T1742">, </text:span><text:span text:style-name="Source_20_Text"><text:span text:style-name="T1113">sudo</text:span></text:span><text:span text:style-name="T1742">, etc.</text:span></text:p>
          </table:table-cell>
        </table:table-row>
        <table:table-row>
          <table:table-cell table:style-name="Table213.A1" office:value-type="string">
            <text:p text:style-name="P1615"><text:span text:style-name="Source_20_Text"><text:span text:style-name="T1814">pam_acct_mgmt</text:span></text:span></text:p>
          </table:table-cell>
          <table:table-cell table:style-name="Table213.A1" office:value-type="string">
            <text:p text:style-name="P1625">Performs account checks (e.g., expiration, access time restrictions)</text:p>
          </table:table-cell>
          <table:table-cell table:style-name="Table213.A1" office:value-type="string">
            <text:p text:style-name="P1625">Post-authentication account validation</text:p>
          </table:table-cell>
        </table:table-row>
        <table:table-row>
          <table:table-cell table:style-name="Table213.A1" office:value-type="string">
            <text:p text:style-name="P1615"><text:span text:style-name="Source_20_Text"><text:span text:style-name="T1814">pam_setcred</text:span></text:span></text:p>
          </table:table-cell>
          <table:table-cell table:style-name="Table213.A1" office:value-type="string">
            <text:p text:style-name="P1625">Establishes or deletes user credentials (e.g., Kerberos tickets, SELinux contexts)</text:p>
          </table:table-cell>
          <table:table-cell table:style-name="Table213.A1" office:value-type="string">
            <text:p text:style-name="P1615"><text:span text:style-name="T1742">After </text:span><text:span text:style-name="Source_20_Text"><text:span text:style-name="T1113">pam_authenticate</text:span></text:span></text:p>
          </table:table-cell>
        </table:table-row>
        <table:table-row>
          <table:table-cell table:style-name="Table213.A1" office:value-type="string">
            <text:p text:style-name="P1615"><text:span text:style-name="Source_20_Text"><text:span text:style-name="T1814">pam_open_session</text:span></text:span></text:p>
          </table:table-cell>
          <table:table-cell table:style-name="Table213.A1" office:value-type="string">
            <text:p text:style-name="P1625">Starts a session (e.g., mounts home dir, logs login).</text:p>
          </table:table-cell>
          <table:table-cell table:style-name="Table213.A1" office:value-type="string">
            <text:p text:style-name="P1625">When login is successful</text:p>
          </table:table-cell>
        </table:table-row>
        <table:table-row>
          <table:table-cell table:style-name="Table213.A1" office:value-type="string">
            <text:p text:style-name="P1615"><text:span text:style-name="Source_20_Text"><text:span text:style-name="T1814">pam_close_session</text:span></text:span></text:p>
          </table:table-cell>
          <table:table-cell table:style-name="Table213.A1" office:value-type="string">
            <text:p text:style-name="P1625">Ends a session (e.g., unmounts directories, removes session data)</text:p>
          </table:table-cell>
          <table:table-cell table:style-name="Table213.A1" office:value-type="string">
            <text:p text:style-name="P1625">On logout or exit</text:p>
          </table:table-cell>
        </table:table-row>
        <table:table-row>
          <table:table-cell table:style-name="Table213.A1" office:value-type="string">
            <text:p text:style-name="P1615"><text:span text:style-name="Source_20_Text"><text:span text:style-name="T1814">pam_chauthtok</text:span></text:span></text:p>
          </table:table-cell>
          <table:table-cell table:style-name="Table213.A1" office:value-type="string">
            <text:p text:style-name="P1625">Changes the user's authentication token (usually password)</text:p>
          </table:table-cell>
          <table:table-cell table:style-name="Table213.A1" office:value-type="string">
            <text:p text:style-name="P1615"><text:span text:style-name="Source_20_Text"><text:span text:style-name="T1113">passwd</text:span></text:span><text:span text:style-name="T1742">, password change flows</text:span></text:p>
          </table:table-cell>
        </table:table-row>
        <table:table-row>
          <table:table-cell table:style-name="Table213.A1" office:value-type="string">
            <text:p text:style-name="P1615"><text:span text:style-name="Source_20_Text"><text:span text:style-name="T1814">pam_get_item</text:span></text:span></text:p>
          </table:table-cell>
          <table:table-cell table:style-name="Table213.A1" office:value-type="string">
            <text:p text:style-name="P1615"><text:span text:style-name="T1742">Retrieves a PAM item (e.g., </text:span><text:span text:style-name="Source_20_Text"><text:span text:style-name="T1113">PAM_USER</text:span></text:span><text:span text:style-name="T1742">, </text:span><text:span text:style-name="Source_20_Text"><text:span text:style-name="T1113">PAM_TTY</text:span></text:span><text:span text:style-name="T1742">)</text:span></text:p>
          </table:table-cell>
          <table:table-cell table:style-name="Table213.A1" office:value-type="string">
            <text:p text:style-name="P1625">To read data from the PAM context</text:p>
          </table:table-cell>
        </table:table-row>
        <table:table-row>
          <table:table-cell table:style-name="Table213.A1" office:value-type="string">
            <text:p text:style-name="P1615"><text:span text:style-name="Source_20_Text"><text:span text:style-name="T1814">pam_set_item</text:span></text:span></text:p>
          </table:table-cell>
          <table:table-cell table:style-name="Table213.A1" office:value-type="string">
            <text:p text:style-name="P1624"><text:span text:style-name="T1742">Sets a PAM item (e.g., </text:span><text:span text:style-name="Source_20_Text"><text:span text:style-name="T1742">PAM_RHOST</text:span></text:span><text:span text:style-name="T1742">, </text:span><text:span text:style-name="Source_20_Text"><text:span text:style-name="T1742">PAM_AUTHTOK</text:span></text:span><text:span text:style-name="T1742">)</text:span></text:p>
          </table:table-cell>
          <table:table-cell table:style-name="Table213.A1" office:value-type="string">
            <text:p text:style-name="P1625">Before authentication or session</text:p>
          </table:table-cell>
        </table:table-row>
        <table:table-row>
          <table:table-cell table:style-name="Table213.A1" office:value-type="string">
            <text:p text:style-name="P1615"><text:span text:style-name="Source_20_Text"><text:span text:style-name="T1814">pam_get_user</text:span></text:span></text:p>
          </table:table-cell>
          <table:table-cell table:style-name="Table213.A1" office:value-type="string">
            <text:p text:style-name="P1615"><text:span text:style-name="T1742">Convenience wrapper for </text:span><text:span text:style-name="Source_20_Text"><text:span text:style-name="T1113">pam_get_item(PAM_USER,...)</text:span></text:span></text:p>
          </table:table-cell>
          <table:table-cell table:style-name="Table213.A1" office:value-type="string">
            <text:p text:style-name="P1625">Retrieve username</text:p>
          </table:table-cell>
        </table:table-row>
        <table:table-row>
          <table:table-cell table:style-name="Table213.A1" office:value-type="string">
            <text:p text:style-name="P1615"><text:span text:style-name="Source_20_Text"><text:span text:style-name="T1814">pam_get_authtok</text:span></text:span></text:p>
          </table:table-cell>
          <table:table-cell table:style-name="Table213.A1" office:value-type="string">
            <text:p text:style-name="P1625">Retrieves the authentication token (e.g., password), possibly prompting the user</text:p>
          </table:table-cell>
          <table:table-cell table:style-name="Table213.A1" office:value-type="string">
            <text:p text:style-name="P1624"><text:span text:style-name="T1742">Used by </text:span><text:span text:style-name="Strong_20_Emphasis"><text:span text:style-name="T1742">modules</text:span></text:span><text:span text:style-name="T1742">, not applications</text:span></text:p>
          </table:table-cell>
        </table:table-row>
        <table:table-row>
          <table:table-cell table:style-name="Table213.A1" office:value-type="string">
            <text:p text:style-name="P1615"><text:span text:style-name="Source_20_Text"><text:span text:style-name="T1814">pam_putenv</text:span></text:span></text:p>
          </table:table-cell>
          <table:table-cell table:style-name="Table213.A1" office:value-type="string">
            <text:p text:style-name="P1625">Sets an environment variable in the PAM environment</text:p>
          </table:table-cell>
          <table:table-cell table:style-name="Table213.A1" office:value-type="string">
            <text:p text:style-name="P1625">During session setup</text:p>
          </table:table-cell>
        </table:table-row>
        <table:table-row>
          <table:table-cell table:style-name="Table213.A1" office:value-type="string">
            <text:p text:style-name="P1615"><text:span text:style-name="Source_20_Text"><text:span text:style-name="T1814">pam_getenv</text:span></text:span></text:p>
          </table:table-cell>
          <table:table-cell table:style-name="Table213.A1" office:value-type="string">
            <text:p text:style-name="P1625">Retrieves a specific environment variable from the PAM environment</text:p>
          </table:table-cell>
          <table:table-cell table:style-name="Table213.A1" office:value-type="string">
            <text:p text:style-name="P1625">During session</text:p>
          </table:table-cell>
        </table:table-row>
        <table:table-row>
          <table:table-cell table:style-name="Table213.A1" office:value-type="string">
            <text:p text:style-name="P1615"><text:span text:style-name="Source_20_Text"><text:span text:style-name="T1814">pam_getenvlist</text:span></text:span></text:p>
          </table:table-cell>
          <table:table-cell table:style-name="Table213.A1" office:value-type="string">
            <text:p text:style-name="P1625">Retrieves the entire list of environment variables set by PAM</text:p>
          </table:table-cell>
          <table:table-cell table:style-name="Table213.A1" office:value-type="string">
            <text:p text:style-name="P1625">After session init</text:p>
          </table:table-cell>
        </table:table-row>
        <table:table-row>
          <table:table-cell table:style-name="Table213.A1" office:value-type="string">
            <text:p text:style-name="P1615"><text:span text:style-name="Source_20_Text"><text:span text:style-name="T1814">pam_strerror</text:span></text:span></text:p>
          </table:table-cell>
          <table:table-cell table:style-name="Table213.A1" office:value-type="string">
            <text:p text:style-name="P1625">Returns a human-readable string for a PAM error code</text:p>
          </table:table-cell>
          <table:table-cell table:style-name="Table213.A1" office:value-type="string">
            <text:p text:style-name="P1625">For debugging and user messages</text:p>
          </table:table-cell>
        </table:table-row>
        <table:table-row>
          <table:table-cell table:style-name="Table213.A1" office:value-type="string">
            <text:p text:style-name="P1615"><text:span text:style-name="Source_20_Text"><text:span text:style-name="T1814">pam_fail_delay</text:span></text:span></text:p>
          </table:table-cell>
          <table:table-cell table:style-name="Table213.A1" office:value-type="string">
            <text:p text:style-name="P1625">Sets a delay time (in microseconds) before returning from failure</text:p>
          </table:table-cell>
          <table:table-cell table:style-name="Table213.A1" office:value-type="string">
            <text:p text:style-name="P1625">Login hardening</text:p>
          </table:table-cell>
        </table:table-row>
      </table:table>
      <text:p text:style-name="P1626"/>
      <text:p text:style-name="P1627">Tab 3<text:span text:style-name="T586">8</text:span>.<text:span text:style-name="T230"> PAM common functions</text:span></text:p>
      <text:p text:style-name="P1628"/>
      <text:p text:style-name="P1629"/>
      <text:p text:style-name="P1610"/>
      <text:p text:style-name="P1610"/>
      <text:p text:style-name="P1630"><text:soft-page-break/>List of tables</text:p>
      <text:p text:style-name="P1631"/>
      <text:p text:style-name="P1632"><text:span text:style-name="T90">Tab 1.</text:span> Clocks</text:p>
      <text:p text:style-name="P1633"><text:span text:style-name="T90">Tab 2.</text:span> Conversion specifier extensions of <text:s/><text:span text:style-name="T278">strftime<text:tab/></text:span></text:p>
      <text:p text:style-name="P1634"><text:span text:style-name="T1815">Tab </text:span><text:span text:style-name="T1816">3</text:span><text:span text:style-name="T1815">.</text:span><text:span text:style-name="T1817"> Error of </text:span><text:span text:style-name="T273">getdate_r</text:span></text:p>
      <text:p text:style-name="P1635"><text:span text:style-name="T90">Tab </text:span><text:span text:style-name="T361">4</text:span><text:span text:style-name="T90">.</text:span> Common environment variables</text:p>
      <text:p text:style-name="P1636"><text:span text:style-name="T90">Tab </text:span><text:span text:style-name="T361">5</text:span><text:span text:style-name="T90">.</text:span> Locale settings</text:p>
      <text:p text:style-name="P1637"><text:span text:style-name="T90">Tab </text:span><text:span text:style-name="T361">6</text:span><text:span text:style-name="T90">.</text:span> Locale categories</text:p>
      <text:p text:style-name="P1638"><text:span text:style-name="T90">Tab </text:span><text:span text:style-name="T361">7</text:span><text:span text:style-name="T90">.</text:span> Locale functions </text:p>
      <text:p text:style-name="P1634"><text:span text:style-name="T90">Tab </text:span><text:span text:style-name="T361">8</text:span><text:span text:style-name="T1818">.</text:span><text:span text:style-name="T1819"> Values for the parameter </text:span><text:span text:style-name="T1820">item</text:span><text:span text:style-name="T1819"> of </text:span><text:span text:style-name="T1820">nl_langinfo</text:span></text:p>
      <text:p text:style-name="P1639"><text:span text:style-name="T579">Tab </text:span><text:span text:style-name="T503">9</text:span><text:span text:style-name="T579">.</text:span><text:span text:style-name="T580"> Fields of the </text:span><text:span text:style-name="T1821">shadow</text:span><text:span text:style-name="T580"> file</text:span></text:p>
      <text:p text:style-name="P1639"><text:span text:style-name="T90">Tab </text:span><text:span text:style-name="T361">10</text:span><text:span text:style-name="T90">.</text:span><text:span text:style-name="T1822"> Fields of the </text:span><text:span text:style-name="T1823">gshadow</text:span><text:span text:style-name="T1822"> file</text:span></text:p>
      <text:p text:style-name="P1640">Tab 1<text:span text:style-name="T586">1</text:span>. <text:span text:style-name="T230">Files and commands for user and groups</text:span></text:p>
      <text:p text:style-name="P1634"><text:span text:style-name="T815">Tab 1</text:span><text:span text:style-name="T361">2</text:span><text:span text:style-name="T815">.</text:span><text:span text:style-name="T816"> Real, effective and saved GID</text:span></text:p>
      <text:p text:style-name="P1634"><text:span text:style-name="T815">Tab 1</text:span><text:span text:style-name="T361">3</text:span><text:span text:style-name="T815">.</text:span><text:span text:style-name="T816"> </text:span><text:span text:style-name="Source_20_Text"><text:span text:style-name="T812">setgid</text:span></text:span><text:span text:style-name="T835">, </text:span><text:span text:style-name="Source_20_Text"><text:span text:style-name="T812">setegid</text:span></text:span><text:span text:style-name="T835">, </text:span><text:span text:style-name="Source_20_Text"><text:span text:style-name="T812">setregid</text:span></text:span><text:span text:style-name="Source_20_Text"><text:span text:style-name="T836">,</text:span></text:span><text:span text:style-name="Source_20_Text"><text:span text:style-name="T812">setre</text:span></text:span><text:span text:style-name="Source_20_Text"><text:span text:style-name="T837">s</text:span></text:span><text:span text:style-name="Source_20_Text"><text:span text:style-name="T812">gid</text:span></text:span></text:p>
      <text:p text:style-name="P1634"><text:span text:style-name="Source_20_Text"><text:span text:style-name="T1824">Tab 14.</text:span></text:span><text:span text:style-name="Source_20_Text"><text:span text:style-name="T1825"> Get and set user/group ID functions</text:span></text:span></text:p>
      <text:p text:style-name="P1641"><text:span text:style-name="Source_20_Text"><text:span text:style-name="T229">Tab 1</text:span></text:span><text:span text:style-name="Source_20_Text"><text:span text:style-name="T1826">5</text:span></text:span><text:span text:style-name="Source_20_Text"><text:span text:style-name="T229">. </text:span></text:span><text:span text:style-name="Source_20_Text"><text:span text:style-name="T1742">The </text:span></text:span><text:span text:style-name="Source_20_Text"><text:span text:style-name="T1827">hashed passphrase</text:span></text:span><text:span text:style-name="Source_20_Text"><text:span text:style-name="T1742"> fields</text:span></text:span></text:p>
      <text:p text:style-name="P1641"><text:span text:style-name="Source_20_Text"><text:span text:style-name="T229">Tab 1</text:span></text:span><text:span text:style-name="Source_20_Text"><text:span text:style-name="T1826">6</text:span></text:span><text:span text:style-name="Source_20_Text"><text:span text:style-name="T229">. </text:span></text:span><text:span text:style-name="Source_20_Text"><text:span text:style-name="T731">Hashing methods</text:span></text:span><text:span text:style-name="Source_20_Text"><text:span text:style-name="T1828"> </text:span></text:span><text:span text:style-name="Source_20_Text"><text:span text:style-name="T1829">supported by </text:span></text:span><text:span text:style-name="Source_20_Text"><text:span text:style-name="T1041">crypt</text:span></text:span></text:p>
      <text:p text:style-name="P1639"><text:span text:style-name="Source_20_Text"><text:span text:style-name="T1830">Tab 17.</text:span></text:span><text:span text:style-name="T1831"> Values for the </text:span><text:span text:style-name="T75">flags</text:span><text:span text:style-name="T1831"> argument </text:span></text:p>
      <text:p text:style-name="P1642"><text:span text:style-name="T1126">Tab 1</text:span><text:span text:style-name="T1115">8</text:span><text:span text:style-name="T1126">.</text:span><text:span text:style-name="T1832"> </text:span><text:span text:style-name="T1113">utmp</text:span><text:span text:style-name="T1833">, </text:span><text:span text:style-name="T1113">wtmp</text:span><text:span text:style-name="T1833"> and </text:span><text:span text:style-name="T1129">btmp</text:span><text:span text:style-name="T1832"> files</text:span></text:p>
      <text:p text:style-name="P1639"><text:span text:style-name="T1834">Tab 1</text:span><text:span text:style-name="T361">9</text:span><text:span text:style-name="T1834">.</text:span><text:span text:style-name="T1835"> </text:span><text:span text:style-name="Source_20_Text"><text:span text:style-name="T75">ut_type</text:span></text:span><text:span text:style-name="T1835"> values</text:span></text:p>
      <text:p text:style-name="P1643"><text:span text:style-name="T1383">Tab </text:span><text:span text:style-name="T503">20</text:span><text:span text:style-name="T1383">.</text:span><text:span text:style-name="T1836"> Fields of the </text:span><text:span text:style-name="T707">utsname</text:span><text:span text:style-name="T1836"> structure</text:span></text:p>
      <text:p text:style-name="P1644"><text:span text:style-name="T90">Tab 2</text:span><text:span text:style-name="T361">1</text:span><text:span text:style-name="T90">.</text:span> Files related to <text:span text:style-name="T75">uname</text:span></text:p>
      <text:p text:style-name="P1645"><text:span text:style-name="T90">Tab 2</text:span><text:span text:style-name="T361">2</text:span><text:span text:style-name="T90">.</text:span> File and settings related to the hostname</text:p>
      <text:p text:style-name="P1646"><text:span text:style-name="T90">Tab 23.</text:span> PAM authentication tasks</text:p>
      <text:p text:style-name="P1634"><text:span text:style-name="T1837">Tab 2</text:span><text:span text:style-name="T90">4</text:span><text:span text:style-name="T1837">.</text:span><text:span text:style-name="T1838"> Values of the </text:span><text:span text:style-name="T1839">flags</text:span><text:span text:style-name="T1838"> argument</text:span></text:p>
      <text:p text:style-name="P1634"><text:span text:style-name="T1513">Tab 2</text:span><text:span text:style-name="T1514">5</text:span><text:span text:style-name="T1513">.</text:span><text:span text:style-name="T1512"> </text:span><text:span text:style-name="T1510">msg_style</text:span><text:span text:style-name="T1512"> values</text:span></text:p>
      <text:p text:style-name="P1647"><text:span text:style-name="T90">Tab 2</text:span><text:span text:style-name="T361">6</text:span><text:span text:style-name="T90">.</text:span> Functions of <text:span text:style-name="T1598">the</text:span> process <text:span text:style-name="T1598">environment </text:span>and PAM environment</text:p>
      <text:p text:style-name="P1648"><text:span text:style-name="T90">Tab 2</text:span><text:span text:style-name="T361">7</text:span><text:span text:style-name="T90">.</text:span> PAM modules and variables</text:p>
      <text:p text:style-name="P1649"><text:span text:style-name="T90">Tab 2</text:span><text:span text:style-name="T361">8</text:span><text:span text:style-name="T90">.</text:span> PAM items</text:p>
      <text:p text:style-name="P1650"><text:span text:style-name="T90">Tab 2</text:span><text:span text:style-name="T361">9</text:span><text:span text:style-name="T90">.</text:span> PAM services example</text:p>
      <text:p text:style-name="P1651"><text:span text:style-name="T90">Tab </text:span><text:span text:style-name="T361">30</text:span><text:span text:style-name="T90">.</text:span> Auxiliary vector types</text:p>
      <text:p text:style-name="P1634"><text:span text:style-name="T1840">Tab </text:span><text:span text:style-name="T1841">31</text:span><text:span text:style-name="T1840">.</text:span><text:span text:style-name="T1842"> </text:span><text:span text:style-name="T707">intmax_t</text:span><text:span text:style-name="T1842"> and </text:span><text:span text:style-name="T707">uintmax_t</text:span><text:span text:style-name="T1842"> types</text:span></text:p>
      <text:p text:style-name="P1652"><text:span text:style-name="T90">Tab </text:span><text:span text:style-name="T1784">3</text:span><text:span text:style-name="T361">2</text:span><text:span text:style-name="T90">.</text:span> Groups commands</text:p>
      <text:p text:style-name="P1653"><text:span text:style-name="T1789">Tab </text:span><text:span text:style-name="T1784">3</text:span><text:span text:style-name="T361">3</text:span><text:span text:style-name="T1789">.</text:span><text:span text:style-name="T1790"> </text:span><text:span text:style-name="T1787">NSS files</text:span></text:p>
      <text:p text:style-name="P1654">Tab <text:span text:style-name="T1598">3</text:span><text:span text:style-name="T586">4</text:span>. <text:span text:style-name="T230">NSS databases</text:span></text:p>
      <text:p text:style-name="P1655"><text:span text:style-name="T90">Tab </text:span><text:span text:style-name="T1784">3</text:span><text:span text:style-name="T361">5</text:span><text:span text:style-name="T90">.</text:span> Users commands</text:p>
      <text:p text:style-name="P1656"><text:span text:style-name="T90">Tab </text:span><text:span text:style-name="T1784">3</text:span><text:span text:style-name="T361">6</text:span><text:span text:style-name="T90">.</text:span> Login related commands</text:p>
      <text:p text:style-name="P1657"><text:span text:style-name="T90">Tab </text:span><text:span text:style-name="T1784">3</text:span><text:span text:style-name="T361">7</text:span><text:span text:style-name="T90">.</text:span> Files related to login</text:p>
      <text:p text:style-name="P1658">Tab 3<text:span text:style-name="T586">8</text:span>.<text:span text:style-name="T230"> PAM common functions</text:span></text:p>
      <text:p text:style-name="P1659"/>
      <text:p text:style-name="P1659"/>
      <text:p text:style-name="P1630">List of figures</text:p>
      <text:p text:style-name="P1660"><text:span text:style-name="T1843"/></text:p>
      <text:p text:style-name="P1661">Fig <text:span text:style-name="T1844">1</text:span>. <text:span text:style-name="T1845">Process Execution Environment</text:span></text:p>
      <text:p text:style-name="P1662">Fig <text:span text:style-name="T1844">2</text:span>. <text:span text:style-name="T1846">Login process</text:span></text:p>
      <text:p text:style-name="P1662"/>
      <text:p text:style-name="P1662"/>
      <text:p text:style-name="P16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style:font-family-generic="modern" style:font-pitch="fixed"/>
    <style:font-face style:name="Courier" svg:font-family="Courier" style:font-family-generic="modern" style:font-pitch="fixed"/>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9T08:00:26.607321423</meta:creation-date>
    <dc:date>2026-05-24T23:07:55.707552682</dc:date>
    <meta:editing-duration>P9DT9H15M1S</meta:editing-duration>
    <meta:editing-cycles>1391</meta:editing-cycles>
    <meta:generator>LibreOffice/26.2.1.2$Linux_X86_64 LibreOffice_project/620$Build-2</meta:generator>
    <meta:document-statistic meta:table-count="224" meta:image-count="1" meta:object-count="0" meta:page-count="180" meta:paragraph-count="5338" meta:word-count="40892" meta:character-count="276724" meta:non-whitespace-character-count="229878"/>
  </office:meta>
</office:document-meta>
</file>