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bold" officeooo:rsid="25940124" officeooo:paragraph-rsid="0013aec8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">
      <style:text-properties officeooo:paragraph-rsid="0013aec8"/>
    </style:style>
    <style:style style:name="P5" style:family="paragraph" style:parent-style-name="Text_20_body">
      <style:paragraph-properties fo:text-align="center" style:justify-single-word="false"/>
      <style:text-properties officeooo:paragraph-rsid="001858fe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fo:font-weight="bold" officeooo:rsid="001864e6" officeooo:paragraph-rsid="001864e6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left" style:justify-single-word="false"/>
      <style:text-properties fo:font-size="13pt" fo:font-style="normal" fo:font-weight="bold" officeooo:rsid="001864e6" officeooo:paragraph-rsid="001864e6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fo:font-size="11pt" fo:font-style="normal" fo:font-weight="normal" officeooo:rsid="0042ce28" officeooo:paragraph-rsid="0042ce28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left" style:justify-single-word="false"/>
      <style:text-properties fo:font-size="12pt" officeooo:paragraph-rsid="003798ab" style:font-size-asian="12pt" style:font-size-complex="12pt"/>
    </style:style>
    <style:style style:name="P10" style:family="paragraph" style:parent-style-name="Standard">
      <style:paragraph-properties fo:text-align="left" style:justify-single-word="false"/>
      <style:text-properties fo:font-size="11pt" officeooo:paragraph-rsid="003798ab" style:font-size-asian="11pt" style:font-size-complex="11pt"/>
    </style:style>
    <style:style style:name="P11" style:family="paragraph" style:parent-style-name="Standard">
      <style:paragraph-properties fo:text-align="left" style:justify-single-word="false"/>
      <style:text-properties fo:font-size="12pt" fo:font-style="normal" fo:font-weight="normal" officeooo:rsid="001bb40f" officeooo:paragraph-rsid="003798a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left" style:justify-single-word="false"/>
      <style:text-properties officeooo:paragraph-rsid="00427b9a"/>
    </style:style>
    <style:style style:name="P13" style:family="paragraph" style:parent-style-name="Standard">
      <style:paragraph-properties fo:text-align="left" style:justify-single-word="false"/>
      <style:text-properties fo:font-size="12pt" fo:font-style="italic" fo:font-weight="normal" officeooo:rsid="04e6de64" officeooo:paragraph-rsid="003798ab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left" style:justify-single-word="false"/>
      <style:text-properties officeooo:paragraph-rsid="003798ab"/>
    </style:style>
    <style:style style:name="P15" style:family="paragraph" style:parent-style-name="Standard">
      <style:paragraph-properties fo:text-align="left" style:justify-single-word="false"/>
      <style:text-properties fo:color="#000000" loext:opacity="100%" officeooo:rsid="07ca9b6f" officeooo:paragraph-rsid="003798ab"/>
    </style:style>
    <style:style style:name="P16" style:family="paragraph" style:parent-style-name="Standard">
      <style:paragraph-properties fo:text-align="left" style:justify-single-word="false"/>
      <style:text-properties officeooo:paragraph-rsid="001858fe"/>
    </style:style>
    <style:style style:name="P17" style:family="paragraph" style:parent-style-name="Standard">
      <style:paragraph-properties fo:text-align="left" style:justify-single-word="false"/>
      <style:text-properties fo:font-size="12pt" fo:font-style="normal" fo:font-weight="normal" officeooo:rsid="06a83a61" officeooo:paragraph-rsid="001864e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left" style:justify-single-word="false"/>
      <style:text-properties fo:font-size="11pt" fo:font-style="normal" fo:font-weight="normal" officeooo:rsid="002e2447" officeooo:paragraph-rsid="003798ab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left" style:justify-single-word="false"/>
      <style:text-properties fo:font-size="11pt" fo:font-style="normal" fo:font-weight="normal" officeooo:rsid="0040da04" officeooo:paragraph-rsid="0040da0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left" style:justify-single-word="false"/>
      <style:text-properties fo:font-size="12pt" fo:font-style="normal" fo:font-weight="normal" officeooo:rsid="00300a2e" officeooo:paragraph-rsid="003798a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left" style:justify-single-word="false"/>
      <style:text-properties fo:color="#000000" loext:opacity="100%" fo:font-size="12pt" officeooo:rsid="001bb40f" officeooo:paragraph-rsid="003798ab" style:font-size-asian="12pt" style:font-size-complex="12pt"/>
    </style:style>
    <style:style style:name="P22" style:family="paragraph" style:parent-style-name="Standard">
      <style:text-properties officeooo:paragraph-rsid="001858fe"/>
    </style:style>
    <style:style style:name="P23" style:family="paragraph" style:parent-style-name="Standard">
      <style:paragraph-properties fo:text-align="left" style:justify-single-word="false"/>
      <style:text-properties fo:font-size="12pt" fo:font-style="normal" fo:font-weight="normal" officeooo:rsid="0038ea64" officeooo:paragraph-rsid="0038ea6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eb191" officeooo:paragraph-rsid="003eb19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1e3f4e" officeooo:paragraph-rsid="003798ab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left" style:justify-single-word="false"/>
      <style:text-properties fo:font-size="11pt" fo:font-style="normal" fo:font-weight="normal" officeooo:rsid="00300a2e" officeooo:paragraph-rsid="003798ab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left" style:justify-single-word="false"/>
      <style:text-properties style:use-window-font-color="true" loext:opacity="0%" fo:font-size="12pt" fo:language="zxx" fo:country="none" fo:font-style="italic" style:text-underline-style="solid" style:text-underline-width="auto" style:text-underline-color="font-color" fo:font-weight="normal" officeooo:rsid="04e6de64" officeooo:paragraph-rsid="001864e6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8" style:family="paragraph" style:parent-style-name="Standard">
      <style:text-properties officeooo:paragraph-rsid="001864e6"/>
    </style:style>
    <style:style style:name="P29" style:family="paragraph" style:parent-style-name="Standard">
      <style:paragraph-properties fo:text-align="left" style:justify-single-word="false"/>
      <style:text-properties fo:font-size="12pt" fo:font-style="normal" fo:font-weight="bold" officeooo:rsid="005b6578" officeooo:paragraph-rsid="001858fe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left" style:justify-single-word="false"/>
      <style:text-properties fo:font-size="11pt" fo:font-style="normal" fo:font-weight="bold" officeooo:rsid="005b6578" officeooo:paragraph-rsid="003798ab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text-align="left" style:justify-single-word="false"/>
      <style:text-properties fo:font-size="12pt" fo:font-style="normal" fo:font-weight="normal" officeooo:rsid="0032b4f6" officeooo:paragraph-rsid="001858f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size="12pt" fo:font-style="normal" fo:font-weight="normal" officeooo:rsid="00362759" officeooo:paragraph-rsid="0036275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size="12pt" fo:font-style="normal" fo:font-weight="bold" officeooo:rsid="016c5eaa" officeooo:paragraph-rsid="001858fe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left" style:justify-single-word="false"/>
      <style:text-properties fo:font-size="12pt" fo:font-style="normal" fo:font-weight="bold" officeooo:rsid="008738a1" officeooo:paragraph-rsid="001858fe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left" style:justify-single-word="false"/>
      <style:text-properties fo:font-size="12pt" fo:font-style="normal" fo:font-weight="normal" officeooo:rsid="0064ed33" officeooo:paragraph-rsid="003798ab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left" style:justify-single-word="false"/>
      <style:text-properties fo:font-size="12pt" fo:font-style="normal" fo:font-weight="normal" officeooo:rsid="008738a1" officeooo:paragraph-rsid="001858f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left" style:justify-single-word="false"/>
      <style:text-properties fo:font-size="11pt" fo:font-style="normal" fo:font-weight="bold" officeooo:rsid="005e86f0" officeooo:paragraph-rsid="003798ab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text-align="left" style:justify-single-word="false"/>
      <style:text-properties fo:font-size="12pt" fo:font-style="normal" fo:font-weight="normal" officeooo:rsid="00667026" officeooo:paragraph-rsid="003798a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2a9a814b"/>
    </style:style>
    <style:style style:name="T2" style:family="text">
      <style:text-properties officeooo:rsid="001699e7"/>
    </style:style>
    <style:style style:name="T3" style:family="text">
      <style:text-properties officeooo:rsid="0024b26e"/>
    </style:style>
    <style:style style:name="T4" style:family="text">
      <style:text-properties officeooo:rsid="00269e32"/>
    </style:style>
    <style:style style:name="T5" style:family="text">
      <style:text-properties officeooo:rsid="0026d97f"/>
    </style:style>
    <style:style style:name="T6" style:family="text">
      <style:text-properties officeooo:rsid="00079c1f"/>
    </style:style>
    <style:style style:name="T7" style:family="text">
      <style:text-properties officeooo:rsid="0027af39"/>
    </style:style>
    <style:style style:name="T8" style:family="text">
      <style:text-properties officeooo:rsid="003cd185"/>
    </style:style>
    <style:style style:name="T9" style:family="text">
      <style:text-properties officeooo:rsid="002a474c"/>
    </style:style>
    <style:style style:name="T10" style:family="text">
      <style:text-properties officeooo:rsid="052d2003"/>
    </style:style>
    <style:style style:name="T11" style:family="text">
      <style:text-properties officeooo:rsid="002277f8"/>
    </style:style>
    <style:style style:name="T12" style:family="text">
      <style:text-properties officeooo:rsid="052a33d6"/>
    </style:style>
    <style:style style:name="T13" style:family="text">
      <style:text-properties officeooo:rsid="00240c35"/>
    </style:style>
    <style:style style:name="T14" style:family="text">
      <style:text-properties officeooo:rsid="002b02f8"/>
    </style:style>
    <style:style style:name="T15" style:family="text">
      <style:text-properties officeooo:rsid="0029d5a1"/>
    </style:style>
    <style:style style:name="T16" style:family="text">
      <style:text-properties officeooo:rsid="00b7f752"/>
    </style:style>
    <style:style style:name="T17" style:family="text">
      <style:text-properties officeooo:rsid="00baa2c3"/>
    </style:style>
    <style:style style:name="T18" style:family="text">
      <style:text-properties officeooo:rsid="00b8dd9d"/>
    </style:style>
    <style:style style:name="T19" style:family="text">
      <style:text-properties officeooo:rsid="04d6b779"/>
    </style:style>
    <style:style style:name="T20" style:family="text">
      <style:text-properties fo:font-size="11pt" fo:font-style="normal" style:font-size-asian="11pt" style:font-style-asian="normal" style:font-size-complex="11pt" style:font-style-complex="normal"/>
    </style:style>
    <style:style style:name="T21" style:family="text">
      <style:text-properties fo:font-size="14pt" fo:font-weight="bold" officeooo:rsid="00447325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858fe" style:font-size-asian="14pt" style:font-weight-asian="bold" style:font-size-complex="14pt" style:font-weight-complex="bold"/>
    </style:style>
    <style:style style:name="T23" style:family="text">
      <style:text-properties officeooo:rsid="001bb40f"/>
    </style:style>
    <style:style style:name="T24" style:family="text">
      <style:text-properties fo:color="#000000" loext:opacity="100%" fo:font-size="11pt" fo:font-style="normal" fo:font-weight="normal" officeooo:rsid="04e6de64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000000" loext:opacity="100%" fo:font-size="11pt" fo:font-style="normal" fo:font-weight="normal" officeooo:rsid="06a771fb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color="#000080" loext:opacity="100%" fo:font-size="11pt" fo:language="zxx" fo:country="none" fo:font-style="normal" style:text-underline-style="solid" style:text-underline-width="auto" style:text-underline-color="font-color" fo:font-weight="normal" officeooo:rsid="07ca9b6f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7" style:family="text">
      <style:text-properties fo:color="#000000" loext:opacity="100%" fo:font-style="normal" fo:font-weight="normal" officeooo:rsid="06a771fb" style:font-style-asian="normal" style:font-weight-asian="normal" style:font-style-complex="normal" style:font-weight-complex="normal"/>
    </style:style>
    <style:style style:name="T28" style:family="text">
      <style:text-properties fo:color="#000000" loext:opacity="100%" fo:font-style="italic" fo:font-weight="normal" officeooo:rsid="06a771fb" style:font-style-asian="italic" style:font-weight-asian="normal" style:font-style-complex="italic" style:font-weight-complex="normal"/>
    </style:style>
    <style:style style:name="T29" style:family="text">
      <style:text-properties fo:color="#000080" loext:opacity="100%" fo:language="zxx" fo:country="none" fo:font-style="normal" style:text-underline-style="solid" style:text-underline-width="auto" style:text-underline-color="font-color" fo:font-weight="normal" officeooo:rsid="07ca9b6f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Times New Roman" fo:font-size="11pt" fo:letter-spacing="normal" style:font-size-asian="11pt" style:font-size-complex="11pt"/>
    </style:style>
    <style:style style:name="T31" style:family="text">
      <style:text-properties fo:font-variant="normal" fo:text-transform="none" fo:color="#000080" loext:opacity="100%" style:font-name="Times New Roman" fo:font-size="11pt" fo:letter-spacing="normal" style:font-size-asian="11pt" style:font-size-complex="11pt"/>
    </style:style>
    <style:style style:name="T32" style:family="text">
      <style:text-properties fo:font-variant="normal" fo:text-transform="none" fo:color="#000080" loext:opacity="100%" style:font-name="Times New Roman" fo:font-size="11pt" fo:letter-spacing="normal" officeooo:rsid="00427b9a" style:font-size-asian="11pt" style:font-size-complex="11pt"/>
    </style:style>
    <style:style style:name="T33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1bb40f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000080" loext:opacity="100%" style:font-name="Times New Roman" fo:font-size="11pt" fo:letter-spacing="normal" fo:font-style="normal" fo:font-weight="normal" officeooo:rsid="00427b9a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size="11pt" fo:font-style="normal" officeooo:rsid="07a9cc64" style:font-size-asian="11pt" style:font-style-asian="normal" style:font-size-complex="11pt" style:font-style-complex="normal"/>
    </style:style>
    <style:style style:name="T36" style:family="text">
      <style:text-properties fo:color="#000080" loext:opacity="100%" fo:font-size="11pt" fo:language="zxx" fo:country="none" fo:font-style="normal" style:text-underline-style="solid" style:text-underline-width="auto" style:text-underline-color="font-color" officeooo:rsid="07ca9b6f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7" style:family="text">
      <style:text-properties fo:color="#000000" loext:opacity="100%" fo:font-size="11pt" officeooo:rsid="04e6de64" style:font-size-asian="11pt" style:font-size-complex="11pt"/>
    </style:style>
    <style:style style:name="T38" style:family="text">
      <style:text-properties fo:color="#000000" loext:opacity="100%" fo:font-size="11pt" fo:font-style="italic" officeooo:rsid="04e6de64" style:font-size-asian="11pt" style:font-style-asian="italic" style:font-size-complex="11pt" style:font-style-complex="italic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color="#111111" loext:opacity="100%" fo:font-style="normal" fo:font-weight="normal" officeooo:rsid="069bf9d9" style:font-style-asian="normal" style:font-weight-asian="normal" style:font-style-complex="normal" style:font-weight-complex="normal"/>
    </style:style>
    <style:style style:name="T41" style:family="text">
      <style:text-properties fo:color="#111111" loext:opacity="100%" fo:font-style="italic" fo:font-weight="normal" officeooo:rsid="069bf9d9" style:font-style-asian="italic" style:font-weight-asian="normal" style:font-style-complex="italic" style:font-weight-complex="normal"/>
    </style:style>
    <style:style style:name="T42" style:family="text">
      <style:text-properties style:use-window-font-color="true" loext:opacity="0%" fo:font-size="11pt" fo:language="zxx" fo:country="none" fo:font-style="normal" style:text-underline-style="none" officeooo:rsid="052c39f3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43" style:family="text">
      <style:text-properties fo:font-size="11pt" fo:font-style="normal" officeooo:rsid="04e6de64" style:font-size-asian="11pt" style:font-style-asian="normal" style:font-size-complex="11pt" style:font-style-complex="normal"/>
    </style:style>
    <style:style style:name="T44" style:family="text">
      <style:text-properties style:use-window-font-color="true" loext:opacity="0%" fo:font-size="11pt" fo:font-style="normal" officeooo:rsid="04e6de64" style:font-size-asian="11pt" style:font-style-asian="normal" style:font-size-complex="11pt" style:font-style-complex="normal"/>
    </style:style>
    <style:style style:name="T45" style:family="text">
      <style:text-properties style:use-window-font-color="true" loext:opacity="0%" fo:font-size="11pt" officeooo:rsid="04e6de64" style:font-size-asian="11pt" style:font-size-complex="11pt"/>
    </style:style>
    <style:style style:name="T46" style:family="text">
      <style:text-properties fo:font-variant="normal" fo:text-transform="none" style:font-name="Times New Roman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color="#000000" loext:opacity="100%" fo:font-size="11pt" style:font-size-asian="11pt" style:font-size-complex="11pt"/>
    </style:style>
    <style:style style:name="T48" style:family="text">
      <style:text-properties fo:color="#000000" loext:opacity="100%" fo:font-size="11pt" officeooo:rsid="06a42392" style:font-size-asian="11pt" style:font-size-complex="11pt"/>
    </style:style>
    <style:style style:name="T49" style:family="text">
      <style:text-properties fo:color="#000000" loext:opacity="100%" fo:font-size="11pt" officeooo:rsid="06a60fac" style:font-size-asian="11pt" style:font-size-complex="11pt"/>
    </style:style>
    <style:style style:name="T50" style:family="text">
      <style:text-properties fo:color="#000000" loext:opacity="100%" fo:font-size="11pt" fo:font-style="italic" officeooo:rsid="06a42392" style:font-size-asian="11pt" style:font-style-asian="italic" style:font-size-complex="11pt" style:font-style-complex="italic"/>
    </style:style>
    <style:style style:name="T51" style:family="text">
      <style:text-properties fo:font-size="11pt" fo:font-style="normal" fo:font-weight="normal" officeooo:rsid="07ca9b6f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use-window-font-color="true" loext:opacity="0%" fo:font-size="11pt" officeooo:rsid="001d40bf" style:font-size-asian="11pt" style:font-size-complex="11pt"/>
    </style:style>
    <style:style style:name="T53" style:family="text">
      <style:text-properties fo:color="#000080" loext:opacity="100%" fo:font-size="11pt" officeooo:rsid="001d40bf" style:font-size-asian="11pt" style:font-size-complex="11pt"/>
    </style:style>
    <style:style style:name="T54" style:family="text">
      <style:text-properties style:use-window-font-color="true" loext:opacity="0%" fo:font-size="11pt" fo:font-style="normal" fo:font-weight="normal" officeooo:rsid="04e6de64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use-window-font-color="true" loext:opacity="0%" fo:font-size="11pt" fo:font-style="normal" fo:font-weight="normal" officeooo:rsid="05304cb8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use-window-font-color="true" loext:opacity="0%" fo:font-size="11pt" fo:font-style="normal" fo:font-weight="bold" officeooo:rsid="05304cb8" style:font-size-asian="11pt" style:font-style-asian="normal" style:font-weight-asian="bold" style:font-size-complex="11pt" style:font-style-complex="normal" style:font-weight-complex="bold"/>
    </style:style>
    <style:style style:name="T57" style:family="text">
      <style:text-properties fo:color="#000080" loext:opacity="100%" fo:font-size="11pt" fo:language="zxx" fo:country="none" style:text-underline-style="solid" style:text-underline-width="auto" style:text-underline-color="font-color" officeooo:rsid="07ca9b6f" style:font-size-asian="11pt" style:language-asian="zxx" style:country-asian="none" style:font-size-complex="11pt" style:language-complex="zxx" style:country-complex="none"/>
    </style:style>
    <style:style style:name="T58" style:family="text">
      <style:text-properties fo:font-size="11pt" officeooo:rsid="0528bba3" style:font-size-asian="11pt" style:font-size-complex="11pt"/>
    </style:style>
    <style:style style:name="T59" style:family="text">
      <style:text-properties fo:font-variant="normal" fo:text-transform="none" style:font-name="Times New Roman" fo:font-size="11pt" fo:letter-spacing="normal" fo:font-style="normal" fo:font-weight="normal" officeooo:rsid="003798ab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weight="normal" style:font-size-asian="11pt" style:font-weight-asian="normal" style:font-size-complex="11pt" style:font-weight-complex="normal"/>
    </style:style>
    <style:style style:name="T61" style:family="text">
      <style:text-properties fo:font-size="11pt" fo:font-weight="normal" officeooo:rsid="052aeabf" style:font-size-asian="11pt" style:font-weight-asian="normal" style:font-size-complex="11pt" style:font-weight-complex="normal"/>
    </style:style>
    <style:style style:name="T62" style:family="text">
      <style:text-properties style:use-window-font-color="true" loext:opacity="0%" fo:font-size="11pt" fo:font-weight="normal" officeooo:rsid="06a2ae7a" style:font-size-asian="11pt" style:font-weight-asian="normal" style:font-size-complex="11pt" style:font-weight-complex="normal"/>
    </style:style>
    <style:style style:name="T63" style:family="text">
      <style:text-properties fo:font-size="11pt" officeooo:rsid="00300a2e" style:font-size-asian="11pt" style:font-size-complex="11pt"/>
    </style:style>
    <style:style style:name="T64" style:family="text">
      <style:text-properties fo:font-size="11pt" officeooo:rsid="003b533f" style:font-size-asian="11pt" style:font-size-complex="11pt"/>
    </style:style>
    <style:style style:name="T65" style:family="text">
      <style:text-properties fo:font-size="11pt" officeooo:rsid="051369a7" style:font-size-asian="11pt" style:font-size-complex="11pt"/>
    </style:style>
    <style:style style:name="T66" style:family="text">
      <style:text-properties style:use-window-font-color="true" loext:opacity="0%" fo:font-size="11pt" fo:font-style="normal" fo:font-weight="normal" officeooo:rsid="052f2d5a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use-window-font-color="true" loext:opacity="0%" fo:font-size="11pt" fo:font-style="normal" fo:font-weight="bold" officeooo:rsid="052f2d5a" style:font-size-asian="11pt" style:font-style-asian="normal" style:font-weight-asian="bold" style:font-size-complex="11pt" style:font-style-complex="normal" style:font-weight-complex="bold"/>
    </style:style>
    <style:style style:name="T68" style:family="text">
      <style:text-properties fo:font-size="11pt" officeooo:rsid="052aeabf" style:font-size-asian="11pt" style:font-size-complex="11pt"/>
    </style:style>
    <style:style style:name="T69" style:family="text">
      <style:text-properties style:use-window-font-color="true" loext:opacity="0%" fo:font-size="11pt" fo:font-style="normal" fo:font-weight="normal" officeooo:rsid="052f2fb4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use-window-font-color="true" loext:opacity="0%" fo:font-size="11pt" fo:font-style="normal" fo:font-weight="bold" officeooo:rsid="052f2fb4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71f942e" style:font-weight-asian="normal" style:font-weight-complex="normal"/>
    </style:style>
    <style:style style:name="T73" style:family="text">
      <style:text-properties fo:font-size="11pt" fo:font-style="normal" fo:font-weight="normal" officeooo:rsid="0032b4f6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fo:font-weight="normal" officeooo:rsid="052aeabf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weight="normal" officeooo:rsid="0531dd55" style:font-size-asian="11pt" style:font-weight-asian="normal" style:font-size-complex="11pt" style:font-weight-complex="normal"/>
    </style:style>
    <style:style style:name="T76" style:family="text">
      <style:text-properties fo:font-size="11pt" fo:font-weight="normal" officeooo:rsid="053259e4" style:font-size-asian="11pt" style:font-weight-asian="normal" style:font-size-complex="11pt" style:font-weight-complex="normal"/>
    </style:style>
    <style:style style:name="T77" style:family="text">
      <style:text-properties fo:font-weight="normal" officeooo:rsid="001858fe" style:font-weight-asian="normal" style:font-weight-complex="normal"/>
    </style:style>
    <style:style style:name="T78" style:family="text">
      <style:text-properties fo:font-weight="normal" officeooo:rsid="052aeabf" style:font-weight-asian="normal" style:font-weight-complex="normal"/>
    </style:style>
    <style:style style:name="T79" style:family="text">
      <style:text-properties fo:font-size="11pt" fo:font-style="normal" fo:font-weight="normal" officeooo:rsid="001858fe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fo:font-weight="normal" officeooo:rsid="310ab0c1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fo:color="#000080" loext:opacity="100%" fo:font-size="11pt" fo:font-style="normal" style:text-underline-style="solid" style:text-underline-width="auto" style:text-underline-color="font-color" fo:font-weight="normal" officeooo:rsid="00667026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tyle="normal" officeooo:rsid="310ab0c1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Bibliography"/>Bibliog<text:span text:style-name="T1">raphy</text:span><text:bookmark-end text:name="Bibliography"/></text:p>
      <text:p text:style-name="Standard"/>
      <text:p text:style-name="P2">Alejandro Colomar, Michael Kerrisk, Andries Brouwer, “<text:span text:style-name="T2">GNU/Linux Programmer’s Manual”, </text:span><text:span text:style-name="T3">2020</text:span></text:p>
      <text:p text:style-name="P2"/>
      <text:p text:style-name="P2">Bill O. Gallmeister, “POSIX.4: Programming for the Real World”, O’Reilly, <text:span text:style-name="T4">1995</text:span></text:p>
      <text:p text:style-name="P2"/>
      <text:p text:style-name="P2">Brian W. Kernighan &amp; Dennies M. Ritchie, “The C Programming Language”, 2ed, Prentice Hall, <text:span text:style-name="T5">1988</text:span></text:p>
      <text:p text:style-name="P2"/>
      <text:p text:style-name="P2">Dennis Andriesse, “Practical Binary Analysis”, No Starch Press, 2019</text:p>
      <text:p text:style-name="P2"/>
      <text:p text:style-name="P2">Donald A. Lewine, “<text:span text:style-name="T6">POSIX Programmer’s Guide – Writing Portable UNIX Programs with the POSIX.1 Standard”, O’Reilly, </text:span><text:span text:style-name="T7">1994</text:span></text:p>
      <text:p text:style-name="P2"/>
      <text:p text:style-name="P2"><text:span text:style-name="T8">Intel, </text:span>The Intel 64 and IA-32 Architectures Software Developer's Manual, <text:span text:style-name="T8">Intel 2024</text:span></text:p>
      <text:p text:style-name="P2"/>
      <text:p text:style-name="P2">Jack-Bennny Persson, “Linux System Programming Techniques”, Packt Publishing, <text:span text:style-name="T9">2021</text:span> </text:p>
      <text:p text:style-name="P2"/>
      <text:p text:style-name="P2">Kurt Wall, Mark Watson, Mark Whitis, “<text:span text:style-name="T10">Linux Programming Unleashed</text:span>”, <text:span text:style-name="T10">Sams, </text:span><text:span text:style-name="T11">1999</text:span></text:p>
      <text:p text:style-name="P2"/>
      <text:p text:style-name="P2"><text:span text:style-name="T12">Michael Kerrisk, “</text:span>The Linux Programming Interface”, <text:span text:style-name="T12">No Starch Press, </text:span><text:span text:style-name="T13">2010</text:span></text:p>
      <text:p text:style-name="P2"/>
      <text:p text:style-name="P2">Paul Deitel &amp; Harvey Deitel, “C How to program”, <text:span text:style-name="T14">9ed, </text:span>Pearson, <text:span text:style-name="T14">2022</text:span></text:p>
      <text:p text:style-name="P2"/>
      <text:p text:style-name="P2">Robert Love, “Linux System Programming”, O’Reilly, <text:span text:style-name="T15">2013</text:span></text:p>
      <text:p text:style-name="P2"/>
      <text:p text:style-name="P2">Sandra Loosemore, Richard M. Stallman, Roland McGrath, Andrew Oram, Ulrich Drepper <text:span text:style-name="T16">“</text:span>The GNU C Library <text:span text:style-name="T16">Reference Manual” </text:span><text:span text:style-name="T17">for </text:span><text:span text:style-name="T18">version 2.34</text:span><text:span text:style-name="T16">, Free Software Foundation</text:span></text:p>
      <text:p text:style-name="P2"/>
      <text:p text:style-name="P2"><text:span text:style-name="T19">W. </text:span>Richard <text:span text:style-name="T19">Stevens &amp; Stephen A. Rago, “Advanced Programming in the UNIX Environment”, 3ed, Addison-Wesely, </text:span><text:span text:style-name="T11">2013</text:span></text:p>
      <text:p text:style-name="P2"/>
      <text:p text:style-name="Standard"><text:span text:style-name="T20">International Organization for Standardization. (2011). </text:span><text:span text:style-name="Emphasis"><text:span text:style-name="T20">ISO/IEC 9899:2011: Information technology - Programming languages - C</text:span></text:span></text:p>
      <text:p text:style-name="P3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21">O</text:span><text:span text:style-name="T22">nline resources</text:span></text:p>
      <text:p text:style-name="P6"/>
      <text:p text:style-name="P6">GNU/<text:span text:style-name="T23">Linux</text:span></text:p>
      <text:p text:style-name="P7"/>
      <text:p text:style-name="P8">Atomic operations library<text:tab/><text:tab/> <text:s text:c="2"/><text:a xlink:type="simple" xlink:href="https://en.cppreference.com/w/c/atomic.html" text:style-name="Internet_20_link" text:visited-style-name="Visited_20_Internet_20_Link">https://en.cppreference.com/w/c/atomic.html</text:a> </text:p>
      <text:p text:style-name="P9"><text:span text:style-name="T24">A</text:span><text:span text:style-name="T25">utoconf <text:s text:c="16"/><text:tab/><text:tab/><text:tab/> <text:s text:c="2"/></text:span><text:a xlink:type="simple" xlink:href="https://www.gnu.org/software/autoconf/" text:style-name="Internet_20_link" text:visited-style-name="Visited_20_Internet_20_Link"><text:span text:style-name="T26">https://www.gnu.org/software/autoconf/</text:span></text:a></text:p>
      <text:p text:style-name="P10"><text:span text:style-name="T27">Automake</text:span><text:span text:style-name="T28"> <text:s/><text:tab/><text:tab/><text:tab/><text:tab/> <text:s text:c="2"/></text:span><text:span text:style-name="T29">https://www.gnu.org/software/automake/</text:span></text:p>
      <text:p text:style-name="P11"><text:span text:style-name="T30">Bash reference manual <text:s text:c="11"/><text:tab/><text:tab/> <text:s text:c="2"/></text:span><text:a xlink:type="simple" xlink:href="https://www.gnu.org/software/bash/manual/bash.html" text:style-name="Internet_20_link" text:visited-style-name="Visited_20_Internet_20_Link"><text:span text:style-name="T31">https://www.gnu.org/software/bash/manual/bash.html</text:span></text:a><text:span text:style-name="T32">\</text:span></text:p>
      <text:p text:style-name="P12"><text:span text:style-name="T33">Berkeley Packet Filter</text:span><text:span text:style-name="T34"><text:tab/><text:tab/><text:tab/> <text:s text:c="2"/></text:span><text:a xlink:type="simple" xlink:href="https://www.kernel.org/doc/html/latest/bpf/index.html" text:style-name="Internet_20_link" text:visited-style-name="Visited_20_Internet_20_Link"><text:span text:style-name="T34">https://www.kernel.org/doc/html/latest/bpf/index.html</text:span></text:a><text:span text:style-name="T34"> </text:span></text:p>
      <text:p text:style-name="P13"><text:span text:style-name="T35">Binutils<text:tab/><text:tab/><text:tab/><text:tab/><text:tab/> <text:s text:c="2"/></text:span><text:a xlink:type="simple" xlink:href="https://www.gnu.org/software/binutils/" text:style-name="Internet_20_link" text:visited-style-name="Visited_20_Internet_20_Link"><text:span text:style-name="T36">https://www.gnu.org/software/binutils/</text:span></text:a></text:p>
      <text:p text:style-name="P9"><text:span text:style-name="T37">GCC online documentation</text:span><text:span text:style-name="T38"> <text:s/><text:tab/> <text:tab/> <text:s text:c="2"/></text:span><text:a xlink:type="simple" xlink:href="https://gcc.gnu.org/onlinedocs/" text:style-name="Internet_20_link" text:visited-style-name="Visited_20_Internet_20_Link"><text:span text:style-name="T39">https://gcc.gnu.org/onlinedocs/</text:span></text:a></text:p>
      <text:p text:style-name="P10"><text:span text:style-name="T40">GDB: The GNU Debugger</text:span><text:span text:style-name="T41"> <text:s text:c="17"/><text:tab/> <text:s text:c="2"/></text:span><text:span text:style-name="T29">https://www.sourceware.org/gdb/documentation/</text:span></text:p>
      <text:p text:style-name="P14"><text:span text:style-name="T24"><text:tab/><text:tab/><text:tab/><text:tab/><text:tab/> <text:s text:c="2"/></text:span><text:a xlink:type="simple" xlink:href="https://sourceware.org/gdb/current/onlinedocs/gdb.pdf" text:style-name="Internet_20_link" text:visited-style-name="Visited_20_Internet_20_Link"><text:span text:style-name="T39">https://sourceware.org/gdb/current/onlinedocs/gdb.pdf</text:span></text:a><text:span text:style-name="T24"> </text:span></text:p>
      <text:p text:style-name="P14"><text:span text:style-name="T42">GLIBC</text:span><text:span text:style-name="T43"><text:tab/></text:span><text:span text:style-name="T44"><text:tab/><text:tab/><text:tab/> <text:s text:c="2"/><text:tab/> <text:s text:c="2"/></text:span><text:a xlink:type="simple" xlink:href="https://www.gnu.org/software/libc/" text:style-name="Internet_20_link" text:visited-style-name="Visited_20_Internet_20_Link"><text:span text:style-name="T39">https://www.gnu.org/software/libc/</text:span></text:a><text:span text:style-name="T45"> </text:span></text:p>
      <text:p text:style-name="P15"><text:span text:style-name="T46">The GNU C Library (glibc) manual<text:tab/> <text:s text:c="2"/></text:span><text:a xlink:type="simple" xlink:href="https://sourceware.org/glibc/manual/" text:style-name="Internet_20_link" text:visited-style-name="Visited_20_Internet_20_Link"><text:span text:style-name="T46">https://sourceware.org/glibc/manual/</text:span></text:a><text:span text:style-name="T46"> </text:span></text:p>
      <text:p text:style-name="P14"><text:span text:style-name="T47">G</text:span><text:span text:style-name="T48">NU Core</text:span><text:span text:style-name="T49">u</text:span><text:span text:style-name="T48">tils </text:span><text:span text:style-name="T50"><text:s/><text:tab/><text:tab/><text:tab/> <text:s text:c="2"/></text:span><text:a xlink:type="simple" xlink:href="https://www.gnu.org/software/coreutils/manual/" text:style-name="Internet_20_link" text:visited-style-name="Visited_20_Internet_20_Link"><text:span text:style-name="T39">https://www.gnu.org/software/coreutils/manual/</text:span></text:a></text:p>
      <text:p text:style-name="P9"><text:span text:style-name="T51">GNU General Public License <text:s/><text:tab/> <text:s text:c="2"/><text:tab/> <text:s text:c="2"/></text:span><text:a xlink:type="simple" xlink:href="https://www.gnu.org/licenses/gpl-3.0.html" text:style-name="Internet_20_link" text:visited-style-name="Visited_20_Internet_20_Link"><text:span text:style-name="T51">https://www.gnu.org/licenses/gpl-3.0.html</text:span></text:a></text:p>
      <text:p text:style-name="P14"><text:span text:style-name="T52">GNU Gnulib<text:tab/><text:tab/><text:tab/><text:tab/> <text:s text:c="2"/></text:span><text:a xlink:type="simple" xlink:href="https://www.gnu.org/software/gnulib/manual/gnulib.html" text:style-name="Internet_20_link" text:visited-style-name="Visited_20_Internet_20_Link"><text:span text:style-name="T53">https://www.gnu.org/software/gnulib/manual/gnulib.html</text:span></text:a><text:span text:style-name="T52"> </text:span></text:p>
      <text:p text:style-name="P16"><text:span text:style-name="T54">G</text:span><text:span text:style-name="T55">NU Official Site</text:span><text:span text:style-name="T56"><text:tab/><text:tab/><text:tab/> <text:s text:c="2"/></text:span><text:a xlink:type="simple" xlink:href="https://www.gnu.org/home.en.html" text:style-name="Internet_20_link" text:visited-style-name="Visited_20_Internet_20_Link"><text:span text:style-name="T26">https://www.gnu.org/home.en.html</text:span></text:a><text:span text:style-name="T55"> </text:span></text:p>
      <text:p text:style-name="P14"><text:span text:style-name="T37">GNU Make </text:span><text:span text:style-name="T38"><text:tab/><text:tab/> <text:tab/><text:tab/> <text:s text:c="2"/></text:span><text:a xlink:type="simple" xlink:href="https://www.gnu.org/software/make/manual/" text:style-name="Internet_20_link" text:visited-style-name="Visited_20_Internet_20_Link"><text:span text:style-name="T57">https://www.gnu.org/software/make/manual/</text:span></text:a></text:p>
      <text:p text:style-name="P17"><text:span text:style-name="T39">GNU </text:span><text:span text:style-name="T58">Software<text:tab/><text:tab/><text:tab/> <text:s text:c="2"/><text:tab/> <text:s text:c="2"/></text:span><text:a xlink:type="simple" xlink:href="https://www.gnu.org/software" text:style-name="Internet_20_link" text:visited-style-name="Visited_20_Internet_20_Link"><text:span text:style-name="T57">https://www.gnu.org/software</text:span></text:a></text:p>
      <text:p text:style-name="P18">io_uring<text:tab/><text:tab/><text:tab/> <text:s text:c="15"/><text:a xlink:type="simple" xlink:href="https://unixism.net/loti/index.html" text:style-name="Internet_20_link" text:visited-style-name="Visited_20_Internet_20_Link">https://unixism.net/loti/index.html</text:a> </text:p>
      <text:p text:style-name="P19">Libseccomp<text:tab/><text:tab/><text:tab/><text:tab/> <text:s text:c="2"/><text:a xlink:type="simple" xlink:href="https://github.com/seccomp/libseccomp/wiki" text:style-name="Internet_20_link" text:visited-style-name="Visited_20_Internet_20_Link">https://github.com/seccomp/libseccomp/wiki</text:a> </text:p>
      <text:p text:style-name="P19">Libseccomp documentation<text:tab/><text:tab/> <text:s text:c="2"/><text:a xlink:type="simple" xlink:href="https://libseccomp.readthedocs.io/en/latest/" text:style-name="Internet_20_link" text:visited-style-name="Visited_20_Internet_20_Link">https://libseccomp.readthedocs.io/en/latest/</text:a> </text:p>
      <text:p text:style-name="P20"><text:span text:style-name="T39">Liburing<text:tab/><text:tab/><text:tab/><text:tab/> <text:s text:c="2"/></text:span><text:a xlink:type="simple" xlink:href="https://github.com/axboe/liburing" text:style-name="Internet_20_link" text:visited-style-name="Visited_20_Internet_20_Link"><text:span text:style-name="T39">https://github.com/axboe/liburing</text:span></text:a></text:p>
      <text:p text:style-name="P21"><text:span text:style-name="T46">Linux man</text:span><text:span text:style-name="T59">ual</text:span><text:span text:style-name="T46"> pages online<text:tab/><text:tab/> <text:s text:c="2"/></text:span><text:a xlink:type="simple" xlink:href="https://www.man7.org/" text:style-name="Internet_20_link" text:visited-style-name="Visited_20_Internet_20_Link"><text:span text:style-name="T46">https://www.man7.org</text:span></text:a><text:span text:style-name="T46"> </text:span></text:p>
      <text:p text:style-name="P22"><text:span text:style-name="T60">Linux </text:span><text:span text:style-name="T61">Kernel<text:tab/> </text:span><text:span text:style-name="T62"><text:tab/><text:tab/><text:tab/> <text:s text:c="2"/></text:span><text:a xlink:type="simple" xlink:href="https://kernel.org/" text:style-name="Internet_20_link" text:visited-style-name="Visited_20_Internet_20_Link"><text:span text:style-name="T26">https://kernel.org/</text:span></text:a></text:p>
      <text:p text:style-name="P23"><text:span text:style-name="T30">Linux Standard Base <text:tab/><text:tab/><text:tab/> <text:s text:c="2"/></text:span><text:a xlink:type="simple" xlink:href="https://refspecs.linuxbase.org/LSB_5.0.0/allspecs.shtml" text:style-name="Internet_20_link" text:visited-style-name="Visited_20_Internet_20_Link"><text:span text:style-name="T31">https://refspecs.linuxbase.org/LSB_5.0.0/allspecs.shtml</text:span></text:a><text:span text:style-name="T30"> </text:span><text:span text:style-name="T63"><text:line-break/></text:span><text:span text:style-name="T64">Malloc <text:tab/><text:tab/><text:tab/><text:tab/> <text:s text:c="2"/><text:tab/> <text:s text:c="2"/></text:span><text:a xlink:type="simple" xlink:href="https://sourceware.org/glibc/wiki/MallocInternals" text:style-name="Internet_20_link" text:visited-style-name="Visited_20_Internet_20_Link"><text:span text:style-name="T63">https://sourceware.org/glibc/wiki/MallocInternals</text:span></text:a></text:p>
      <text:p text:style-name="P24"><text:span text:style-name="T39">The /proc filesystem<text:tab/> <text:tab/> <text:tab/> <text:s text:c="2"/></text:span><text:a xlink:type="simple" xlink:href="https://www.kernel.org/doc/html/latest/filesystems/proc.html" text:style-name="Internet_20_link" text:visited-style-name="Visited_20_Internet_20_Link"><text:span text:style-name="T65">https://www.kernel.org/doc/html/latest/filesystems/proc.html</text:span></text:a></text:p>
      <text:p text:style-name="P25">The GNU C Reference Manual <text:s text:c="2"/><text:tab/> <text:s text:c="2"/><text:a xlink:type="simple" xlink:href="https://www.gnu.org/software/gnu-c-manual/gnu-c-manual.html" text:style-name="Internet_20_link" text:visited-style-name="Visited_20_Internet_20_Link">https://www.gnu.org/software/gnu-c-manual/gnu-c-manual.html</text:a> </text:p>
      <text:p text:style-name="P26"/>
      <text:p text:style-name="P6"/>
      <text:p text:style-name="P6">Operating systems</text:p>
      <text:p text:style-name="P27"/>
      <text:p text:style-name="P16"><text:span text:style-name="T54">D</text:span><text:span text:style-name="T66">ebian</text:span><text:span text:style-name="T67"> </text:span><text:span text:style-name="T66">OS</text:span><text:span text:style-name="T67"><text:tab/><text:tab/><text:tab/><text:tab/> <text:s/></text:span><text:span text:style-name="T66"><text:s/></text:span><text:a xlink:type="simple" xlink:href="https://www.debian.org/" text:style-name="Internet_20_link" text:visited-style-name="Visited_20_Internet_20_Link"><text:span text:style-name="T39">https://www.debian.org/</text:span></text:a><text:span text:style-name="T66"> </text:span></text:p>
      <text:p text:style-name="P16"><text:span text:style-name="T66"><text:tab/><text:tab/><text:tab/><text:tab/><text:tab/> <text:s text:c="2"/></text:span><text:a xlink:type="simple" xlink:href="https://www.debian.org/doc/devel-manuals" text:style-name="Internet_20_link" text:visited-style-name="Visited_20_Internet_20_Link"><text:span text:style-name="T39">https://www.debian.org/doc/devel-manuals</text:span></text:a><text:span text:style-name="T66"> </text:span></text:p>
      <text:p text:style-name="P28"><text:span text:style-name="T39">Debian </text:span><text:span text:style-name="T68">A</text:span><text:span text:style-name="T39">PT User's Guide <text:s/><text:tab/><text:tab/> <text:s text:c="2"/></text:span><text:a xlink:type="simple" xlink:href="https://www.debian.org/doc/manuals/apt-guide/index.en.html" text:style-name="Internet_20_link" text:visited-style-name="Visited_20_Internet_20_Link"><text:span text:style-name="T39">https://www.debian.org/doc/manuals/apt-guide/index.en.html</text:span></text:a><text:span text:style-name="T39"> </text:span></text:p>
      <text:p text:style-name="P16"><text:span text:style-name="T69">Kali Linux</text:span><text:span text:style-name="T70"> <text:tab/><text:tab/><text:tab/><text:tab/> <text:s text:c="2"/></text:span><text:a xlink:type="simple" xlink:href="https://www.kali.org/" text:style-name="Internet_20_link" text:visited-style-name="Visited_20_Internet_20_Link"><text:span text:style-name="T26">https://www.kali.org/</text:span></text:a><text:span text:style-name="T69"> </text:span></text:p>
      <text:p text:style-name="P16"><text:span text:style-name="T66">Linux Mint <text:tab/><text:tab/><text:tab/><text:tab/> <text:s text:c="2"/></text:span><text:a xlink:type="simple" xlink:href="https://linuxmint.com/" text:style-name="Internet_20_link" text:visited-style-name="Visited_20_Internet_20_Link"><text:span text:style-name="T26">https://linuxmint.com/</text:span></text:a><text:span text:style-name="T66"> </text:span></text:p>
      <text:p text:style-name="P16"><text:span text:style-name="T69">Ubuntu OS</text:span><text:span text:style-name="T70"><text:tab/><text:tab/><text:tab/><text:tab/> <text:s text:c="2"/></text:span><text:a xlink:type="simple" xlink:href="https://ubuntu.com/" text:style-name="Internet_20_link" text:visited-style-name="Visited_20_Internet_20_Link"><text:span text:style-name="T26">https://ubuntu.com/</text:span></text:a><text:span text:style-name="T69"> </text:span></text:p>
      <text:p text:style-name="P29"><text:span text:style-name="T60">BSD </text:span><text:span text:style-name="T61">Official site<text:tab/><text:tab/><text:tab/> <text:s text:c="2"/></text:span><text:a xlink:type="simple" xlink:href="https://www.bsd.org/" text:style-name="Internet_20_link" text:visited-style-name="Visited_20_Internet_20_Link"><text:span text:style-name="T60">https://www.bsd.org/</text:span></text:a><text:span text:style-name="T60"> </text:span></text:p>
      <text:p text:style-name="P30"><text:span text:style-name="T71">SunOS </text:span><text:s text:c="24"/><text:a xlink:type="simple" xlink:href="https://www.oracle.com/solaris/solaris10/downloads/solaris10-get-jsp-downloads.html" text:style-name="Internet_20_link" text:visited-style-name="Visited_20_Internet_20_Link"><text:span text:style-name="T72">https://www.oracle.com/solaris/solaris10/downloads/solaris10-get-jsp-downloads.html</text:span></text:a></text:p>
      <text:p text:style-name="P28"/>
      <text:p text:style-name="P28"/>
      <text:p text:style-name="P6">Standards</text:p>
      <text:p text:style-name="P31"/>
      <text:p text:style-name="P32"><text:span text:style-name="T39">ABI<text:tab/><text:tab/><text:tab/><text:tab/><text:tab/> <text:s text:c="2"/></text:span><text:a xlink:type="simple" xlink:href="https://wiki.osdev.org/System_V_ABI" text:style-name="Internet_20_link" text:visited-style-name="Visited_20_Internet_20_Link"><text:span text:style-name="T39">https://wiki.osdev.org/System_V_ABI</text:span></text:a></text:p>
      <text:p text:style-name="P32"><text:span text:style-name="T39"><text:tab/><text:tab/><text:tab/><text:tab/><text:tab/> <text:s text:c="2"/></text:span><text:a xlink:type="simple" xlink:href="https://refspecs.linuxbase.org/elf/x86_64-abi-0.99.pdf" text:style-name="Internet_20_link" text:visited-style-name="Visited_20_Internet_20_Link"><text:span text:style-name="T39">https://refspecs.linuxbase.org/elf/x86_64-abi-0.99.pdf</text:span></text:a><text:span text:style-name="T39"> </text:span></text:p>
      <text:p text:style-name="P32"><text:span text:style-name="T39"><text:tab/><text:tab/><text:tab/><text:tab/><text:tab/> <text:s text:c="2"/></text:span><text:a xlink:type="simple" xlink:href="https://refspecs.linuxbase.org/elf/x86_64-abi-0.21.pdf" text:style-name="Internet_20_link" text:visited-style-name="Visited_20_Internet_20_Link"><text:span text:style-name="T39">https://refspecs.linuxbase.org/elf/x86_64-abi-0.21.pdf</text:span></text:a><text:span text:style-name="T39"> </text:span></text:p>
      <text:p text:style-name="P16"><text:span text:style-name="T73">C </text:span><text:span text:style-name="T74">Language Standard <text:s text:c="3"/><text:tab/><text:tab/> <text:s text:c="2"/><text:tab/> <text:s text:c="2"/></text:span><text:a xlink:type="simple" xlink:href="http://www.open-std.org/jtc1/sc22/wg14/" text:style-name="Internet_20_link" text:visited-style-name="Visited_20_Internet_20_Link"><text:span text:style-name="T73">http://www.open-std.org/jtc1/sc22/wg14/</text:span></text:a></text:p>
      <text:p text:style-name="P33"><text:span text:style-name="T60">ELF </text:span><text:span text:style-name="T75">Standard <text:s/></text:span><text:span text:style-name="T39"><text:s text:c="2"/><text:tab/><text:tab/><text:tab/> <text:s text:c="2"/></text:span><text:a xlink:type="simple" xlink:href="https://refspecs.linuxfoundation.org/elf/elf.pdf" text:style-name="Internet_20_link" text:visited-style-name="Visited_20_Internet_20_Link"><text:span text:style-name="T60">https://refspecs.linuxfoundation.org/elf/elf.pdf</text:span></text:a></text:p>
      <text:p text:style-name="P34"><text:span text:style-name="T60">Linux Standard Base </text:span><text:span text:style-name="T76">Specification </text:span><text:span text:style-name="T60"><text:s text:c="5"/><text:tab/> <text:s text:c="2"/></text:span><text:a xlink:type="simple" xlink:href="https://refspecs.linuxfoundation.org/lsb.shtml" text:style-name="Internet_20_link" text:visited-style-name="Visited_20_Internet_20_Link"><text:span text:style-name="T60">https://refspecs.linuxfoundation.org/lsb.shtml</text:span></text:a></text:p>
      <text:p text:style-name="P35"><text:span text:style-name="T39">System V SCO Dev Specification<text:tab/> <text:s text:c="2"/></text:span><text:a xlink:type="simple" xlink:href="http://www.sco.com/developers/devspecs/" text:style-name="Internet_20_link" text:visited-style-name="Visited_20_Internet_20_Link"><text:span text:style-name="T39">http://www.sco.com/developers/devspecs/</text:span></text:a></text:p>
      <text:p text:style-name="P36"><text:span text:style-name="T39">The Single UNIX Specification <text:s text:c="10"/><text:tab/> <text:s text:c="2"/></text:span><text:a xlink:type="simple" xlink:href="https://unix.org/what_is_unix/single_unix_specification.html" text:style-name="Internet_20_link" text:visited-style-name="Visited_20_Internet_20_Link"><text:span text:style-name="T39">https://unix.org/what_is_unix/single_unix_specification.html</text:span></text:a></text:p>
      <text:p text:style-name="P37"><text:soft-page-break/><text:span text:style-name="T71">POSIX </text:span><text:span text:style-name="T77">Standard</text:span><text:span text:style-name="T78"> <text:s text:c="2"/><text:tab/><text:tab/><text:tab/></text:span><text:a xlink:type="simple" xlink:href="https://pubs.opengroup.org/onlinepubs/9699919799.2018edition/" text:style-name="Internet_20_link" text:visited-style-name="Visited_20_Internet_20_Link"><text:span text:style-name="T71">https://pubs.opengroup.org/onlinepubs/9699919799.2018edition/</text:span></text:a></text:p>
      <text:p text:style-name="P38"><text:span text:style-name="T39">X/Open Portability Guide <text:tab/> <text:s text:c="12"/></text:span><text:a xlink:type="simple" xlink:href="http://archive.opengroup.org/publications/archive/CDROM/g501.pdf" text:style-name="Internet_20_link" text:visited-style-name="Visited_20_Internet_20_Link"><text:span text:style-name="T39">http://archive.opengroup.org/publications/archive/CDROM/g501.pdf</text:span></text:a></text:p>
      <text:p text:style-name="P14"><text:span text:style-name="T79">List of the Unicode symbols</text:span><text:span text:style-name="T80"> <text:tab/><text:tab/></text:span><text:a xlink:type="simple" xlink:href="https://symbl.cc/en/unicode-table/" text:style-name="Internet_20_link" text:visited-style-name="Visited_20_Internet_20_Link"><text:span text:style-name="T81">https://symbl.cc/en/unicode-table/</text:span></text:a><text:span text:style-name="T8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7T18:20:27.070367576</meta:creation-date>
    <dc:date>2026-05-17T18:57:46.370190536</dc:date>
    <meta:editing-duration>PT1H24M</meta:editing-duration>
    <meta:editing-cycles>40</meta:editing-cycles>
    <meta:generator>LibreOffice/26.2.1.2$Linux_X86_64 LibreOffice_project/620$Build-2</meta:generator>
    <meta:document-statistic meta:table-count="0" meta:image-count="0" meta:object-count="0" meta:page-count="3" meta:paragraph-count="64" meta:word-count="337" meta:character-count="4436" meta:non-whitespace-character-count="3748"/>
  </office:meta>
</office:document-meta>
</file>