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EA000000A709FAD2B7.png" manifest:media-type="image/png"/>
  <manifest:file-entry manifest:full-path="Pictures/10000001000006FA0000052327E06D51.png" manifest:media-type="image/png"/>
  <manifest:file-entry manifest:full-path="Pictures/10000001000006C6000005448D02636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ourier" svg:font-family="Courier, 'Courier New'" style:font-family-generic="modern"/>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Table1" style:family="table">
      <style:table-properties style:width="2.5896in" fo:margin-left="2.1396in" table:align="left" style:writing-mode="lr-tb"/>
    </style:style>
    <style:style style:name="Table1.A" style:family="table-column">
      <style:table-column-properties style:column-width="0.9063in"/>
    </style:style>
    <style:style style:name="Table1.B" style:family="table-column">
      <style:table-column-properties style:column-width="0.3854in"/>
    </style:style>
    <style:style style:name="Table1.C" style:family="table-column">
      <style:table-column-properties style:column-width="1.2979in"/>
    </style:style>
    <style:style style:name="Table1.1" style:family="table-row">
      <style:table-row-properties style:min-row-height="0.3125in" fo:keep-together="auto"/>
    </style:style>
    <style:style style:name="Table1.A1" style:family="table-cell">
      <style:table-cell-properties style:vertical-align="top" fo:padding="0.0382in" fo:border-left="0.1pt solid #000000" fo:border-right="none" fo:border-top="0.1pt solid #000000" fo:border-bottom="0.1pt solid #000000" style:writing-mode="lr-tb"/>
    </style:style>
    <style:style style:name="Table1.C1" style:family="table-cell">
      <style:table-cell-properties style:vertical-align="top" fo:padding="0.0382in" fo:border="0.1pt solid #000000" style:writing-mode="lr-tb"/>
    </style:style>
    <style:style style:name="Table1.2" style:family="table-row">
      <style:table-row-properties fo:keep-together="auto"/>
    </style:style>
    <style:style style:name="Table1.A2" style:family="table-cell">
      <style:table-cell-properties style:vertical-align="top" fo:padding="0.0382in" fo:border-left="0.1pt solid #000000" fo:border-right="none" fo:border-top="none" fo:border-bottom="0.1pt solid #000000" style:writing-mode="lr-tb"/>
    </style:style>
    <style:style style:name="Table1.C2" style:family="table-cell">
      <style:table-cell-properties style:vertical-align="top" fo:padding="0.0382in" fo:border-left="0.1pt solid #000000" fo:border-right="0.1pt solid #000000" fo:border-top="none" fo:border-bottom="0.1pt solid #000000" style:writing-mode="lr-tb"/>
    </style:style>
    <style:style style:name="Table2" style:family="table">
      <style:table-properties style:width="6.6931in" style:rel-width="100%" table:align="left" style:writing-mode="lr-tb"/>
    </style:style>
    <style:style style:name="Table2.A" style:family="table-column">
      <style:table-column-properties style:column-width="6.6931in" style:rel-column-width="9026*"/>
    </style:style>
    <style:style style:name="Table2.1" style:family="table-row">
      <style:table-row-properties fo:keep-together="auto"/>
    </style:style>
    <style:style style:name="Table2.A1" style:family="table-cell">
      <style:table-cell-properties style:vertical-align="top" fo:padding="0.0382in" fo:border="0.1pt solid #000000" style:writing-mode="lr-tb"/>
    </style:style>
    <style:style style:name="Table3" style:family="table">
      <style:table-properties style:width="6.6931in" style:rel-width="100%" table:align="left" style:writing-mode="lr-tb"/>
    </style:style>
    <style:style style:name="Table3.A" style:family="table-column">
      <style:table-column-properties style:column-width="6.6931in" style:rel-column-width="9026*"/>
    </style:style>
    <style:style style:name="Table3.1" style:family="table-row">
      <style:table-row-properties fo:keep-together="auto"/>
    </style:style>
    <style:style style:name="Table3.A1" style:family="table-cell">
      <style:table-cell-properties style:vertical-align="top" fo:padding="0.0382in" fo:border="0.5pt solid #000000" style:writing-mode="lr-tb"/>
    </style:style>
    <style:style style:name="Table4" style:family="table">
      <style:table-properties style:width="2.5208in" fo:margin-left="2.0667in" table:align="left" style:writing-mode="lr-tb"/>
    </style:style>
    <style:style style:name="Table4.A" style:family="table-column">
      <style:table-column-properties style:column-width="0.9583in"/>
    </style:style>
    <style:style style:name="Table4.B" style:family="table-column">
      <style:table-column-properties style:column-width="1.5625in"/>
    </style:style>
    <style:style style:name="Table4.1" style:family="table-row">
      <style:table-row-properties fo:keep-together="auto"/>
    </style:style>
    <style:style style:name="Table4.A1" style:family="table-cell">
      <style:table-cell-properties style:vertical-align="top" fo:padding="0.0382in" fo:border-left="0.1pt solid #000000" fo:border-right="none" fo:border-top="0.1pt solid #000000" fo:border-bottom="0.1pt solid #000000" style:writing-mode="lr-tb"/>
    </style:style>
    <style:style style:name="Table4.B1" style:family="table-cell">
      <style:table-cell-properties style:vertical-align="top" fo:padding="0.0382in" fo:border="0.1pt solid #000000" style:writing-mode="lr-tb"/>
    </style:style>
    <style:style style:name="Table4.A2" style:family="table-cell">
      <style:table-cell-properties style:vertical-align="top" fo:padding="0.0382in" fo:border-left="0.1pt solid #000000" fo:border-right="none" fo:border-top="none" fo:border-bottom="0.1pt solid #000000" style:writing-mode="lr-tb"/>
    </style:style>
    <style:style style:name="Table4.B2" style:family="table-cell">
      <style:table-cell-properties style:vertical-align="top" fo:padding="0.0382in" fo:border-left="0.1pt solid #000000" fo:border-right="0.1pt solid #000000" fo:border-top="none" fo:border-bottom="0.1pt solid #000000" style:writing-mode="lr-tb"/>
    </style:style>
    <style:style style:name="Table5" style:family="table">
      <style:table-properties style:width="6.6931in" style:rel-width="100%" table:align="left" style:writing-mode="lr-tb"/>
    </style:style>
    <style:style style:name="Table5.A" style:family="table-column">
      <style:table-column-properties style:column-width="6.6931in" style:rel-column-width="9026*"/>
    </style:style>
    <style:style style:name="Table5.1" style:family="table-row">
      <style:table-row-properties fo:keep-together="auto"/>
    </style:style>
    <style:style style:name="Table5.A1" style:family="table-cell">
      <style:table-cell-properties style:vertical-align="top" fo:padding="0.0382in" fo:border="0.5pt solid #000000" style:writing-mode="lr-tb"/>
    </style:style>
    <style:style style:name="Table6" style:family="table">
      <style:table-properties style:width="6.6931in" style:rel-width="100%" table:align="left" style:writing-mode="lr-tb"/>
    </style:style>
    <style:style style:name="Table6.A" style:family="table-column">
      <style:table-column-properties style:column-width="6.6931in" style:rel-column-width="9026*"/>
    </style:style>
    <style:style style:name="Table6.1" style:family="table-row">
      <style:table-row-properties fo:keep-together="auto"/>
    </style:style>
    <style:style style:name="Table6.A1" style:family="table-cell">
      <style:table-cell-properties style:vertical-align="top" fo:padding="0.0382in" fo:border="0.5pt solid #000000" style:writing-mode="lr-tb"/>
    </style:style>
    <style:style style:name="Table7" style:family="table">
      <style:table-properties style:width="3.875in" fo:margin-left="1.6847in" table:align="left" style:writing-mode="lr-tb"/>
    </style:style>
    <style:style style:name="Table7.A" style:family="table-column">
      <style:table-column-properties style:column-width="1in"/>
    </style:style>
    <style:style style:name="Table7.B" style:family="table-column">
      <style:table-column-properties style:column-width="2.875in"/>
    </style:style>
    <style:style style:name="Table7.1" style:family="table-row">
      <style:table-row-properties fo:keep-together="auto"/>
    </style:style>
    <style:style style:name="Table7.A1" style:family="table-cell">
      <style:table-cell-properties style:vertical-align="top" fo:padding="0.0382in" fo:border-left="0.5pt solid #000000" fo:border-right="none" fo:border-top="0.5pt solid #000000" fo:border-bottom="0.5pt solid #000000" style:writing-mode="lr-tb"/>
    </style:style>
    <style:style style:name="Table7.B1" style:family="table-cell">
      <style:table-cell-properties style:vertical-align="top" fo:padding="0.0382in" fo:border="0.5pt solid #000000" style:writing-mode="lr-tb"/>
    </style:style>
    <style:style style:name="Table7.A2" style:family="table-cell">
      <style:table-cell-properties style:vertical-align="top" fo:padding="0.0382in" fo:border-left="0.5pt solid #000000" fo:border-right="none" fo:border-top="none" fo:border-bottom="0.5pt solid #000000" style:writing-mode="lr-tb"/>
    </style:style>
    <style:style style:name="Table7.B2" style:family="table-cell">
      <style:table-cell-properties style:vertical-align="top" fo:padding="0.0382in" fo:border-left="0.5pt solid #000000" fo:border-right="0.5pt solid #000000" fo:border-top="none" fo:border-bottom="0.5pt solid #000000" style:writing-mode="lr-tb"/>
    </style:style>
    <style:style style:name="Table8" style:family="table">
      <style:table-properties style:width="6.6931in" style:rel-width="100%" table:align="left" style:writing-mode="lr-tb"/>
    </style:style>
    <style:style style:name="Table8.A" style:family="table-column">
      <style:table-column-properties style:column-width="6.6931in" style:rel-column-width="9026*"/>
    </style:style>
    <style:style style:name="Table8.1" style:family="table-row">
      <style:table-row-properties fo:keep-together="auto"/>
    </style:style>
    <style:style style:name="Table8.A1" style:family="table-cell">
      <style:table-cell-properties style:vertical-align="top" fo:padding="0.0382in" fo:border="0.1pt solid #000000" style:writing-mode="lr-tb"/>
    </style:style>
    <style:style style:name="Table9" style:family="table">
      <style:table-properties style:width="6.6931in" style:rel-width="100%" table:align="left" style:writing-mode="lr-tb"/>
    </style:style>
    <style:style style:name="Table9.A" style:family="table-column">
      <style:table-column-properties style:column-width="6.6931in" style:rel-column-width="9026*"/>
    </style:style>
    <style:style style:name="Table9.1" style:family="table-row">
      <style:table-row-properties fo:keep-together="auto"/>
    </style:style>
    <style:style style:name="Table9.A1" style:family="table-cell">
      <style:table-cell-properties style:vertical-align="top" fo:padding="0.0382in" fo:border="0.5pt solid #000000" style:writing-mode="lr-tb"/>
    </style:style>
    <style:style style:name="Table10" style:family="table">
      <style:table-properties style:width="6.6931in" style:rel-width="100%" table:align="left" style:writing-mode="lr-tb"/>
    </style:style>
    <style:style style:name="Table10.A" style:family="table-column">
      <style:table-column-properties style:column-width="6.6931in" style:rel-column-width="9026*"/>
    </style:style>
    <style:style style:name="Table10.1" style:family="table-row">
      <style:table-row-properties fo:keep-together="auto"/>
    </style:style>
    <style:style style:name="Table10.A1" style:family="table-cell">
      <style:table-cell-properties style:vertical-align="top" fo:padding="0.0382in" fo:border="0.5pt solid #000000" style:writing-mode="lr-tb"/>
    </style:style>
    <style:style style:name="Table11" style:family="table">
      <style:table-properties style:width="2.4063in" fo:margin-left="2.1708in" table:align="left" style:writing-mode="lr-tb"/>
    </style:style>
    <style:style style:name="Table11.A" style:family="table-column">
      <style:table-column-properties style:column-width="1.7604in"/>
    </style:style>
    <style:style style:name="Table11.B" style:family="table-column">
      <style:table-column-properties style:column-width="0.6458in"/>
    </style:style>
    <style:style style:name="Table11.1" style:family="table-row">
      <style:table-row-properties fo:keep-together="auto"/>
    </style:style>
    <style:style style:name="Table11.A1" style:family="table-cell">
      <style:table-cell-properties style:vertical-align="top" fo:padding="0.0382in" fo:border-left="0.5pt solid #000000" fo:border-right="none" fo:border-top="0.5pt solid #000000" fo:border-bottom="0.5pt solid #000000" style:writing-mode="lr-tb"/>
    </style:style>
    <style:style style:name="Table11.B1" style:family="table-cell">
      <style:table-cell-properties style:vertical-align="top" fo:padding="0.0382in" fo:border="0.5pt solid #000000" style:writing-mode="lr-tb"/>
    </style:style>
    <style:style style:name="Table11.A2" style:family="table-cell">
      <style:table-cell-properties style:vertical-align="top" fo:padding="0.0382in" fo:border-left="0.5pt solid #000000" fo:border-right="none" fo:border-top="none" fo:border-bottom="0.5pt solid #000000" style:writing-mode="lr-tb"/>
    </style:style>
    <style:style style:name="Table11.B2" style:family="table-cell">
      <style:table-cell-properties style:vertical-align="top" fo:padding="0.0382in" fo:border-left="0.5pt solid #000000" fo:border-right="0.5pt solid #000000" fo:border-top="none" fo:border-bottom="0.5pt solid #000000" style:writing-mode="lr-tb"/>
    </style:style>
    <style:style style:name="Table12" style:family="table">
      <style:table-properties style:width="6.6931in" style:rel-width="100%" table:align="left" style:writing-mode="lr-tb"/>
    </style:style>
    <style:style style:name="Table12.A" style:family="table-column">
      <style:table-column-properties style:column-width="6.6931in" style:rel-column-width="9026*"/>
    </style:style>
    <style:style style:name="Table12.1" style:family="table-row">
      <style:table-row-properties fo:keep-together="auto"/>
    </style:style>
    <style:style style:name="Table12.A1" style:family="table-cell">
      <style:table-cell-properties style:vertical-align="top" fo:padding="0.0382in" fo:border="0.5pt solid #000000" style:writing-mode="lr-tb"/>
    </style:style>
    <style:style style:name="Table13" style:family="table">
      <style:table-properties style:width="6.6931in" style:rel-width="100%" table:align="left" style:writing-mode="lr-tb"/>
    </style:style>
    <style:style style:name="Table13.A" style:family="table-column">
      <style:table-column-properties style:column-width="6.6931in" style:rel-column-width="9026*"/>
    </style:style>
    <style:style style:name="Table13.1" style:family="table-row">
      <style:table-row-properties fo:keep-together="auto"/>
    </style:style>
    <style:style style:name="Table13.A1" style:family="table-cell">
      <style:table-cell-properties style:vertical-align="top" fo:padding="0.0382in" fo:border="0.5pt solid #000000" style:writing-mode="lr-tb"/>
    </style:style>
    <style:style style:name="Table14" style:family="table">
      <style:table-properties style:width="6.6931in" style:rel-width="100%" table:align="left" style:writing-mode="lr-tb"/>
    </style:style>
    <style:style style:name="Table14.A" style:family="table-column">
      <style:table-column-properties style:column-width="6.6931in" style:rel-column-width="9026*"/>
    </style:style>
    <style:style style:name="Table14.1" style:family="table-row">
      <style:table-row-properties fo:keep-together="auto"/>
    </style:style>
    <style:style style:name="Table14.A1" style:family="table-cell">
      <style:table-cell-properties style:vertical-align="top" fo:padding="0.0382in" fo:border="0.5pt solid #000000" style:writing-mode="lr-tb"/>
    </style:style>
    <style:style style:name="Table15" style:family="table">
      <style:table-properties style:width="6.6931in" style:rel-width="100%" table:align="left" style:writing-mode="lr-tb"/>
    </style:style>
    <style:style style:name="Table15.A" style:family="table-column">
      <style:table-column-properties style:column-width="6.6931in" style:rel-column-width="9026*"/>
    </style:style>
    <style:style style:name="Table15.1" style:family="table-row">
      <style:table-row-properties fo:keep-together="auto"/>
    </style:style>
    <style:style style:name="Table15.A1" style:family="table-cell">
      <style:table-cell-properties style:vertical-align="top" fo:padding="0.0382in" fo:border="0.5pt solid #000000" style:writing-mode="lr-tb"/>
    </style:style>
    <style:style style:name="Table16" style:family="table">
      <style:table-properties style:width="6.6931in" style:rel-width="100%" table:align="left" style:writing-mode="lr-tb"/>
    </style:style>
    <style:style style:name="Table16.A" style:family="table-column">
      <style:table-column-properties style:column-width="6.6931in" style:rel-column-width="9026*"/>
    </style:style>
    <style:style style:name="Table16.1" style:family="table-row">
      <style:table-row-properties fo:keep-together="auto"/>
    </style:style>
    <style:style style:name="Table16.A1" style:family="table-cell">
      <style:table-cell-properties style:vertical-align="top" fo:padding="0.0382in" fo:border="0.5pt solid #000000" style:writing-mode="lr-tb"/>
    </style:style>
    <style:style style:name="Table17" style:family="table">
      <style:table-properties style:width="6.6931in" style:rel-width="100%" table:align="left" style:writing-mode="lr-tb"/>
    </style:style>
    <style:style style:name="Table17.A" style:family="table-column">
      <style:table-column-properties style:column-width="6.6931in" style:rel-column-width="9026*"/>
    </style:style>
    <style:style style:name="Table17.1" style:family="table-row">
      <style:table-row-properties fo:keep-together="auto"/>
    </style:style>
    <style:style style:name="Table17.A1" style:family="table-cell">
      <style:table-cell-properties style:vertical-align="top" fo:padding="0.0382in" fo:border="0.5pt solid #000000" style:writing-mode="lr-tb"/>
    </style:style>
    <style:style style:name="Table18" style:family="table">
      <style:table-properties style:width="6.6931in" style:rel-width="100%" table:align="left" style:writing-mode="lr-tb"/>
    </style:style>
    <style:style style:name="Table18.A" style:family="table-column">
      <style:table-column-properties style:column-width="6.6931in" style:rel-column-width="9026*"/>
    </style:style>
    <style:style style:name="Table18.1" style:family="table-row">
      <style:table-row-properties fo:keep-together="auto"/>
    </style:style>
    <style:style style:name="Table18.A1" style:family="table-cell">
      <style:table-cell-properties style:vertical-align="top" fo:padding="0.0382in" fo:border="0.5pt solid #000000" style:writing-mode="lr-tb"/>
    </style:style>
    <style:style style:name="Table19" style:family="table">
      <style:table-properties style:width="1.4167in" fo:margin-left="2.5979in" table:align="left" style:writing-mode="lr-tb"/>
    </style:style>
    <style:style style:name="Table19.A" style:family="table-column">
      <style:table-column-properties style:column-width="0.75in"/>
    </style:style>
    <style:style style:name="Table19.B" style:family="table-column">
      <style:table-column-properties style:column-width="0.6667in"/>
    </style:style>
    <style:style style:name="Table19.1" style:family="table-row">
      <style:table-row-properties fo:keep-together="auto"/>
    </style:style>
    <style:style style:name="Table19.A1" style:family="table-cell">
      <style:table-cell-properties style:vertical-align="top" fo:padding="0.0382in" fo:border-left="0.5pt solid #000000" fo:border-right="none" fo:border-top="0.5pt solid #000000" fo:border-bottom="0.5pt solid #000000" style:writing-mode="lr-tb"/>
    </style:style>
    <style:style style:name="Table19.B1" style:family="table-cell">
      <style:table-cell-properties style:vertical-align="top" fo:padding="0.0382in" fo:border="0.5pt solid #000000" style:writing-mode="lr-tb"/>
    </style:style>
    <style:style style:name="Table19.A2" style:family="table-cell">
      <style:table-cell-properties style:vertical-align="top" fo:padding="0.0382in" fo:border-left="0.5pt solid #000000" fo:border-right="none" fo:border-top="none" fo:border-bottom="0.5pt solid #000000" style:writing-mode="lr-tb"/>
    </style:style>
    <style:style style:name="Table19.B2" style:family="table-cell">
      <style:table-cell-properties style:vertical-align="top" fo:padding="0.0382in" fo:border-left="0.5pt solid #000000" fo:border-right="0.5pt solid #000000" fo:border-top="none" fo:border-bottom="0.5pt solid #000000" style:writing-mode="lr-tb"/>
    </style:style>
    <style:style style:name="Table20" style:family="table">
      <style:table-properties style:width="6.6931in" style:rel-width="100%" table:align="left" style:writing-mode="lr-tb"/>
    </style:style>
    <style:style style:name="Table20.A" style:family="table-column">
      <style:table-column-properties style:column-width="6.6931in" style:rel-column-width="9026*"/>
    </style:style>
    <style:style style:name="Table20.1" style:family="table-row">
      <style:table-row-properties fo:keep-together="auto"/>
    </style:style>
    <style:style style:name="Table20.A1" style:family="table-cell">
      <style:table-cell-properties style:vertical-align="top" fo:padding="0.0382in" fo:border="0.5pt solid #000000" style:writing-mode="lr-tb"/>
    </style:style>
    <style:style style:name="Table21" style:family="table">
      <style:table-properties style:width="4.9271in" fo:margin-left="1.0875in" table:align="left" style:writing-mode="lr-tb"/>
    </style:style>
    <style:style style:name="Table21.A" style:family="table-column">
      <style:table-column-properties style:column-width="0.6354in"/>
    </style:style>
    <style:style style:name="Table21.B" style:family="table-column">
      <style:table-column-properties style:column-width="4.2917in"/>
    </style:style>
    <style:style style:name="Table21.1" style:family="table-row">
      <style:table-row-properties fo:keep-together="auto"/>
    </style:style>
    <style:style style:name="Table21.A1" style:family="table-cell">
      <style:table-cell-properties style:vertical-align="top" fo:padding="0.0382in" fo:border-left="0.1pt solid #000000" fo:border-right="none" fo:border-top="0.1pt solid #000000" fo:border-bottom="0.1pt solid #000000" style:writing-mode="lr-tb"/>
    </style:style>
    <style:style style:name="Table21.B1" style:family="table-cell">
      <style:table-cell-properties style:vertical-align="top" fo:padding="0.0382in" fo:border="0.1pt solid #000000" style:writing-mode="lr-tb"/>
    </style:style>
    <style:style style:name="Table21.A2" style:family="table-cell">
      <style:table-cell-properties style:vertical-align="top" fo:padding="0.0382in" fo:border-left="0.1pt solid #000000" fo:border-right="none" fo:border-top="none" fo:border-bottom="0.1pt solid #000000" style:writing-mode="lr-tb"/>
    </style:style>
    <style:style style:name="Table21.B2" style:family="table-cell">
      <style:table-cell-properties style:vertical-align="top" fo:padding="0.0382in" fo:border-left="0.1pt solid #000000" fo:border-right="0.1pt solid #000000" fo:border-top="none" fo:border-bottom="0.1pt solid #000000" style:writing-mode="lr-tb"/>
    </style:style>
    <style:style style:name="Table22" style:family="table">
      <style:table-properties style:width="5.3125in" fo:margin-left="0.7125in" table:align="left" style:writing-mode="lr-tb"/>
    </style:style>
    <style:style style:name="Table22.A" style:family="table-column">
      <style:table-column-properties style:column-width="0.4375in"/>
    </style:style>
    <style:style style:name="Table22.B" style:family="table-column">
      <style:table-column-properties style:column-width="4.875in"/>
    </style:style>
    <style:style style:name="Table22.1" style:family="table-row">
      <style:table-row-properties fo:keep-together="auto"/>
    </style:style>
    <style:style style:name="Table22.A1" style:family="table-cell">
      <style:table-cell-properties style:vertical-align="top" fo:padding="0.0382in" fo:border-left="0.5pt solid #000000" fo:border-right="none" fo:border-top="0.5pt solid #000000" fo:border-bottom="0.5pt solid #000000" style:writing-mode="lr-tb"/>
    </style:style>
    <style:style style:name="Table22.B1" style:family="table-cell">
      <style:table-cell-properties style:vertical-align="top" fo:padding="0.0382in" fo:border="0.5pt solid #000000" style:writing-mode="lr-tb"/>
    </style:style>
    <style:style style:name="Table22.A2" style:family="table-cell">
      <style:table-cell-properties style:vertical-align="top" fo:padding="0.0382in" fo:border-left="0.5pt solid #000000" fo:border-right="none" fo:border-top="none" fo:border-bottom="0.5pt solid #000000" style:writing-mode="lr-tb"/>
    </style:style>
    <style:style style:name="Table22.B2" style:family="table-cell">
      <style:table-cell-properties style:vertical-align="top" fo:padding="0.0382in" fo:border-left="0.5pt solid #000000" fo:border-right="0.5pt solid #000000" fo:border-top="none" fo:border-bottom="0.5pt solid #000000" style:writing-mode="lr-tb"/>
    </style:style>
    <style:style style:name="Table23" style:family="table">
      <style:table-properties style:width="3.8333in" fo:margin-left="1.525in" table:align="left" style:writing-mode="lr-tb"/>
    </style:style>
    <style:style style:name="Table23.A" style:family="table-column">
      <style:table-column-properties style:column-width="0.7917in"/>
    </style:style>
    <style:style style:name="Table23.B" style:family="table-column">
      <style:table-column-properties style:column-width="3.0417in"/>
    </style:style>
    <style:style style:name="Table23.1" style:family="table-row">
      <style:table-row-properties fo:keep-together="auto"/>
    </style:style>
    <style:style style:name="Table23.A1" style:family="table-cell">
      <style:table-cell-properties style:vertical-align="top" fo:padding="0.0382in" fo:border-left="0.5pt solid #000000" fo:border-right="none" fo:border-top="0.5pt solid #000000" fo:border-bottom="0.5pt solid #000000" style:writing-mode="lr-tb"/>
    </style:style>
    <style:style style:name="Table23.B1" style:family="table-cell">
      <style:table-cell-properties style:vertical-align="top" fo:padding="0.0382in" fo:border="0.5pt solid #000000" style:writing-mode="lr-tb"/>
    </style:style>
    <style:style style:name="Table23.A2" style:family="table-cell">
      <style:table-cell-properties style:vertical-align="top" fo:padding="0.0382in" fo:border-left="0.5pt solid #000000" fo:border-right="none" fo:border-top="none" fo:border-bottom="0.5pt solid #000000" style:writing-mode="lr-tb"/>
    </style:style>
    <style:style style:name="Table23.B2" style:family="table-cell">
      <style:table-cell-properties style:vertical-align="top" fo:padding="0.0382in" fo:border-left="0.5pt solid #000000" fo:border-right="0.5pt solid #000000" fo:border-top="none" fo:border-bottom="0.5pt solid #000000" style:writing-mode="lr-tb"/>
    </style:style>
    <style:style style:name="Table24" style:family="table">
      <style:table-properties style:width="6.6931in" style:rel-width="100%" table:align="left" style:writing-mode="lr-tb"/>
    </style:style>
    <style:style style:name="Table24.A" style:family="table-column">
      <style:table-column-properties style:column-width="6.6931in" style:rel-column-width="9026*"/>
    </style:style>
    <style:style style:name="Table24.1" style:family="table-row">
      <style:table-row-properties fo:keep-together="auto"/>
    </style:style>
    <style:style style:name="Table24.A1" style:family="table-cell">
      <style:table-cell-properties style:vertical-align="top" fo:padding="0.0382in" fo:border="0.5pt solid #000000" style:writing-mode="lr-tb"/>
    </style:style>
    <style:style style:name="Table25" style:family="table">
      <style:table-properties style:width="6.6931in" style:rel-width="100%" table:align="left" style:writing-mode="lr-tb"/>
    </style:style>
    <style:style style:name="Table25.A" style:family="table-column">
      <style:table-column-properties style:column-width="6.6931in" style:rel-column-width="9026*"/>
    </style:style>
    <style:style style:name="Table25.1" style:family="table-row">
      <style:table-row-properties fo:keep-together="auto"/>
    </style:style>
    <style:style style:name="Table25.A1" style:family="table-cell">
      <style:table-cell-properties style:vertical-align="top" fo:padding="0.0382in" fo:border="0.1pt solid #000000" style:writing-mode="lr-tb"/>
    </style:style>
    <style:style style:name="Table26" style:family="table">
      <style:table-properties style:width="6.6931in" style:rel-width="100%" table:align="left" style:writing-mode="lr-tb"/>
    </style:style>
    <style:style style:name="Table26.A" style:family="table-column">
      <style:table-column-properties style:column-width="6.6931in" style:rel-column-width="9026*"/>
    </style:style>
    <style:style style:name="Table26.1" style:family="table-row">
      <style:table-row-properties fo:keep-together="auto"/>
    </style:style>
    <style:style style:name="Table26.A1" style:family="table-cell">
      <style:table-cell-properties style:vertical-align="top" fo:padding="0.0382in" fo:border="0.5pt solid #000000" style:writing-mode="lr-tb"/>
    </style:style>
    <style:style style:name="Table27" style:family="table">
      <style:table-properties style:width="6.6931in" style:rel-width="100%" table:align="left" style:writing-mode="lr-tb"/>
    </style:style>
    <style:style style:name="Table27.A" style:family="table-column">
      <style:table-column-properties style:column-width="6.6931in" style:rel-column-width="9026*"/>
    </style:style>
    <style:style style:name="Table27.1" style:family="table-row">
      <style:table-row-properties fo:keep-together="auto"/>
    </style:style>
    <style:style style:name="Table27.A1" style:family="table-cell">
      <style:table-cell-properties style:vertical-align="top" fo:padding="0.0382in" fo:border="0.5pt solid #000000" style:writing-mode="lr-tb"/>
    </style:style>
    <style:style style:name="Table28" style:family="table">
      <style:table-properties style:width="6.6667in" fo:margin-left="0.025in" table:align="left" style:writing-mode="lr-tb"/>
    </style:style>
    <style:style style:name="Table28.A" style:family="table-column">
      <style:table-column-properties style:column-width="6.6667in"/>
    </style:style>
    <style:style style:name="Table28.1" style:family="table-row">
      <style:table-row-properties fo:keep-together="auto"/>
    </style:style>
    <style:style style:name="Table28.A1" style:family="table-cell">
      <style:table-cell-properties style:vertical-align="top" fo:padding="0.0382in" fo:border="0.5pt solid #000000" style:writing-mode="lr-tb"/>
    </style:style>
    <style:style style:name="Table29" style:family="table">
      <style:table-properties style:width="6.6931in" style:rel-width="100%" table:align="left" style:writing-mode="lr-tb"/>
    </style:style>
    <style:style style:name="Table29.A" style:family="table-column">
      <style:table-column-properties style:column-width="2.0063in" style:rel-column-width="2706*"/>
    </style:style>
    <style:style style:name="Table29.B" style:family="table-column">
      <style:table-column-properties style:column-width="4.6868in" style:rel-column-width="6320*"/>
    </style:style>
    <style:style style:name="Table29.1" style:family="table-row">
      <style:table-row-properties fo:keep-together="auto"/>
    </style:style>
    <style:style style:name="Table29.A1" style:family="table-cell">
      <style:table-cell-properties style:vertical-align="top" fo:padding="0.0382in" fo:border-left="0.5pt solid #000000" fo:border-right="none" fo:border-top="0.5pt solid #000000" fo:border-bottom="0.5pt solid #000000" style:writing-mode="lr-tb"/>
    </style:style>
    <style:style style:name="Table29.B1" style:family="table-cell">
      <style:table-cell-properties style:vertical-align="top" fo:padding="0.0382in" fo:border="0.5pt solid #000000" style:writing-mode="lr-tb"/>
    </style:style>
    <style:style style:name="Table29.A2" style:family="table-cell">
      <style:table-cell-properties style:vertical-align="top" fo:padding="0.0382in" fo:border-left="0.5pt solid #000000" fo:border-right="none" fo:border-top="none" fo:border-bottom="0.5pt solid #000000" style:writing-mode="lr-tb"/>
    </style:style>
    <style:style style:name="Table29.B2" style:family="table-cell">
      <style:table-cell-properties style:vertical-align="top" fo:padding="0.0382in" fo:border-left="0.5pt solid #000000" fo:border-right="0.5pt solid #000000" fo:border-top="none" fo:border-bottom="0.5pt solid #000000" style:writing-mode="lr-tb"/>
    </style:style>
    <style:style style:name="Table30" style:family="table">
      <style:table-properties style:width="6.6931in" style:rel-width="100%" table:align="left" style:writing-mode="lr-tb"/>
    </style:style>
    <style:style style:name="Table30.A" style:family="table-column">
      <style:table-column-properties style:column-width="1.8125in" style:rel-column-width="2444*"/>
    </style:style>
    <style:style style:name="Table30.B" style:family="table-column">
      <style:table-column-properties style:column-width="4.8806in" style:rel-column-width="6582*"/>
    </style:style>
    <style:style style:name="Table30.1" style:family="table-row">
      <style:table-row-properties fo:keep-together="auto"/>
    </style:style>
    <style:style style:name="Table30.A1" style:family="table-cell">
      <style:table-cell-properties style:vertical-align="top" fo:padding="0.0382in" fo:border-left="0.5pt solid #000000" fo:border-right="none" fo:border-top="0.5pt solid #000000" fo:border-bottom="0.5pt solid #000000" style:writing-mode="lr-tb"/>
    </style:style>
    <style:style style:name="Table30.B1" style:family="table-cell">
      <style:table-cell-properties style:vertical-align="top" fo:padding="0.0382in" fo:border="0.5pt solid #000000" style:writing-mode="lr-tb"/>
    </style:style>
    <style:style style:name="Table30.A2" style:family="table-cell">
      <style:table-cell-properties style:vertical-align="top" fo:padding="0.0382in" fo:border-left="0.5pt solid #000000" fo:border-right="none" fo:border-top="none" fo:border-bottom="0.5pt solid #000000" style:writing-mode="lr-tb"/>
    </style:style>
    <style:style style:name="Table30.B2" style:family="table-cell">
      <style:table-cell-properties style:vertical-align="top" fo:padding="0.0382in" fo:border-left="0.5pt solid #000000" fo:border-right="0.5pt solid #000000" fo:border-top="none" fo:border-bottom="0.5pt solid #000000" style:writing-mode="lr-tb"/>
    </style:style>
    <style:style style:name="Table31" style:family="table">
      <style:table-properties style:width="6.6931in" style:rel-width="100%" table:align="left" style:writing-mode="lr-tb"/>
    </style:style>
    <style:style style:name="Table31.A" style:family="table-column">
      <style:table-column-properties style:column-width="6.6931in" style:rel-column-width="9026*"/>
    </style:style>
    <style:style style:name="Table31.1" style:family="table-row">
      <style:table-row-properties fo:keep-together="auto"/>
    </style:style>
    <style:style style:name="Table31.A1" style:family="table-cell">
      <style:table-cell-properties style:vertical-align="top" fo:padding="0.0382in" fo:border="0.5pt solid #000000" style:writing-mode="lr-tb"/>
    </style:style>
    <style:style style:name="Table32" style:family="table">
      <style:table-properties style:width="6.6931in" style:rel-width="100%" table:align="left" style:writing-mode="lr-tb"/>
    </style:style>
    <style:style style:name="Table32.A" style:family="table-column">
      <style:table-column-properties style:column-width="1.5757in" style:rel-column-width="2125*"/>
    </style:style>
    <style:style style:name="Table32.B" style:family="table-column">
      <style:table-column-properties style:column-width="5.1174in" style:rel-column-width="6901*"/>
    </style:style>
    <style:style style:name="Table32.1" style:family="table-row">
      <style:table-row-properties fo:keep-together="auto"/>
    </style:style>
    <style:style style:name="Table32.A1" style:family="table-cell">
      <style:table-cell-properties style:vertical-align="top" fo:padding="0.0382in" fo:border-left="0.5pt solid #000000" fo:border-right="none" fo:border-top="0.5pt solid #000000" fo:border-bottom="0.5pt solid #000000" style:writing-mode="lr-tb"/>
    </style:style>
    <style:style style:name="Table32.B1" style:family="table-cell">
      <style:table-cell-properties style:vertical-align="top" fo:padding="0.0382in" fo:border="0.5pt solid #000000" style:writing-mode="lr-tb"/>
    </style:style>
    <style:style style:name="Table32.A2" style:family="table-cell">
      <style:table-cell-properties style:vertical-align="top" fo:padding="0.0382in" fo:border-left="0.5pt solid #000000" fo:border-right="none" fo:border-top="none" fo:border-bottom="0.5pt solid #000000" style:writing-mode="lr-tb"/>
    </style:style>
    <style:style style:name="Table32.B2" style:family="table-cell">
      <style:table-cell-properties style:vertical-align="top" fo:padding="0.0382in" fo:border-left="0.5pt solid #000000" fo:border-right="0.5pt solid #000000" fo:border-top="none" fo:border-bottom="0.5pt solid #000000" style:writing-mode="lr-tb"/>
    </style:style>
    <style:style style:name="Table33" style:family="table">
      <style:table-properties style:width="6.6931in" style:rel-width="100%" table:align="left" style:writing-mode="lr-tb"/>
    </style:style>
    <style:style style:name="Table33.A" style:family="table-column">
      <style:table-column-properties style:column-width="6.6931in" style:rel-column-width="9026*"/>
    </style:style>
    <style:style style:name="Table33.1" style:family="table-row">
      <style:table-row-properties fo:keep-together="auto"/>
    </style:style>
    <style:style style:name="Table33.A1" style:family="table-cell">
      <style:table-cell-properties style:vertical-align="top" fo:padding="0.0382in" fo:border="0.5pt solid #000000" style:writing-mode="lr-tb"/>
    </style:style>
    <style:style style:name="Table34" style:family="table">
      <style:table-properties style:width="6.6931in" style:rel-width="100%" table:align="left" style:writing-mode="lr-tb"/>
    </style:style>
    <style:style style:name="Table34.A" style:family="table-column">
      <style:table-column-properties style:column-width="6.6931in" style:rel-column-width="9026*"/>
    </style:style>
    <style:style style:name="Table34.1" style:family="table-row">
      <style:table-row-properties fo:keep-together="auto"/>
    </style:style>
    <style:style style:name="Table34.A1" style:family="table-cell">
      <style:table-cell-properties style:vertical-align="top" fo:padding="0.0382in" fo:border="0.5pt solid #000000" style:writing-mode="lr-tb"/>
    </style:style>
    <style:style style:name="Table35" style:family="table">
      <style:table-properties style:width="6.6931in" style:rel-width="100%" table:align="left" style:writing-mode="lr-tb"/>
    </style:style>
    <style:style style:name="Table35.A" style:family="table-column">
      <style:table-column-properties style:column-width="6.6931in" style:rel-column-width="9026*"/>
    </style:style>
    <style:style style:name="Table35.1" style:family="table-row">
      <style:table-row-properties fo:keep-together="auto"/>
    </style:style>
    <style:style style:name="Table35.A1" style:family="table-cell">
      <style:table-cell-properties style:vertical-align="top" fo:padding="0.0382in" fo:border="0.5pt solid #000000" style:writing-mode="lr-tb"/>
    </style:style>
    <style:style style:name="Table36" style:family="table">
      <style:table-properties style:width="6.6931in" style:rel-width="100%" table:align="left" style:writing-mode="lr-tb"/>
    </style:style>
    <style:style style:name="Table36.A" style:family="table-column">
      <style:table-column-properties style:column-width="6.6931in" style:rel-column-width="9026*"/>
    </style:style>
    <style:style style:name="Table36.1" style:family="table-row">
      <style:table-row-properties fo:keep-together="auto"/>
    </style:style>
    <style:style style:name="Table36.A1" style:family="table-cell">
      <style:table-cell-properties style:vertical-align="top" fo:padding="0.0382in" fo:border="0.5pt solid #000000" style:writing-mode="lr-tb"/>
    </style:style>
    <style:style style:name="Table37" style:family="table">
      <style:table-properties style:width="6.6931in" style:rel-width="100%" table:align="left" style:writing-mode="lr-tb"/>
    </style:style>
    <style:style style:name="Table37.A" style:family="table-column">
      <style:table-column-properties style:column-width="6.6931in" style:rel-column-width="9026*"/>
    </style:style>
    <style:style style:name="Table37.1" style:family="table-row">
      <style:table-row-properties fo:keep-together="auto"/>
    </style:style>
    <style:style style:name="Table37.A1" style:family="table-cell">
      <style:table-cell-properties style:vertical-align="top" fo:padding="0.0382in" fo:border="0.5pt solid #000000" style:writing-mode="lr-tb"/>
    </style:style>
    <style:style style:name="Table38" style:family="table">
      <style:table-properties style:width="6.6931in" style:rel-width="100%" table:align="left" style:writing-mode="lr-tb"/>
    </style:style>
    <style:style style:name="Table38.A" style:family="table-column">
      <style:table-column-properties style:column-width="6.6931in" style:rel-column-width="9026*"/>
    </style:style>
    <style:style style:name="Table38.1" style:family="table-row">
      <style:table-row-properties fo:keep-together="auto"/>
    </style:style>
    <style:style style:name="Table38.A1" style:family="table-cell">
      <style:table-cell-properties style:vertical-align="top" fo:padding="0.0382in" fo:border="0.5pt solid #000000" style:writing-mode="lr-tb"/>
    </style:style>
    <style:style style:name="Table39" style:family="table">
      <style:table-properties style:width="6.6931in" style:rel-width="100%" table:align="left" style:writing-mode="lr-tb"/>
    </style:style>
    <style:style style:name="Table39.A" style:family="table-column">
      <style:table-column-properties style:column-width="6.6931in" style:rel-column-width="9026*"/>
    </style:style>
    <style:style style:name="Table39.1" style:family="table-row">
      <style:table-row-properties fo:keep-together="auto"/>
    </style:style>
    <style:style style:name="Table39.A1" style:family="table-cell">
      <style:table-cell-properties style:vertical-align="top" fo:padding="0.0382in" fo:border="0.5pt solid #000000" style:writing-mode="lr-tb"/>
    </style:style>
    <style:style style:name="Table40" style:family="table">
      <style:table-properties style:width="6.6931in" style:rel-width="100%" table:align="left" style:writing-mode="lr-tb"/>
    </style:style>
    <style:style style:name="Table40.A" style:family="table-column">
      <style:table-column-properties style:column-width="6.6931in" style:rel-column-width="9026*"/>
    </style:style>
    <style:style style:name="Table40.1" style:family="table-row">
      <style:table-row-properties fo:keep-together="auto"/>
    </style:style>
    <style:style style:name="Table40.A1" style:family="table-cell">
      <style:table-cell-properties style:vertical-align="top" fo:padding="0.0382in" fo:border="0.5pt solid #000000" style:writing-mode="lr-tb"/>
    </style:style>
    <style:style style:name="Table41" style:family="table">
      <style:table-properties style:width="6.6931in" style:rel-width="100%" table:align="left" style:writing-mode="lr-tb"/>
    </style:style>
    <style:style style:name="Table41.A" style:family="table-column">
      <style:table-column-properties style:column-width="6.6931in" style:rel-column-width="9026*"/>
    </style:style>
    <style:style style:name="Table41.1" style:family="table-row">
      <style:table-row-properties fo:keep-together="auto"/>
    </style:style>
    <style:style style:name="Table41.A1" style:family="table-cell">
      <style:table-cell-properties style:vertical-align="top" fo:padding="0.0382in" fo:border="0.5pt solid #000000" style:writing-mode="lr-tb"/>
    </style:style>
    <style:style style:name="Table42" style:family="table">
      <style:table-properties style:width="6.6931in" style:rel-width="100%" table:align="left" style:writing-mode="lr-tb"/>
    </style:style>
    <style:style style:name="Table42.A" style:family="table-column">
      <style:table-column-properties style:column-width="6.6931in" style:rel-column-width="9026*"/>
    </style:style>
    <style:style style:name="Table42.1" style:family="table-row">
      <style:table-row-properties fo:keep-together="auto"/>
    </style:style>
    <style:style style:name="Table42.A1" style:family="table-cell">
      <style:table-cell-properties style:vertical-align="top" fo:padding="0.0382in" fo:border="0.5pt solid #000000" style:writing-mode="lr-tb"/>
    </style:style>
    <style:style style:name="Table43" style:family="table">
      <style:table-properties style:width="6.6931in" style:rel-width="100%" table:align="left" style:writing-mode="lr-tb"/>
    </style:style>
    <style:style style:name="Table43.A" style:family="table-column">
      <style:table-column-properties style:column-width="6.6931in" style:rel-column-width="9026*"/>
    </style:style>
    <style:style style:name="Table43.1" style:family="table-row">
      <style:table-row-properties fo:keep-together="auto"/>
    </style:style>
    <style:style style:name="Table43.A1" style:family="table-cell">
      <style:table-cell-properties style:vertical-align="top" fo:padding="0.0382in" fo:border="0.5pt solid #000000" style:writing-mode="lr-tb"/>
    </style:style>
    <style:style style:name="Table44" style:family="table">
      <style:table-properties style:width="4.1667in" fo:margin-left="1.5597in" table:align="left" style:writing-mode="lr-tb"/>
    </style:style>
    <style:style style:name="Table44.A" style:family="table-column">
      <style:table-column-properties style:column-width="0.9806in"/>
    </style:style>
    <style:style style:name="Table44.B" style:family="table-column">
      <style:table-column-properties style:column-width="0.8729in"/>
    </style:style>
    <style:style style:name="Table44.C" style:family="table-column">
      <style:table-column-properties style:column-width="2.3132in"/>
    </style:style>
    <style:style style:name="Table44.1" style:family="table-row">
      <style:table-row-properties fo:keep-together="auto"/>
    </style:style>
    <style:style style:name="Table44.A1" style:family="table-cell">
      <style:table-cell-properties style:vertical-align="top" fo:padding="0.0382in" fo:border-left="0.5pt solid #000000" fo:border-right="none" fo:border-top="0.5pt solid #000000" fo:border-bottom="0.5pt solid #000000" style:writing-mode="lr-tb"/>
    </style:style>
    <style:style style:name="Table44.C1" style:family="table-cell">
      <style:table-cell-properties style:vertical-align="top" fo:padding="0.0382in" fo:border="0.5pt solid #000000" style:writing-mode="lr-tb"/>
    </style:style>
    <style:style style:name="Table44.A2" style:family="table-cell">
      <style:table-cell-properties style:vertical-align="top" fo:padding="0.0382in" fo:border-left="0.5pt solid #000000" fo:border-right="none" fo:border-top="none" fo:border-bottom="0.5pt solid #000000" style:writing-mode="lr-tb"/>
    </style:style>
    <style:style style:name="Table44.C2" style:family="table-cell">
      <style:table-cell-properties style:vertical-align="top" fo:padding="0.0382in" fo:border-left="0.5pt solid #000000" fo:border-right="0.5pt solid #000000" fo:border-top="none" fo:border-bottom="0.5pt solid #000000" style:writing-mode="lr-tb"/>
    </style:style>
    <style:style style:name="Table45" style:family="table">
      <style:table-properties style:width="6.6931in" style:rel-width="100%" table:align="left" style:writing-mode="lr-tb"/>
    </style:style>
    <style:style style:name="Table45.A" style:family="table-column">
      <style:table-column-properties style:column-width="6.6931in" style:rel-column-width="9026*"/>
    </style:style>
    <style:style style:name="Table45.1" style:family="table-row">
      <style:table-row-properties fo:keep-together="auto"/>
    </style:style>
    <style:style style:name="Table45.A1" style:family="table-cell">
      <style:table-cell-properties style:vertical-align="top" fo:padding="0.0382in" fo:border="0.5pt solid #000000" style:writing-mode="lr-tb"/>
    </style:style>
    <style:style style:name="Table46" style:family="table">
      <style:table-properties style:width="6.6931in" style:rel-width="100%" table:align="left" style:writing-mode="lr-tb"/>
    </style:style>
    <style:style style:name="Table46.A" style:family="table-column">
      <style:table-column-properties style:column-width="6.6931in" style:rel-column-width="9026*"/>
    </style:style>
    <style:style style:name="Table46.1" style:family="table-row">
      <style:table-row-properties fo:keep-together="auto"/>
    </style:style>
    <style:style style:name="Table46.A1" style:family="table-cell">
      <style:table-cell-properties style:vertical-align="top" fo:padding="0.0382in" fo:border="0.5pt solid #000000" style:writing-mode="lr-tb"/>
    </style:style>
    <style:style style:name="Table47" style:family="table">
      <style:table-properties style:width="2.6736in" fo:margin-left="2.3167in" table:align="left" style:writing-mode="lr-tb"/>
    </style:style>
    <style:style style:name="Table47.A" style:family="table-column">
      <style:table-column-properties style:column-width="0.7917in"/>
    </style:style>
    <style:style style:name="Table47.B" style:family="table-column">
      <style:table-column-properties style:column-width="1.8819in"/>
    </style:style>
    <style:style style:name="Table47.1" style:family="table-row">
      <style:table-row-properties fo:keep-together="auto"/>
    </style:style>
    <style:style style:name="Table47.A1" style:family="table-cell">
      <style:table-cell-properties style:vertical-align="top" fo:padding="0.0382in" fo:border-left="0.5pt solid #000000" fo:border-right="none" fo:border-top="0.5pt solid #000000" fo:border-bottom="0.5pt solid #000000" style:writing-mode="lr-tb"/>
    </style:style>
    <style:style style:name="Table47.B1" style:family="table-cell">
      <style:table-cell-properties style:vertical-align="top" fo:padding="0.0382in" fo:border="0.5pt solid #000000" style:writing-mode="lr-tb"/>
    </style:style>
    <style:style style:name="Table47.A2" style:family="table-cell">
      <style:table-cell-properties style:vertical-align="top" fo:padding="0.0382in" fo:border-left="0.5pt solid #000000" fo:border-right="none" fo:border-top="none" fo:border-bottom="0.5pt solid #000000" style:writing-mode="lr-tb"/>
    </style:style>
    <style:style style:name="Table47.B2" style:family="table-cell">
      <style:table-cell-properties style:vertical-align="top" fo:padding="0.0382in" fo:border-left="0.5pt solid #000000" fo:border-right="0.5pt solid #000000" fo:border-top="none" fo:border-bottom="0.5pt solid #000000" style:writing-mode="lr-tb"/>
    </style:style>
    <style:style style:name="Table48" style:family="table">
      <style:table-properties style:width="2.2431in" fo:margin-left="2.2611in" table:align="left" style:writing-mode="lr-tb"/>
    </style:style>
    <style:style style:name="Table48.A" style:family="table-column">
      <style:table-column-properties style:column-width="0.5486in"/>
    </style:style>
    <style:style style:name="Table48.B" style:family="table-column">
      <style:table-column-properties style:column-width="1.4167in"/>
    </style:style>
    <style:style style:name="Table48.C" style:family="table-column">
      <style:table-column-properties style:column-width="0.2778in"/>
    </style:style>
    <style:style style:name="Table48.1" style:family="table-row">
      <style:table-row-properties fo:keep-together="auto"/>
    </style:style>
    <style:style style:name="Table48.A1" style:family="table-cell">
      <style:table-cell-properties style:vertical-align="top" fo:padding="0.0382in" fo:border-left="0.5pt solid #000000" fo:border-right="none" fo:border-top="0.5pt solid #000000" fo:border-bottom="0.5pt solid #000000" style:writing-mode="lr-tb"/>
    </style:style>
    <style:style style:name="Table48.C1" style:family="table-cell">
      <style:table-cell-properties style:vertical-align="top" fo:padding="0.0382in" fo:border="0.5pt solid #000000" style:writing-mode="lr-tb"/>
    </style:style>
    <style:style style:name="Table48.A2" style:family="table-cell">
      <style:table-cell-properties style:vertical-align="top" fo:padding="0.0382in" fo:border-left="0.5pt solid #000000" fo:border-right="none" fo:border-top="none" fo:border-bottom="0.5pt solid #000000" style:writing-mode="lr-tb"/>
    </style:style>
    <style:style style:name="Table48.C2" style:family="table-cell">
      <style:table-cell-properties style:vertical-align="top" fo:padding="0.0382in" fo:border-left="0.5pt solid #000000" fo:border-right="0.5pt solid #000000" fo:border-top="none" fo:border-bottom="0.5pt solid #000000" style:writing-mode="lr-tb"/>
    </style:style>
    <style:style style:name="Table49" style:family="table">
      <style:table-properties style:width="4.0833in" fo:margin-left="1.5389in" table:align="left" style:writing-mode="lr-tb"/>
    </style:style>
    <style:style style:name="Table49.A" style:family="table-column">
      <style:table-column-properties style:column-width="0.6597in"/>
    </style:style>
    <style:style style:name="Table49.B" style:family="table-column">
      <style:table-column-properties style:column-width="1.1458in"/>
    </style:style>
    <style:style style:name="Table49.C" style:family="table-column">
      <style:table-column-properties style:column-width="0.7431in"/>
    </style:style>
    <style:style style:name="Table49.D" style:family="table-column">
      <style:table-column-properties style:column-width="1.5347in"/>
    </style:style>
    <style:style style:name="Table49.1" style:family="table-row">
      <style:table-row-properties fo:keep-together="auto"/>
    </style:style>
    <style:style style:name="Table49.A1" style:family="table-cell">
      <style:table-cell-properties style:vertical-align="top" fo:padding="0.0382in" fo:border-left="0.5pt solid #000000" fo:border-right="none" fo:border-top="0.5pt solid #000000" fo:border-bottom="0.5pt solid #000000" style:writing-mode="lr-tb"/>
    </style:style>
    <style:style style:name="Table49.D1" style:family="table-cell">
      <style:table-cell-properties style:vertical-align="top" fo:padding="0.0382in" fo:border="0.5pt solid #000000" style:writing-mode="lr-tb"/>
    </style:style>
    <style:style style:name="Table49.A2" style:family="table-cell">
      <style:table-cell-properties style:vertical-align="top" fo:padding="0.0382in" fo:border-left="0.5pt solid #000000" fo:border-right="none" fo:border-top="none" fo:border-bottom="0.5pt solid #000000" style:writing-mode="lr-tb"/>
    </style:style>
    <style:style style:name="Table49.D2" style:family="table-cell">
      <style:table-cell-properties style:vertical-align="top" fo:padding="0.0382in" fo:border-left="0.5pt solid #000000" fo:border-right="0.5pt solid #000000" fo:border-top="none" fo:border-bottom="0.5pt solid #000000" style:writing-mode="lr-tb"/>
    </style:style>
    <style:style style:name="Table50" style:family="table">
      <style:table-properties style:width="5.3681in" fo:margin-left="1.2333in" table:align="left" style:writing-mode="lr-tb"/>
    </style:style>
    <style:style style:name="Table50.A" style:family="table-column">
      <style:table-column-properties style:column-width="0.7917in"/>
    </style:style>
    <style:style style:name="Table50.B" style:family="table-column">
      <style:table-column-properties style:column-width="4.5764in"/>
    </style:style>
    <style:style style:name="Table50.1" style:family="table-row">
      <style:table-row-properties fo:keep-together="auto"/>
    </style:style>
    <style:style style:name="Table50.A1" style:family="table-cell">
      <style:table-cell-properties style:vertical-align="top" fo:padding="0.0382in" fo:border-left="0.5pt solid #000000" fo:border-right="none" fo:border-top="0.5pt solid #000000" fo:border-bottom="0.5pt solid #000000" style:writing-mode="lr-tb"/>
    </style:style>
    <style:style style:name="Table50.B1" style:family="table-cell">
      <style:table-cell-properties style:vertical-align="top" fo:padding="0.0382in" fo:border="0.5pt solid #000000" style:writing-mode="lr-tb"/>
    </style:style>
    <style:style style:name="Table50.A2" style:family="table-cell">
      <style:table-cell-properties style:vertical-align="top" fo:padding="0.0382in" fo:border-left="0.5pt solid #000000" fo:border-right="none" fo:border-top="none" fo:border-bottom="0.5pt solid #000000" style:writing-mode="lr-tb"/>
    </style:style>
    <style:style style:name="Table50.B2" style:family="table-cell">
      <style:table-cell-properties style:vertical-align="top" fo:padding="0.0382in" fo:border-left="0.5pt solid #000000" fo:border-right="0.5pt solid #000000" fo:border-top="none" fo:border-bottom="0.5pt solid #000000" style:writing-mode="lr-tb"/>
    </style:style>
    <style:style style:name="Table51" style:family="table">
      <style:table-properties style:width="6.6931in" style:rel-width="100%" table:align="left" style:writing-mode="lr-tb"/>
    </style:style>
    <style:style style:name="Table51.A" style:family="table-column">
      <style:table-column-properties style:column-width="6.6931in" style:rel-column-width="9026*"/>
    </style:style>
    <style:style style:name="Table51.1" style:family="table-row">
      <style:table-row-properties fo:keep-together="auto"/>
    </style:style>
    <style:style style:name="Table51.A1" style:family="table-cell">
      <style:table-cell-properties style:vertical-align="top" fo:padding="0.0382in" fo:border="0.5pt solid #000000" style:writing-mode="lr-tb"/>
    </style:style>
    <style:style style:name="Table52" style:family="table">
      <style:table-properties style:width="4.4097in" fo:margin-left="1.4208in" table:align="left" style:writing-mode="lr-tb"/>
    </style:style>
    <style:style style:name="Table52.A" style:family="table-column">
      <style:table-column-properties style:column-width="1.4167in"/>
    </style:style>
    <style:style style:name="Table52.B" style:family="table-column">
      <style:table-column-properties style:column-width="2.9931in"/>
    </style:style>
    <style:style style:name="Table52.1" style:family="table-row">
      <style:table-row-properties fo:keep-together="auto"/>
    </style:style>
    <style:style style:name="Table52.A1" style:family="table-cell">
      <style:table-cell-properties style:vertical-align="top" fo:padding="0.0382in" fo:border-left="0.5pt solid #000000" fo:border-right="none" fo:border-top="0.5pt solid #000000" fo:border-bottom="0.5pt solid #000000" style:writing-mode="lr-tb"/>
    </style:style>
    <style:style style:name="Table52.B1" style:family="table-cell">
      <style:table-cell-properties style:vertical-align="top" fo:padding="0.0382in" fo:border="0.5pt solid #000000" style:writing-mode="lr-tb"/>
    </style:style>
    <style:style style:name="Table52.A2" style:family="table-cell">
      <style:table-cell-properties style:vertical-align="top" fo:padding="0.0382in" fo:border-left="0.5pt solid #000000" fo:border-right="none" fo:border-top="none" fo:border-bottom="0.5pt solid #000000" style:writing-mode="lr-tb"/>
    </style:style>
    <style:style style:name="Table52.B2" style:family="table-cell">
      <style:table-cell-properties style:vertical-align="top" fo:padding="0.0382in" fo:border-left="0.5pt solid #000000" fo:border-right="0.5pt solid #000000" fo:border-top="none" fo:border-bottom="0.5pt solid #000000" style:writing-mode="lr-tb"/>
    </style:style>
    <style:style style:name="Table53" style:family="table">
      <style:table-properties style:width="6.6931in" style:rel-width="100%" table:align="left" style:writing-mode="lr-tb"/>
    </style:style>
    <style:style style:name="Table53.A" style:family="table-column">
      <style:table-column-properties style:column-width="6.6931in" style:rel-column-width="9026*"/>
    </style:style>
    <style:style style:name="Table53.1" style:family="table-row">
      <style:table-row-properties fo:keep-together="auto"/>
    </style:style>
    <style:style style:name="Table53.A1" style:family="table-cell">
      <style:table-cell-properties style:vertical-align="top" fo:padding="0.0382in" fo:border="0.5pt solid #000000" style:writing-mode="lr-tb"/>
    </style:style>
    <style:style style:name="P1" style:family="paragraph" style:parent-style-name="Standard">
      <style:paragraph-properties fo:text-align="center" style:justify-single-word="false"/>
      <style:text-properties fo:font-size="16pt" fo:font-weight="bold" officeooo:rsid="001f978e" officeooo:paragraph-rsid="001f978e"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20pt" fo:font-weight="bold" officeooo:rsid="001f978e" officeooo:paragraph-rsid="001f978e" style:font-size-asian="20pt" style:font-weight-asian="bold" style:font-size-complex="20pt" style:font-weight-complex="bold"/>
    </style:style>
    <style:style style:name="P3" style:family="paragraph" style:parent-style-name="Standard">
      <style:paragraph-properties fo:text-align="center" style:justify-single-word="false"/>
      <style:text-properties fo:font-size="20pt" fo:font-weight="normal" officeooo:rsid="001f978e" officeooo:paragraph-rsid="001f978e" style:font-size-asian="20pt" style:font-weight-asian="normal" style:font-size-complex="20pt" style:font-weight-complex="normal"/>
    </style:style>
    <style:style style:name="P4" style:family="paragraph" style:parent-style-name="Standard">
      <style:paragraph-properties fo:text-align="justify" style:justify-single-word="false"/>
      <style:text-properties fo:font-size="14pt" fo:font-weight="normal" officeooo:rsid="001f978e" officeooo:paragraph-rsid="001f978e" style:font-size-asian="12.25pt" style:font-weight-asian="normal" style:font-size-complex="14pt" style:font-weight-complex="normal"/>
    </style:style>
    <style:style style:name="P5" style:family="paragraph" style:parent-style-name="Standard">
      <style:paragraph-properties fo:text-align="justify" style:justify-single-word="false"/>
      <style:text-properties fo:font-size="16pt" fo:font-weight="bold" officeooo:rsid="001f978e" officeooo:paragraph-rsid="001f978e" style:font-size-asian="16pt" style:font-weight-asian="bold" style:font-size-complex="16pt" style:font-weight-complex="bold"/>
    </style:style>
    <style:style style:name="P6" style:family="paragraph" style:parent-style-name="Standard">
      <style:paragraph-properties fo:text-align="justify" style:justify-single-word="false"/>
      <style:text-properties fo:font-size="14pt" fo:font-weight="normal" officeooo:rsid="002f5f66" officeooo:paragraph-rsid="002f5f66" style:font-size-asian="12.25pt" style:font-weight-asian="normal" style:font-size-complex="14pt" style:font-weight-complex="normal"/>
    </style:style>
    <style:style style:name="P7" style:family="paragraph" style:parent-style-name="Standard">
      <style:paragraph-properties fo:text-align="justify" style:justify-single-word="false"/>
      <style:text-properties fo:font-size="14pt" fo:font-weight="normal" officeooo:rsid="001f978e" officeooo:paragraph-rsid="002c3b03" style:font-size-asian="12.25pt" style:font-weight-asian="normal" style:font-size-complex="14pt" style:font-weight-complex="normal"/>
    </style:style>
    <style:style style:name="P8" style:family="paragraph" style:parent-style-name="Standard">
      <style:text-properties officeooo:paragraph-rsid="002f5f66"/>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2">
      <style:text-properties officeooo:paragraph-rsid="003c4382"/>
    </style:style>
    <style:style style:name="P12" style:family="paragraph" style:parent-style-name="Standard">
      <style:text-properties style:font-name="Liberation Serif"/>
    </style:style>
    <style:style style:name="P13" style:family="paragraph" style:parent-style-name="Standard">
      <style:paragraph-properties fo:text-align="justify" style:justify-single-word="false"/>
      <style:text-properties officeooo:paragraph-rsid="001f978e"/>
    </style:style>
    <style:style style:name="P14" style:family="paragraph" style:parent-style-name="Standard" style:list-style-name="L3"/>
    <style:style style:name="P15" style:family="paragraph" style:parent-style-name="Standard" style:list-style-name="L4"/>
    <style:style style:name="P16" style:family="paragraph" style:parent-style-name="Standard" style:list-style-name="L5"/>
    <style:style style:name="P17" style:family="paragraph" style:parent-style-name="Standard" style:list-style-name="L6"/>
    <style:style style:name="P18" style:family="paragraph" style:parent-style-name="Standard">
      <style:paragraph-properties fo:text-align="justify" style:justify-single-word="false"/>
      <style:text-properties officeooo:paragraph-rsid="0020e2f6"/>
    </style:style>
    <style:style style:name="P19" style:family="paragraph" style:parent-style-name="Standard" style:list-style-name="L7"/>
    <style:style style:name="P20" style:family="paragraph" style:parent-style-name="Standard" style:list-style-name="L8"/>
    <style:style style:name="P21" style:family="paragraph" style:parent-style-name="Standard" style:list-style-name="L9"/>
    <style:style style:name="P22" style:family="paragraph" style:parent-style-name="Standard">
      <style:paragraph-properties fo:text-align="justify" style:justify-single-word="false"/>
      <style:text-properties fo:font-size="16pt" officeooo:paragraph-rsid="0020e2f6" style:font-size-asian="16pt" style:font-size-complex="16pt"/>
    </style:style>
    <style:style style:name="P23" style:family="paragraph" style:parent-style-name="Standard">
      <style:paragraph-properties fo:text-align="justify" style:justify-single-word="false"/>
      <style:text-properties fo:font-size="14pt" fo:font-weight="bold" officeooo:rsid="0020e2f6" officeooo:paragraph-rsid="0020e2f6" style:font-size-asian="12.25pt" style:font-weight-asian="bold" style:font-size-complex="14pt" style:font-weight-complex="bold"/>
    </style:style>
    <style:style style:name="P24" style:family="paragraph" style:parent-style-name="Standard">
      <style:paragraph-properties fo:text-align="justify" style:justify-single-word="false"/>
      <style:text-properties fo:font-size="13pt" fo:font-style="italic" fo:font-weight="bold" officeooo:rsid="0020e2f6" officeooo:paragraph-rsid="0020e2f6" style:font-size-asian="11.3500003814697pt" style:font-style-asian="italic" style:font-weight-asian="bold" style:font-size-complex="13pt" style:font-style-complex="italic" style:font-weight-complex="bold"/>
    </style:style>
    <style:style style:name="P25" style:family="paragraph" style:parent-style-name="Standard">
      <style:paragraph-properties fo:text-align="justify" style:justify-single-word="false"/>
      <style:text-properties fo:font-size="12pt" fo:font-style="normal" fo:font-weight="normal" officeooo:rsid="0021fd63" officeooo:paragraph-rsid="0021fd63"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justify" style:justify-single-word="false"/>
      <style:text-properties fo:font-size="16pt" fo:font-style="normal" fo:font-weight="bold" officeooo:rsid="00225b0b" officeooo:paragraph-rsid="00225b0b" style:font-size-asian="16pt" style:font-style-asian="normal" style:font-weight-asian="bold" style:font-size-complex="16pt" style:font-style-complex="normal" style:font-weight-complex="bold"/>
    </style:style>
    <style:style style:name="P27" style:family="paragraph" style:parent-style-name="Standard">
      <style:paragraph-properties fo:text-align="left" style:justify-single-word="false"/>
      <style:text-properties fo:font-size="14pt" fo:font-weight="bold" officeooo:rsid="08142063" officeooo:paragraph-rsid="00225b0b" style:font-size-asian="14pt" style:font-weight-asian="bold" style:font-size-complex="14pt" style:font-weight-complex="bold"/>
    </style:style>
    <style:style style:name="P28" style:family="paragraph" style:parent-style-name="Standard">
      <style:paragraph-properties fo:text-align="left" style:justify-single-word="false"/>
      <style:text-properties fo:font-size="13pt" fo:font-weight="bold" officeooo:rsid="08142063" officeooo:paragraph-rsid="00225b0b" style:font-size-asian="11.3500003814697pt" style:font-weight-asian="bold" style:font-size-complex="13pt" style:font-weight-complex="bold"/>
    </style:style>
    <style:style style:name="P29" style:family="paragraph" style:parent-style-name="Standard">
      <style:paragraph-properties fo:text-align="justify" style:justify-single-word="false"/>
      <style:text-properties fo:font-size="14pt" fo:font-weight="normal" officeooo:rsid="0069734c" officeooo:paragraph-rsid="00225b0b" style:font-size-asian="14pt" style:font-weight-asian="normal" style:font-size-complex="14pt" style:font-weight-complex="normal"/>
    </style:style>
    <style:style style:name="P30" style:family="paragraph" style:parent-style-name="Standard">
      <style:paragraph-properties fo:text-align="justify" style:justify-single-word="false"/>
      <style:text-properties fo:font-size="13pt" fo:font-weight="normal" officeooo:rsid="0024c6a2" officeooo:paragraph-rsid="00225b0b" style:font-size-asian="13pt" style:font-weight-asian="normal" style:font-size-complex="13pt" style:font-weight-complex="normal"/>
    </style:style>
    <style:style style:name="P31" style:family="paragraph" style:parent-style-name="Standard">
      <style:paragraph-properties fo:text-align="justify" style:justify-single-word="false"/>
      <style:text-properties fo:font-size="13pt" fo:font-weight="normal" officeooo:rsid="002b79c2" officeooo:paragraph-rsid="00225b0b" style:font-size-asian="13pt" style:font-weight-asian="normal" style:font-size-complex="13pt" style:font-weight-complex="normal"/>
    </style:style>
    <style:style style:name="P32" style:family="paragraph" style:parent-style-name="Standard">
      <style:paragraph-properties fo:text-align="justify" style:justify-single-word="false"/>
      <style:text-properties fo:font-size="13pt" fo:font-weight="normal" officeooo:rsid="041ca23c" officeooo:paragraph-rsid="00225b0b" style:font-size-asian="13pt" style:font-weight-asian="normal" style:font-size-complex="13pt" style:font-weight-complex="normal"/>
    </style:style>
    <style:style style:name="P33" style:family="paragraph" style:parent-style-name="Standard">
      <style:paragraph-properties fo:text-align="justify" style:justify-single-word="false"/>
      <style:text-properties fo:font-size="13pt" fo:font-weight="normal" officeooo:rsid="05bc05ed" officeooo:paragraph-rsid="00225b0b" style:font-size-asian="13pt" style:font-weight-asian="normal" style:font-size-complex="13pt" style:font-weight-complex="normal"/>
    </style:style>
    <style:style style:name="P34" style:family="paragraph" style:parent-style-name="Standard">
      <style:paragraph-properties fo:text-align="justify" style:justify-single-word="false"/>
      <style:text-properties fo:font-size="13pt" fo:font-weight="normal" officeooo:rsid="022f6448" officeooo:paragraph-rsid="00225b0b" style:font-size-asian="13pt" style:font-weight-asian="normal" style:font-size-complex="13pt" style:font-weight-complex="normal"/>
    </style:style>
    <style:style style:name="P35" style:family="paragraph" style:parent-style-name="Standard">
      <style:paragraph-properties fo:text-align="justify" style:justify-single-word="false"/>
      <style:text-properties fo:font-size="13pt" fo:font-weight="normal" officeooo:rsid="0028f9b0" officeooo:paragraph-rsid="00225b0b" style:font-size-asian="13pt" style:font-weight-asian="normal" style:font-size-complex="13pt" style:font-weight-complex="normal"/>
    </style:style>
    <style:style style:name="P36" style:family="paragraph" style:parent-style-name="Standard">
      <style:paragraph-properties fo:text-align="justify" style:justify-single-word="false"/>
      <style:text-properties fo:font-size="13pt" fo:font-weight="normal" officeooo:rsid="06a6b977" officeooo:paragraph-rsid="00225b0b" style:font-size-asian="13pt" style:font-weight-asian="normal" style:font-size-complex="13pt" style:font-weight-complex="normal"/>
    </style:style>
    <style:style style:name="P37" style:family="paragraph" style:parent-style-name="Standard">
      <style:paragraph-properties fo:text-align="justify" style:justify-single-word="false"/>
      <style:text-properties fo:font-size="13pt" fo:font-weight="normal" officeooo:rsid="02391998" officeooo:paragraph-rsid="00225b0b" style:font-size-asian="13pt" style:font-weight-asian="normal" style:font-size-complex="13pt" style:font-weight-complex="normal"/>
    </style:style>
    <style:style style:name="P38" style:family="paragraph" style:parent-style-name="Standard">
      <style:paragraph-properties fo:text-align="justify" style:justify-single-word="false"/>
      <style:text-properties fo:font-size="13pt" fo:font-weight="normal" officeooo:rsid="066cfbbe" officeooo:paragraph-rsid="00225b0b" style:font-size-asian="13pt" style:font-weight-asian="normal" style:font-size-complex="13pt" style:font-weight-complex="normal"/>
    </style:style>
    <style:style style:name="P39" style:family="paragraph" style:parent-style-name="Standard">
      <style:paragraph-properties fo:text-align="justify" style:justify-single-word="false"/>
      <style:text-properties fo:font-size="13pt" fo:font-weight="normal" officeooo:rsid="023abbef" officeooo:paragraph-rsid="00225b0b" style:font-size-asian="13pt" style:font-weight-asian="normal" style:font-size-complex="13pt" style:font-weight-complex="normal"/>
    </style:style>
    <style:style style:name="P40" style:family="paragraph" style:parent-style-name="Standard">
      <style:paragraph-properties fo:text-align="justify" style:justify-single-word="false"/>
      <style:text-properties officeooo:paragraph-rsid="00225b0b"/>
    </style:style>
    <style:style style:name="P41" style:family="paragraph" style:parent-style-name="Standard">
      <style:paragraph-properties fo:text-align="justify" style:justify-single-word="false"/>
      <style:text-properties fo:font-size="13pt" fo:font-weight="normal" officeooo:rsid="0459d7a3" officeooo:paragraph-rsid="00225b0b" style:font-size-asian="13pt" style:font-weight-asian="normal" style:font-size-complex="13pt" style:font-weight-complex="normal"/>
    </style:style>
    <style:style style:name="P42" style:family="paragraph" style:parent-style-name="Standard">
      <style:paragraph-properties fo:text-align="justify" style:justify-single-word="false"/>
      <style:text-properties fo:font-size="13pt" fo:font-weight="normal" officeooo:rsid="002b451b" officeooo:paragraph-rsid="00225b0b" style:font-size-asian="13pt" style:font-weight-asian="normal" style:font-size-complex="13pt" style:font-weight-complex="normal"/>
    </style:style>
    <style:style style:name="P43" style:family="paragraph" style:parent-style-name="Standard">
      <style:paragraph-properties fo:text-align="justify" style:justify-single-word="false"/>
      <style:text-properties fo:font-size="13pt" fo:font-weight="normal" officeooo:rsid="07abb34e" officeooo:paragraph-rsid="00225b0b" style:font-size-asian="13pt" style:font-weight-asian="normal" style:font-size-complex="13pt" style:font-weight-complex="normal"/>
    </style:style>
    <style:style style:name="P44" style:family="paragraph" style:parent-style-name="Standard">
      <style:paragraph-properties fo:text-align="justify" style:justify-single-word="false"/>
      <style:text-properties fo:font-size="13pt" fo:font-weight="normal" officeooo:rsid="05d29cca" officeooo:paragraph-rsid="00225b0b" style:font-size-asian="13pt" style:font-weight-asian="normal" style:font-size-complex="13pt" style:font-weight-complex="normal"/>
    </style:style>
    <style:style style:name="P45" style:family="paragraph" style:parent-style-name="Standard">
      <style:paragraph-properties fo:text-align="justify" style:justify-single-word="false"/>
      <style:text-properties fo:font-size="13pt" fo:font-weight="normal" officeooo:rsid="05e2350d" officeooo:paragraph-rsid="00225b0b" style:font-size-asian="13pt" style:font-weight-asian="normal" style:font-size-complex="13pt" style:font-weight-complex="normal"/>
    </style:style>
    <style:style style:name="P46" style:family="paragraph" style:parent-style-name="Standard">
      <style:paragraph-properties fo:text-align="justify" style:justify-single-word="false"/>
      <style:text-properties fo:font-size="14pt" fo:font-weight="bold" officeooo:rsid="081dc5d0" officeooo:paragraph-rsid="00225b0b" style:font-size-asian="14pt" style:font-weight-asian="bold" style:font-size-complex="14pt" style:font-weight-complex="bold"/>
    </style:style>
    <style:style style:name="P47" style:family="paragraph" style:parent-style-name="Standard">
      <style:paragraph-properties fo:text-align="justify" style:justify-single-word="false"/>
      <style:text-properties fo:font-size="13pt" fo:font-weight="normal" officeooo:rsid="006d0dae" officeooo:paragraph-rsid="00225b0b" style:font-size-asian="13pt" style:font-weight-asian="normal" style:font-size-complex="13pt" style:font-weight-complex="normal"/>
    </style:style>
    <style:style style:name="P48" style:family="paragraph" style:parent-style-name="Standard">
      <style:paragraph-properties fo:text-align="justify" style:justify-single-word="false"/>
      <style:text-properties fo:font-size="13pt" fo:font-weight="normal" officeooo:rsid="0011a5c1" officeooo:paragraph-rsid="00225b0b" style:font-size-asian="13pt" style:font-weight-asian="normal" style:font-size-complex="13pt" style:font-weight-complex="normal"/>
    </style:style>
    <style:style style:name="P49" style:family="paragraph" style:parent-style-name="Standard">
      <style:paragraph-properties fo:text-align="justify" style:justify-single-word="false"/>
      <style:text-properties fo:font-size="13pt" fo:font-weight="normal" officeooo:rsid="00d726d4" officeooo:paragraph-rsid="00225b0b" style:font-size-asian="13pt" style:font-weight-asian="normal" style:font-size-complex="13pt" style:font-weight-complex="normal"/>
    </style:style>
    <style:style style:name="P50" style:family="paragraph" style:parent-style-name="Standard">
      <style:paragraph-properties fo:text-align="justify" style:justify-single-word="false"/>
      <style:text-properties fo:font-size="13pt" fo:font-weight="normal" officeooo:rsid="0ceb4a89" officeooo:paragraph-rsid="00225b0b" style:font-size-asian="13pt" style:font-weight-asian="normal" style:font-size-complex="13pt" style:font-weight-complex="normal"/>
    </style:style>
    <style:style style:name="P51" style:family="paragraph" style:parent-style-name="Standard">
      <style:paragraph-properties fo:text-align="justify" style:justify-single-word="false"/>
      <style:text-properties fo:font-size="13pt" fo:font-weight="normal" officeooo:rsid="2dda129f" officeooo:paragraph-rsid="00225b0b" style:font-size-asian="13pt" style:font-weight-asian="normal" style:font-size-complex="13pt" style:font-weight-complex="normal"/>
    </style:style>
    <style:style style:name="P52" style:family="paragraph" style:parent-style-name="Standard">
      <style:paragraph-properties fo:text-align="justify" style:justify-single-word="false"/>
      <style:text-properties fo:font-size="13pt" fo:font-weight="normal" officeooo:rsid="2e13b514" officeooo:paragraph-rsid="00225b0b" style:font-size-asian="13pt" style:font-weight-asian="normal" style:font-size-complex="13pt" style:font-weight-complex="normal"/>
    </style:style>
    <style:style style:name="P53" style:family="paragraph" style:parent-style-name="Standard">
      <style:paragraph-properties fo:text-align="justify" style:justify-single-word="false"/>
      <style:text-properties fo:font-size="13pt" fo:font-weight="normal" officeooo:rsid="307fae26" officeooo:paragraph-rsid="00225b0b" style:font-size-asian="13pt" style:font-weight-asian="normal" style:font-size-complex="13pt" style:font-weight-complex="normal"/>
    </style:style>
    <style:style style:name="P54" style:family="paragraph" style:parent-style-name="Standard">
      <style:paragraph-properties fo:text-align="justify" style:justify-single-word="false"/>
      <style:text-properties fo:font-size="13pt" fo:font-weight="normal" officeooo:rsid="0c64dfb5" officeooo:paragraph-rsid="00225b0b" style:font-size-asian="13pt" style:font-weight-asian="normal" style:font-size-complex="13pt" style:font-weight-complex="normal"/>
    </style:style>
    <style:style style:name="P55" style:family="paragraph" style:parent-style-name="Standard">
      <style:paragraph-properties fo:text-align="justify" style:justify-single-word="false"/>
      <style:text-properties fo:font-size="13pt" style:text-underline-style="none" fo:font-weight="normal" officeooo:rsid="00d726d4" officeooo:paragraph-rsid="00225b0b" style:font-size-asian="13pt" style:font-weight-asian="normal" style:font-size-complex="13pt" style:font-weight-complex="normal"/>
    </style:style>
    <style:style style:name="P56" style:family="paragraph" style:parent-style-name="Standard">
      <style:paragraph-properties fo:text-align="justify" style:justify-single-word="false"/>
      <style:text-properties fo:font-size="13pt" style:text-underline-style="none" fo:font-weight="bold" officeooo:rsid="084b28ad" officeooo:paragraph-rsid="00225b0b" style:font-size-asian="13pt" style:font-weight-asian="bold" style:font-size-complex="13pt" style:font-weight-complex="bold"/>
    </style:style>
    <style:style style:name="P57" style:family="paragraph" style:parent-style-name="Standard">
      <style:paragraph-properties fo:text-align="justify" style:justify-single-word="false"/>
      <style:text-properties fo:font-size="13pt" style:text-underline-style="none" fo:font-weight="normal" officeooo:rsid="00133120" officeooo:paragraph-rsid="00225b0b" style:font-size-asian="13pt" style:font-weight-asian="normal" style:font-size-complex="13pt" style:font-weight-complex="normal"/>
    </style:style>
    <style:style style:name="P58" style:family="paragraph" style:parent-style-name="Standard">
      <style:paragraph-properties fo:text-align="justify" style:justify-single-word="false"/>
      <style:text-properties fo:font-size="14pt" style:text-underline-style="none" fo:font-weight="bold" officeooo:rsid="0ff0543e" officeooo:paragraph-rsid="00225b0b" style:font-size-asian="14pt" style:font-weight-asian="bold" style:font-size-complex="14pt" style:font-weight-complex="bold"/>
    </style:style>
    <style:style style:name="P59" style:family="paragraph" style:parent-style-name="Standard">
      <style:paragraph-properties fo:text-align="justify" style:justify-single-word="false"/>
      <style:text-properties fo:font-size="13pt" style:text-underline-style="none" fo:font-weight="normal" officeooo:rsid="001c2776" officeooo:paragraph-rsid="00225b0b" style:font-size-asian="13pt" style:font-weight-asian="normal" style:font-size-complex="13pt" style:font-weight-complex="normal"/>
    </style:style>
    <style:style style:name="P60" style:family="paragraph" style:parent-style-name="Standard">
      <style:paragraph-properties fo:text-align="justify" style:justify-single-word="false"/>
      <style:text-properties fo:font-size="13pt" style:text-underline-style="none" fo:font-weight="normal" officeooo:rsid="002a45bb" officeooo:paragraph-rsid="00225b0b" style:font-size-asian="13pt" style:font-weight-asian="normal" style:font-size-complex="13pt" style:font-weight-complex="normal"/>
    </style:style>
    <style:style style:name="P61" style:family="paragraph" style:parent-style-name="Standard">
      <style:paragraph-properties fo:text-align="justify" style:justify-single-word="false"/>
      <style:text-properties fo:font-size="13pt" officeooo:paragraph-rsid="00225b0b" style:font-size-asian="13pt" style:font-size-complex="13pt"/>
    </style:style>
    <style:style style:name="P62" style:family="paragraph" style:parent-style-name="Standard">
      <style:paragraph-properties fo:text-align="justify" style:justify-single-word="false"/>
      <style:text-properties fo:font-size="13pt" fo:font-weight="bold" officeooo:rsid="2e13b514" officeooo:paragraph-rsid="00225b0b" style:font-size-asian="13pt" style:font-weight-asian="bold" style:font-size-complex="13pt" style:font-weight-complex="bold"/>
    </style:style>
    <style:style style:name="P63" style:family="paragraph" style:parent-style-name="Standard">
      <style:paragraph-properties fo:text-align="justify" style:justify-single-word="false"/>
      <style:text-properties fo:font-size="13pt" fo:font-weight="normal" officeooo:rsid="19ad516a" officeooo:paragraph-rsid="00225b0b" style:font-size-asian="13pt" style:font-weight-asian="normal" style:font-size-complex="13pt" style:font-weight-complex="normal"/>
    </style:style>
    <style:style style:name="P64" style:family="paragraph" style:parent-style-name="Standard">
      <style:paragraph-properties fo:text-align="justify" style:justify-single-word="false"/>
      <style:text-properties fo:font-size="13pt" style:text-underline-style="none" fo:font-weight="normal" officeooo:rsid="00799967" officeooo:paragraph-rsid="00225b0b" style:font-size-asian="13pt" style:font-weight-asian="normal" style:font-size-complex="13pt" style:font-weight-complex="normal"/>
    </style:style>
    <style:style style:name="P65" style:family="paragraph" style:parent-style-name="Standard">
      <style:paragraph-properties fo:text-align="justify" style:justify-single-word="false"/>
      <style:text-properties fo:font-size="13pt" style:text-underline-style="none" fo:font-weight="normal" officeooo:rsid="34f1674c" officeooo:paragraph-rsid="00225b0b" style:font-size-asian="13pt" style:font-weight-asian="normal" style:font-size-complex="13pt" style:font-weight-complex="normal"/>
    </style:style>
    <style:style style:name="P66" style:family="paragraph" style:parent-style-name="Standard">
      <style:paragraph-properties fo:text-align="left" style:justify-single-word="false"/>
      <style:text-properties fo:font-size="13pt" style:text-underline-style="none" fo:font-weight="normal" officeooo:rsid="35410923" officeooo:paragraph-rsid="00225b0b" style:font-size-asian="13pt" style:font-weight-asian="normal" style:font-size-complex="13pt" style:font-weight-complex="normal"/>
    </style:style>
    <style:style style:name="P67" style:family="paragraph" style:parent-style-name="Standard">
      <style:paragraph-properties fo:text-align="left" style:justify-single-word="false"/>
      <style:text-properties fo:font-size="13pt" style:text-underline-style="none" fo:font-weight="normal" officeooo:rsid="35452f34" officeooo:paragraph-rsid="00225b0b" style:font-size-asian="13pt" style:font-weight-asian="normal" style:font-size-complex="13pt" style:font-weight-complex="normal"/>
    </style:style>
    <style:style style:name="P68" style:family="paragraph" style:parent-style-name="Standard">
      <style:paragraph-properties fo:text-align="justify" style:justify-single-word="false"/>
      <style:text-properties fo:font-size="13pt" style:text-underline-style="none" fo:font-weight="normal" officeooo:rsid="2ab48cd4" officeooo:paragraph-rsid="00225b0b" style:font-size-asian="13pt" style:font-weight-asian="normal" style:font-size-complex="13pt" style:font-weight-complex="normal"/>
    </style:style>
    <style:style style:name="P69" style:family="paragraph" style:parent-style-name="Standard">
      <style:paragraph-properties fo:text-align="justify" style:justify-single-word="false"/>
      <style:text-properties fo:font-size="13pt" style:text-underline-style="none" fo:font-weight="normal" officeooo:rsid="367889a9" officeooo:paragraph-rsid="00225b0b" style:font-size-asian="13pt" style:font-weight-asian="normal" style:font-size-complex="13pt" style:font-weight-complex="normal"/>
    </style:style>
    <style:style style:name="P70" style:family="paragraph" style:parent-style-name="Standard">
      <style:paragraph-properties fo:text-align="justify" style:justify-single-word="false"/>
      <style:text-properties fo:font-size="13pt" fo:font-weight="normal" officeooo:rsid="002210b6" officeooo:paragraph-rsid="00225b0b" style:font-size-asian="13pt" style:font-weight-asian="normal" style:font-size-complex="13pt" style:font-weight-complex="normal"/>
    </style:style>
    <style:style style:name="P71" style:family="paragraph" style:parent-style-name="Standard">
      <style:paragraph-properties fo:text-align="justify" style:justify-single-word="false"/>
      <style:text-properties officeooo:paragraph-rsid="00396416"/>
    </style:style>
    <style:style style:name="P72" style:family="paragraph" style:parent-style-name="Standard">
      <style:paragraph-properties fo:text-align="left" style:justify-single-word="false"/>
      <style:text-properties officeooo:paragraph-rsid="00396416"/>
    </style:style>
    <style:style style:name="P73" style:family="paragraph" style:parent-style-name="Standard">
      <style:paragraph-properties fo:text-align="left" style:justify-single-word="false"/>
      <style:text-properties fo:font-size="13pt" fo:font-weight="normal" officeooo:rsid="006d0dae" officeooo:paragraph-rsid="00396416" style:font-size-asian="13pt" style:font-weight-asian="normal" style:font-size-complex="13pt" style:font-weight-complex="normal"/>
    </style:style>
    <style:style style:name="P74" style:family="paragraph" style:parent-style-name="Standard">
      <style:paragraph-properties fo:text-align="left" style:justify-single-word="false"/>
      <style:text-properties fo:color="#000000" loext:opacity="100%" style:font-name="Liberation Serif" fo:font-size="13pt" fo:font-style="normal" fo:font-weight="normal" officeooo:rsid="031e88f5" officeooo:paragraph-rsid="00396416" style:font-size-asian="13pt" style:font-style-asian="normal" style:font-weight-asian="normal" style:font-size-complex="13pt" style:font-style-complex="normal" style:font-weight-complex="normal"/>
    </style:style>
    <style:style style:name="P75" style:family="paragraph" style:parent-style-name="Standard">
      <style:paragraph-properties fo:text-align="left" style:justify-single-word="false"/>
      <style:text-properties fo:font-size="13pt" fo:font-weight="normal" officeooo:rsid="00c7186a" officeooo:paragraph-rsid="00396416" style:font-size-asian="13pt" style:font-weight-asian="normal" style:font-size-complex="13pt" style:font-weight-complex="normal"/>
    </style:style>
    <style:style style:name="P76" style:family="paragraph" style:parent-style-name="Standard">
      <style:paragraph-properties fo:text-align="left" style:justify-single-word="false"/>
      <style:text-properties officeooo:paragraph-rsid="00225b0b"/>
    </style:style>
    <style:style style:name="P77" style:family="paragraph" style:parent-style-name="Standard">
      <style:paragraph-properties fo:text-align="left" style:justify-single-word="false"/>
      <style:text-properties fo:font-size="13pt" fo:font-weight="normal" officeooo:rsid="04bcd0e5" officeooo:paragraph-rsid="00225b0b" style:font-size-asian="13pt" style:font-weight-asian="normal" style:font-size-complex="13pt" style:font-weight-complex="normal"/>
    </style:style>
    <style:style style:name="P78" style:family="paragraph" style:parent-style-name="Standard">
      <style:paragraph-properties fo:text-align="left" style:justify-single-word="false"/>
      <style:text-properties fo:font-size="13pt" style:text-underline-style="none" fo:font-weight="normal" officeooo:rsid="00b107fb" officeooo:paragraph-rsid="00225b0b" style:font-size-asian="13pt" style:font-weight-asian="normal" style:font-size-complex="13pt" style:font-weight-complex="normal"/>
    </style:style>
    <style:style style:name="P79" style:family="paragraph" style:parent-style-name="Standard">
      <style:paragraph-properties fo:text-align="justify" style:justify-single-word="false"/>
      <style:text-properties fo:font-size="13pt" fo:font-weight="normal" officeooo:rsid="04bcd0e5" officeooo:paragraph-rsid="00225b0b" style:font-size-asian="13pt" style:font-weight-asian="normal" style:font-size-complex="13pt" style:font-weight-complex="normal"/>
    </style:style>
    <style:style style:name="P80" style:family="paragraph" style:parent-style-name="Standard">
      <style:paragraph-properties fo:text-align="justify" style:justify-single-word="false"/>
      <style:text-properties fo:font-size="13pt" fo:font-weight="normal" officeooo:rsid="04beb33d" officeooo:paragraph-rsid="00225b0b" style:font-size-asian="13pt" style:font-weight-asian="normal" style:font-size-complex="13pt" style:font-weight-complex="normal"/>
    </style:style>
    <style:style style:name="P81" style:family="paragraph" style:parent-style-name="Standard">
      <style:paragraph-properties fo:text-align="justify" style:justify-single-word="false"/>
      <style:text-properties fo:font-size="13pt" fo:font-weight="normal" officeooo:rsid="0aefaf02" officeooo:paragraph-rsid="00225b0b" style:font-size-asian="13pt" style:font-weight-asian="normal" style:font-size-complex="13pt" style:font-weight-complex="normal"/>
    </style:style>
    <style:style style:name="P82" style:family="paragraph" style:parent-style-name="Standard">
      <style:paragraph-properties fo:text-align="justify" style:justify-single-word="false"/>
      <style:text-properties fo:color="#000000" loext:opacity="100%" style:font-name="Liberation Serif" fo:font-size="13pt" fo:font-style="normal" fo:font-weight="normal" officeooo:rsid="00b4a934" officeooo:paragraph-rsid="00225b0b" style:font-size-asian="13pt" style:font-style-asian="normal" style:font-weight-asian="normal" style:font-size-complex="13pt" style:font-style-complex="normal" style:font-weight-complex="normal"/>
    </style:style>
    <style:style style:name="P83" style:family="paragraph" style:parent-style-name="Standard">
      <style:paragraph-properties fo:text-align="left" style:justify-single-word="false"/>
      <style:text-properties fo:font-size="13pt" fo:font-weight="normal" officeooo:rsid="006d0dae" officeooo:paragraph-rsid="00225b0b" style:font-size-asian="13pt" style:font-weight-asian="normal" style:font-size-complex="13pt" style:font-weight-complex="normal"/>
    </style:style>
    <style:style style:name="P84" style:family="paragraph" style:parent-style-name="Standard">
      <style:paragraph-properties fo:text-align="justify" style:justify-single-word="false"/>
      <style:text-properties fo:color="#000000" loext:opacity="100%" style:font-name="Liberation Serif" fo:font-size="13pt" fo:font-style="normal" style:text-underline-style="none" fo:font-weight="normal" officeooo:rsid="00c05ced" officeooo:paragraph-rsid="00225b0b" style:font-size-asian="13pt" style:font-style-asian="normal" style:font-weight-asian="normal" style:font-size-complex="13pt" style:font-style-complex="normal" style:font-weight-complex="normal"/>
    </style:style>
    <style:style style:name="P85" style:family="paragraph" style:parent-style-name="Standard">
      <style:paragraph-properties fo:text-align="left" style:justify-single-word="false"/>
      <style:text-properties fo:color="#000000" loext:opacity="100%" style:font-name="Liberation Serif" fo:font-size="13pt" fo:font-style="normal" style:text-underline-style="none" fo:font-weight="normal" officeooo:rsid="00c05ced" officeooo:paragraph-rsid="00225b0b" style:font-size-asian="13pt" style:font-style-asian="normal" style:font-weight-asian="normal" style:font-size-complex="13pt" style:font-style-complex="normal" style:font-weight-complex="normal"/>
    </style:style>
    <style:style style:name="P86" style:family="paragraph" style:parent-style-name="Standard">
      <style:paragraph-properties fo:text-align="justify" style:justify-single-word="false"/>
      <style:text-properties fo:font-size="13pt" fo:font-weight="normal" officeooo:rsid="002795f6" officeooo:paragraph-rsid="00225b0b" style:font-size-asian="13pt" style:font-weight-asian="normal" style:font-size-complex="13pt" style:font-weight-complex="normal"/>
    </style:style>
    <style:style style:name="P87" style:family="paragraph" style:parent-style-name="Standard">
      <style:text-properties officeooo:paragraph-rsid="00225b0b"/>
    </style:style>
    <style:style style:name="P88" style:family="paragraph" style:parent-style-name="Standard">
      <style:text-properties fo:font-size="13pt" officeooo:paragraph-rsid="00225b0b" style:font-size-asian="13pt" style:font-size-complex="13pt"/>
    </style:style>
    <style:style style:name="P89" style:family="paragraph" style:parent-style-name="Standard">
      <style:paragraph-properties fo:text-align="justify" style:justify-single-word="false"/>
      <style:text-properties fo:font-size="13pt" fo:font-weight="normal" officeooo:rsid="00433ec1" officeooo:paragraph-rsid="00225b0b" style:font-size-asian="13pt" style:font-weight-asian="normal" style:font-size-complex="13pt" style:font-weight-complex="normal"/>
    </style:style>
    <style:style style:name="P90" style:family="paragraph" style:parent-style-name="Standard">
      <style:paragraph-properties fo:text-align="left" style:justify-single-word="false"/>
      <style:text-properties fo:font-size="13pt" officeooo:paragraph-rsid="00225b0b" style:font-size-asian="13pt" style:font-size-complex="13pt"/>
    </style:style>
    <style:style style:name="P91" style:family="paragraph" style:parent-style-name="Standard">
      <style:paragraph-properties fo:text-align="left" style:justify-single-word="false"/>
      <style:text-properties style:use-window-font-color="true" loext:opacity="0%" fo:font-size="13pt" fo:font-style="normal" fo:font-weight="normal" officeooo:rsid="013533f3" officeooo:paragraph-rsid="00225b0b" style:font-size-asian="13pt" style:font-style-asian="normal" style:font-weight-asian="normal" style:font-size-complex="13pt" style:font-style-complex="normal" style:font-weight-complex="normal"/>
    </style:style>
    <style:style style:name="P92" style:family="paragraph" style:parent-style-name="Standard">
      <style:paragraph-properties fo:text-align="left" style:justify-single-word="false"/>
      <style:text-properties fo:font-size="13pt" fo:font-weight="normal" officeooo:rsid="02d6aa2d" officeooo:paragraph-rsid="00225b0b" style:font-size-asian="13pt" style:font-weight-asian="normal" style:font-size-complex="13pt" style:font-weight-complex="normal"/>
    </style:style>
    <style:style style:name="P93" style:family="paragraph" style:parent-style-name="Standard">
      <style:paragraph-properties fo:text-align="left" style:justify-single-word="false"/>
      <style:text-properties fo:font-size="13pt" fo:font-weight="normal" officeooo:rsid="054941da" officeooo:paragraph-rsid="00225b0b" style:font-size-asian="13pt" style:font-weight-asian="normal" style:font-size-complex="13pt" style:font-weight-complex="normal"/>
    </style:style>
    <style:style style:name="P94" style:family="paragraph" style:parent-style-name="Standard">
      <style:paragraph-properties fo:text-align="left" style:justify-single-word="false"/>
      <style:text-properties fo:font-size="13pt" fo:font-weight="normal" officeooo:rsid="0009729a" officeooo:paragraph-rsid="00225b0b" style:font-size-asian="13pt" style:font-weight-asian="normal" style:font-size-complex="13pt" style:font-weight-complex="normal"/>
    </style:style>
    <style:style style:name="P95" style:family="paragraph" style:parent-style-name="Standard">
      <style:paragraph-properties fo:text-align="left" style:justify-single-word="false"/>
      <style:text-properties fo:font-size="13pt" fo:font-weight="normal" officeooo:rsid="0141b2e9" officeooo:paragraph-rsid="00225b0b" style:font-size-asian="13pt" style:font-weight-asian="normal" style:font-size-complex="13pt" style:font-weight-complex="normal"/>
    </style:style>
    <style:style style:name="P96" style:family="paragraph" style:parent-style-name="Standard">
      <style:paragraph-properties fo:text-align="left" style:justify-single-word="false"/>
      <style:text-properties fo:font-size="13pt" fo:font-weight="normal" officeooo:rsid="0275d905" officeooo:paragraph-rsid="00225b0b" style:font-size-asian="13pt" style:font-weight-asian="normal" style:font-size-complex="13pt" style:font-weight-complex="normal"/>
    </style:style>
    <style:style style:name="P97" style:family="paragraph" style:parent-style-name="Standard">
      <style:paragraph-properties fo:text-align="left" style:justify-single-word="false"/>
      <style:text-properties fo:font-size="13pt" fo:font-style="normal" fo:font-weight="normal" officeooo:rsid="025ce238" officeooo:paragraph-rsid="00225b0b" style:font-size-asian="13pt" style:font-style-asian="normal" style:font-weight-asian="normal" style:font-size-complex="13pt" style:font-style-complex="normal" style:font-weight-complex="normal"/>
    </style:style>
    <style:style style:name="P98" style:family="paragraph" style:parent-style-name="Standard">
      <style:paragraph-properties fo:text-align="left" style:justify-single-word="false"/>
      <style:text-properties fo:font-size="13pt" fo:font-style="normal" fo:font-weight="normal" officeooo:rsid="04d96e96" officeooo:paragraph-rsid="00225b0b" style:font-size-asian="13pt" style:font-style-asian="normal" style:font-weight-asian="normal" style:font-size-complex="13pt" style:font-style-complex="normal" style:font-weight-complex="normal"/>
    </style:style>
    <style:style style:name="P99" style:family="paragraph" style:parent-style-name="Standard">
      <style:paragraph-properties fo:text-align="left" style:justify-single-word="false"/>
      <style:text-properties fo:font-size="13pt" fo:font-style="normal" fo:font-weight="normal" officeooo:rsid="045f7d9d" officeooo:paragraph-rsid="00225b0b" style:font-size-asian="13pt" style:font-style-asian="normal" style:font-weight-asian="normal" style:font-size-complex="13pt" style:font-style-complex="normal" style:font-weight-complex="normal"/>
    </style:style>
    <style:style style:name="P100" style:family="paragraph" style:parent-style-name="Standard">
      <style:paragraph-properties fo:text-align="left" style:justify-single-word="false"/>
      <style:text-properties fo:font-size="13pt" fo:font-style="normal" fo:font-weight="normal" officeooo:rsid="043c8fa7" officeooo:paragraph-rsid="00225b0b" style:font-size-asian="13pt" style:font-style-asian="normal" style:font-weight-asian="normal" style:font-size-complex="13pt" style:font-style-complex="normal" style:font-weight-complex="normal"/>
    </style:style>
    <style:style style:name="P101" style:family="paragraph" style:parent-style-name="Standard">
      <style:paragraph-properties fo:text-align="left" style:justify-single-word="false"/>
      <style:text-properties fo:font-size="13pt" fo:font-style="normal" fo:font-weight="normal" officeooo:rsid="05ab584a" officeooo:paragraph-rsid="00225b0b" style:font-size-asian="13pt" style:font-style-asian="normal" style:font-weight-asian="normal" style:font-size-complex="13pt" style:font-style-complex="normal" style:font-weight-complex="normal"/>
    </style:style>
    <style:style style:name="P102" style:family="paragraph" style:parent-style-name="Standard">
      <style:paragraph-properties fo:text-align="left" style:justify-single-word="false"/>
      <style:text-properties fo:font-size="13pt" fo:font-style="normal" fo:font-weight="normal" officeooo:rsid="06cb99cc" officeooo:paragraph-rsid="00225b0b" style:font-size-asian="13pt" style:font-style-asian="normal" style:font-weight-asian="normal" style:font-size-complex="13pt" style:font-style-complex="normal" style:font-weight-complex="normal"/>
    </style:style>
    <style:style style:name="P103" style:family="paragraph" style:parent-style-name="Standard">
      <style:paragraph-properties fo:text-align="left" style:justify-single-word="false"/>
      <style:text-properties fo:font-size="13pt" fo:font-weight="normal" officeooo:rsid="025ce238" officeooo:paragraph-rsid="00225b0b" style:font-size-asian="13pt" style:font-weight-asian="normal" style:font-size-complex="13pt" style:font-weight-complex="normal"/>
    </style:style>
    <style:style style:name="P104" style:family="paragraph" style:parent-style-name="Standard">
      <style:paragraph-properties fo:text-align="left" style:justify-single-word="false"/>
      <style:text-properties fo:font-size="13pt" fo:font-style="normal" fo:font-weight="normal" officeooo:rsid="043ccbbb" officeooo:paragraph-rsid="00225b0b" style:font-size-asian="13pt" style:font-style-asian="normal" style:font-weight-asian="normal" style:font-size-complex="13pt" style:font-style-complex="normal" style:font-weight-complex="normal"/>
    </style:style>
    <style:style style:name="P105" style:family="paragraph" style:parent-style-name="Standard">
      <style:paragraph-properties fo:text-align="justify" style:justify-single-word="false"/>
      <style:text-properties fo:font-size="14pt" fo:font-weight="bold" officeooo:rsid="081dc5d0" officeooo:paragraph-rsid="003707a5" style:font-size-asian="14pt" style:font-weight-asian="bold" style:font-size-complex="14pt" style:font-weight-complex="bold"/>
    </style:style>
    <style:style style:name="P106" style:family="paragraph" style:parent-style-name="Standard">
      <style:paragraph-properties fo:text-align="left" style:justify-single-word="false"/>
      <style:text-properties fo:font-size="13pt" fo:font-weight="normal" officeooo:rsid="006d0dae" officeooo:paragraph-rsid="003707a5" style:font-size-asian="13pt" style:font-weight-asian="normal" style:font-size-complex="13pt" style:font-weight-complex="normal"/>
    </style:style>
    <style:style style:name="P107" style:family="paragraph" style:parent-style-name="Standard">
      <style:paragraph-properties fo:text-align="left" style:justify-single-word="false"/>
      <style:text-properties officeooo:paragraph-rsid="003707a5"/>
    </style:style>
    <style:style style:name="P108" style:family="paragraph" style:parent-style-name="Standard">
      <style:paragraph-properties fo:text-align="left" style:justify-single-word="false"/>
      <style:text-properties fo:font-size="13pt" fo:font-weight="normal" officeooo:rsid="00234dd1" officeooo:paragraph-rsid="003707a5" style:font-size-asian="13pt" style:font-weight-asian="normal" style:font-size-complex="13pt" style:font-weight-complex="normal"/>
    </style:style>
    <style:style style:name="P109" style:family="paragraph" style:parent-style-name="Standard">
      <style:paragraph-properties fo:text-align="left" style:justify-single-word="false"/>
      <style:text-properties fo:font-size="13pt" fo:font-weight="normal" officeooo:rsid="08885293" officeooo:paragraph-rsid="003707a5" style:font-size-asian="13pt" style:font-weight-asian="normal" style:font-size-complex="13pt" style:font-weight-complex="normal"/>
    </style:style>
    <style:style style:name="P110" style:family="paragraph" style:parent-style-name="Standard">
      <style:paragraph-properties fo:text-align="left" style:justify-single-word="false"/>
      <style:text-properties fo:font-size="13pt" fo:font-weight="normal" officeooo:rsid="09c71189" officeooo:paragraph-rsid="003707a5" style:font-size-asian="13pt" style:font-weight-asian="normal" style:font-size-complex="13pt" style:font-weight-complex="normal"/>
    </style:style>
    <style:style style:name="P111" style:family="paragraph" style:parent-style-name="Standard">
      <style:paragraph-properties fo:text-align="left" style:justify-single-word="false"/>
      <style:text-properties fo:font-size="13pt" fo:font-weight="normal" officeooo:rsid="078aa5bb" officeooo:paragraph-rsid="003707a5" style:font-size-asian="13pt" style:font-weight-asian="normal" style:font-size-complex="13pt" style:font-weight-complex="normal"/>
    </style:style>
    <style:style style:name="P112" style:family="paragraph" style:parent-style-name="Standard">
      <style:paragraph-properties fo:text-align="left" style:justify-single-word="false"/>
      <style:text-properties style:use-window-font-color="true" loext:opacity="0%" fo:font-size="13pt" fo:font-weight="normal" officeooo:rsid="0b4c7da5" officeooo:paragraph-rsid="003707a5" style:font-size-asian="13pt" style:font-weight-asian="normal" style:font-size-complex="13pt" style:font-weight-complex="normal"/>
    </style:style>
    <style:style style:name="P113" style:family="paragraph" style:parent-style-name="Standard">
      <style:paragraph-properties fo:text-align="left" style:justify-single-word="false"/>
      <style:text-properties style:use-window-font-color="true" loext:opacity="0%" fo:font-size="13pt" fo:font-weight="normal" officeooo:rsid="0b9efa32" officeooo:paragraph-rsid="003707a5" style:font-size-asian="13pt" style:font-weight-asian="normal" style:font-size-complex="13pt" style:font-weight-complex="normal"/>
    </style:style>
    <style:style style:name="P114" style:family="paragraph" style:parent-style-name="Standard">
      <style:paragraph-properties fo:text-align="left" style:justify-single-word="false"/>
      <style:text-properties style:use-window-font-color="true" loext:opacity="0%" fo:font-size="13pt" fo:font-weight="normal" officeooo:rsid="0c2ddbb8" officeooo:paragraph-rsid="003707a5" style:font-size-asian="13pt" style:font-weight-asian="normal" style:font-size-complex="13pt" style:font-weight-complex="normal"/>
    </style:style>
    <style:style style:name="P115" style:family="paragraph" style:parent-style-name="Standard">
      <style:paragraph-properties fo:text-align="left" style:justify-single-word="false"/>
      <style:text-properties fo:font-size="13pt" officeooo:paragraph-rsid="003707a5" style:font-size-asian="13pt" style:font-size-complex="13pt"/>
    </style:style>
    <style:style style:name="P116" style:family="paragraph" style:parent-style-name="Standard">
      <style:text-properties fo:font-size="13pt" officeooo:paragraph-rsid="003707a5" style:font-size-asian="13pt" style:font-size-complex="13pt"/>
    </style:style>
    <style:style style:name="P117" style:family="paragraph" style:parent-style-name="Standard">
      <style:text-properties officeooo:paragraph-rsid="003707a5"/>
    </style:style>
    <style:style style:name="P118" style:family="paragraph" style:parent-style-name="Standard">
      <style:paragraph-properties fo:text-align="left" style:justify-single-word="false"/>
      <style:text-properties fo:font-size="13pt" fo:font-weight="normal" officeooo:rsid="054941da" officeooo:paragraph-rsid="003707a5" style:font-size-asian="13pt" style:font-weight-asian="normal" style:font-size-complex="13pt" style:font-weight-complex="normal"/>
    </style:style>
    <style:style style:name="P119" style:family="paragraph" style:parent-style-name="Standard">
      <style:paragraph-properties fo:text-align="left" style:justify-single-word="false"/>
      <style:text-properties style:use-window-font-color="true" loext:opacity="0%" fo:font-size="13pt" fo:font-weight="bold" officeooo:rsid="0308615e" officeooo:paragraph-rsid="003707a5" style:font-size-asian="13pt" style:font-weight-asian="bold" style:font-size-complex="13pt" style:font-weight-complex="bold"/>
    </style:style>
    <style:style style:name="P120" style:family="paragraph" style:parent-style-name="Standard">
      <style:paragraph-properties fo:text-align="left" style:justify-single-word="false"/>
      <style:text-properties style:font-name="Liberation Serif" fo:font-size="13pt" fo:font-weight="normal" officeooo:rsid="0136fe3d" officeooo:paragraph-rsid="003707a5" style:font-size-asian="13pt" style:font-weight-asian="normal" style:font-size-complex="13pt" style:font-weight-complex="normal"/>
    </style:style>
    <style:style style:name="P121" style:family="paragraph" style:parent-style-name="Standard">
      <style:paragraph-properties fo:text-align="left" style:justify-single-word="false"/>
      <style:text-properties style:font-name="Liberation Serif" fo:font-size="13pt" fo:font-weight="normal" officeooo:rsid="043ff174" officeooo:paragraph-rsid="003707a5" style:font-size-asian="13pt" style:font-weight-asian="normal" style:font-size-complex="13pt" style:font-weight-complex="normal"/>
    </style:style>
    <style:style style:name="P122" style:family="paragraph" style:parent-style-name="Standard">
      <style:paragraph-properties fo:text-align="left" style:justify-single-word="false"/>
      <style:text-properties style:font-name="Liberation Serif" fo:font-size="13pt" fo:font-weight="normal" officeooo:rsid="043ff174" officeooo:paragraph-rsid="00225b0b" style:font-size-asian="13pt" style:font-weight-asian="normal" style:font-size-complex="13pt" style:font-weight-complex="normal"/>
    </style:style>
    <style:style style:name="P123" style:family="paragraph" style:parent-style-name="Standard">
      <style:paragraph-properties fo:text-align="left" style:justify-single-word="false"/>
      <style:text-properties style:font-name="Liberation Serif" fo:font-size="16pt" fo:font-weight="bold" officeooo:rsid="00225b0b" officeooo:paragraph-rsid="00225b0b" style:font-size-asian="16pt" style:font-weight-asian="bold" style:font-size-complex="16pt" style:font-weight-complex="bold"/>
    </style:style>
    <style:style style:name="P124" style:family="paragraph" style:parent-style-name="Standard">
      <style:paragraph-properties fo:text-align="justify" style:justify-single-word="false"/>
      <style:text-properties officeooo:paragraph-rsid="0023b133"/>
    </style:style>
    <style:style style:name="P125" style:family="paragraph" style:parent-style-name="Standard">
      <style:text-properties officeooo:paragraph-rsid="0023b133"/>
    </style:style>
    <style:style style:name="P126" style:family="paragraph" style:parent-style-name="Standard">
      <style:paragraph-properties fo:text-align="justify" style:justify-single-word="false"/>
    </style:style>
    <style:style style:name="P127" style:family="paragraph" style:parent-style-name="Standard">
      <style:text-properties fo:font-size="16pt" officeooo:paragraph-rsid="003ddeea" style:font-size-asian="16pt" style:font-size-complex="16pt"/>
    </style:style>
    <style:style style:name="P128" style:family="paragraph" style:parent-style-name="Standard">
      <style:text-properties fo:font-size="16pt" fo:font-weight="bold" officeooo:rsid="003ddeea" officeooo:paragraph-rsid="003ddeea" style:font-size-asian="16pt" style:font-weight-asian="bold" style:font-size-complex="16pt" style:font-weight-complex="bold"/>
    </style:style>
    <style:style style:name="P129" style:family="paragraph" style:parent-style-name="Standard">
      <style:paragraph-properties fo:text-align="center" style:justify-single-word="false"/>
      <style:text-properties fo:font-size="26pt" fo:font-weight="bold" officeooo:paragraph-rsid="003ddeea" style:font-size-asian="26pt" style:font-weight-asian="bold" style:font-size-complex="26pt" style:font-weight-complex="bold"/>
    </style:style>
    <style:style style:name="P130" style:family="paragraph" style:parent-style-name="Standard">
      <style:paragraph-properties fo:text-align="center" style:justify-single-word="false"/>
      <style:text-properties fo:font-size="14pt" fo:font-weight="bold" officeooo:paragraph-rsid="003ddeea" style:font-size-asian="14pt" style:font-weight-asian="bold" style:font-size-complex="14pt" style:font-weight-complex="bold"/>
    </style:style>
    <style:style style:name="P131" style:family="paragraph" style:parent-style-name="Standard">
      <style:paragraph-properties fo:text-align="center" style:justify-single-word="false"/>
      <style:text-properties fo:font-size="24pt" fo:font-weight="bold" officeooo:paragraph-rsid="003ddeea" style:font-size-asian="24pt" style:font-weight-asian="bold" style:font-size-complex="24pt" style:font-weight-complex="bold"/>
    </style:style>
    <style:style style:name="P132" style:family="paragraph" style:parent-style-name="Standard">
      <style:paragraph-properties fo:text-align="center" style:justify-single-word="false"/>
      <style:text-properties fo:font-size="18pt" fo:font-weight="bold" officeooo:paragraph-rsid="003ddeea" style:font-size-asian="18pt" style:font-weight-asian="bold" style:font-size-complex="18pt" style:font-weight-complex="bold"/>
    </style:style>
    <style:style style:name="P133" style:family="paragraph" style:parent-style-name="Standard">
      <style:paragraph-properties fo:text-align="justify" style:justify-single-word="false"/>
      <style:text-properties fo:font-size="12pt" fo:font-weight="normal" officeooo:paragraph-rsid="003ddeea" style:font-size-asian="12pt" style:font-weight-asian="normal" style:font-size-complex="12pt" style:font-weight-complex="normal"/>
    </style:style>
    <style:style style:name="P134" style:family="paragraph" style:parent-style-name="Standard">
      <style:paragraph-properties fo:text-align="justify" style:justify-single-word="false"/>
      <style:text-properties officeooo:paragraph-rsid="003ddeea"/>
    </style:style>
    <style:style style:name="P135" style:family="paragraph" style:parent-style-name="Standard">
      <style:paragraph-properties fo:text-align="left" style:justify-single-word="false"/>
      <style:text-properties fo:font-size="12pt" fo:font-weight="normal" officeooo:paragraph-rsid="003ddeea" style:font-size-asian="12pt" style:font-weight-asian="normal" style:font-size-complex="12pt" style:font-weight-complex="normal"/>
    </style:style>
    <style:style style:name="P136" style:family="paragraph" style:parent-style-name="Standard">
      <style:paragraph-properties fo:text-align="left" style:justify-single-word="false"/>
      <style:text-properties style:font-name="Courier" fo:font-size="12pt" fo:font-style="normal" style:text-underline-style="none" fo:font-weight="normal" officeooo:paragraph-rsid="003ddeea" style:font-size-asian="12pt" style:font-style-asian="normal" style:font-weight-asian="normal" style:font-name-complex="Courier" style:font-size-complex="12pt" style:font-style-complex="normal" style:font-weight-complex="normal"/>
    </style:style>
    <style:style style:name="P137" style:family="paragraph" style:parent-style-name="Standard">
      <style:paragraph-properties fo:text-align="center" style:justify-single-word="false"/>
      <style:text-properties style:font-name="Courier" fo:font-size="12pt" fo:font-weight="normal" officeooo:paragraph-rsid="003ddeea" style:font-size-asian="12pt" style:font-weight-asian="normal" style:font-name-complex="Courier" style:font-size-complex="12pt" style:font-weight-complex="normal"/>
    </style:style>
    <style:style style:name="P138" style:family="paragraph" style:parent-style-name="Standard">
      <style:paragraph-properties fo:text-align="center" style:justify-single-word="false"/>
      <style:text-properties fo:font-size="12pt" fo:font-weight="bold" officeooo:paragraph-rsid="003ddeea" style:font-size-asian="12pt" style:font-weight-asian="bold" style:font-size-complex="12pt" style:font-weight-complex="bold"/>
    </style:style>
    <style:style style:name="P139" style:family="paragraph" style:parent-style-name="Standard">
      <style:paragraph-properties fo:text-align="center" style:justify-single-word="false"/>
      <style:text-properties officeooo:paragraph-rsid="003ddeea"/>
    </style:style>
    <style:style style:name="P140" style:family="paragraph" style:parent-style-name="Standard">
      <style:paragraph-properties fo:text-align="justify" style:justify-single-word="false"/>
      <style:text-properties fo:font-size="12pt" fo:font-style="normal" fo:font-weight="normal" officeooo:paragraph-rsid="003ddeea" style:font-size-asian="12pt" style:font-style-asian="normal" style:font-weight-asian="normal" style:font-size-complex="12pt" style:font-style-complex="normal" style:font-weight-complex="normal"/>
    </style:style>
    <style:style style:name="P141" style:family="paragraph" style:parent-style-name="Standard">
      <style:paragraph-properties fo:text-align="justify" style:justify-single-word="false"/>
      <style:text-properties fo:font-size="12pt" fo:font-style="normal" fo:font-weight="bold" officeooo:paragraph-rsid="003ddeea" style:font-size-asian="12pt" style:font-style-asian="normal" style:font-weight-asian="bold" style:font-size-complex="12pt" style:font-style-complex="normal" style:font-weight-complex="bold"/>
    </style:style>
    <style:style style:name="P142" style:family="paragraph" style:parent-style-name="Standard">
      <style:paragraph-properties fo:text-align="justify" style:justify-single-word="false"/>
      <style:text-properties fo:font-size="12pt" fo:font-weight="bold" officeooo:paragraph-rsid="003ddeea" style:font-size-asian="12pt" style:font-weight-asian="bold" style:font-size-complex="12pt" style:font-weight-complex="bold"/>
    </style:style>
    <style:style style:name="P143" style:family="paragraph" style:parent-style-name="Standard">
      <style:paragraph-properties style:line-height-at-least="0.198in"/>
      <style:text-properties style:font-name="Courier" fo:font-size="11pt" officeooo:paragraph-rsid="003ddeea" style:font-size-asian="11pt" style:font-name-complex="Courier" style:font-size-complex="11pt"/>
    </style:style>
    <style:style style:name="P144" style:family="paragraph" style:parent-style-name="Standard">
      <style:paragraph-properties fo:margin-right="0in" style:line-height-at-least="0.198in"/>
      <style:text-properties officeooo:paragraph-rsid="003ddeea"/>
    </style:style>
    <style:style style:name="P145" style:family="paragraph" style:parent-style-name="Table_20_Contents">
      <style:paragraph-properties fo:text-align="justify" style:justify-single-word="false"/>
      <style:text-properties style:font-name="Courier" fo:font-size="11pt" fo:font-weight="normal" officeooo:paragraph-rsid="003ddeea" style:font-size-asian="11pt" style:font-weight-asian="normal" style:font-name-complex="Courier" style:font-size-complex="11pt" style:font-weight-complex="normal"/>
    </style:style>
    <style:style style:name="P146" style:family="paragraph" style:parent-style-name="Table_20_Contents">
      <style:paragraph-properties fo:text-align="right" style:justify-single-word="false"/>
      <style:text-properties officeooo:paragraph-rsid="003ddeea"/>
    </style:style>
    <style:style style:name="P147" style:family="paragraph" style:parent-style-name="Horizontal_20_Line">
      <style:text-properties officeooo:paragraph-rsid="003ddeea"/>
    </style:style>
    <style:style style:name="P148" style:family="paragraph" style:parent-style-name="Standard">
      <style:text-properties fo:font-style="italic" officeooo:paragraph-rsid="003ddeea" style:font-style-asian="italic" style:font-style-complex="italic"/>
    </style:style>
    <style:style style:name="P149" style:family="paragraph" style:parent-style-name="Standard">
      <style:text-properties officeooo:paragraph-rsid="003ddeea"/>
    </style:style>
    <style:style style:name="P150" style:family="paragraph" style:parent-style-name="Table_20_Contents">
      <style:paragraph-properties fo:text-align="left" style:justify-single-word="false"/>
      <style:text-properties officeooo:paragraph-rsid="003ddeea"/>
    </style:style>
    <style:style style:name="P151" style:family="paragraph" style:parent-style-name="Table_20_Contents">
      <style:paragraph-properties fo:text-align="left" style:justify-single-word="false"/>
      <style:text-properties fo:font-size="12pt" officeooo:paragraph-rsid="003ddeea" style:font-size-asian="12pt" style:font-size-complex="12pt"/>
    </style:style>
    <style:style style:name="P152" style:family="paragraph" style:parent-style-name="Table_20_Contents">
      <style:paragraph-properties fo:text-align="left" style:justify-single-word="false"/>
      <style:text-properties style:font-name="Courier" fo:font-size="12pt" fo:font-style="normal" style:text-underline-style="none" fo:font-weight="normal" officeooo:paragraph-rsid="003ddeea" style:font-size-asian="12pt" style:font-style-asian="normal" style:font-weight-asian="normal" style:font-name-complex="Courier" style:font-size-complex="12pt" style:font-style-complex="normal" style:font-weight-complex="normal"/>
    </style:style>
    <style:style style:name="P153" style:family="paragraph" style:parent-style-name="Table_20_Contents">
      <style:paragraph-properties fo:text-align="center" style:justify-single-word="false"/>
      <style:text-properties fo:font-size="12pt" officeooo:paragraph-rsid="003ddeea" style:font-size-asian="12pt" style:font-size-complex="12pt"/>
    </style:style>
    <style:style style:name="P154" style:family="paragraph" style:parent-style-name="Standard">
      <style:paragraph-properties fo:text-align="center" style:justify-single-word="false"/>
      <style:text-properties fo:font-size="12pt" fo:font-weight="normal" officeooo:paragraph-rsid="003ddeea" style:font-size-asian="12pt" style:font-weight-asian="normal" style:font-size-complex="12pt" style:font-weight-complex="normal"/>
    </style:style>
    <style:style style:name="P155" style:family="paragraph" style:parent-style-name="Standard">
      <style:paragraph-properties style:line-height-at-least="0.198in"/>
      <style:text-properties style:font-name="Courier" fo:font-size="11pt" fo:font-weight="normal" officeooo:paragraph-rsid="003ddeea" style:font-size-asian="11pt" style:font-weight-asian="normal" style:font-name-complex="Courier" style:font-size-complex="11pt" style:font-weight-complex="normal"/>
    </style:style>
    <style:style style:name="P156" style:family="paragraph" style:parent-style-name="Table_20_Contents">
      <style:paragraph-properties fo:text-align="center" style:justify-single-word="false"/>
      <style:text-properties officeooo:paragraph-rsid="003ddeea"/>
    </style:style>
    <style:style style:name="P157" style:family="paragraph" style:parent-style-name="Horizontal_20_Line">
      <style:text-properties fo:font-size="12pt" officeooo:paragraph-rsid="003ddeea" style:font-size-asian="12pt" style:font-size-complex="12pt"/>
    </style:style>
    <style:style style:name="P158" style:family="paragraph" style:parent-style-name="Standard">
      <style:paragraph-properties fo:text-align="justify" style:justify-single-word="false"/>
      <style:text-properties fo:font-size="12pt" fo:font-style="italic" fo:font-weight="normal" officeooo:paragraph-rsid="003ddeea" style:font-size-asian="12pt" style:font-style-asian="italic" style:font-weight-asian="normal" style:font-size-complex="12pt" style:font-style-complex="italic" style:font-weight-complex="normal"/>
    </style:style>
    <style:style style:name="P159" style:family="paragraph" style:parent-style-name="Table_20_Contents">
      <style:paragraph-properties fo:text-align="justify" style:justify-single-word="false"/>
      <style:text-properties officeooo:paragraph-rsid="003ddeea"/>
    </style:style>
    <style:style style:name="P160" style:family="paragraph" style:parent-style-name="Standard">
      <style:paragraph-properties style:line-height-at-least="0.198in"/>
      <style:text-properties fo:color="#000000" loext:opacity="100%" style:font-name="Courier" fo:font-size="11pt" fo:font-weight="normal" officeooo:paragraph-rsid="003ddeea" fo:background-color="#ffffff" style:font-size-asian="11pt" style:font-weight-asian="normal" style:font-name-complex="Courier" style:font-size-complex="11pt"/>
    </style:style>
    <style:style style:name="P161" style:family="paragraph" style:parent-style-name="Standard">
      <style:paragraph-properties fo:text-align="justify" style:justify-single-word="false"/>
      <style:text-properties fo:font-size="12pt" fo:font-style="normal" style:text-underline-style="none" fo:font-weight="normal" officeooo:paragraph-rsid="003ddeea" style:font-size-asian="12pt" style:font-style-asian="normal" style:font-weight-asian="normal" style:font-size-complex="12pt" style:font-style-complex="normal" style:font-weight-complex="normal"/>
    </style:style>
    <style:style style:name="P162" style:family="paragraph" style:parent-style-name="Standard">
      <style:paragraph-properties fo:text-align="left" style:justify-single-word="false"/>
      <style:text-properties officeooo:paragraph-rsid="003ddeea"/>
    </style:style>
    <style:style style:name="P163" style:family="paragraph" style:parent-style-name="Standard">
      <style:paragraph-properties fo:text-align="left" style:justify-single-word="false"/>
      <style:text-properties fo:font-size="12pt" fo:font-weight="bold" officeooo:paragraph-rsid="003ddeea" style:font-size-asian="12pt" style:font-weight-asian="bold" style:font-size-complex="12pt" style:font-weight-complex="bold"/>
    </style:style>
    <style:style style:name="P164" style:family="paragraph" style:parent-style-name="Table_20_Contents">
      <style:paragraph-properties fo:text-align="justify" style:justify-single-word="false"/>
      <style:text-properties fo:font-size="12pt" officeooo:paragraph-rsid="003ddeea" style:font-size-asian="12pt" style:font-size-complex="12pt"/>
    </style:style>
    <style:style style:name="P165" style:family="paragraph" style:parent-style-name="Standard">
      <style:paragraph-properties fo:text-align="justify" style:justify-single-word="false"/>
      <style:text-properties style:font-name="Liberation Serif1" fo:font-size="12pt" fo:font-style="normal" fo:font-weight="normal" officeooo:paragraph-rsid="003ddeea" style:font-size-asian="12pt" style:font-style-asian="normal" style:font-weight-asian="normal" style:font-name-complex="Liberation Serif1" style:font-size-complex="12pt" style:font-style-complex="normal" style:font-weight-complex="normal"/>
    </style:style>
    <style:style style:name="P166" style:family="paragraph" style:parent-style-name="Table_20_Contents">
      <style:paragraph-properties fo:text-align="justify" style:justify-single-word="false"/>
      <style:text-properties style:font-name="Courier" fo:font-size="11pt" fo:font-style="normal" fo:font-weight="normal" officeooo:paragraph-rsid="003ddeea" style:font-size-asian="11pt" style:font-style-asian="normal" style:font-weight-asian="normal" style:font-name-complex="Courier" style:font-size-complex="11pt" style:font-style-complex="normal" style:font-weight-complex="normal"/>
    </style:style>
    <style:style style:name="P167" style:family="paragraph" style:parent-style-name="Table_20_Contents">
      <style:paragraph-properties fo:text-align="justify" style:justify-single-word="false"/>
      <style:text-properties style:font-name="Courier" fo:font-size="12pt" fo:font-style="normal" fo:font-weight="normal" officeooo:paragraph-rsid="003ddeea" style:font-size-asian="12pt" style:font-style-asian="normal" style:font-weight-asian="normal" style:font-name-complex="Courier" style:font-size-complex="12pt" style:font-style-complex="normal" style:font-weight-complex="normal"/>
    </style:style>
    <style:style style:name="P168" style:family="paragraph" style:parent-style-name="Table_20_Contents">
      <style:paragraph-properties fo:text-align="center" style:justify-single-word="false"/>
      <style:text-properties style:font-name="Courier" fo:font-size="12pt" fo:font-style="normal" fo:font-weight="normal" officeooo:paragraph-rsid="003ddeea" style:font-size-asian="12pt" style:font-style-asian="normal" style:font-weight-asian="normal" style:font-name-complex="Courier" style:font-size-complex="12pt" style:font-style-complex="normal" style:font-weight-complex="normal"/>
    </style:style>
    <style:style style:name="P169" style:family="paragraph" style:parent-style-name="Standard">
      <style:paragraph-properties fo:text-align="justify" style:justify-single-word="false"/>
      <style:text-properties fo:language="en" fo:country="US" fo:font-weight="normal" officeooo:paragraph-rsid="003ddeea" style:font-weight-asian="normal" style:font-weight-complex="normal"/>
    </style:style>
    <style:style style:name="P170" style:family="paragraph" style:parent-style-name="Table_20_Contents">
      <style:paragraph-properties fo:text-align="justify" style:justify-single-word="false"/>
      <style:text-properties fo:color="#808080" loext:opacity="100%" fo:font-size="12pt" officeooo:paragraph-rsid="003ddeea" style:font-size-asian="12pt" style:font-size-complex="12pt"/>
    </style:style>
    <style:style style:name="P171" style:family="paragraph" style:parent-style-name="Standard">
      <style:paragraph-properties fo:text-align="justify" style:justify-single-word="false"/>
      <style:text-properties fo:font-style="normal" fo:font-weight="normal" officeooo:paragraph-rsid="003ddeea" style:font-style-asian="normal" style:font-weight-asian="normal" style:font-style-complex="normal" style:font-weight-complex="normal"/>
    </style:style>
    <style:style style:name="P172" style:family="paragraph" style:parent-style-name="Standard">
      <style:paragraph-properties fo:text-align="center" style:justify-single-word="false"/>
      <style:text-properties fo:font-size="13pt" fo:font-weight="bold" officeooo:paragraph-rsid="003ddeea" style:font-size-asian="13pt" style:font-weight-asian="bold" style:font-size-complex="13pt" style:font-weight-complex="bold"/>
    </style:style>
    <style:style style:name="P173" style:family="paragraph" style:parent-style-name="Table_20_Contents">
      <style:paragraph-properties fo:text-align="justify" style:justify-single-word="false"/>
      <style:text-properties style:font-name="Courier" fo:font-size="11pt" officeooo:paragraph-rsid="003ddeea" style:font-size-asian="11pt" style:font-name-complex="Courier" style:font-size-complex="11pt"/>
    </style:style>
    <style:style style:name="P174" style:family="paragraph" style:parent-style-name="Table_20_Contents">
      <style:paragraph-properties fo:text-align="justify" style:justify-single-word="false"/>
      <style:text-properties style:font-name="Courier" fo:font-size="11pt" fo:font-style="normal" style:text-underline-style="none" fo:font-weight="normal" officeooo:paragraph-rsid="003ddeea" style:font-size-asian="11pt" style:font-style-asian="normal" style:font-weight-asian="normal" style:font-name-complex="Courier" style:font-size-complex="11pt" style:font-style-complex="normal" style:font-weight-complex="normal"/>
    </style:style>
    <style:style style:name="P175" style:family="paragraph" style:parent-style-name="Standard">
      <style:paragraph-properties fo:text-align="justify" style:justify-single-word="false"/>
      <style:text-properties fo:font-size="13pt" fo:font-weight="normal" officeooo:paragraph-rsid="003ddeea" style:font-size-asian="13pt" style:font-weight-asian="normal" style:font-size-complex="13pt" style:font-weight-complex="normal"/>
    </style:style>
    <style:style style:name="P176" style:family="paragraph" style:parent-style-name="Standard">
      <style:paragraph-properties fo:text-align="justify" style:justify-single-word="false"/>
      <style:text-properties fo:color="#000000" loext:opacity="100%" style:font-name="Courier" fo:font-size="11pt" fo:font-weight="normal" officeooo:paragraph-rsid="003ddeea" fo:background-color="#ffffff" style:font-size-asian="11pt" style:font-weight-asian="normal" style:font-name-complex="Courier" style:font-size-complex="11pt"/>
    </style:style>
    <style:style style:name="P177" style:family="paragraph" style:parent-style-name="Standard">
      <style:paragraph-properties fo:margin-right="0in" style:line-height-at-least="0.198in" fo:text-align="right" style:justify-single-word="false"/>
      <style:text-properties officeooo:paragraph-rsid="003ddeea"/>
    </style:style>
    <style:style style:name="P178" style:family="paragraph" style:parent-style-name="Table_20_Contents">
      <style:paragraph-properties fo:text-align="justify" style:justify-single-word="false"/>
      <style:text-properties style:font-name="Courier" fo:font-size="12pt" fo:font-weight="normal" officeooo:paragraph-rsid="003ddeea" style:font-size-asian="12pt" style:font-weight-asian="normal" style:font-name-complex="Courier" style:font-size-complex="12pt" style:font-weight-complex="normal"/>
    </style:style>
    <style:style style:name="P179" style:family="paragraph" style:parent-style-name="Horizontal_20_Line">
      <style:text-properties fo:font-size="11pt" officeooo:paragraph-rsid="003ddeea" style:font-size-asian="11pt" style:font-size-complex="11pt"/>
    </style:style>
    <style:style style:name="P180" style:family="paragraph" style:parent-style-name="Table_20_Contents">
      <style:paragraph-properties fo:text-align="center" style:justify-single-word="false"/>
      <style:text-properties fo:font-size="12pt" fo:font-weight="bold" officeooo:paragraph-rsid="003ddeea" style:font-size-asian="12pt" style:font-weight-asian="bold" style:font-size-complex="12pt" style:font-weight-complex="bold"/>
    </style:style>
    <style:style style:name="P181" style:family="paragraph" style:parent-style-name="Table_20_Contents">
      <style:paragraph-properties fo:text-align="justify" style:justify-single-word="false"/>
      <style:text-properties style:font-name="Courier" fo:font-size="12pt" fo:font-style="normal" style:text-underline-style="none" fo:font-weight="normal" officeooo:paragraph-rsid="003ddeea" style:font-size-asian="12pt" style:font-style-asian="normal" style:font-weight-asian="normal" style:font-name-complex="Courier" style:font-size-complex="12pt" style:font-style-complex="normal" style:font-weight-complex="normal"/>
    </style:style>
    <style:style style:name="P182" style:family="paragraph" style:parent-style-name="Standard">
      <style:paragraph-properties fo:text-align="center" style:justify-single-word="false"/>
      <style:text-properties fo:font-size="12pt" fo:font-style="normal" style:text-underline-style="none" fo:font-weight="bold" officeooo:paragraph-rsid="003ddeea" style:font-size-asian="12pt" style:font-style-asian="normal" style:font-weight-asian="bold" style:font-size-complex="12pt" style:font-style-complex="normal" style:font-weight-complex="bold"/>
    </style:style>
    <style:style style:name="P183" style:family="paragraph" style:parent-style-name="Table_20_Contents">
      <style:paragraph-properties fo:text-align="center" style:justify-single-word="false"/>
      <style:text-properties style:font-name="Courier" fo:font-size="12pt" fo:font-weight="bold" officeooo:paragraph-rsid="003ddeea" style:font-size-asian="12pt" style:font-weight-asian="bold" style:font-name-complex="Courier" style:font-size-complex="12pt" style:font-weight-complex="bold"/>
    </style:style>
    <style:style style:name="P184" style:family="paragraph" style:parent-style-name="Table_20_Contents">
      <style:paragraph-properties fo:text-align="center" style:justify-single-word="false"/>
      <style:text-properties style:font-name="Courier" fo:font-size="12pt" fo:font-style="normal" style:text-underline-style="none" fo:font-weight="normal" officeooo:paragraph-rsid="003ddeea" style:font-size-asian="12pt" style:font-style-asian="normal" style:font-weight-asian="normal" style:font-name-complex="Courier" style:font-size-complex="12pt" style:font-style-complex="normal" style:font-weight-complex="normal"/>
    </style:style>
    <style:style style:name="P185" style:family="paragraph" style:parent-style-name="Standard">
      <style:paragraph-properties style:line-height-at-least="0.198in"/>
      <style:text-properties fo:font-size="11pt" officeooo:paragraph-rsid="003ddeea" style:font-size-asian="11pt" style:font-size-complex="11pt"/>
    </style:style>
    <style:style style:name="P186" style:family="paragraph" style:parent-style-name="Standard">
      <style:paragraph-properties style:line-height-at-least="0.198in"/>
      <style:text-properties officeooo:paragraph-rsid="003ddeea"/>
    </style:style>
    <style:style style:name="P187" style:family="paragraph" style:parent-style-name="Table_20_Contents">
      <style:paragraph-properties fo:text-align="justify" style:justify-single-word="false"/>
      <style:text-properties style:font-name="Courier" fo:font-size="12pt" officeooo:paragraph-rsid="003ddeea" style:font-size-asian="12pt" style:font-name-complex="Courier" style:font-size-complex="12pt"/>
    </style:style>
    <style:style style:name="P188" style:family="paragraph" style:parent-style-name="Standard">
      <style:paragraph-properties fo:text-align="left" style:justify-single-word="false"/>
      <style:text-properties fo:font-size="12pt" fo:font-style="italic" fo:font-weight="normal" officeooo:paragraph-rsid="003ddeea" style:font-size-asian="12pt" style:font-style-asian="italic" style:font-weight-asian="normal" style:font-size-complex="12pt" style:font-style-complex="italic" style:font-weight-complex="normal"/>
    </style:style>
    <style:style style:name="P189" style:family="paragraph" style:parent-style-name="Standard">
      <style:paragraph-properties fo:text-align="justify" style:justify-single-word="false"/>
      <style:text-properties fo:font-size="13pt" fo:font-style="normal" fo:font-weight="bold" officeooo:paragraph-rsid="003ddeea" style:font-size-asian="13pt" style:font-style-asian="normal" style:font-weight-asian="bold" style:font-size-complex="13pt" style:font-style-complex="normal" style:font-weight-complex="bold"/>
    </style:style>
    <style:style style:name="P190" style:family="paragraph" style:parent-style-name="Standard">
      <style:paragraph-properties fo:text-align="left" style:justify-single-word="false"/>
      <style:text-properties fo:font-size="12pt" fo:font-style="normal" fo:font-weight="normal" officeooo:paragraph-rsid="003ddeea" style:font-size-asian="12pt" style:font-style-asian="normal" style:font-weight-asian="normal" style:font-size-complex="12pt" style:font-style-complex="normal" style:font-weight-complex="normal"/>
    </style:style>
    <style:style style:name="P191" style:family="paragraph" style:parent-style-name="Standard">
      <style:text-properties fo:font-size="10pt" fo:font-style="italic" officeooo:paragraph-rsid="003ddeea" style:font-size-asian="10pt" style:font-style-asian="italic" style:font-size-complex="10pt"/>
    </style:style>
    <style:style style:name="P192" style:family="paragraph" style:parent-style-name="Standard">
      <style:paragraph-properties fo:text-align="center" style:justify-single-word="false"/>
      <style:text-properties fo:font-size="26pt" officeooo:paragraph-rsid="003ddeea" style:font-size-asian="26pt" style:font-size-complex="26pt"/>
    </style:style>
    <style:style style:name="P193" style:family="paragraph" style:parent-style-name="Standard">
      <style:paragraph-properties fo:text-align="justify" style:justify-single-word="false"/>
      <style:text-properties fo:font-size="13pt" style:text-underline-style="none" fo:font-weight="normal" officeooo:paragraph-rsid="003ddeea" style:font-size-asian="13pt" style:font-weight-asian="normal" style:font-size-complex="13pt" style:font-weight-complex="normal"/>
    </style:style>
    <style:style style:name="P194" style:family="paragraph" style:parent-style-name="Standard">
      <style:paragraph-properties fo:text-align="justify" style:justify-single-word="false"/>
      <style:text-properties fo:font-size="13pt" fo:font-weight="bold" officeooo:paragraph-rsid="003ddeea" style:font-size-asian="13pt" style:font-weight-asian="bold" style:font-size-complex="13pt" style:font-weight-complex="bold"/>
    </style:style>
    <style:style style:name="P195" style:family="paragraph" style:parent-style-name="Standard">
      <style:paragraph-properties fo:margin-right="0in" style:line-height-at-least="0.198in"/>
      <style:text-properties fo:color="#000000" loext:opacity="100%" style:font-name="Courier" fo:font-size="11pt" fo:font-weight="normal" officeooo:paragraph-rsid="003ddeea" fo:background-color="#ffffff" style:font-size-asian="11pt" style:font-weight-asian="normal" style:font-name-complex="Courier" style:font-size-complex="11pt"/>
    </style:style>
    <style:style style:name="P196" style:family="paragraph" style:parent-style-name="Table_20_Contents">
      <style:paragraph-properties fo:text-align="justify" style:justify-single-word="false"/>
      <style:text-properties style:font-name="Courier" fo:font-size="11pt" fo:font-style="normal" officeooo:paragraph-rsid="003ddeea" style:font-size-asian="11pt" style:font-style-asian="normal" style:font-name-complex="Courier" style:font-size-complex="11pt" style:font-style-complex="normal"/>
    </style:style>
    <style:style style:name="P197" style:family="paragraph" style:parent-style-name="Standard">
      <style:paragraph-properties fo:text-align="justify" style:justify-single-word="false"/>
      <style:text-properties style:font-name="Courier" fo:font-size="12pt" fo:font-style="normal" fo:font-weight="normal" officeooo:paragraph-rsid="003ddeea" style:font-size-asian="12pt" style:font-style-asian="normal" style:font-weight-asian="normal" style:font-name-complex="Courier" style:font-size-complex="12pt" style:font-style-complex="normal" style:font-weight-complex="normal"/>
    </style:style>
    <style:style style:name="P198" style:family="paragraph" style:parent-style-name="Standard">
      <style:paragraph-properties fo:text-align="justify" style:justify-single-word="false"/>
      <style:text-properties fo:color="#c9211e" loext:opacity="100%" officeooo:paragraph-rsid="003ddeea"/>
    </style:style>
    <style:style style:name="P199" style:family="paragraph" style:parent-style-name="Standard">
      <style:paragraph-properties fo:text-align="justify" style:justify-single-word="false"/>
      <style:text-properties style:use-window-font-color="true" loext:opacity="0%" fo:font-weight="normal" officeooo:paragraph-rsid="003ddeea" style:font-weight-asian="normal" style:font-weight-complex="normal"/>
    </style:style>
    <style:style style:name="P200" style:family="paragraph" style:parent-style-name="Standard">
      <style:paragraph-properties fo:text-align="justify" style:justify-single-word="false"/>
      <style:text-properties style:font-name="Courier" fo:font-size="11pt" fo:font-style="normal" fo:font-weight="normal" officeooo:paragraph-rsid="003ddeea" style:font-size-asian="11pt" style:font-style-asian="normal" style:font-weight-asian="normal" style:font-name-complex="Courier" style:font-size-complex="11pt" style:font-style-complex="normal" style:font-weight-complex="normal"/>
    </style:style>
    <style:style style:name="P201" style:family="paragraph" style:parent-style-name="Standard">
      <style:paragraph-properties fo:text-align="justify" style:justify-single-word="false"/>
      <style:text-properties style:use-window-font-color="true" loext:opacity="0%" style:font-name="Liberation Serif1" fo:font-size="12pt" fo:font-style="normal" fo:font-weight="normal" officeooo:paragraph-rsid="003ddeea" style:font-size-asian="12pt" style:font-style-asian="normal" style:font-weight-asian="normal" style:font-name-complex="Liberation Serif1" style:font-size-complex="12pt" style:font-style-complex="normal" style:font-weight-complex="normal"/>
    </style:style>
    <style:style style:name="P202" style:family="paragraph" style:parent-style-name="Standard">
      <style:paragraph-properties fo:text-align="justify" style:justify-single-word="false"/>
      <style:text-properties style:use-window-font-color="true" loext:opacity="0%" officeooo:paragraph-rsid="003ddeea"/>
    </style:style>
    <style:style style:name="P203" style:family="paragraph" style:parent-style-name="Standard">
      <style:paragraph-properties fo:text-align="center" style:justify-single-word="false"/>
      <style:text-properties style:use-window-font-color="true" loext:opacity="0%" style:font-name="Liberation Serif1" fo:font-size="12pt" fo:font-style="normal" fo:font-weight="normal" officeooo:paragraph-rsid="003ddeea" style:font-size-asian="12pt" style:font-style-asian="normal" style:font-weight-asian="normal" style:font-name-complex="Liberation Serif1" style:font-size-complex="12pt" style:font-style-complex="normal" style:font-weight-complex="normal"/>
    </style:style>
    <style:style style:name="P204" style:family="paragraph" style:parent-style-name="Standard">
      <style:paragraph-properties fo:text-align="justify" style:justify-single-word="false"/>
      <style:text-properties fo:color="#c9211e" loext:opacity="100%" style:font-name="Liberation Serif1" fo:font-size="12pt" fo:font-style="normal" fo:font-weight="normal" officeooo:paragraph-rsid="003ddeea" style:font-size-asian="12pt" style:font-style-asian="normal" style:font-weight-asian="normal" style:font-name-complex="Liberation Serif1" style:font-size-complex="12pt" style:font-style-complex="normal" style:font-weight-complex="normal"/>
    </style:style>
    <style:style style:name="P205" style:family="paragraph" style:parent-style-name="Standard">
      <style:paragraph-properties fo:text-align="justify" style:justify-single-word="false"/>
      <style:text-properties style:use-window-font-color="true" loext:opacity="0%" style:font-name="Liberation Serif1" fo:font-size="12pt" fo:font-style="italic" fo:font-weight="normal" officeooo:paragraph-rsid="003ddeea" style:font-size-asian="12pt" style:font-style-asian="italic" style:font-weight-asian="normal" style:font-name-complex="Liberation Serif1" style:font-size-complex="12pt" style:font-style-complex="italic" style:font-weight-complex="normal"/>
    </style:style>
    <style:style style:name="P206" style:family="paragraph" style:parent-style-name="Horizontal_20_Line">
      <style:text-properties style:use-window-font-color="true" loext:opacity="0%" style:font-name="Liberation Serif1" fo:font-size="12pt" fo:font-style="normal" fo:font-weight="normal" officeooo:paragraph-rsid="003ddeea" style:font-size-asian="12pt" style:font-style-asian="normal" style:font-weight-asian="normal" style:font-name-complex="Liberation Serif1" style:font-size-complex="12pt" style:font-style-complex="normal" style:font-weight-complex="normal"/>
    </style:style>
    <style:style style:name="P207" style:family="paragraph" style:parent-style-name="Standard">
      <style:paragraph-properties fo:text-align="justify" style:justify-single-word="false"/>
      <style:text-properties fo:color="#000000" loext:opacity="100%" style:font-name="Liberation Serif1" fo:font-size="12pt" fo:font-style="normal" fo:font-weight="normal" officeooo:paragraph-rsid="003ddeea" style:font-size-asian="12pt" style:font-style-asian="normal" style:font-weight-asian="normal" style:font-name-complex="Liberation Serif1" style:font-size-complex="12pt" style:font-style-complex="normal" style:font-weight-complex="normal"/>
    </style:style>
    <style:style style:name="P208" style:family="paragraph" style:parent-style-name="Table_20_Contents">
      <style:paragraph-properties fo:text-align="justify" style:justify-single-word="false"/>
      <style:text-properties style:font-name="Liberation Serif1" fo:font-size="12pt" officeooo:paragraph-rsid="003ddeea" style:font-size-asian="12pt" style:font-name-complex="Liberation Serif1" style:font-size-complex="12pt"/>
    </style:style>
    <style:style style:name="P209" style:family="paragraph" style:parent-style-name="Standard">
      <style:paragraph-properties fo:text-align="center" style:justify-single-word="false"/>
      <style:text-properties fo:color="#000000" loext:opacity="100%" style:font-name="Liberation Serif1" fo:font-size="12pt" fo:font-style="normal" fo:font-weight="bold" officeooo:paragraph-rsid="003ddeea" style:font-size-asian="12pt" style:font-style-asian="normal" style:font-weight-asian="bold" style:font-name-complex="Liberation Serif1" style:font-size-complex="12pt" style:font-style-complex="normal" style:font-weight-complex="bold"/>
    </style:style>
    <style:style style:name="P210" style:family="paragraph" style:parent-style-name="Standard">
      <style:paragraph-properties fo:text-align="justify" style:justify-single-word="false"/>
      <style:text-properties fo:color="#000000" loext:opacity="100%" fo:font-weight="normal" officeooo:paragraph-rsid="003ddeea" style:font-weight-asian="normal" style:font-weight-complex="normal"/>
    </style:style>
    <style:style style:name="P211" style:family="paragraph" style:parent-style-name="Standard">
      <style:paragraph-properties fo:text-align="justify" style:justify-single-word="false"/>
      <style:text-properties style:use-window-font-color="true" loext:opacity="0%" style:font-name="Courier" fo:font-size="12pt" fo:font-style="normal" fo:font-weight="normal" officeooo:paragraph-rsid="003ddeea" style:font-size-asian="12pt" style:font-style-asian="normal" style:font-weight-asian="normal" style:font-name-complex="Courier" style:font-size-complex="12pt" style:font-style-complex="normal" style:font-weight-complex="normal"/>
    </style:style>
    <style:style style:name="P212" style:family="paragraph" style:parent-style-name="Standard">
      <style:paragraph-properties fo:text-align="center" style:justify-single-word="false"/>
      <style:text-properties fo:color="#c9211e" loext:opacity="100%" officeooo:paragraph-rsid="003ddeea"/>
    </style:style>
    <style:style style:name="P213" style:family="paragraph" style:parent-style-name="Standard">
      <style:paragraph-properties fo:text-align="justify" style:justify-single-word="false"/>
      <style:text-properties fo:color="#000000" loext:opacity="100%" officeooo:paragraph-rsid="003ddeea"/>
    </style:style>
    <style:style style:name="P214" style:family="paragraph" style:parent-style-name="Standard">
      <style:paragraph-properties fo:text-align="center" style:justify-single-word="false"/>
      <style:text-properties fo:color="#000000" loext:opacity="100%" officeooo:paragraph-rsid="003ddeea"/>
    </style:style>
    <style:style style:name="P215" style:family="paragraph" style:parent-style-name="Table_20_Contents">
      <style:paragraph-properties fo:text-align="justify" style:justify-single-word="false"/>
      <style:text-properties fo:font-weight="bold" officeooo:paragraph-rsid="003ddeea" style:font-weight-asian="bold" style:font-weight-complex="bold"/>
    </style:style>
    <style:style style:name="P216" style:family="paragraph" style:parent-style-name="Table_20_Contents">
      <style:paragraph-properties fo:text-align="center" style:justify-single-word="false"/>
      <style:text-properties fo:font-weight="bold" officeooo:paragraph-rsid="003ddeea" style:font-weight-asian="bold" style:font-weight-complex="bold"/>
    </style:style>
    <style:style style:name="P217" style:family="paragraph" style:parent-style-name="Standard">
      <style:paragraph-properties fo:text-align="left" style:justify-single-word="false"/>
      <style:text-properties fo:color="#000000" loext:opacity="100%" style:font-name="Liberation Serif1" fo:font-size="12pt" fo:font-style="normal" fo:font-weight="normal" officeooo:paragraph-rsid="003ddeea" style:font-size-asian="12pt" style:font-style-asian="normal" style:font-weight-asian="normal" style:font-name-complex="Liberation Serif1" style:font-size-complex="12pt" style:font-style-complex="normal" style:font-weight-complex="normal"/>
    </style:style>
    <style:style style:name="P218" style:family="paragraph" style:parent-style-name="Standard">
      <style:paragraph-properties fo:text-align="justify" style:justify-single-word="false"/>
      <style:text-properties officeooo:paragraph-rsid="0027bfe5"/>
    </style:style>
    <style:style style:name="P219" style:family="paragraph" style:parent-style-name="Standard">
      <style:paragraph-properties fo:text-align="left" style:justify-single-word="false"/>
    </style:style>
    <style:style style:name="P220" style:family="paragraph" style:parent-style-name="Standard" style:list-style-name="L10">
      <style:paragraph-properties fo:text-align="left" style:justify-single-word="false"/>
    </style:style>
    <style:style style:name="P221" style:family="paragraph" style:parent-style-name="Standard" style:list-style-name="L11">
      <style:paragraph-properties fo:text-align="left" style:justify-single-word="false"/>
    </style:style>
    <style:style style:name="P222" style:family="paragraph" style:parent-style-name="Standard" style:list-style-name="L12">
      <style:paragraph-properties fo:text-align="left" style:justify-single-word="false"/>
    </style:style>
    <style:style style:name="P223" style:family="paragraph" style:parent-style-name="Standard" style:list-style-name="L13">
      <style:paragraph-properties fo:text-align="left" style:justify-single-word="false"/>
    </style:style>
    <style:style style:name="P224" style:family="paragraph" style:parent-style-name="Standard">
      <style:paragraph-properties fo:text-align="left" style:justify-single-word="false"/>
      <style:text-properties fo:font-weight="bold" style:font-weight-asian="bold" style:font-weight-complex="bold"/>
    </style:style>
    <style:style style:name="P225" style:family="paragraph" style:parent-style-name="Standard" style:list-style-name="L14">
      <style:paragraph-properties fo:text-align="left" style:justify-single-word="false"/>
    </style:style>
    <style:style style:name="P226" style:family="paragraph" style:parent-style-name="Standard" style:list-style-name="L15">
      <style:paragraph-properties fo:text-align="left" style:justify-single-word="false"/>
    </style:style>
    <style:style style:name="P227" style:family="paragraph" style:parent-style-name="Standard" style:list-style-name="L16">
      <style:paragraph-properties fo:text-align="left" style:justify-single-word="false"/>
    </style:style>
    <style:style style:name="P228" style:family="paragraph" style:parent-style-name="Standard" style:list-style-name="L17">
      <style:paragraph-properties fo:text-align="left" style:justify-single-word="false"/>
    </style:style>
    <style:style style:name="P229" style:family="paragraph" style:parent-style-name="Standard">
      <style:paragraph-properties fo:text-align="justify" style:justify-single-word="false"/>
      <style:text-properties fo:font-size="12pt" officeooo:paragraph-rsid="0027bfe5" style:font-size-asian="12pt" style:font-size-complex="12pt"/>
    </style:style>
    <style:style style:name="P230" style:family="paragraph" style:parent-style-name="Table_20_Contents">
      <style:paragraph-properties fo:text-align="justify" style:justify-single-word="false"/>
      <style:text-properties fo:font-size="16pt" officeooo:paragraph-rsid="002b565e" style:font-size-asian="16pt" style:font-size-complex="16pt"/>
    </style:style>
    <style:style style:name="P231" style:family="paragraph" style:parent-style-name="Table_20_Contents">
      <style:paragraph-properties fo:text-align="justify" style:justify-single-word="false"/>
      <style:text-properties fo:font-size="16pt" fo:font-weight="bold" officeooo:rsid="002b565e" officeooo:paragraph-rsid="002b565e" style:font-size-asian="16pt" style:font-weight-asian="bold" style:font-size-complex="16pt" style:font-weight-complex="bold"/>
    </style:style>
    <style:style style:name="P232" style:family="paragraph" style:parent-style-name="Table_20_Contents">
      <style:paragraph-properties fo:text-align="justify" style:justify-single-word="false"/>
      <style:text-properties fo:font-size="14pt" fo:font-weight="normal" officeooo:rsid="002b565e" officeooo:paragraph-rsid="002b565e" style:font-size-asian="14pt" style:font-weight-asian="normal" style:font-size-complex="14pt" style:font-weight-complex="normal"/>
    </style:style>
    <style:style style:name="P233" style:family="paragraph" style:parent-style-name="Table_20_Contents">
      <style:paragraph-properties fo:text-align="justify" style:justify-single-word="false"/>
      <style:text-properties fo:font-size="16pt" fo:font-weight="normal" officeooo:rsid="002b565e" officeooo:paragraph-rsid="002b565e" style:font-size-asian="16pt" style:font-weight-asian="normal" style:font-size-complex="16pt" style:font-weight-complex="normal"/>
    </style:style>
    <style:style style:name="T1" style:family="text">
      <style:text-properties officeooo:rsid="002c3b03"/>
    </style:style>
    <style:style style:name="T2" style:family="text">
      <style:text-properties officeooo:rsid="0020e2f6"/>
    </style:style>
    <style:style style:name="T3" style:family="text">
      <style:text-properties officeooo:rsid="002f5f66"/>
    </style:style>
    <style:style style:name="T4" style:family="text">
      <style:text-properties officeooo:rsid="0032b97c"/>
    </style:style>
    <style:style style:name="T5" style:family="text">
      <style:text-properties fo:font-size="12pt" fo:font-weight="normal" officeooo:rsid="00202600" style:font-size-asian="12pt" style:font-weight-asian="normal" style:font-size-complex="12pt" style:font-weight-complex="normal"/>
    </style:style>
    <style:style style:name="T6" style:family="text">
      <style:text-properties fo:font-weight="normal" style:font-weight-asian="normal" style:font-weight-complex="normal"/>
    </style:style>
    <style:style style:name="T7" style:family="text">
      <style:text-properties style:font-name="Liberation Serif" fo:font-style="italic" style:font-style-asian="italic" style:font-style-complex="italic"/>
    </style:style>
    <style:style style:name="T8" style:family="text">
      <style:text-properties style:font-name="Liberation Serif"/>
    </style:style>
    <style:style style:name="T9" style:family="text">
      <style:text-properties fo:font-size="16pt" fo:font-weight="bold" officeooo:rsid="001f978e" style:font-size-asian="16pt" style:font-weight-asian="bold" style:font-size-complex="16pt" style:font-weight-complex="bold"/>
    </style:style>
    <style:style style:name="T10" style:family="text">
      <style:text-properties fo:font-size="14pt" fo:font-weight="bold" officeooo:rsid="001f978e" style:font-size-asian="12.25pt" style:font-weight-asian="bold" style:font-size-complex="14pt" style:font-weight-complex="bold"/>
    </style:style>
    <style:style style:name="T11" style:family="text">
      <style:text-properties fo:font-size="16pt" fo:font-weight="bold" officeooo:rsid="002f5f66" style:font-size-asian="16pt" style:font-weight-asian="bold" style:font-size-complex="16pt" style:font-weight-complex="bold"/>
    </style:style>
    <style:style style:name="T12" style:family="text">
      <style:text-properties fo:font-size="16pt" fo:font-weight="bold" officeooo:rsid="0020e2f6" style:font-size-asian="16pt" style:font-weight-asian="bold" style:font-size-complex="16pt" style:font-weight-complex="bold"/>
    </style:style>
    <style:style style:name="T13" style:family="text">
      <style:text-properties style:font-name="Liberation Serif" fo:font-style="italic" fo:font-weight="normal" officeooo:rsid="002f5f66" style:font-style-asian="italic" style:font-weight-asian="normal" style:font-style-complex="italic" style:font-weight-complex="normal"/>
    </style:style>
    <style:style style:name="T14" style:family="text">
      <style:text-properties style:font-name="Liberation Serif" fo:font-weight="normal" style:font-weight-asian="normal" style:font-weight-complex="normal"/>
    </style:style>
    <style:style style:name="T15" style:family="text">
      <style:text-properties fo:font-weight="bold" officeooo:rsid="0020e2f6" style:font-weight-asian="bold" style:font-weight-complex="bold"/>
    </style:style>
    <style:style style:name="T16" style:family="text">
      <style:text-properties fo:font-style="normal" fo:font-weight="bold" officeooo:rsid="00225b0b" style:font-style-asian="normal" style:font-weight-asian="bold" style:font-style-complex="normal" style:font-weight-complex="bold"/>
    </style:style>
    <style:style style:name="T17"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8" style:family="text">
      <style:text-properties officeooo:rsid="0021fd63"/>
    </style:style>
    <style:style style:name="T19" style:family="text">
      <style:text-properties officeooo:rsid="05695b86"/>
    </style:style>
    <style:style style:name="T20" style:family="text">
      <style:text-properties officeooo:rsid="0459d7a3"/>
    </style:style>
    <style:style style:name="T21" style:family="text">
      <style:text-properties fo:font-size="13pt" style:font-size-asian="13pt" style:font-size-complex="13pt"/>
    </style:style>
    <style:style style:name="T22" style:family="text">
      <style:text-properties fo:font-size="13pt" officeooo:rsid="0459d7a3" style:font-size-asian="13pt" style:font-size-complex="13pt"/>
    </style:style>
    <style:style style:name="T23" style:family="text">
      <style:text-properties fo:font-size="13pt" officeooo:rsid="061520c8" style:font-size-asian="13pt" style:font-size-complex="13pt"/>
    </style:style>
    <style:style style:name="T24" style:family="text">
      <style:text-properties officeooo:rsid="0069734c"/>
    </style:style>
    <style:style style:name="T25" style:family="text">
      <style:text-properties officeooo:rsid="006a3ce0"/>
    </style:style>
    <style:style style:name="T26" style:family="text">
      <style:text-properties officeooo:rsid="006c151f"/>
    </style:style>
    <style:style style:name="T27" style:family="text">
      <style:text-properties officeooo:rsid="0464fbaa"/>
    </style:style>
    <style:style style:name="T28" style:family="text">
      <style:text-properties officeooo:rsid="05e2c1c7"/>
    </style:style>
    <style:style style:name="T29" style:family="text">
      <style:text-properties officeooo:rsid="0471668c"/>
    </style:style>
    <style:style style:name="T30" style:family="text">
      <style:text-properties officeooo:rsid="027fd63e"/>
    </style:style>
    <style:style style:name="T31" style:family="text">
      <style:text-properties officeooo:rsid="023cad51"/>
    </style:style>
    <style:style style:name="T32" style:family="text">
      <style:text-properties officeooo:rsid="054e85af"/>
    </style:style>
    <style:style style:name="T33" style:family="text">
      <style:text-properties officeooo:rsid="023abbef"/>
    </style:style>
    <style:style style:name="T34" style:family="text">
      <style:text-properties officeooo:rsid="041d0ffe"/>
    </style:style>
    <style:style style:name="T35" style:family="text">
      <style:text-properties officeooo:rsid="06a6b977"/>
    </style:style>
    <style:style style:name="T36" style:family="text">
      <style:text-properties officeooo:rsid="00310325"/>
    </style:style>
    <style:style style:name="T37" style:family="text">
      <style:text-properties officeooo:rsid="08cc7e67"/>
    </style:style>
    <style:style style:name="T38" style:family="text">
      <style:text-properties officeooo:rsid="063afee4"/>
    </style:style>
    <style:style style:name="T39" style:family="text">
      <style:text-properties fo:font-size="13pt" fo:font-weight="normal" officeooo:rsid="05c60ac2" style:font-size-asian="13pt" style:font-weight-asian="normal" style:font-size-complex="13pt" style:font-weight-complex="normal"/>
    </style:style>
    <style:style style:name="T40" style:family="text">
      <style:text-properties fo:font-family="Courier" style:font-family-generic="modern" style:font-pitch="fixed" fo:font-size="13pt" fo:font-weight="normal" officeooo:rsid="05c7c60d" style:font-size-asian="13pt" style:font-weight-asian="normal" style:font-size-complex="13pt" style:font-weight-complex="normal"/>
    </style:style>
    <style:style style:name="T41" style:family="text">
      <style:text-properties fo:font-size="13pt" fo:font-weight="normal" officeooo:rsid="054e85af" style:font-size-asian="13pt" style:font-weight-asian="normal" style:font-size-complex="13pt" style:font-weight-complex="normal"/>
    </style:style>
    <style:style style:name="T42" style:family="text">
      <style:text-properties fo:font-size="13pt" fo:font-weight="normal" officeooo:rsid="0634eb79" style:font-size-asian="13pt" style:font-weight-asian="normal" style:font-size-complex="13pt" style:font-weight-complex="normal"/>
    </style:style>
    <style:style style:name="T43" style:family="text">
      <style:text-properties fo:font-family="Courier" style:font-family-generic="modern" style:font-pitch="fixed" fo:font-size="13pt" fo:font-weight="normal" officeooo:rsid="05e987ab" style:font-size-asian="13pt" style:font-weight-asian="normal" style:font-size-complex="13pt" style:font-weight-complex="normal"/>
    </style:style>
    <style:style style:name="T44" style:family="text">
      <style:text-properties fo:font-size="13pt" fo:font-weight="normal" officeooo:rsid="05c7c60d" style:font-size-asian="13pt" style:font-weight-asian="normal" style:font-size-complex="13pt" style:font-weight-complex="normal"/>
    </style:style>
    <style:style style:name="T45" style:family="text">
      <style:text-properties officeooo:rsid="05c7c60d"/>
    </style:style>
    <style:style style:name="T46" style:family="text">
      <style:text-properties fo:font-family="Courier" style:font-family-generic="modern" style:font-pitch="fixed" officeooo:rsid="05c7c60d"/>
    </style:style>
    <style:style style:name="T47" style:family="text">
      <style:text-properties fo:font-size="13pt" fo:font-weight="normal" officeooo:rsid="023abbef" style:font-size-asian="13pt" style:font-weight-asian="normal" style:font-size-complex="13pt" style:font-weight-complex="normal"/>
    </style:style>
    <style:style style:name="T48" style:family="text">
      <style:text-properties officeooo:rsid="05d71e03"/>
    </style:style>
    <style:style style:name="T49" style:family="text">
      <style:text-properties fo:font-style="italic" officeooo:rsid="05d71e03" style:font-style-asian="italic" style:font-style-complex="italic"/>
    </style:style>
    <style:style style:name="T50" style:family="text">
      <style:text-properties fo:font-style="italic" officeooo:rsid="05c7c60d" style:font-style-asian="italic" style:font-style-complex="italic"/>
    </style:style>
    <style:style style:name="T51" style:family="text">
      <style:text-properties officeooo:rsid="006d8a4c"/>
    </style:style>
    <style:style style:name="T52" style:family="text">
      <style:text-properties officeooo:rsid="07aea5c8"/>
    </style:style>
    <style:style style:name="T53" style:family="text">
      <style:text-properties fo:font-size="13pt" fo:font-weight="normal" officeooo:rsid="0068d3c8" style:font-size-asian="13pt" style:font-weight-asian="normal" style:font-size-complex="13pt" style:font-weight-complex="normal"/>
    </style:style>
    <style:style style:name="T54" style:family="text">
      <style:text-properties fo:font-size="13pt" fo:font-weight="normal" officeooo:rsid="006d8a4c" style:font-size-asian="13pt" style:font-weight-asian="normal" style:font-size-complex="13pt" style:font-weight-complex="normal"/>
    </style:style>
    <style:style style:name="T55" style:family="text">
      <style:text-properties fo:font-size="13pt" fo:font-weight="normal" officeooo:rsid="07aea5c8" style:font-size-asian="13pt" style:font-weight-asian="normal" style:font-size-complex="13pt" style:font-weight-complex="normal"/>
    </style:style>
    <style:style style:name="T56" style:family="text">
      <style:text-properties fo:font-size="13pt" fo:font-weight="normal" officeooo:rsid="0459d7a3" style:font-size-asian="13pt" style:font-weight-asian="normal" style:font-size-complex="13pt" style:font-weight-complex="normal"/>
    </style:style>
    <style:style style:name="T57" style:family="text">
      <style:text-properties officeooo:rsid="05d43e74"/>
    </style:style>
    <style:style style:name="T58" style:family="text">
      <style:text-properties officeooo:rsid="05d584cc"/>
    </style:style>
    <style:style style:name="T59" style:family="text">
      <style:text-properties officeooo:rsid="05d58dd4"/>
    </style:style>
    <style:style style:name="T60" style:family="text">
      <style:text-properties fo:font-family="Courier" style:font-family-generic="modern" style:font-pitch="fixed" officeooo:rsid="05d584cc"/>
    </style:style>
    <style:style style:name="T61" style:family="text">
      <style:text-properties fo:font-size="13pt" fo:font-weight="normal" officeooo:rsid="05d29cca" style:font-size-asian="13pt" style:font-weight-asian="normal" style:font-size-complex="13pt" style:font-weight-complex="normal"/>
    </style:style>
    <style:style style:name="T62" style:family="text">
      <style:text-properties fo:font-size="13pt" fo:font-weight="normal" officeooo:rsid="05d43e74" style:font-size-asian="13pt" style:font-weight-asian="normal" style:font-size-complex="13pt" style:font-weight-complex="normal"/>
    </style:style>
    <style:style style:name="T63" style:family="text">
      <style:text-properties fo:font-size="13pt" fo:font-weight="normal" officeooo:rsid="05d584cc" style:font-size-asian="13pt" style:font-weight-asian="normal" style:font-size-complex="13pt" style:font-weight-complex="normal"/>
    </style:style>
    <style:style style:name="T64" style:family="text">
      <style:text-properties fo:font-family="Courier" style:font-family-generic="modern" style:font-pitch="fixed" fo:font-size="13pt" fo:font-weight="normal" officeooo:rsid="05d584cc" style:font-size-asian="13pt" style:font-weight-asian="normal" style:font-size-complex="13pt" style:font-weight-complex="normal"/>
    </style:style>
    <style:style style:name="T65" style:family="text">
      <style:text-properties officeooo:rsid="05d82001"/>
    </style:style>
    <style:style style:name="T66" style:family="text">
      <style:text-properties fo:font-size="13pt" fo:font-weight="normal" officeooo:rsid="06356f43" style:font-size-asian="13pt" style:font-weight-asian="normal" style:font-size-complex="13pt" style:font-weight-complex="normal"/>
    </style:style>
    <style:style style:name="T67" style:family="text">
      <style:text-properties fo:font-size="13pt" fo:font-weight="normal" officeooo:rsid="05e2350d" style:font-size-asian="13pt" style:font-weight-asian="normal" style:font-size-complex="13pt" style:font-weight-complex="normal"/>
    </style:style>
    <style:style style:name="T68" style:family="text">
      <style:text-properties officeooo:rsid="2ae3b35d"/>
    </style:style>
    <style:style style:name="T69" style:family="text">
      <style:text-properties officeooo:rsid="2b49777b"/>
    </style:style>
    <style:style style:name="T70" style:family="text">
      <style:text-properties officeooo:rsid="08218bbd"/>
    </style:style>
    <style:style style:name="T71" style:family="text">
      <style:text-properties officeooo:rsid="264d65d8"/>
    </style:style>
    <style:style style:name="T72" style:family="text">
      <style:text-properties officeooo:rsid="36e2991d"/>
    </style:style>
    <style:style style:name="T73" style:family="text">
      <style:text-properties fo:font-size="13pt" fo:font-weight="normal" officeooo:rsid="2b573621" style:font-size-asian="13pt" style:font-weight-asian="normal" style:font-size-complex="13pt" style:font-weight-complex="normal"/>
    </style:style>
    <style:style style:name="T74" style:family="text">
      <style:text-properties fo:font-size="13pt" fo:font-weight="normal" officeooo:rsid="36e2991d" style:font-size-asian="13pt" style:font-weight-asian="normal" style:font-size-complex="13pt" style:font-weight-complex="normal"/>
    </style:style>
    <style:style style:name="T75" style:family="text">
      <style:text-properties fo:font-family="Courier" style:font-family-generic="modern" style:font-pitch="fixed" fo:font-size="13pt" fo:font-weight="normal" officeooo:rsid="36d38bf9" style:font-size-asian="13pt" style:font-weight-asian="normal" style:font-size-complex="13pt" style:font-weight-complex="normal"/>
    </style:style>
    <style:style style:name="T76" style:family="text">
      <style:text-properties fo:font-family="Courier" style:font-family-generic="modern" style:font-pitch="fixed" fo:font-size="13pt" fo:font-weight="normal" officeooo:rsid="36d4d048" style:font-size-asian="13pt" style:font-weight-asian="normal" style:font-size-complex="13pt" style:font-weight-complex="normal"/>
    </style:style>
    <style:style style:name="T77" style:family="text">
      <style:text-properties fo:font-size="13pt" fo:font-weight="normal" officeooo:rsid="006d0dae" style:font-size-asian="13pt" style:font-weight-asian="normal" style:font-size-complex="13pt" style:font-weight-complex="normal"/>
    </style:style>
    <style:style style:name="T78" style:family="text">
      <style:text-properties fo:font-size="13pt" fo:font-weight="normal" officeooo:rsid="2b5d990e" style:font-size-asian="13pt" style:font-weight-asian="normal" style:font-size-complex="13pt" style:font-weight-complex="normal"/>
    </style:style>
    <style:style style:name="T79" style:family="text">
      <style:text-properties fo:font-size="13pt" fo:font-weight="normal" officeooo:rsid="2b6ad416" style:font-size-asian="13pt" style:font-weight-asian="normal" style:font-size-complex="13pt" style:font-weight-complex="normal"/>
    </style:style>
    <style:style style:name="T80" style:family="text">
      <style:text-properties fo:font-size="13pt" fo:font-weight="normal" officeooo:rsid="36d38bf9" style:font-size-asian="13pt" style:font-weight-asian="normal" style:font-size-complex="13pt" style:font-weight-complex="normal"/>
    </style:style>
    <style:style style:name="T81" style:family="text">
      <style:text-properties fo:font-size="13pt" fo:font-weight="normal" officeooo:rsid="2b78ba5c" style:font-size-asian="13pt" style:font-weight-asian="normal" style:font-size-complex="13pt" style:font-weight-complex="normal"/>
    </style:style>
    <style:style style:name="T82" style:family="text">
      <style:text-properties fo:font-size="13pt" fo:font-weight="normal" officeooo:rsid="2b79f754" style:font-size-asian="13pt" style:font-weight-asian="normal" style:font-size-complex="13pt" style:font-weight-complex="normal"/>
    </style:style>
    <style:style style:name="T83" style:family="text">
      <style:text-properties fo:font-size="13pt" fo:font-weight="normal" officeooo:rsid="36d4d048" style:font-size-asian="13pt" style:font-weight-asian="normal" style:font-size-complex="13pt" style:font-weight-complex="normal"/>
    </style:style>
    <style:style style:name="T84" style:family="text">
      <style:text-properties fo:font-size="13pt" fo:font-weight="normal" officeooo:rsid="2b9c3804" style:font-size-asian="13pt" style:font-weight-asian="normal" style:font-size-complex="13pt" style:font-weight-complex="normal"/>
    </style:style>
    <style:style style:name="T85" style:family="text">
      <style:text-properties fo:font-size="13pt" fo:font-weight="normal" officeooo:rsid="2c1e122d" style:font-size-asian="13pt" style:font-weight-asian="normal" style:font-size-complex="13pt" style:font-weight-complex="normal"/>
    </style:style>
    <style:style style:name="T86" style:family="text">
      <style:text-properties fo:font-family="Courier" style:font-family-generic="modern" style:font-pitch="fixed" fo:font-size="13pt" fo:font-weight="normal" officeooo:rsid="2c1e122d" style:font-size-asian="13pt" style:font-weight-asian="normal" style:font-size-complex="13pt" style:font-weight-complex="normal"/>
    </style:style>
    <style:style style:name="T87" style:family="text">
      <style:text-properties fo:font-size="13pt" fo:font-weight="normal" officeooo:rsid="36ba595f" style:font-size-asian="13pt" style:font-weight-asian="normal" style:font-size-complex="13pt" style:font-weight-complex="normal"/>
    </style:style>
    <style:style style:name="T88" style:family="text">
      <style:text-properties fo:font-size="13pt" fo:font-weight="normal" officeooo:rsid="0011a5c1" style:font-size-asian="13pt" style:font-weight-asian="normal" style:font-size-complex="13pt" style:font-weight-complex="normal"/>
    </style:style>
    <style:style style:name="T89" style:family="text">
      <style:text-properties officeooo:rsid="2c1e122d"/>
    </style:style>
    <style:style style:name="T90" style:family="text">
      <style:text-properties officeooo:rsid="2c42ca2d"/>
    </style:style>
    <style:style style:name="T91" style:family="text">
      <style:text-properties fo:font-family="Courier" style:font-family-generic="modern" style:font-pitch="fixed" officeooo:rsid="2c1e122d"/>
    </style:style>
    <style:style style:name="T92" style:family="text">
      <style:text-properties fo:font-size="13pt" fo:font-weight="normal" officeooo:rsid="00d726d4" style:font-size-asian="13pt" style:font-weight-asian="normal" style:font-size-complex="13pt" style:font-weight-complex="normal"/>
    </style:style>
    <style:style style:name="T93" style:family="text">
      <style:text-properties fo:font-size="13pt" fo:font-weight="normal" officeooo:rsid="264d65d8" style:font-size-asian="13pt" style:font-weight-asian="normal" style:font-size-complex="13pt" style:font-weight-complex="normal"/>
    </style:style>
    <style:style style:name="T94" style:family="text">
      <style:text-properties officeooo:rsid="0011a5c1"/>
    </style:style>
    <style:style style:name="T95" style:family="text">
      <style:text-properties officeooo:rsid="360854b5"/>
    </style:style>
    <style:style style:name="T96" style:family="text">
      <style:text-properties officeooo:rsid="2c7b5bf0"/>
    </style:style>
    <style:style style:name="T97" style:family="text">
      <style:text-properties fo:font-size="13pt" fo:font-weight="normal" officeooo:rsid="2c92e2ef" style:font-size-asian="13pt" style:font-weight-asian="normal" style:font-size-complex="13pt" style:font-weight-complex="normal"/>
    </style:style>
    <style:style style:name="T98" style:family="text">
      <style:text-properties fo:font-family="Courier" style:font-family-generic="modern" style:font-pitch="fixed" fo:font-size="13pt" fo:font-weight="normal" officeooo:rsid="36d4f779" style:font-size-asian="13pt" style:font-weight-asian="normal" style:font-size-complex="13pt" style:font-weight-complex="normal"/>
    </style:style>
    <style:style style:name="T99" style:family="text">
      <style:text-properties fo:font-size="13pt" fo:font-weight="normal" officeooo:rsid="2d04fe28" style:font-size-asian="13pt" style:font-weight-asian="normal" style:font-size-complex="13pt" style:font-weight-complex="normal"/>
    </style:style>
    <style:style style:name="T100" style:family="text">
      <style:text-properties officeooo:rsid="00d726d4"/>
    </style:style>
    <style:style style:name="T101" style:family="text">
      <style:text-properties fo:font-size="13pt" fo:font-weight="normal" officeooo:rsid="2d3a685c" style:font-size-asian="13pt" style:font-weight-asian="normal" style:font-size-complex="13pt" style:font-weight-complex="normal"/>
    </style:style>
    <style:style style:name="T102" style:family="text">
      <style:text-properties fo:font-size="13pt" fo:font-weight="normal" officeooo:rsid="002487c2" style:font-size-asian="13pt" style:font-weight-asian="normal" style:font-size-complex="13pt" style:font-weight-complex="normal"/>
    </style:style>
    <style:style style:name="T103" style:family="text">
      <style:text-properties officeooo:rsid="2dab0386"/>
    </style:style>
    <style:style style:name="T104" style:family="text">
      <style:text-properties officeooo:rsid="2daa0998"/>
    </style:style>
    <style:style style:name="T105" style:family="text">
      <style:text-properties fo:font-size="13pt" fo:font-weight="normal" officeooo:rsid="2dda129f" style:font-size-asian="13pt" style:font-weight-asian="normal" style:font-size-complex="13pt" style:font-weight-complex="normal"/>
    </style:style>
    <style:style style:name="T106" style:family="text">
      <style:text-properties officeooo:rsid="2df2f8c1"/>
    </style:style>
    <style:style style:name="T107" style:family="text">
      <style:text-properties fo:font-family="Courier" style:font-family-generic="modern" style:font-pitch="fixed" officeooo:rsid="2df2f8c1"/>
    </style:style>
    <style:style style:name="T108" style:family="text">
      <style:text-properties fo:font-size="13pt" fo:font-weight="normal" officeooo:rsid="2df2f8c1" style:font-size-asian="13pt" style:font-weight-asian="normal" style:font-size-complex="13pt" style:font-weight-complex="normal"/>
    </style:style>
    <style:style style:name="T109" style:family="text">
      <style:text-properties officeooo:rsid="00267f21"/>
    </style:style>
    <style:style style:name="T110" style:family="text">
      <style:text-properties officeooo:rsid="3604c6b8"/>
    </style:style>
    <style:style style:name="T111" style:family="text">
      <style:text-properties fo:font-size="13pt" fo:font-weight="normal" officeooo:rsid="2e0f9c9f" style:font-size-asian="13pt" style:font-weight-asian="normal" style:font-size-complex="13pt" style:font-weight-complex="normal"/>
    </style:style>
    <style:style style:name="T112" style:family="text">
      <style:text-properties officeooo:rsid="2e0f9c9f"/>
    </style:style>
    <style:style style:name="T113" style:family="text">
      <style:text-properties fo:font-weight="bold" officeooo:rsid="2e13b514" style:font-weight-asian="bold" style:font-weight-complex="bold"/>
    </style:style>
    <style:style style:name="T114" style:family="text">
      <style:text-properties officeooo:rsid="2e13b514"/>
    </style:style>
    <style:style style:name="T115" style:family="text">
      <style:text-properties officeooo:rsid="2e39bca3"/>
    </style:style>
    <style:style style:name="T116" style:family="text">
      <style:text-properties officeooo:rsid="2764ff7c"/>
    </style:style>
    <style:style style:name="T117" style:family="text">
      <style:text-properties officeooo:rsid="19529644"/>
    </style:style>
    <style:style style:name="T118" style:family="text">
      <style:text-properties officeooo:rsid="2e4eb961"/>
    </style:style>
    <style:style style:name="T119" style:family="text">
      <style:text-properties officeooo:rsid="2e519194"/>
    </style:style>
    <style:style style:name="T120" style:family="text">
      <style:text-properties officeooo:rsid="27668e9b"/>
    </style:style>
    <style:style style:name="T121" style:family="text">
      <style:text-properties officeooo:rsid="2766b146"/>
    </style:style>
    <style:style style:name="T122" style:family="text">
      <style:text-properties officeooo:rsid="2ea3a460"/>
    </style:style>
    <style:style style:name="T123" style:family="text">
      <style:text-properties officeooo:rsid="2ec435ff"/>
    </style:style>
    <style:style style:name="T124" style:family="text">
      <style:text-properties officeooo:rsid="2ea853f7"/>
    </style:style>
    <style:style style:name="T125" style:family="text">
      <style:text-properties officeooo:rsid="2ffb1d57"/>
    </style:style>
    <style:style style:name="T126" style:family="text">
      <style:text-properties fo:font-family="Courier" style:font-family-generic="modern" style:font-pitch="fixed" officeooo:rsid="2ffb1d57"/>
    </style:style>
    <style:style style:name="T127" style:family="text">
      <style:text-properties fo:font-size="13pt" fo:font-weight="normal" officeooo:rsid="2ffb1d57" style:font-size-asian="13pt" style:font-weight-asian="normal" style:font-size-complex="13pt" style:font-weight-complex="normal"/>
    </style:style>
    <style:style style:name="T128" style:family="text">
      <style:text-properties fo:font-family="Courier" style:font-family-generic="modern" style:font-pitch="fixed" fo:font-size="13pt" fo:font-weight="normal" officeooo:rsid="2ffb1d57" style:font-size-asian="13pt" style:font-weight-asian="normal" style:font-size-complex="13pt" style:font-weight-complex="normal"/>
    </style:style>
    <style:style style:name="T129" style:family="text">
      <style:text-properties fo:font-size="13pt" fo:font-weight="normal" officeooo:rsid="307fae26" style:font-size-asian="13pt" style:font-weight-asian="normal" style:font-size-complex="13pt" style:font-weight-complex="normal"/>
    </style:style>
    <style:style style:name="T130" style:family="text">
      <style:text-properties fo:font-size="13pt" fo:font-weight="normal" officeooo:rsid="30804776" style:font-size-asian="13pt" style:font-weight-asian="normal" style:font-size-complex="13pt" style:font-weight-complex="normal"/>
    </style:style>
    <style:style style:name="T131" style:family="text">
      <style:text-properties fo:font-family="Courier" style:font-family-generic="modern" style:font-pitch="fixed" fo:font-size="13pt" fo:font-weight="normal" officeooo:rsid="307fae26" style:font-size-asian="13pt" style:font-weight-asian="normal" style:font-size-complex="13pt" style:font-weight-complex="normal"/>
    </style:style>
    <style:style style:name="T132" style:family="text">
      <style:text-properties officeooo:rsid="307fae26"/>
    </style:style>
    <style:style style:name="T133" style:family="text">
      <style:text-properties fo:font-style="italic" officeooo:rsid="307fae26" style:font-style-asian="italic" style:font-style-complex="italic"/>
    </style:style>
    <style:style style:name="T134" style:family="text">
      <style:text-properties officeooo:rsid="3093ef1f"/>
    </style:style>
    <style:style style:name="T135" style:family="text">
      <style:text-properties fo:font-style="italic" officeooo:rsid="3093ef1f" style:font-style-asian="italic" style:font-style-complex="italic"/>
    </style:style>
    <style:style style:name="T136" style:family="text">
      <style:text-properties fo:font-size="13pt" fo:font-weight="normal" officeooo:rsid="30b723f2" style:font-size-asian="13pt" style:font-weight-asian="normal" style:font-size-complex="13pt" style:font-weight-complex="normal"/>
    </style:style>
    <style:style style:name="T137" style:family="text">
      <style:text-properties officeooo:rsid="30ff3815"/>
    </style:style>
    <style:style style:name="T138" style:family="text">
      <style:text-properties fo:font-size="13pt" fo:font-weight="normal" officeooo:rsid="30ff3815" style:font-size-asian="13pt" style:font-weight-asian="normal" style:font-size-complex="13pt" style:font-weight-complex="normal"/>
    </style:style>
    <style:style style:name="T139" style:family="text">
      <style:text-properties fo:font-size="13pt" fo:font-weight="normal" officeooo:rsid="0c64dfb5" style:font-size-asian="13pt" style:font-weight-asian="normal" style:font-size-complex="13pt" style:font-weight-complex="normal"/>
    </style:style>
    <style:style style:name="T140" style:family="text">
      <style:text-properties fo:font-family="Courier" style:font-family-generic="modern" style:font-pitch="fixed" fo:font-size="13pt" fo:font-weight="normal" officeooo:rsid="0c64dfb5" style:font-size-asian="13pt" style:font-weight-asian="normal" style:font-size-complex="13pt" style:font-weight-complex="normal"/>
    </style:style>
    <style:style style:name="T141" style:family="text">
      <style:text-properties officeooo:rsid="315d8c70"/>
    </style:style>
    <style:style style:name="T142" style:family="text">
      <style:text-properties fo:font-weight="normal" officeooo:rsid="2daa0998" style:font-weight-asian="normal" style:font-weight-complex="normal"/>
    </style:style>
    <style:style style:name="T143" style:family="text">
      <style:text-properties fo:font-weight="normal" officeooo:rsid="0ceb4a89" style:font-weight-asian="normal" style:font-weight-complex="normal"/>
    </style:style>
    <style:style style:name="T144" style:family="text">
      <style:text-properties fo:font-weight="normal" officeooo:rsid="0e5cb7ad" style:font-weight-asian="normal" style:font-weight-complex="normal"/>
    </style:style>
    <style:style style:name="T145" style:family="text">
      <style:text-properties fo:font-size="13pt" style:text-underline-style="none" fo:font-weight="normal" officeooo:rsid="31a68dfb" style:font-size-asian="13pt" style:font-weight-asian="normal" style:font-size-complex="13pt" style:font-weight-complex="normal"/>
    </style:style>
    <style:style style:name="T146" style:family="text">
      <style:text-properties fo:font-size="13pt" style:text-underline-style="none" fo:font-weight="normal" officeooo:rsid="36ba595f" style:font-size-asian="13pt" style:font-weight-asian="normal" style:font-size-complex="13pt" style:font-weight-complex="normal"/>
    </style:style>
    <style:style style:name="T147" style:family="text">
      <style:text-properties fo:font-size="13pt" style:text-underline-style="none" fo:font-weight="normal" officeooo:rsid="2ab48cd4" style:font-size-asian="13pt" style:font-weight-asian="normal" style:font-size-complex="13pt" style:font-weight-complex="normal"/>
    </style:style>
    <style:style style:name="T148" style:family="text">
      <style:text-properties fo:font-size="13pt" fo:font-weight="normal" style:font-size-asian="13pt" style:font-weight-asian="normal" style:font-size-complex="13pt" style:font-weight-complex="normal"/>
    </style:style>
    <style:style style:name="T149" style:family="text">
      <style:text-properties fo:font-size="13pt" fo:font-weight="normal" officeooo:rsid="2daa0998" style:font-size-asian="13pt" style:font-weight-asian="normal" style:font-size-complex="13pt" style:font-weight-complex="normal"/>
    </style:style>
    <style:style style:name="T150" style:family="text">
      <style:text-properties fo:font-size="13pt" fo:font-weight="normal" officeooo:rsid="001f5623" style:font-size-asian="13pt" style:font-weight-asian="normal" style:font-size-complex="13pt" style:font-weight-complex="normal"/>
    </style:style>
    <style:style style:name="T151" style:family="text">
      <style:text-properties fo:font-size="13pt" style:text-underline-style="none" fo:font-weight="normal" officeooo:rsid="31fe0d12" style:font-size-asian="13pt" style:font-weight-asian="normal" style:font-size-complex="13pt" style:font-weight-complex="normal"/>
    </style:style>
    <style:style style:name="T152" style:family="text">
      <style:text-properties fo:font-size="13pt" style:text-underline-style="none" fo:font-weight="normal" officeooo:rsid="3207159f" style:font-size-asian="13pt" style:font-weight-asian="normal" style:font-size-complex="13pt" style:font-weight-complex="normal"/>
    </style:style>
    <style:style style:name="T153" style:family="text">
      <style:text-properties fo:font-size="13pt" style:text-underline-style="none" fo:font-weight="normal" officeooo:rsid="00d726d4" style:font-size-asian="13pt" style:font-weight-asian="normal" style:font-size-complex="13pt" style:font-weight-complex="normal"/>
    </style:style>
    <style:style style:name="T154" style:family="text">
      <style:text-properties officeooo:rsid="00285b0a"/>
    </style:style>
    <style:style style:name="T155" style:family="text">
      <style:text-properties fo:font-size="13pt" style:text-underline-style="none" fo:font-weight="normal" officeooo:rsid="002a45bb" style:font-size-asian="13pt" style:font-weight-asian="normal" style:font-size-complex="13pt" style:font-weight-complex="normal"/>
    </style:style>
    <style:style style:name="T156" style:family="text">
      <style:text-properties fo:font-size="13pt" style:text-underline-style="none" fo:font-weight="normal" officeooo:rsid="32fe5b37" style:font-size-asian="13pt" style:font-weight-asian="normal" style:font-size-complex="13pt" style:font-weight-complex="normal"/>
    </style:style>
    <style:style style:name="T157" style:family="text">
      <style:text-properties fo:font-size="13pt" style:text-underline-style="none" fo:font-weight="normal" officeooo:rsid="334504c6" style:font-size-asian="13pt" style:font-weight-asian="normal" style:font-size-complex="13pt" style:font-weight-complex="normal"/>
    </style:style>
    <style:style style:name="T158" style:family="text">
      <style:text-properties officeooo:rsid="33f6145c"/>
    </style:style>
    <style:style style:name="T159" style:family="text">
      <style:text-properties fo:font-family="Courier" style:font-family-generic="modern" style:font-pitch="fixed" officeooo:rsid="33f6145c"/>
    </style:style>
    <style:style style:name="T160" style:family="text">
      <style:text-properties officeooo:rsid="2ec28270"/>
    </style:style>
    <style:style style:name="T161" style:family="text">
      <style:text-properties officeooo:rsid="2f7822ce"/>
    </style:style>
    <style:style style:name="T162" style:family="text">
      <style:text-properties officeooo:rsid="2ec06dc2"/>
    </style:style>
    <style:style style:name="T163" style:family="text">
      <style:text-properties officeooo:rsid="2e678e5a"/>
    </style:style>
    <style:style style:name="T164" style:family="text">
      <style:text-properties officeooo:rsid="2e67dcd3"/>
    </style:style>
    <style:style style:name="T165" style:family="text">
      <style:text-properties officeooo:rsid="27685bef"/>
    </style:style>
    <style:style style:name="T166" style:family="text">
      <style:text-properties fo:font-weight="normal" officeooo:rsid="2e99a1da" style:font-weight-asian="normal" style:font-weight-complex="normal"/>
    </style:style>
    <style:style style:name="T167" style:family="text">
      <style:text-properties fo:font-weight="normal" officeooo:rsid="2ec28270" style:font-weight-asian="normal" style:font-weight-complex="normal"/>
    </style:style>
    <style:style style:name="T168" style:family="text">
      <style:text-properties fo:font-weight="normal" officeooo:rsid="2ec435ff" style:font-weight-asian="normal" style:font-weight-complex="normal"/>
    </style:style>
    <style:style style:name="T169" style:family="text">
      <style:text-properties fo:font-weight="normal" officeooo:rsid="2773be8d" style:font-weight-asian="normal" style:font-weight-complex="normal"/>
    </style:style>
    <style:style style:name="T170" style:family="text">
      <style:text-properties fo:font-weight="normal" officeooo:rsid="36e2991d" style:font-weight-asian="normal" style:font-weight-complex="normal"/>
    </style:style>
    <style:style style:name="T171" style:family="text">
      <style:text-properties fo:font-weight="normal" officeooo:rsid="199e58d1" style:font-weight-asian="normal" style:font-weight-complex="normal"/>
    </style:style>
    <style:style style:name="T172" style:family="text">
      <style:text-properties fo:font-weight="normal" officeooo:rsid="19ad516a" style:font-weight-asian="normal" style:font-weight-complex="normal"/>
    </style:style>
    <style:style style:name="T173" style:family="text">
      <style:text-properties fo:font-weight="normal" officeooo:rsid="2ec27bff" style:font-weight-asian="normal" style:font-weight-complex="normal"/>
    </style:style>
    <style:style style:name="T174" style:family="text">
      <style:text-properties fo:font-weight="normal" officeooo:rsid="2ec957c6" style:font-weight-asian="normal" style:font-weight-complex="normal"/>
    </style:style>
    <style:style style:name="T175" style:family="text">
      <style:text-properties style:text-underline-style="none" officeooo:rsid="2e99a1da"/>
    </style:style>
    <style:style style:name="T176" style:family="text">
      <style:text-properties style:text-underline-style="none" officeooo:rsid="2ec27bff"/>
    </style:style>
    <style:style style:name="T177" style:family="text">
      <style:text-properties style:text-underline-style="none" officeooo:rsid="2ec435ff"/>
    </style:style>
    <style:style style:name="T178" style:family="text">
      <style:text-properties style:text-underline-style="none" officeooo:rsid="2ef9d278"/>
    </style:style>
    <style:style style:name="T179" style:family="text">
      <style:text-properties style:text-underline-style="none" officeooo:rsid="2ee775c0"/>
    </style:style>
    <style:style style:name="T180" style:family="text">
      <style:text-properties style:text-underline-style="none" officeooo:rsid="2ef6a930"/>
    </style:style>
    <style:style style:name="T181" style:family="text">
      <style:text-properties fo:font-size="12pt" style:text-underline-style="none" officeooo:rsid="2ec27bff" style:font-size-asian="12pt" style:font-size-complex="12pt"/>
    </style:style>
    <style:style style:name="T182" style:family="text">
      <style:text-properties fo:font-family="Courier" style:font-family-generic="modern" style:font-pitch="fixed" fo:font-size="12pt" style:text-underline-style="none" officeooo:rsid="2ec27bff" style:font-size-asian="12pt" style:font-size-complex="12pt"/>
    </style:style>
    <style:style style:name="T183" style:family="text">
      <style:text-properties fo:font-size="13pt" style:text-underline-style="none" fo:font-weight="normal" officeooo:rsid="2f17ee4b" style:font-size-asian="13pt" style:font-weight-asian="normal" style:font-size-complex="13pt" style:font-weight-complex="normal"/>
    </style:style>
    <style:style style:name="T184" style:family="text">
      <style:text-properties fo:font-size="13pt" style:text-underline-style="none" fo:font-weight="normal" officeooo:rsid="2e99a1da" style:font-size-asian="13pt" style:font-weight-asian="normal" style:font-size-complex="13pt" style:font-weight-complex="normal"/>
    </style:style>
    <style:style style:name="T185" style:family="text">
      <style:text-properties fo:font-size="13pt" style:text-underline-style="none" fo:font-weight="normal" officeooo:rsid="2ec27bff" style:font-size-asian="13pt" style:font-weight-asian="normal" style:font-size-complex="13pt" style:font-weight-complex="normal"/>
    </style:style>
    <style:style style:name="T186" style:family="text">
      <style:text-properties fo:font-size="13pt" style:text-underline-style="none" fo:font-weight="normal" officeooo:rsid="2ec435ff" style:font-size-asian="13pt" style:font-weight-asian="normal" style:font-size-complex="13pt" style:font-weight-complex="normal"/>
    </style:style>
    <style:style style:name="T187" style:family="text">
      <style:text-properties fo:font-size="13pt" style:text-underline-style="none" fo:font-weight="normal" officeooo:rsid="2f28ea93" style:font-size-asian="13pt" style:font-weight-asian="normal" style:font-size-complex="13pt" style:font-weight-complex="normal"/>
    </style:style>
    <style:style style:name="T188" style:family="text">
      <style:text-properties fo:font-size="13pt" style:text-underline-style="none" fo:font-weight="normal" officeooo:rsid="2ee775c0" style:font-size-asian="13pt" style:font-weight-asian="normal" style:font-size-complex="13pt" style:font-weight-complex="normal"/>
    </style:style>
    <style:style style:name="T189" style:family="text">
      <style:text-properties fo:font-size="13pt" style:text-underline-style="none" fo:font-weight="normal" officeooo:rsid="2f226cdf" style:font-size-asian="13pt" style:font-weight-asian="normal" style:font-size-complex="13pt" style:font-weight-complex="normal"/>
    </style:style>
    <style:style style:name="T190" style:family="text">
      <style:text-properties fo:font-family="Courier" style:font-family-generic="modern" style:font-pitch="fixed" fo:font-size="12pt" style:text-underline-style="none" fo:font-weight="normal" officeooo:rsid="2ec27bff" style:font-size-asian="12pt" style:font-weight-asian="normal" style:font-size-complex="12pt" style:font-weight-complex="normal"/>
    </style:style>
    <style:style style:name="T191" style:family="text">
      <style:text-properties officeooo:rsid="2f74b80f"/>
    </style:style>
    <style:style style:name="T192" style:family="text">
      <style:text-properties officeooo:rsid="2e99a1da"/>
    </style:style>
    <style:style style:name="T193" style:family="text">
      <style:text-properties officeooo:rsid="2fa861bc"/>
    </style:style>
    <style:style style:name="T194" style:family="text">
      <style:text-properties fo:font-family="Courier" style:font-family-generic="modern" style:font-pitch="fixed" fo:font-size="12pt" officeooo:rsid="2ec27bff" style:font-size-asian="12pt" style:font-size-complex="12pt"/>
    </style:style>
    <style:style style:name="T195" style:family="text">
      <style:text-properties officeooo:rsid="2f6498e1"/>
    </style:style>
    <style:style style:name="T196" style:family="text">
      <style:text-properties fo:font-size="13pt" style:text-underline-style="none" fo:font-weight="normal" officeooo:rsid="2f74b80f" style:font-size-asian="13pt" style:font-weight-asian="normal" style:font-size-complex="13pt" style:font-weight-complex="normal"/>
    </style:style>
    <style:style style:name="T197" style:family="text">
      <style:text-properties fo:font-size="13pt" style:text-underline-style="none" fo:font-weight="normal" officeooo:rsid="2fa861bc" style:font-size-asian="13pt" style:font-weight-asian="normal" style:font-size-complex="13pt" style:font-weight-complex="normal"/>
    </style:style>
    <style:style style:name="T198" style:family="text">
      <style:text-properties fo:font-size="13pt" style:text-underline-style="none" fo:font-weight="normal" officeooo:rsid="2f6498e1" style:font-size-asian="13pt" style:font-weight-asian="normal" style:font-size-complex="13pt" style:font-weight-complex="normal"/>
    </style:style>
    <style:style style:name="T199" style:family="text">
      <style:text-properties fo:font-size="13pt" fo:font-style="italic" style:text-underline-style="none" fo:font-weight="normal" officeooo:rsid="2fa861bc" style:font-size-asian="13pt" style:font-style-asian="italic" style:font-weight-asian="normal" style:font-size-complex="13pt" style:font-style-complex="italic" style:font-weight-complex="normal"/>
    </style:style>
    <style:style style:name="T200" style:family="text">
      <style:text-properties officeooo:rsid="2f7a0eab"/>
    </style:style>
    <style:style style:name="T201" style:family="text">
      <style:text-properties fo:font-size="13pt" style:text-underline-style="none" fo:font-weight="normal" officeooo:rsid="00799967" style:font-size-asian="13pt" style:font-weight-asian="normal" style:font-size-complex="13pt" style:font-weight-complex="normal"/>
    </style:style>
    <style:style style:name="T202" style:family="text">
      <style:text-properties fo:font-size="13pt" style:text-underline-style="none" fo:font-weight="normal" officeooo:rsid="34f1674c" style:font-size-asian="13pt" style:font-weight-asian="normal" style:font-size-complex="13pt" style:font-weight-complex="normal"/>
    </style:style>
    <style:style style:name="T203" style:family="text">
      <style:text-properties officeooo:rsid="34f1674c"/>
    </style:style>
    <style:style style:name="T204" style:family="text">
      <style:text-properties officeooo:rsid="3511e3b7"/>
    </style:style>
    <style:style style:name="T205" style:family="text">
      <style:text-properties officeooo:rsid="35452f34"/>
    </style:style>
    <style:style style:name="T206" style:family="text">
      <style:text-properties officeooo:rsid="357ad8ce"/>
    </style:style>
    <style:style style:name="T207" style:family="text">
      <style:text-properties fo:font-size="13pt" style:text-underline-style="none" fo:font-weight="normal" officeooo:rsid="35452f34" style:font-size-asian="13pt" style:font-weight-asian="normal" style:font-size-complex="13pt" style:font-weight-complex="normal"/>
    </style:style>
    <style:style style:name="T208" style:family="text">
      <style:text-properties fo:font-size="13pt" style:text-underline-style="none" fo:font-weight="normal" officeooo:rsid="364ef61f" style:font-size-asian="13pt" style:font-weight-asian="normal" style:font-size-complex="13pt" style:font-weight-complex="normal"/>
    </style:style>
    <style:style style:name="T209" style:family="text">
      <style:text-properties fo:font-size="13pt" style:text-underline-style="none" fo:font-weight="normal" officeooo:rsid="365f52e3" style:font-size-asian="13pt" style:font-weight-asian="normal" style:font-size-complex="13pt" style:font-weight-complex="normal"/>
    </style:style>
    <style:style style:name="T210" style:family="text">
      <style:text-properties officeooo:rsid="364ef61f"/>
    </style:style>
    <style:style style:name="T211" style:family="text">
      <style:text-properties officeooo:rsid="365f3b69"/>
    </style:style>
    <style:style style:name="T212" style:family="text">
      <style:text-properties fo:font-size="13pt" style:text-underline-style="none" fo:font-weight="normal" officeooo:rsid="2f7b0358" style:font-size-asian="13pt" style:font-weight-asian="normal" style:font-size-complex="13pt" style:font-weight-complex="normal"/>
    </style:style>
    <style:style style:name="T213" style:family="text">
      <style:text-properties fo:font-size="13pt" style:text-underline-style="none" fo:font-weight="normal" officeooo:rsid="2f7a0eab" style:font-size-asian="13pt" style:font-weight-asian="normal" style:font-size-complex="13pt" style:font-weight-complex="normal"/>
    </style:style>
    <style:style style:name="T214" style:family="text">
      <style:text-properties fo:font-family="Courier" style:font-family-generic="modern" style:font-pitch="fixed" fo:font-style="normal" style:font-style-asian="normal" style:font-style-complex="normal"/>
    </style:style>
    <style:style style:name="T215" style:family="text">
      <style:text-properties officeooo:rsid="0031c008"/>
    </style:style>
    <style:style style:name="T216" style:family="text">
      <style:text-properties officeooo:rsid="35d72cd0"/>
    </style:style>
    <style:style style:name="T217" style:family="text">
      <style:text-properties officeooo:rsid="2aea5849"/>
    </style:style>
    <style:style style:name="T218" style:family="text">
      <style:text-properties officeooo:rsid="36ba595f"/>
    </style:style>
    <style:style style:name="T219" style:family="text">
      <style:text-properties officeooo:rsid="35f78c86"/>
    </style:style>
    <style:style style:name="T220" style:family="text">
      <style:text-properties officeooo:rsid="354ceede"/>
    </style:style>
    <style:style style:name="T221" style:family="text">
      <style:text-properties fo:font-style="italic" style:font-style-asian="italic" style:font-style-complex="italic"/>
    </style:style>
    <style:style style:name="T222" style:family="text">
      <style:text-properties fo:font-family="Courier" style:font-family-generic="modern" style:font-pitch="fixed"/>
    </style:style>
    <style:style style:name="T223" style:family="text">
      <style:text-properties fo:font-size="13pt" style:text-underline-style="none" fo:font-weight="normal" officeooo:rsid="35f78c86" style:font-size-asian="13pt" style:font-weight-asian="normal" style:font-size-complex="13pt" style:font-weight-complex="normal"/>
    </style:style>
    <style:style style:name="T224" style:family="text">
      <style:text-properties fo:font-family="Courier" style:font-family-generic="modern" style:font-pitch="fixed" fo:font-size="13pt" style:text-underline-style="none" fo:font-weight="normal" officeooo:rsid="00d726d4" style:font-size-asian="13pt" style:font-weight-asian="normal" style:font-size-complex="13pt" style:font-weight-complex="normal"/>
    </style:style>
    <style:style style:name="T225" style:family="text">
      <style:text-properties officeooo:rsid="30f0860a"/>
    </style:style>
    <style:style style:name="T226" style:family="text">
      <style:text-properties officeooo:rsid="312d4908"/>
    </style:style>
    <style:style style:name="T227" style:family="text">
      <style:text-properties officeooo:rsid="36dd49d9"/>
    </style:style>
    <style:style style:name="T228" style:family="text">
      <style:text-properties fo:font-family="Courier" style:font-family-generic="modern" style:font-pitch="fixed" officeooo:rsid="36dd49d9"/>
    </style:style>
    <style:style style:name="T229" style:family="text">
      <style:text-properties fo:font-size="13pt" style:text-underline-style="none" fo:font-weight="normal" officeooo:rsid="36dd49d9" style:font-size-asian="13pt" style:font-weight-asian="normal" style:font-size-complex="13pt" style:font-weight-complex="normal"/>
    </style:style>
    <style:style style:name="T230" style:family="text">
      <style:text-properties fo:font-size="13pt" style:text-underline-style="none" fo:font-weight="normal" officeooo:rsid="36e2991d" style:font-size-asian="13pt" style:font-weight-asian="normal" style:font-size-complex="13pt" style:font-weight-complex="normal"/>
    </style:style>
    <style:style style:name="T231" style:family="text">
      <style:text-properties officeooo:rsid="002795f6"/>
    </style:style>
    <style:style style:name="T232" style:family="text">
      <style:text-properties officeooo:rsid="004997ab"/>
    </style:style>
    <style:style style:name="T233" style:family="text">
      <style:text-properties officeooo:rsid="0bd95cea"/>
    </style:style>
    <style:style style:name="T234" style:family="text">
      <style:text-properties officeooo:rsid="000481a6"/>
    </style:style>
    <style:style style:name="T235" style:family="text">
      <style:text-properties officeooo:rsid="02edeb14"/>
    </style:style>
    <style:style style:name="T236" style:family="text">
      <style:text-properties officeooo:rsid="00052d9c"/>
    </style:style>
    <style:style style:name="T237" style:family="text">
      <style:text-properties officeooo:rsid="02f7a692"/>
    </style:style>
    <style:style style:name="T238" style:family="text">
      <style:text-properties fo:color="#000000" loext:opacity="100%" fo:font-family="Courier" style:font-family-generic="modern" style:font-pitch="fixed" fo:font-size="13pt" fo:font-style="normal" fo:font-weight="normal" officeooo:rsid="0cf00cd3" style:font-size-asian="13pt" style:font-style-asian="normal" style:font-weight-asian="normal" style:font-size-complex="13pt" style:font-style-complex="normal" style:font-weight-complex="normal"/>
    </style:style>
    <style:style style:name="T239" style:family="text">
      <style:text-properties fo:color="#000000" loext:opacity="100%" style:font-name="Liberation Serif" fo:font-style="normal" officeooo:rsid="031e88f5" style:font-style-asian="normal" style:font-style-complex="normal"/>
    </style:style>
    <style:style style:name="T240" style:family="text">
      <style:text-properties officeooo:rsid="032d38f1"/>
    </style:style>
    <style:style style:name="T241" style:family="text">
      <style:text-properties fo:font-family="Courier" style:font-family-generic="modern" style:font-pitch="fixed" officeooo:rsid="0cf00cd3"/>
    </style:style>
    <style:style style:name="T242" style:family="text">
      <style:text-properties fo:font-size="13pt" fo:font-weight="normal" officeooo:rsid="031e88f5" style:font-size-asian="13pt" style:font-weight-asian="normal" style:font-size-complex="13pt" style:font-weight-complex="normal"/>
    </style:style>
    <style:style style:name="T243" style:family="text">
      <style:text-properties fo:font-size="13pt" fo:font-weight="normal" officeooo:rsid="00c7186a" style:font-size-asian="13pt" style:font-weight-asian="normal" style:font-size-complex="13pt" style:font-weight-complex="normal"/>
    </style:style>
    <style:style style:name="T244" style:family="text">
      <style:text-properties fo:color="#000000" loext:opacity="100%" fo:font-family="Courier" style:font-family-generic="modern" style:font-pitch="fixed" fo:font-size="13pt" fo:font-style="normal" fo:font-weight="normal" officeooo:rsid="00c7186a" style:font-size-asian="13pt" style:font-style-asian="normal" style:font-weight-asian="normal" style:font-size-complex="13pt" style:font-style-complex="normal" style:font-weight-complex="normal"/>
    </style:style>
    <style:style style:name="T245" style:family="text">
      <style:text-properties fo:font-size="13pt" fo:font-weight="normal" officeooo:rsid="04beb33d" style:font-size-asian="13pt" style:font-weight-asian="normal" style:font-size-complex="13pt" style:font-weight-complex="normal"/>
    </style:style>
    <style:style style:name="T246" style:family="text">
      <style:text-properties fo:font-size="13pt" fo:font-weight="normal" officeooo:rsid="06998ecd" style:font-size-asian="13pt" style:font-weight-asian="normal" style:font-size-complex="13pt" style:font-weight-complex="normal"/>
    </style:style>
    <style:style style:name="T247" style:family="text">
      <style:text-properties fo:font-size="13pt" fo:font-weight="normal" officeooo:rsid="00ab0d39" style:font-size-asian="13pt" style:font-weight-asian="normal" style:font-size-complex="13pt" style:font-weight-complex="normal"/>
    </style:style>
    <style:style style:name="T248" style:family="text">
      <style:text-properties officeooo:rsid="04beb33d"/>
    </style:style>
    <style:style style:name="T249" style:family="text">
      <style:text-properties officeooo:rsid="07cd7585"/>
    </style:style>
    <style:style style:name="T250" style:family="text">
      <style:text-properties officeooo:rsid="07fa8e0e"/>
    </style:style>
    <style:style style:name="T251" style:family="text">
      <style:text-properties fo:font-size="13pt" fo:font-weight="normal" officeooo:rsid="00b107fb" style:font-size-asian="13pt" style:font-weight-asian="normal" style:font-size-complex="13pt" style:font-weight-complex="normal"/>
    </style:style>
    <style:style style:name="T252" style:family="text">
      <style:text-properties officeooo:rsid="00b3700d"/>
    </style:style>
    <style:style style:name="T253" style:family="text">
      <style:text-properties officeooo:rsid="03060c86"/>
    </style:style>
    <style:style style:name="T254" style:family="text">
      <style:text-properties officeooo:rsid="0c003523"/>
    </style:style>
    <style:style style:name="T255" style:family="text">
      <style:text-properties fo:font-size="13pt" fo:font-weight="normal" officeooo:rsid="04bcd0e5" style:font-size-asian="13pt" style:font-weight-asian="normal" style:font-size-complex="13pt" style:font-weight-complex="normal"/>
    </style:style>
    <style:style style:name="T256" style:family="text">
      <style:text-properties fo:font-size="13pt" fo:font-style="normal" fo:font-weight="normal" officeooo:rsid="08c26451" style:font-size-asian="13pt" style:font-style-asian="normal" style:font-weight-asian="normal" style:font-size-complex="13pt" style:font-style-complex="normal" style:font-weight-complex="normal"/>
    </style:style>
    <style:style style:name="T257" style:family="text">
      <style:text-properties officeooo:rsid="06ec8a56"/>
    </style:style>
    <style:style style:name="T258" style:family="text">
      <style:text-properties officeooo:rsid="06998ecd"/>
    </style:style>
    <style:style style:name="T259" style:family="text">
      <style:text-properties officeooo:rsid="0bbf3e59"/>
    </style:style>
    <style:style style:name="T260" style:family="text">
      <style:text-properties officeooo:rsid="030d16f3"/>
    </style:style>
    <style:style style:name="T261" style:family="text">
      <style:text-properties officeooo:rsid="063eb840"/>
    </style:style>
    <style:style style:name="T262" style:family="text">
      <style:text-properties fo:color="#000000" loext:opacity="100%" style:font-name="Liberation Serif" fo:font-style="normal" officeooo:rsid="00b467b9" style:font-style-asian="normal" style:font-style-complex="normal"/>
    </style:style>
    <style:style style:name="T263" style:family="text">
      <style:text-properties fo:color="#000000" loext:opacity="100%" style:font-name="Liberation Serif" fo:font-style="normal" officeooo:rsid="02f7a692" style:font-style-asian="normal" style:font-style-complex="normal"/>
    </style:style>
    <style:style style:name="T264" style:family="text">
      <style:text-properties fo:color="#000000" loext:opacity="100%" style:font-name="Liberation Serif" fo:font-style="normal" officeooo:rsid="030d16f3" style:font-style-asian="normal" style:font-style-complex="normal"/>
    </style:style>
    <style:style style:name="T265" style:family="text">
      <style:text-properties fo:color="#000000" loext:opacity="100%" style:font-name="Liberation Serif" fo:font-style="normal" officeooo:rsid="0b8038d1" style:font-style-asian="normal" style:font-style-complex="normal"/>
    </style:style>
    <style:style style:name="T266" style:family="text">
      <style:text-properties fo:color="#000000" loext:opacity="100%" style:font-name="Liberation Serif" fo:font-style="italic" officeooo:rsid="030d16f3" style:font-style-asian="italic" style:font-style-complex="italic"/>
    </style:style>
    <style:style style:name="T267" style:family="text">
      <style:text-properties fo:color="#000000" loext:opacity="100%" style:font-name="Liberation Serif" fo:font-style="italic" officeooo:rsid="0a12c951" style:font-style-asian="italic" style:font-style-complex="italic"/>
    </style:style>
    <style:style style:name="T268" style:family="text">
      <style:text-properties fo:color="#000000" loext:opacity="100%" style:font-name="Liberation Serif" fo:font-style="normal" officeooo:rsid="0a12c951" style:font-style-asian="normal" style:font-style-complex="normal"/>
    </style:style>
    <style:style style:name="T269" style:family="text">
      <style:text-properties officeooo:rsid="0bc20d64"/>
    </style:style>
    <style:style style:name="T270" style:family="text">
      <style:text-properties officeooo:rsid="00b467b9"/>
    </style:style>
    <style:style style:name="T271" style:family="text">
      <style:text-properties officeooo:rsid="00bfd644"/>
    </style:style>
    <style:style style:name="T272" style:family="text">
      <style:text-properties officeooo:rsid="0aefaf02"/>
    </style:style>
    <style:style style:name="T273" style:family="text">
      <style:text-properties fo:font-style="italic" officeooo:rsid="00b467b9" style:font-style-asian="italic" style:font-style-complex="italic"/>
    </style:style>
    <style:style style:name="T274" style:family="text">
      <style:text-properties fo:color="#000000" loext:opacity="100%" style:font-name="Liberation Serif" fo:font-style="normal" officeooo:rsid="00b4a934" style:font-style-asian="normal" style:font-style-complex="normal"/>
    </style:style>
    <style:style style:name="T275" style:family="text">
      <style:text-properties fo:color="#000000" loext:opacity="100%" style:font-name="Liberation Serif" fo:font-style="normal" officeooo:rsid="00bfd644" style:font-style-asian="normal" style:font-style-complex="normal"/>
    </style:style>
    <style:style style:name="T276" style:family="text">
      <style:text-properties fo:color="#000000" loext:opacity="100%" style:font-name="Liberation Serif" fo:font-style="italic" officeooo:rsid="0b1409a9" style:font-style-asian="italic" style:font-style-complex="italic"/>
    </style:style>
    <style:style style:name="T277" style:family="text">
      <style:text-properties fo:color="#000000" loext:opacity="100%" style:font-name="Liberation Serif" fo:font-style="normal" officeooo:rsid="0b1409a9" style:font-style-asian="normal" style:font-style-complex="normal"/>
    </style:style>
    <style:style style:name="T278" style:family="text">
      <style:text-properties officeooo:rsid="0b496393"/>
    </style:style>
    <style:style style:name="T279" style:family="text">
      <style:text-properties officeooo:rsid="030da4e7"/>
    </style:style>
    <style:style style:name="T280" style:family="text">
      <style:text-properties officeooo:rsid="0b65060f"/>
    </style:style>
    <style:style style:name="T281" style:family="text">
      <style:text-properties officeooo:rsid="00b57936"/>
    </style:style>
    <style:style style:name="T282" style:family="text">
      <style:text-properties officeooo:rsid="0219f66e"/>
    </style:style>
    <style:style style:name="T283" style:family="text">
      <style:text-properties officeooo:rsid="0543519c"/>
    </style:style>
    <style:style style:name="T284" style:family="text">
      <style:text-properties officeooo:rsid="055c724c"/>
    </style:style>
    <style:style style:name="T285" style:family="text">
      <style:text-properties fo:color="#000000" loext:opacity="100%" style:font-name="Liberation Serif" fo:font-style="normal" officeooo:rsid="00b57936" style:font-style-asian="normal" style:font-style-complex="normal"/>
    </style:style>
    <style:style style:name="T286" style:family="text">
      <style:text-properties fo:color="#000000" loext:opacity="100%" style:font-name="Liberation Serif" fo:font-style="normal" officeooo:rsid="02a80d80" style:font-style-asian="normal" style:font-style-complex="normal"/>
    </style:style>
    <style:style style:name="T287" style:family="text">
      <style:text-properties fo:color="#000000" loext:opacity="100%" style:font-name="Liberation Serif" fo:font-style="italic" officeooo:rsid="02a80d80" style:font-style-asian="italic" style:font-style-complex="italic"/>
    </style:style>
    <style:style style:name="T288" style:family="text">
      <style:text-properties fo:color="#000000" loext:opacity="100%" style:font-name="Liberation Serif" fo:font-size="13pt" fo:font-style="normal" fo:font-weight="normal" officeooo:rsid="02a80d80" style:font-size-asian="13pt" style:font-style-asian="normal" style:font-weight-asian="normal" style:font-size-complex="13pt" style:font-style-complex="normal" style:font-weight-complex="normal"/>
    </style:style>
    <style:style style:name="T289" style:family="text">
      <style:text-properties fo:color="#000000" loext:opacity="100%" fo:font-family="Courier" style:font-family-generic="modern" style:font-pitch="fixed" fo:font-size="13pt" fo:font-style="normal" fo:font-weight="normal" officeooo:rsid="02a80d80" style:font-size-asian="13pt" style:font-style-asian="normal" style:font-weight-asian="normal" style:font-size-complex="13pt" style:font-style-complex="normal" style:font-weight-complex="normal"/>
    </style:style>
    <style:style style:name="T290" style:family="text">
      <style:text-properties fo:color="#000000" loext:opacity="100%" style:font-name="Liberation Serif" fo:font-size="13pt" fo:font-style="italic" fo:font-weight="normal" officeooo:rsid="02a80d80" style:font-size-asian="13pt" style:font-style-asian="italic" style:font-weight-asian="normal" style:font-size-complex="13pt" style:font-style-complex="italic" style:font-weight-complex="normal"/>
    </style:style>
    <style:style style:name="T291" style:family="text">
      <style:text-properties officeooo:rsid="001b898f"/>
    </style:style>
    <style:style style:name="T292" style:family="text">
      <style:text-properties officeooo:rsid="030fe645"/>
    </style:style>
    <style:style style:name="T293" style:family="text">
      <style:text-properties officeooo:rsid="02ef25e9"/>
    </style:style>
    <style:style style:name="T294" style:family="text">
      <style:text-properties officeooo:rsid="0d2442ae"/>
    </style:style>
    <style:style style:name="T295" style:family="text">
      <style:text-properties style:use-window-font-color="true" loext:opacity="0%" fo:font-size="13pt" fo:font-weight="normal" officeooo:rsid="02ab4278" style:font-size-asian="13pt" style:font-weight-asian="normal" style:font-size-complex="13pt" style:font-weight-complex="normal"/>
    </style:style>
    <style:style style:name="T296" style:family="text">
      <style:text-properties style:text-underline-style="none" officeooo:rsid="0031c008"/>
    </style:style>
    <style:style style:name="T297" style:family="text">
      <style:text-properties style:text-underline-style="none" officeooo:rsid="04c10c81"/>
    </style:style>
    <style:style style:name="T298" style:family="text">
      <style:text-properties style:text-underline-style="none" officeooo:rsid="0083cf94"/>
    </style:style>
    <style:style style:name="T299" style:family="text">
      <style:text-properties style:text-underline-style="none" officeooo:rsid="02f7a692"/>
    </style:style>
    <style:style style:name="T300" style:family="text">
      <style:text-properties style:text-underline-style="none" officeooo:rsid="2aea5849"/>
    </style:style>
    <style:style style:name="T301" style:family="text">
      <style:text-properties style:text-underline-style="none" officeooo:rsid="02edeb14"/>
    </style:style>
    <style:style style:name="T302" style:family="text">
      <style:text-properties style:use-window-font-color="true" loext:opacity="0%" style:font-name="Liberation Serif" fo:font-size="13pt" fo:font-style="normal" style:text-underline-style="none" fo:font-weight="normal" officeooo:rsid="00bcebde" style:font-size-asian="13pt" style:font-style-asian="normal" style:font-weight-asian="normal" style:font-size-complex="13pt" style:font-style-complex="normal" style:font-weight-complex="normal"/>
    </style:style>
    <style:style style:name="T303" style:family="text">
      <style:text-properties style:use-window-font-color="true" loext:opacity="0%" style:font-name="Liberation Serif" fo:font-size="13pt" fo:font-style="normal" style:text-underline-style="none" fo:font-weight="normal" officeooo:rsid="02f7a692" style:font-size-asian="13pt" style:font-style-asian="normal" style:font-weight-asian="normal" style:font-size-complex="13pt" style:font-style-complex="normal" style:font-weight-complex="normal"/>
    </style:style>
    <style:style style:name="T304" style:family="text">
      <style:text-properties style:use-window-font-color="true" loext:opacity="0%" style:font-name="Liberation Serif" fo:font-size="13pt" fo:font-style="normal" style:text-underline-style="none" fo:font-weight="normal" officeooo:rsid="0a911c24" style:font-size-asian="13pt" style:font-style-asian="normal" style:font-weight-asian="normal" style:font-size-complex="13pt" style:font-style-complex="normal" style:font-weight-complex="normal"/>
    </style:style>
    <style:style style:name="T305" style:family="text">
      <style:text-properties style:use-window-font-color="true" loext:opacity="0%" style:font-name="Liberation Serif" fo:font-size="13pt" fo:font-style="normal" style:text-underline-style="none" fo:font-weight="normal" officeooo:rsid="03110ac3" style:font-size-asian="13pt" style:font-style-asian="normal" style:font-weight-asian="normal" style:font-size-complex="13pt" style:font-style-complex="normal" style:font-weight-complex="normal"/>
    </style:style>
    <style:style style:name="T306" style:family="text">
      <style:text-properties style:use-window-font-color="true" loext:opacity="0%" fo:font-family="Courier" style:font-family-generic="modern" style:font-pitch="fixed" fo:font-size="13pt" fo:font-style="normal" style:text-underline-style="none" fo:font-weight="normal" officeooo:rsid="0a911c24" style:font-size-asian="13pt" style:font-style-asian="normal" style:font-weight-asian="normal" style:font-size-complex="13pt" style:font-style-complex="normal" style:font-weight-complex="normal"/>
    </style:style>
    <style:style style:name="T307" style:family="text">
      <style:text-properties fo:color="#000000" loext:opacity="100%" style:font-name="Liberation Serif" fo:font-size="13pt" fo:font-style="normal" style:text-underline-style="none" fo:font-weight="normal" officeooo:rsid="00c05ced" style:font-size-asian="13pt" style:font-style-asian="normal" style:font-weight-asian="normal" style:font-size-complex="13pt" style:font-style-complex="normal" style:font-weight-complex="normal"/>
    </style:style>
    <style:style style:name="T308" style:family="text">
      <style:text-properties fo:color="#000000" loext:opacity="100%" style:font-name="Liberation Serif" fo:font-size="13pt" fo:font-style="normal" style:text-underline-style="none" fo:font-weight="normal" officeooo:rsid="02c8c044" style:font-size-asian="13pt" style:font-style-asian="normal" style:font-weight-asian="normal" style:font-size-complex="13pt" style:font-style-complex="normal" style:font-weight-complex="normal"/>
    </style:style>
    <style:style style:name="T309" style:family="text">
      <style:text-properties fo:color="#000000" loext:opacity="100%" style:font-name="Liberation Serif" fo:font-size="13pt" fo:font-style="normal" style:text-underline-style="none" fo:font-weight="normal" officeooo:rsid="03110ac3" style:font-size-asian="13pt" style:font-style-asian="normal" style:font-weight-asian="normal" style:font-size-complex="13pt" style:font-style-complex="normal" style:font-weight-complex="normal"/>
    </style:style>
    <style:style style:name="T310" style:family="text">
      <style:text-properties style:use-window-font-color="true" loext:opacity="0%" style:font-name="Liberation Serif" fo:font-size="13pt" fo:font-style="italic" style:text-underline-style="none" fo:font-weight="normal" officeooo:rsid="0a911c24" style:font-size-asian="13pt" style:font-style-asian="italic" style:font-weight-asian="normal" style:font-size-complex="13pt" style:font-style-complex="italic" style:font-weight-complex="normal"/>
    </style:style>
    <style:style style:name="T311" style:family="text">
      <style:text-properties officeooo:rsid="0464cdc6"/>
    </style:style>
    <style:style style:name="T312" style:family="text">
      <style:text-properties officeooo:rsid="03110ac3"/>
    </style:style>
    <style:style style:name="T313" style:family="text">
      <style:text-properties officeooo:rsid="0b6b1693"/>
    </style:style>
    <style:style style:name="T314" style:family="text">
      <style:text-properties officeooo:rsid="0cb0bc50"/>
    </style:style>
    <style:style style:name="T315" style:family="text">
      <style:text-properties style:use-window-font-color="true" loext:opacity="0%"/>
    </style:style>
    <style:style style:name="T316" style:family="text">
      <style:text-properties style:use-window-font-color="true" loext:opacity="0%" officeooo:rsid="0b8774a2"/>
    </style:style>
    <style:style style:name="T317" style:family="text">
      <style:text-properties style:use-window-font-color="true" loext:opacity="0%" fo:font-family="Courier" style:font-family-generic="modern" style:font-pitch="fixed" officeooo:rsid="0b8774a2"/>
    </style:style>
    <style:style style:name="T318" style:family="text">
      <style:text-properties style:use-window-font-color="true" loext:opacity="0%" officeooo:rsid="0b9793fa"/>
    </style:style>
    <style:style style:name="T319" style:family="text">
      <style:text-properties style:use-window-font-color="true" loext:opacity="0%" fo:font-family="Courier" style:font-family-generic="modern" style:font-pitch="fixed" officeooo:rsid="0b9793fa"/>
    </style:style>
    <style:style style:name="T320" style:family="text">
      <style:text-properties fo:color="#000000" loext:opacity="100%" style:font-name="Liberation Serif" fo:font-size="13pt" fo:font-style="normal" style:text-underline-style="none" fo:font-weight="normal" officeooo:rsid="0b6b1693" style:font-size-asian="13pt" style:font-style-asian="normal" style:font-weight-asian="normal" style:font-size-complex="13pt" style:font-style-complex="normal" style:font-weight-complex="normal"/>
    </style:style>
    <style:style style:name="T321" style:family="text">
      <style:text-properties style:use-window-font-color="true" loext:opacity="0%" fo:font-family="Courier" style:font-family-generic="modern" style:font-pitch="fixed" fo:font-size="13pt" fo:font-style="normal" style:text-underline-style="none" fo:font-weight="normal" officeooo:rsid="0b9793fa" style:font-size-asian="13pt" style:font-style-asian="normal" style:font-weight-asian="normal" style:font-size-complex="13pt" style:font-style-complex="normal" style:font-weight-complex="normal"/>
    </style:style>
    <style:style style:name="T322" style:family="text">
      <style:text-properties style:use-window-font-color="true" loext:opacity="0%" officeooo:rsid="0c6a10ed"/>
    </style:style>
    <style:style style:name="T323" style:family="text">
      <style:text-properties style:use-window-font-color="true" loext:opacity="0%" officeooo:rsid="03110ac3"/>
    </style:style>
    <style:style style:name="T324" style:family="text">
      <style:text-properties fo:font-style="italic" officeooo:rsid="0a183561" style:font-style-asian="italic" style:font-style-complex="italic"/>
    </style:style>
    <style:style style:name="T325" style:family="text">
      <style:text-properties fo:font-style="italic" officeooo:rsid="0a9a5515" style:font-style-asian="italic" style:font-style-complex="italic"/>
    </style:style>
    <style:style style:name="T326" style:family="text">
      <style:text-properties officeooo:rsid="0a9a5515"/>
    </style:style>
    <style:style style:name="T327" style:family="text">
      <style:text-properties fo:font-style="italic" officeooo:rsid="0c718a5f" style:font-style-asian="italic" style:font-style-complex="italic"/>
    </style:style>
    <style:style style:name="T328" style:family="text">
      <style:text-properties officeooo:rsid="0c718a5f"/>
    </style:style>
    <style:style style:name="T329" style:family="text">
      <style:text-properties officeooo:rsid="00c06208"/>
    </style:style>
    <style:style style:name="T330" style:family="text">
      <style:text-properties officeooo:rsid="0c753a84"/>
    </style:style>
    <style:style style:name="T331" style:family="text">
      <style:text-properties officeooo:rsid="0ca7cc94"/>
    </style:style>
    <style:style style:name="T332" style:family="text">
      <style:text-properties style:use-window-font-color="true" loext:opacity="0%" officeooo:rsid="00c06208"/>
    </style:style>
    <style:style style:name="T333" style:family="text">
      <style:text-properties style:use-window-font-color="true" loext:opacity="0%" officeooo:rsid="02a373bf"/>
    </style:style>
    <style:style style:name="T334" style:family="text">
      <style:text-properties style:use-window-font-color="true" loext:opacity="0%" fo:font-family="Courier" style:font-family-generic="modern" style:font-pitch="fixed" officeooo:rsid="0cdcd997"/>
    </style:style>
    <style:style style:name="T335" style:family="text">
      <style:text-properties style:use-window-font-color="true" loext:opacity="0%" officeooo:rsid="0cdcd997"/>
    </style:style>
    <style:style style:name="T336" style:family="text">
      <style:text-properties style:use-window-font-color="true" loext:opacity="0%" officeooo:rsid="014a94a1"/>
    </style:style>
    <style:style style:name="T337" style:family="text">
      <style:text-properties style:use-window-font-color="true" loext:opacity="0%" fo:font-style="italic" officeooo:rsid="014a94a1" style:font-style-asian="italic" style:font-style-complex="italic"/>
    </style:style>
    <style:style style:name="T338" style:family="text">
      <style:text-properties style:use-window-font-color="true" loext:opacity="0%" officeooo:rsid="0ceeb8ea"/>
    </style:style>
    <style:style style:name="T339" style:family="text">
      <style:text-properties style:use-window-font-color="true" loext:opacity="0%" fo:font-family="Courier" style:font-family-generic="modern" style:font-pitch="fixed" officeooo:rsid="0ceeb8ea"/>
    </style:style>
    <style:style style:name="T340" style:family="text">
      <style:text-properties officeooo:rsid="0cee8f1e"/>
    </style:style>
    <style:style style:name="T341" style:family="text">
      <style:text-properties officeooo:rsid="02c8c044"/>
    </style:style>
    <style:style style:name="T342" style:family="text">
      <style:text-properties officeooo:rsid="018faa62"/>
    </style:style>
    <style:style style:name="T343" style:family="text">
      <style:text-properties officeooo:rsid="01b282b7"/>
    </style:style>
    <style:style style:name="T344" style:family="text">
      <style:text-properties officeooo:rsid="01f0899b"/>
    </style:style>
    <style:style style:name="T345" style:family="text">
      <style:text-properties officeooo:rsid="01f317b4"/>
    </style:style>
    <style:style style:name="T346" style:family="text">
      <style:text-properties officeooo:rsid="02196ba9"/>
    </style:style>
    <style:style style:name="T347" style:family="text">
      <style:text-properties officeooo:rsid="0083cf94"/>
    </style:style>
    <style:style style:name="T348" style:family="text">
      <style:text-properties fo:font-style="italic" officeooo:rsid="0083cf94" style:font-style-asian="italic" style:font-style-complex="italic"/>
    </style:style>
    <style:style style:name="T349" style:family="text">
      <style:text-properties officeooo:rsid="00433ec1"/>
    </style:style>
    <style:style style:name="T350" style:family="text">
      <style:text-properties officeooo:rsid="022fd930"/>
    </style:style>
    <style:style style:name="T351" style:family="text">
      <style:text-properties officeooo:rsid="05a8edf2"/>
    </style:style>
    <style:style style:name="T352" style:family="text">
      <style:text-properties fo:font-family="Courier" style:font-family-generic="modern" style:font-pitch="fixed" fo:font-size="13pt" style:font-size-asian="13pt" style:font-size-complex="13pt"/>
    </style:style>
    <style:style style:name="T353" style:family="text">
      <style:text-properties fo:font-size="13pt" officeooo:rsid="05b1c80e" style:font-size-asian="13pt" style:font-size-complex="13pt"/>
    </style:style>
    <style:style style:name="T354" style:family="text">
      <style:text-properties fo:font-weight="normal" officeooo:rsid="006d0dae" style:font-weight-asian="normal" style:font-weight-complex="normal"/>
    </style:style>
    <style:style style:name="T355" style:family="text">
      <style:text-properties fo:font-weight="normal" officeooo:rsid="00052d9c" style:font-weight-asian="normal" style:font-weight-complex="normal"/>
    </style:style>
    <style:style style:name="T356" style:family="text">
      <style:text-properties fo:font-weight="normal" officeooo:rsid="0219f66e" style:font-weight-asian="normal" style:font-weight-complex="normal"/>
    </style:style>
    <style:style style:name="T357" style:family="text">
      <style:text-properties fo:font-weight="normal" officeooo:rsid="02ae708c" style:font-weight-asian="normal" style:font-weight-complex="normal"/>
    </style:style>
    <style:style style:name="T358" style:family="text">
      <style:text-properties fo:font-weight="normal" officeooo:rsid="00433ec1" style:font-weight-asian="normal" style:font-weight-complex="normal"/>
    </style:style>
    <style:style style:name="T359" style:family="text">
      <style:text-properties officeooo:rsid="022e43de"/>
    </style:style>
    <style:style style:name="T360" style:family="text">
      <style:text-properties fo:font-family="Courier" style:font-family-generic="modern" style:font-pitch="fixed" officeooo:rsid="0219f66e"/>
    </style:style>
    <style:style style:name="T361" style:family="text">
      <style:text-properties fo:font-family="Courier" style:font-family-generic="modern" style:font-pitch="fixed" officeooo:rsid="022e43de"/>
    </style:style>
    <style:style style:name="T362" style:family="text">
      <style:text-properties style:use-window-font-color="true" loext:opacity="0%" officeooo:rsid="057bb34d"/>
    </style:style>
    <style:style style:name="T363" style:family="text">
      <style:text-properties style:use-window-font-color="true" loext:opacity="0%" officeooo:rsid="011e5481"/>
    </style:style>
    <style:style style:name="T364" style:family="text">
      <style:text-properties style:use-window-font-color="true" loext:opacity="0%" fo:font-size="13pt" fo:font-weight="normal" officeooo:rsid="011e5481" style:font-size-asian="13pt" style:font-weight-asian="normal" style:font-size-complex="13pt" style:font-weight-complex="normal"/>
    </style:style>
    <style:style style:name="T365" style:family="text">
      <style:text-properties fo:font-family="Courier" style:font-family-generic="modern" style:font-pitch="fixed" fo:font-size="13pt" fo:font-weight="normal" officeooo:rsid="022e43de" style:font-size-asian="13pt" style:font-weight-asian="normal" style:font-size-complex="13pt" style:font-weight-complex="normal"/>
    </style:style>
    <style:style style:name="T366" style:family="text">
      <style:text-properties fo:font-weight="normal" officeooo:rsid="022e43de" style:font-weight-asian="normal" style:font-weight-complex="normal"/>
    </style:style>
    <style:style style:name="T367" style:family="text">
      <style:text-properties fo:font-family="Courier" style:font-family-generic="modern" style:font-pitch="fixed" fo:font-weight="normal" officeooo:rsid="022e43de" style:font-weight-asian="normal" style:font-weight-complex="normal"/>
    </style:style>
    <style:style style:name="T368" style:family="text">
      <style:text-properties style:use-window-font-color="true" loext:opacity="0%" fo:font-size="13pt" fo:font-style="normal" fo:font-weight="normal" officeooo:rsid="0584881b" style:font-size-asian="13pt" style:font-style-asian="normal" style:font-weight-asian="normal" style:font-size-complex="13pt" style:font-style-complex="normal" style:font-weight-complex="normal"/>
    </style:style>
    <style:style style:name="T369" style:family="text">
      <style:text-properties style:use-window-font-color="true" loext:opacity="0%" fo:font-size="13pt" fo:font-style="normal" fo:font-weight="normal" officeooo:rsid="013533f3" style:font-size-asian="13pt" style:font-style-asian="normal" style:font-weight-asian="normal" style:font-size-complex="13pt" style:font-style-complex="normal" style:font-weight-complex="normal"/>
    </style:style>
    <style:style style:name="T370" style:family="text">
      <style:text-properties style:use-window-font-color="true" loext:opacity="0%" fo:font-size="13pt" fo:font-style="normal" fo:font-weight="normal" officeooo:rsid="05bf9719" style:font-size-asian="13pt" style:font-style-asian="normal" style:font-weight-asian="normal" style:font-size-complex="13pt" style:font-style-complex="normal" style:font-weight-complex="normal"/>
    </style:style>
    <style:style style:name="T371" style:family="text">
      <style:text-properties officeooo:rsid="021b494b"/>
    </style:style>
    <style:style style:name="T372" style:family="text">
      <style:text-properties fo:font-weight="normal" officeooo:rsid="021b494b" style:font-weight-asian="normal" style:font-weight-complex="normal"/>
    </style:style>
    <style:style style:name="T373" style:family="text">
      <style:text-properties style:use-window-font-color="true" loext:opacity="0%" fo:font-size="13pt" fo:font-weight="normal" officeooo:rsid="02ce6f9e" style:font-size-asian="13pt" style:font-weight-asian="normal" style:font-size-complex="13pt" style:font-weight-complex="normal"/>
    </style:style>
    <style:style style:name="T374" style:family="text">
      <style:text-properties style:use-window-font-color="true" loext:opacity="0%" fo:font-size="13pt" fo:font-weight="normal" officeooo:rsid="05c6a7ac" style:font-size-asian="13pt" style:font-weight-asian="normal" style:font-size-complex="13pt" style:font-weight-complex="normal"/>
    </style:style>
    <style:style style:name="T375" style:family="text">
      <style:text-properties fo:font-size="13pt" fo:font-weight="bold" style:font-size-asian="13pt" style:font-weight-asian="bold" style:font-size-complex="13pt" style:font-weight-complex="bold"/>
    </style:style>
    <style:style style:name="T376" style:family="text">
      <style:text-properties officeooo:rsid="02d54aa5"/>
    </style:style>
    <style:style style:name="T377" style:family="text">
      <style:text-properties style:use-window-font-color="true" loext:opacity="0%" fo:font-size="13pt" fo:font-weight="normal" officeooo:rsid="030f2e60" style:font-size-asian="13pt" style:font-weight-asian="normal" style:font-size-complex="13pt" style:font-weight-complex="normal"/>
    </style:style>
    <style:style style:name="T378" style:family="text">
      <style:text-properties officeooo:rsid="02d6aa2d"/>
    </style:style>
    <style:style style:name="T379" style:family="text">
      <style:text-properties officeooo:rsid="053e7be2"/>
    </style:style>
    <style:style style:name="T380" style:family="text">
      <style:text-properties style:use-window-font-color="true" loext:opacity="0%" fo:font-weight="normal" officeooo:rsid="059bfa11" style:font-weight-asian="normal" style:font-weight-complex="normal"/>
    </style:style>
    <style:style style:name="T381" style:family="text">
      <style:text-properties style:use-window-font-color="true" loext:opacity="0%" fo:font-weight="normal" officeooo:rsid="0345ea21" style:font-weight-asian="normal" style:font-weight-complex="normal"/>
    </style:style>
    <style:style style:name="T382" style:family="text">
      <style:text-properties style:use-window-font-color="true" loext:opacity="0%" fo:font-family="Courier" style:font-family-generic="modern" style:font-pitch="fixed" fo:font-weight="normal" officeooo:rsid="03438345" style:font-weight-asian="normal" style:font-weight-complex="normal"/>
    </style:style>
    <style:style style:name="T383" style:family="text">
      <style:text-properties style:use-window-font-color="true" loext:opacity="0%" fo:font-family="Courier" style:font-family-generic="modern" style:font-pitch="fixed" fo:font-weight="normal" officeooo:rsid="03450b33" style:font-weight-asian="normal" style:font-weight-complex="normal"/>
    </style:style>
    <style:style style:name="T384" style:family="text">
      <style:text-properties style:use-window-font-color="true" loext:opacity="0%" fo:font-weight="normal" officeooo:rsid="0368d6c9" style:font-weight-asian="normal" style:font-weight-complex="normal"/>
    </style:style>
    <style:style style:name="T385" style:family="text">
      <style:text-properties style:use-window-font-color="true" loext:opacity="0%" fo:font-family="Courier" style:font-family-generic="modern" style:font-pitch="fixed" fo:font-weight="normal" officeooo:rsid="059bfa11" style:font-weight-asian="normal" style:font-weight-complex="normal"/>
    </style:style>
    <style:style style:name="T386" style:family="text">
      <style:text-properties style:use-window-font-color="true" loext:opacity="0%" fo:font-family="Courier" style:font-family-generic="modern" style:font-pitch="fixed" fo:font-weight="normal" officeooo:rsid="0368d6c9" style:font-weight-asian="normal" style:font-weight-complex="normal"/>
    </style:style>
    <style:style style:name="T387" style:family="text">
      <style:text-properties style:use-window-font-color="true" loext:opacity="0%" fo:font-weight="normal" officeooo:rsid="0398501c" style:font-weight-asian="normal" style:font-weight-complex="normal"/>
    </style:style>
    <style:style style:name="T388" style:family="text">
      <style:text-properties style:use-window-font-color="true" loext:opacity="0%" fo:font-weight="normal" officeooo:rsid="059cd2b4" style:font-weight-asian="normal" style:font-weight-complex="normal"/>
    </style:style>
    <style:style style:name="T389" style:family="text">
      <style:text-properties style:use-window-font-color="true" loext:opacity="0%" fo:font-weight="normal" officeooo:rsid="03add424" style:font-weight-asian="normal" style:font-weight-complex="normal"/>
    </style:style>
    <style:style style:name="T390" style:family="text">
      <style:text-properties officeooo:rsid="024ca763"/>
    </style:style>
    <style:style style:name="T391" style:family="text">
      <style:text-properties style:use-window-font-color="true" loext:opacity="0%" fo:font-size="13pt" fo:font-weight="normal" officeooo:rsid="03dcb6ad" style:font-size-asian="13pt" style:font-weight-asian="normal" style:font-size-complex="13pt" style:font-weight-complex="normal"/>
    </style:style>
    <style:style style:name="T392" style:family="text">
      <style:text-properties style:use-window-font-color="true" loext:opacity="0%" fo:font-family="Courier" style:font-family-generic="modern" style:font-pitch="fixed" fo:font-size="13pt" fo:font-weight="normal" officeooo:rsid="03450b33" style:font-size-asian="13pt" style:font-weight-asian="normal" style:font-size-complex="13pt" style:font-weight-complex="normal"/>
    </style:style>
    <style:style style:name="T393" style:family="text">
      <style:text-properties fo:font-weight="normal" officeooo:rsid="02d6aa2d" style:font-weight-asian="normal" style:font-weight-complex="normal"/>
    </style:style>
    <style:style style:name="T394" style:family="text">
      <style:text-properties fo:font-weight="normal" officeooo:rsid="05a47c7f" style:font-weight-asian="normal" style:font-weight-complex="normal"/>
    </style:style>
    <style:style style:name="T395" style:family="text">
      <style:text-properties fo:font-weight="normal" officeooo:rsid="05a8edf2" style:font-weight-asian="normal" style:font-weight-complex="normal"/>
    </style:style>
    <style:style style:name="T396" style:family="text">
      <style:text-properties officeooo:rsid="05a47c7f"/>
    </style:style>
    <style:style style:name="T397" style:family="text">
      <style:text-properties officeooo:rsid="00052570"/>
    </style:style>
    <style:style style:name="T398" style:family="text">
      <style:text-properties officeooo:rsid="0005ae83"/>
    </style:style>
    <style:style style:name="T399" style:family="text">
      <style:text-properties officeooo:rsid="043f9efc"/>
    </style:style>
    <style:style style:name="T400" style:family="text">
      <style:text-properties officeooo:rsid="008e351d"/>
    </style:style>
    <style:style style:name="T401" style:family="text">
      <style:text-properties fo:font-style="italic" officeooo:rsid="008e351d" style:font-style-asian="italic" style:font-style-complex="italic"/>
    </style:style>
    <style:style style:name="T402" style:family="text">
      <style:text-properties style:use-window-font-color="true" loext:opacity="0%" fo:font-size="13pt" fo:font-weight="normal" officeooo:rsid="0039ab08" style:font-size-asian="13pt" style:font-weight-asian="normal" style:font-size-complex="13pt" style:font-weight-complex="normal"/>
    </style:style>
    <style:style style:name="T403" style:family="text">
      <style:text-properties style:use-window-font-color="true" loext:opacity="0%" fo:font-size="13pt" fo:font-weight="normal" officeooo:rsid="008e351d" style:font-size-asian="13pt" style:font-weight-asian="normal" style:font-size-complex="13pt" style:font-weight-complex="normal"/>
    </style:style>
    <style:style style:name="T404" style:family="text">
      <style:text-properties style:use-window-font-color="true" loext:opacity="0%" fo:font-size="13pt" fo:font-weight="normal" officeooo:rsid="087c846e" style:font-size-asian="13pt" style:font-weight-asian="normal" style:font-size-complex="13pt" style:font-weight-complex="normal"/>
    </style:style>
    <style:style style:name="T405" style:family="text">
      <style:text-properties officeooo:rsid="045f7d9d"/>
    </style:style>
    <style:style style:name="T406" style:family="text">
      <style:text-properties fo:font-size="13pt" fo:font-weight="normal" officeooo:rsid="0009729a" style:font-size-asian="13pt" style:font-weight-asian="normal" style:font-size-complex="13pt" style:font-weight-complex="normal"/>
    </style:style>
    <style:style style:name="T407" style:family="text">
      <style:text-properties fo:font-family="Courier" style:font-family-generic="modern" style:font-pitch="fixed" fo:font-size="13pt" fo:font-weight="normal" officeooo:rsid="0009729a" style:font-size-asian="13pt" style:font-weight-asian="normal" style:font-size-complex="13pt" style:font-weight-complex="normal"/>
    </style:style>
    <style:style style:name="T408" style:family="text">
      <style:text-properties fo:font-size="13pt" fo:font-weight="normal" officeooo:rsid="045f7d9d" style:font-size-asian="13pt" style:font-weight-asian="normal" style:font-size-complex="13pt" style:font-weight-complex="normal"/>
    </style:style>
    <style:style style:name="T409" style:family="text">
      <style:text-properties fo:font-size="13pt" fo:font-weight="normal" officeooo:rsid="00d80f8a" style:font-size-asian="13pt" style:font-weight-asian="normal" style:font-size-complex="13pt" style:font-weight-complex="normal"/>
    </style:style>
    <style:style style:name="T410" style:family="text">
      <style:text-properties fo:font-size="13pt" fo:font-weight="normal" officeooo:rsid="012c13b6" style:font-size-asian="13pt" style:font-weight-asian="normal" style:font-size-complex="13pt" style:font-weight-complex="normal"/>
    </style:style>
    <style:style style:name="T411" style:family="text">
      <style:text-properties fo:font-size="13pt" fo:font-weight="normal" officeooo:rsid="012d36de" style:font-size-asian="13pt" style:font-weight-asian="normal" style:font-size-complex="13pt" style:font-weight-complex="normal"/>
    </style:style>
    <style:style style:name="T412" style:family="text">
      <style:text-properties officeooo:rsid="000b5c99"/>
    </style:style>
    <style:style style:name="T413" style:family="text">
      <style:text-properties fo:font-size="13pt" fo:font-weight="normal" officeooo:rsid="0141b2e9" style:font-size-asian="13pt" style:font-weight-asian="normal" style:font-size-complex="13pt" style:font-weight-complex="normal"/>
    </style:style>
    <style:style style:name="T414" style:family="text">
      <style:text-properties fo:font-size="13pt" fo:font-weight="normal" officeooo:rsid="01518a7b" style:font-size-asian="13pt" style:font-weight-asian="normal" style:font-size-complex="13pt" style:font-weight-complex="normal"/>
    </style:style>
    <style:style style:name="T415" style:family="text">
      <style:text-properties fo:font-size="13pt" fo:font-weight="normal" officeooo:rsid="016c804b" style:font-size-asian="13pt" style:font-weight-asian="normal" style:font-size-complex="13pt" style:font-weight-complex="normal"/>
    </style:style>
    <style:style style:name="T416" style:family="text">
      <style:text-properties officeooo:rsid="0141b2e9"/>
    </style:style>
    <style:style style:name="T417" style:family="text">
      <style:text-properties officeooo:rsid="01518a7b"/>
    </style:style>
    <style:style style:name="T418" style:family="text">
      <style:text-properties officeooo:rsid="01b76ec5"/>
    </style:style>
    <style:style style:name="T419" style:family="text">
      <style:text-properties fo:font-style="italic" officeooo:rsid="0141b2e9" style:font-style-asian="italic" style:font-style-complex="italic"/>
    </style:style>
    <style:style style:name="T420" style:family="text">
      <style:text-properties fo:font-style="normal" officeooo:rsid="01b76ec5" style:font-style-asian="normal" style:font-style-complex="normal"/>
    </style:style>
    <style:style style:name="T421" style:family="text">
      <style:text-properties fo:font-size="13pt" fo:font-weight="normal" officeooo:rsid="0275d905" style:font-size-asian="13pt" style:font-weight-asian="normal" style:font-size-complex="13pt" style:font-weight-complex="normal"/>
    </style:style>
    <style:style style:name="T422" style:family="text">
      <style:text-properties officeooo:rsid="0379ac2f"/>
    </style:style>
    <style:style style:name="T423" style:family="text">
      <style:text-properties fo:font-size="13pt" fo:font-style="normal" fo:font-weight="normal" officeooo:rsid="0275d905" style:font-size-asian="13pt" style:font-style-asian="normal" style:font-weight-asian="normal" style:font-size-complex="13pt" style:font-style-complex="normal" style:font-weight-complex="normal"/>
    </style:style>
    <style:style style:name="T424" style:family="text">
      <style:text-properties fo:font-size="13pt" fo:font-weight="normal" officeooo:rsid="0379ac2f" style:font-size-asian="13pt" style:font-weight-asian="normal" style:font-size-complex="13pt" style:font-weight-complex="normal"/>
    </style:style>
    <style:style style:name="T425" style:family="text">
      <style:text-properties fo:font-family="Courier" style:font-family-generic="modern" style:font-pitch="fixed" fo:font-size="13pt" fo:font-weight="normal" officeooo:rsid="0275d905" style:font-size-asian="13pt" style:font-weight-asian="normal" style:font-size-complex="13pt" style:font-weight-complex="normal"/>
    </style:style>
    <style:style style:name="T426" style:family="text">
      <style:text-properties fo:font-family="Courier" style:font-family-generic="modern" style:font-pitch="fixed" officeooo:rsid="02ce9666"/>
    </style:style>
    <style:style style:name="T427" style:family="text">
      <style:text-properties fo:font-style="normal" officeooo:rsid="01518a7b" style:font-style-asian="normal" style:font-style-complex="normal"/>
    </style:style>
    <style:style style:name="T428" style:family="text">
      <style:text-properties fo:font-style="normal" officeooo:rsid="0379ac2f" style:font-style-asian="normal" style:font-style-complex="normal"/>
    </style:style>
    <style:style style:name="T429" style:family="text">
      <style:text-properties fo:font-style="normal" officeooo:rsid="025ce238" style:font-style-asian="normal" style:font-style-complex="normal"/>
    </style:style>
    <style:style style:name="T430" style:family="text">
      <style:text-properties officeooo:rsid="04429afc"/>
    </style:style>
    <style:style style:name="T431" style:family="text">
      <style:text-properties fo:font-family="Courier" style:font-family-generic="modern" style:font-pitch="fixed" officeooo:rsid="04429afc"/>
    </style:style>
    <style:style style:name="T432" style:family="text">
      <style:text-properties fo:font-size="13pt" fo:font-style="normal" fo:font-weight="normal" officeooo:rsid="025ce238" style:font-size-asian="13pt" style:font-style-asian="normal" style:font-weight-asian="normal" style:font-size-complex="13pt" style:font-style-complex="normal" style:font-weight-complex="normal"/>
    </style:style>
    <style:style style:name="T433" style:family="text">
      <style:text-properties officeooo:rsid="03a8ce87"/>
    </style:style>
    <style:style style:name="T434" style:family="text">
      <style:text-properties officeooo:rsid="0378b75c"/>
    </style:style>
    <style:style style:name="T435" style:family="text">
      <style:text-properties fo:font-size="13pt" fo:font-style="normal" fo:font-weight="normal" officeooo:rsid="03fda6d3" style:font-size-asian="13pt" style:font-style-asian="normal" style:font-weight-asian="normal" style:font-size-complex="13pt" style:font-style-complex="normal" style:font-weight-complex="normal"/>
    </style:style>
    <style:style style:name="T436" style:family="text">
      <style:text-properties fo:font-size="13pt" fo:font-style="normal" fo:font-weight="normal" officeooo:rsid="0405340e" style:font-size-asian="13pt" style:font-style-asian="normal" style:font-weight-asian="normal" style:font-size-complex="13pt" style:font-style-complex="normal" style:font-weight-complex="normal"/>
    </style:style>
    <style:style style:name="T437" style:family="text">
      <style:text-properties fo:font-size="13pt" fo:font-style="normal" fo:font-weight="normal" officeooo:rsid="04032b4e" style:font-size-asian="13pt" style:font-style-asian="normal" style:font-weight-asian="normal" style:font-size-complex="13pt" style:font-style-complex="normal" style:font-weight-complex="normal"/>
    </style:style>
    <style:style style:name="T438" style:family="text">
      <style:text-properties fo:font-size="13pt" fo:font-style="normal" fo:font-weight="normal" officeooo:rsid="03ffed0c" style:font-size-asian="13pt" style:font-style-asian="normal" style:font-weight-asian="normal" style:font-size-complex="13pt" style:font-style-complex="normal" style:font-weight-complex="normal"/>
    </style:style>
    <style:style style:name="T439" style:family="text">
      <style:text-properties fo:font-size="13pt" fo:font-style="normal" fo:font-weight="normal" officeooo:rsid="03a8ce87" style:font-size-asian="13pt" style:font-style-asian="normal" style:font-weight-asian="normal" style:font-size-complex="13pt" style:font-style-complex="normal" style:font-weight-complex="normal"/>
    </style:style>
    <style:style style:name="T440" style:family="text">
      <style:text-properties officeooo:rsid="025ce238"/>
    </style:style>
    <style:style style:name="T441" style:family="text">
      <style:text-properties fo:font-size="13pt" fo:font-style="normal" fo:font-weight="normal" officeooo:rsid="04077d98" style:font-size-asian="13pt" style:font-style-asian="normal" style:font-weight-asian="normal" style:font-size-complex="13pt" style:font-style-complex="normal" style:font-weight-complex="normal"/>
    </style:style>
    <style:style style:name="T442" style:family="text">
      <style:text-properties fo:font-size="13pt" fo:font-style="normal" fo:font-weight="normal" officeooo:rsid="04616397" style:font-size-asian="13pt" style:font-style-asian="normal" style:font-weight-asian="normal" style:font-size-complex="13pt" style:font-style-complex="normal" style:font-weight-complex="normal"/>
    </style:style>
    <style:style style:name="T443" style:family="text">
      <style:text-properties fo:font-size="13pt" fo:font-style="normal" fo:font-weight="normal" officeooo:rsid="045f7d9d" style:font-size-asian="13pt" style:font-style-asian="normal" style:font-weight-asian="normal" style:font-size-complex="13pt" style:font-style-complex="normal" style:font-weight-complex="normal"/>
    </style:style>
    <style:style style:name="T444" style:family="text">
      <style:text-properties fo:font-size="13pt" fo:font-style="normal" fo:font-weight="normal" officeooo:rsid="04648f82" style:font-size-asian="13pt" style:font-style-asian="normal" style:font-weight-asian="normal" style:font-size-complex="13pt" style:font-style-complex="normal" style:font-weight-complex="normal"/>
    </style:style>
    <style:style style:name="T445" style:family="text">
      <style:text-properties fo:font-size="13pt" fo:font-style="normal" fo:font-weight="normal" officeooo:rsid="04aeaba9" style:font-size-asian="13pt" style:font-style-asian="normal" style:font-weight-asian="normal" style:font-size-complex="13pt" style:font-style-complex="normal" style:font-weight-complex="normal"/>
    </style:style>
    <style:style style:name="T446" style:family="text">
      <style:text-properties officeooo:rsid="043c8fa7"/>
    </style:style>
    <style:style style:name="T447" style:family="text">
      <style:text-properties officeooo:rsid="04d96e96"/>
    </style:style>
    <style:style style:name="T448" style:family="text">
      <style:text-properties officeooo:rsid="03fda6d3"/>
    </style:style>
    <style:style style:name="T449" style:family="text">
      <style:text-properties fo:font-size="13pt" fo:font-style="normal" fo:font-weight="normal" officeooo:rsid="043c8fa7" style:font-size-asian="13pt" style:font-style-asian="normal" style:font-weight-asian="normal" style:font-size-complex="13pt" style:font-style-complex="normal" style:font-weight-complex="normal"/>
    </style:style>
    <style:style style:name="T450" style:family="text">
      <style:text-properties fo:font-size="13pt" fo:font-style="normal" fo:font-weight="normal" officeooo:rsid="05255891" style:font-size-asian="13pt" style:font-style-asian="normal" style:font-weight-asian="normal" style:font-size-complex="13pt" style:font-style-complex="normal" style:font-weight-complex="normal"/>
    </style:style>
    <style:style style:name="T451" style:family="text">
      <style:text-properties fo:font-size="13pt" fo:font-style="normal" fo:font-weight="normal" officeooo:rsid="066521cf" style:font-size-asian="13pt" style:font-style-asian="normal" style:font-weight-asian="normal" style:font-size-complex="13pt" style:font-style-complex="normal" style:font-weight-complex="normal"/>
    </style:style>
    <style:style style:name="T452" style:family="text">
      <style:text-properties fo:font-size="13pt" fo:font-style="normal" fo:font-weight="normal" officeooo:rsid="05adc768" style:font-size-asian="13pt" style:font-style-asian="normal" style:font-weight-asian="normal" style:font-size-complex="13pt" style:font-style-complex="normal" style:font-weight-complex="normal"/>
    </style:style>
    <style:style style:name="T453" style:family="text">
      <style:text-properties fo:font-size="13pt" fo:font-style="normal" fo:font-weight="normal" officeooo:rsid="06664955" style:font-size-asian="13pt" style:font-style-asian="normal" style:font-weight-asian="normal" style:font-size-complex="13pt" style:font-style-complex="normal" style:font-weight-complex="normal"/>
    </style:style>
    <style:style style:name="T454" style:family="text">
      <style:text-properties fo:font-size="13pt" fo:font-style="normal" fo:font-weight="normal" officeooo:rsid="06641261" style:font-size-asian="13pt" style:font-style-asian="normal" style:font-weight-asian="normal" style:font-size-complex="13pt" style:font-style-complex="normal" style:font-weight-complex="normal"/>
    </style:style>
    <style:style style:name="T455" style:family="text">
      <style:text-properties fo:font-size="13pt" fo:font-weight="normal" officeooo:rsid="05adc768" style:font-size-asian="13pt" style:font-weight-asian="normal" style:font-size-complex="13pt" style:font-weight-complex="normal"/>
    </style:style>
    <style:style style:name="T456" style:family="text">
      <style:text-properties fo:font-size="13pt" fo:font-weight="normal" officeooo:rsid="06664955" style:font-size-asian="13pt" style:font-weight-asian="normal" style:font-size-complex="13pt" style:font-weight-complex="normal"/>
    </style:style>
    <style:style style:name="T457" style:family="text">
      <style:text-properties fo:font-size="13pt" fo:font-style="normal" fo:font-weight="normal" officeooo:rsid="0665d229" style:font-size-asian="13pt" style:font-style-asian="normal" style:font-weight-asian="normal" style:font-size-complex="13pt" style:font-style-complex="normal" style:font-weight-complex="normal"/>
    </style:style>
    <style:style style:name="T458" style:family="text">
      <style:text-properties style:use-window-font-color="true" loext:opacity="0%" officeooo:rsid="058c20aa"/>
    </style:style>
    <style:style style:name="T459" style:family="text">
      <style:text-properties style:use-window-font-color="true" loext:opacity="0%" officeooo:rsid="06673146"/>
    </style:style>
    <style:style style:name="T460" style:family="text">
      <style:text-properties style:use-window-font-color="true" loext:opacity="0%" officeooo:rsid="058c6d72"/>
    </style:style>
    <style:style style:name="T461" style:family="text">
      <style:text-properties style:use-window-font-color="true" loext:opacity="0%" fo:font-family="Courier" style:font-family-generic="modern" style:font-pitch="fixed" officeooo:rsid="058c20aa"/>
    </style:style>
    <style:style style:name="T462" style:family="text">
      <style:text-properties style:use-window-font-color="true" loext:opacity="0%" fo:font-size="13pt" fo:font-style="normal" fo:font-weight="normal" officeooo:rsid="058c20aa" style:font-size-asian="13pt" style:font-style-asian="normal" style:font-weight-asian="normal" style:font-size-complex="13pt" style:font-style-complex="normal" style:font-weight-complex="normal"/>
    </style:style>
    <style:style style:name="T463" style:family="text">
      <style:text-properties style:use-window-font-color="true" loext:opacity="0%" fo:font-size="13pt" fo:font-style="normal" fo:font-weight="normal" officeooo:rsid="06673146" style:font-size-asian="13pt" style:font-style-asian="normal" style:font-weight-asian="normal" style:font-size-complex="13pt" style:font-style-complex="normal" style:font-weight-complex="normal"/>
    </style:style>
    <style:style style:name="T464" style:family="text">
      <style:text-properties style:use-window-font-color="true" loext:opacity="0%" fo:font-size="13pt" fo:font-style="normal" fo:font-weight="normal" officeooo:rsid="058c6d72" style:font-size-asian="13pt" style:font-style-asian="normal" style:font-weight-asian="normal" style:font-size-complex="13pt" style:font-style-complex="normal" style:font-weight-complex="normal"/>
    </style:style>
    <style:style style:name="T465" style:family="text">
      <style:text-properties style:use-window-font-color="true" loext:opacity="0%" fo:font-family="Courier" style:font-family-generic="modern" style:font-pitch="fixed" fo:font-size="13pt" fo:font-style="normal" fo:font-weight="normal" officeooo:rsid="058c20aa" style:font-size-asian="13pt" style:font-style-asian="normal" style:font-weight-asian="normal" style:font-size-complex="13pt" style:font-style-complex="normal" style:font-weight-complex="normal"/>
    </style:style>
    <style:style style:name="T466" style:family="text">
      <style:text-properties fo:font-size="13pt" fo:font-style="normal" fo:font-weight="normal" officeooo:rsid="05ab584a" style:font-size-asian="13pt" style:font-style-asian="normal" style:font-weight-asian="normal" style:font-size-complex="13pt" style:font-style-complex="normal" style:font-weight-complex="normal"/>
    </style:style>
    <style:style style:name="T467" style:family="text">
      <style:text-properties fo:font-size="13pt" fo:font-style="normal" fo:font-weight="normal" officeooo:rsid="06673146" style:font-size-asian="13pt" style:font-style-asian="normal" style:font-weight-asian="normal" style:font-size-complex="13pt" style:font-style-complex="normal" style:font-weight-complex="normal"/>
    </style:style>
    <style:style style:name="T468" style:family="text">
      <style:text-properties fo:font-size="13pt" fo:font-style="normal" fo:font-weight="normal" officeooo:rsid="05e76f8c" style:font-size-asian="13pt" style:font-style-asian="normal" style:font-weight-asian="normal" style:font-size-complex="13pt" style:font-style-complex="normal" style:font-weight-complex="normal"/>
    </style:style>
    <style:style style:name="T469" style:family="text">
      <style:text-properties officeooo:rsid="06673146"/>
    </style:style>
    <style:style style:name="T470" style:family="text">
      <style:text-properties officeooo:rsid="05e76f8c"/>
    </style:style>
    <style:style style:name="T471" style:family="text">
      <style:text-properties officeooo:rsid="0879c07d"/>
    </style:style>
    <style:style style:name="T472" style:family="text">
      <style:text-properties officeooo:rsid="063cd2ef"/>
    </style:style>
    <style:style style:name="T473" style:family="text">
      <style:text-properties officeooo:rsid="07199f3b"/>
    </style:style>
    <style:style style:name="T474" style:family="text">
      <style:text-properties officeooo:rsid="088f223c"/>
    </style:style>
    <style:style style:name="T475" style:family="text">
      <style:text-properties fo:font-family="Courier" style:font-family-generic="modern" style:font-pitch="fixed" officeooo:rsid="07199f3b"/>
    </style:style>
    <style:style style:name="T476" style:family="text">
      <style:text-properties officeooo:rsid="0732332b"/>
    </style:style>
    <style:style style:name="T477" style:family="text">
      <style:text-properties fo:font-family="Courier" style:font-family-generic="modern" style:font-pitch="fixed" officeooo:rsid="0732332b"/>
    </style:style>
    <style:style style:name="T478" style:family="text">
      <style:text-properties fo:font-style="normal" fo:font-weight="bold" officeooo:rsid="07199f3b" style:font-style-asian="normal" style:font-weight-asian="bold" style:font-style-complex="normal" style:font-weight-complex="bold"/>
    </style:style>
    <style:style style:name="T479" style:family="text">
      <style:text-properties fo:font-style="normal" officeooo:rsid="07199f3b" style:font-style-asian="normal" style:font-style-complex="normal"/>
    </style:style>
    <style:style style:name="T480" style:family="text">
      <style:text-properties fo:font-style="normal" officeooo:rsid="073b07ff" style:font-style-asian="normal" style:font-style-complex="normal"/>
    </style:style>
    <style:style style:name="T481" style:family="text">
      <style:text-properties fo:font-style="normal" officeooo:rsid="088f223c" style:font-style-asian="normal" style:font-style-complex="normal"/>
    </style:style>
    <style:style style:name="T482" style:family="text">
      <style:text-properties fo:font-family="Courier" style:font-family-generic="modern" style:font-pitch="fixed" fo:font-style="normal" officeooo:rsid="07199f3b" style:font-style-asian="normal" style:font-style-complex="normal"/>
    </style:style>
    <style:style style:name="T483" style:family="text">
      <style:text-properties fo:font-family="Courier" style:font-family-generic="modern" style:font-pitch="fixed" fo:font-style="normal" officeooo:rsid="073b07ff" style:font-style-asian="normal" style:font-style-complex="normal"/>
    </style:style>
    <style:style style:name="T484" style:family="text">
      <style:text-properties officeooo:rsid="073b07ff"/>
    </style:style>
    <style:style style:name="T485" style:family="text">
      <style:text-properties fo:font-family="Courier" style:font-family-generic="modern" style:font-pitch="fixed" officeooo:rsid="073b07ff"/>
    </style:style>
    <style:style style:name="T486" style:family="text">
      <style:text-properties officeooo:rsid="079460f9"/>
    </style:style>
    <style:style style:name="T487" style:family="text">
      <style:text-properties officeooo:rsid="07956789"/>
    </style:style>
    <style:style style:name="T488" style:family="text">
      <style:text-properties fo:font-family="Courier" style:font-family-generic="modern" style:font-pitch="fixed" officeooo:rsid="07956789"/>
    </style:style>
    <style:style style:name="T489" style:family="text">
      <style:text-properties fo:font-family="Courier" style:font-family-generic="modern" style:font-pitch="fixed" officeooo:rsid="0795c261"/>
    </style:style>
    <style:style style:name="T490" style:family="text">
      <style:text-properties officeooo:rsid="0405e429"/>
    </style:style>
    <style:style style:name="T491" style:family="text">
      <style:text-properties officeooo:rsid="0665d229"/>
    </style:style>
    <style:style style:name="T492" style:family="text">
      <style:text-properties officeooo:rsid="0801bff9"/>
    </style:style>
    <style:style style:name="T493" style:family="text">
      <style:text-properties fo:font-size="13pt" fo:font-style="normal" fo:font-weight="normal" officeooo:rsid="0405e429" style:font-size-asian="13pt" style:font-style-asian="normal" style:font-weight-asian="normal" style:font-size-complex="13pt" style:font-style-complex="normal" style:font-weight-complex="normal"/>
    </style:style>
    <style:style style:name="T494" style:family="text">
      <style:text-properties fo:font-size="13pt" fo:font-style="normal" fo:font-weight="normal" officeooo:rsid="0801bff9" style:font-size-asian="13pt" style:font-style-asian="normal" style:font-weight-asian="normal" style:font-size-complex="13pt" style:font-style-complex="normal" style:font-weight-complex="normal"/>
    </style:style>
    <style:style style:name="T495" style:family="text">
      <style:text-properties fo:font-size="13pt" fo:font-style="normal" fo:font-weight="normal" officeooo:rsid="081da6f3" style:font-size-asian="13pt" style:font-style-asian="normal" style:font-weight-asian="normal" style:font-size-complex="13pt" style:font-style-complex="normal" style:font-weight-complex="normal"/>
    </style:style>
    <style:style style:name="T496" style:family="text">
      <style:text-properties officeooo:rsid="043ccbbb"/>
    </style:style>
    <style:style style:name="T497" style:family="text">
      <style:text-properties officeooo:rsid="08283568"/>
    </style:style>
    <style:style style:name="T498" style:family="text">
      <style:text-properties fo:font-size="13pt" fo:font-style="normal" fo:font-weight="normal" officeooo:rsid="043ccbbb" style:font-size-asian="13pt" style:font-style-asian="normal" style:font-weight-asian="normal" style:font-size-complex="13pt" style:font-style-complex="normal" style:font-weight-complex="normal"/>
    </style:style>
    <style:style style:name="T499" style:family="text">
      <style:text-properties fo:font-size="13pt" fo:font-style="normal" fo:font-weight="normal" officeooo:rsid="088f223c" style:font-size-asian="13pt" style:font-style-asian="normal" style:font-weight-asian="normal" style:font-size-complex="13pt" style:font-style-complex="normal" style:font-weight-complex="normal"/>
    </style:style>
    <style:style style:name="T500" style:family="text">
      <style:text-properties fo:font-size="13pt" fo:font-style="normal" fo:font-weight="normal" officeooo:rsid="085fea43" style:font-size-asian="13pt" style:font-style-asian="normal" style:font-weight-asian="normal" style:font-size-complex="13pt" style:font-style-complex="normal" style:font-weight-complex="normal"/>
    </style:style>
    <style:style style:name="T501" style:family="text">
      <style:text-properties officeooo:rsid="086be570"/>
    </style:style>
    <style:style style:name="T502" style:family="text">
      <style:text-properties fo:font-family="Courier" style:font-family-generic="modern" style:font-pitch="fixed" officeooo:rsid="086be570"/>
    </style:style>
    <style:style style:name="T503" style:family="text">
      <style:text-properties officeooo:rsid="001a636e"/>
    </style:style>
    <style:style style:name="T504" style:family="text">
      <style:text-properties officeooo:rsid="007885bf"/>
    </style:style>
    <style:style style:name="T505" style:family="text">
      <style:text-properties fo:font-size="13pt" fo:font-weight="normal" officeooo:rsid="008e351d" style:font-size-asian="13pt" style:font-weight-asian="normal" style:font-size-complex="13pt" style:font-weight-complex="normal"/>
    </style:style>
    <style:style style:name="T506" style:family="text">
      <style:text-properties fo:font-size="13pt" fo:font-weight="normal" officeooo:rsid="004af1a9" style:font-size-asian="13pt" style:font-weight-asian="normal" style:font-size-complex="13pt" style:font-weight-complex="normal"/>
    </style:style>
    <style:style style:name="T507" style:family="text">
      <style:text-properties fo:font-size="13pt" fo:font-weight="normal" officeooo:rsid="0d6788fe" style:font-size-asian="13pt" style:font-weight-asian="normal" style:font-size-complex="13pt" style:font-weight-complex="normal"/>
    </style:style>
    <style:style style:name="T508" style:family="text">
      <style:text-properties fo:font-family="Courier" style:font-family-generic="modern" style:font-pitch="fixed" fo:font-size="13pt" fo:font-weight="normal" officeooo:rsid="004af1a9" style:font-size-asian="13pt" style:font-weight-asian="normal" style:font-size-complex="13pt" style:font-weight-complex="normal"/>
    </style:style>
    <style:style style:name="T509" style:family="text">
      <style:text-properties fo:font-family="Courier" style:font-family-generic="modern" style:font-pitch="fixed" fo:font-size="13pt" fo:font-weight="normal" officeooo:rsid="03fa0a83" style:font-size-asian="13pt" style:font-weight-asian="normal" style:font-size-complex="13pt" style:font-weight-complex="normal"/>
    </style:style>
    <style:style style:name="T510" style:family="text">
      <style:text-properties fo:font-weight="normal" officeooo:rsid="004c8410" style:font-weight-asian="normal" style:font-weight-complex="normal"/>
    </style:style>
    <style:style style:name="T511" style:family="text">
      <style:text-properties fo:font-weight="normal" officeooo:rsid="006864b9" style:font-weight-asian="normal" style:font-weight-complex="normal"/>
    </style:style>
    <style:style style:name="T512" style:family="text">
      <style:text-properties fo:font-weight="normal" officeooo:rsid="0d6788fe" style:font-weight-asian="normal" style:font-weight-complex="normal"/>
    </style:style>
    <style:style style:name="T513" style:family="text">
      <style:text-properties fo:font-family="Courier" style:font-family-generic="modern" style:font-pitch="fixed" fo:font-weight="normal" officeooo:rsid="006864b9" style:font-weight-asian="normal" style:font-weight-complex="normal"/>
    </style:style>
    <style:style style:name="T514" style:family="text">
      <style:text-properties fo:font-weight="normal" officeooo:rsid="008dc2a5" style:font-weight-asian="normal" style:font-weight-complex="normal"/>
    </style:style>
    <style:style style:name="T515" style:family="text">
      <style:text-properties fo:font-weight="normal" officeooo:rsid="00dec05f" style:font-weight-asian="normal" style:font-weight-complex="normal"/>
    </style:style>
    <style:style style:name="T516" style:family="text">
      <style:text-properties fo:font-size="13pt" fo:font-weight="normal" officeooo:rsid="00234dd1" style:font-size-asian="13pt" style:font-weight-asian="normal" style:font-size-complex="13pt" style:font-weight-complex="normal"/>
    </style:style>
    <style:style style:name="T517" style:family="text">
      <style:text-properties fo:font-size="13pt" fo:font-weight="normal" officeooo:rsid="004c8410" style:font-size-asian="13pt" style:font-weight-asian="normal" style:font-size-complex="13pt" style:font-weight-complex="normal"/>
    </style:style>
    <style:style style:name="T518" style:family="text">
      <style:text-properties fo:font-size="13pt" fo:font-weight="normal" officeooo:rsid="00de071c" style:font-size-asian="13pt" style:font-weight-asian="normal" style:font-size-complex="13pt" style:font-weight-complex="normal"/>
    </style:style>
    <style:style style:name="T519" style:family="text">
      <style:text-properties fo:font-family="Courier" style:font-family-generic="modern" style:font-pitch="fixed" fo:font-size="13pt" fo:font-weight="normal" officeooo:rsid="00de071c" style:font-size-asian="13pt" style:font-weight-asian="normal" style:font-size-complex="13pt" style:font-weight-complex="normal"/>
    </style:style>
    <style:style style:name="T520" style:family="text">
      <style:text-properties fo:font-family="Courier" style:font-family-generic="modern" style:font-pitch="fixed" fo:font-size="13pt" fo:font-weight="normal" officeooo:rsid="014b0e74" style:font-size-asian="13pt" style:font-weight-asian="normal" style:font-size-complex="13pt" style:font-weight-complex="normal"/>
    </style:style>
    <style:style style:name="T521" style:family="text">
      <style:text-properties fo:font-size="13pt" fo:font-weight="normal" officeooo:rsid="014ba655" style:font-size-asian="13pt" style:font-weight-asian="normal" style:font-size-complex="13pt" style:font-weight-complex="normal"/>
    </style:style>
    <style:style style:name="T522" style:family="text">
      <style:text-properties fo:font-size="13pt" fo:font-weight="normal" officeooo:rsid="014b0e74" style:font-size-asian="13pt" style:font-weight-asian="normal" style:font-size-complex="13pt" style:font-weight-complex="normal"/>
    </style:style>
    <style:style style:name="T523" style:family="text">
      <style:text-properties fo:font-size="13pt" fo:font-weight="normal" officeooo:rsid="0166a333" style:font-size-asian="13pt" style:font-weight-asian="normal" style:font-size-complex="13pt" style:font-weight-complex="normal"/>
    </style:style>
    <style:style style:name="T524" style:family="text">
      <style:text-properties fo:font-size="13pt" fo:font-weight="normal" officeooo:rsid="0156e94b" style:font-size-asian="13pt" style:font-weight-asian="normal" style:font-size-complex="13pt" style:font-weight-complex="normal"/>
    </style:style>
    <style:style style:name="T525" style:family="text">
      <style:text-properties fo:font-size="13pt" fo:font-weight="normal" officeooo:rsid="014fb68a" style:font-size-asian="13pt" style:font-weight-asian="normal" style:font-size-complex="13pt" style:font-weight-complex="normal"/>
    </style:style>
    <style:style style:name="T526" style:family="text">
      <style:text-properties fo:font-size="13pt" fo:font-weight="normal" officeooo:rsid="0204cb2f" style:font-size-asian="13pt" style:font-weight-asian="normal" style:font-size-complex="13pt" style:font-weight-complex="normal"/>
    </style:style>
    <style:style style:name="T527" style:family="text">
      <style:text-properties fo:font-size="13pt" fo:font-weight="normal" officeooo:rsid="024aed47" style:font-size-asian="13pt" style:font-weight-asian="normal" style:font-size-complex="13pt" style:font-weight-complex="normal"/>
    </style:style>
    <style:style style:name="T528" style:family="text">
      <style:text-properties fo:font-family="Courier" style:font-family-generic="modern" style:font-pitch="fixed" fo:font-size="13pt" fo:font-weight="normal" officeooo:rsid="014fb68a" style:font-size-asian="13pt" style:font-weight-asian="normal" style:font-size-complex="13pt" style:font-weight-complex="normal"/>
    </style:style>
    <style:style style:name="T529" style:family="text">
      <style:text-properties fo:font-family="Courier" style:font-family-generic="modern" style:font-pitch="fixed" fo:font-size="13pt" fo:font-weight="normal" officeooo:rsid="024aed47" style:font-size-asian="13pt" style:font-weight-asian="normal" style:font-size-complex="13pt" style:font-weight-complex="normal"/>
    </style:style>
    <style:style style:name="T530" style:family="text">
      <style:text-properties fo:font-size="13pt" fo:font-weight="normal" officeooo:rsid="01518fbf" style:font-size-asian="13pt" style:font-weight-asian="normal" style:font-size-complex="13pt" style:font-weight-complex="normal"/>
    </style:style>
    <style:style style:name="T531" style:family="text">
      <style:text-properties fo:font-size="13pt" fo:font-weight="normal" officeooo:rsid="02d055ab" style:font-size-asian="13pt" style:font-weight-asian="normal" style:font-size-complex="13pt" style:font-weight-complex="normal"/>
    </style:style>
    <style:style style:name="T532" style:family="text">
      <style:text-properties fo:font-size="13pt" fo:font-weight="normal" officeooo:rsid="030ae4f6" style:font-size-asian="13pt" style:font-weight-asian="normal" style:font-size-complex="13pt" style:font-weight-complex="normal"/>
    </style:style>
    <style:style style:name="T533" style:family="text">
      <style:text-properties fo:font-family="Courier" style:font-family-generic="modern" style:font-pitch="fixed" fo:font-size="13pt" fo:font-weight="normal" officeooo:rsid="01518fbf" style:font-size-asian="13pt" style:font-weight-asian="normal" style:font-size-complex="13pt" style:font-weight-complex="normal"/>
    </style:style>
    <style:style style:name="T534" style:family="text">
      <style:text-properties fo:font-size="13pt" fo:font-weight="normal" officeooo:rsid="0348836a" style:font-size-asian="13pt" style:font-weight-asian="normal" style:font-size-complex="13pt" style:font-weight-complex="normal"/>
    </style:style>
    <style:style style:name="T535" style:family="text">
      <style:text-properties fo:font-family="Courier" style:font-family-generic="modern" style:font-pitch="fixed" fo:font-size="13pt" fo:font-weight="normal" officeooo:rsid="03492ce7" style:font-size-asian="13pt" style:font-weight-asian="normal" style:font-size-complex="13pt" style:font-weight-complex="normal"/>
    </style:style>
    <style:style style:name="T536" style:family="text">
      <style:text-properties style:use-window-font-color="true" loext:opacity="0%" fo:font-size="13pt" fo:font-weight="normal" officeooo:rsid="01518fbf" style:font-size-asian="13pt" style:font-weight-asian="normal" style:font-size-complex="13pt" style:font-weight-complex="normal"/>
    </style:style>
    <style:style style:name="T537" style:family="text">
      <style:text-properties style:use-window-font-color="true" loext:opacity="0%" fo:font-size="13pt" fo:font-weight="normal" officeooo:rsid="004c8410" style:font-size-asian="13pt" style:font-weight-asian="normal" style:font-size-complex="13pt" style:font-weight-complex="normal"/>
    </style:style>
    <style:style style:name="T538" style:family="text">
      <style:text-properties style:use-window-font-color="true" loext:opacity="0%" fo:font-size="13pt" fo:font-weight="normal" officeooo:rsid="02ceba75" style:font-size-asian="13pt" style:font-weight-asian="normal" style:font-size-complex="13pt" style:font-weight-complex="normal"/>
    </style:style>
    <style:style style:name="T539" style:family="text">
      <style:text-properties style:use-window-font-color="true" loext:opacity="0%" fo:font-size="13pt" fo:font-weight="normal" officeooo:rsid="03e21558" style:font-size-asian="13pt" style:font-weight-asian="normal" style:font-size-complex="13pt" style:font-weight-complex="normal"/>
    </style:style>
    <style:style style:name="T540" style:family="text">
      <style:text-properties style:use-window-font-color="true" loext:opacity="0%" fo:font-size="13pt" fo:font-weight="normal" officeooo:rsid="014fb68a" style:font-size-asian="13pt" style:font-weight-asian="normal" style:font-size-complex="13pt" style:font-weight-complex="normal"/>
    </style:style>
    <style:style style:name="T541" style:family="text">
      <style:text-properties style:use-window-font-color="true" loext:opacity="0%" fo:font-size="13pt" fo:font-weight="normal" officeooo:rsid="0d6788fe" style:font-size-asian="13pt" style:font-weight-asian="normal" style:font-size-complex="13pt" style:font-weight-complex="normal"/>
    </style:style>
    <style:style style:name="T542" style:family="text">
      <style:text-properties style:use-window-font-color="true" loext:opacity="0%" fo:font-size="13pt" fo:font-weight="normal" officeooo:rsid="033f59ca" style:font-size-asian="13pt" style:font-weight-asian="normal" style:font-size-complex="13pt" style:font-weight-complex="normal"/>
    </style:style>
    <style:style style:name="T543" style:family="text">
      <style:text-properties style:use-window-font-color="true" loext:opacity="0%" fo:font-family="Courier" style:font-family-generic="modern" style:font-pitch="fixed" fo:font-size="13pt" fo:font-weight="normal" officeooo:rsid="014fb68a" style:font-size-asian="13pt" style:font-weight-asian="normal" style:font-size-complex="13pt" style:font-weight-complex="normal"/>
    </style:style>
    <style:style style:name="T544" style:family="text">
      <style:text-properties style:use-window-font-color="true" loext:opacity="0%" fo:font-family="Courier" style:font-family-generic="modern" style:font-pitch="fixed" fo:font-size="13pt" fo:font-weight="normal" officeooo:rsid="033f59ca" style:font-size-asian="13pt" style:font-weight-asian="normal" style:font-size-complex="13pt" style:font-weight-complex="normal"/>
    </style:style>
    <style:style style:name="T545" style:family="text">
      <style:text-properties fo:font-size="13pt" fo:font-weight="normal" officeooo:rsid="03f8cde5" style:font-size-asian="13pt" style:font-weight-asian="normal" style:font-size-complex="13pt" style:font-weight-complex="normal"/>
    </style:style>
    <style:style style:name="T546" style:family="text">
      <style:text-properties fo:font-size="13pt" fo:font-weight="normal" officeooo:rsid="04356ea4" style:font-size-asian="13pt" style:font-weight-asian="normal" style:font-size-complex="13pt" style:font-weight-complex="normal"/>
    </style:style>
    <style:style style:name="T547" style:family="text">
      <style:text-properties fo:font-size="13pt" fo:font-weight="normal" officeooo:rsid="04704c88" style:font-size-asian="13pt" style:font-weight-asian="normal" style:font-size-complex="13pt" style:font-weight-complex="normal"/>
    </style:style>
    <style:style style:name="T548" style:family="text">
      <style:text-properties fo:font-size="13pt" fo:font-weight="normal" officeooo:rsid="0474bcc3" style:font-size-asian="13pt" style:font-weight-asian="normal" style:font-size-complex="13pt" style:font-weight-complex="normal"/>
    </style:style>
    <style:style style:name="T549" style:family="text">
      <style:text-properties fo:font-size="13pt" fo:font-weight="normal" officeooo:rsid="045a9dda" style:font-size-asian="13pt" style:font-weight-asian="normal" style:font-size-complex="13pt" style:font-weight-complex="normal"/>
    </style:style>
    <style:style style:name="T550" style:family="text">
      <style:text-properties fo:font-size="13pt" fo:font-weight="normal" officeooo:rsid="04b4df36" style:font-size-asian="13pt" style:font-weight-asian="normal" style:font-size-complex="13pt" style:font-weight-complex="normal"/>
    </style:style>
    <style:style style:name="T551" style:family="text">
      <style:text-properties style:use-window-font-color="true" loext:opacity="0%" style:font-name="Liberation Serif" fo:font-size="13pt" fo:font-weight="normal" officeooo:rsid="01fe0cb9" style:font-size-asian="13pt" style:font-weight-asian="normal" style:font-size-complex="13pt" style:font-weight-complex="normal"/>
    </style:style>
    <style:style style:name="T552" style:family="text">
      <style:text-properties style:use-window-font-color="true" loext:opacity="0%" style:font-name="Liberation Serif" fo:font-size="13pt" fo:font-weight="normal" officeooo:rsid="0634b71e" style:font-size-asian="13pt" style:font-weight-asian="normal" style:font-size-complex="13pt" style:font-weight-complex="normal"/>
    </style:style>
    <style:style style:name="T553" style:family="text">
      <style:text-properties style:use-window-font-color="true" loext:opacity="0%" fo:font-family="Courier" style:font-family-generic="modern" style:font-pitch="fixed" fo:font-size="13pt" fo:font-weight="normal" officeooo:rsid="060fb7bd" style:font-size-asian="13pt" style:font-weight-asian="normal" style:font-size-complex="13pt" style:font-weight-complex="normal"/>
    </style:style>
    <style:style style:name="T554" style:family="text">
      <style:text-properties fo:font-size="13pt" fo:font-weight="normal" officeooo:rsid="0634b71e" style:font-size-asian="13pt" style:font-weight-asian="normal" style:font-size-complex="13pt" style:font-weight-complex="normal"/>
    </style:style>
    <style:style style:name="T555" style:family="text">
      <style:text-properties fo:font-size="13pt" fo:font-weight="normal" officeooo:rsid="05b550d4" style:font-size-asian="13pt" style:font-weight-asian="normal" style:font-size-complex="13pt" style:font-weight-complex="normal"/>
    </style:style>
    <style:style style:name="T556" style:family="text">
      <style:text-properties fo:font-size="13pt" fo:font-weight="normal" officeooo:rsid="064c0b8d" style:font-size-asian="13pt" style:font-weight-asian="normal" style:font-size-complex="13pt" style:font-weight-complex="normal"/>
    </style:style>
    <style:style style:name="T557" style:family="text">
      <style:text-properties fo:font-size="13pt" fo:font-weight="normal" officeooo:rsid="0712497a" style:font-size-asian="13pt" style:font-weight-asian="normal" style:font-size-complex="13pt" style:font-weight-complex="normal"/>
    </style:style>
    <style:style style:name="T558" style:family="text">
      <style:text-properties style:use-window-font-color="true" loext:opacity="0%" style:font-name="Liberation Serif" fo:font-size="13pt" fo:font-weight="normal" officeooo:rsid="02a1a47b" style:font-size-asian="13pt" style:font-weight-asian="normal" style:font-size-complex="13pt" style:font-weight-complex="normal"/>
    </style:style>
    <style:style style:name="T559" style:family="text">
      <style:text-properties style:use-window-font-color="true" loext:opacity="0%" style:font-name="Liberation Serif" fo:font-size="13pt" fo:font-weight="normal" officeooo:rsid="07859e8c" style:font-size-asian="13pt" style:font-weight-asian="normal" style:font-size-complex="13pt" style:font-weight-complex="normal"/>
    </style:style>
    <style:style style:name="T560" style:family="text">
      <style:text-properties style:use-window-font-color="true" loext:opacity="0%" style:font-name="Liberation Serif" fo:font-size="13pt" fo:font-weight="normal" officeooo:rsid="07144a15" style:font-size-asian="13pt" style:font-weight-asian="normal" style:font-size-complex="13pt" style:font-weight-complex="normal"/>
    </style:style>
    <style:style style:name="T561" style:family="text">
      <style:text-properties style:use-window-font-color="true" loext:opacity="0%" style:font-name="Liberation Serif" fo:font-size="13pt" fo:font-weight="normal" officeooo:rsid="07149684" style:font-size-asian="13pt" style:font-weight-asian="normal" style:font-size-complex="13pt" style:font-weight-complex="normal"/>
    </style:style>
    <style:style style:name="T562" style:family="text">
      <style:text-properties style:use-window-font-color="true" loext:opacity="0%" style:font-name="Liberation Serif" fo:font-size="13pt" fo:font-weight="normal" officeooo:rsid="0787281f" style:font-size-asian="13pt" style:font-weight-asian="normal" style:font-size-complex="13pt" style:font-weight-complex="normal"/>
    </style:style>
    <style:style style:name="T563" style:family="text">
      <style:text-properties fo:font-size="13pt" fo:font-weight="normal" officeooo:rsid="078aa5bb" style:font-size-asian="13pt" style:font-weight-asian="normal" style:font-size-complex="13pt" style:font-weight-complex="normal"/>
    </style:style>
    <style:style style:name="T564" style:family="text">
      <style:text-properties fo:font-size="13pt" fo:font-weight="normal" officeooo:rsid="07fc7058" style:font-size-asian="13pt" style:font-weight-asian="normal" style:font-size-complex="13pt" style:font-weight-complex="normal"/>
    </style:style>
    <style:style style:name="T565" style:family="text">
      <style:text-properties style:use-window-font-color="true" loext:opacity="0%" fo:font-size="13pt" fo:font-weight="normal" officeooo:rsid="07c7d7d9" style:font-size-asian="13pt" style:font-weight-asian="normal" style:font-size-complex="13pt" style:font-weight-complex="normal"/>
    </style:style>
    <style:style style:name="T566" style:family="text">
      <style:text-properties style:use-window-font-color="true" loext:opacity="0%" fo:font-size="13pt" fo:font-weight="normal" officeooo:rsid="08468d70" style:font-size-asian="13pt" style:font-weight-asian="normal" style:font-size-complex="13pt" style:font-weight-complex="normal"/>
    </style:style>
    <style:style style:name="T567" style:family="text">
      <style:text-properties style:use-window-font-color="true" loext:opacity="0%" fo:font-size="13pt" fo:font-weight="normal" officeooo:rsid="0809a0b3" style:font-size-asian="13pt" style:font-weight-asian="normal" style:font-size-complex="13pt" style:font-weight-complex="normal"/>
    </style:style>
    <style:style style:name="T568" style:family="text">
      <style:text-properties style:use-window-font-color="true" loext:opacity="0%" fo:font-family="Courier" style:font-family-generic="modern" style:font-pitch="fixed" fo:font-size="13pt" fo:font-weight="normal" officeooo:rsid="08468d70" style:font-size-asian="13pt" style:font-weight-asian="normal" style:font-size-complex="13pt" style:font-weight-complex="normal"/>
    </style:style>
    <style:style style:name="T569" style:family="text">
      <style:text-properties style:use-window-font-color="true" loext:opacity="0%" fo:font-family="Courier" style:font-family-generic="modern" style:font-pitch="fixed" fo:font-size="13pt" fo:font-weight="normal" officeooo:rsid="08488214" style:font-size-asian="13pt" style:font-weight-asian="normal" style:font-size-complex="13pt" style:font-weight-complex="normal"/>
    </style:style>
    <style:style style:name="T570" style:family="text">
      <style:text-properties style:use-window-font-color="true" loext:opacity="0%" officeooo:rsid="07c7d7d9"/>
    </style:style>
    <style:style style:name="T571" style:family="text">
      <style:text-properties style:use-window-font-color="true" loext:opacity="0%" officeooo:rsid="085b7131"/>
    </style:style>
    <style:style style:name="T572" style:family="text">
      <style:text-properties style:use-window-font-color="true" loext:opacity="0%" officeooo:rsid="0809a0b3"/>
    </style:style>
    <style:style style:name="T573" style:family="text">
      <style:text-properties style:use-window-font-color="true" loext:opacity="0%" fo:font-family="Courier" style:font-family-generic="modern" style:font-pitch="fixed" officeooo:rsid="085b7131"/>
    </style:style>
    <style:style style:name="T574" style:family="text">
      <style:text-properties officeooo:rsid="07c7d7d9"/>
    </style:style>
    <style:style style:name="T575" style:family="text">
      <style:text-properties officeooo:rsid="08885293"/>
    </style:style>
    <style:style style:name="T576" style:family="text">
      <style:text-properties officeooo:rsid="0809a0b3"/>
    </style:style>
    <style:style style:name="T577" style:family="text">
      <style:text-properties fo:font-family="Courier" style:font-family-generic="modern" style:font-pitch="fixed" officeooo:rsid="08885293"/>
    </style:style>
    <style:style style:name="T578" style:family="text">
      <style:text-properties fo:font-size="13pt" fo:font-weight="normal" officeooo:rsid="08885293" style:font-size-asian="13pt" style:font-weight-asian="normal" style:font-size-complex="13pt" style:font-weight-complex="normal"/>
    </style:style>
    <style:style style:name="T579" style:family="text">
      <style:text-properties fo:font-size="13pt" fo:font-weight="normal" officeooo:rsid="08ebbca1" style:font-size-asian="13pt" style:font-weight-asian="normal" style:font-size-complex="13pt" style:font-weight-complex="normal"/>
    </style:style>
    <style:style style:name="T580" style:family="text">
      <style:text-properties fo:font-family="Courier" style:font-family-generic="modern" style:font-pitch="fixed" fo:font-size="13pt" fo:font-weight="normal" officeooo:rsid="08885293" style:font-size-asian="13pt" style:font-weight-asian="normal" style:font-size-complex="13pt" style:font-weight-complex="normal"/>
    </style:style>
    <style:style style:name="T581" style:family="text">
      <style:text-properties fo:font-family="Courier" style:font-family-generic="modern" style:font-pitch="fixed" fo:font-size="13pt" fo:font-weight="normal" officeooo:rsid="08e247f7" style:font-size-asian="13pt" style:font-weight-asian="normal" style:font-size-complex="13pt" style:font-weight-complex="normal"/>
    </style:style>
    <style:style style:name="T582" style:family="text">
      <style:text-properties fo:font-size="13pt" fo:font-weight="normal" officeooo:rsid="08e247f7" style:font-size-asian="13pt" style:font-weight-asian="normal" style:font-size-complex="13pt" style:font-weight-complex="normal"/>
    </style:style>
    <style:style style:name="T583" style:family="text">
      <style:text-properties fo:font-family="Courier" style:font-family-generic="modern" style:font-pitch="fixed" fo:font-size="13pt" fo:font-weight="normal" officeooo:rsid="08ebbca1" style:font-size-asian="13pt" style:font-weight-asian="normal" style:font-size-complex="13pt" style:font-weight-complex="normal"/>
    </style:style>
    <style:style style:name="T584" style:family="text">
      <style:text-properties fo:font-size="13pt" fo:font-weight="normal" officeooo:rsid="08ebcc25" style:font-size-asian="13pt" style:font-weight-asian="normal" style:font-size-complex="13pt" style:font-weight-complex="normal"/>
    </style:style>
    <style:style style:name="T585" style:family="text">
      <style:text-properties fo:font-size="13pt" fo:font-weight="normal" officeooo:rsid="08904239" style:font-size-asian="13pt" style:font-weight-asian="normal" style:font-size-complex="13pt" style:font-weight-complex="normal"/>
    </style:style>
    <style:style style:name="T586" style:family="text">
      <style:text-properties fo:font-size="13pt" fo:font-weight="normal" officeooo:rsid="08fa6f82" style:font-size-asian="13pt" style:font-weight-asian="normal" style:font-size-complex="13pt" style:font-weight-complex="normal"/>
    </style:style>
    <style:style style:name="T587" style:family="text">
      <style:text-properties fo:font-size="13pt" fo:font-weight="normal" officeooo:rsid="09140800" style:font-size-asian="13pt" style:font-weight-asian="normal" style:font-size-complex="13pt" style:font-weight-complex="normal"/>
    </style:style>
    <style:style style:name="T588" style:family="text">
      <style:text-properties fo:font-family="Courier" style:font-family-generic="modern" style:font-pitch="fixed" fo:font-size="13pt" fo:font-weight="normal" officeooo:rsid="09211f6d" style:font-size-asian="13pt" style:font-weight-asian="normal" style:font-size-complex="13pt" style:font-weight-complex="normal"/>
    </style:style>
    <style:style style:name="T589" style:family="text">
      <style:text-properties fo:font-family="Courier" style:font-family-generic="modern" style:font-pitch="fixed" fo:font-size="13pt" fo:font-weight="normal" officeooo:rsid="0919c9db" style:font-size-asian="13pt" style:font-weight-asian="normal" style:font-size-complex="13pt" style:font-weight-complex="normal"/>
    </style:style>
    <style:style style:name="T590" style:family="text">
      <style:text-properties officeooo:rsid="08ebcc25"/>
    </style:style>
    <style:style style:name="T591" style:family="text">
      <style:text-properties officeooo:rsid="09140800"/>
    </style:style>
    <style:style style:name="T592" style:family="text">
      <style:text-properties officeooo:rsid="09042dd4"/>
    </style:style>
    <style:style style:name="T593" style:family="text">
      <style:text-properties officeooo:rsid="0d6788fe"/>
    </style:style>
    <style:style style:name="T594" style:family="text">
      <style:text-properties officeooo:rsid="08904239"/>
    </style:style>
    <style:style style:name="T595" style:family="text">
      <style:text-properties fo:font-family="Courier" style:font-family-generic="modern" style:font-pitch="fixed" officeooo:rsid="09042dd4"/>
    </style:style>
    <style:style style:name="T596" style:family="text">
      <style:text-properties fo:font-size="13pt" fo:font-weight="normal" officeooo:rsid="09042dd4" style:font-size-asian="13pt" style:font-weight-asian="normal" style:font-size-complex="13pt" style:font-weight-complex="normal"/>
    </style:style>
    <style:style style:name="T597" style:family="text">
      <style:text-properties fo:font-family="Courier" style:font-family-generic="modern" style:font-pitch="fixed" fo:font-size="13pt" fo:font-weight="normal" officeooo:rsid="09042dd4" style:font-size-asian="13pt" style:font-weight-asian="normal" style:font-size-complex="13pt" style:font-weight-complex="normal"/>
    </style:style>
    <style:style style:name="T598" style:family="text">
      <style:text-properties officeooo:rsid="094d63ad"/>
    </style:style>
    <style:style style:name="T599" style:family="text">
      <style:text-properties fo:font-family="Courier" style:font-family-generic="modern" style:font-pitch="fixed" officeooo:rsid="092524a0"/>
    </style:style>
    <style:style style:name="T600" style:family="text">
      <style:text-properties fo:font-family="Courier" style:font-family-generic="modern" style:font-pitch="fixed" officeooo:rsid="094d63ad"/>
    </style:style>
    <style:style style:name="T601" style:family="text">
      <style:text-properties officeooo:rsid="098e363e"/>
    </style:style>
    <style:style style:name="T602" style:family="text">
      <style:text-properties officeooo:rsid="097a24a1"/>
    </style:style>
    <style:style style:name="T603" style:family="text">
      <style:text-properties fo:font-weight="normal" officeooo:rsid="097a24a1" style:font-weight-asian="normal" style:font-weight-complex="normal"/>
    </style:style>
    <style:style style:name="T604" style:family="text">
      <style:text-properties fo:font-weight="normal" officeooo:rsid="097fe33b" style:font-weight-asian="normal" style:font-weight-complex="normal"/>
    </style:style>
    <style:style style:name="T605" style:family="text">
      <style:text-properties fo:font-size="13pt" fo:font-weight="normal" officeooo:rsid="098e363e" style:font-size-asian="13pt" style:font-weight-asian="normal" style:font-size-complex="13pt" style:font-weight-complex="normal"/>
    </style:style>
    <style:style style:name="T606" style:family="text">
      <style:text-properties fo:font-size="13pt" fo:font-weight="normal" officeooo:rsid="09ccd5c2" style:font-size-asian="13pt" style:font-weight-asian="normal" style:font-size-complex="13pt" style:font-weight-complex="normal"/>
    </style:style>
    <style:style style:name="T607" style:family="text">
      <style:text-properties officeooo:rsid="09cb8809"/>
    </style:style>
    <style:style style:name="T608" style:family="text">
      <style:text-properties fo:font-family="Courier" style:font-family-generic="modern" style:font-pitch="fixed" officeooo:rsid="097fe33b"/>
    </style:style>
    <style:style style:name="T609" style:family="text">
      <style:text-properties fo:font-family="Courier" style:font-family-generic="modern" style:font-pitch="fixed" officeooo:rsid="09cb8809"/>
    </style:style>
    <style:style style:name="T610" style:family="text">
      <style:text-properties fo:font-size="13pt" fo:font-weight="normal" officeooo:rsid="09ce7a96" style:font-size-asian="13pt" style:font-weight-asian="normal" style:font-size-complex="13pt" style:font-weight-complex="normal"/>
    </style:style>
    <style:style style:name="T611" style:family="text">
      <style:text-properties fo:font-size="13pt" fo:font-weight="normal" officeooo:rsid="09ee1102" style:font-size-asian="13pt" style:font-weight-asian="normal" style:font-size-complex="13pt" style:font-weight-complex="normal"/>
    </style:style>
    <style:style style:name="T612" style:family="text">
      <style:text-properties fo:font-family="Courier" style:font-family-generic="modern" style:font-pitch="fixed" fo:font-size="13pt" fo:font-weight="normal" officeooo:rsid="09cb8809" style:font-size-asian="13pt" style:font-weight-asian="normal" style:font-size-complex="13pt" style:font-weight-complex="normal"/>
    </style:style>
    <style:style style:name="T613" style:family="text">
      <style:text-properties fo:font-size="13pt" fo:font-weight="normal" officeooo:rsid="09c5238a" style:font-size-asian="13pt" style:font-weight-asian="normal" style:font-size-complex="13pt" style:font-weight-complex="normal"/>
    </style:style>
    <style:style style:name="T614" style:family="text">
      <style:text-properties fo:font-size="13pt" fo:font-weight="normal" officeooo:rsid="09c7f084" style:font-size-asian="13pt" style:font-weight-asian="normal" style:font-size-complex="13pt" style:font-weight-complex="normal"/>
    </style:style>
    <style:style style:name="T615" style:family="text">
      <style:text-properties fo:font-size="13pt" fo:font-weight="normal" officeooo:rsid="09c3b51b" style:font-size-asian="13pt" style:font-weight-asian="normal" style:font-size-complex="13pt" style:font-weight-complex="normal"/>
    </style:style>
    <style:style style:name="T616" style:family="text">
      <style:text-properties fo:font-family="Courier" style:font-family-generic="modern" style:font-pitch="fixed" fo:font-size="13pt" fo:font-weight="normal" officeooo:rsid="09c9e7ef" style:font-size-asian="13pt" style:font-weight-asian="normal" style:font-size-complex="13pt" style:font-weight-complex="normal"/>
    </style:style>
    <style:style style:name="T617" style:family="text">
      <style:text-properties fo:font-size="13pt" fo:font-weight="normal" officeooo:rsid="09c71189" style:font-size-asian="13pt" style:font-weight-asian="normal" style:font-size-complex="13pt" style:font-weight-complex="normal"/>
    </style:style>
    <style:style style:name="T618" style:family="text">
      <style:text-properties fo:font-size="13pt" fo:font-weight="normal" officeooo:rsid="0d6a1e51" style:font-size-asian="13pt" style:font-weight-asian="normal" style:font-size-complex="13pt" style:font-weight-complex="normal"/>
    </style:style>
    <style:style style:name="T619" style:family="text">
      <style:text-properties fo:font-size="13pt" fo:font-weight="normal" officeooo:rsid="0a6ff7e2" style:font-size-asian="13pt" style:font-weight-asian="normal" style:font-size-complex="13pt" style:font-weight-complex="normal"/>
    </style:style>
    <style:style style:name="T620" style:family="text">
      <style:text-properties fo:font-size="13pt" fo:font-weight="normal" officeooo:rsid="0a8490f2" style:font-size-asian="13pt" style:font-weight-asian="normal" style:font-size-complex="13pt" style:font-weight-complex="normal"/>
    </style:style>
    <style:style style:name="T621" style:family="text">
      <style:text-properties fo:font-family="Courier" style:font-family-generic="modern" style:font-pitch="fixed" fo:font-size="13pt" fo:font-weight="normal" officeooo:rsid="0a8490f2" style:font-size-asian="13pt" style:font-weight-asian="normal" style:font-size-complex="13pt" style:font-weight-complex="normal"/>
    </style:style>
    <style:style style:name="T622" style:family="text">
      <style:text-properties officeooo:rsid="09c71189"/>
    </style:style>
    <style:style style:name="T623" style:family="text">
      <style:text-properties officeooo:rsid="006bb723"/>
    </style:style>
    <style:style style:name="T624" style:family="text">
      <style:text-properties style:use-window-font-color="true" loext:opacity="0%" officeooo:rsid="052baf14"/>
    </style:style>
    <style:style style:name="T625" style:family="text">
      <style:text-properties style:use-window-font-color="true" loext:opacity="0%" officeooo:rsid="0bd69f2b"/>
    </style:style>
    <style:style style:name="T626" style:family="text">
      <style:text-properties style:use-window-font-color="true" loext:opacity="0%" fo:font-family="Courier" style:font-family-generic="modern" style:font-pitch="fixed" officeooo:rsid="052baf14"/>
    </style:style>
    <style:style style:name="T627" style:family="text">
      <style:text-properties style:use-window-font-color="true" loext:opacity="0%" officeooo:rsid="0ab79033"/>
    </style:style>
    <style:style style:name="T628" style:family="text">
      <style:text-properties officeooo:rsid="00064ed3"/>
    </style:style>
    <style:style style:name="T629" style:family="text">
      <style:text-properties fo:font-family="Courier" style:font-family-generic="modern" style:font-pitch="fixed" officeooo:rsid="0ab79033"/>
    </style:style>
    <style:style style:name="T630" style:family="text">
      <style:text-properties fo:font-family="Courier" style:font-family-generic="modern" style:font-pitch="fixed" officeooo:rsid="0ab90c98"/>
    </style:style>
    <style:style style:name="T631" style:family="text">
      <style:text-properties style:use-window-font-color="true" loext:opacity="0%" fo:font-size="13pt" fo:font-weight="normal" officeooo:rsid="052baf14" style:font-size-asian="13pt" style:font-weight-asian="normal" style:font-size-complex="13pt" style:font-weight-complex="normal"/>
    </style:style>
    <style:style style:name="T632" style:family="text">
      <style:text-properties style:use-window-font-color="true" loext:opacity="0%" fo:font-size="13pt" fo:font-weight="normal" officeooo:rsid="0bd69f2b" style:font-size-asian="13pt" style:font-weight-asian="normal" style:font-size-complex="13pt" style:font-weight-complex="normal"/>
    </style:style>
    <style:style style:name="T633" style:family="text">
      <style:text-properties style:use-window-font-color="true" loext:opacity="0%" fo:font-size="13pt" fo:font-weight="normal" officeooo:rsid="0ac2672e" style:font-size-asian="13pt" style:font-weight-asian="normal" style:font-size-complex="13pt" style:font-weight-complex="normal"/>
    </style:style>
    <style:style style:name="T634" style:family="text">
      <style:text-properties style:use-window-font-color="true" loext:opacity="0%" fo:font-size="13pt" fo:font-weight="normal" officeooo:rsid="0ac0eedd" style:font-size-asian="13pt" style:font-weight-asian="normal" style:font-size-complex="13pt" style:font-weight-complex="normal"/>
    </style:style>
    <style:style style:name="T635" style:family="text">
      <style:text-properties fo:font-size="13pt" fo:font-weight="normal" officeooo:rsid="00064ed3" style:font-size-asian="13pt" style:font-weight-asian="normal" style:font-size-complex="13pt" style:font-weight-complex="normal"/>
    </style:style>
    <style:style style:name="T636" style:family="text">
      <style:text-properties fo:font-size="13pt" fo:font-weight="normal" officeooo:rsid="0ac0eedd" style:font-size-asian="13pt" style:font-weight-asian="normal" style:font-size-complex="13pt" style:font-weight-complex="normal"/>
    </style:style>
    <style:style style:name="T637" style:family="text">
      <style:text-properties fo:font-family="Courier" style:font-family-generic="modern" style:font-pitch="fixed" fo:font-size="13pt" fo:font-weight="normal" officeooo:rsid="0ab90c98" style:font-size-asian="13pt" style:font-weight-asian="normal" style:font-size-complex="13pt" style:font-weight-complex="normal"/>
    </style:style>
    <style:style style:name="T638" style:family="text">
      <style:text-properties fo:font-family="Courier" style:font-family-generic="modern" style:font-pitch="fixed" fo:font-size="13pt" fo:font-weight="normal" officeooo:rsid="0ac2672e" style:font-size-asian="13pt" style:font-weight-asian="normal" style:font-size-complex="13pt" style:font-weight-complex="normal"/>
    </style:style>
    <style:style style:name="T639" style:family="text">
      <style:text-properties fo:font-family="Courier" style:font-family-generic="modern" style:font-pitch="fixed" fo:font-size="13pt" fo:font-weight="normal" officeooo:rsid="0c92c8fd" style:font-size-asian="13pt" style:font-weight-asian="normal" style:font-size-complex="13pt" style:font-weight-complex="normal"/>
    </style:style>
    <style:style style:name="T640" style:family="text">
      <style:text-properties style:use-window-font-color="true" loext:opacity="0%" fo:font-size="13pt" fo:font-weight="normal" officeooo:rsid="0af7d8f8" style:font-size-asian="13pt" style:font-weight-asian="normal" style:font-size-complex="13pt" style:font-weight-complex="normal"/>
    </style:style>
    <style:style style:name="T641" style:family="text">
      <style:text-properties style:use-window-font-color="true" loext:opacity="0%" fo:font-size="13pt" fo:font-weight="normal" officeooo:rsid="0ae44914" style:font-size-asian="13pt" style:font-weight-asian="normal" style:font-size-complex="13pt" style:font-weight-complex="normal"/>
    </style:style>
    <style:style style:name="T642" style:family="text">
      <style:text-properties fo:font-family="Courier" style:font-family-generic="modern" style:font-pitch="fixed" fo:font-size="13pt" fo:font-weight="normal" officeooo:rsid="0ae44914" style:font-size-asian="13pt" style:font-weight-asian="normal" style:font-size-complex="13pt" style:font-weight-complex="normal"/>
    </style:style>
    <style:style style:name="T643" style:family="text">
      <style:text-properties fo:font-family="Courier" style:font-family-generic="modern" style:font-pitch="fixed" fo:font-size="13pt" fo:font-weight="normal" officeooo:rsid="0ae49cca" style:font-size-asian="13pt" style:font-weight-asian="normal" style:font-size-complex="13pt" style:font-weight-complex="normal"/>
    </style:style>
    <style:style style:name="T644" style:family="text">
      <style:text-properties fo:font-size="13pt" fo:font-weight="normal" officeooo:rsid="0bd69f2b" style:font-size-asian="13pt" style:font-weight-asian="normal" style:font-size-complex="13pt" style:font-weight-complex="normal"/>
    </style:style>
    <style:style style:name="T645" style:family="text">
      <style:text-properties style:use-window-font-color="true" loext:opacity="0%" officeooo:rsid="0ae44914"/>
    </style:style>
    <style:style style:name="T646" style:family="text">
      <style:text-properties style:use-window-font-color="true" loext:opacity="0%" officeooo:rsid="0b4c7da5"/>
    </style:style>
    <style:style style:name="T647" style:family="text">
      <style:text-properties style:use-window-font-color="true" loext:opacity="0%" officeooo:rsid="0d6788fe"/>
    </style:style>
    <style:style style:name="T648" style:family="text">
      <style:text-properties style:use-window-font-color="true" loext:opacity="0%" fo:font-family="Courier" style:font-family-generic="modern" style:font-pitch="fixed" officeooo:rsid="0af7d8f8"/>
    </style:style>
    <style:style style:name="T649" style:family="text">
      <style:text-properties style:use-window-font-color="true" loext:opacity="0%" fo:font-family="Courier" style:font-family-generic="modern" style:font-pitch="fixed" officeooo:rsid="0b4c7da5"/>
    </style:style>
    <style:style style:name="T650" style:family="text">
      <style:text-properties style:use-window-font-color="true" loext:opacity="0%" officeooo:rsid="0af7d8f8"/>
    </style:style>
    <style:style style:name="T651" style:family="text">
      <style:text-properties style:use-window-font-color="true" loext:opacity="0%" fo:font-size="13pt" fo:font-weight="normal" officeooo:rsid="0b88cc35" style:font-size-asian="13pt" style:font-weight-asian="normal" style:font-size-complex="13pt" style:font-weight-complex="normal"/>
    </style:style>
    <style:style style:name="T652" style:family="text">
      <style:text-properties style:use-window-font-color="true" loext:opacity="0%" fo:font-size="13pt" fo:font-weight="normal" officeooo:rsid="0b4c7da5" style:font-size-asian="13pt" style:font-weight-asian="normal" style:font-size-complex="13pt" style:font-weight-complex="normal"/>
    </style:style>
    <style:style style:name="T653" style:family="text">
      <style:text-properties style:use-window-font-color="true" loext:opacity="0%" fo:font-family="Courier" style:font-family-generic="modern" style:font-pitch="fixed" fo:font-size="13pt" fo:font-weight="normal" officeooo:rsid="0af7d8f8" style:font-size-asian="13pt" style:font-weight-asian="normal" style:font-size-complex="13pt" style:font-weight-complex="normal"/>
    </style:style>
    <style:style style:name="T654" style:family="text">
      <style:text-properties style:use-window-font-color="true" loext:opacity="0%" fo:font-family="Courier" style:font-family-generic="modern" style:font-pitch="fixed" fo:font-size="13pt" fo:font-weight="normal" officeooo:rsid="0b88cc35" style:font-size-asian="13pt" style:font-weight-asian="normal" style:font-size-complex="13pt" style:font-weight-complex="normal"/>
    </style:style>
    <style:style style:name="T655" style:family="text">
      <style:text-properties officeooo:rsid="0bd69f2b"/>
    </style:style>
    <style:style style:name="T656" style:family="text">
      <style:text-properties officeooo:rsid="0b9efa32"/>
    </style:style>
    <style:style style:name="T657" style:family="text">
      <style:text-properties style:use-window-font-color="true" loext:opacity="0%" fo:font-size="13pt" fo:font-weight="normal" officeooo:rsid="0b9d1b1b" style:font-size-asian="13pt" style:font-weight-asian="normal" style:font-size-complex="13pt" style:font-weight-complex="normal"/>
    </style:style>
    <style:style style:name="T658" style:family="text">
      <style:text-properties style:use-window-font-color="true" loext:opacity="0%" fo:font-size="13pt" fo:font-weight="normal" officeooo:rsid="0bf57559" style:font-size-asian="13pt" style:font-weight-asian="normal" style:font-size-complex="13pt" style:font-weight-complex="normal"/>
    </style:style>
    <style:style style:name="T659" style:family="text">
      <style:text-properties style:use-window-font-color="true" loext:opacity="0%" fo:font-family="Courier" style:font-family-generic="modern" style:font-pitch="fixed" fo:font-size="13pt" fo:font-weight="normal" officeooo:rsid="0b9d1b1b" style:font-size-asian="13pt" style:font-weight-asian="normal" style:font-size-complex="13pt" style:font-weight-complex="normal"/>
    </style:style>
    <style:style style:name="T660" style:family="text">
      <style:text-properties officeooo:rsid="0c28311d"/>
    </style:style>
    <style:style style:name="T661" style:family="text">
      <style:text-properties officeooo:rsid="0ca69737"/>
    </style:style>
    <style:style style:name="T662" style:family="text">
      <style:text-properties officeooo:rsid="0c2ddbb8"/>
    </style:style>
    <style:style style:name="T663" style:family="text">
      <style:text-properties style:use-window-font-color="true" loext:opacity="0%" fo:font-size="13pt" fo:font-weight="normal" officeooo:rsid="0b9efa32" style:font-size-asian="13pt" style:font-weight-asian="normal" style:font-size-complex="13pt" style:font-weight-complex="normal"/>
    </style:style>
    <style:style style:name="T664" style:family="text">
      <style:text-properties style:use-window-font-color="true" loext:opacity="0%" fo:font-size="13pt" fo:font-weight="normal" officeooo:rsid="0ca69737" style:font-size-asian="13pt" style:font-weight-asian="normal" style:font-size-complex="13pt" style:font-weight-complex="normal"/>
    </style:style>
    <style:style style:name="T665" style:family="text">
      <style:text-properties style:use-window-font-color="true" loext:opacity="0%" fo:font-size="13pt" fo:font-weight="normal" officeooo:rsid="0c2ddbb8" style:font-size-asian="13pt" style:font-weight-asian="normal" style:font-size-complex="13pt" style:font-weight-complex="normal"/>
    </style:style>
    <style:style style:name="T666" style:family="text">
      <style:text-properties fo:font-family="Courier" style:font-family-generic="modern" style:font-pitch="fixed" fo:font-size="13pt" officeooo:rsid="0b9d1b1b" style:font-size-asian="11.3500003814697pt" style:font-size-complex="13pt"/>
    </style:style>
    <style:style style:name="T667" style:family="text">
      <style:text-properties officeooo:rsid="0c98db93"/>
    </style:style>
    <style:style style:name="T668" style:family="text">
      <style:text-properties style:use-window-font-color="true" loext:opacity="0%" fo:font-size="13pt" fo:font-weight="normal" officeooo:rsid="0c28311d" style:font-size-asian="13pt" style:font-weight-asian="normal" style:font-size-complex="13pt" style:font-weight-complex="normal"/>
    </style:style>
    <style:style style:name="T669" style:family="text">
      <style:text-properties style:use-window-font-color="true" loext:opacity="0%" fo:font-size="13pt" fo:font-weight="normal" officeooo:rsid="0c98db93" style:font-size-asian="13pt" style:font-weight-asian="normal" style:font-size-complex="13pt" style:font-weight-complex="normal"/>
    </style:style>
    <style:style style:name="T670" style:family="text">
      <style:text-properties officeooo:rsid="0d0709dc"/>
    </style:style>
    <style:style style:name="T671" style:family="text">
      <style:text-properties style:use-window-font-color="true" loext:opacity="0%" officeooo:rsid="0cfab8ec"/>
    </style:style>
    <style:style style:name="T672" style:family="text">
      <style:text-properties style:use-window-font-color="true" loext:opacity="0%" fo:font-weight="normal" officeooo:rsid="0cfab8ec" style:font-weight-asian="normal" style:font-weight-complex="normal"/>
    </style:style>
    <style:style style:name="T673" style:family="text">
      <style:text-properties fo:font-family="Courier" style:font-family-generic="modern" style:font-pitch="fixed" officeooo:rsid="0b9d1b1b"/>
    </style:style>
    <style:style style:name="T674" style:family="text">
      <style:text-properties style:use-window-font-color="true" loext:opacity="0%" style:font-name="Liberation Serif" fo:font-size="13pt" fo:font-weight="normal" officeooo:rsid="0cfab8ec" style:font-size-asian="13pt" style:font-weight-asian="normal" style:font-size-complex="13pt" style:font-weight-complex="normal"/>
    </style:style>
    <style:style style:name="T675" style:family="text">
      <style:text-properties style:use-window-font-color="true" loext:opacity="0%" style:font-name="Liberation Serif" fo:font-size="13pt" fo:font-weight="normal" officeooo:rsid="0d0551c3" style:font-size-asian="13pt" style:font-weight-asian="normal" style:font-size-complex="13pt" style:font-weight-complex="normal"/>
    </style:style>
    <style:style style:name="T676" style:family="text">
      <style:text-properties style:use-window-font-color="true" loext:opacity="0%" style:font-name="Liberation Serif" fo:font-size="13pt" fo:font-weight="normal" officeooo:rsid="0d185951" style:font-size-asian="13pt" style:font-weight-asian="normal" style:font-size-complex="13pt" style:font-weight-complex="normal"/>
    </style:style>
    <style:style style:name="T677" style:family="text">
      <style:text-properties style:use-window-font-color="true" loext:opacity="0%" fo:font-family="Courier" style:font-family-generic="modern" style:font-pitch="fixed" fo:font-size="13pt" fo:font-weight="normal" officeooo:rsid="0d094322" style:font-size-asian="13pt" style:font-weight-asian="normal" style:font-size-complex="13pt" style:font-weight-complex="normal"/>
    </style:style>
    <style:style style:name="T678" style:family="text">
      <style:text-properties style:use-window-font-color="true" loext:opacity="0%" style:font-name="Liberation Serif" fo:font-size="13pt" fo:font-weight="normal" officeooo:rsid="0d094322" style:font-size-asian="13pt" style:font-weight-asian="normal" style:font-size-complex="13pt" style:font-weight-complex="normal"/>
    </style:style>
    <style:style style:name="T679" style:family="text">
      <style:text-properties fo:font-family="Courier" style:font-family-generic="modern" style:font-pitch="fixed" fo:font-size="13pt" fo:font-weight="normal" officeooo:rsid="0b9d1b1b" style:font-size-asian="11.3500003814697pt" style:font-weight-asian="normal" style:font-size-complex="13pt" style:font-weight-complex="normal"/>
    </style:style>
    <style:style style:name="T680" style:family="text">
      <style:text-properties style:use-window-font-color="true" loext:opacity="0%" fo:font-size="13pt" fo:font-weight="normal" officeooo:rsid="0cfab8ec" style:font-size-asian="13pt" style:font-weight-asian="normal" style:font-size-complex="13pt" style:font-weight-complex="normal"/>
    </style:style>
    <style:style style:name="T681" style:family="text">
      <style:text-properties style:use-window-font-color="true" loext:opacity="0%" fo:font-size="13pt" fo:font-weight="normal" officeooo:rsid="0d094322" style:font-size-asian="13pt" style:font-weight-asian="normal" style:font-size-complex="13pt" style:font-weight-complex="normal"/>
    </style:style>
    <style:style style:name="T682" style:family="text">
      <style:text-properties style:use-window-font-color="true" loext:opacity="0%" fo:font-size="13pt" fo:font-weight="normal" officeooo:rsid="0d085950" style:font-size-asian="13pt" style:font-weight-asian="normal" style:font-size-complex="13pt" style:font-weight-complex="normal"/>
    </style:style>
    <style:style style:name="T683" style:family="text">
      <style:text-properties fo:font-family="Courier" style:font-family-generic="modern" style:font-pitch="fixed" fo:font-size="13pt" officeooo:rsid="0b9d1b1b" style:font-size-asian="13pt" style:font-size-complex="13pt"/>
    </style:style>
    <style:style style:name="T684" style:family="text">
      <style:text-properties fo:font-family="Courier" style:font-family-generic="modern" style:font-pitch="fixed" fo:font-size="13pt" officeooo:rsid="0d094322" style:font-size-asian="13pt" style:font-size-complex="13pt"/>
    </style:style>
    <style:style style:name="T685" style:family="text">
      <style:text-properties fo:font-style="normal" fo:font-weight="normal" officeooo:rsid="025ce238" style:font-style-asian="normal" style:font-weight-asian="normal" style:font-style-complex="normal" style:font-weight-complex="normal"/>
    </style:style>
    <style:style style:name="T686" style:family="text">
      <style:text-properties fo:font-style="normal" fo:font-weight="normal" officeooo:rsid="09c71189" style:font-style-asian="normal" style:font-weight-asian="normal" style:font-style-complex="normal" style:font-weight-complex="normal"/>
    </style:style>
    <style:style style:name="T687" style:family="text">
      <style:text-properties fo:font-style="normal" fo:font-weight="normal" officeooo:rsid="0405e429" style:font-style-asian="normal" style:font-weight-asian="normal" style:font-style-complex="normal" style:font-weight-complex="normal"/>
    </style:style>
    <style:style style:name="T688" style:family="text">
      <style:text-properties fo:font-style="normal" fo:font-weight="normal" officeooo:rsid="045f7d9d" style:font-style-asian="normal" style:font-weight-asian="normal" style:font-style-complex="normal" style:font-weight-complex="normal"/>
    </style:style>
    <style:style style:name="T689" style:family="text">
      <style:text-properties style:use-window-font-color="true" loext:opacity="0%" fo:font-size="13pt" fo:font-style="normal" fo:font-weight="normal" officeooo:rsid="059f3a87" style:font-size-asian="13pt" style:font-style-asian="normal" style:font-weight-asian="normal" style:font-size-complex="13pt" style:font-style-complex="normal" style:font-weight-complex="normal"/>
    </style:style>
    <style:style style:name="T690" style:family="text">
      <style:text-properties style:use-window-font-color="true" loext:opacity="0%" fo:font-size="13pt" fo:font-style="normal" fo:font-weight="normal" officeooo:rsid="02a1a47b" style:font-size-asian="13pt" style:font-style-asian="normal" style:font-weight-asian="normal" style:font-size-complex="13pt" style:font-style-complex="normal" style:font-weight-complex="normal"/>
    </style:style>
    <style:style style:name="T691" style:family="text">
      <style:text-properties style:use-window-font-color="true" loext:opacity="0%" fo:font-size="13pt" fo:font-style="normal" fo:font-weight="normal" officeooo:rsid="07891e70" style:font-size-asian="13pt" style:font-style-asian="normal" style:font-weight-asian="normal" style:font-size-complex="13pt" style:font-style-complex="normal" style:font-weight-complex="normal"/>
    </style:style>
    <style:style style:name="T692" style:family="text">
      <style:text-properties style:use-window-font-color="true" loext:opacity="0%" fo:font-family="Courier" style:font-family-generic="modern" style:font-pitch="fixed" fo:font-size="13pt" fo:font-style="normal" fo:font-weight="normal" officeooo:rsid="02a1a47b" style:font-size-asian="13pt" style:font-style-asian="normal" style:font-weight-asian="normal" style:font-size-complex="13pt" style:font-style-complex="normal" style:font-weight-complex="normal"/>
    </style:style>
    <style:style style:name="T693" style:family="text">
      <style:text-properties fo:font-size="13pt" fo:font-style="normal" fo:font-weight="normal" officeooo:rsid="001a636e" style:font-size-asian="13pt" style:font-style-asian="normal" style:font-weight-asian="normal" style:font-size-complex="13pt" style:font-style-complex="normal" style:font-weight-complex="normal"/>
    </style:style>
    <style:style style:name="T694" style:family="text">
      <style:text-properties fo:font-size="13pt" fo:font-style="normal" fo:font-weight="normal" officeooo:rsid="07891e70" style:font-size-asian="13pt" style:font-style-asian="normal" style:font-weight-asian="normal" style:font-size-complex="13pt" style:font-style-complex="normal" style:font-weight-complex="normal"/>
    </style:style>
    <style:style style:name="T695" style:family="text">
      <style:text-properties style:use-window-font-color="true" loext:opacity="0%" officeooo:rsid="05e95017"/>
    </style:style>
    <style:style style:name="T696" style:family="text">
      <style:text-properties style:use-window-font-color="true" loext:opacity="0%" officeooo:rsid="07891e70"/>
    </style:style>
    <style:style style:name="T697" style:family="text">
      <style:text-properties style:use-window-font-color="true" loext:opacity="0%" fo:font-family="Courier" style:font-family-generic="modern" style:font-pitch="fixed" officeooo:rsid="05e95017"/>
    </style:style>
    <style:style style:name="T698" style:family="text">
      <style:text-properties style:use-window-font-color="true" loext:opacity="0%" fo:font-style="normal" fo:font-weight="bold" officeooo:rsid="0704ad3c" style:font-style-asian="normal" style:font-weight-asian="bold" style:font-style-complex="normal" style:font-weight-complex="bold"/>
    </style:style>
    <style:style style:name="T699" style:family="text">
      <style:text-properties style:use-window-font-color="true" loext:opacity="0%" fo:font-style="normal" fo:font-weight="normal" officeooo:rsid="05e95017" style:font-style-asian="normal" style:font-weight-asian="normal" style:font-style-complex="normal" style:font-weight-complex="normal"/>
    </style:style>
    <style:style style:name="T700" style:family="text">
      <style:text-properties style:use-window-font-color="true" loext:opacity="0%" fo:font-style="normal" fo:font-weight="normal" officeooo:rsid="07891e70" style:font-style-asian="normal" style:font-weight-asian="normal" style:font-style-complex="normal" style:font-weight-complex="normal"/>
    </style:style>
    <style:style style:name="T701" style:family="text">
      <style:text-properties fo:font-size="13pt" fo:font-weight="bold" officeooo:rsid="0704ad3c" style:font-size-asian="13pt" style:font-weight-asian="bold" style:font-size-complex="13pt" style:font-weight-complex="bold"/>
    </style:style>
    <style:style style:name="T702" style:family="text">
      <style:text-properties fo:font-size="13pt" officeooo:rsid="07891e70" style:font-size-asian="13pt" style:font-size-complex="13pt"/>
    </style:style>
    <style:style style:name="T703" style:family="text">
      <style:text-properties fo:font-size="13pt" officeooo:rsid="0d593b64" style:font-size-asian="13pt" style:font-size-complex="13pt"/>
    </style:style>
    <style:style style:name="T704" style:family="text">
      <style:text-properties style:use-window-font-color="true" loext:opacity="0%" fo:font-family="Courier" style:font-family-generic="modern" style:font-pitch="fixed" fo:font-size="13pt" fo:font-style="normal" fo:font-weight="normal" officeooo:rsid="05e95017" style:font-size-asian="13pt" style:font-style-asian="normal" style:font-weight-asian="normal" style:font-size-complex="13pt" style:font-style-complex="normal" style:font-weight-complex="normal"/>
    </style:style>
    <style:style style:name="T705" style:family="text">
      <style:text-properties style:use-window-font-color="true" loext:opacity="0%" fo:font-size="13pt" fo:font-style="normal" fo:font-weight="normal" officeooo:rsid="05e95017" style:font-size-asian="13pt" style:font-style-asian="normal" style:font-weight-asian="normal" style:font-size-complex="13pt" style:font-style-complex="normal" style:font-weight-complex="normal"/>
    </style:style>
    <style:style style:name="T706" style:family="text">
      <style:text-properties style:use-window-font-color="true" loext:opacity="0%" fo:font-size="13pt" fo:font-style="normal" fo:font-weight="normal" officeooo:rsid="0d5c6edc" style:font-size-asian="13pt" style:font-style-asian="normal" style:font-weight-asian="normal" style:font-size-complex="13pt" style:font-style-complex="normal" style:font-weight-complex="normal"/>
    </style:style>
    <style:style style:name="T707" style:family="text">
      <style:text-properties style:use-window-font-color="true" loext:opacity="0%" fo:font-size="13pt" fo:font-weight="normal" officeooo:rsid="045a9dda" style:font-size-asian="13pt" style:font-weight-asian="normal" style:font-size-complex="13pt" style:font-weight-complex="normal"/>
    </style:style>
    <style:style style:name="T708" style:family="text">
      <style:text-properties style:use-window-font-color="true" loext:opacity="0%" fo:font-size="13pt" fo:font-weight="normal" officeooo:rsid="07891e70" style:font-size-asian="13pt" style:font-weight-asian="normal" style:font-size-complex="13pt" style:font-weight-complex="normal"/>
    </style:style>
    <style:style style:name="T709" style:family="text">
      <style:text-properties style:use-window-font-color="true" loext:opacity="0%" fo:font-size="13pt" fo:font-weight="normal" officeooo:rsid="071101c9" style:font-size-asian="13pt" style:font-weight-asian="normal" style:font-size-complex="13pt" style:font-weight-complex="normal"/>
    </style:style>
    <style:style style:name="T710" style:family="text">
      <style:text-properties style:use-window-font-color="true" loext:opacity="0%" fo:font-size="13pt" fo:font-weight="normal" officeooo:rsid="0d5c6edc" style:font-size-asian="13pt" style:font-weight-asian="normal" style:font-size-complex="13pt" style:font-weight-complex="normal"/>
    </style:style>
    <style:style style:name="T711" style:family="text">
      <style:text-properties style:font-name="Liberation Serif" fo:font-size="13pt" fo:font-weight="normal" officeooo:rsid="01fe0cb9" style:font-size-asian="13pt" style:font-weight-asian="normal" style:font-size-complex="13pt" style:font-weight-complex="normal"/>
    </style:style>
    <style:style style:name="T712" style:family="text">
      <style:text-properties style:font-name="Liberation Serif" fo:font-size="13pt" fo:font-weight="normal" officeooo:rsid="0d5c6edc" style:font-size-asian="13pt" style:font-weight-asian="normal" style:font-size-complex="13pt" style:font-weight-complex="normal"/>
    </style:style>
    <style:style style:name="T713" style:family="text">
      <style:text-properties style:font-name="Liberation Serif" fo:font-size="13pt" fo:font-weight="normal" officeooo:rsid="0d555741" style:font-size-asian="13pt" style:font-weight-asian="normal" style:font-size-complex="13pt" style:font-weight-complex="normal"/>
    </style:style>
    <style:style style:name="T714" style:family="text">
      <style:text-properties style:font-name="Liberation Serif" fo:font-size="13pt" fo:font-weight="normal" officeooo:rsid="0cf44c87" style:font-size-asian="13pt" style:font-weight-asian="normal" style:font-size-complex="13pt" style:font-weight-complex="normal"/>
    </style:style>
    <style:style style:name="T715" style:family="text">
      <style:text-properties style:font-name="Liberation Serif" fo:font-size="13pt" fo:font-weight="normal" officeooo:rsid="0b59c79f" style:font-size-asian="13pt" style:font-weight-asian="normal" style:font-size-complex="13pt" style:font-weight-complex="normal"/>
    </style:style>
    <style:style style:name="T716" style:family="text">
      <style:text-properties officeooo:rsid="0d6520fb"/>
    </style:style>
    <style:style style:name="T717" style:family="text">
      <style:text-properties officeooo:rsid="000fcf39"/>
    </style:style>
    <style:style style:name="T718" style:family="text">
      <style:text-properties officeooo:rsid="00124173"/>
    </style:style>
    <style:style style:name="T719" style:family="text">
      <style:text-properties style:font-name="Liberation Serif" fo:font-weight="normal" officeooo:rsid="0005ae83" style:font-weight-asian="normal" style:font-weight-complex="normal"/>
    </style:style>
    <style:style style:name="T720" style:family="text">
      <style:text-properties style:font-name="Liberation Serif" fo:font-weight="normal" officeooo:rsid="000fcf39" style:font-weight-asian="normal" style:font-weight-complex="normal"/>
    </style:style>
    <style:style style:name="T721" style:family="text">
      <style:text-properties style:font-name="Liberation Serif" fo:font-weight="normal" officeooo:rsid="006d0dae" style:font-weight-asian="normal" style:font-weight-complex="normal"/>
    </style:style>
    <style:style style:name="T722" style:family="text">
      <style:text-properties style:font-name="Liberation Serif" fo:font-weight="normal" officeooo:rsid="00155def" style:font-weight-asian="normal" style:font-weight-complex="normal"/>
    </style:style>
    <style:style style:name="T723" style:family="text">
      <style:text-properties style:font-name="Liberation Serif" fo:font-size="13pt" fo:font-weight="normal" officeooo:rsid="0051ab87" style:font-size-asian="13pt" style:font-weight-asian="normal" style:font-size-complex="13pt" style:font-weight-complex="normal"/>
    </style:style>
    <style:style style:name="T724" style:family="text">
      <style:text-properties style:font-name="Liberation Serif" fo:font-size="13pt" fo:font-weight="normal" officeooo:rsid="0153c134" style:font-size-asian="13pt" style:font-weight-asian="normal" style:font-size-complex="13pt" style:font-weight-complex="normal"/>
    </style:style>
    <style:style style:name="T725" style:family="text">
      <style:text-properties style:font-name="Liberation Serif" fo:font-size="13pt" fo:font-weight="normal" officeooo:rsid="0158fdbc" style:font-size-asian="13pt" style:font-weight-asian="normal" style:font-size-complex="13pt" style:font-weight-complex="normal"/>
    </style:style>
    <style:style style:name="T726" style:family="text">
      <style:text-properties style:font-name="Liberation Serif" fo:font-size="13pt" fo:font-style="normal" fo:font-weight="normal" officeooo:rsid="013c9f8a" style:font-size-asian="13pt" style:font-style-asian="normal" style:font-weight-asian="normal" style:font-size-complex="13pt" style:font-style-complex="normal" style:font-weight-complex="normal"/>
    </style:style>
    <style:style style:name="T727" style:family="text">
      <style:text-properties style:font-name="Liberation Serif" fo:font-size="13pt" fo:font-style="normal" fo:font-weight="normal" officeooo:rsid="0154b84b" style:font-size-asian="13pt" style:font-style-asian="normal" style:font-weight-asian="normal" style:font-size-complex="13pt" style:font-style-complex="normal" style:font-weight-complex="normal"/>
    </style:style>
    <style:style style:name="T728" style:family="text">
      <style:text-properties style:font-name="Liberation Serif" fo:font-size="13pt" fo:font-style="normal" fo:font-weight="normal" officeooo:rsid="0087bea9" style:font-size-asian="13pt" style:font-style-asian="normal" style:font-weight-asian="normal" style:font-size-complex="13pt" style:font-style-complex="normal" style:font-weight-complex="normal"/>
    </style:style>
    <style:style style:name="T729" style:family="text">
      <style:text-properties style:font-name="Liberation Serif" fo:font-size="13pt" fo:font-style="normal" fo:font-weight="normal" officeooo:rsid="04607984" style:font-size-asian="13pt" style:font-style-asian="normal" style:font-weight-asian="normal" style:font-size-complex="13pt" style:font-style-complex="normal" style:font-weight-complex="normal"/>
    </style:style>
    <style:style style:name="T730" style:family="text">
      <style:text-properties style:font-name="Liberation Serif" fo:font-size="13pt" fo:font-style="normal" fo:font-weight="normal" officeooo:rsid="0051ab87" style:font-size-asian="13pt" style:font-style-asian="normal" style:font-weight-asian="normal" style:font-size-complex="13pt" style:font-style-complex="normal" style:font-weight-complex="normal"/>
    </style:style>
    <style:style style:name="T731" style:family="text">
      <style:text-properties style:font-name="Liberation Serif" fo:font-size="13pt" fo:font-style="normal" fo:font-weight="normal" officeooo:rsid="00155def" style:font-size-asian="13pt" style:font-style-asian="normal" style:font-weight-asian="normal" style:font-size-complex="13pt" style:font-style-complex="normal" style:font-weight-complex="normal"/>
    </style:style>
    <style:style style:name="T732" style:family="text">
      <style:text-properties fo:font-family="Courier" style:font-family-generic="modern" style:font-pitch="fixed" fo:font-size="13pt" fo:font-style="normal" fo:font-weight="normal" officeooo:rsid="0087bea9" style:font-size-asian="13pt" style:font-style-asian="normal" style:font-weight-asian="normal" style:font-size-complex="13pt" style:font-style-complex="normal" style:font-weight-complex="normal"/>
    </style:style>
    <style:style style:name="T733" style:family="text">
      <style:text-properties style:font-name="Liberation Serif" fo:font-size="13pt" fo:font-weight="normal" officeooo:rsid="006b484f" style:font-size-asian="13pt" style:font-weight-asian="normal" style:font-size-complex="13pt" style:font-weight-complex="normal"/>
    </style:style>
    <style:style style:name="T734" style:family="text">
      <style:text-properties style:font-name="Liberation Serif" fo:font-size="13pt" fo:font-weight="normal" officeooo:rsid="04607984" style:font-size-asian="13pt" style:font-weight-asian="normal" style:font-size-complex="13pt" style:font-weight-complex="normal"/>
    </style:style>
    <style:style style:name="T735" style:family="text">
      <style:text-properties fo:font-family="Courier" style:font-family-generic="modern" style:font-pitch="fixed" fo:font-size="13pt" fo:font-weight="normal" officeooo:rsid="006b484f" style:font-size-asian="13pt" style:font-weight-asian="normal" style:font-size-complex="13pt" style:font-weight-complex="normal"/>
    </style:style>
    <style:style style:name="T736" style:family="text">
      <style:text-properties style:font-name="Liberation Serif" fo:font-size="13pt" fo:font-style="normal" fo:font-weight="normal" officeooo:rsid="006b484f" style:font-size-asian="13pt" style:font-style-asian="normal" style:font-weight-asian="normal" style:font-size-complex="13pt" style:font-style-complex="normal" style:font-weight-complex="normal"/>
    </style:style>
    <style:style style:name="T737" style:family="text">
      <style:text-properties style:font-name="Liberation Serif" fo:font-size="13pt" fo:font-style="normal" fo:font-weight="normal" officeooo:rsid="01556250" style:font-size-asian="13pt" style:font-style-asian="normal" style:font-weight-asian="normal" style:font-size-complex="13pt" style:font-style-complex="normal" style:font-weight-complex="normal"/>
    </style:style>
    <style:style style:name="T738" style:family="text">
      <style:text-properties style:font-name="Liberation Serif" fo:font-size="13pt" fo:font-weight="normal" officeooo:rsid="0087bea9" style:font-size-asian="13pt" style:font-weight-asian="normal" style:font-size-complex="13pt" style:font-weight-complex="normal"/>
    </style:style>
    <style:style style:name="T739" style:family="text">
      <style:text-properties fo:font-family="Courier" style:font-family-generic="modern" style:font-pitch="fixed" fo:font-size="13pt" fo:font-weight="normal" officeooo:rsid="0087bea9" style:font-size-asian="13pt" style:font-weight-asian="normal" style:font-size-complex="13pt" style:font-weight-complex="normal"/>
    </style:style>
    <style:style style:name="T740" style:family="text">
      <style:text-properties style:font-name="Liberation Serif" fo:font-size="13pt" fo:font-weight="normal" officeooo:rsid="00155def" style:font-size-asian="13pt" style:font-weight-asian="normal" style:font-size-complex="13pt" style:font-weight-complex="normal"/>
    </style:style>
    <style:style style:name="T741" style:family="text">
      <style:text-properties style:font-name="Liberation Serif" fo:font-size="13pt" fo:font-weight="normal" officeooo:rsid="00dc43c5" style:font-size-asian="13pt" style:font-weight-asian="normal" style:font-size-complex="13pt" style:font-weight-complex="normal"/>
    </style:style>
    <style:style style:name="T742" style:family="text">
      <style:text-properties style:font-name="Liberation Serif" fo:font-size="13pt" fo:font-weight="normal" officeooo:rsid="01556250" style:font-size-asian="13pt" style:font-weight-asian="normal" style:font-size-complex="13pt" style:font-weight-complex="normal"/>
    </style:style>
    <style:style style:name="T743" style:family="text">
      <style:text-properties fo:font-family="Courier" style:font-family-generic="modern" style:font-pitch="fixed" fo:font-size="13pt" fo:font-weight="normal" officeooo:rsid="01556250" style:font-size-asian="13pt" style:font-weight-asian="normal" style:font-size-complex="13pt" style:font-weight-complex="normal"/>
    </style:style>
    <style:style style:name="T744" style:family="text">
      <style:text-properties style:font-name="Liberation Serif" fo:font-size="13pt" fo:font-style="normal" fo:font-weight="normal" officeooo:rsid="01575da7" style:font-size-asian="13pt" style:font-style-asian="normal" style:font-weight-asian="normal" style:font-size-complex="13pt" style:font-style-complex="normal" style:font-weight-complex="normal"/>
    </style:style>
    <style:style style:name="T745" style:family="text">
      <style:text-properties style:font-name="Liberation Serif" fo:font-size="13pt" fo:font-weight="normal" officeooo:rsid="00da9ca8" style:font-size-asian="13pt" style:font-weight-asian="normal" style:font-size-complex="13pt" style:font-weight-complex="normal"/>
    </style:style>
    <style:style style:name="T746" style:family="text">
      <style:text-properties style:font-name="Liberation Serif" fo:font-size="13pt" fo:font-weight="normal" officeooo:rsid="01575da7" style:font-size-asian="13pt" style:font-weight-asian="normal" style:font-size-complex="13pt" style:font-weight-complex="normal"/>
    </style:style>
    <style:style style:name="T747" style:family="text">
      <style:text-properties style:font-name="Liberation Serif" fo:font-size="13pt" fo:font-weight="normal" officeooo:rsid="013439f6" style:font-size-asian="13pt" style:font-weight-asian="normal" style:font-size-complex="13pt" style:font-weight-complex="normal"/>
    </style:style>
    <style:style style:name="T748" style:family="text">
      <style:text-properties style:font-name="Liberation Serif" fo:font-size="13pt" fo:font-weight="normal" officeooo:rsid="01260b36" style:font-size-asian="13pt" style:font-weight-asian="normal" style:font-size-complex="13pt" style:font-weight-complex="normal"/>
    </style:style>
    <style:style style:name="T749" style:family="text">
      <style:text-properties style:font-name="Liberation Serif" fo:font-size="13pt" fo:font-weight="normal" officeooo:rsid="013c9f8a" style:font-size-asian="13pt" style:font-weight-asian="normal" style:font-size-complex="13pt" style:font-weight-complex="normal"/>
    </style:style>
    <style:style style:name="T750" style:family="text">
      <style:text-properties style:font-name="Liberation Serif" fo:font-size="13pt" fo:font-weight="normal" officeooo:rsid="01658177" style:font-size-asian="13pt" style:font-weight-asian="normal" style:font-size-complex="13pt" style:font-weight-complex="normal"/>
    </style:style>
    <style:style style:name="T751" style:family="text">
      <style:text-properties style:font-name="Liberation Serif" fo:font-size="13pt" fo:font-weight="normal" officeooo:rsid="01da5ccc" style:font-size-asian="13pt" style:font-weight-asian="normal" style:font-size-complex="13pt" style:font-weight-complex="normal"/>
    </style:style>
    <style:style style:name="T752" style:family="text">
      <style:text-properties fo:font-family="Courier" style:font-family-generic="modern" style:font-pitch="fixed" fo:font-size="13pt" fo:font-weight="normal" officeooo:rsid="019ecc5d" style:font-size-asian="13pt" style:font-weight-asian="normal" style:font-size-complex="13pt" style:font-weight-complex="normal"/>
    </style:style>
    <style:style style:name="T753" style:family="text">
      <style:text-properties style:font-name="Liberation Serif" fo:font-size="13pt" fo:font-style="normal" fo:font-weight="normal" officeooo:rsid="0158fdbc" style:font-size-asian="13pt" style:font-style-asian="normal" style:font-weight-asian="normal" style:font-size-complex="13pt" style:font-style-complex="normal" style:font-weight-complex="normal"/>
    </style:style>
    <style:style style:name="T754" style:family="text">
      <style:text-properties style:font-name="Liberation Serif" fo:font-size="13pt" fo:font-style="normal" fo:font-weight="normal" officeooo:rsid="01658177" style:font-size-asian="13pt" style:font-style-asian="normal" style:font-weight-asian="normal" style:font-size-complex="13pt" style:font-style-complex="normal" style:font-weight-complex="normal"/>
    </style:style>
    <style:style style:name="T755" style:family="text">
      <style:text-properties style:font-name="Liberation Serif" fo:font-size="13pt" fo:font-style="normal" fo:font-weight="normal" officeooo:rsid="02814868" style:font-size-asian="13pt" style:font-style-asian="normal" style:font-weight-asian="normal" style:font-size-complex="13pt" style:font-style-complex="normal" style:font-weight-complex="normal"/>
    </style:style>
    <style:style style:name="T756" style:family="text">
      <style:text-properties style:font-name="Liberation Serif" fo:font-size="13pt" fo:font-style="normal" fo:font-weight="normal" officeooo:rsid="015ab19d" style:font-size-asian="13pt" style:font-style-asian="normal" style:font-weight-asian="normal" style:font-size-complex="13pt" style:font-style-complex="normal" style:font-weight-complex="normal"/>
    </style:style>
    <style:style style:name="T757" style:family="text">
      <style:text-properties fo:font-family="Courier" style:font-family-generic="modern" style:font-pitch="fixed" fo:font-size="13pt" fo:font-style="normal" fo:font-weight="normal" officeooo:rsid="0198b9eb" style:font-size-asian="13pt" style:font-style-asian="normal" style:font-weight-asian="normal" style:font-size-complex="13pt" style:font-style-complex="normal" style:font-weight-complex="normal"/>
    </style:style>
    <style:style style:name="T758" style:family="text">
      <style:text-properties fo:font-family="Courier" style:font-family-generic="modern" style:font-pitch="fixed" fo:font-size="13pt" fo:font-style="normal" fo:font-weight="normal" officeooo:rsid="01556250" style:font-size-asian="13pt" style:font-style-asian="normal" style:font-weight-asian="normal" style:font-size-complex="13pt" style:font-style-complex="normal" style:font-weight-complex="normal"/>
    </style:style>
    <style:style style:name="T759" style:family="text">
      <style:text-properties style:font-name="Liberation Serif" fo:font-size="13pt" fo:font-style="normal" fo:font-weight="normal" officeooo:rsid="019a5f94" style:font-size-asian="13pt" style:font-style-asian="normal" style:font-weight-asian="normal" style:font-size-complex="13pt" style:font-style-complex="normal" style:font-weight-complex="normal"/>
    </style:style>
    <style:style style:name="T760" style:family="text">
      <style:text-properties style:font-name="Liberation Serif" fo:font-size="13pt" fo:font-style="normal" fo:font-weight="normal" officeooo:rsid="01c73ee8" style:font-size-asian="13pt" style:font-style-asian="normal" style:font-weight-asian="normal" style:font-size-complex="13pt" style:font-style-complex="normal" style:font-weight-complex="normal"/>
    </style:style>
    <style:style style:name="T761" style:family="text">
      <style:text-properties style:font-name="Liberation Serif" fo:font-size="13pt" fo:font-style="normal" fo:font-weight="normal" officeooo:rsid="021fe2ab" style:font-size-asian="13pt" style:font-style-asian="normal" style:font-weight-asian="normal" style:font-size-complex="13pt" style:font-style-complex="normal" style:font-weight-complex="normal"/>
    </style:style>
    <style:style style:name="T762" style:family="text">
      <style:text-properties style:font-name="Liberation Serif" fo:font-size="13pt" fo:font-style="normal" fo:font-weight="normal" officeooo:rsid="0235e4a9" style:font-size-asian="13pt" style:font-style-asian="normal" style:font-weight-asian="normal" style:font-size-complex="13pt" style:font-style-complex="normal" style:font-weight-complex="normal"/>
    </style:style>
    <style:style style:name="T763" style:family="text">
      <style:text-properties style:font-name="Liberation Serif" fo:font-size="13pt" fo:font-style="normal" fo:font-weight="normal" officeooo:rsid="02322fa4" style:font-size-asian="13pt" style:font-style-asian="normal" style:font-weight-asian="normal" style:font-size-complex="13pt" style:font-style-complex="normal" style:font-weight-complex="normal"/>
    </style:style>
    <style:style style:name="T764" style:family="text">
      <style:text-properties style:font-name="Liberation Serif" fo:font-size="13pt" fo:font-style="normal" fo:font-weight="normal" officeooo:rsid="0266f7a1" style:font-size-asian="13pt" style:font-style-asian="normal" style:font-weight-asian="normal" style:font-size-complex="13pt" style:font-style-complex="normal" style:font-weight-complex="normal"/>
    </style:style>
    <style:style style:name="T765" style:family="text">
      <style:text-properties style:font-name="Liberation Serif" fo:font-size="13pt" fo:font-style="normal" fo:font-weight="normal" officeooo:rsid="024fe8bb" style:font-size-asian="13pt" style:font-style-asian="normal" style:font-weight-asian="normal" style:font-size-complex="13pt" style:font-style-complex="normal" style:font-weight-complex="normal"/>
    </style:style>
    <style:style style:name="T766" style:family="text">
      <style:text-properties style:font-name="Liberation Serif" fo:font-size="13pt" fo:font-style="normal" fo:font-weight="normal" officeooo:rsid="024881fc" style:font-size-asian="13pt" style:font-style-asian="normal" style:font-weight-asian="normal" style:font-size-complex="13pt" style:font-style-complex="normal" style:font-weight-complex="normal"/>
    </style:style>
    <style:style style:name="T767" style:family="text">
      <style:text-properties style:font-name="Liberation Serif" fo:font-size="13pt" fo:font-style="normal" fo:font-weight="normal" officeooo:rsid="0267108e" style:font-size-asian="13pt" style:font-style-asian="normal" style:font-weight-asian="normal" style:font-size-complex="13pt" style:font-style-complex="normal" style:font-weight-complex="normal"/>
    </style:style>
    <style:style style:name="T768" style:family="text">
      <style:text-properties style:font-name="Liberation Serif" fo:font-size="13pt" fo:font-weight="normal" officeooo:rsid="03423f1a" style:font-size-asian="13pt" style:font-weight-asian="normal" style:font-size-complex="13pt" style:font-weight-complex="normal"/>
    </style:style>
    <style:style style:name="T769" style:family="text">
      <style:text-properties style:font-name="Liberation Serif" fo:font-size="13pt" fo:font-weight="normal" officeooo:rsid="028de297" style:font-size-asian="13pt" style:font-weight-asian="normal" style:font-size-complex="13pt" style:font-weight-complex="normal"/>
    </style:style>
    <style:style style:name="T770" style:family="text">
      <style:text-properties style:font-name="Liberation Serif" fo:font-size="13pt" fo:font-weight="normal" officeooo:rsid="02a08520" style:font-size-asian="13pt" style:font-weight-asian="normal" style:font-size-complex="13pt" style:font-weight-complex="normal"/>
    </style:style>
    <style:style style:name="T771" style:family="text">
      <style:text-properties fo:font-family="Courier" style:font-family-generic="modern" style:font-pitch="fixed" fo:font-size="13pt" fo:font-weight="normal" officeooo:rsid="02a08520" style:font-size-asian="13pt" style:font-weight-asian="normal" style:font-size-complex="13pt" style:font-weight-complex="normal"/>
    </style:style>
    <style:style style:name="T772" style:family="text">
      <style:text-properties style:font-name="Liberation Serif" fo:font-size="13pt" fo:font-weight="normal" officeooo:rsid="030cbd58" style:font-size-asian="13pt" style:font-weight-asian="normal" style:font-size-complex="13pt" style:font-weight-complex="normal"/>
    </style:style>
    <style:style style:name="T773" style:family="text">
      <style:text-properties style:font-name="Liberation Serif" fo:font-size="13pt" fo:font-weight="normal" officeooo:rsid="031b7397" style:font-size-asian="13pt" style:font-weight-asian="normal" style:font-size-complex="13pt" style:font-weight-complex="normal"/>
    </style:style>
    <style:style style:name="T774" style:family="text">
      <style:text-properties style:font-name="Liberation Serif" fo:font-size="13pt" fo:font-weight="normal" officeooo:rsid="034eae6b" style:font-size-asian="13pt" style:font-weight-asian="normal" style:font-size-complex="13pt" style:font-weight-complex="normal"/>
    </style:style>
    <style:style style:name="T775" style:family="text">
      <style:text-properties fo:font-family="Courier" style:font-family-generic="modern" style:font-pitch="fixed" fo:font-size="13pt" fo:font-weight="normal" officeooo:rsid="030cbd58" style:font-size-asian="13pt" style:font-weight-asian="normal" style:font-size-complex="13pt" style:font-weight-complex="normal"/>
    </style:style>
    <style:style style:name="T776" style:family="text">
      <style:text-properties style:font-name="Liberation Serif" fo:font-size="13pt" fo:font-weight="normal" officeooo:rsid="02ca5b7c" style:font-size-asian="13pt" style:font-weight-asian="normal" style:font-size-complex="13pt" style:font-weight-complex="normal"/>
    </style:style>
    <style:style style:name="T777" style:family="text">
      <style:text-properties style:font-name="Liberation Serif" fo:font-size="13pt" fo:font-weight="normal" officeooo:rsid="03090ab7" style:font-size-asian="13pt" style:font-weight-asian="normal" style:font-size-complex="13pt" style:font-weight-complex="normal"/>
    </style:style>
    <style:style style:name="T778" style:family="text">
      <style:text-properties style:font-name="Liberation Serif" fo:font-size="13pt" fo:font-weight="normal" officeooo:rsid="03418623" style:font-size-asian="13pt" style:font-weight-asian="normal" style:font-size-complex="13pt" style:font-weight-complex="normal"/>
    </style:style>
    <style:style style:name="T779" style:family="text">
      <style:text-properties style:font-name="Liberation Serif" fo:font-weight="normal" officeooo:rsid="03418623" style:font-weight-asian="normal" style:font-weight-complex="normal"/>
    </style:style>
    <style:style style:name="T780" style:family="text">
      <style:text-properties style:font-name="Liberation Serif" fo:font-weight="normal" officeooo:rsid="033bd02a" style:font-weight-asian="normal" style:font-weight-complex="normal"/>
    </style:style>
    <style:style style:name="T781" style:family="text">
      <style:text-properties style:font-name="Liberation Serif" fo:font-weight="normal" officeooo:rsid="034eae6b" style:font-weight-asian="normal" style:font-weight-complex="normal"/>
    </style:style>
    <style:style style:name="T782" style:family="text">
      <style:text-properties fo:font-family="Courier" style:font-family-generic="modern" style:font-pitch="fixed" fo:font-weight="normal" officeooo:rsid="033bd02a" style:font-weight-asian="normal" style:font-weight-complex="normal"/>
    </style:style>
    <style:style style:name="T783" style:family="text">
      <style:text-properties style:font-name="Liberation Serif" fo:font-size="13pt" fo:font-weight="normal" officeooo:rsid="035e9e48" style:font-name-asian="Liberation Mono" style:font-size-asian="13pt" style:font-weight-asian="normal" style:font-name-complex="Liberation Mono" style:font-size-complex="13pt" style:font-weight-complex="normal"/>
    </style:style>
    <style:style style:name="T784" style:family="text">
      <style:text-properties style:font-name="Liberation Serif" fo:font-size="13pt" fo:font-weight="normal" officeooo:rsid="052baf14" style:font-name-asian="Liberation Mono" style:font-size-asian="13pt" style:font-weight-asian="normal" style:font-name-complex="Liberation Mono" style:font-size-complex="13pt" style:font-weight-complex="normal"/>
    </style:style>
    <style:style style:name="T785" style:family="text">
      <style:text-properties fo:font-family="Courier" style:font-family-generic="modern" style:font-pitch="fixed" fo:font-size="13pt" fo:font-weight="normal" officeooo:rsid="052baf14" style:font-name-asian="Liberation Mono" style:font-size-asian="13pt" style:font-weight-asian="normal" style:font-name-complex="Liberation Mono" style:font-size-complex="13pt" style:font-weight-complex="normal"/>
    </style:style>
    <style:style style:name="T786" style:family="text">
      <style:text-properties style:font-name="Liberation Serif" fo:font-size="13pt" fo:font-weight="normal" officeooo:rsid="035e9e48" style:font-size-asian="13pt" style:font-weight-asian="normal" style:font-size-complex="13pt" style:font-weight-complex="normal"/>
    </style:style>
    <style:style style:name="T787" style:family="text">
      <style:text-properties fo:font-family="Courier" style:font-family-generic="modern" style:font-pitch="fixed" fo:font-size="13pt" fo:font-weight="normal" officeooo:rsid="00155def" style:font-size-asian="13pt" style:font-weight-asian="normal" style:font-size-complex="13pt" style:font-weight-complex="normal"/>
    </style:style>
    <style:style style:name="T788" style:family="text">
      <style:text-properties style:font-name="Liberation Serif" fo:font-size="13pt" fo:font-weight="normal" officeooo:rsid="0366b12e" style:font-size-asian="13pt" style:font-weight-asian="normal" style:font-size-complex="13pt" style:font-weight-complex="normal"/>
    </style:style>
    <style:style style:name="T789" style:family="text">
      <style:text-properties style:font-name="Liberation Serif" fo:font-size="13pt" fo:font-weight="normal" officeooo:rsid="0369675b" style:font-size-asian="13pt" style:font-weight-asian="normal" style:font-size-complex="13pt" style:font-weight-complex="normal"/>
    </style:style>
    <style:style style:name="T790" style:family="text">
      <style:text-properties style:font-name="Liberation Serif" fo:font-size="13pt" fo:font-weight="normal" officeooo:rsid="0367f432" style:font-size-asian="13pt" style:font-weight-asian="normal" style:font-size-complex="13pt" style:font-weight-complex="normal"/>
    </style:style>
    <style:style style:name="T791" style:family="text">
      <style:text-properties style:font-name="Liberation Serif" fo:font-size="13pt" fo:font-weight="normal" officeooo:rsid="000fcf39" style:font-size-asian="13pt" style:font-weight-asian="normal" style:font-size-complex="13pt" style:font-weight-complex="normal"/>
    </style:style>
    <style:style style:name="T792" style:family="text">
      <style:text-properties style:font-name="Liberation Serif" fo:font-size="13pt" fo:font-weight="normal" officeooo:rsid="052baf14" style:font-size-asian="13pt" style:font-weight-asian="normal" style:font-size-complex="13pt" style:font-weight-complex="normal"/>
    </style:style>
    <style:style style:name="T793" style:family="text">
      <style:text-properties style:font-name="Liberation Serif" fo:font-size="13pt" fo:font-weight="normal" officeooo:rsid="0377db5f" style:font-size-asian="13pt" style:font-weight-asian="normal" style:font-size-complex="13pt" style:font-weight-complex="normal"/>
    </style:style>
    <style:style style:name="T794" style:family="text">
      <style:text-properties style:font-name="Liberation Serif" fo:font-size="13pt" fo:font-weight="normal" officeooo:rsid="03987419" style:font-size-asian="13pt" style:font-weight-asian="normal" style:font-size-complex="13pt" style:font-weight-complex="normal"/>
    </style:style>
    <style:style style:name="T795" style:family="text">
      <style:text-properties style:font-name="Liberation Serif" fo:font-size="13pt" fo:font-weight="normal" officeooo:rsid="038febad" style:font-size-asian="13pt" style:font-weight-asian="normal" style:font-size-complex="13pt" style:font-weight-complex="normal"/>
    </style:style>
    <style:style style:name="T796" style:family="text">
      <style:text-properties style:font-name="Liberation Serif" fo:font-size="13pt" fo:font-weight="normal" officeooo:rsid="03a3064e" style:font-size-asian="13pt" style:font-weight-asian="normal" style:font-size-complex="13pt" style:font-weight-complex="normal"/>
    </style:style>
    <style:style style:name="T797" style:family="text">
      <style:text-properties style:font-name="Liberation Serif" fo:font-size="13pt" fo:font-weight="normal" officeooo:rsid="03c4b5c5" style:font-size-asian="13pt" style:font-weight-asian="normal" style:font-size-complex="13pt" style:font-weight-complex="normal"/>
    </style:style>
    <style:style style:name="T798" style:family="text">
      <style:text-properties style:font-name="Liberation Serif" fo:font-size="13pt" fo:font-weight="normal" officeooo:rsid="03cb522c" style:font-size-asian="13pt" style:font-weight-asian="normal" style:font-size-complex="13pt" style:font-weight-complex="normal"/>
    </style:style>
    <style:style style:name="T799" style:family="text">
      <style:text-properties style:font-name="Liberation Serif" fo:font-size="13pt" fo:font-weight="normal" officeooo:rsid="03e6c3b2" style:font-size-asian="13pt" style:font-weight-asian="normal" style:font-size-complex="13pt" style:font-weight-complex="normal"/>
    </style:style>
    <style:style style:name="T800" style:family="text">
      <style:text-properties style:font-name="Liberation Serif" fo:font-size="13pt" fo:font-weight="normal" officeooo:rsid="044662e3" style:font-size-asian="13pt" style:font-weight-asian="normal" style:font-size-complex="13pt" style:font-weight-complex="normal"/>
    </style:style>
    <style:style style:name="T801" style:family="text">
      <style:text-properties style:font-name="Liberation Serif" fo:font-size="13pt" fo:font-weight="normal" officeooo:rsid="03e563e0" style:font-size-asian="13pt" style:font-weight-asian="normal" style:font-size-complex="13pt" style:font-weight-complex="normal"/>
    </style:style>
    <style:style style:name="T802" style:family="text">
      <style:text-properties style:font-name="Liberation Serif" fo:font-size="13pt" fo:font-weight="normal" officeooo:rsid="0136fe3d" style:font-size-asian="13pt" style:font-weight-asian="normal" style:font-size-complex="13pt" style:font-weight-complex="normal"/>
    </style:style>
    <style:style style:name="T803" style:family="text">
      <style:text-properties officeooo:rsid="0153c134"/>
    </style:style>
    <style:style style:name="T804" style:family="text">
      <style:text-properties officeooo:rsid="013c9f8a"/>
    </style:style>
    <style:style style:name="T805" style:family="text">
      <style:text-properties officeooo:rsid="0158fdbc"/>
    </style:style>
    <style:style style:name="T806" style:family="text">
      <style:text-properties style:use-window-font-color="true" loext:opacity="0%" fo:font-weight="bold" officeooo:rsid="052baf14" style:font-weight-asian="bold" style:font-weight-complex="bold"/>
    </style:style>
    <style:style style:name="T807" style:family="text">
      <style:text-properties style:font-name="Liberation Serif" fo:font-size="13pt" fo:font-weight="normal" officeooo:rsid="026d3e86" style:font-size-asian="13pt" style:font-weight-asian="normal" style:font-size-complex="13pt" style:font-weight-complex="normal"/>
    </style:style>
    <style:style style:name="T808" style:family="text">
      <style:text-properties style:font-name="Liberation Serif" fo:font-size="13pt" fo:font-weight="normal" officeooo:rsid="045aea4b" style:font-size-asian="13pt" style:font-weight-asian="normal" style:font-size-complex="13pt" style:font-weight-complex="normal"/>
    </style:style>
    <style:style style:name="T809" style:family="text">
      <style:text-properties style:font-name="Liberation Serif" fo:font-size="13pt" fo:font-weight="normal" officeooo:rsid="045ccc33" style:font-size-asian="13pt" style:font-weight-asian="normal" style:font-size-complex="13pt" style:font-weight-complex="normal"/>
    </style:style>
    <style:style style:name="T810" style:family="text">
      <style:text-properties fo:font-size="13pt" officeooo:rsid="0023b133" style:font-size-asian="13pt" style:font-size-complex="13pt"/>
    </style:style>
    <style:style style:name="T811" style:family="text">
      <style:text-properties fo:font-weight="bold" officeooo:rsid="002598fa" style:font-weight-asian="bold" style:font-weight-complex="bold"/>
    </style:style>
    <style:style style:name="T812" style:family="text">
      <style:text-properties fo:font-weight="bold" officeooo:rsid="003ddeea" style:font-weight-asian="bold" style:font-weight-complex="bold"/>
    </style:style>
    <style:style style:name="T813" style:family="text">
      <style:text-properties fo:font-size="12pt" fo:font-weight="normal" style:font-size-asian="12pt" style:font-weight-asian="normal" style:font-size-complex="12pt" style:font-weight-complex="normal"/>
    </style:style>
    <style:style style:name="T814" style:family="text">
      <style:text-properties fo:font-size="12pt" fo:font-style="italic" fo:font-weight="normal" style:font-size-asian="12pt" style:font-style-asian="italic" style:font-weight-asian="normal" style:font-size-complex="12pt" style:font-style-complex="italic" style:font-weight-complex="normal"/>
    </style:style>
    <style:style style:name="T815" style:family="text">
      <style:text-properties fo:font-size="12pt" fo:font-weight="bold" style:font-size-asian="12pt" style:font-weight-asian="bold" style:font-size-complex="12pt" style:font-weight-complex="bold"/>
    </style:style>
    <style:style style:name="T81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817" style:family="text">
      <style:text-properties style:font-name="Courier" fo:font-size="13pt" fo:font-weight="bold" style:font-size-asian="13pt" style:font-weight-asian="bold" style:font-name-complex="Courier" style:font-size-complex="13pt" style:font-weight-complex="bold"/>
    </style:style>
    <style:style style:name="T818" style:family="text">
      <style:text-properties style:font-name="Courier" fo:font-size="12pt" fo:font-weight="normal" style:font-size-asian="12pt" style:font-weight-asian="normal" style:font-name-complex="Courier" style:font-size-complex="12pt" style:font-weight-complex="normal"/>
    </style:style>
    <style:style style:name="T819" style:family="text">
      <style:text-properties style:font-name="Courier" fo:font-size="12pt" fo:font-style="normal" fo:font-weight="normal" style:font-size-asian="12pt" style:font-style-asian="normal" style:font-weight-asian="normal" style:font-name-complex="Courier" style:font-size-complex="12pt" style:font-style-complex="normal" style:font-weight-complex="normal"/>
    </style:style>
    <style:style style:name="T820" style:family="text">
      <style:text-properties fo:font-size="10pt" style:font-size-asian="10pt" style:font-size-complex="10pt"/>
    </style:style>
    <style:style style:name="T821" style:family="text">
      <style:text-properties style:font-name="Courier" fo:font-size="10pt" style:font-size-asian="10pt" style:font-name-complex="Courier" style:font-size-complex="10pt"/>
    </style:style>
    <style:style style:name="T822" style:family="text">
      <style:text-properties fo:color="#0000ff" loext:opacity="100%" style:font-name="Courier" fo:font-size="11pt" fo:font-weight="normal" fo:background-color="#ffffff" loext:char-shading-value="0" style:font-size-asian="11pt" style:font-weight-asian="normal" style:font-name-complex="Courier" style:font-size-complex="11pt" style:font-weight-complex="normal"/>
    </style:style>
    <style:style style:name="T823" style:family="text">
      <style:text-properties fo:color="#a31515" loext:opacity="100%" style:font-name="Courier" fo:font-size="11pt" fo:font-weight="normal" fo:background-color="#ffffff" loext:char-shading-value="0" style:font-size-asian="11pt" style:font-weight-asian="normal" style:font-name-complex="Courier" style:font-size-complex="11pt" style:font-weight-complex="normal"/>
    </style:style>
    <style:style style:name="T824" style:family="text">
      <style:text-properties fo:color="#0000ff" loext:opacity="100%" style:font-name="Courier" fo:font-size="11pt" fo:font-weight="normal" fo:background-color="#ffffff" loext:char-shading-value="0" style:font-size-asian="11pt" style:font-weight-asian="normal" style:font-name-complex="Courier" style:font-size-complex="11pt"/>
    </style:style>
    <style:style style:name="T825" style:family="text">
      <style:text-properties fo:color="#000000" loext:opacity="100%" style:font-name="Courier" fo:font-size="11pt" fo:font-weight="normal" fo:background-color="#ffffff" loext:char-shading-value="0" style:font-size-asian="11pt" style:font-weight-asian="normal" style:font-name-complex="Courier" style:font-size-complex="11pt"/>
    </style:style>
    <style:style style:name="T826" style:family="text">
      <style:text-properties fo:color="#800080" loext:opacity="100%" style:font-name="Courier" fo:font-size="11pt" fo:font-weight="normal" fo:background-color="#ffffff" loext:char-shading-value="0" style:font-size-asian="11pt" style:font-weight-asian="normal" style:font-name-complex="Courier" style:font-size-complex="11pt"/>
    </style:style>
    <style:style style:name="T827" style:family="text">
      <style:text-properties fo:color="#000000" loext:opacity="100%" style:font-name="Courier" fo:font-size="11pt" fo:font-style="italic" fo:font-weight="normal" fo:background-color="#ffffff" loext:char-shading-value="0" style:font-size-asian="11pt" style:font-style-asian="italic" style:font-weight-asian="normal" style:font-name-complex="Courier" style:font-size-complex="11pt" style:font-style-complex="italic"/>
    </style:style>
    <style:style style:name="T828" style:family="text">
      <style:text-properties style:font-name="Courier" fo:font-size="11pt" fo:font-weight="normal" style:font-size-asian="11pt" style:font-weight-asian="normal" style:font-name-complex="Courier" style:font-size-complex="11pt" style:font-weight-complex="normal"/>
    </style:style>
    <style:style style:name="T829" style:family="text">
      <style:text-properties fo:color="#00a933" loext:opacity="100%" style:font-name="Courier" fo:font-size="10pt" fo:font-style="italic" fo:font-weight="normal" style:font-size-asian="10pt" style:font-style-asian="italic" style:font-weight-asian="normal" style:font-name-complex="Courier" style:font-size-complex="10pt" style:font-style-complex="italic" style:font-weight-complex="normal"/>
    </style:style>
    <style:style style:name="T830" style:family="text">
      <style:text-properties style:use-window-font-color="true" loext:opacity="0%" style:font-name="Courier" fo:font-size="10pt" fo:font-weight="normal" fo:background-color="#ffffff" loext:char-shading-value="0" style:font-size-asian="10pt" style:font-weight-asian="normal" style:font-name-complex="Courier" style:font-size-complex="10pt" style:font-weight-complex="normal"/>
    </style:style>
    <style:style style:name="T831" style:family="text">
      <style:text-properties fo:color="#a31515" loext:opacity="100%" style:font-name="Courier" fo:font-size="11pt" fo:font-weight="normal" fo:background-color="#ffffff" loext:char-shading-value="0" style:font-size-asian="11pt" style:font-weight-asian="normal" style:font-name-complex="Courier" style:font-size-complex="11pt"/>
    </style:style>
    <style:style style:name="T832" style:family="text">
      <style:text-properties fo:color="#098658" loext:opacity="100%" style:font-name="Courier" fo:font-size="11pt" fo:font-weight="normal" fo:background-color="#ffffff" loext:char-shading-value="0" style:font-size-asian="11pt" style:font-weight-asian="normal" style:font-name-complex="Courier" style:font-size-complex="11pt"/>
    </style:style>
    <style:style style:name="T833" style:family="text">
      <style:text-properties fo:font-weight="bold" style:font-weight-asian="bold" style:font-weight-complex="bold"/>
    </style:style>
    <style:style style:name="T834" style:family="text">
      <style:text-properties style:font-name="Courier" fo:font-style="italic" style:font-style-asian="italic" style:font-name-complex="Courier" style:font-style-complex="italic"/>
    </style:style>
    <style:style style:name="T835" style:family="text">
      <style:text-properties fo:font-size="12pt" style:font-size-asian="12pt" style:font-size-complex="12pt"/>
    </style:style>
    <style:style style:name="T836" style:family="text">
      <style:text-properties fo:font-size="12pt" fo:language="en" fo:country="US" fo:font-weight="normal" style:font-size-asian="12pt" style:font-weight-asian="normal" style:font-size-complex="12pt" style:font-weight-complex="normal"/>
    </style:style>
    <style:style style:name="T837" style:family="text">
      <style:text-properties style:font-name="Courier" fo:font-size="12pt" fo:font-style="normal" style:text-underline-style="none" fo:font-weight="normal" style:font-size-asian="12pt" style:font-style-asian="normal" style:font-weight-asian="normal" style:font-name-complex="Courier" style:font-size-complex="12pt" style:font-style-complex="normal" style:font-weight-complex="normal"/>
    </style:style>
    <style:style style:name="T838" style:family="text">
      <style:text-properties style:font-name="Courier" fo:font-size="11pt" fo:font-style="italic" fo:font-weight="normal" style:font-size-asian="11pt" style:font-style-asian="italic" style:font-weight-asian="normal" style:font-name-complex="Courier" style:font-size-complex="11pt" style:font-style-complex="italic" style:font-weight-complex="normal"/>
    </style:style>
    <style:style style:name="T839" style:family="text">
      <style:text-properties style:use-window-font-color="true" loext:opacity="0%" style:font-name="Courier" fo:font-size="10pt" fo:font-style="normal" fo:font-weight="normal" fo:background-color="#ffffff" loext:char-shading-value="0" style:font-size-asian="10pt" style:font-style-asian="normal" style:font-weight-asian="normal" style:font-name-complex="Courier" style:font-size-complex="10pt" style:font-style-complex="normal" style:font-weight-complex="normal"/>
    </style:style>
    <style:style style:name="T840" style:family="text">
      <style:text-properties fo:color="#0000ff" loext:opacity="100%" style:font-name="Courier" fo:font-size="11pt" fo:font-style="normal" fo:font-weight="normal" fo:background-color="#ffffff" loext:char-shading-value="0" style:font-size-asian="11pt" style:font-style-asian="normal" style:font-weight-asian="normal" style:font-name-complex="Courier" style:font-size-complex="11pt" style:font-style-complex="normal" style:font-weight-complex="normal"/>
    </style:style>
    <style:style style:name="T841" style:family="text">
      <style:text-properties fo:color="#a31515" loext:opacity="100%" style:font-name="Courier" fo:font-size="11pt" fo:font-style="normal" fo:font-weight="normal" fo:background-color="#ffffff" loext:char-shading-value="0" style:font-size-asian="11pt" style:font-style-asian="normal" style:font-weight-asian="normal" style:font-name-complex="Courier" style:font-size-complex="11pt" style:font-style-complex="normal" style:font-weight-complex="normal"/>
    </style:style>
    <style:style style:name="T842" style:family="text">
      <style:text-properties style:font-name="Courier" fo:font-size="12pt" fo:font-style="italic" fo:font-weight="normal" style:font-size-asian="12pt" style:font-style-asian="italic" style:font-weight-asian="normal" style:font-name-complex="Courier" style:font-size-complex="12pt" style:font-style-complex="italic" style:font-weight-complex="normal"/>
    </style:style>
    <style:style style:name="T843" style:family="text">
      <style:text-properties style:font-name="Courier" style:font-name-complex="Courier"/>
    </style:style>
    <style:style style:name="T844" style:family="text">
      <style:text-properties fo:color="#00a933" loext:opacity="100%" style:font-name="Courier" fo:font-size="11pt" fo:font-style="italic" fo:font-weight="normal" style:font-size-asian="11pt" style:font-style-asian="italic" style:font-weight-asian="normal" style:font-name-complex="Courier" style:font-size-complex="11pt" style:font-style-complex="italic" style:font-weight-complex="normal"/>
    </style:style>
    <style:style style:name="T845"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846" style:family="text">
      <style:text-properties style:use-window-font-color="true" loext:opacity="0%" style:font-name="Courier" fo:font-size="10pt" fo:font-style="normal" style:text-underline-style="none" fo:font-weight="normal" fo:background-color="#ffffff" loext:char-shading-value="0" style:font-size-asian="10pt" style:font-style-asian="normal" style:font-weight-asian="normal" style:font-name-complex="Courier" style:font-size-complex="10pt" style:font-style-complex="normal" style:font-weight-complex="normal"/>
    </style:style>
    <style:style style:name="T847" style:family="text">
      <style:text-properties fo:color="#0000ff" loext:opacity="100%" style:font-name="Courier" fo:font-size="11pt" fo:font-style="normal" style:text-underline-style="none" fo:font-weight="normal" fo:background-color="#ffffff" loext:char-shading-value="0" style:font-size-asian="11pt" style:font-style-asian="normal" style:font-weight-asian="normal" style:font-name-complex="Courier" style:font-size-complex="11pt" style:font-style-complex="normal" style:font-weight-complex="normal"/>
    </style:style>
    <style:style style:name="T848" style:family="text">
      <style:text-properties fo:color="#a31515" loext:opacity="100%" style:font-name="Courier" fo:font-size="11pt" fo:font-style="normal" style:text-underline-style="none" fo:font-weight="normal" fo:background-color="#ffffff" loext:char-shading-value="0" style:font-size-asian="11pt" style:font-style-asian="normal" style:font-weight-asian="normal" style:font-name-complex="Courier" style:font-size-complex="11pt" style:font-style-complex="normal" style:font-weight-complex="normal"/>
    </style:style>
    <style:style style:name="T849" style:family="text">
      <style:text-properties style:font-name="Liberation Serif1" fo:font-size="12pt" fo:font-style="normal" fo:font-weight="normal" style:font-size-asian="12pt" style:font-style-asian="normal" style:font-weight-asian="normal" style:font-name-complex="Liberation Serif1" style:font-size-complex="12pt" style:font-style-complex="normal" style:font-weight-complex="normal"/>
    </style:style>
    <style:style style:name="T850" style:family="text">
      <style:text-properties fo:font-size="12pt" fo:font-style="normal" fo:font-weight="bold" style:font-size-asian="12pt" style:font-style-asian="normal" style:font-weight-asian="bold" style:font-size-complex="12pt" style:font-style-complex="normal" style:font-weight-complex="bold"/>
    </style:style>
    <style:style style:name="T851" style:family="text">
      <style:text-properties fo:language="en" fo:country="US" fo:font-weight="normal" style:font-weight-asian="normal" style:font-weight-complex="normal"/>
    </style:style>
    <style:style style:name="T852" style:family="text">
      <style:text-properties style:font-name="Courier" fo:language="en" fo:country="US" fo:font-weight="normal" style:font-weight-asian="normal" style:font-name-complex="Courier" style:font-weight-complex="normal"/>
    </style:style>
    <style:style style:name="T853" style:family="text">
      <style:text-properties fo:font-style="normal" fo:font-weight="normal" style:font-style-asian="normal" style:font-weight-asian="normal" style:font-style-complex="normal" style:font-weight-complex="normal"/>
    </style:style>
    <style:style style:name="T854" style:family="text">
      <style:text-properties style:font-name="Courier" fo:font-style="normal" fo:font-weight="normal" style:font-style-asian="normal" style:font-weight-asian="normal" style:font-name-complex="Courier" style:font-style-complex="normal" style:font-weight-complex="normal"/>
    </style:style>
    <style:style style:name="T855" style:family="text">
      <style:text-properties fo:font-size="10pt" fo:font-weight="normal" style:font-size-asian="10pt" style:font-weight-asian="normal" style:font-size-complex="10pt" style:font-weight-complex="normal"/>
    </style:style>
    <style:style style:name="T856" style:family="text">
      <style:text-properties style:font-name="Courier" fo:font-size="12pt" style:font-size-asian="12pt" style:font-name-complex="Courier" style:font-size-complex="12pt"/>
    </style:style>
    <style:style style:name="T857" style:family="text">
      <style:text-properties style:font-name="Liberation Serif1" fo:font-size="12pt" style:font-size-asian="12pt" style:font-name-complex="Liberation Serif1" style:font-size-complex="12pt"/>
    </style:style>
    <style:style style:name="T858" style:family="text">
      <style:text-properties fo:color="#000000" loext:opacity="100%" style:font-name="Courier" fo:font-size="10pt" fo:font-weight="normal" fo:background-color="#ffffff" loext:char-shading-value="0" style:font-size-asian="10pt" style:font-weight-asian="normal" style:font-name-complex="Courier" style:font-size-complex="10pt"/>
    </style:style>
    <style:style style:name="T859" style:family="text">
      <style:text-properties fo:color="#00a933" loext:opacity="100%" style:font-name="Courier" fo:font-size="10pt" fo:font-style="italic" fo:font-weight="normal" fo:background-color="#ffffff" loext:char-shading-value="0" style:font-size-asian="10pt" style:font-style-asian="italic" style:font-weight-asian="normal" style:font-name-complex="Courier" style:font-size-complex="10pt" style:font-style-complex="italic"/>
    </style:style>
    <style:style style:name="T860" style:family="text">
      <style:text-properties style:font-name="Courier" fo:font-size="11pt" fo:font-style="italic" style:font-size-asian="11pt" style:font-style-asian="italic" style:font-name-complex="Courier" style:font-size-complex="11pt" style:font-style-complex="italic"/>
    </style:style>
    <style:style style:name="T861" style:family="text">
      <style:text-properties fo:color="#00a933" loext:opacity="100%" style:font-name="Courier" fo:font-size="10pt" fo:font-style="italic" style:font-size-asian="10pt" style:font-style-asian="italic" style:font-name-complex="Courier" style:font-size-complex="10pt" style:font-style-complex="italic"/>
    </style:style>
    <style:style style:name="T862" style:family="text">
      <style:text-properties style:font-name="Courier" fo:font-size="11pt" fo:font-style="italic" style:text-underline-style="none" fo:font-weight="normal" style:font-size-asian="11pt" style:font-style-asian="italic" style:font-weight-asian="normal" style:font-name-complex="Courier" style:font-size-complex="11pt" style:font-style-complex="italic" style:font-weight-complex="normal"/>
    </style:style>
    <style:style style:name="T863" style:family="text">
      <style:text-properties fo:color="#00a933" loext:opacity="100%" style:font-name="Courier" fo:font-size="10pt" fo:font-style="italic" style:text-underline-style="none" fo:font-weight="normal" style:font-size-asian="10pt" style:font-style-asian="italic" style:font-weight-asian="normal" style:font-name-complex="Courier" style:font-size-complex="10pt" style:font-style-complex="italic" style:font-weight-complex="normal"/>
    </style:style>
    <style:style style:name="T864" style:family="text">
      <style:text-properties style:font-name="Courier" fo:font-size="12pt" fo:font-style="normal" style:font-size-asian="12pt" style:font-style-asian="normal" style:font-name-complex="Courier" style:font-size-complex="12pt" style:font-style-complex="normal"/>
    </style:style>
    <style:style style:name="T865" style:family="text">
      <style:text-properties style:font-name="Courier" fo:font-size="11pt" style:font-size-asian="11pt" style:font-name-complex="Courier" style:font-size-complex="11pt"/>
    </style:style>
    <style:style style:name="T866" style:family="text">
      <style:text-properties style:use-window-font-color="true" loext:opacity="0%" style:font-name="Courier" fo:font-size="10pt" fo:font-weight="normal" fo:background-color="#ffffff" loext:char-shading-value="0" style:font-size-asian="10pt" style:font-weight-asian="normal" style:font-name-complex="Courier" style:font-size-complex="10pt"/>
    </style:style>
    <style:style style:name="T867" style:family="text">
      <style:text-properties fo:color="#000000" loext:opacity="100%" style:font-name="Courier" fo:font-size="10pt" style:font-size-asian="10pt" style:font-name-complex="Courier" style:font-size-complex="10pt"/>
    </style:style>
    <style:style style:name="T868" style:family="text">
      <style:text-properties fo:color="#000000" loext:opacity="100%"/>
    </style:style>
    <style:style style:name="T869" style:family="text">
      <style:text-properties fo:color="#000000" loext:opacity="100%" style:font-name="Courier" style:font-name-complex="Courier"/>
    </style:style>
    <style:style style:name="T870" style:family="text">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T871" style:family="text">
      <style:text-properties fo:color="#000000" loext:opacity="100%" fo:font-family="'Droid Sans Mono', monospace" fo:font-size="10.5pt" fo:font-weight="normal" fo:background-color="#ffffff" loext:char-shading-value="0" style:font-size-asian="10.5pt" style:font-weight-asian="normal" style:font-family-complex="'Droid Sans Mono', monospace"/>
    </style:style>
    <style:style style:name="T872" style:family="text">
      <style:text-properties fo:color="#0000ff" loext:opacity="100%" style:font-name="Courier" fo:font-size="10pt" fo:font-weight="normal" fo:background-color="#ffffff" loext:char-shading-value="0" style:font-size-asian="10pt" style:font-weight-asian="normal" style:font-name-complex="Courier" style:font-size-complex="10pt"/>
    </style:style>
    <style:style style:name="T873" style:family="text">
      <style:text-properties style:use-window-font-color="true" loext:opacity="0%" style:font-name="Courier" fo:font-size="11pt" fo:font-weight="normal" fo:background-color="#ffffff" loext:char-shading-value="0" style:font-size-asian="11pt" style:font-weight-asian="normal" style:font-name-complex="Courier" style:font-size-complex="11pt"/>
    </style:style>
    <style:style style:name="T874" style:family="text">
      <style:text-properties fo:color="#0000ff" loext:opacity="100%" style:font-name="Courier" fo:font-size="11pt" fo:font-style="normal" fo:font-weight="normal" fo:background-color="#ffffff" loext:char-shading-value="0" style:font-size-asian="11pt" style:font-style-asian="normal" style:font-weight-asian="normal" style:font-name-complex="Courier" style:font-size-complex="11pt" style:font-style-complex="normal"/>
    </style:style>
    <style:style style:name="T875" style:family="text">
      <style:text-properties fo:color="#a31515" loext:opacity="100%" style:font-name="Courier" fo:font-size="11pt" fo:font-style="normal" fo:font-weight="normal" fo:background-color="#ffffff" loext:char-shading-value="0" style:font-size-asian="11pt" style:font-style-asian="normal" style:font-weight-asian="normal" style:font-name-complex="Courier" style:font-size-complex="11pt" style:font-style-complex="normal"/>
    </style:style>
    <style:style style:name="T876" style:family="text">
      <style:text-properties style:use-window-font-color="true" loext:opacity="0%" style:font-name="Courier" fo:font-size="12pt" fo:font-style="normal" fo:font-weight="normal" style:font-size-asian="12pt" style:font-style-asian="normal" style:font-weight-asian="normal" style:font-name-complex="Courier" style:font-size-complex="12pt" style:font-style-complex="normal" style:font-weight-complex="normal"/>
    </style:style>
    <style:style style:name="T877" style:family="text">
      <style:text-properties style:font-name="Liberation Serif1" fo:font-size="12pt" fo:font-style="normal" fo:font-weight="bold" style:font-size-asian="12pt" style:font-style-asian="normal" style:font-weight-asian="bold" style:font-name-complex="Liberation Serif1" style:font-size-complex="12pt" style:font-style-complex="normal" style:font-weight-complex="bold"/>
    </style:style>
    <style:style style:name="T878" style:family="text">
      <style:text-properties style:use-window-font-color="true" loext:opacity="0%" style:font-name="Liberation Serif1" fo:font-size="12pt" fo:font-style="normal" fo:font-weight="bold" style:font-size-asian="12pt" style:font-style-asian="normal" style:font-weight-asian="bold" style:font-name-complex="Liberation Serif1" style:font-size-complex="12pt" style:font-style-complex="normal" style:font-weight-complex="bold"/>
    </style:style>
    <style:style style:name="T879" style:family="text">
      <style:text-properties style:use-window-font-color="true" loext:opacity="0%" style:font-name="Liberation Serif1" fo:font-size="12pt" fo:font-style="normal" fo:font-weight="normal" style:font-size-asian="12pt" style:font-style-asian="normal" style:font-weight-asian="normal" style:font-name-complex="Liberation Serif1" style:font-size-complex="12pt" style:font-style-complex="normal" style:font-weight-complex="normal"/>
    </style:style>
    <style:style style:name="T880" style:family="text">
      <style:text-properties fo:color="#008000" loext:opacity="100%" style:font-name="Courier" fo:font-size="11pt" fo:font-weight="normal" fo:background-color="#ffffff" loext:char-shading-value="0" style:font-size-asian="11pt" style:font-weight-asian="normal" style:font-name-complex="Courier" style:font-size-complex="11pt"/>
    </style:style>
    <style:style style:name="T881" style:family="text">
      <style:text-properties style:use-window-font-color="true" loext:opacity="0%" style:font-name="Courier" fo:font-size="11pt" fo:font-style="normal" fo:font-weight="normal" style:font-size-asian="11pt" style:font-style-asian="normal" style:font-weight-asian="normal" style:font-name-complex="Courier" style:font-size-complex="11pt" style:font-style-complex="normal" style:font-weight-complex="normal"/>
    </style:style>
    <style:style style:name="T882" style:family="text">
      <style:text-properties fo:color="#000080" loext:opacity="100%" fo:font-size="12pt" style:text-underline-style="solid" style:text-underline-width="auto" style:text-underline-color="font-color" style:font-size-asian="12pt" style:font-size-complex="12pt"/>
    </style:style>
    <style:style style:name="T883" style:family="text">
      <style:text-properties style:use-window-font-color="true" loext:opacity="0%" style:font-name="Liberation Serif1" fo:font-size="12pt" fo:font-style="italic" fo:font-weight="normal" style:font-size-asian="12pt" style:font-style-asian="italic" style:font-weight-asian="normal" style:font-name-complex="Liberation Serif1" style:font-size-complex="12pt" style:font-style-complex="italic" style:font-weight-complex="normal"/>
    </style:style>
    <style:style style:name="T884" style:family="text">
      <style:text-properties fo:color="#000080" loext:opacity="100%" style:text-underline-style="solid" style:text-underline-width="auto" style:text-underline-color="font-color"/>
    </style:style>
    <style:style style:name="T885" style:family="text">
      <style:text-properties fo:color="#000000" loext:opacity="100%" style:font-name="Liberation Serif1" fo:font-size="12pt" fo:font-style="normal" fo:font-weight="normal" style:font-size-asian="12pt" style:font-style-asian="normal" style:font-weight-asian="normal" style:font-name-complex="Liberation Serif1" style:font-size-complex="12pt" style:font-style-complex="normal" style:font-weight-complex="normal"/>
    </style:style>
    <style:style style:name="T886" style:family="text">
      <style:text-properties fo:color="#000000" loext:opacity="100%" style:font-name="Courier" fo:font-size="12pt" fo:font-style="normal" fo:font-weight="normal" style:font-size-asian="12pt" style:font-style-asian="normal" style:font-weight-asian="normal" style:font-name-complex="Courier" style:font-size-complex="12pt" style:font-style-complex="normal" style:font-weight-complex="normal"/>
    </style:style>
    <style:style style:name="T887" style:family="text">
      <style:text-properties fo:color="#000000" loext:opacity="100%" fo:font-family="'Liberation Mono', 'Courier New'" style:font-family-generic="modern" fo:font-size="12pt" fo:font-style="normal" fo:font-weight="normal" style:font-size-asian="12pt" style:font-style-asian="normal" style:font-weight-asian="normal" style:font-family-complex="'Liberation Mono', 'Courier New'" style:font-family-generic-complex="modern" style:font-size-complex="12pt" style:font-style-complex="normal" style:font-weight-complex="normal"/>
    </style:style>
    <style:style style:name="T888" style:family="text">
      <style:text-properties fo:color="#000000" loext:opacity="100%" fo:font-size="12pt" fo:font-style="normal" fo:font-weight="normal" style:font-size-asian="12pt" style:font-style-asian="normal" style:font-weight-asian="normal" style:font-size-complex="12pt" style:font-style-complex="normal" style:font-weight-complex="normal"/>
    </style:style>
    <style:style style:name="T889" style:family="text">
      <style:text-properties fo:color="#000000" loext:opacity="100%" fo:font-style="italic" style:font-style-asian="italic" style:font-style-complex="italic"/>
    </style:style>
    <style:style style:name="T890" style:family="text">
      <style:text-properties fo:color="#000000" loext:opacity="100%" style:font-name="Liberation Serif1" fo:font-size="12pt" fo:font-style="normal" fo:font-weight="bold" style:font-size-asian="12pt" style:font-style-asian="normal" style:font-weight-asian="bold" style:font-name-complex="Liberation Serif1" style:font-size-complex="12pt" style:font-style-complex="normal" style:font-weight-complex="bold"/>
    </style:style>
    <style:style style:name="T891" style:family="text">
      <style:text-properties fo:color="#000000" loext:opacity="100%" fo:font-weight="bold" style:font-weight-asian="bold" style:font-weight-complex="bold"/>
    </style:style>
    <style:style style:name="T892" style:family="text">
      <style:text-properties fo:color="#800080" loext:opacity="100%" style:font-name="Courier" fo:font-size="12pt" fo:font-style="normal" fo:font-weight="normal" style:font-size-asian="12pt" style:font-style-asian="normal" style:font-weight-asian="normal" style:font-name-complex="Courier" style:font-size-complex="12pt" style:font-style-complex="normal" style:font-weight-complex="normal"/>
    </style:style>
    <style:style style:name="T893" style:family="text">
      <style:text-properties fo:color="#0000ff" loext:opacity="100%" style:font-name="Courier" fo:font-size="12pt" fo:font-weight="normal" fo:background-color="#ffffff" loext:char-shading-value="0" style:font-size-asian="12pt" style:font-weight-asian="normal" style:font-name-complex="Courier" style:font-size-complex="12pt"/>
    </style:style>
    <style:style style:name="T894" style:family="text">
      <style:text-properties fo:color="#0000ff" loext:opacity="100%" style:font-name="Courier" fo:background-color="#ffffff" loext:char-shading-value="0" style:font-name-complex="Courier"/>
    </style:style>
    <style:style style:name="T895" style:family="text">
      <style:text-properties fo:color="#000000" loext:opacity="100%" style:font-name="Courier" fo:font-size="10pt" fo:font-style="normal" fo:font-weight="normal" fo:background-color="#ffffff" loext:char-shading-value="0" style:font-size-asian="10pt" style:font-style-asian="normal" style:font-weight-asian="normal" style:font-name-complex="Courier" style:font-size-complex="10pt" style:font-style-complex="normal" style:font-weight-complex="normal"/>
    </style:style>
    <style:style style:name="T896" style:family="text">
      <style:text-properties fo:color="#000000" loext:opacity="100%" style:font-name="Courier" fo:font-size="11pt" fo:font-style="normal" fo:font-weight="normal" fo:background-color="#ffffff" loext:char-shading-value="0" style:font-size-asian="11pt" style:font-style-asian="normal" style:font-weight-asian="normal" style:font-name-complex="Courier" style:font-size-complex="11pt" style:font-style-complex="normal" style:font-weight-complex="normal"/>
    </style:style>
    <style:style style:name="T897" style:family="text">
      <style:text-properties fo:font-size="16pt" fo:font-style="normal" fo:font-weight="bold" officeooo:rsid="0027bfe5" style:font-size-asian="16pt" style:font-style-asian="normal" style:font-weight-asian="bold" style:font-size-complex="16pt" style:font-style-complex="normal" style:font-weight-complex="bold"/>
    </style:style>
    <style:style style:name="T898" style:family="text">
      <style:text-properties fo:font-weight="bold" officeooo:rsid="002b565e" style:font-weight-asian="bold" style:font-weight-complex="bold"/>
    </style:style>
    <style:style style:name="T899" style:family="text">
      <style:text-properties fo:font-size="14pt" style:font-size-asian="14pt" style:font-size-complex="14pt"/>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ffffff" draw:fill="solid" draw:fill-color="#ffffff" fo:padding="0.0008in" fo:border="none" style:mirror="none" fo:clip="rect(-0.0008in, -0.0008in, -0.0008in, -0.0008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top" style:vertical-rel="paragraph" style:horizontal-pos="center" style:horizontal-rel="paragraph" fo:background-color="#ffffff" draw:fill="solid" draw:fill-color="#ffffff" fo:padding="0.0008in" fo:border="none" style:mirror="none" fo:clip="rect(-0.0008in, -0.0008in, -0.0008in, -0.0008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2">Advanced programming in the Linux environment</text:p>
      <text:p text:style-name="P2"/>
      <text:p text:style-name="P2">Book Proposal</text:p>
      <text:p text:style-name="P2"/>
      <text:p text:style-name="P2"/>
      <text:p text:style-name="P3">by</text:p>
      <text:p text:style-name="P3">Marco Bruno</text:p>
      <text:p text:style-name="P3"/>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oft-page-break/>Proposal contents</text:p>
      <text:p text:style-name="P4"/>
      <text:p text:style-name="P4">Description………………………………………………………………...<text:span text:style-name="T1">3</text:span></text:p>
      <text:p text:style-name="P4"/>
      <text:p text:style-name="P6">Target and key features…………………………………………………….4</text:p>
      <text:p text:style-name="P6"/>
      <text:p text:style-name="P6">Why this book………………………………………………………………5</text:p>
      <text:p text:style-name="P4"/>
      <text:p text:style-name="P4">About the author<text:span text:style-name="T2">s…………………………………………………………..</text:span><text:span text:style-name="T3">6</text:span></text:p>
      <text:p text:style-name="P4"/>
      <text:p text:style-name="P7">Table of contents<text:span text:style-name="T2">………………………………………..…………………..</text:span><text:span text:style-name="T4">7</text:span></text:p>
      <text:p text:style-name="P4"/>
      <text:p text:style-name="P7">Annotated table of contents<text:span text:style-name="T2">………………………………………………..</text:span><text:span text:style-name="T4">20</text:span></text:p>
      <text:p text:style-name="P4"/>
      <text:p text:style-name="P7">Sample Chapter<text:span text:style-name="T2">…………………………………………………………….</text:span><text:span text:style-name="T1">2</text:span><text:span text:style-name="T4">2</text:span></text:p>
      <text:p text:style-name="P4"/>
      <text:p text:style-name="P7">The Competition<text:span text:style-name="T2">……………………………………………………………</text:span><text:span text:style-name="T4">50</text:span></text:p>
      <text:p text:style-name="P4"/>
      <text:p text:style-name="P7">Contact Information<text:span text:style-name="T2">………………………………………………………...</text:span><text:span text:style-name="T4">52</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oft-page-break/>Description</text:p>
      <text:p text:style-name="P4"/>
      <text:p text:style-name="Standard">Modern Linux systems power everything from cloud infrastructure to embedded devices, yet many developers rely on high-level abstractions without understanding how software actually interacts with the operating system.</text:p>
      <text:p text:style-name="P8"><text:span text:style-name="Emphasis"><text:span text:style-name="T5">Advanced Programming in the Linux Environment</text:span></text:span> provides a structured and practical path to mastering system-level programming on Linux. Rather than functioning as a traditional reference manual, the book transforms low-level system interfaces into a coherent learning journey, guiding readers from fundamental concepts to advanced topics used in real-world software.</text:p>
      <text:p text:style-name="Standard"/>
      <text:p text:style-name="Standard">The book is built around a simple principle: <text:span text:style-name="Strong_20_Emphasis"><text:span text:style-name="T6">understanding comes from observing how programs behave at runtime.</text:span></text:span><text:line-break/>To support this, it integrates tools such as <text:span text:style-name="Source_20_Text"><text:span text:style-name="T7">strace</text:span></text:span> and <text:span text:style-name="Source_20_Text"><text:span text:style-name="T7">gdb</text:span></text:span> throughout, enabling readers to connect source code with system calls, process behavior, and kernel interaction.</text:p>
      <text:p text:style-name="Standard"/>
      <text:p text:style-name="Standard"><text:span text:style-name="T6">Unlike many existing texts, this book emphasizes </text:span><text:span text:style-name="Strong_20_Emphasis"><text:span text:style-name="T6">modern Linux features and practices</text:span></text:span><text:span text:style-name="T6">, including:</text:span></text:p>
      <text:p text:style-name="Standard"/>
      <text:list text:style-name="L1">
        <text:list-item>
          <text:p text:style-name="P9">asynchronous I/O with <text:span text:style-name="Source_20_Text"><text:span text:style-name="T7">io_uring</text:span></text:span><text:span text:style-name="T7"> </text:span></text:p>
        </text:list-item>
        <text:list-item>
          <text:p text:style-name="P9">advanced interprocess communication mechanisms </text:p>
        </text:list-item>
        <text:list-item>
          <text:p text:style-name="P9">namespaces and system isolation </text:p>
        </text:list-item>
        <text:list-item>
          <text:p text:style-name="P9">process security with <text:span text:style-name="Source_20_Text"><text:span text:style-name="T7">seccomp</text:span></text:span> </text:p>
        </text:list-item>
        <text:list-item>
          <text:p text:style-name="P9">system-level authentication through PAM </text:p>
        </text:list-item>
        <text:list-item>
          <text:p text:style-name="P9">in-depth analysis of the ELF format and program execution lifecycle </text:p>
          <text:p text:style-name="P9"/>
        </text:list-item>
      </text:list>
      <text:p text:style-name="Standard">A defining characteristic of the book is its approach to the Linux manual pages. Instead of treating them as passive documentation, the book turns them into <text:span text:style-name="Strong_20_Emphasis"><text:span text:style-name="T6">active learning tools</text:span></text:span><text:span text:style-name="T6">,</text:span> providing multiple real, executable examples for each interface and demonstrating how they are used in practice.</text:p>
      <text:p text:style-name="Standard"/>
      <text:p text:style-name="Standard">Each chapter combines:</text:p>
      <text:p text:style-name="Standard"/>
      <text:list text:style-name="L2">
        <text:list-item>
          <text:p text:style-name="P10">clear explanations of system interfaces </text:p>
        </text:list-item>
        <text:list-item>
          <text:p text:style-name="P10">carefully designed, runnable code examples </text:p>
        </text:list-item>
        <text:list-item>
          <text:p text:style-name="P10">analysis of runtime behavior using debugging and tracing tools </text:p>
        </text:list-item>
        <text:list-item>
          <text:p text:style-name="P11">dedicated “Theory and Insights” sections to reinforce deeper understanding </text:p>
        </text:list-item>
      </text:list>
      <text:p text:style-name="P12"/>
      <text:p text:style-name="Standard"><text:span text:style-name="Source_20_Text"><text:span text:style-name="T8">Particular attention is given to depth and completeness. Rather than presenting system interfaces superficially, the book examines topics in detail, exploring not only how APIs are used, but also their behavior, design rationale, limitations, and interaction with the Linux kernel and runtime environment. The goal is to provide readers with a comprehensive understanding that extends beyond isolated examples or introductory usage patterns.</text:span></text:span></text:p>
      <text:p text:style-name="P12"/>
      <text:p text:style-name="Standard">The result is a resource that bridges the gap between documentation and practical expertise, helping readers move from writing code to understanding how software operates within the Linux system.</text:p>
      <text:p text:style-name="Standard"/>
      <text:p text:style-name="Standard"/>
      <text:p text:style-name="Standard"/>
      <text:p text:style-name="Standard"/>
      <text:p text:style-name="Standard"/>
      <text:p text:style-name="Standard"/>
      <text:p text:style-name="Standard"/>
      <text:p text:style-name="P13"><text:soft-page-break/><text:span text:style-name="T9">Target</text:span></text:p>
      <text:p text:style-name="Standard"/>
      <text:p text:style-name="Standard"><text:span text:style-name="Strong_20_Emphasis">Primary audience:</text:span></text:p>
      <text:list text:style-name="L3">
        <text:list-item>
          <text:p text:style-name="P14">Intermediate C programmers who want to develop a solid understanding of Linux system programming </text:p>
        </text:list-item>
        <text:list-item>
          <text:p text:style-name="P14">Software developers transitioning from application-level programming to system-level development </text:p>
        </text:list-item>
      </text:list>
      <text:p text:style-name="Standard"><text:span text:style-name="Strong_20_Emphasis">Secondary audience:</text:span></text:p>
      <text:list text:style-name="L4">
        <text:list-item>
          <text:p text:style-name="P15">Backend and systems engineers working on performance-critical or low-level components </text:p>
        </text:list-item>
        <text:list-item>
          <text:p text:style-name="P15">Advanced students in computer science or software engineering </text:p>
        </text:list-item>
      </text:list>
      <text:p text:style-name="Standard"><text:span text:style-name="Strong_20_Emphasis">Prerequisites:</text:span></text:p>
      <text:list text:style-name="L5">
        <text:list-item>
          <text:p text:style-name="P16">Solid knowledge of C programming </text:p>
        </text:list-item>
        <text:list-item>
          <text:p text:style-name="P16">Basic familiarity with Linux command-line usage</text:p>
        </text:list-item>
      </text:list>
      <text:p text:style-name="Standard"><text:span text:style-name="Strong_20_Emphasis"/></text:p>
      <text:p text:style-name="P13"><text:span text:style-name="Strong_20_Emphasis"><text:span text:style-name="T9">Key Features</text:span></text:span></text:p>
      <text:p text:style-name="P13"><text:span text:style-name="Strong_20_Emphasis"><text:span text:style-name="T10"/></text:span></text:p>
      <text:list text:style-name="L6">
        <text:list-item>
          <text:p text:style-name="P17"><text:span text:style-name="Strong_20_Emphasis">Modern focus</text:span><text:line-break/>Covers recent Linux features such as <text:span text:style-name="Source_20_Text"><text:span text:style-name="T7">io_uring</text:span></text:span>, namespaces, and advanced kernel interfaces often missing from traditional books. </text:p>
        </text:list-item>
        <text:list-item>
          <text:p text:style-name="P17"><text:span text:style-name="Strong_20_Emphasis">From documentation to mastery</text:span><text:line-break/>Transforms Linux manual pages into structured, example-driven learning rather than passive reference material. </text:p>
        </text:list-item>
        <text:list-item>
          <text:p text:style-name="P17"><text:span text:style-name="Strong_20_Emphasis">Runtime-oriented learning</text:span><text:line-break/>Strong emphasis on observing program behavior using tools like <text:span text:style-name="Source_20_Text"><text:span text:style-name="T7">strace</text:span></text:span> and <text:span text:style-name="Source_20_Text"><text:span text:style-name="T7">gdb</text:span></text:span>, helping readers build mental models of system execution. </text:p>
        </text:list-item>
        <text:list-item>
          <text:p text:style-name="P17"><text:span text:style-name="Strong_20_Emphasis">Complete system-level perspective</text:span><text:line-break/>Covers the full lifecycle of a program: loading, execution, interaction with the kernel, and termination. </text:p>
        </text:list-item>
        <text:list-item>
          <text:p text:style-name="P17"><text:span text:style-name="Strong_20_Emphasis">Balanced theory and practice</text:span><text:line-break/>Each chapter includes a “Theory and Insights” section to deepen understanding beyond code examples. </text:p>
        </text:list-item>
        <text:list-item>
          <text:p text:style-name="P17"><text:span text:style-name="Strong_20_Emphasis">Real-world applicability</text:span><text:line-break/>Focus on practical patterns and techniques used in actual system and backend development. </text:p>
        </text:list-item>
      </text:list>
      <text:p text:style-name="Standard"/>
      <text:p text:style-name="Standard"/>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8"><text:soft-page-break/><text:span text:style-name="Strong_20_Emphasis"><text:span text:style-name="T11">W</text:span></text:span><text:span text:style-name="Strong_20_Emphasis"><text:span text:style-name="T12">hy this book</text:span></text:span></text:p>
      <text:p text:style-name="Standard"><text:span text:style-name="Strong_20_Emphasis"/></text:p>
      <text:p text:style-name="Standard">This book addresses a gap between traditional system programming references and the needs of modern developers.</text:p>
      <text:p text:style-name="Standard">Classic texts in this area provide strong theoretical foundations but often:</text:p>
      <text:p text:style-name="Standard"/>
      <text:list text:style-name="L7">
        <text:list-item>
          <text:p text:style-name="P19">lack coverage of newer Linux features </text:p>
        </text:list-item>
        <text:list-item>
          <text:p text:style-name="P19">are structured primarily as reference manuals </text:p>
        </text:list-item>
        <text:list-item>
          <text:p text:style-name="P19">do not emphasize runtime analysis and debugging workflows </text:p>
        </text:list-item>
      </text:list>
      <text:p text:style-name="Standard"/>
      <text:p text:style-name="Standard">At the same time, many online resources are fragmented, incomplete, or overly simplified.</text:p>
      <text:p text:style-name="Standard"><text:span text:style-name="Strong_20_Emphasis"><text:span text:style-name="T13">Advanced Programming in the Linux environment</text:span></text:span><text:span text:style-name="T8"> positions itself as:</text:span></text:p>
      <text:p text:style-name="P12"/>
      <text:list text:style-name="L8">
        <text:list-item>
          <text:p text:style-name="P20"><text:span text:style-name="T14">a </text:span><text:span text:style-name="Strong_20_Emphasis"><text:span text:style-name="T14">structured learning path</text:span></text:span><text:span text:style-name="T14"> rather than a reference </text:span></text:p>
        </text:list-item>
        <text:list-item>
          <text:p text:style-name="P20"><text:span text:style-name="T14">a </text:span><text:span text:style-name="Strong_20_Emphasis"><text:span text:style-name="T14">modern complement</text:span></text:span><text:span text:style-name="T14"> to classic texts </text:span></text:p>
        </text:list-item>
        <text:list-item>
          <text:p text:style-name="P20"><text:span text:style-name="T14">a bridge between </text:span><text:span text:style-name="Strong_20_Emphasis"><text:span text:style-name="T14">documentation and real-world usage</text:span></text:span><text:span text:style-name="T14"> </text:span></text:p>
        </text:list-item>
      </text:list>
      <text:p text:style-name="Standard"/>
      <text:p text:style-name="Standard">It is particularly suited for developers who want not only to use system interfaces, but to understand how software behaves within the Linux environment.</text:p>
      <text:p text:style-name="Standard"/>
      <text:p text:style-name="Standard">The need for system-level understanding is increasing due to:</text:p>
      <text:p text:style-name="Standard"/>
      <text:list text:style-name="L9">
        <text:list-item>
          <text:p text:style-name="P21">widespread use of Linux in cloud and containerized environments </text:p>
        </text:list-item>
        <text:list-item>
          <text:p text:style-name="P21">growing importance of performance, scalability, and security </text:p>
        </text:list-item>
        <text:list-item>
          <text:p text:style-name="P21">renewed interest in low-level programming and systems design </text:p>
        </text:list-item>
      </text:list>
      <text:p text:style-name="Standard"/>
      <text:p text:style-name="Standard">At the same time, developers often rely on abstractions that hide system behavior, creating a gap between writing code and understanding its execution.</text:p>
      <text:p text:style-name="Standard">This book addresses that gap by providing a modern, practical, and deeply technical guide to Linux system programmin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2"><text:soft-page-break/><text:span text:style-name="T15">A</text:span><text:span text:style-name="T16">bout the authors</text:span></text:p>
      <text:p text:style-name="P23"/>
      <text:p text:style-name="P24">Marco Bruno</text:p>
      <text:p text:style-name="Standard"><text:span text:style-name="T17">Marco Bruno</text:span> is a software developer and educator with over twenty years of experience in information technology and professional training. He began his career as a system administrator, working extensively with UNIX and Linux systems, where he developed strong expertise in system-level operations.</text:p>
      <text:p text:style-name="Standard"/>
      <text:p text:style-name="Standard">Over time, he specialized in C programming on Linux, focusing on system programming and low-level software development. He has taught these subjects through private courses and technical training programs, combining practical experience with a clear and methodical teaching approach.</text:p>
      <text:p text:style-name="Standard">He has also gained significant international working experience, collaborating with companies and professionals across different countries and technical environments. This exposure has contributed to a broad and adaptable perspective on software development practices and system architectures.</text:p>
      <text:p text:style-name="Standard"/>
      <text:p text:style-name="Standard">Throughout his career, Mr. <text:span text:style-name="T18">Bruno</text:span> has developed software for a wide range of companies, working across multiple domains, including system software, user applications, network programming, and web development. His experience spans several widely used programming languages, including C, Python, and Java.</text:p>
      <text:p text:style-name="Text_20_body">He combines extensive industry experience with a strong ability to both develop complex software systems and effectively teach their underlying principles.</text:p>
      <text:p text:style-name="Text_20_body"/>
      <text:p text:style-name="Standard"/>
      <text:p text:style-name="Standard"/>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text:soft-page-break/>Table of contents</text:p>
      <text:p text:style-name="P25"/>
      <text:p text:style-name="P27"><text:span text:style-name="T19">Chapter</text:span> 0 – <text:span text:style-name="T20">Tools</text:span></text:p>
      <text:p text:style-name="P28"/>
      <text:p text:style-name="P29"><text:span text:style-name="T21">0.1. </text:span><text:span text:style-name="T22">C</text:span><text:span text:style-name="T23">ode, functions and commands</text:span></text:p>
      <text:p text:style-name="P30"><text:span text:style-name="T24">0.2. </text:span>Compil<text:span text:style-name="T20">ation</text:span></text:p>
      <text:p text:style-name="P31"><text:span text:style-name="T25">0.3. </text:span><text:span text:style-name="T20">Build details</text:span></text:p>
      <text:p text:style-name="P32">0.<text:span text:style-name="T26">4.</text:span> <text:span text:style-name="T27">The </text:span>GNU C Compiler</text:p>
      <text:p text:style-name="P33"><text:tab/>0.4.1 The linker</text:p>
      <text:p text:style-name="P32"><text:tab/><text:span text:style-name="T28">0.4.2 </text:span><text:span text:style-name="T29">Executable files and </text:span><text:span text:style-name="T30">cross-compiling</text:span></text:p>
      <text:p text:style-name="P34">0.<text:span text:style-name="T26">5.</text:span> <text:span text:style-name="T20">The standard library and</text:span><text:span text:style-name="T31"> </text:span><text:span text:style-name="T32">the </text:span>header<text:span text:style-name="T20">s</text:span></text:p>
      <text:p text:style-name="P35"><text:span text:style-name="T33">0.</text:span><text:span text:style-name="T34">6. </text:span><text:span text:style-name="T33">Make</text:span></text:p>
      <text:p text:style-name="P36">0.7. Autoconf</text:p>
      <text:p text:style-name="P37">0.<text:span text:style-name="T35">8.</text:span> Gdb</text:p>
      <text:p text:style-name="P38">0.<text:span text:style-name="T36">9.</text:span> <text:span text:style-name="T20">The</text:span> Linux File System</text:p>
      <text:p text:style-name="P39">0.<text:span text:style-name="T37">10. </text:span><text:span text:style-name="T32">Documentatio</text:span><text:span text:style-name="T38">n</text:span></text:p>
      <text:p text:style-name="P40"><text:span text:style-name="T39"><text:tab/>0.10.1 </text:span><text:span text:style-name="T40">gman</text:span><text:span text:style-name="T41"> </text:span><text:span text:style-name="T42">and</text:span><text:span text:style-name="T41"> </text:span><text:span text:style-name="T43">gtkman</text:span></text:p>
      <text:p text:style-name="P40"><text:span text:style-name="T44"><text:tab/>0.10.2 </text:span><text:span text:style-name="T40">whatis</text:span></text:p>
      <text:p text:style-name="P39"><text:span text:style-name="T45"><text:tab/>0.10.3 </text:span><text:span text:style-name="T46">info</text:span></text:p>
      <text:p text:style-name="P40"><text:span text:style-name="T47"><text:tab/></text:span><text:span text:style-name="T44">0.10.4 </text:span><text:span text:style-name="T40">apropos</text:span></text:p>
      <text:p text:style-name="P39"><text:tab/><text:span text:style-name="T45">0.10.5 </text:span><text:span text:style-name="T48">The </text:span><text:span text:style-name="T49">g</text:span><text:span text:style-name="T50">libc</text:span><text:span text:style-name="T45"> documentation</text:span></text:p>
      <text:p text:style-name="P39">0.<text:span text:style-name="T35">1</text:span><text:span text:style-name="T37">1.</text:span> <text:span text:style-name="T20">The source code</text:span></text:p>
      <text:p text:style-name="P41">0.12. Error handling and exit functions</text:p>
      <text:p text:style-name="P42">0.1<text:span text:style-name="T51">3.</text:span> <text:span text:style-name="T20">The S</text:span>tandards</text:p>
      <text:p text:style-name="P43">0.1<text:span text:style-name="T51">4.</text:span> <text:span text:style-name="T20">The</text:span> <text:span text:style-name="T52">GNU General Public License</text:span></text:p>
      <text:p text:style-name="P40"><text:span text:style-name="T53">0.1</text:span><text:span text:style-name="T54">5.</text:span><text:span text:style-name="T55"> </text:span><text:span text:style-name="T56">T</text:span><text:span text:style-name="T55">heory </text:span><text:span text:style-name="T42">and</text:span><text:span text:style-name="T55"> </text:span><text:span text:style-name="T42">i</text:span><text:span text:style-name="T55">nsights</text:span></text:p>
      <text:p text:style-name="P44"><text:tab/><text:span text:style-name="T57">0.15.1 </text:span><text:span text:style-name="T58">The GNU C </text:span><text:span text:style-name="T59">C</text:span><text:span text:style-name="T58">ompiler: </text:span><text:span text:style-name="T60">gcc</text:span></text:p>
      <text:p text:style-name="P40"><text:span text:style-name="T61"><text:tab/></text:span><text:span text:style-name="T62">0.15.2 </text:span><text:span text:style-name="T63">The GNU Debugger: </text:span><text:span text:style-name="T64">gdb</text:span></text:p>
      <text:p text:style-name="P44"><text:tab/><text:span text:style-name="T57">0.15.3 </text:span><text:span text:style-name="T65">Bytes order</text:span></text:p>
      <text:p text:style-name="P44"><text:tab/><text:span text:style-name="T57">0.15.4 </text:span><text:span text:style-name="T65">Static and dynamic linking</text:span></text:p>
      <text:p text:style-name="P40"><text:span text:style-name="T66">L</text:span><text:span text:style-name="T56">ist of </text:span><text:span text:style-name="T67">tables</text:span></text:p>
      <text:p text:style-name="P40"><text:span text:style-name="T56">List of </text:span><text:span text:style-name="T67">figures</text:span></text:p>
      <text:p text:style-name="P45"/>
      <text:p text:style-name="P46"><text:span text:style-name="T68">Chapter</text:span> <text:span text:style-name="T69">I</text:span> –<text:span text:style-name="T70"> </text:span><text:span text:style-name="T71">File </text:span><text:span text:style-name="T70">I/O</text:span></text:p>
      <text:p text:style-name="P46"/>
      <text:p text:style-name="P47">I.1 <text:span text:style-name="T71">Read</text:span><text:span text:style-name="T72">ing</text:span><text:span text:style-name="T71"> </text:span>files</text:p>
      <text:p text:style-name="P40"><text:span text:style-name="T73"><text:tab/>I.1.1 Open</text:span><text:span text:style-name="T74">ing</text:span><text:span text:style-name="T73"> files: </text:span><text:span text:style-name="T75">open</text:span><text:span text:style-name="T73"> and </text:span><text:span text:style-name="T76">close</text:span></text:p>
      <text:p text:style-name="P40"><text:span text:style-name="T77"><text:tab/></text:span><text:span text:style-name="T78">I.1.2 Read</text:span><text:span text:style-name="T74">ing</text:span><text:span text:style-name="T78"> from file: </text:span><text:span text:style-name="T75">read</text:span></text:p>
      <text:p text:style-name="P40"><text:span text:style-name="T79"><text:tab/>I.1.3 </text:span><text:span text:style-name="T80">Writ</text:span><text:span text:style-name="T74">ing</text:span><text:span text:style-name="T80"> to file: </text:span><text:span text:style-name="T75">write</text:span></text:p>
      <text:p text:style-name="P40"><text:span text:style-name="T77"><text:tab/></text:span><text:span text:style-name="T81">I.1.4 The standard library functions: </text:span><text:span text:style-name="T75">fopen,</text:span><text:span text:style-name="T80"> </text:span><text:span text:style-name="T75">fclose</text:span><text:span text:style-name="T81"> and </text:span><text:span text:style-name="T75">fcloseall</text:span></text:p>
      <text:p text:style-name="P40"><text:span text:style-name="T77"><text:tab/></text:span><text:span text:style-name="T82">I.1.5 Read</text:span><text:span text:style-name="T74">ing</text:span><text:span text:style-name="T82"> one character at a time: </text:span><text:span text:style-name="T75">fgetc</text:span><text:span text:style-name="T83"> and </text:span><text:span text:style-name="T75">fputc</text:span></text:p>
      <text:p text:style-name="P40"><text:span text:style-name="T77"><text:tab/></text:span><text:span text:style-name="T84">I.1.</text:span><text:span text:style-name="T83">6</text:span><text:span text:style-name="T84"> Read</text:span><text:span text:style-name="T74">ing</text:span><text:span text:style-name="T84"> one line at a time: </text:span><text:span text:style-name="T75">fgets</text:span><text:span text:style-name="T83"> and </text:span><text:span text:style-name="T75">fputs</text:span></text:p>
      <text:p text:style-name="P48">I.2 <text:span text:style-name="T71">Open</text:span><text:span text:style-name="T72">ing</text:span> files</text:p>
      <text:p text:style-name="P40"><text:span text:style-name="T85"><text:tab/>I.2.1 The </text:span><text:span text:style-name="T86">fdopen</text:span><text:span text:style-name="T85"> </text:span><text:span text:style-name="T87">and</text:span><text:span text:style-name="T85"> </text:span><text:span text:style-name="T86">fileno</text:span><text:span text:style-name="T85"> functions</text:span></text:p>
      <text:p text:style-name="P40"><text:span text:style-name="T88"><text:tab/></text:span><text:span text:style-name="T85">I.2.2 The </text:span><text:span text:style-name="T86">freopen</text:span><text:span text:style-name="T85"> function </text:span></text:p>
      <text:p text:style-name="P48"><text:soft-page-break/><text:tab/><text:span text:style-name="T89">I.2.</text:span><text:span text:style-name="T90">3</text:span><text:span text:style-name="T89"> The </text:span><text:span text:style-name="T91">open</text:span><text:span text:style-name="T89"> f</text:span><text:span text:style-name="T90">lags</text:span></text:p>
      <text:p text:style-name="P40"><text:span text:style-name="T88">I.3</text:span><text:span text:style-name="T92"> </text:span><text:span text:style-name="T93">Writ</text:span><text:span text:style-name="T74">ing</text:span><text:span text:style-name="T93"> </text:span><text:span text:style-name="T92">files</text:span></text:p>
      <text:p text:style-name="P49">I.<text:span text:style-name="T94">4</text:span> <text:span text:style-name="T95">Set</text:span><text:span text:style-name="T72">ting</text:span><text:span text:style-name="T95"> </text:span><text:span text:style-name="T96">file </text:span><text:span text:style-name="T95">position</text:span></text:p>
      <text:p text:style-name="P40"><text:span text:style-name="T97"><text:tab/>I.4.1 The </text:span><text:span text:style-name="T86">lseek</text:span><text:span text:style-name="T97"> function</text:span></text:p>
      <text:p text:style-name="P40"><text:span text:style-name="T97"><text:tab/>I.4.2 Get</text:span><text:span text:style-name="T74">ting</text:span><text:span text:style-name="T97"> and set</text:span><text:span text:style-name="T74">ting</text:span><text:span text:style-name="T97"> the poistion: </text:span><text:span text:style-name="T98">fgetpos</text:span><text:span text:style-name="T97"> and </text:span><text:span text:style-name="T98">fsetpos</text:span></text:p>
      <text:p text:style-name="P40"><text:span text:style-name="T92"><text:tab/></text:span><text:span text:style-name="T99">I.4.3 The </text:span><text:span text:style-name="T86">fseeko</text:span><text:span text:style-name="T99"> and </text:span><text:span text:style-name="T86">ftello</text:span><text:span text:style-name="T99"> functions</text:span></text:p>
      <text:p text:style-name="P50">I.<text:span text:style-name="T94">5</text:span> <text:span text:style-name="T71">Append</text:span><text:span text:style-name="T72">ing</text:span><text:span text:style-name="T71"> to </text:span><text:span text:style-name="T100">files</text:span></text:p>
      <text:p text:style-name="P49">I.<text:span text:style-name="T94">6</text:span> <text:span text:style-name="T71">Creat</text:span><text:span text:style-name="T72">ing</text:span><text:span text:style-name="T71"> </text:span>files</text:p>
      <text:p text:style-name="P40"><text:span text:style-name="T92"><text:tab/></text:span><text:span text:style-name="T101">I.6.1 The </text:span><text:span text:style-name="T86">open</text:span><text:span text:style-name="T101"> </text:span><text:span text:style-name="T86">O_EXCL</text:span><text:span text:style-name="T101"> flag</text:span></text:p>
      <text:p text:style-name="P40"><text:span text:style-name="T102">I.7 </text:span><text:span text:style-name="T93">Truncat</text:span><text:span text:style-name="T74">ing</text:span><text:span text:style-name="T102"> files</text:span></text:p>
      <text:p text:style-name="P49">I.<text:span text:style-name="T103">8</text:span> <text:span text:style-name="T71">R</text:span>ead<text:span text:style-name="T72">ing</text:span> and writ<text:span text:style-name="T72">ing</text:span> at a given offset</text:p>
      <text:p text:style-name="P49">I.<text:span text:style-name="T104">9</text:span> <text:span text:style-name="T71">Duplicat</text:span><text:span text:style-name="T72">ing</text:span><text:span text:style-name="T71"> a file descriptor</text:span></text:p>
      <text:p text:style-name="P40"><text:span text:style-name="T92"><text:tab/></text:span><text:span text:style-name="T105">I.9.1 The </text:span><text:span text:style-name="T86">dup2</text:span><text:span text:style-name="T105"> function</text:span></text:p>
      <text:p text:style-name="P51"><text:tab/>I.9.<text:span text:style-name="T106">2</text:span> The <text:span text:style-name="T91">dup</text:span><text:span text:style-name="T107">3</text:span> function</text:p>
      <text:p text:style-name="P40"><text:span text:style-name="T105"><text:tab/>I.9.</text:span><text:span text:style-name="T108">3</text:span><text:span text:style-name="T105"> </text:span><text:span text:style-name="T108">Set</text:span><text:span text:style-name="T74">ting</text:span><text:span text:style-name="T108"> the </text:span><text:span text:style-name="T86">O_CLOEXEC</text:span><text:span text:style-name="T108"> flag</text:span></text:p>
      <text:p text:style-name="P51"><text:tab/>I.9.<text:span text:style-name="T106">4</text:span> <text:span text:style-name="T91">dup</text:span> <text:span text:style-name="T106">errors</text:span></text:p>
      <text:p text:style-name="P49">I.<text:span text:style-name="T109">1</text:span><text:span text:style-name="T104">0</text:span> <text:span text:style-name="T71">Synchroniz</text:span><text:span text:style-name="T72">ing</text:span><text:span text:style-name="T110"> the</text:span><text:span text:style-name="T71"> data</text:span></text:p>
      <text:p text:style-name="P40"><text:span text:style-name="T111"><text:tab/>I.10.1 The </text:span><text:span text:style-name="T86">sync</text:span><text:span text:style-name="T111"> function</text:span></text:p>
      <text:p text:style-name="P49"><text:tab/><text:span text:style-name="T112">I.10.2 Synchronization errors</text:span></text:p>
      <text:p text:style-name="P49">I.<text:span text:style-name="T94">1</text:span><text:span text:style-name="T104">1</text:span> <text:span text:style-name="T71">File flags</text:span></text:p>
      <text:p text:style-name="P49"><text:span text:style-name="T113"><text:tab/></text:span><text:span text:style-name="T114">I.11.1 Duplicat</text:span><text:span text:style-name="T72">ing</text:span><text:span text:style-name="T110"> </text:span><text:span text:style-name="T114">a file descriptor</text:span></text:p>
      <text:p text:style-name="P52"><text:span text:style-name="T115"><text:tab/>I.11.2 </text:span><text:span text:style-name="T116">File descritptor f</text:span><text:span text:style-name="T117">lags</text:span></text:p>
      <text:p text:style-name="P52"><text:span text:style-name="T118"><text:tab/>I.11.3 </text:span><text:span text:style-name="T119">File s</text:span><text:span text:style-name="T120">tatus flag</text:span><text:span text:style-name="T121">s</text:span></text:p>
      <text:p text:style-name="P52"><text:span text:style-name="T122"><text:tab/>I.</text:span><text:span text:style-name="T123">11</text:span><text:span text:style-name="T122">.</text:span><text:span text:style-name="T123">4</text:span><text:span text:style-name="T122"> File descriptors and </text:span><text:span text:style-name="T124">o</text:span><text:span text:style-name="T122">pen file description</text:span></text:p>
      <text:p text:style-name="P49">I.1<text:span text:style-name="T104">2</text:span> Multiplexed I/O</text:p>
      <text:p text:style-name="P49"><text:span text:style-name="T125"><text:tab/>I.12.1 The </text:span><text:span text:style-name="T126">poll</text:span><text:span text:style-name="T125"> function</text:span></text:p>
      <text:p text:style-name="P40"><text:span text:style-name="T127"><text:tab/>I.12.2 The </text:span><text:span text:style-name="T128">ppoll</text:span><text:span text:style-name="T127"> function</text:span></text:p>
      <text:p text:style-name="P40"><text:span text:style-name="T92"><text:tab/></text:span><text:span text:style-name="T127">I.12.3 The </text:span><text:span text:style-name="T128">epoll</text:span><text:span text:style-name="T127"> interface</text:span></text:p>
      <text:p text:style-name="P49">I.1<text:span text:style-name="T104">3</text:span> <text:span text:style-name="T71">Binary </text:span>I/O</text:p>
      <text:p text:style-name="P49">I.1<text:span text:style-name="T104">4</text:span> <text:span text:style-name="T71">E</text:span>rror <text:span text:style-name="T71">handling</text:span></text:p>
      <text:p text:style-name="P40"><text:span text:style-name="T129"><text:tab/>I.14.1 </text:span><text:span text:style-name="T130">The </text:span><text:span text:style-name="T131">errno</text:span><text:span text:style-name="T129"> macro</text:span></text:p>
      <text:p text:style-name="P40"><text:span text:style-name="T129"><text:tab/>I.14.2 The </text:span><text:span text:style-name="T131">strerror*</text:span><text:span text:style-name="T129"> functions</text:span></text:p>
      <text:p text:style-name="P49"><text:span text:style-name="T132"><text:tab/>I.14.3 The </text:span><text:span text:style-name="T133">end-of-file</text:span><text:span text:style-name="T132"> and error indicators</text:span></text:p>
      <text:p text:style-name="P40"><text:span text:style-name="T92"><text:tab/></text:span><text:span text:style-name="T129">I.14.4 The </text:span><text:span text:style-name="T131">err</text:span><text:span text:style-name="T129"> and </text:span><text:span text:style-name="T131">warn</text:span><text:span text:style-name="T129"> functions</text:span></text:p>
      <text:p text:style-name="P53"><text:span text:style-name="T134"><text:tab/>I.14.5 The </text:span><text:span text:style-name="T135">glibc</text:span><text:span text:style-name="T134"> error reporting functions</text:span></text:p>
      <text:p text:style-name="P40"><text:span text:style-name="T129"><text:tab/></text:span><text:span text:style-name="T136">I.14.6 The </text:span><text:span text:style-name="T131">program_invocation_name</text:span><text:span text:style-name="T136"> variable</text:span></text:p>
      <text:p text:style-name="P49">I.1<text:span text:style-name="T104">5</text:span> <text:span text:style-name="T71">Buffered </text:span>I/O</text:p>
      <text:p text:style-name="P49"><text:tab/><text:span text:style-name="T137">I.15.1 Buffering types</text:span></text:p>
      <text:p text:style-name="P40"><text:span text:style-name="T92"><text:tab/></text:span><text:span text:style-name="T138">I.15.2 The interface to </text:span><text:span text:style-name="T131">stdio</text:span><text:span text:style-name="T138"> </text:span><text:span text:style-name="T131">FILE</text:span><text:span text:style-name="T138"> structure</text:span></text:p>
      <text:p text:style-name="P40"><text:span text:style-name="T92"><text:tab/></text:span><text:span text:style-name="T138">I.15.3 The </text:span><text:span text:style-name="T131">fwide</text:span><text:span text:style-name="T138"> function</text:span></text:p>
      <text:p text:style-name="P49">I.1<text:span text:style-name="T104">6</text:span> <text:span text:style-name="T71">Memory streams</text:span></text:p>
      <text:p text:style-name="P54">I.1<text:span text:style-name="T104">7</text:span> <text:span text:style-name="T71">Formatted </text:span>I/O</text:p>
      <text:p text:style-name="P40"><text:span text:style-name="T139"><text:tab/>I.17.1 </text:span><text:span text:style-name="T140">printf</text:span><text:span text:style-name="T139"> </text:span><text:span text:style-name="T87">and</text:span><text:span text:style-name="T139"> </text:span><text:span text:style-name="T140">scanf</text:span></text:p>
      <text:p text:style-name="P40"><text:span text:style-name="T139"><text:tab/>I.17.2 Other </text:span><text:span text:style-name="T140">printf</text:span><text:span text:style-name="T139">* functions</text:span></text:p>
      <text:p text:style-name="P55">I.1<text:span text:style-name="T104">8</text:span> <text:span text:style-name="T71">System call</text:span><text:span text:style-name="T141">s</text:span><text:span text:style-name="T71"> and library function</text:span><text:span text:style-name="T141">s</text:span></text:p>
      <text:p text:style-name="P56"><text:soft-page-break/><text:span text:style-name="T6">I.</text:span><text:span text:style-name="T142">19</text:span><text:span text:style-name="T143"> </text:span><text:span text:style-name="T144">Scatter-Gather I/O</text:span></text:p>
      <text:p text:style-name="P40"><text:span text:style-name="T145"><text:tab/>I.19.1 The </text:span><text:span text:style-name="T140">readv</text:span><text:span text:style-name="T145"> </text:span><text:span text:style-name="T146">and</text:span><text:span text:style-name="T145"> </text:span><text:span text:style-name="T140">writev</text:span><text:span text:style-name="T145"> functions</text:span></text:p>
      <text:p text:style-name="P40"><text:span text:style-name="T147"><text:tab/></text:span><text:span text:style-name="T145">I.19.2 The </text:span><text:span text:style-name="T140">preadv</text:span><text:span text:style-name="T145"> </text:span><text:span text:style-name="T146">and</text:span><text:span text:style-name="T145"> </text:span><text:span text:style-name="T140">pwritev</text:span><text:span text:style-name="T145"> functions</text:span></text:p>
      <text:p text:style-name="P57">I.2<text:span text:style-name="T104">0</text:span> Unreading</text:p>
      <text:p text:style-name="P58"><text:span text:style-name="T148">I.2</text:span><text:span text:style-name="T149">1</text:span><text:span text:style-name="T148"> </text:span><text:span text:style-name="T93">Formatted </text:span><text:span text:style-name="T150">I/O</text:span><text:span text:style-name="T148"> </text:span><text:span text:style-name="T93">with variable number of arguments</text:span></text:p>
      <text:p text:style-name="P40"><text:span text:style-name="T151"><text:tab/>I.21.1 </text:span><text:span text:style-name="T140">vprintf</text:span></text:p>
      <text:p text:style-name="P40"><text:span text:style-name="T151"><text:tab/>I.21.2 </text:span><text:span text:style-name="T140">vscanf</text:span></text:p>
      <text:p text:style-name="P40"><text:span text:style-name="T140"><text:tab/></text:span><text:span text:style-name="T151">I.21.</text:span><text:span text:style-name="T152">3</text:span><text:span text:style-name="T151"> </text:span><text:span text:style-name="T140">sscanf</text:span></text:p>
      <text:p text:style-name="P55">I.2<text:span text:style-name="T104">2</text:span> <text:span text:style-name="T71">Temporary files</text:span></text:p>
      <text:p text:style-name="P40"><text:span text:style-name="T153"><text:tab/>I.22.1 The </text:span><text:span text:style-name="T140">mkstemp*</text:span><text:span text:style-name="T153"> family functions</text:span></text:p>
      <text:p text:style-name="P40"><text:span text:style-name="T153"><text:tab/>I.22.2 The </text:span><text:span text:style-name="T140">tmpfile</text:span><text:span text:style-name="T153"> function</text:span></text:p>
      <text:p text:style-name="P40"><text:span text:style-name="T153"><text:tab/>I.22.3 Temporary files with </text:span><text:span text:style-name="T140">open</text:span></text:p>
      <text:p text:style-name="P40"><text:span text:style-name="T153"><text:tab/>I.22.4 Temporary directories: </text:span><text:span text:style-name="T140">mkdtemp</text:span></text:p>
      <text:p text:style-name="P59">I.2<text:span text:style-name="T104">3</text:span> <text:span text:style-name="T154">Advices</text:span></text:p>
      <text:p text:style-name="P60">I.2<text:span text:style-name="T104">4</text:span> <text:span text:style-name="T71">Asynchronous </text:span>I/O</text:p>
      <text:p text:style-name="P60"><text:tab/>I.24.1 POSIX AIO</text:p>
      <text:p text:style-name="P60"><text:tab/>I.24.2 Multiple I/O requests in one call</text:p>
      <text:p text:style-name="P40"><text:span text:style-name="T155"><text:tab/>I.24.3 The </text:span><text:span text:style-name="T140">aio_init</text:span><text:span text:style-name="T155"> function of the </text:span><text:span text:style-name="T140">real-time</text:span><text:span text:style-name="T155"> library</text:span></text:p>
      <text:p text:style-name="P40"><text:span text:style-name="T155"><text:tab/>I.24.</text:span><text:span text:style-name="T156">4</text:span><text:span text:style-name="T155"> </text:span><text:span text:style-name="T156">Linux AIO –</text:span><text:span text:style-name="T155"> </text:span><text:span text:style-name="T140">io_uring</text:span></text:p>
      <text:p text:style-name="P40"><text:span text:style-name="T155"><text:tab/></text:span><text:span text:style-name="T157">I.24.5 The </text:span><text:span text:style-name="T140">liburing</text:span><text:span text:style-name="T157"> library</text:span></text:p>
      <text:p text:style-name="P61"><text:tab/>I.24.<text:span text:style-name="T158">6</text:span> The <text:span text:style-name="T159">io_uring</text:span> <text:span text:style-name="T158">system calls</text:span></text:p>
      <text:p text:style-name="P60">I.2<text:span text:style-name="T160">5</text:span> <text:span text:style-name="T161">F</text:span><text:span text:style-name="T162">ile</text:span><text:span text:style-name="T71"> lock</text:span><text:span text:style-name="T161">ing</text:span></text:p>
      <text:p text:style-name="P52"><text:span text:style-name="T163"><text:tab/>I.</text:span><text:span text:style-name="T160">25</text:span><text:span text:style-name="T163">.</text:span><text:span text:style-name="T160">1</text:span><text:span text:style-name="T163"> </text:span><text:span text:style-name="T164">Advisory r</text:span><text:span text:style-name="T165">ecord l</text:span>ock<text:span text:style-name="T164">ing</text:span></text:p>
      <text:p text:style-name="P62"><text:span text:style-name="T166"><text:tab/>I.</text:span><text:span text:style-name="T167">25</text:span><text:span text:style-name="T166">.</text:span><text:span text:style-name="T168">2</text:span><text:span text:style-name="T166"> </text:span><text:span text:style-name="T169">Open</text:span><text:span text:style-name="T170">ing</text:span><text:span text:style-name="T169"> file description locks</text:span><text:span text:style-name="T171"> </text:span></text:p>
      <text:p text:style-name="P62"><text:span text:style-name="T172"><text:tab/></text:span><text:span text:style-name="T166">I.</text:span><text:span text:style-name="T173">2</text:span><text:span text:style-name="T168">5</text:span><text:span text:style-name="T166">.</text:span><text:span text:style-name="T174">3</text:span><text:span text:style-name="T166"> </text:span><text:span text:style-name="T170">T</text:span><text:span text:style-name="T174">he locks on the system</text:span></text:p>
      <text:p text:style-name="P63"><text:span text:style-name="T175"><text:tab/>I.</text:span><text:span text:style-name="T176">2</text:span><text:span text:style-name="T177">5</text:span><text:span text:style-name="T175">.</text:span><text:span text:style-name="T178">4</text:span><text:span text:style-name="T179"> </text:span><text:span text:style-name="T180">T</text:span><text:span text:style-name="T181">he </text:span><text:span text:style-name="T182">flock</text:span><text:span text:style-name="T181"> function</text:span></text:p>
      <text:p text:style-name="P40"><text:span text:style-name="T183"><text:tab/></text:span><text:span text:style-name="T184">I.</text:span><text:span text:style-name="T185">2</text:span><text:span text:style-name="T186">5</text:span><text:span text:style-name="T184">.</text:span><text:span text:style-name="T187">5</text:span><text:span text:style-name="T188"> </text:span><text:span text:style-name="T189">The </text:span><text:span text:style-name="T190">lockf</text:span><text:span text:style-name="T189"> function</text:span></text:p>
      <text:p text:style-name="P64">I.2<text:span text:style-name="T104">6</text:span> <text:span text:style-name="T191">Stream locking</text:span></text:p>
      <text:p text:style-name="P64"><text:tab/><text:span text:style-name="T192">I.26.</text:span><text:span text:style-name="T193">1</text:span><text:span text:style-name="T192"> Lock</text:span><text:span text:style-name="T72">ing</text:span><text:span text:style-name="T192"> </text:span><text:span text:style-name="T194">FILE</text:span><text:span text:style-name="T192"> for </text:span><text:span text:style-name="T194">stdio</text:span><text:tab/><text:tab/><text:tab/></text:p>
      <text:p text:style-name="P64"><text:span text:style-name="T192"><text:tab/>I.2</text:span><text:span text:style-name="T191">6</text:span><text:span text:style-name="T192">.</text:span><text:span text:style-name="T193">2</text:span><text:span text:style-name="T192"> </text:span><text:span text:style-name="T195">Nonl</text:span><text:span text:style-name="T192">ocking </text:span><text:span text:style-name="T194">stdio</text:span><text:span text:style-name="T192"> </text:span><text:span text:style-name="T195">functions</text:span></text:p>
      <text:p text:style-name="P40"><text:span text:style-name="T184"><text:tab/>I.2</text:span><text:span text:style-name="T196">6</text:span><text:span text:style-name="T184">.</text:span><text:span text:style-name="T197">3</text:span><text:span text:style-name="T184"> </text:span><text:span text:style-name="T198">Nonl</text:span><text:span text:style-name="T184">ocking </text:span><text:span text:style-name="T198">functions </text:span><text:span text:style-name="T197">for </text:span><text:span text:style-name="T199">wide-characters</text:span></text:p>
      <text:p text:style-name="P64">I.2<text:span text:style-name="T200">7</text:span> Pipes <text:span text:style-name="T71">and</text:span> FIFO</text:p>
      <text:p text:style-name="P40"><text:span text:style-name="T201"><text:tab/></text:span><text:span text:style-name="T202">I.27.1 The </text:span><text:span text:style-name="T190">pipe</text:span><text:span text:style-name="T202"> function</text:span></text:p>
      <text:p text:style-name="P40"><text:span text:style-name="T202"><text:tab/>I.27.2 The </text:span><text:span text:style-name="T190">popen</text:span><text:span text:style-name="T202"> function</text:span></text:p>
      <text:p text:style-name="P65"><text:tab/>I.27.3 Two-way communication</text:p>
      <text:p text:style-name="P64"><text:span text:style-name="T203"><text:tab/>I.27.</text:span><text:span text:style-name="T204">4 FIFOs</text:span></text:p>
      <text:p text:style-name="P66"><text:tab/>I.27.6 Pipes tunable values</text:p>
      <text:p text:style-name="P67"><text:tab/>I.27.7 I/O on pipes and FIFOs</text:p>
      <text:p text:style-name="P66"><text:span text:style-name="T205"><text:tab/>I.27.</text:span><text:span text:style-name="T206">8</text:span><text:span text:style-name="T205"> </text:span><text:span text:style-name="T206">P</text:span><text:span text:style-name="T205">ipes and </text:span><text:span text:style-name="T206">formatted I/O</text:span></text:p>
      <text:p text:style-name="P40"><text:span text:style-name="T207"><text:tab/>I.27.</text:span><text:span text:style-name="T208">9. </text:span><text:span text:style-name="T209">The </text:span><text:span text:style-name="T190">splice</text:span><text:span text:style-name="T209"> </text:span><text:span text:style-name="T146">and</text:span><text:span text:style-name="T209"> </text:span><text:span text:style-name="T190">vmsplice</text:span><text:span text:style-name="T209"> functions</text:span></text:p>
      <text:p text:style-name="P66"><text:tab/><text:span text:style-name="T210">I.27.10 Duplicat</text:span><text:span text:style-name="T72">ing</text:span><text:span text:style-name="T210"> pipe </text:span><text:span text:style-name="T211">data</text:span></text:p>
      <text:p text:style-name="P40"><text:span text:style-name="T201">I.2</text:span><text:span text:style-name="T212">8</text:span><text:span text:style-name="T201"> </text:span><text:span text:style-name="T190">fcntl</text:span><text:span text:style-name="T213"> commands</text:span></text:p>
      <text:p text:style-name="P68"><text:tab/>I.28.1 Managing signals</text:p>
      <text:p text:style-name="P68"><text:tab/>I.28.2 Leases</text:p>
      <text:p text:style-name="P68"><text:tab/>I.28.3 File and directory change notification: <text:span text:style-name="T214">dnotify</text:span></text:p>
      <text:p text:style-name="P68"><text:tab/>I.28.4 Chang<text:span text:style-name="T72">ing</text:span> the capacity of a pipe</text:p>
      <text:p text:style-name="P68"><text:soft-page-break/><text:tab/>I.28.5 File Sealing</text:p>
      <text:p text:style-name="P68"><text:tab/>I.28.6 File read/write hints</text:p>
      <text:p text:style-name="P69">I.29 File allocation</text:p>
      <text:p text:style-name="P55"><text:span text:style-name="T215">I.</text:span><text:span text:style-name="T216">30</text:span><text:span text:style-name="T215"> </text:span><text:span text:style-name="T217">T</text:span><text:span text:style-name="T215">heory and </text:span><text:span text:style-name="T218">i</text:span><text:span text:style-name="T215">nsights</text:span></text:p>
      <text:p text:style-name="P55"><text:tab/>I.30.1 I/O</text:p>
      <text:p text:style-name="P55"><text:tab/>I.30.2 File descriptors</text:p>
      <text:p text:style-name="P55"><text:tab/>I.30.<text:span text:style-name="T219">3</text:span> File sizes data types</text:p>
      <text:p text:style-name="P55"><text:tab/>I.30.<text:span text:style-name="T219">4</text:span> Positioning data type<text:span text:style-name="T220">s</text:span></text:p>
      <text:p text:style-name="P55"><text:tab/>I.30.<text:span text:style-name="T219">5</text:span> Multibyte representation conversion</text:p>
      <text:p text:style-name="P55"><text:tab/>I.30.<text:span text:style-name="T219">6</text:span> Functions for <text:span text:style-name="T221">wide characters</text:span></text:p>
      <text:p text:style-name="P55"><text:tab/>I.30.<text:span text:style-name="T219">7</text:span> Read<text:span text:style-name="T72">ing</text:span> with <text:span text:style-name="T222">sscanf</text:span></text:p>
      <text:p text:style-name="P55"><text:tab/>I.30.<text:span text:style-name="T219">8</text:span> Writ<text:span text:style-name="T72">ing</text:span> on memory streams</text:p>
      <text:p text:style-name="P40"><text:span text:style-name="T153"><text:tab/>I.30.</text:span><text:span text:style-name="T223">9</text:span><text:span text:style-name="T153"> The </text:span><text:span text:style-name="T224">getopt</text:span><text:span text:style-name="T153"> function</text:span></text:p>
      <text:p text:style-name="P55"><text:tab/>I.30.1<text:span text:style-name="T219">0</text:span> Synchronous and <text:span text:style-name="T220">A</text:span>synchronous I/O</text:p>
      <text:p text:style-name="P55"><text:tab/><text:span text:style-name="T225">I.30.</text:span><text:span text:style-name="T226">1</text:span><text:span text:style-name="T227">1</text:span><text:span text:style-name="T225"> </text:span><text:span text:style-name="T227">The </text:span><text:span text:style-name="T228">aiomonitor.c</text:span><text:span text:style-name="T227"> program</text:span></text:p>
      <text:p text:style-name="P40"><text:span text:style-name="T153"><text:tab/>I.30.1</text:span><text:span text:style-name="T229">2</text:span><text:span text:style-name="T153"> The </text:span><text:span text:style-name="T224">io_uring_sqe</text:span><text:span text:style-name="T153"> structure</text:span></text:p>
      <text:p text:style-name="P40"><text:span text:style-name="T153"><text:tab/>I.30.1</text:span><text:span text:style-name="T229">3</text:span><text:span text:style-name="T153"> The functions of </text:span><text:span text:style-name="T224">liburing</text:span></text:p>
      <text:p text:style-name="P40"><text:span text:style-name="T153"><text:tab/>I.30.1</text:span><text:span text:style-name="T229">4</text:span><text:span text:style-name="T153"> The program from the </text:span><text:span text:style-name="T224">io_uring</text:span><text:span text:style-name="T153"> manual page</text:span></text:p>
      <text:p text:style-name="P40"><text:span text:style-name="T153"><text:tab/>I.30.1</text:span><text:span text:style-name="T229">5</text:span><text:span text:style-name="T153"> Pipes and </text:span><text:span text:style-name="T224">O_ASYNC</text:span></text:p>
      <text:p text:style-name="P55"><text:tab/>I.30.1<text:span text:style-name="T227">6</text:span> Feature Test Macros</text:p>
      <text:p text:style-name="P40"><text:span text:style-name="T153"><text:tab/>I.30.1</text:span><text:span text:style-name="T229">7</text:span><text:span text:style-name="T153"> Copy</text:span><text:span text:style-name="T230">ing</text:span><text:span text:style-name="T153"> files with </text:span><text:span text:style-name="T224">copy_file_range</text:span></text:p>
      <text:p text:style-name="P40"><text:span text:style-name="T153"><text:tab/>I.30.1</text:span><text:span text:style-name="T229">8</text:span><text:span text:style-name="T153"> Copy</text:span><text:span text:style-name="T230">ing</text:span><text:span text:style-name="T153"> files with </text:span><text:span text:style-name="T224">sendfile</text:span></text:p>
      <text:p text:style-name="P70"><text:span text:style-name="T71">List of </text:span><text:span text:style-name="T231">tables</text:span></text:p>
      <text:p text:style-name="P70"><text:span text:style-name="T71">List of </text:span><text:span text:style-name="T231">figures</text:span></text:p>
      <text:p text:style-name="P70"/>
      <text:p text:style-name="P46"><text:span text:style-name="T232">Chapter</text:span> <text:span text:style-name="T233">II</text:span> – <text:span text:style-name="T234">Files </text:span><text:span text:style-name="T235">and</text:span><text:span text:style-name="T234"> directories</text:span></text:p>
      <text:p text:style-name="P46"/>
      <text:p text:style-name="P71">I<text:span text:style-name="T236">I</text:span>.1 <text:span text:style-name="T237">Files</text:span></text:p>
      <text:p text:style-name="P72"><text:span text:style-name="T77"><text:tab/>II.1.1 Stat of files: </text:span><text:span text:style-name="T238">stat</text:span><text:span text:style-name="T77">, </text:span><text:span text:style-name="T238">fstat</text:span><text:span text:style-name="T77"> and </text:span><text:span text:style-name="T238">lstat</text:span></text:p>
      <text:p text:style-name="P73"><text:tab/>II.1.2 File permissions </text:p>
      <text:p text:style-name="P73"><text:tab/><text:span text:style-name="T239">II.1.3 Process credentials and privileges</text:span></text:p>
      <text:p text:style-name="P74"><text:tab/>II.1.4 <text:span text:style-name="T240">The file mode creation mask:</text:span> <text:span text:style-name="T241">umask</text:span></text:p>
      <text:p text:style-name="P72"><text:span text:style-name="T77"><text:tab/>II.1.</text:span><text:span text:style-name="T242">5</text:span><text:span text:style-name="T77"> Checking file accessibility: </text:span><text:span text:style-name="T238">access</text:span><text:span text:style-name="T77"> and </text:span><text:span text:style-name="T238">faccessat</text:span></text:p>
      <text:p text:style-name="P72"><text:span text:style-name="T77"><text:tab/>II.1.</text:span><text:span text:style-name="T242">6</text:span><text:span text:style-name="T77"> Changing file permissions: </text:span><text:span text:style-name="T238">chmod</text:span><text:span text:style-name="T77"> and </text:span><text:span text:style-name="T238">fchmod</text:span></text:p>
      <text:p text:style-name="P72"><text:span text:style-name="T77"><text:tab/>II.1.</text:span><text:span text:style-name="T242">7</text:span><text:span text:style-name="T77"> Changing file ownership: </text:span><text:span text:style-name="T238">chown</text:span><text:span text:style-name="T77">, </text:span><text:span text:style-name="T238">fchown</text:span><text:span text:style-name="T77"> and </text:span><text:span text:style-name="T238">lchown</text:span></text:p>
      <text:p text:style-name="P72"><text:span text:style-name="T243"><text:tab/>II.1.</text:span><text:span text:style-name="T242">8</text:span><text:span text:style-name="T243"> Creating and removing links: </text:span><text:span text:style-name="T238">link</text:span><text:span text:style-name="T243">, </text:span><text:span text:style-name="T238">linkat</text:span><text:span text:style-name="T243"> and </text:span><text:span text:style-name="T238">unlink</text:span></text:p>
      <text:p text:style-name="P72"><text:span text:style-name="T243"><text:tab/>II.1.</text:span><text:span text:style-name="T242">9</text:span><text:span text:style-name="T243"> Renaming files and directories: </text:span><text:span text:style-name="T238">rename</text:span><text:span text:style-name="T243"> and </text:span><text:span text:style-name="T238">renameat</text:span></text:p>
      <text:p text:style-name="P72"><text:span text:style-name="T243"><text:tab/>II.1.</text:span><text:span text:style-name="T242">10</text:span><text:span text:style-name="T243"> Symbolic links: </text:span><text:span text:style-name="T238">symlink</text:span><text:span text:style-name="T243"> and </text:span><text:span text:style-name="T238">readlink</text:span></text:p>
      <text:p text:style-name="P72"><text:span text:style-name="T243"><text:tab/>II.1.</text:span><text:span text:style-name="T242">11</text:span><text:span text:style-name="T243"> File times: </text:span><text:span text:style-name="T238">utimensat</text:span><text:span text:style-name="T243">, </text:span><text:span text:style-name="T238">futimens</text:span><text:span text:style-name="T243">, </text:span><text:span text:style-name="T238">utime</text:span><text:span text:style-name="T243">, </text:span><text:span text:style-name="T238">utimes</text:span><text:span text:style-name="T243">, </text:span><text:span text:style-name="T238">futimes</text:span><text:span text:style-name="T243">, <text:tab/><text:tab/><text:tab/><text:tab/> <text:s text:c="7"/></text:span><text:span text:style-name="T238">lutimes</text:span></text:p>
      <text:p text:style-name="P72"><text:span text:style-name="T243"><text:tab/>II.1.1</text:span><text:span text:style-name="T242">2</text:span><text:span text:style-name="T243"> I-node flags: </text:span><text:span text:style-name="T238">ioctl</text:span></text:p>
      <text:p text:style-name="P75"><text:tab/>II.1.13 Immutable files</text:p>
      <text:p text:style-name="P72"><text:span text:style-name="T243"><text:tab/>II.1.14 Extended attributes: </text:span><text:span text:style-name="T238">setxattr</text:span><text:span text:style-name="T244">, </text:span><text:span text:style-name="T238">getxattr</text:span><text:span text:style-name="T244">, </text:span><text:span text:style-name="T238">removexattr</text:span><text:span text:style-name="T244">, <text:tab/><text:tab/><text:tab/><text:tab/><text:tab/><text:tab/> </text:span><text:span text:style-name="T238">listxattr</text:span></text:p>
      <text:p text:style-name="P40"><text:span text:style-name="T245">II.</text:span><text:span text:style-name="T246">2</text:span><text:span text:style-name="T245"> Directories</text:span></text:p>
      <text:p text:style-name="P40"><text:soft-page-break/><text:span text:style-name="T247"><text:tab/>II.2.1 Creating and removing directories: </text:span><text:span text:style-name="T238">mkdir</text:span><text:span text:style-name="T247">, </text:span><text:span text:style-name="T238">mkdirat</text:span><text:span text:style-name="T247"> and </text:span><text:span text:style-name="T238">rmdir</text:span></text:p>
      <text:p text:style-name="P76"><text:span text:style-name="T245"><text:tab/>II.2.2 Open and reading directories: </text:span><text:span text:style-name="T238">opendir</text:span><text:span text:style-name="T245">, </text:span><text:span text:style-name="T238">fdopendir</text:span><text:span text:style-name="T245"> and </text:span><text:span text:style-name="T238">readdir</text:span></text:p>
      <text:p text:style-name="P76"><text:span text:style-name="T245"><text:tab/>II.2.3 Closing directories: </text:span><text:span text:style-name="T238">closedir</text:span></text:p>
      <text:p text:style-name="P76"><text:span text:style-name="T245"><text:tab/>II.2.4 Scanning a directory: </text:span><text:span text:style-name="T238">scandir</text:span><text:span text:style-name="T245"> and </text:span><text:span text:style-name="T238">scandirat</text:span></text:p>
      <text:p text:style-name="P76"><text:span text:style-name="T245"><text:tab/>II.2.5 Seeking a directory: </text:span><text:span text:style-name="T238">telldir</text:span><text:span text:style-name="T245">, </text:span><text:span text:style-name="T238">seekdir</text:span><text:span text:style-name="T245"> and </text:span><text:span text:style-name="T238">rewinddir</text:span></text:p>
      <text:p text:style-name="P76"><text:span text:style-name="T245"><text:tab/>II.2.6 Directory file descriptor: </text:span><text:span text:style-name="T238">dirfd</text:span></text:p>
      <text:p text:style-name="P76"><text:span text:style-name="T245"><text:tab/>II.2.7 File tree walk: </text:span><text:span text:style-name="T238">nftw</text:span></text:p>
      <text:p text:style-name="P76"><text:span text:style-name="T245"><text:tab/>II.2.8 Current working directory: </text:span><text:span text:style-name="T238">getcwd</text:span><text:span text:style-name="T245">, </text:span><text:span text:style-name="T238">chdir</text:span><text:span text:style-name="T245"> and </text:span><text:span text:style-name="T238">fchdir</text:span></text:p>
      <text:p text:style-name="P76"><text:span text:style-name="T245"><text:tab/>II.2.9 Process root directory: </text:span><text:span text:style-name="T238">chroot</text:span><text:span text:style-name="T245"><text:tab/></text:span></text:p>
      <text:p text:style-name="P77"><text:span text:style-name="T248">II.</text:span><text:span text:style-name="T237">3</text:span><text:span text:style-name="T248"> </text:span><text:span text:style-name="T249">Pathname </text:span><text:span text:style-name="T235">and</text:span><text:span text:style-name="T250"> files configuration</text:span></text:p>
      <text:p text:style-name="P76"><text:span text:style-name="T251"><text:tab/>II.3.1 Resolving paths and links: </text:span><text:span text:style-name="T238">realpath</text:span><text:span text:style-name="T251"> and </text:span><text:span text:style-name="T238">canonicalize_file_name</text:span></text:p>
      <text:p text:style-name="P76"><text:span text:style-name="T251"><text:tab/>II.3.2 Working with pathnames: </text:span><text:span text:style-name="T238">dirname</text:span><text:span text:style-name="T251"> and </text:span><text:span text:style-name="T238">basename</text:span></text:p>
      <text:p text:style-name="P76"><text:span text:style-name="T251"><text:tab/>II.3.3 Pathnames and filenames configuration: </text:span><text:span text:style-name="T238">fpathconf</text:span><text:span text:style-name="T251"> and </text:span><text:span text:style-name="T238">pathconf</text:span></text:p>
      <text:p text:style-name="P76"><text:span text:style-name="T251"><text:tab/>II.3.4 Getting configuration at runtime with </text:span><text:span text:style-name="T238">sysconf</text:span></text:p>
      <text:p text:style-name="P76"><text:span text:style-name="T251"><text:tab/>II.3.5 Getting configuration dependent string variables: </text:span><text:span text:style-name="T238">confstr</text:span></text:p>
      <text:p text:style-name="P76"><text:span text:style-name="T251"><text:tab/>II.3.6 Getting configuration from the CLI with </text:span><text:span text:style-name="T238">getconf</text:span></text:p>
      <text:p text:style-name="P78"><text:tab/><text:span text:style-name="T252">II.</text:span><text:span text:style-name="T237">3</text:span><text:span text:style-name="T252">.</text:span><text:span text:style-name="T253">7</text:span><text:span text:style-name="T252"> </text:span><text:span text:style-name="T254">Summary</text:span></text:p>
      <text:p text:style-name="P79"><text:span text:style-name="T248">II.</text:span><text:span text:style-name="T237">4</text:span><text:span text:style-name="T248"> Device files</text:span></text:p>
      <text:p text:style-name="P76"><text:span text:style-name="T255"><text:tab/></text:span><text:span text:style-name="T256">II.4.1 Major and minor numbers: </text:span><text:span text:style-name="T238">makedev</text:span><text:span text:style-name="T256">, </text:span><text:span text:style-name="T238">major</text:span><text:span text:style-name="T256"> and </text:span><text:span text:style-name="T238">minor</text:span></text:p>
      <text:p text:style-name="P76"><text:span text:style-name="T256"><text:tab/>II.4.2 Creating a device file: </text:span><text:span text:style-name="T238">mknod</text:span><text:span text:style-name="T256"> and </text:span><text:span text:style-name="T238">mknodat</text:span></text:p>
      <text:p text:style-name="P76"><text:span text:style-name="T256"><text:tab/>II.4.3 Creating FIFO: </text:span><text:span text:style-name="T238">mkfifo</text:span><text:span text:style-name="T256"> and </text:span><text:span text:style-name="T238">mkfifoat</text:span></text:p>
      <text:p text:style-name="P76"><text:span text:style-name="T256"><text:tab/>II.4.4 The random number generator: </text:span><text:span text:style-name="T238">getrandom</text:span><text:span text:style-name="T256"> and </text:span><text:span text:style-name="T238">getentropy</text:span></text:p>
      <text:p text:style-name="P80">II.<text:span text:style-name="T237">5</text:span><text:span text:style-name="T257"> </text:span><text:span text:style-name="T258">Access control list</text:span></text:p>
      <text:p text:style-name="P79"><text:span text:style-name="T248">II.</text:span><text:span text:style-name="T237">6</text:span><text:span text:style-name="T248"> </text:span><text:span text:style-name="T259">Monitor</text:span><text:span text:style-name="T260">ing</text:span><text:span text:style-name="T261"> file </text:span><text:span text:style-name="T259">events</text:span></text:p>
      <text:p text:style-name="P79"><text:tab/><text:span text:style-name="T262">II.</text:span><text:span text:style-name="T263">6</text:span><text:span text:style-name="T262">.</text:span><text:span text:style-name="T264">1</text:span><text:span text:style-name="T262"> </text:span><text:span text:style-name="T265">The </text:span><text:span text:style-name="T266">i</text:span><text:span text:style-name="T267">notify</text:span><text:span text:style-name="T268"> interface</text:span></text:p>
      <text:p text:style-name="P79"><text:tab/><text:span text:style-name="T262">II.</text:span><text:span text:style-name="T263">6</text:span><text:span text:style-name="T262">.</text:span><text:span text:style-name="T264">2</text:span><text:span text:style-name="T262"> </text:span><text:span text:style-name="T265">The </text:span><text:span text:style-name="T266">f</text:span><text:span text:style-name="T267">anotify</text:span><text:span text:style-name="T268"> interface</text:span></text:p>
      <text:p text:style-name="P79"><text:span text:style-name="T248">II.</text:span><text:span text:style-name="T237">7</text:span><text:span text:style-name="T248"> </text:span><text:span text:style-name="T269">Capabilitites</text:span></text:p>
      <text:p text:style-name="P79"><text:span text:style-name="T270"><text:tab/>II.</text:span><text:span text:style-name="T237">7</text:span><text:span text:style-name="T270">.</text:span><text:span text:style-name="T271">1</text:span><text:span text:style-name="T270"> </text:span><text:span text:style-name="T272">File capabilitie</text:span><text:span text:style-name="T270">s</text:span></text:p>
      <text:p text:style-name="P81"><text:span text:style-name="T270"><text:tab/>II.</text:span><text:span text:style-name="T237">7</text:span><text:span text:style-name="T270">.</text:span><text:span text:style-name="T271">2</text:span><text:span text:style-name="T270"> The </text:span><text:span text:style-name="T273">Bounding Set</text:span></text:p>
      <text:p text:style-name="P81"><text:span text:style-name="T274"><text:tab/>II.</text:span><text:span text:style-name="T263">7</text:span><text:span text:style-name="T274">.</text:span><text:span text:style-name="T275">3</text:span><text:span text:style-name="T274"> </text:span><text:span text:style-name="T265">The </text:span><text:span text:style-name="T276">Securebits</text:span><text:span text:style-name="T277"> flags</text:span></text:p>
      <text:p text:style-name="P82"><text:tab/>II.<text:span text:style-name="T237">7</text:span>.<text:span text:style-name="T271">4</text:span> <text:span text:style-name="T278">List</text:span><text:span text:style-name="T279">ing</text:span><text:span text:style-name="T278"> the content</text:span><text:span text:style-name="T279">s</text:span><text:span text:style-name="T278"> of the capabilities sets</text:span></text:p>
      <text:p text:style-name="P82"><text:tab/>II.<text:span text:style-name="T237">7</text:span>.<text:span text:style-name="T271">5</text:span> <text:span text:style-name="T280">Capabilities data types</text:span></text:p>
      <text:p text:style-name="P82"><text:span text:style-name="T281"><text:tab/>II.</text:span><text:span text:style-name="T237">7</text:span><text:span text:style-name="T281">.</text:span><text:span text:style-name="T271">6</text:span><text:span text:style-name="T281"> </text:span><text:span text:style-name="T280">Child capabilities</text:span></text:p>
      <text:p text:style-name="P83">I<text:span text:style-name="T282">I</text:span>.<text:span text:style-name="T237">8</text:span><text:span text:style-name="T283"> </text:span><text:span text:style-name="T284">The Linux file system</text:span></text:p>
      <text:p text:style-name="P83"><text:span text:style-name="T285"><text:tab/></text:span><text:span text:style-name="T286">II.8.1 The </text:span><text:span text:style-name="T287">ext4</text:span><text:span text:style-name="T286"> layout</text:span></text:p>
      <text:p text:style-name="P76"><text:span text:style-name="T288"><text:tab/>II.8.2 Mounting a filesystem: </text:span><text:span text:style-name="T289">mount</text:span><text:span text:style-name="T288"> and </text:span><text:span text:style-name="T289">umount</text:span></text:p>
      <text:p text:style-name="P76"><text:span text:style-name="T288"><text:tab/>II.8.3 </text:span><text:span text:style-name="T290">ext4</text:span><text:span text:style-name="T288"> filesystem operations</text:span></text:p>
      <text:p text:style-name="P76"><text:span text:style-name="T288"><text:tab/>II.8.4 The </text:span><text:span text:style-name="T290">swap</text:span><text:span text:style-name="T288"> area: </text:span><text:span text:style-name="T289">swapon</text:span><text:span text:style-name="T288"> and </text:span><text:span text:style-name="T289">swapoff</text:span></text:p>
      <text:p text:style-name="P76"><text:span text:style-name="T288"><text:tab/>II.8.5 The </text:span><text:span text:style-name="T289">proc</text:span><text:span text:style-name="T288"> file system</text:span></text:p>
      <text:p text:style-name="P76"><text:span text:style-name="T288"><text:tab/>II.8.6 The </text:span><text:span text:style-name="T289">tmpfs</text:span><text:span text:style-name="T288"> file system</text:span></text:p>
      <text:p text:style-name="P76"><text:span text:style-name="T288"><text:tab/>II.8.7 The </text:span><text:span text:style-name="T289">sysfs</text:span><text:span text:style-name="T288"> file system</text:span></text:p>
      <text:p text:style-name="P76"><text:span text:style-name="T288"><text:tab/>II.8.8 Getting filesystem statistics : </text:span><text:span text:style-name="T289">statfs</text:span><text:span text:style-name="T288"> and </text:span><text:span text:style-name="T289">statvfs</text:span></text:p>
      <text:p text:style-name="P83">I<text:span text:style-name="T282">I</text:span>.<text:span text:style-name="T237">9</text:span><text:span text:style-name="T283"> </text:span><text:span text:style-name="T291">Quota</text:span><text:span text:style-name="T292">s</text:span><text:span text:style-name="T291"> </text:span><text:span text:style-name="T235">and</text:span><text:span text:style-name="T291"> </text:span><text:span text:style-name="T293">r</text:span><text:span text:style-name="T294">esource limits</text:span></text:p>
      <text:p text:style-name="P83"><text:tab/>II.9.1 Managing quotas</text:p>
      <text:p text:style-name="P76"><text:span text:style-name="T77"><text:tab/>II.9.2 Resource limits: </text:span><text:span text:style-name="T289">getrlimit</text:span><text:span text:style-name="T77">, </text:span><text:span text:style-name="T289">setrlimit</text:span><text:span text:style-name="T77"> and </text:span><text:span text:style-name="T289">prlimit</text:span><text:span text:style-name="T77"><text:tab/></text:span><text:span text:style-name="T295"><text:tab/></text:span></text:p>
      <text:p text:style-name="P83"><text:soft-page-break/><text:span text:style-name="T296">I</text:span><text:span text:style-name="T297">I</text:span><text:span text:style-name="T296">.</text:span><text:span text:style-name="T298">1</text:span><text:span text:style-name="T299">0</text:span><text:span text:style-name="T296"> </text:span><text:span text:style-name="T300">T</text:span><text:span text:style-name="T296">heory </text:span><text:span text:style-name="T301">and</text:span><text:span text:style-name="T296"> </text:span><text:span text:style-name="T301">i</text:span><text:span text:style-name="T296">nsights</text:span></text:p>
      <text:p text:style-name="P40"><text:span text:style-name="T153"><text:tab/></text:span><text:span text:style-name="T302">II.</text:span><text:span text:style-name="T303">10</text:span><text:span text:style-name="T302">.1 </text:span><text:span text:style-name="T304">Get</text:span><text:span text:style-name="T305">ting</text:span><text:span text:style-name="T304"> file permissions with </text:span><text:span text:style-name="T306">stat</text:span></text:p>
      <text:p text:style-name="P40"><text:span text:style-name="T307"><text:tab/>II.10.2 </text:span><text:span text:style-name="T308">Set</text:span><text:span text:style-name="T309">ting</text:span><text:span text:style-name="T308"> </text:span><text:span text:style-name="T310">umask</text:span></text:p>
      <text:p text:style-name="P84"><text:tab/>II.10.3 <text:span text:style-name="T311">Unlink</text:span><text:span text:style-name="T312">ing</text:span><text:span text:style-name="T311"> a file while a process has an open descriptor</text:span></text:p>
      <text:p text:style-name="P84"><text:tab/>II.10.4 <text:span text:style-name="T313">Scan</text:span><text:span text:style-name="T312">ning</text:span><text:span text:style-name="T313"> director</text:span><text:span text:style-name="T314">ies</text:span><text:span text:style-name="T313"> with filter</text:span><text:span text:style-name="T312">s</text:span></text:p>
      <text:p text:style-name="P84"><text:span text:style-name="T315"><text:tab/>II.10.5 </text:span><text:span text:style-name="T316">The </text:span><text:span text:style-name="T317">openat</text:span><text:span text:style-name="T316"> </text:span><text:span text:style-name="T318">and </text:span><text:span text:style-name="T317">openat2</text:span><text:span text:style-name="T318"> </text:span><text:span text:style-name="T316">function</text:span><text:span text:style-name="T318">s</text:span></text:p>
      <text:p text:style-name="P85"><text:span text:style-name="T315"><text:tab/>II.10.6 </text:span><text:span text:style-name="T319">name_to_handle</text:span><text:span text:style-name="T318"> and </text:span><text:span text:style-name="T319">open_by_handle_at</text:span></text:p>
      <text:p text:style-name="P76"><text:span text:style-name="T307"><text:tab/>II.10.7 </text:span><text:span text:style-name="T320">Extended stat of files: </text:span><text:span text:style-name="T321">statx</text:span></text:p>
      <text:p text:style-name="P84"><text:tab/><text:span text:style-name="T315">II.10.8 </text:span><text:span text:style-name="T322">Chang</text:span><text:span text:style-name="T323">ing</text:span><text:span text:style-name="T322"> root directory</text:span></text:p>
      <text:p text:style-name="P84"><text:tab/>II.10.9 <text:span text:style-name="T324">Inotify</text:span></text:p>
      <text:p text:style-name="P84"><text:tab/>II.10.10 <text:span text:style-name="T325">Inotify</text:span><text:span text:style-name="T326"> </text:span><text:span text:style-name="T235">and</text:span><text:span text:style-name="T326"> </text:span><text:span text:style-name="T325">Fanotify</text:span></text:p>
      <text:p text:style-name="P84"><text:tab/>II.10.11 <text:span text:style-name="T327">ext4</text:span><text:span text:style-name="T328"> </text:span><text:span text:style-name="T312">F</text:span><text:span text:style-name="T328">ile attributes</text:span></text:p>
      <text:p text:style-name="P84"><text:span text:style-name="T329"><text:tab/>II.10.12 </text:span><text:span text:style-name="T327">ext4</text:span><text:span text:style-name="T328"> </text:span><text:span text:style-name="T330">Journaling</text:span></text:p>
      <text:p text:style-name="P84"><text:span text:style-name="T329"><text:tab/>II.10.13 </text:span><text:span text:style-name="T331">Mount namespaces</text:span></text:p>
      <text:p text:style-name="P84"><text:tab/><text:span text:style-name="T332">II.10.14 </text:span><text:span text:style-name="T333">The</text:span><text:span text:style-name="T332"> </text:span><text:span text:style-name="T334">unshare</text:span><text:span text:style-name="T335"> function </text:span><text:span text:style-name="T323">and</text:span><text:span text:style-name="T336"> </text:span><text:span text:style-name="T333">the </text:span><text:span text:style-name="T337">namespaces</text:span></text:p>
      <text:p text:style-name="P84"><text:tab/><text:span text:style-name="T332">II.10.15 </text:span><text:span text:style-name="T338">The </text:span><text:span text:style-name="T339">setns</text:span><text:span text:style-name="T338"> function</text:span></text:p>
      <text:p text:style-name="P84"><text:span text:style-name="T329"><text:tab/>II.10.16 </text:span><text:span text:style-name="T340">Chang</text:span><text:span text:style-name="T312">ing</text:span><text:span text:style-name="T340"> </text:span><text:span text:style-name="T341">the</text:span><text:span text:style-name="T340"> properties of a mount</text:span></text:p>
      <text:p text:style-name="P84"><text:span text:style-name="T329"><text:tab/>II.10.1</text:span><text:span text:style-name="T342">7</text:span><text:span text:style-name="T329"> </text:span><text:span text:style-name="T342">ID-mapped</text:span><text:span text:style-name="T340"> mount</text:span><text:span text:style-name="T342">s</text:span></text:p>
      <text:p text:style-name="P84"><text:span text:style-name="T329"><text:tab/>II.10.1</text:span><text:span text:style-name="T342">8</text:span><text:span text:style-name="T329"> </text:span><text:span text:style-name="T343">Mount information</text:span></text:p>
      <text:p text:style-name="P84"><text:tab/><text:span text:style-name="T329">II.10.1</text:span><text:span text:style-name="T344">9</text:span><text:span text:style-name="T329"> </text:span><text:span text:style-name="T345">New mount API</text:span></text:p>
      <text:p text:style-name="P84"><text:tab/><text:span text:style-name="T329">II.10.</text:span><text:span text:style-name="T346">20</text:span><text:span text:style-name="T329"> </text:span><text:span text:style-name="T347">The </text:span><text:span text:style-name="T348">Virtual File System</text:span></text:p>
      <text:p text:style-name="P86"><text:span text:style-name="T71">List of </text:span>tables</text:p>
      <text:p text:style-name="P70"><text:span text:style-name="T71">List of </text:span><text:span text:style-name="T231">figures</text:span></text:p>
      <text:p text:style-name="P70"/>
      <text:p text:style-name="P46"><text:span text:style-name="T232">Chapter</text:span> <text:span text:style-name="T233">II</text:span><text:span text:style-name="T349">I</text:span> – <text:span text:style-name="T350">E</text:span><text:span text:style-name="T349">nvironment </text:span><text:span text:style-name="T351">and</text:span><text:span text:style-name="T350"> system databases</text:span></text:p>
      <text:p text:style-name="P87"/>
      <text:p text:style-name="P88">I<text:span text:style-name="T236">I</text:span><text:span text:style-name="T282">I</text:span>.1 <text:span text:style-name="T349">Time functions</text:span></text:p>
      <text:p text:style-name="P87"><text:span text:style-name="T21"><text:tab/>III.1.1 Getting the time: </text:span><text:span text:style-name="T352">time</text:span><text:span text:style-name="T21">, </text:span><text:span text:style-name="T352">gettimeofday</text:span><text:span text:style-name="T21"> and </text:span><text:span text:style-name="T352">settimeofday</text:span><text:span text:style-name="T21"> </text:span></text:p>
      <text:p text:style-name="P87"><text:span text:style-name="T21"><text:tab/>III.1.2 Setting time with </text:span><text:span text:style-name="T352">clock_gettime</text:span><text:span text:style-name="T21"> and </text:span><text:span text:style-name="T352">clock_settime</text:span><text:span text:style-name="T21"> </text:span></text:p>
      <text:p text:style-name="P88"><text:tab/>III.1.3 Clocks on Linux </text:p>
      <text:p text:style-name="P87"><text:span text:style-name="T21"><text:tab/>III.1.4 Setting a new time: </text:span><text:span text:style-name="T352">tm</text:span></text:p>
      <text:p text:style-name="P88"><text:tab/>III.1.5 Time conversion functions </text:p>
      <text:p text:style-name="P87"><text:span text:style-name="T21"><text:tab/>III.1.6 Formatting date and time: </text:span><text:span text:style-name="T352">strftime</text:span><text:span text:style-name="T21"> and </text:span><text:span text:style-name="T352">strptime</text:span><text:span text:style-name="T21"> </text:span></text:p>
      <text:p text:style-name="P87"><text:span text:style-name="T21"><text:tab/>III.1.7 </text:span><text:span text:style-name="T353">T</text:span><text:span text:style-name="T21">ime conversion: </text:span><text:span text:style-name="T352">getdate</text:span></text:p>
      <text:p text:style-name="P61"><text:span text:style-name="T354">I</text:span><text:span text:style-name="T355">I</text:span><text:span text:style-name="T356">I</text:span><text:span text:style-name="T354">.</text:span><text:span text:style-name="T357">2</text:span><text:span text:style-name="T354"> </text:span><text:span text:style-name="T358">The environment</text:span></text:p>
      <text:p text:style-name="P89"><text:tab/>III.2.1 Working with environment variables: getenv and setenv</text:p>
      <text:p text:style-name="P89"><text:tab/>III.2.2 Environment during an execve</text:p>
      <text:p text:style-name="P47">I<text:span text:style-name="T282">I</text:span><text:span text:style-name="T236">I</text:span>.<text:span text:style-name="T282">3</text:span> <text:span text:style-name="T282">Locale</text:span></text:p>
      <text:p text:style-name="P87"><text:span text:style-name="T77"><text:tab/>III.3.1 Setting locale: </text:span><text:span text:style-name="T352">setlocale</text:span></text:p>
      <text:p text:style-name="P87"><text:span text:style-name="T77"><text:tab/>III.3.2 Working with locale: </text:span><text:span text:style-name="T352">localeconv</text:span><text:span text:style-name="T77">, <text:s/></text:span><text:span text:style-name="T352">newlocale</text:span><text:span text:style-name="T77"> and </text:span><text:span text:style-name="T352">uselocale</text:span></text:p>
      <text:p text:style-name="P87"><text:span text:style-name="T77"><text:tab/>III.3.3 Duplicating a locale object: </text:span><text:span text:style-name="T352">duplocale</text:span></text:p>
      <text:p text:style-name="P83">I<text:span text:style-name="T282">I</text:span><text:span text:style-name="T236">I</text:span>.<text:span text:style-name="T282">4</text:span> <text:span text:style-name="T359">U</text:span><text:span text:style-name="T282">sers databas</text:span><text:span text:style-name="T359">e:</text:span><text:span text:style-name="T282"> </text:span><text:span text:style-name="T360">/</text:span><text:span text:style-name="T361">etc/passwd</text:span></text:p>
      <text:p text:style-name="P83"><text:span text:style-name="T362"><text:tab/></text:span><text:span text:style-name="T363">III.4.1 Users and groups files</text:span></text:p>
      <text:p text:style-name="P76"><text:span text:style-name="T364"><text:tab/>III.4.2 The </text:span><text:span text:style-name="T365">/etc/passwd</text:span><text:span text:style-name="T364"> file</text:span></text:p>
      <text:p text:style-name="P76"><text:span text:style-name="T364"><text:tab/>III.4.3 Working with the users database : </text:span><text:span text:style-name="T365">getpwent</text:span><text:span text:style-name="T364"> and </text:span><text:span text:style-name="T365">setpwent</text:span></text:p>
      <text:p text:style-name="P76"><text:span text:style-name="T364"><text:tab/>III.4.4 Working with records : </text:span><text:span text:style-name="T365">fgetpwent</text:span><text:span text:style-name="T364"> and </text:span><text:span text:style-name="T365">putpwent</text:span></text:p>
      <text:p text:style-name="P90"><text:soft-page-break/><text:span text:style-name="T354">I</text:span><text:span text:style-name="T356">I</text:span><text:span text:style-name="T355">I</text:span><text:span text:style-name="T354">.</text:span><text:span text:style-name="T356">5</text:span><text:span text:style-name="T354"> </text:span><text:span text:style-name="T356">Groups </text:span><text:span text:style-name="T366">database: </text:span><text:span text:style-name="T367">/etc/group</text:span></text:p>
      <text:p text:style-name="P76"><text:span text:style-name="T368"><text:tab/></text:span><text:span text:style-name="T369">III.5.1 Reading the groups database: </text:span><text:span text:style-name="T365">getgrnam</text:span><text:span text:style-name="T369"> and </text:span><text:span text:style-name="T365">getgrgid</text:span></text:p>
      <text:p text:style-name="P76"><text:span text:style-name="T369"><text:tab/>III.5.2 Working wit</text:span><text:span text:style-name="T370">h</text:span><text:span text:style-name="T369"> the database: </text:span><text:span text:style-name="T365">getgrent</text:span><text:span text:style-name="T369"> and </text:span><text:span text:style-name="T365">setgrent</text:span></text:p>
      <text:p text:style-name="P76"><text:span text:style-name="T369"><text:tab/>III.5.3 Getting the groups list: </text:span><text:span text:style-name="T365">getgrouplist</text:span></text:p>
      <text:p text:style-name="P76"><text:span text:style-name="T369"><text:tab/>III.5.4 Supplementary groups: </text:span><text:span text:style-name="T365">getgroups</text:span><text:span text:style-name="T369">, </text:span><text:span text:style-name="T365">setgroups</text:span><text:span text:style-name="T369"> and </text:span><text:span text:style-name="T365">initgroups</text:span></text:p>
      <text:p text:style-name="P76"><text:span text:style-name="T369"><text:tab/>III.5.5 Real and effective group ID: </text:span><text:span text:style-name="T365">getgid</text:span><text:span text:style-name="T369">, </text:span><text:span text:style-name="T365">getegid</text:span><text:span text:style-name="T369">, </text:span><text:span text:style-name="T365">setgid</text:span><text:span text:style-name="T369">, </text:span><text:span text:style-name="T365">setegid</text:span></text:p>
      <text:p text:style-name="P91"><text:tab/>III.5.6 Saved Set-User-Id and Set-Group-Id</text:p>
      <text:p text:style-name="P76"><text:span text:style-name="T369"><text:tab/>III.5.7 Checking if a process is in a group: </text:span><text:span text:style-name="T365">group_member</text:span></text:p>
      <text:p text:style-name="P83">I<text:span text:style-name="T282">I</text:span><text:span text:style-name="T236">I</text:span>.<text:span text:style-name="T282">6</text:span> <text:span text:style-name="T371">U</text:span><text:span text:style-name="T282">sers </text:span><text:span text:style-name="T359">functions</text:span></text:p>
      <text:p text:style-name="P76"><text:span text:style-name="T77"><text:tab/>III.6.1 Setting user ID: </text:span><text:span text:style-name="T365">getuid</text:span><text:span text:style-name="T77">, </text:span><text:span text:style-name="T365">geteuid</text:span><text:span text:style-name="T77">, </text:span><text:span text:style-name="T365">setuid</text:span><text:span text:style-name="T77"> and </text:span><text:span text:style-name="T365">seteuid</text:span></text:p>
      <text:p text:style-name="P76"><text:span text:style-name="T77"><text:tab/>III.6.2 </text:span><text:span text:style-name="T365">getresgid</text:span><text:span text:style-name="T77"> and </text:span><text:span text:style-name="T365">getresuid</text:span></text:p>
      <text:p text:style-name="P90"><text:span text:style-name="T354">I</text:span><text:span text:style-name="T356">I</text:span><text:span text:style-name="T355">I</text:span><text:span text:style-name="T354">.</text:span><text:span text:style-name="T372">7</text:span><text:span text:style-name="T354"> </text:span><text:span text:style-name="T366">Password database: </text:span><text:span text:style-name="T367">/etc/shadow</text:span></text:p>
      <text:p text:style-name="P76"><text:span text:style-name="T373"><text:tab/>III.7.1 Creat</text:span><text:span text:style-name="T374">ing</text:span><text:span text:style-name="T373"> encrypted passphrase: </text:span><text:span text:style-name="T365">crypt</text:span></text:p>
      <text:p text:style-name="P76"><text:span text:style-name="T373"><text:tab/>III.7.2 Generating a salt: </text:span><text:span text:style-name="T365">crypt_gensalt</text:span></text:p>
      <text:p text:style-name="P76"><text:span text:style-name="T373"><text:tab/>III.7.3 Hiding the input with BSD </text:span><text:span text:style-name="T365">readpassphrase</text:span><text:span text:style-name="T375"><text:tab/></text:span></text:p>
      <text:p text:style-name="P83">I<text:span text:style-name="T282">I</text:span><text:span text:style-name="T236">I</text:span>.<text:span text:style-name="T376">8</text:span> <text:span text:style-name="T376">Login</text:span></text:p>
      <text:p text:style-name="P76"><text:span text:style-name="T77"><text:tab/></text:span><text:span text:style-name="T377">III.8.1 Working with the utmp file: </text:span><text:span text:style-name="T365">getutent</text:span><text:span text:style-name="T377">, </text:span><text:span text:style-name="T365">getutid</text:span><text:span text:style-name="T377">, </text:span><text:span text:style-name="T365">setutent</text:span></text:p>
      <text:p text:style-name="P76"><text:span text:style-name="T377"><text:tab/>III.8.2 The login: </text:span><text:span text:style-name="T365">login</text:span><text:span text:style-name="T377"> and </text:span><text:span text:style-name="T365">logout</text:span></text:p>
      <text:p text:style-name="P83">I<text:span text:style-name="T282">I</text:span><text:span text:style-name="T236">I</text:span>.<text:span text:style-name="T378">9</text:span> <text:span text:style-name="T379">Hosts, networks, protocols, services databases</text:span></text:p>
      <text:p text:style-name="P90"><text:span text:style-name="T380"><text:tab/>III.9.1 </text:span><text:span text:style-name="T381">The hosts database: </text:span><text:span text:style-name="T382">/</text:span><text:span text:style-name="T383">etc/hosts</text:span></text:p>
      <text:p text:style-name="P90"><text:span text:style-name="T380"><text:tab/>III.9.2 </text:span><text:span text:style-name="T381">The </text:span><text:span text:style-name="T384">networks database: </text:span><text:span text:style-name="T385">/</text:span><text:span text:style-name="T383">etc/</text:span><text:span text:style-name="T386">networks</text:span></text:p>
      <text:p text:style-name="P90"><text:span text:style-name="T380"><text:tab/>III.9.3 </text:span><text:span text:style-name="T381">The </text:span><text:span text:style-name="T387">protocol</text:span><text:span text:style-name="T384">s database: </text:span><text:span text:style-name="T383">/etc/protocols</text:span></text:p>
      <text:p text:style-name="P90"><text:span text:style-name="T384"><text:tab/></text:span><text:span text:style-name="T388">III.9.4 </text:span><text:span text:style-name="T381">The </text:span><text:span text:style-name="T389">services</text:span><text:span text:style-name="T384"> database: </text:span><text:span text:style-name="T383">/etc/services</text:span></text:p>
      <text:p text:style-name="P83">I<text:span text:style-name="T282">I</text:span><text:span text:style-name="T236">I</text:span>.<text:span text:style-name="T390">1</text:span><text:span text:style-name="T379">0</text:span> <text:span text:style-name="T378">System identification</text:span></text:p>
      <text:p text:style-name="P76"><text:span text:style-name="T77"><text:tab/></text:span><text:span text:style-name="T391">III.10.1 Getting system information: </text:span><text:span text:style-name="T392">uname</text:span></text:p>
      <text:p text:style-name="P76"><text:span text:style-name="T391"><text:tab/>III.10.2 Getting and setting hostname: </text:span><text:span text:style-name="T392">gethostname</text:span><text:span text:style-name="T391"> and </text:span><text:span text:style-name="T392">sethostent</text:span></text:p>
      <text:p text:style-name="P88">I<text:span text:style-name="T282">I</text:span><text:span text:style-name="T236">I</text:span>.<text:span text:style-name="T390">1</text:span><text:span text:style-name="T283">1 Pluggable Authentication Modules</text:span></text:p>
      <text:p text:style-name="P76"><text:span text:style-name="T21"><text:tab/>III.11.1 PAM Authentication: </text:span><text:span text:style-name="T392">pam_authenticate</text:span><text:span text:style-name="T21"> </text:span></text:p>
      <text:p text:style-name="P76"><text:span text:style-name="T21"><text:tab/>III.11.2 PAM Session: </text:span><text:span text:style-name="T392">pam_open_session</text:span><text:span text:style-name="T21"> and </text:span><text:span text:style-name="T392">pam_close_session</text:span></text:p>
      <text:p text:style-name="P76"><text:span text:style-name="T21"><text:tab/>III.11.3 Process environment and PAM environment: </text:span><text:span text:style-name="T392">pam_getenv</text:span><text:span text:style-name="T21">, </text:span><text:span text:style-name="T392">pam_putenv</text:span><text:span text:style-name="T21"> </text:span></text:p>
      <text:p text:style-name="P76"><text:span text:style-name="T21"><text:tab/>III.11.4 PAM items: </text:span><text:span text:style-name="T392">pam_get_item</text:span><text:span text:style-name="T21"> and </text:span><text:span text:style-name="T392">pam_set_item</text:span><text:span text:style-name="T21"> </text:span></text:p>
      <text:p text:style-name="P76"><text:span text:style-name="T21"><text:tab/>III.11.5 Changing password: </text:span><text:span text:style-name="T392">pam_chauthtok</text:span></text:p>
      <text:p text:style-name="P90"><text:span text:style-name="T393">III.1</text:span><text:span text:style-name="T394">2</text:span><text:span text:style-name="T393"> Theory </text:span><text:span text:style-name="T395">and</text:span><text:span text:style-name="T393"> </text:span><text:span text:style-name="T395">i</text:span><text:span text:style-name="T393">nsights</text:span></text:p>
      <text:p text:style-name="P92"><text:tab/>III.1<text:span text:style-name="T396">2</text:span>.1 The Process Execution Environment</text:p>
      <text:p text:style-name="P90"><text:span text:style-name="T393"><text:tab/>III.1</text:span><text:span text:style-name="T394">2</text:span><text:span text:style-name="T393">.2 The </text:span><text:span text:style-name="T383">intmax_t</text:span><text:span text:style-name="T393"> and </text:span><text:span text:style-name="T383">uintmax_t</text:span><text:span text:style-name="T393"> data types</text:span></text:p>
      <text:p text:style-name="P90"><text:span text:style-name="T393"><text:tab/>III.1</text:span><text:span text:style-name="T394">2</text:span><text:span text:style-name="T393">.3 Using </text:span><text:span text:style-name="T383">initgroups</text:span><text:span text:style-name="T393"> to set up the supplementary groups</text:span></text:p>
      <text:p text:style-name="P92"><text:tab/>III.1<text:span text:style-name="T396">2</text:span>.4 Command line tools for the groups</text:p>
      <text:p text:style-name="P92"><text:tab/>III.1<text:span text:style-name="T396">2</text:span>.5 The <text:span text:style-name="T221">Name Service Switch </text:span></text:p>
      <text:p text:style-name="P92"><text:tab/>III.1<text:span text:style-name="T396">2</text:span>.6 Command line tools for the users</text:p>
      <text:p text:style-name="P92"><text:tab/>III.1<text:span text:style-name="T396">2</text:span>.7 The login process</text:p>
      <text:p text:style-name="P92"><text:tab/>III.1<text:span text:style-name="T396">2</text:span>.8 PAM functions summary</text:p>
      <text:p text:style-name="P93">List of tables</text:p>
      <text:p text:style-name="P93">List of <text:span text:style-name="T397">figures</text:span></text:p>
      <text:p text:style-name="P92"/>
      <text:p text:style-name="P46"><text:span text:style-name="T232">Chapter</text:span> <text:span text:style-name="T398">IV</text:span> – <text:span text:style-name="T399">Memory</text:span></text:p>
      <text:p text:style-name="P46"><text:soft-page-break/></text:p>
      <text:p text:style-name="P83"><text:span text:style-name="T398">IV</text:span>.1 <text:span text:style-name="T398">Executable files </text:span></text:p>
      <text:p text:style-name="P83"><text:span text:style-name="T400"><text:tab/>IV.1.1 The </text:span><text:span text:style-name="T401">Executable and Linkable Format</text:span><text:span text:style-name="T400"> (ELF)</text:span></text:p>
      <text:p text:style-name="P76"><text:span text:style-name="T402"><text:tab/></text:span><text:span text:style-name="Strong_20_Emphasis"><text:span text:style-name="T403">IV.1.2 The ELF Header</text:span></text:span></text:p>
      <text:p text:style-name="P76"><text:span text:style-name="Strong_20_Emphasis"><text:span text:style-name="T403"><text:tab/>IV.1.3 Section and Segments</text:span></text:span></text:p>
      <text:p text:style-name="P76"><text:span text:style-name="Strong_20_Emphasis"><text:span text:style-name="T403"><text:tab/>IV.1.4 The symbol table</text:span></text:span></text:p>
      <text:p text:style-name="P76"><text:span text:style-name="Strong_20_Emphasis"><text:span text:style-name="T403"><text:tab/>IV.1.5 The Relocation table</text:span></text:span></text:p>
      <text:p text:style-name="P76"><text:span text:style-name="Strong_20_Emphasis"><text:span text:style-name="T403"><text:tab/>IV.1.6 The Dynamic section</text:span></text:span></text:p>
      <text:p text:style-name="P76"><text:span text:style-name="Strong_20_Emphasis"><text:span text:style-name="T403"><text:tab/>IV.1.7 The Note section</text:span></text:span></text:p>
      <text:p text:style-name="P76"><text:span text:style-name="Strong_20_Emphasis"><text:span text:style-name="T403"><text:tab/>IV.1.8 Read</text:span></text:span><text:span text:style-name="Strong_20_Emphasis"><text:span text:style-name="T404">ing</text:span></text:span><text:span text:style-name="Strong_20_Emphasis"><text:span text:style-name="T403"> ELF</text:span></text:span></text:p>
      <text:p text:style-name="P76"><text:span text:style-name="Strong_20_Emphasis"><text:span text:style-name="T403"><text:tab/>IV.1.9 Load</text:span></text:span><text:span text:style-name="Strong_20_Emphasis"><text:span text:style-name="T404">ing</text:span></text:span><text:span text:style-name="Strong_20_Emphasis"><text:span text:style-name="T403"> ELF into memory</text:span></text:span></text:p>
      <text:p text:style-name="P94">IV.2 Start <text:span text:style-name="T405">and</text:span> end of a program</text:p>
      <text:p text:style-name="P94"><text:tab/>IV.2.1 The <text:span text:style-name="T222">main</text:span> function</text:p>
      <text:p text:style-name="P76"><text:span text:style-name="T406"><text:tab/>IV.2.2 The </text:span><text:span text:style-name="T407">_exit</text:span><text:span text:style-name="T406"> and </text:span><text:span text:style-name="T407">_Exit</text:span><text:span text:style-name="T406"> functions</text:span></text:p>
      <text:p text:style-name="P94"><text:tab/>IV.2.3 Normal process termination</text:p>
      <text:p text:style-name="P76"><text:span text:style-name="T406"><text:tab/>IV.2.4 </text:span><text:span text:style-name="T407">at_exit</text:span><text:span text:style-name="T406"> </text:span><text:span text:style-name="T408">and</text:span><text:span text:style-name="T406"> </text:span><text:span text:style-name="T407">on_exit</text:span></text:p>
      <text:p text:style-name="P94"><text:tab/>IV.2.5 Process termination and exit status</text:p>
      <text:p text:style-name="P76"><text:span text:style-name="T406"><text:tab/></text:span><text:span text:style-name="T409">IV.2.</text:span><text:span text:style-name="T410">6</text:span><text:span text:style-name="T406"> </text:span><text:span text:style-name="T411">Aborting a program: </text:span><text:span text:style-name="T407">abort</text:span></text:p>
      <text:p text:style-name="P94">IV.<text:span text:style-name="T412">3</text:span> <text:span text:style-name="T412">Command line arguments</text:span></text:p>
      <text:p text:style-name="P76"><text:span text:style-name="T413"><text:tab/>IV.</text:span><text:span text:style-name="T414">3.1</text:span><text:span text:style-name="T413"> Parsing options with </text:span><text:span text:style-name="T407">getopt</text:span></text:p>
      <text:p text:style-name="P76"><text:span text:style-name="T406"><text:tab/></text:span><text:span text:style-name="T413">IV.3.2 Parsing options with </text:span><text:span text:style-name="T407">getopt_long</text:span></text:p>
      <text:p text:style-name="P76"><text:span text:style-name="T406"><text:tab/></text:span><text:span text:style-name="T413">IV.3.</text:span><text:span text:style-name="T415">3 The </text:span><text:span text:style-name="T407">getsubopt</text:span><text:span text:style-name="T415"> function</text:span></text:p>
      <text:p text:style-name="P94"><text:tab/><text:span text:style-name="T416">IV.</text:span><text:span text:style-name="T417">3.2</text:span><text:span text:style-name="T416"> </text:span><text:span text:style-name="T418">The a</text:span><text:span text:style-name="T419">rgp </text:span><text:span text:style-name="T420">interface</text:span></text:p>
      <text:p text:style-name="P94">IV.<text:span text:style-name="T412">4</text:span> <text:span text:style-name="T399">M</text:span><text:span text:style-name="T412">emory </text:span><text:span text:style-name="T399">allocation</text:span></text:p>
      <text:p text:style-name="P95"><text:tab/>IV.4.1 Memory allocation <text:span text:style-name="T399">functions</text:span></text:p>
      <text:p text:style-name="P76"><text:span text:style-name="T413"><text:tab/>IV.4.</text:span><text:span text:style-name="T421">2</text:span><text:span text:style-name="T413"> </text:span><text:span text:style-name="T421">Processes and memory</text:span></text:p>
      <text:p text:style-name="P96"><text:tab/><text:span text:style-name="T422">IV.4.3 The GNU Allocator</text:span></text:p>
      <text:p text:style-name="P76"><text:span text:style-name="T423"><text:tab/></text:span><text:span text:style-name="T421">IV.4.</text:span><text:span text:style-name="T424">4</text:span><text:span text:style-name="T421"> The </text:span><text:span text:style-name="T425">malloc_trim</text:span><text:span text:style-name="T421"> function</text:span></text:p>
      <text:p text:style-name="P96"><text:tab/>IV.4.<text:span text:style-name="T422">5</text:span> The <text:span text:style-name="T222">alloc</text:span><text:span text:style-name="T426">a</text:span> function</text:p>
      <text:p text:style-name="P96"><text:span text:style-name="T427"><text:tab/>IV.4.</text:span><text:span text:style-name="T428">6</text:span><text:span text:style-name="T427"> </text:span><text:span text:style-name="T429">Allocating aligned memory</text:span></text:p>
      <text:p text:style-name="P97"><text:tab/><text:span text:style-name="T417">IV.4.</text:span><text:span text:style-name="T430">7</text:span><text:span text:style-name="T417"> </text:span><text:span text:style-name="T430">The </text:span><text:span text:style-name="T431">getpagesize</text:span><text:span text:style-name="T430"> function</text:span></text:p>
      <text:p text:style-name="P97">IV.5 Memory mapped I/O</text:p>
      <text:p text:style-name="P76"><text:span text:style-name="T432"><text:tab/>IV.5.1 The </text:span><text:span text:style-name="T425">mmap</text:span><text:span text:style-name="T432"> function</text:span></text:p>
      <text:p text:style-name="P97"><text:tab/>IV.5.2 Private file mapping</text:p>
      <text:p text:style-name="P97"><text:tab/>IV.5.3 Shared file mapping</text:p>
      <text:p text:style-name="P97"><text:tab/>IV.5.4 Anonymous mapping</text:p>
      <text:p text:style-name="P97"><text:tab/>IV.5.<text:span text:style-name="T433">5</text:span> <text:span text:style-name="T433">Extending a mapped file</text:span></text:p>
      <text:p text:style-name="P97"><text:tab/>IV.5.<text:span text:style-name="T433">6</text:span> Remap<text:span text:style-name="T434">ping</text:span> memory</text:p>
      <text:p text:style-name="P76"><text:span text:style-name="T432">IV.</text:span><text:span text:style-name="T435">6</text:span><text:span text:style-name="T432"> </text:span><text:span text:style-name="T436">M</text:span><text:span text:style-name="T437">emory </text:span><text:span text:style-name="T438">functions</text:span></text:p>
      <text:p text:style-name="P76"><text:span text:style-name="T432"><text:tab/>IV.</text:span><text:span text:style-name="T439">6.</text:span><text:span text:style-name="T437">1</text:span><text:span text:style-name="T432"> </text:span><text:span text:style-name="T437">The </text:span><text:span text:style-name="T425">memcpy</text:span><text:span text:style-name="T437"> function</text:span></text:p>
      <text:p text:style-name="P76"><text:span text:style-name="T440"><text:tab/></text:span><text:span text:style-name="T439">IV.6.</text:span><text:span text:style-name="T441">2</text:span><text:span text:style-name="T440"> </text:span><text:span text:style-name="T437">The</text:span> <text:span text:style-name="T425">memmove</text:span> <text:span text:style-name="T437">function</text:span></text:p>
      <text:p text:style-name="P76"><text:span text:style-name="T432"><text:tab/>IV.</text:span><text:span text:style-name="T439">6.</text:span><text:span text:style-name="T441">3</text:span><text:span text:style-name="T432"> </text:span><text:span text:style-name="T442">Memory initialization: </text:span><text:span text:style-name="T425">memset</text:span></text:p>
      <text:p text:style-name="P76"><text:span text:style-name="T438"><text:tab/>IV.6.4 </text:span><text:span text:style-name="T443">Memory search:</text:span><text:span text:style-name="T438"> </text:span><text:span text:style-name="T425">memchr</text:span><text:span text:style-name="T438"> </text:span><text:span text:style-name="T443">and</text:span><text:span text:style-name="T438"> </text:span><text:span text:style-name="T425">memmem</text:span></text:p>
      <text:p text:style-name="P76"><text:span text:style-name="T438"><text:tab/>IV.6.5 </text:span><text:span text:style-name="T444">Comparing memory: </text:span><text:span text:style-name="T425">memcmp</text:span></text:p>
      <text:p text:style-name="P76"><text:span text:style-name="T438"><text:tab/></text:span><text:span text:style-name="T443">IV.6.6 Obfuscating memory: </text:span><text:span text:style-name="T425">memfrob</text:span></text:p>
      <text:p text:style-name="P98">IV.7 Protect the memory</text:p>
      <text:p text:style-name="P76"><text:soft-page-break/><text:span text:style-name="T443"><text:tab/>IV.7.</text:span><text:span text:style-name="T445">1</text:span><text:span text:style-name="T443"> </text:span><text:span text:style-name="T445">The </text:span><text:span text:style-name="T425">mprotect</text:span><text:span text:style-name="T445"> function</text:span></text:p>
      <text:p text:style-name="P99"><text:tab/>IV.7.2 Memory protection keys</text:p>
      <text:p text:style-name="P97">IV.<text:span text:style-name="T446">8</text:span> <text:span text:style-name="T446">Lock</text:span><text:span text:style-name="T447">ing</text:span><text:span text:style-name="T448"> memory</text:span></text:p>
      <text:p text:style-name="P76"><text:span text:style-name="T432"><text:tab/>IV.</text:span><text:span text:style-name="T449">8.</text:span><text:span text:style-name="T450">1 The </text:span><text:span text:style-name="T425">mlock</text:span><text:span text:style-name="T450"> function</text:span></text:p>
      <text:p text:style-name="P76"><text:span text:style-name="T432"><text:tab/>IV.</text:span><text:span text:style-name="T449">8.</text:span><text:span text:style-name="T450">2 The </text:span><text:span text:style-name="T425">mincore</text:span><text:span text:style-name="T450"> function</text:span></text:p>
      <text:p text:style-name="P76"><text:span text:style-name="Strong_20_Emphasis"><text:span text:style-name="T451">IV.9 </text:span></text:span><text:span text:style-name="Strong_20_Emphasis"><text:span text:style-name="T435">RAM-Backed Files and Secret Memory</text:span></text:span></text:p>
      <text:p text:style-name="P76"><text:span text:style-name="T452"><text:tab/>IV.</text:span><text:span text:style-name="T453">9.1</text:span><text:span text:style-name="T452"> A</text:span><text:span text:style-name="T450">nonymous RAM-ba</text:span><text:span text:style-name="T454">ck</text:span><text:span text:style-name="T450">ed file: </text:span><text:span text:style-name="T425">memfd_create</text:span></text:p>
      <text:p text:style-name="P76"><text:span text:style-name="T450"><text:tab/></text:span><text:span text:style-name="T455">IV.</text:span><text:span text:style-name="T456">9.2</text:span><text:span text:style-name="T455"> Private anonymous RAM-backed memory: </text:span><text:span text:style-name="T425">memfd_secret</text:span></text:p>
      <text:p text:style-name="P76"><text:span text:style-name="T432">IV.</text:span><text:span text:style-name="T457">10</text:span><text:span text:style-name="T432"> </text:span><text:span text:style-name="T449">Memory advice</text:span></text:p>
      <text:p text:style-name="P100"><text:tab/><text:span text:style-name="T458">IV.</text:span><text:span text:style-name="T459">10</text:span><text:span text:style-name="T458">.</text:span><text:span text:style-name="T460">1</text:span><text:span text:style-name="T458"> The </text:span><text:span text:style-name="T461">madvise</text:span><text:span text:style-name="T458"> function</text:span></text:p>
      <text:p text:style-name="P76"><text:span text:style-name="T462"><text:tab/>IV.</text:span><text:span text:style-name="T463">10</text:span><text:span text:style-name="T462">.</text:span><text:span text:style-name="T464">2</text:span><text:span text:style-name="T462"> The </text:span><text:span text:style-name="T465">posix_madvise</text:span><text:span text:style-name="T462"> function</text:span></text:p>
      <text:p text:style-name="P76"><text:span text:style-name="T466"><text:tab/>IV.</text:span><text:span text:style-name="T467">10</text:span><text:span text:style-name="T466">.3 Remote memory advice: </text:span><text:span text:style-name="T465">process_madvise</text:span></text:p>
      <text:p text:style-name="P76"><text:span text:style-name="T466">IV.1</text:span><text:span text:style-name="T457">1</text:span><text:span text:style-name="T466"> Nonlocal goto</text:span><text:span text:style-name="T468">s</text:span></text:p>
      <text:p text:style-name="P76"><text:span text:style-name="T465"><text:tab/></text:span><text:span text:style-name="T466">IV.1</text:span><text:span text:style-name="T467">1</text:span><text:span text:style-name="T466">.1 The </text:span><text:span text:style-name="T465">setjmp</text:span><text:span text:style-name="T466"> and </text:span><text:span text:style-name="T465">longjmp</text:span><text:span text:style-name="T466"> functions</text:span></text:p>
      <text:p text:style-name="P90"><text:tab/>IV.1<text:span text:style-name="T469">1.</text:span><text:span text:style-name="T470">2</text:span> The <text:span text:style-name="T461">sigsetjmp</text:span> and <text:span text:style-name="T461">siglongjmp</text:span> functions</text:p>
      <text:p text:style-name="P101">IV.1<text:span text:style-name="T471">2</text:span> Core dump <text:span text:style-name="T472">file</text:span></text:p>
      <text:p text:style-name="P102">IV.13 Dynamically loaded objects</text:p>
      <text:p text:style-name="P100"><text:tab/><text:span text:style-name="T473">IV.13.1 Open</text:span><text:span text:style-name="T474">ing</text:span><text:span text:style-name="T473"> a shared object: </text:span><text:span text:style-name="T475">dlopen</text:span></text:p>
      <text:p text:style-name="P97"><text:tab/><text:span text:style-name="T473">IV.13.</text:span><text:span text:style-name="T476">2</text:span><text:span text:style-name="T473"> O</text:span><text:span text:style-name="T476">btain</text:span><text:span text:style-name="T474">ing</text:span><text:span text:style-name="T476"> the address of a symbol</text:span><text:span text:style-name="T473">: </text:span><text:span text:style-name="T475">dl</text:span><text:span text:style-name="T477">sym</text:span></text:p>
      <text:p text:style-name="P103"><text:span text:style-name="T478"><text:tab/></text:span><text:span text:style-name="T479">IV.13.</text:span><text:span text:style-name="T480">4</text:span><text:span text:style-name="T479"> </text:span><text:span text:style-name="T480">O</text:span><text:span text:style-name="T479">btain</text:span><text:span text:style-name="T481">ing</text:span><text:span text:style-name="T479"> information about a loaded object: </text:span><text:span text:style-name="T482">d</text:span><text:span text:style-name="T483">linfo</text:span></text:p>
      <text:p text:style-name="P103"><text:span text:style-name="T483"><text:tab/></text:span><text:span text:style-name="T473">IV.13.</text:span><text:span text:style-name="T484">5</text:span><text:span text:style-name="T473"> </text:span><text:span text:style-name="T484">Translat</text:span><text:span text:style-name="T474">ing</text:span><text:span text:style-name="T484"> address to symbolic information</text:span><text:span text:style-name="T473">: </text:span><text:span text:style-name="T475">d</text:span><text:span text:style-name="T485">laddr</text:span></text:p>
      <text:p text:style-name="P97"><text:tab/><text:span text:style-name="T473">IV.13.</text:span><text:span text:style-name="T486">6</text:span><text:span text:style-name="T473"> </text:span><text:span text:style-name="T487">W</text:span><text:span text:style-name="T473">alk</text:span><text:span text:style-name="T474">ing</text:span><text:span text:style-name="T473"> through </text:span><text:span text:style-name="T474">a </text:span><text:span text:style-name="T473">list of shared objects: </text:span><text:span text:style-name="T475">d</text:span><text:span text:style-name="T485">l</text:span><text:span text:style-name="T488">­</text:span><text:span text:style-name="T489">_</text:span><text:span text:style-name="T488">iterate_phdr</text:span></text:p>
      <text:p text:style-name="P97">IV.<text:span text:style-name="T490">1</text:span><text:span text:style-name="T491">4</text:span> <text:span text:style-name="T490">Theory </text:span><text:span text:style-name="T405">and</text:span><text:span text:style-name="T490"> </text:span><text:span text:style-name="T405">i</text:span><text:span text:style-name="T490">nsights</text:span></text:p>
      <text:p text:style-name="P97"><text:tab/>IV.<text:span text:style-name="T490">1</text:span><text:span text:style-name="T491">4</text:span>.1 The dynamic linker</text:p>
      <text:p text:style-name="P97"><text:tab/>IV.<text:span text:style-name="T490">1</text:span><text:span text:style-name="T491">4</text:span>.2 The C Runtime</text:p>
      <text:p text:style-name="P97"><text:tab/>IV.<text:span text:style-name="T490">1</text:span><text:span text:style-name="T491">4</text:span>.<text:span text:style-name="T492">3</text:span> Memory allocation parameters</text:p>
      <text:p text:style-name="P76"><text:span text:style-name="T432"><text:tab/>IV.</text:span><text:span text:style-name="T493">1</text:span><text:span text:style-name="T457">4</text:span><text:span text:style-name="T432">.</text:span><text:span text:style-name="T494">4</text:span><text:span text:style-name="T432"> </text:span><text:span text:style-name="T425">malloc</text:span><text:span text:style-name="T432"> related functions</text:span></text:p>
      <text:p text:style-name="P76"><text:span text:style-name="T432"><text:tab/>IV.</text:span><text:span text:style-name="T493">1</text:span><text:span text:style-name="T457">4</text:span><text:span text:style-name="T432">.</text:span><text:span text:style-name="T494">5</text:span><text:span text:style-name="T432"> Heap consistency checking</text:span></text:p>
      <text:p text:style-name="P76"><text:span text:style-name="T432"><text:tab/>IV.</text:span><text:span text:style-name="T493">1</text:span><text:span text:style-name="T457">4</text:span><text:span text:style-name="T432">.</text:span><text:span text:style-name="T495">6</text:span><text:span text:style-name="T432"> Mapping to a specific address</text:span></text:p>
      <text:p text:style-name="P97"><text:tab/><text:span text:style-name="T496">IV.1</text:span><text:span text:style-name="T491">4</text:span><text:span text:style-name="T496">.</text:span><text:span text:style-name="T497">7</text:span><text:span text:style-name="T496"> Memory-management terms glossary</text:span></text:p>
      <text:p text:style-name="P76"><text:span text:style-name="T498"><text:tab/>IV.14.8 Get</text:span><text:span text:style-name="T499">ting</text:span><text:span text:style-name="T498"> information about physical pages: </text:span><text:span text:style-name="T425">get_phys_pages</text:span><text:span text:style-name="T498"><text:tab/><text:tab/><text:tab/>IV.14.9 Get</text:span><text:span text:style-name="T499">ting</text:span><text:span text:style-name="T498"> the number of processors: </text:span><text:span text:style-name="T425">get_nprocs</text:span></text:p>
      <text:p text:style-name="P76"><text:span text:style-name="T498"><text:tab/>IV.14.1</text:span><text:span text:style-name="T500">0</text:span><text:span text:style-name="T498"> Query</text:span><text:span text:style-name="T499">ing</text:span><text:span text:style-name="T498"> the cache: </text:span><text:span text:style-name="T425">cachestat</text:span></text:p>
      <text:p text:style-name="P104"><text:tab/>IV.14.1<text:span text:style-name="T501">1</text:span> <text:span text:style-name="T501">Non-Uniform Memory Architecture</text:span>: <text:span text:style-name="T502">numa</text:span></text:p>
      <text:p text:style-name="P93">List of tables</text:p>
      <text:p text:style-name="P93">List of <text:span text:style-name="T397">figures</text:span></text:p>
      <text:p text:style-name="P93"/>
      <text:p text:style-name="P105"><text:span text:style-name="T232">Chapter</text:span> <text:span text:style-name="T398">V</text:span> – <text:span text:style-name="T503">Processes</text:span></text:p>
      <text:p text:style-name="P105"/>
      <text:p text:style-name="P106"><text:span text:style-name="T398">V</text:span>.1 <text:span text:style-name="T503">Process</text:span><text:span text:style-name="T504">es</text:span></text:p>
      <text:p text:style-name="P107"><text:span text:style-name="T505"><text:tab/>V.1.1 </text:span><text:span text:style-name="T506">Get</text:span><text:span text:style-name="T507">ting</text:span><text:span text:style-name="T506"> the process identifier: </text:span><text:span text:style-name="T508">getpid</text:span><text:span text:style-name="T506"> and </text:span><text:span text:style-name="T509">getppid</text:span></text:p>
      <text:p text:style-name="P108"><text:span text:style-name="Strong_20_Emphasis"><text:span text:style-name="T510"><text:tab/>V.1.</text:span></text:span><text:span text:style-name="Strong_20_Emphasis"><text:span text:style-name="T511">2</text:span></text:span><text:span text:style-name="Strong_20_Emphasis"><text:span text:style-name="T510"> </text:span></text:span><text:span text:style-name="Strong_20_Emphasis"><text:span text:style-name="T511">Creat</text:span></text:span><text:span text:style-name="Strong_20_Emphasis"><text:span text:style-name="T512">ing</text:span></text:span><text:span text:style-name="Strong_20_Emphasis"><text:span text:style-name="T511"> a process</text:span></text:span><text:span text:style-name="Strong_20_Emphasis"><text:span text:style-name="T510">: </text:span></text:span><text:span text:style-name="Strong_20_Emphasis"><text:span text:style-name="T513">fork</text:span></text:span></text:p>
      <text:p text:style-name="P108"><text:tab/><text:span text:style-name="Strong_20_Emphasis"><text:span text:style-name="T510">V.1.</text:span></text:span><text:span text:style-name="Strong_20_Emphasis"><text:span text:style-name="T514">3</text:span></text:span><text:span text:style-name="Strong_20_Emphasis"><text:span text:style-name="T510"> </text:span></text:span><text:span text:style-name="Strong_20_Emphasis"><text:span text:style-name="T511">Creat</text:span></text:span><text:span text:style-name="Strong_20_Emphasis"><text:span text:style-name="T512">ing</text:span></text:span><text:span text:style-name="Strong_20_Emphasis"><text:span text:style-name="T511"> a </text:span></text:span><text:span text:style-name="Strong_20_Emphasis"><text:span text:style-name="T515">process</text:span></text:span><text:span text:style-name="Strong_20_Emphasis"><text:span text:style-name="T511"> </text:span></text:span><text:span text:style-name="Strong_20_Emphasis"><text:span text:style-name="T514">blocking the parent</text:span></text:span><text:span text:style-name="Strong_20_Emphasis"><text:span text:style-name="T510">: </text:span></text:span><text:span text:style-name="Strong_20_Emphasis"><text:span text:style-name="T513">vfork</text:span></text:span></text:p>
      <text:p text:style-name="P107"><text:span text:style-name="Strong_20_Emphasis"><text:span text:style-name="T516"><text:tab/></text:span></text:span><text:span text:style-name="Strong_20_Emphasis"><text:span text:style-name="T517">V.1.</text:span></text:span><text:span text:style-name="Strong_20_Emphasis"><text:span text:style-name="T518">4</text:span></text:span><text:span text:style-name="Strong_20_Emphasis"><text:span text:style-name="T517"> </text:span></text:span><text:span text:style-name="Strong_20_Emphasis"><text:span text:style-name="T518">Block</text:span></text:span><text:span text:style-name="Strong_20_Emphasis"><text:span text:style-name="T507">ing</text:span></text:span><text:span text:style-name="Strong_20_Emphasis"><text:span text:style-name="T518"> execution</text:span></text:span><text:span text:style-name="Strong_20_Emphasis"><text:span text:style-name="T517">: </text:span></text:span><text:span text:style-name="Strong_20_Emphasis"><text:span text:style-name="T519">wait</text:span></text:span><text:span text:style-name="Strong_20_Emphasis"><text:span text:style-name="T518">, </text:span></text:span><text:span text:style-name="Strong_20_Emphasis"><text:span text:style-name="T519">waitpid</text:span></text:span><text:span text:style-name="Strong_20_Emphasis"><text:span text:style-name="T518"> and </text:span></text:span><text:span text:style-name="Strong_20_Emphasis"><text:span text:style-name="T520">waitid</text:span></text:span></text:p>
      <text:p text:style-name="P107"><text:span text:style-name="Strong_20_Emphasis"><text:span text:style-name="T516"><text:tab/></text:span></text:span><text:span text:style-name="Strong_20_Emphasis"><text:span text:style-name="T517">V.1.</text:span></text:span><text:span text:style-name="Strong_20_Emphasis"><text:span text:style-name="T521">5</text:span></text:span><text:span text:style-name="Strong_20_Emphasis"><text:span text:style-name="T517"> </text:span></text:span><text:span text:style-name="Strong_20_Emphasis"><text:span text:style-name="T522">The </text:span></text:span><text:span text:style-name="Strong_20_Emphasis"><text:span text:style-name="T519">wait</text:span></text:span><text:span text:style-name="Strong_20_Emphasis"><text:span text:style-name="T520">3</text:span></text:span><text:span text:style-name="Strong_20_Emphasis"><text:span text:style-name="T518"> and </text:span></text:span><text:span text:style-name="Strong_20_Emphasis"><text:span text:style-name="T520">wait4</text:span></text:span><text:span text:style-name="Strong_20_Emphasis"><text:span text:style-name="T518"> functions</text:span></text:span></text:p>
      <text:p text:style-name="P107"><text:soft-page-break/><text:span text:style-name="Strong_20_Emphasis"><text:span text:style-name="T517"><text:tab/>V.1.</text:span></text:span><text:span text:style-name="Strong_20_Emphasis"><text:span text:style-name="T523">6</text:span></text:span><text:span text:style-name="Strong_20_Emphasis"><text:span text:style-name="T517"> </text:span></text:span><text:span text:style-name="Strong_20_Emphasis"><text:span text:style-name="T524">P</text:span></text:span><text:span text:style-name="Strong_20_Emphasis"><text:span text:style-name="T525">rocess </text:span></text:span><text:span text:style-name="Strong_20_Emphasis"><text:span text:style-name="T524">file descriptors</text:span></text:span></text:p>
      <text:p text:style-name="P107"><text:span text:style-name="Strong_20_Emphasis"><text:span text:style-name="T524"><text:tab/></text:span></text:span><text:span text:style-name="Strong_20_Emphasis"><text:span text:style-name="T526">V.1.7 Creat</text:span></text:span><text:span text:style-name="Strong_20_Emphasis"><text:span text:style-name="T507">ing</text:span></text:span><text:span text:style-name="Strong_20_Emphasis"><text:span text:style-name="T526"> child process</text:span></text:span><text:span text:style-name="Strong_20_Emphasis"><text:span text:style-name="T527">es</text:span></text:span><text:span text:style-name="Strong_20_Emphasis"><text:span text:style-name="T526">: </text:span></text:span><text:span text:style-name="Strong_20_Emphasis"><text:span text:style-name="T528">clone</text:span></text:span><text:span text:style-name="Strong_20_Emphasis"><text:span text:style-name="T526"> and </text:span></text:span><text:span text:style-name="Strong_20_Emphasis"><text:span text:style-name="T529">clone3</text:span></text:span></text:p>
      <text:p text:style-name="P107"><text:span text:style-name="Strong_20_Emphasis"><text:span text:style-name="T517"><text:tab/></text:span></text:span><text:span text:style-name="Strong_20_Emphasis"><text:span text:style-name="T530">V.1.</text:span></text:span><text:span text:style-name="Strong_20_Emphasis"><text:span text:style-name="T531">8</text:span></text:span><text:span text:style-name="Strong_20_Emphasis"><text:span text:style-name="T530"> Compar</text:span></text:span><text:span text:style-name="Strong_20_Emphasis"><text:span text:style-name="T507">ing</text:span></text:span><text:span text:style-name="Strong_20_Emphasis"><text:span text:style-name="T530"> processes</text:span></text:span><text:span text:style-name="Strong_20_Emphasis"><text:span text:style-name="T517">: </text:span></text:span><text:span text:style-name="Strong_20_Emphasis"><text:span text:style-name="T529">kcmp</text:span></text:span></text:p>
      <text:p text:style-name="P107"><text:span text:style-name="Strong_20_Emphasis"><text:span text:style-name="T517"><text:tab/>V.1.</text:span></text:span><text:span text:style-name="Strong_20_Emphasis"><text:span text:style-name="T526">9</text:span></text:span><text:span text:style-name="Strong_20_Emphasis"><text:span text:style-name="T517"> </text:span></text:span><text:span text:style-name="Strong_20_Emphasis"><text:span text:style-name="T525">Execut</text:span></text:span><text:span text:style-name="Strong_20_Emphasis"><text:span text:style-name="T507">ing</text:span></text:span><text:span text:style-name="Strong_20_Emphasis"><text:span text:style-name="T525"> a </text:span></text:span><text:span text:style-name="Strong_20_Emphasis"><text:span text:style-name="T532">shell </text:span></text:span><text:span text:style-name="Strong_20_Emphasis"><text:span text:style-name="T530">command</text:span></text:span><text:span text:style-name="Strong_20_Emphasis"><text:span text:style-name="T525">: </text:span></text:span><text:span text:style-name="Strong_20_Emphasis"><text:span text:style-name="T530">s</text:span></text:span><text:span text:style-name="Strong_20_Emphasis"><text:span text:style-name="T533">ystem</text:span></text:span><text:span text:style-name="Strong_20_Emphasis"><text:span text:style-name="T517"><text:tab/></text:span></text:span></text:p>
      <text:p text:style-name="P107"><text:span text:style-name="Strong_20_Emphasis"><text:span text:style-name="T517"><text:tab/>V.1.</text:span></text:span><text:span text:style-name="Strong_20_Emphasis"><text:span text:style-name="T531">10</text:span></text:span><text:span text:style-name="Strong_20_Emphasis"><text:span text:style-name="T517"> </text:span></text:span><text:span text:style-name="Strong_20_Emphasis"><text:span text:style-name="T525">Execut</text:span></text:span><text:span text:style-name="Strong_20_Emphasis"><text:span text:style-name="T507">ing</text:span></text:span><text:span text:style-name="Strong_20_Emphasis"><text:span text:style-name="T525"> a </text:span></text:span><text:span text:style-name="Strong_20_Emphasis"><text:span text:style-name="T534">progran</text:span></text:span><text:span text:style-name="Strong_20_Emphasis"><text:span text:style-name="T525">: </text:span></text:span><text:span text:style-name="Strong_20_Emphasis"><text:span text:style-name="T528">execv</text:span></text:span><text:span text:style-name="Strong_20_Emphasis"><text:span text:style-name="T535">e</text:span></text:span></text:p>
      <text:p text:style-name="P107"><text:span text:style-name="Strong_20_Emphasis"><text:span text:style-name="T536"><text:tab/></text:span></text:span><text:span text:style-name="Strong_20_Emphasis"><text:span text:style-name="T537">V.1.</text:span></text:span><text:span text:style-name="Strong_20_Emphasis"><text:span text:style-name="T538">1</text:span></text:span><text:span text:style-name="Strong_20_Emphasis"><text:span text:style-name="T539">1</text:span></text:span><text:span text:style-name="Strong_20_Emphasis"><text:span text:style-name="T537"> </text:span></text:span><text:span text:style-name="Strong_20_Emphasis"><text:span text:style-name="T540">Execut</text:span></text:span><text:span text:style-name="Strong_20_Emphasis"><text:span text:style-name="T541">ing</text:span></text:span><text:span text:style-name="Strong_20_Emphasis"><text:span text:style-name="T540"> a </text:span></text:span><text:span text:style-name="Strong_20_Emphasis"><text:span text:style-name="T542">program </text:span></text:span><text:span text:style-name="Strong_20_Emphasis"><text:span text:style-name="T539">via file descriptor</text:span></text:span><text:span text:style-name="Strong_20_Emphasis"><text:span text:style-name="T540">: </text:span></text:span><text:span text:style-name="Strong_20_Emphasis"><text:span text:style-name="T543">fexecv</text:span></text:span><text:span text:style-name="Strong_20_Emphasis"><text:span text:style-name="T544">e</text:span></text:span></text:p>
      <text:p text:style-name="P107"><text:span text:style-name="Strong_20_Emphasis"><text:span text:style-name="T530"><text:tab/></text:span></text:span><text:span text:style-name="Strong_20_Emphasis"><text:span text:style-name="T537">V.1.</text:span></text:span><text:span text:style-name="Strong_20_Emphasis"><text:span text:style-name="T538">1</text:span></text:span><text:span text:style-name="Strong_20_Emphasis"><text:span text:style-name="T539">2</text:span></text:span><text:span text:style-name="Strong_20_Emphasis"><text:span text:style-name="T537"> </text:span></text:span><text:span text:style-name="Strong_20_Emphasis"><text:span text:style-name="T539">The </text:span></text:span><text:span text:style-name="Strong_20_Emphasis"><text:span text:style-name="T543">exec</text:span></text:span><text:span text:style-name="Strong_20_Emphasis"><text:span text:style-name="T540"> family functions</text:span></text:span></text:p>
      <text:p text:style-name="P107"><text:span text:style-name="Strong_20_Emphasis"><text:span text:style-name="T530"><text:tab/></text:span></text:span><text:span text:style-name="Strong_20_Emphasis"><text:span text:style-name="T545">V.1.1</text:span></text:span><text:span text:style-name="Strong_20_Emphasis"><text:span text:style-name="T546">3</text:span></text:span><text:span text:style-name="Strong_20_Emphasis"><text:span text:style-name="T545"> Control</text:span></text:span><text:span text:style-name="Strong_20_Emphasis"><text:span text:style-name="T507">ling</text:span></text:span><text:span text:style-name="Strong_20_Emphasis"><text:span text:style-name="T545"> a process: </text:span></text:span><text:span text:style-name="Strong_20_Emphasis"><text:span text:style-name="T543">prctl</text:span></text:span><text:span text:style-name="Strong_20_Emphasis"><text:span text:style-name="T530"><text:tab/><text:tab/><text:tab/><text:tab/></text:span></text:span></text:p>
      <text:p text:style-name="P107"><text:span text:style-name="Strong_20_Emphasis"><text:span text:style-name="T530"><text:tab/>V.1.1</text:span></text:span><text:span text:style-name="Strong_20_Emphasis"><text:span text:style-name="T547">4</text:span></text:span><text:span text:style-name="Strong_20_Emphasis"><text:span text:style-name="T530"> Process </text:span></text:span><text:span text:style-name="Strong_20_Emphasis"><text:span text:style-name="T548">data transfer: </text:span></text:span><text:span text:style-name="Strong_20_Emphasis"><text:span text:style-name="T543">process_vm_read</text:span></text:span></text:p>
      <text:p text:style-name="P107"><text:span text:style-name="Strong_20_Emphasis"><text:span text:style-name="T549"><text:tab/>V.1.1</text:span></text:span><text:span text:style-name="Strong_20_Emphasis"><text:span text:style-name="T550">5</text:span></text:span><text:span text:style-name="Strong_20_Emphasis"><text:span text:style-name="T549"> Secure Computing state of the process: </text:span></text:span><text:span text:style-name="Strong_20_Emphasis"><text:span text:style-name="T543">seccomp</text:span></text:span></text:p>
      <text:p text:style-name="P107"><text:span text:style-name="Strong_20_Emphasis"><text:span text:style-name="T549"><text:tab/></text:span></text:span><text:span text:style-name="Strong_20_Emphasis"><text:span text:style-name="T551">V.1.1</text:span></text:span><text:span text:style-name="Strong_20_Emphasis"><text:span text:style-name="T552">6</text:span></text:span><text:span text:style-name="Strong_20_Emphasis"><text:span text:style-name="T551"> Secure Computing state of the process: </text:span></text:span><text:span text:style-name="Strong_20_Emphasis"><text:span text:style-name="T553">libseccomp</text:span></text:span></text:p>
      <text:p text:style-name="P107"><text:span text:style-name="Strong_20_Emphasis"><text:span text:style-name="T549"><text:tab/>V.1.1</text:span></text:span><text:span text:style-name="Strong_20_Emphasis"><text:span text:style-name="T554">7</text:span></text:span><text:span text:style-name="Strong_20_Emphasis"><text:span text:style-name="T549"> Seccomp user-space notification mechanism: </text:span></text:span><text:span text:style-name="Strong_20_Emphasis"><text:span text:style-name="T543">seccomp_unotify</text:span></text:span></text:p>
      <text:p text:style-name="P107"><text:span text:style-name="Strong_20_Emphasis"><text:span text:style-name="T555"><text:tab/></text:span></text:span><text:span text:style-name="Strong_20_Emphasis"><text:span text:style-name="T549">V.1.1</text:span></text:span><text:span text:style-name="Strong_20_Emphasis"><text:span text:style-name="T554">8</text:span></text:span><text:span text:style-name="Strong_20_Emphasis"><text:span text:style-name="T549"> Seccomp </text:span></text:span><text:span text:style-name="Strong_20_Emphasis"><text:span text:style-name="T554">user-space </text:span></text:span><text:span text:style-name="Strong_20_Emphasis"><text:span text:style-name="T549">notification mechanism </text:span></text:span><text:span text:style-name="Strong_20_Emphasis"><text:span text:style-name="T555">with</text:span></text:span><text:span text:style-name="Strong_20_Emphasis"><text:span text:style-name="T549"> </text:span></text:span><text:span text:style-name="Strong_20_Emphasis"><text:span text:style-name="T543">libseccomp</text:span></text:span></text:p>
      <text:p text:style-name="P107"><text:span text:style-name="Strong_20_Emphasis"><text:span text:style-name="T549"><text:tab/></text:span></text:span><text:span text:style-name="Strong_20_Emphasis"><text:span text:style-name="T556">V.1.19 Process accounting: </text:span></text:span><text:span text:style-name="Strong_20_Emphasis"><text:span text:style-name="T543">acct</text:span></text:span></text:p>
      <text:p text:style-name="P107"><text:span text:style-name="Strong_20_Emphasis"><text:span text:style-name="T549"><text:tab/>V.1.20 Proces</text:span></text:span><text:span text:style-name="Strong_20_Emphasis"><text:span text:style-name="T507">s</text:span></text:span><text:span text:style-name="Strong_20_Emphasis"><text:span text:style-name="T549"> scheduling: </text:span></text:span><text:span text:style-name="Strong_20_Emphasis"><text:span text:style-name="T543">nice</text:span></text:span><text:span text:style-name="Strong_20_Emphasis"><text:span text:style-name="T557"> and </text:span></text:span><text:span text:style-name="Strong_20_Emphasis"><text:span text:style-name="T543">setpriority</text:span></text:span><text:span text:style-name="Strong_20_Emphasis"><text:span text:style-name="T549"><text:tab/><text:tab/></text:span></text:span></text:p>
      <text:p text:style-name="P107"><text:span text:style-name="Strong_20_Emphasis"><text:span text:style-name="T558">V.</text:span></text:span><text:span text:style-name="Strong_20_Emphasis"><text:span text:style-name="T559">2</text:span></text:span><text:span text:style-name="Strong_20_Emphasis"><text:span text:style-name="T558"> </text:span></text:span><text:span text:style-name="Strong_20_Emphasis"><text:span text:style-name="T560">Process groups, sessions </text:span></text:span><text:span text:style-name="Strong_20_Emphasis"><text:span text:style-name="T561">and terminal</text:span></text:span></text:p>
      <text:p text:style-name="P107"><text:span text:style-name="Strong_20_Emphasis"><text:span text:style-name="T561"><text:tab/>V.2.1 Process groups: </text:span></text:span><text:span text:style-name="Strong_20_Emphasis"><text:span text:style-name="T543">getpgid</text:span></text:span><text:span text:style-name="Strong_20_Emphasis"><text:span text:style-name="T561"> and </text:span></text:span><text:span text:style-name="Strong_20_Emphasis"><text:span text:style-name="T543">setpgid</text:span></text:span></text:p>
      <text:p text:style-name="P107"><text:span text:style-name="Strong_20_Emphasis"><text:span text:style-name="T561"><text:tab/>V.2.2 Sessions: </text:span></text:span><text:span text:style-name="Strong_20_Emphasis"><text:span text:style-name="T543">setsid</text:span></text:span><text:span text:style-name="Strong_20_Emphasis"><text:span text:style-name="T561"> and </text:span></text:span><text:span text:style-name="Strong_20_Emphasis"><text:span text:style-name="T543">getsid</text:span></text:span></text:p>
      <text:p text:style-name="P107"><text:span text:style-name="Strong_20_Emphasis"><text:span text:style-name="T561"><text:tab/>V.2.3 Controlling terminal: </text:span></text:span><text:span text:style-name="Strong_20_Emphasis"><text:span text:style-name="T543">tcsetpgrp</text:span></text:span><text:span text:style-name="Strong_20_Emphasis"><text:span text:style-name="T561"><text:tab/></text:span></text:span></text:p>
      <text:p text:style-name="P107"><text:span text:style-name="Strong_20_Emphasis"><text:span text:style-name="T561"><text:tab/>V.2.4 Job control</text:span></text:span></text:p>
      <text:p text:style-name="P107"><text:span text:style-name="Strong_20_Emphasis"><text:span text:style-name="T561"><text:tab/>V.2.5 Identifying the controlling terminal: </text:span></text:span><text:span text:style-name="Strong_20_Emphasis"><text:span text:style-name="T543">ctermid</text:span></text:span><text:span text:style-name="Strong_20_Emphasis"><text:span text:style-name="T561"> and </text:span></text:span><text:span text:style-name="Strong_20_Emphasis"><text:span text:style-name="T543">ttyname</text:span></text:span></text:p>
      <text:p text:style-name="P107"><text:span text:style-name="Strong_20_Emphasis"><text:span text:style-name="T562"><text:tab/></text:span></text:span><text:span text:style-name="Strong_20_Emphasis"><text:span text:style-name="T561">V.2.6 Orphaned process groups</text:span></text:span></text:p>
      <text:p text:style-name="P107"><text:span text:style-name="Strong_20_Emphasis"><text:span text:style-name="T549">V.</text:span></text:span><text:span text:style-name="Strong_20_Emphasis"><text:span text:style-name="T563">3</text:span></text:span><text:span text:style-name="Strong_20_Emphasis"><text:span text:style-name="T549"> Signals</text:span></text:span></text:p>
      <text:p text:style-name="P107"><text:span text:style-name="Strong_20_Emphasis"><text:span text:style-name="T549"><text:tab/></text:span></text:span><text:span text:style-name="Strong_20_Emphasis"><text:span text:style-name="T556">V.</text:span></text:span><text:span text:style-name="Strong_20_Emphasis"><text:span text:style-name="T563">3</text:span></text:span><text:span text:style-name="Strong_20_Emphasis"><text:span text:style-name="T556">.1 </text:span></text:span><text:span text:style-name="Strong_20_Emphasis"><text:span text:style-name="T564">Signal overview</text:span></text:span></text:p>
      <text:p text:style-name="P107"><text:span text:style-name="Strong_20_Emphasis"><text:span text:style-name="T564"><text:tab/>V.3.2 Signal details</text:span></text:span></text:p>
      <text:p text:style-name="P107"><text:span text:style-name="Strong_20_Emphasis"><text:span text:style-name="T564"><text:tab/></text:span></text:span><text:span text:style-name="Strong_20_Emphasis"><text:span text:style-name="T565">V.3.</text:span></text:span><text:span text:style-name="Strong_20_Emphasis"><text:span text:style-name="T566">3</text:span></text:span><text:span text:style-name="Strong_20_Emphasis"><text:span text:style-name="T565"> </text:span></text:span><text:span text:style-name="Strong_20_Emphasis"><text:span text:style-name="T566">Describ</text:span></text:span><text:span text:style-name="Strong_20_Emphasis"><text:span text:style-name="T541">ing</text:span></text:span><text:span text:style-name="Strong_20_Emphasis"><text:span text:style-name="T567"> signals: </text:span></text:span><text:span text:style-name="Strong_20_Emphasis"><text:span text:style-name="T568">strsignal</text:span></text:span><text:span text:style-name="Strong_20_Emphasis"><text:span text:style-name="T567"> and </text:span></text:span><text:span text:style-name="Strong_20_Emphasis"><text:span text:style-name="T569">psignal</text:span></text:span></text:p>
      <text:p text:style-name="P108"><text:tab/><text:span text:style-name="T570">V.3.</text:span><text:span text:style-name="T571">4</text:span><text:span text:style-name="T570"> </text:span><text:span text:style-name="T571">S</text:span><text:span text:style-name="T572">ignal </text:span><text:span text:style-name="T571">handling</text:span><text:span text:style-name="T572">: </text:span><text:span text:style-name="T573">sigaction</text:span></text:p>
      <text:p text:style-name="P108"><text:span text:style-name="T574"><text:tab/>V.3.</text:span><text:span text:style-name="T575">5</text:span><text:span text:style-name="T574"> </text:span><text:span text:style-name="T575">Signal set operations</text:span><text:span text:style-name="T576">: </text:span><text:span text:style-name="T577">sigemptyset</text:span><text:span text:style-name="T575"> and </text:span><text:span text:style-name="T577">sigfillset</text:span></text:p>
      <text:p text:style-name="P109"><text:tab/>V.3.6 Signal handlers</text:p>
      <text:p text:style-name="P107"><text:span text:style-name="T578"><text:tab/>V.3.7 </text:span><text:span text:style-name="T579">Send</text:span><text:span text:style-name="T507">ing</text:span><text:span text:style-name="T578"> signals </text:span><text:span text:style-name="T579">to the caller</text:span><text:span text:style-name="T578">: </text:span><text:span text:style-name="T580">raise</text:span></text:p>
      <text:p text:style-name="P107"><text:span text:style-name="T580"><text:tab/></text:span><text:span text:style-name="T579">V.3.8 Send</text:span><text:span text:style-name="T507">ing</text:span><text:span text:style-name="T579"> signals to another process: </text:span><text:span text:style-name="T581">kill</text:span><text:span text:style-name="T582"> and </text:span><text:span text:style-name="T583">killpg</text:span></text:p>
      <text:p text:style-name="P107"><text:span text:style-name="T578"><text:tab/>V.3.</text:span><text:span text:style-name="T584">9</text:span><text:span text:style-name="T578"> </text:span><text:span text:style-name="T582">Send</text:span><text:span text:style-name="T507">ing</text:span><text:span text:style-name="T582"> </text:span><text:span text:style-name="T585">s</text:span><text:span text:style-name="T578">ignal</text:span><text:span text:style-name="T585">s </text:span><text:span text:style-name="T582">to </text:span><text:span text:style-name="T584">a specific thread</text:span><text:span text:style-name="T585">: </text:span><text:span text:style-name="T581">tgkill</text:span><text:span text:style-name="T586"> and</text:span><text:span text:style-name="T585"> </text:span><text:span text:style-name="T581">pthread_kill</text:span></text:p>
      <text:p text:style-name="P107"><text:span text:style-name="T578"><text:tab/>V.3.</text:span><text:span text:style-name="T584">1</text:span><text:span text:style-name="T587">0</text:span><text:span text:style-name="T578"> </text:span><text:span text:style-name="T582">Send</text:span><text:span text:style-name="T507">ing</text:span><text:span text:style-name="T582"> </text:span><text:span text:style-name="T584">real-time </text:span><text:span text:style-name="T585">s</text:span><text:span text:style-name="T578">ignal</text:span><text:span text:style-name="T585">s: </text:span><text:span text:style-name="T581">sigqueue</text:span><text:span text:style-name="T584"> and </text:span><text:span text:style-name="T588">pthread</text:span><text:span text:style-name="T589">_sigque</text:span><text:span text:style-name="T588">ue</text:span></text:p>
      <text:p text:style-name="P109"><text:tab/>V.3.<text:span text:style-name="T590">1</text:span><text:span text:style-name="T591">1</text:span> <text:span text:style-name="T592">Set</text:span><text:span text:style-name="T593">ting</text:span><text:span text:style-name="T592"> alarm clock</text:span><text:span text:style-name="T594">: </text:span><text:span text:style-name="T595">alarm</text:span></text:p>
      <text:p text:style-name="P107"><text:span text:style-name="T578"><text:tab/>V.3.</text:span><text:span text:style-name="T584">1</text:span><text:span text:style-name="T596">2</text:span><text:span text:style-name="T578"> Block</text:span><text:span text:style-name="T507">ing</text:span><text:span text:style-name="T578"> signals: </text:span><text:span text:style-name="T597">sigprocmask</text:span></text:p>
      <text:p text:style-name="P109"><text:tab/>V.3.<text:span text:style-name="T590">1</text:span><text:span text:style-name="T598">3</text:span> <text:span text:style-name="T598">Check</text:span><text:span text:style-name="T593">ing</text:span><text:span text:style-name="T598"> for pending signals: </text:span><text:span text:style-name="T599">sig</text:span><text:span text:style-name="T600">pending</text:span></text:p>
      <text:p text:style-name="P109"><text:tab/>V.3.<text:span text:style-name="T590">1</text:span><text:span text:style-name="T601">4</text:span><text:span text:style-name="T602"> </text:span><text:span text:style-name="Strong_20_Emphasis"><text:span text:style-name="T603">Handling </text:span></text:span><text:span text:style-name="Strong_20_Emphasis"><text:span text:style-name="T604">s</text:span></text:span><text:span text:style-name="Strong_20_Emphasis"><text:span text:style-name="T603">ignals with </text:span></text:span><text:span text:style-name="Strong_20_Emphasis"><text:span text:style-name="T604">n</text:span></text:span><text:span text:style-name="Strong_20_Emphasis"><text:span text:style-name="T603">onlocal </text:span></text:span><text:span text:style-name="Strong_20_Emphasis"><text:span text:style-name="T604">j</text:span></text:span><text:span text:style-name="Strong_20_Emphasis"><text:span text:style-name="T603">umps</text:span></text:span></text:p>
      <text:p text:style-name="P107"><text:span text:style-name="T578"><text:tab/>V.3.1</text:span><text:span text:style-name="T605">5</text:span><text:span text:style-name="T578"> Wait</text:span><text:span text:style-name="T507">ing</text:span><text:span text:style-name="T578"> for signals: </text:span><text:span text:style-name="T597">pause</text:span><text:span text:style-name="T606"> and</text:span><text:span text:style-name="T578"> </text:span><text:span text:style-name="T597">sigsuspend</text:span></text:p>
      <text:p text:style-name="P109"><text:tab/>V.3.<text:span text:style-name="T590">1</text:span><text:span text:style-name="T607">6</text:span> <text:span text:style-name="T594">Wait</text:span><text:span text:style-name="T593">ing</text:span><text:span text:style-name="T594"> for s</text:span>ignal<text:span text:style-name="T594">s: </text:span><text:span text:style-name="T608">s</text:span><text:span text:style-name="T609">igwait</text:span><text:span text:style-name="T594"> and </text:span><text:span text:style-name="T609">sigwaitinfo</text:span></text:p>
      <text:p text:style-name="P107"><text:span text:style-name="T610"><text:tab/></text:span><text:span text:style-name="T611">V</text:span><text:span text:style-name="T610">.3.1</text:span><text:span text:style-name="T611">7</text:span><text:span text:style-name="T610"> Signal file descriptor: </text:span><text:span text:style-name="T612">signalfd</text:span></text:p>
      <text:p text:style-name="P107"><text:span text:style-name="T578"><text:tab/>V.3.1</text:span><text:span text:style-name="T611">8</text:span><text:span text:style-name="T578"> </text:span><text:span text:style-name="T613">Alternate </text:span><text:span text:style-name="T614">signal</text:span><text:span text:style-name="T613"> stack: </text:span><text:span text:style-name="T597">sigaltstack</text:span></text:p>
      <text:p text:style-name="P107"><text:span text:style-name="T578"><text:tab/>V.3.</text:span><text:span text:style-name="T611">19</text:span><text:span text:style-name="T578"> </text:span><text:span text:style-name="T615">Sleep</text:span><text:span text:style-name="T613">ing</text:span><text:span text:style-name="T578">: </text:span><text:span text:style-name="T597">sleep</text:span><text:span text:style-name="T614">, </text:span><text:span text:style-name="T597">nanosleep</text:span><text:span text:style-name="T614">, </text:span><text:span text:style-name="T616">usleep</text:span><text:span text:style-name="T614">, </text:span><text:span text:style-name="T616">clock_nanosleep</text:span></text:p>
      <text:p text:style-name="P110">V.4 Timers</text:p>
      <text:p text:style-name="P107"><text:span text:style-name="T617"><text:tab/>V.4.1 Interval timers: </text:span><text:span text:style-name="T597">getitimer</text:span><text:span text:style-name="T617"> and </text:span><text:span text:style-name="T597">setitimer</text:span></text:p>
      <text:p text:style-name="P107"><text:span text:style-name="T516"><text:tab/></text:span><text:span text:style-name="T617">V.4.2 POSIX timers: </text:span><text:span text:style-name="T597">timer_create</text:span></text:p>
      <text:p text:style-name="P107"><text:soft-page-break/><text:span text:style-name="T617"><text:tab/>V.4.3 Arm</text:span><text:span text:style-name="T618">ing</text:span><text:span text:style-name="T617"> and disarm</text:span><text:span text:style-name="T618">ing</text:span><text:span text:style-name="T617"> timers: </text:span><text:span text:style-name="T597">timer_gettime</text:span><text:span text:style-name="T617"> and </text:span><text:span text:style-name="T597">timer_settime</text:span></text:p>
      <text:p text:style-name="P107"><text:span text:style-name="T617"><text:tab/>V.4.4 </text:span><text:span text:style-name="T619">O</text:span><text:span text:style-name="T617">verrun</text:span><text:span text:style-name="T619">s</text:span><text:span text:style-name="T617"> and deletion: </text:span><text:span text:style-name="T597">timer_getoverrun</text:span><text:span text:style-name="T617"> and </text:span><text:span text:style-name="T597">timer_delete</text:span></text:p>
      <text:p text:style-name="P107"><text:span text:style-name="T516"><text:tab/></text:span><text:span text:style-name="T619">V.4.</text:span><text:span text:style-name="T620">5</text:span><text:span text:style-name="T619"> </text:span><text:span text:style-name="T620">CPU-time clocks</text:span><text:span text:style-name="T619">: </text:span><text:span text:style-name="T621">clock_getcpuclockid</text:span><text:span text:style-name="T620">, </text:span><text:span text:style-name="T621">pthread_getcpuclockid</text:span></text:p>
      <text:p text:style-name="P108">V.<text:span text:style-name="T622">5</text:span> <text:span text:style-name="T623">Thread</text:span>s</text:p>
      <text:p text:style-name="P108"><text:tab/><text:span text:style-name="T624">V.</text:span><text:span text:style-name="T625">5.</text:span><text:span text:style-name="T624">1 POSIX threads: </text:span><text:span text:style-name="T626">pthread</text:span></text:p>
      <text:p text:style-name="P106"><text:tab/><text:span text:style-name="T624">V.</text:span><text:span text:style-name="T625">5.</text:span><text:span text:style-name="T627">2</text:span><text:span text:style-name="T624"> </text:span><text:span text:style-name="T628">Thread ID: </text:span><text:span text:style-name="T629">gettid</text:span><text:span text:style-name="T628">, </text:span><text:span text:style-name="T630">pthread_self</text:span><text:span text:style-name="T628"> and </text:span><text:span text:style-name="T630">pthread_equal</text:span></text:p>
      <text:p text:style-name="P107"><text:span text:style-name="T77"><text:tab/></text:span><text:span text:style-name="T631">V.</text:span><text:span text:style-name="T632">5.</text:span><text:span text:style-name="T633">3</text:span><text:span text:style-name="T631"> </text:span><text:span text:style-name="T634">Creat</text:span><text:span text:style-name="T541">ing</text:span><text:span text:style-name="T634"> t</text:span><text:span text:style-name="T635">hread</text:span><text:span text:style-name="T636">s</text:span><text:span text:style-name="T635">: </text:span><text:span text:style-name="T637">pthread_</text:span><text:span text:style-name="T638">create</text:span><text:span text:style-name="T635"> and </text:span><text:span text:style-name="T637">pthread_</text:span><text:span text:style-name="T639">join</text:span></text:p>
      <text:p text:style-name="P107"><text:span text:style-name="T634"><text:tab/></text:span><text:span text:style-name="T640">V</text:span><text:span text:style-name="T634">.</text:span><text:span text:style-name="T632">5.</text:span><text:span text:style-name="T634">4 Thread attributes: </text:span><text:span text:style-name="T637">pthread_attr_init</text:span><text:span text:style-name="T634"> and </text:span><text:span text:style-name="T637">pthread_attr_destroy</text:span></text:p>
      <text:p text:style-name="P107"><text:span text:style-name="T634"><text:tab/>V.</text:span><text:span text:style-name="T632">5.</text:span><text:span text:style-name="T634">5 Termin</text:span><text:span text:style-name="T641">at</text:span><text:span text:style-name="T541">ing</text:span><text:span text:style-name="T634"> t</text:span><text:span text:style-name="T635">hread</text:span><text:span text:style-name="T636">s</text:span><text:span text:style-name="T635">: </text:span><text:span text:style-name="T637">pthread_</text:span><text:span text:style-name="T642">exit</text:span><text:span text:style-name="T641"> and </text:span><text:span text:style-name="T643">pthread_cancel</text:span></text:p>
      <text:p text:style-name="P107"><text:span text:style-name="T563"><text:tab/>V.</text:span><text:span text:style-name="T644">5.</text:span><text:span text:style-name="T563">6 Clean-up handlers: </text:span><text:span text:style-name="T637">pthread_cleanup_push</text:span><text:span text:style-name="T563">, </text:span><text:span text:style-name="T637">pthread_cleanup_pop</text:span></text:p>
      <text:p text:style-name="P111"><text:tab/><text:span text:style-name="T645">V.</text:span><text:span text:style-name="T625">5.</text:span><text:span text:style-name="T646">7</text:span><text:span text:style-name="T645"> </text:span><text:span text:style-name="T646">Send</text:span><text:span text:style-name="T647">ing</text:span><text:span text:style-name="T646"> signal to threads</text:span><text:span text:style-name="T645">: </text:span><text:span text:style-name="T648">pthread_</text:span><text:span text:style-name="T649">kill</text:span><text:span text:style-name="T650"> and </text:span><text:span text:style-name="T648">pthread_</text:span><text:span text:style-name="T649">sigmask</text:span></text:p>
      <text:p text:style-name="P107"><text:span text:style-name="T563"><text:tab/></text:span><text:span text:style-name="T641">V.</text:span><text:span text:style-name="T632">5.</text:span><text:span text:style-name="T651">8</text:span><text:span text:style-name="T641"> </text:span><text:span text:style-name="T651">T</text:span><text:span text:style-name="T652">hread-</text:span><text:span text:style-name="T651">specific data</text:span><text:span text:style-name="T641">: </text:span><text:span text:style-name="T653">pthread</text:span><text:span text:style-name="T654">_key_create</text:span></text:p>
      <text:p text:style-name="P112"><text:tab/>V.<text:span text:style-name="T655">5.</text:span><text:span text:style-name="T656">9</text:span> <text:span text:style-name="T656">Mutexes</text:span></text:p>
      <text:p text:style-name="P112"><text:tab/>V.<text:span text:style-name="T655">5.10</text:span> <text:span text:style-name="T656">Mutex </text:span><text:span text:style-name="T655">attributes</text:span></text:p>
      <text:p text:style-name="P107"><text:span text:style-name="T652"><text:tab/></text:span><text:span text:style-name="T657">V.5.11 </text:span><text:span text:style-name="T658">Timed mutex locking:</text:span><text:span text:style-name="T657"> </text:span><text:span text:style-name="T659">pthread_mutex_timedlock</text:span></text:p>
      <text:p text:style-name="P113"><text:span text:style-name="T660"><text:tab/>V.5.1</text:span><text:span text:style-name="T661">2</text:span><text:span text:style-name="T660"> </text:span>Read-Write Locks<text:tab/></text:p>
      <text:p text:style-name="P113"><text:tab/>V.5.1<text:span text:style-name="T661">3</text:span> <text:span text:style-name="T662">Condition variables</text:span></text:p>
      <text:p text:style-name="P107"><text:span text:style-name="T663"><text:tab/>V.5.1</text:span><text:span text:style-name="T664">4</text:span><text:span text:style-name="T663"> </text:span><text:span text:style-name="T665">Spin lock</text:span><text:span text:style-name="T664">s</text:span></text:p>
      <text:p text:style-name="P114"><text:tab/>V.5.15 Barriers</text:p>
      <text:p text:style-name="P107"><text:span text:style-name="T665"><text:tab/>V.5.16 Fork handlers: </text:span><text:span text:style-name="T666">pthread_atfork</text:span></text:p>
      <text:p text:style-name="P113"><text:tab/><text:span text:style-name="T660">V.5.1</text:span><text:span text:style-name="T667">7</text:span><text:span text:style-name="T660"> </text:span><text:span text:style-name="T662">Semaphores</text:span></text:p>
      <text:p text:style-name="P107"><text:span text:style-name="T652"><text:tab/></text:span><text:span text:style-name="T668">V.5.1</text:span><text:span text:style-name="T669">8</text:span><text:span text:style-name="T668"> </text:span><text:span text:style-name="T652">Futexes</text:span></text:p>
      <text:p text:style-name="P107"><text:span text:style-name="T652"><text:tab/>V.5.1</text:span><text:span text:style-name="T669">9</text:span><text:span text:style-name="T652"> </text:span><text:span text:style-name="T668">Thread name: </text:span><text:span text:style-name="T666">pthread_setname_np</text:span></text:p>
      <text:p text:style-name="P111">V.6 Daemon processes <text:span text:style-name="T670">and logging</text:span></text:p>
      <text:p text:style-name="P111"><text:tab/><text:span text:style-name="T671">V.6.1 Daemon overview </text:span></text:p>
      <text:p text:style-name="P115"><text:span text:style-name="T672"><text:tab/>V.6.2 The </text:span><text:span text:style-name="T673">daemon</text:span><text:span text:style-name="T672"> function</text:span></text:p>
      <text:p text:style-name="P107"><text:span text:style-name="Strong_20_Emphasis"><text:span text:style-name="T674"><text:tab/>V.6.</text:span></text:span><text:span text:style-name="Strong_20_Emphasis"><text:span text:style-name="T675">3</text:span></text:span><text:span text:style-name="Strong_20_Emphasis"><text:span text:style-name="T674"> </text:span></text:span><text:span text:style-name="Strong_20_Emphasis"><text:span text:style-name="T676">The </text:span></text:span><text:span text:style-name="Strong_20_Emphasis"><text:span text:style-name="T677">systemd</text:span></text:span><text:span text:style-name="Strong_20_Emphasis"><text:span text:style-name="T678"> </text:span></text:span><text:span text:style-name="Strong_20_Emphasis"><text:span text:style-name="T676">service </text:span></text:span><text:span text:style-name="Strong_20_Emphasis"><text:span text:style-name="T678">API: </text:span></text:span><text:span text:style-name="Strong_20_Emphasis"><text:span text:style-name="T679">sd-daemon.h</text:span></text:span></text:p>
      <text:p text:style-name="P107"><text:span text:style-name="T680"><text:tab/>V.6.</text:span><text:span text:style-name="T681">4</text:span><text:span text:style-name="T680"> </text:span><text:span text:style-name="T682">Logging: </text:span><text:span text:style-name="T683">syslog</text:span></text:p>
      <text:p text:style-name="P107"><text:span text:style-name="T672"><text:tab/></text:span><text:span text:style-name="T680">V.6.</text:span><text:span text:style-name="T681">5</text:span><text:span text:style-name="T680"> </text:span><text:span text:style-name="T682">Logging: </text:span><text:span text:style-name="T683">s</text:span><text:span text:style-name="T684">d-journal</text:span></text:p>
      <text:p text:style-name="P116"><text:span text:style-name="T685">V.</text:span><text:span text:style-name="T686">7</text:span><text:span text:style-name="T685"> </text:span><text:span text:style-name="T687">Theory </text:span><text:span text:style-name="T688">and</text:span><text:span text:style-name="T687"> </text:span><text:span text:style-name="T688">i</text:span><text:span text:style-name="T687">nsights</text:span></text:p>
      <text:p text:style-name="P117"><text:span text:style-name="Strong_20_Emphasis"><text:span text:style-name="T689"><text:tab/></text:span></text:span><text:span text:style-name="Strong_20_Emphasis"><text:span text:style-name="T690">V.</text:span></text:span><text:span text:style-name="Strong_20_Emphasis"><text:span text:style-name="T691">7</text:span></text:span><text:span text:style-name="Strong_20_Emphasis"><text:span text:style-name="T690">.1 Values for </text:span></text:span><text:span text:style-name="Strong_20_Emphasis"><text:span text:style-name="T692">flags</text:span></text:span><text:span text:style-name="Strong_20_Emphasis"><text:span text:style-name="T690"> and </text:span></text:span><text:span text:style-name="Strong_20_Emphasis"><text:span text:style-name="T692">clone_args.flags</text:span></text:span></text:p>
      <text:p text:style-name="P117"><text:span text:style-name="Strong_20_Emphasis"><text:span text:style-name="T692"><text:tab/></text:span></text:span><text:span text:style-name="Strong_20_Emphasis"><text:span text:style-name="T690">V</text:span></text:span><text:span text:style-name="Strong_20_Emphasis"><text:span text:style-name="T693">.</text:span></text:span><text:span text:style-name="Strong_20_Emphasis"><text:span text:style-name="T694">7</text:span></text:span><text:span text:style-name="Strong_20_Emphasis"><text:span text:style-name="T693">.2 </text:span></text:span><text:span text:style-name="Strong_20_Emphasis"><text:span text:style-name="T692">prctl</text:span></text:span><text:span text:style-name="Strong_20_Emphasis"><text:span text:style-name="T693"> operations</text:span></text:span></text:p>
      <text:p text:style-name="P116"><text:tab/><text:span text:style-name="T695">V.</text:span><text:span text:style-name="T696">7</text:span><text:span text:style-name="T695">.3 The </text:span><text:span text:style-name="T697">seccomp_unotify(2)</text:span><text:span text:style-name="T695"> manual page program</text:span></text:p>
      <text:p text:style-name="P116"><text:span text:style-name="T698"><text:tab/></text:span><text:span text:style-name="T699">V.</text:span><text:span text:style-name="T700">7.4</text:span><text:span text:style-name="T699"> CPU sets macros</text:span></text:p>
      <text:p text:style-name="P117"><text:span text:style-name="T701"><text:tab/></text:span><text:span text:style-name="T21">V.</text:span><text:span text:style-name="T702">7.</text:span><text:span text:style-name="T703">5</text:span><text:span text:style-name="T21"> </text:span><text:span text:style-name="T703">Linux control groups: </text:span><text:span text:style-name="T704">cgroup</text:span></text:p>
      <text:p text:style-name="P117"><text:span text:style-name="T705"><text:tab/></text:span><text:span text:style-name="T706">V</text:span><text:span text:style-name="Strong_20_Emphasis"><text:span text:style-name="T707">.</text:span></text:span><text:span text:style-name="Strong_20_Emphasis"><text:span text:style-name="T708">7</text:span></text:span><text:span text:style-name="Strong_20_Emphasis"><text:span text:style-name="T709">.</text:span></text:span><text:span text:style-name="Strong_20_Emphasis"><text:span text:style-name="T710">6</text:span></text:span><text:span text:style-name="Strong_20_Emphasis"><text:span text:style-name="T707"> Trac</text:span></text:span><text:span text:style-name="Strong_20_Emphasis"><text:span text:style-name="T541">ing</text:span></text:span><text:span text:style-name="Strong_20_Emphasis"><text:span text:style-name="T707"> a process: </text:span></text:span><text:span text:style-name="Strong_20_Emphasis"><text:span text:style-name="T543">ptrace</text:span></text:span></text:p>
      <text:p text:style-name="P117"><text:span text:style-name="Strong_20_Emphasis"><text:span text:style-name="T707"><text:tab/>V.7.</text:span></text:span><text:span text:style-name="Strong_20_Emphasis"><text:span text:style-name="T710">7</text:span></text:span><text:span text:style-name="Strong_20_Emphasis"><text:span text:style-name="T707"> Process self-debugging: </text:span></text:span><text:span text:style-name="Strong_20_Emphasis"><text:span text:style-name="T543">backtrace</text:span></text:span></text:p>
      <text:p text:style-name="P117"><text:span text:style-name="T21"><text:tab/></text:span><text:span text:style-name="Strong_20_Emphasis"><text:span text:style-name="T711">V.7.</text:span></text:span><text:span text:style-name="Strong_20_Emphasis"><text:span text:style-name="T712">8</text:span></text:span><text:span text:style-name="Strong_20_Emphasis"><text:span text:style-name="T711"> Thread attributes functions</text:span></text:span></text:p>
      <text:p text:style-name="P117"><text:span text:style-name="Strong_20_Emphasis"><text:span text:style-name="T711"><text:tab/></text:span></text:span><text:span text:style-name="Strong_20_Emphasis"><text:span text:style-name="T713">V</text:span></text:span><text:span text:style-name="Strong_20_Emphasis"><text:span text:style-name="T714">.7.</text:span></text:span><text:span text:style-name="Strong_20_Emphasis"><text:span text:style-name="T712">9</text:span></text:span><text:span text:style-name="Strong_20_Emphasis"><text:span text:style-name="T714"> Patterns of synchronization mechanisms</text:span></text:span></text:p>
      <text:p text:style-name="P107"><text:span text:style-name="Strong_20_Emphasis"><text:span text:style-name="T715">List of tables</text:span></text:span></text:p>
      <text:p text:style-name="P118">List of <text:span text:style-name="T716">figures</text:span></text:p>
      <text:p text:style-name="P118"/>
      <text:p text:style-name="P46"><text:span text:style-name="T232">Chapter</text:span> <text:span text:style-name="T398">V</text:span><text:span text:style-name="T717">I</text:span> – <text:span text:style-name="T718">Interprocess Communication and </text:span><text:span text:style-name="T717">Terminal</text:span><text:span text:style-name="T718">s</text:span></text:p>
      <text:p text:style-name="P46"/>
      <text:p text:style-name="P115"><text:span text:style-name="T719">V</text:span><text:span text:style-name="T720">I</text:span><text:span text:style-name="T721">.1 </text:span><text:span text:style-name="Strong_20_Emphasis"><text:span text:style-name="T722">Introduction</text:span></text:span></text:p>
      <text:p text:style-name="P107"><text:soft-page-break/><text:span text:style-name="Strong_20_Emphasis"><text:span text:style-name="T723">VI.</text:span></text:span><text:span text:style-name="Strong_20_Emphasis"><text:span text:style-name="T724">2</text:span></text:span><text:span text:style-name="Strong_20_Emphasis"><text:span text:style-name="T723"> POSIX </text:span></text:span><text:span text:style-name="Strong_20_Emphasis"><text:span text:style-name="T725">M</text:span></text:span><text:span text:style-name="Strong_20_Emphasis"><text:span text:style-name="T723">essage </text:span></text:span><text:span text:style-name="Strong_20_Emphasis"><text:span text:style-name="T725">Q</text:span></text:span><text:span text:style-name="Strong_20_Emphasis"><text:span text:style-name="T723">ueues</text:span></text:span></text:p>
      <text:p text:style-name="P107"><text:span text:style-name="Strong_20_Emphasis"><text:span text:style-name="T723"><text:tab/></text:span></text:span><text:span text:style-name="Strong_20_Emphasis"><text:span text:style-name="T726">VI.</text:span></text:span><text:span text:style-name="Strong_20_Emphasis"><text:span text:style-name="T727">2</text:span></text:span><text:span text:style-name="Strong_20_Emphasis"><text:span text:style-name="T726">.</text:span></text:span><text:span text:style-name="Strong_20_Emphasis"><text:span text:style-name="T727">1</text:span></text:span><text:span text:style-name="Strong_20_Emphasis"><text:span text:style-name="T726"> </text:span></text:span><text:span text:style-name="Strong_20_Emphasis"><text:span text:style-name="T728">Creat</text:span></text:span><text:span text:style-name="Strong_20_Emphasis"><text:span text:style-name="T729">ing</text:span></text:span><text:span text:style-name="Strong_20_Emphasis"><text:span text:style-name="T728"> a</text:span></text:span><text:span text:style-name="Strong_20_Emphasis"><text:span text:style-name="T730"> m</text:span></text:span><text:span text:style-name="Strong_20_Emphasis"><text:span text:style-name="T731">essage queue: </text:span></text:span><text:span text:style-name="Strong_20_Emphasis"><text:span text:style-name="T732">mq_open</text:span></text:span><text:span text:style-name="Strong_20_Emphasis"><text:span text:style-name="T728">, </text:span></text:span><text:span text:style-name="Strong_20_Emphasis"><text:span text:style-name="T732">mq_close</text:span></text:span><text:span text:style-name="Strong_20_Emphasis"><text:span text:style-name="T728">, </text:span></text:span><text:span text:style-name="Strong_20_Emphasis"><text:span text:style-name="T732">mq_unlink</text:span></text:span></text:p>
      <text:p text:style-name="P107"><text:span text:style-name="Strong_20_Emphasis"><text:span text:style-name="T723"><text:tab/></text:span></text:span><text:span text:style-name="Strong_20_Emphasis"><text:span text:style-name="T730">VI.</text:span></text:span><text:span text:style-name="Strong_20_Emphasis"><text:span text:style-name="T727">2</text:span></text:span><text:span text:style-name="Strong_20_Emphasis"><text:span text:style-name="T730">.</text:span></text:span><text:span text:style-name="Strong_20_Emphasis"><text:span text:style-name="T727">2</text:span></text:span><text:span text:style-name="Strong_20_Emphasis"><text:span text:style-name="T730"> </text:span></text:span><text:span text:style-name="Strong_20_Emphasis"><text:span text:style-name="T733">Send</text:span></text:span><text:span text:style-name="Strong_20_Emphasis"><text:span text:style-name="T734">ing</text:span></text:span><text:span text:style-name="Strong_20_Emphasis"><text:span text:style-name="T733"> and receiv</text:span></text:span><text:span text:style-name="Strong_20_Emphasis"><text:span text:style-name="T734">ing</text:span></text:span><text:span text:style-name="Strong_20_Emphasis"><text:span text:style-name="T733"> messages: </text:span></text:span><text:span text:style-name="Strong_20_Emphasis"><text:span text:style-name="T735">mq_send</text:span></text:span><text:span text:style-name="Strong_20_Emphasis"><text:span text:style-name="T733"> and </text:span></text:span><text:span text:style-name="Strong_20_Emphasis"><text:span text:style-name="T735">mq_receive</text:span></text:span></text:p>
      <text:p text:style-name="P107"><text:span text:style-name="Strong_20_Emphasis"><text:span text:style-name="T723"><text:tab/></text:span></text:span><text:span text:style-name="Strong_20_Emphasis"><text:span text:style-name="T736">VI.</text:span></text:span><text:span text:style-name="Strong_20_Emphasis"><text:span text:style-name="T737">2</text:span></text:span><text:span text:style-name="Strong_20_Emphasis"><text:span text:style-name="T736">.</text:span></text:span><text:span text:style-name="Strong_20_Emphasis"><text:span text:style-name="T737">3</text:span></text:span><text:span text:style-name="Strong_20_Emphasis"><text:span text:style-name="T728"> Message queue</text:span></text:span><text:span text:style-name="Strong_20_Emphasis"><text:span text:style-name="T733"> attributes: </text:span></text:span><text:span text:style-name="Strong_20_Emphasis"><text:span text:style-name="T735">mq_getattr</text:span></text:span><text:span text:style-name="Strong_20_Emphasis"><text:span text:style-name="T733"> and </text:span></text:span><text:span text:style-name="Strong_20_Emphasis"><text:span text:style-name="T735">mq_setattr</text:span></text:span></text:p>
      <text:p text:style-name="P107"><text:span text:style-name="Strong_20_Emphasis"><text:span text:style-name="T723"><text:tab/></text:span></text:span><text:span text:style-name="Strong_20_Emphasis"><text:span text:style-name="T728">VI.</text:span></text:span><text:span text:style-name="Strong_20_Emphasis"><text:span text:style-name="T737">2</text:span></text:span><text:span text:style-name="Strong_20_Emphasis"><text:span text:style-name="T728">.</text:span></text:span><text:span text:style-name="Strong_20_Emphasis"><text:span text:style-name="T737">4</text:span></text:span><text:span text:style-name="Strong_20_Emphasis"><text:span text:style-name="T728"> </text:span></text:span><text:span text:style-name="Strong_20_Emphasis"><text:span text:style-name="T738">Message queue notification: </text:span></text:span><text:span text:style-name="Strong_20_Emphasis"><text:span text:style-name="T739">mq_notify</text:span></text:span></text:p>
      <text:p text:style-name="P107"><text:span text:style-name="Strong_20_Emphasis"><text:span text:style-name="T738"><text:tab/>VI.2.5 Notification via thread</text:span></text:span></text:p>
      <text:p text:style-name="P107"><text:span text:style-name="Strong_20_Emphasis"><text:span text:style-name="T738"><text:tab/>VI.2.6 Notification via signal</text:span></text:span></text:p>
      <text:p text:style-name="P107"><text:span text:style-name="Strong_20_Emphasis"><text:span text:style-name="T740">VI.</text:span></text:span><text:span text:style-name="Strong_20_Emphasis"><text:span text:style-name="T724">3</text:span></text:span><text:span text:style-name="Strong_20_Emphasis"><text:span text:style-name="T740"> POSIX </text:span></text:span><text:span text:style-name="Strong_20_Emphasis"><text:span text:style-name="T725">N</text:span></text:span><text:span text:style-name="Strong_20_Emphasis"><text:span text:style-name="T740">amed </text:span></text:span><text:span text:style-name="Strong_20_Emphasis"><text:span text:style-name="T725">S</text:span></text:span><text:span text:style-name="Strong_20_Emphasis"><text:span text:style-name="T740">emaphores</text:span></text:span></text:p>
      <text:p text:style-name="P107"><text:span text:style-name="Strong_20_Emphasis"><text:span text:style-name="T740"><text:tab/></text:span></text:span><text:span text:style-name="Source_20_Text"><text:span text:style-name="T741">VI.</text:span></text:span><text:span text:style-name="Source_20_Text"><text:span text:style-name="T742">3</text:span></text:span><text:span text:style-name="Source_20_Text"><text:span text:style-name="T741">.</text:span></text:span><text:span text:style-name="Source_20_Text"><text:span text:style-name="T742">1</text:span></text:span><text:span text:style-name="Source_20_Text"><text:span text:style-name="T741"> </text:span></text:span><text:span text:style-name="Source_20_Text"><text:span text:style-name="T742">Creat</text:span></text:span><text:span text:style-name="Source_20_Text"><text:span text:style-name="T734">ing</text:span></text:span><text:span text:style-name="Source_20_Text"><text:span text:style-name="T742"> and delet</text:span></text:span><text:span text:style-name="Source_20_Text"><text:span text:style-name="T734">ing</text:span></text:span><text:span text:style-name="Source_20_Text"><text:span text:style-name="T742"> semaphores</text:span></text:span><text:span text:style-name="Source_20_Text"><text:span text:style-name="T741">: </text:span></text:span><text:span text:style-name="Source_20_Text"><text:span text:style-name="T743">sem_open</text:span></text:span><text:span text:style-name="Source_20_Text"><text:span text:style-name="T742">, </text:span></text:span><text:span text:style-name="Source_20_Text"><text:span text:style-name="T743">sem_close</text:span></text:span><text:span text:style-name="Source_20_Text"><text:span text:style-name="T742">, </text:span></text:span><text:span text:style-name="Source_20_Text"><text:span text:style-name="T743">sem_unlink</text:span></text:span></text:p>
      <text:p text:style-name="P107"><text:span text:style-name="Strong_20_Emphasis"><text:span text:style-name="T740"><text:tab/></text:span></text:span><text:span text:style-name="Source_20_Text"><text:span text:style-name="T741">VI.</text:span></text:span><text:span text:style-name="Source_20_Text"><text:span text:style-name="T742">3</text:span></text:span><text:span text:style-name="Source_20_Text"><text:span text:style-name="T741">.</text:span></text:span><text:span text:style-name="Source_20_Text"><text:span text:style-name="T742">2</text:span></text:span><text:span text:style-name="Source_20_Text"><text:span text:style-name="T741"> </text:span></text:span><text:span text:style-name="Strong_20_Emphasis"><text:span text:style-name="T744">P</text:span></text:span><text:span text:style-name="Source_20_Text"><text:span text:style-name="T745">rocess-local mutual exclusion</text:span></text:span></text:p>
      <text:p text:style-name="P107"><text:span text:style-name="Strong_20_Emphasis"><text:span text:style-name="T740"><text:tab/>VI.</text:span></text:span><text:span text:style-name="Strong_20_Emphasis"><text:span text:style-name="T724">3</text:span></text:span><text:span text:style-name="Strong_20_Emphasis"><text:span text:style-name="T740">.</text:span></text:span><text:span text:style-name="Strong_20_Emphasis"><text:span text:style-name="T742">3</text:span></text:span><text:span text:style-name="Strong_20_Emphasis"><text:span text:style-name="T740"> </text:span></text:span><text:span text:style-name="Strong_20_Emphasis"><text:span text:style-name="T746">I</text:span></text:span><text:span text:style-name="Strong_20_Emphasis"><text:span text:style-name="T740">nterprocess mutual exclusion</text:span></text:span></text:p>
      <text:p text:style-name="P107"><text:span text:style-name="Strong_20_Emphasis"><text:span text:style-name="T740"><text:tab/>VI.</text:span></text:span><text:span text:style-name="Strong_20_Emphasis"><text:span text:style-name="T724">3</text:span></text:span><text:span text:style-name="Strong_20_Emphasis"><text:span text:style-name="T740">.</text:span></text:span><text:span text:style-name="Strong_20_Emphasis"><text:span text:style-name="T742">4</text:span></text:span><text:span text:style-name="Strong_20_Emphasis"><text:span text:style-name="T740"> </text:span></text:span><text:span text:style-name="Strong_20_Emphasis"><text:span text:style-name="T746">T</text:span></text:span><text:span text:style-name="Strong_20_Emphasis"><text:span text:style-name="T740">wo-way synchronization pattern</text:span></text:span></text:p>
      <text:p text:style-name="P107"><text:span text:style-name="Strong_20_Emphasis"><text:span text:style-name="T740">VI.</text:span></text:span><text:span text:style-name="Strong_20_Emphasis"><text:span text:style-name="T724">4</text:span></text:span><text:span text:style-name="Strong_20_Emphasis"><text:span text:style-name="T740">. </text:span></text:span><text:span text:style-name="Strong_20_Emphasis"><text:span text:style-name="T747">POSIX </text:span></text:span><text:span text:style-name="Strong_20_Emphasis"><text:span text:style-name="T725">S</text:span></text:span><text:span text:style-name="Strong_20_Emphasis"><text:span text:style-name="T740">hared </text:span></text:span><text:span text:style-name="Strong_20_Emphasis"><text:span text:style-name="T725">M</text:span></text:span><text:span text:style-name="Strong_20_Emphasis"><text:span text:style-name="T740">emory</text:span></text:span></text:p>
      <text:p text:style-name="P107"><text:span text:style-name="Strong_20_Emphasis"><text:span text:style-name="T740"><text:tab/></text:span></text:span><text:span text:style-name="Strong_20_Emphasis"><text:span text:style-name="T746">VI.4.1 Overview</text:span></text:span></text:p>
      <text:p text:style-name="P107"><text:span text:style-name="Strong_20_Emphasis"><text:span text:style-name="T740"><text:tab/>VI.</text:span></text:span><text:span text:style-name="Strong_20_Emphasis"><text:span text:style-name="T724">4</text:span></text:span><text:span text:style-name="Strong_20_Emphasis"><text:span text:style-name="T740">.</text:span></text:span><text:span text:style-name="Strong_20_Emphasis"><text:span text:style-name="T746">2</text:span></text:span><text:span text:style-name="Strong_20_Emphasis"><text:span text:style-name="T740"> </text:span></text:span><text:span text:style-name="Strong_20_Emphasis"><text:span text:style-name="T746">P</text:span></text:span><text:span text:style-name="Strong_20_Emphasis"><text:span text:style-name="T748">roducer-consumer</text:span></text:span><text:span text:style-name="Strong_20_Emphasis"><text:span text:style-name="T740"> pattern</text:span></text:span></text:p>
      <text:p text:style-name="P107"><text:span text:style-name="Strong_20_Emphasis"><text:span text:style-name="T740"><text:tab/>VI.</text:span></text:span><text:span text:style-name="Strong_20_Emphasis"><text:span text:style-name="T724">4</text:span></text:span><text:span text:style-name="Strong_20_Emphasis"><text:span text:style-name="T740">.</text:span></text:span><text:span text:style-name="Strong_20_Emphasis"><text:span text:style-name="T746">3</text:span></text:span><text:span text:style-name="Strong_20_Emphasis"><text:span text:style-name="T740"> </text:span></text:span><text:span text:style-name="Strong_20_Emphasis"><text:span text:style-name="T746">C</text:span></text:span><text:span text:style-name="Strong_20_Emphasis"><text:span text:style-name="T740">lient-server pattern</text:span></text:span></text:p>
      <text:p text:style-name="P107"><text:span text:style-name="Strong_20_Emphasis"><text:span text:style-name="T740">VI.</text:span></text:span><text:span text:style-name="Strong_20_Emphasis"><text:span text:style-name="T724">5</text:span></text:span><text:span text:style-name="Strong_20_Emphasis"><text:span text:style-name="T747"> </text:span></text:span><text:span text:style-name="Strong_20_Emphasis"><text:span text:style-name="T749">Sockets</text:span></text:span><text:span text:style-name="Strong_20_Emphasis"><text:span text:style-name="T740"><text:tab/><text:tab/></text:span></text:span></text:p>
      <text:p text:style-name="P107"><text:span text:style-name="Strong_20_Emphasis"><text:span text:style-name="T740"><text:tab/>VI.</text:span></text:span><text:span text:style-name="Strong_20_Emphasis"><text:span text:style-name="T725">5</text:span></text:span><text:span text:style-name="Strong_20_Emphasis"><text:span text:style-name="T740">.</text:span></text:span><text:span text:style-name="Strong_20_Emphasis"><text:span text:style-name="T725">1</text:span></text:span><text:span text:style-name="Strong_20_Emphasis"><text:span text:style-name="T740"> </text:span></text:span><text:span text:style-name="Strong_20_Emphasis"><text:span text:style-name="T725">Overview </text:span></text:span></text:p>
      <text:p text:style-name="P107"><text:span text:style-name="Strong_20_Emphasis"><text:span text:style-name="T740"><text:tab/>VI.</text:span></text:span><text:span text:style-name="Strong_20_Emphasis"><text:span text:style-name="T725">5</text:span></text:span><text:span text:style-name="Strong_20_Emphasis"><text:span text:style-name="T740">.</text:span></text:span><text:span text:style-name="Strong_20_Emphasis"><text:span text:style-name="T725">2 </text:span></text:span><text:span text:style-name="Strong_20_Emphasis"><text:span text:style-name="T750">Creat</text:span></text:span><text:span text:style-name="Strong_20_Emphasis"><text:span text:style-name="T751">ing</text:span></text:span><text:span text:style-name="Strong_20_Emphasis"><text:span text:style-name="T750"> sockets: </text:span></text:span><text:span text:style-name="Source_20_Text"><text:span text:style-name="T743">socket</text:span></text:span><text:span text:style-name="Strong_20_Emphasis"><text:span text:style-name="T750"> and </text:span></text:span><text:span text:style-name="Source_20_Text"><text:span text:style-name="T752">shutdown</text:span></text:span></text:p>
      <text:p text:style-name="P107"><text:span text:style-name="Strong_20_Emphasis"><text:span text:style-name="T753"><text:tab/></text:span></text:span><text:span text:style-name="Strong_20_Emphasis"><text:span text:style-name="T754">VI.5.</text:span></text:span><text:span text:style-name="Strong_20_Emphasis"><text:span text:style-name="T755">3</text:span></text:span><text:span text:style-name="Strong_20_Emphasis"><text:span text:style-name="T754"> Byte order conversion functions</text:span></text:span></text:p>
      <text:p text:style-name="P107"><text:span text:style-name="Strong_20_Emphasis"><text:span text:style-name="T753"><text:tab/>VI.5.</text:span></text:span><text:span text:style-name="Strong_20_Emphasis"><text:span text:style-name="T755">4</text:span></text:span><text:span text:style-name="Strong_20_Emphasis"><text:span text:style-name="T753"> </text:span></text:span><text:span text:style-name="Strong_20_Emphasis"><text:span text:style-name="T754">Addressing</text:span></text:span><text:span text:style-name="Strong_20_Emphasis"><text:span text:style-name="T756">: </text:span></text:span><text:span text:style-name="Source_20_Text"><text:span text:style-name="T743">getaddrinfo</text:span></text:span><text:span text:style-name="Strong_20_Emphasis"><text:span text:style-name="T754"> and </text:span></text:span><text:span text:style-name="Source_20_Text"><text:span text:style-name="T757">getnameinfo</text:span></text:span></text:p>
      <text:p text:style-name="P107"><text:span text:style-name="Source_20_Text"><text:span text:style-name="T758"><text:tab/></text:span></text:span><text:span text:style-name="Strong_20_Emphasis"><text:span text:style-name="T754">VI.5.</text:span></text:span><text:span text:style-name="Strong_20_Emphasis"><text:span text:style-name="T755">5</text:span></text:span><text:span text:style-name="Strong_20_Emphasis"><text:span text:style-name="T754"> Address formats: </text:span></text:span><text:span text:style-name="Source_20_Text"><text:span text:style-name="T743">inet_ntop</text:span></text:span><text:span text:style-name="Strong_20_Emphasis"><text:span text:style-name="T754"> and </text:span></text:span><text:span text:style-name="Source_20_Text"><text:span text:style-name="T743">inet_pton</text:span></text:span></text:p>
      <text:p text:style-name="P107"><text:span text:style-name="Strong_20_Emphasis"><text:span text:style-name="T740"><text:tab/></text:span></text:span><text:span text:style-name="Strong_20_Emphasis"><text:span text:style-name="T754">VI.5.</text:span></text:span><text:span text:style-name="Strong_20_Emphasis"><text:span text:style-name="T755">6</text:span></text:span><text:span text:style-name="Strong_20_Emphasis"><text:span text:style-name="T759"> Set</text:span></text:span><text:span text:style-name="Strong_20_Emphasis"><text:span text:style-name="T760">ting</text:span></text:span><text:span text:style-name="Strong_20_Emphasis"><text:span text:style-name="T759"> the socket address: </text:span></text:span><text:span text:style-name="Source_20_Text"><text:span text:style-name="T743">bind</text:span></text:span></text:p>
      <text:p text:style-name="P107"><text:span text:style-name="Strong_20_Emphasis"><text:span text:style-name="T760"><text:tab/>VI.5.</text:span></text:span><text:span text:style-name="Strong_20_Emphasis"><text:span text:style-name="T755">7</text:span></text:span><text:span text:style-name="Strong_20_Emphasis"><text:span text:style-name="T760"> Receiving connections: </text:span></text:span><text:span text:style-name="Source_20_Text"><text:span text:style-name="T743">listen</text:span></text:span><text:span text:style-name="Strong_20_Emphasis"><text:span text:style-name="T760"> and </text:span></text:span><text:span text:style-name="Source_20_Text"><text:span text:style-name="T743">accept</text:span></text:span></text:p>
      <text:p text:style-name="P107"><text:span text:style-name="Strong_20_Emphasis"><text:span text:style-name="T760"><text:tab/>VI.5.</text:span></text:span><text:span text:style-name="Strong_20_Emphasis"><text:span text:style-name="T755">8</text:span></text:span><text:span text:style-name="Strong_20_Emphasis"><text:span text:style-name="T760"> Connecting to sockets: </text:span></text:span><text:span text:style-name="Source_20_Text"><text:span text:style-name="T743">connect</text:span></text:span></text:p>
      <text:p text:style-name="P107"><text:span text:style-name="Strong_20_Emphasis"><text:span text:style-name="T754"><text:tab/>VI.5.</text:span></text:span><text:span text:style-name="Strong_20_Emphasis"><text:span text:style-name="T755">9</text:span></text:span><text:span text:style-name="Strong_20_Emphasis"><text:span text:style-name="T760"> </text:span></text:span><text:span text:style-name="Strong_20_Emphasis"><text:span text:style-name="T754">Socket information: </text:span></text:span><text:span text:style-name="Source_20_Text"><text:span text:style-name="T743">getsockname</text:span></text:span><text:span text:style-name="Strong_20_Emphasis"><text:span text:style-name="T754">, </text:span></text:span><text:span text:style-name="Source_20_Text"><text:span text:style-name="T743">getpeername</text:span></text:span><text:span text:style-name="Strong_20_Emphasis"><text:span text:style-name="T754">, </text:span></text:span><text:span text:style-name="Source_20_Text"><text:span text:style-name="T743">getsockopt</text:span></text:span></text:p>
      <text:p text:style-name="P107"><text:span text:style-name="Strong_20_Emphasis"><text:span text:style-name="T754"><text:tab/>VI.5.</text:span></text:span><text:span text:style-name="Strong_20_Emphasis"><text:span text:style-name="T755">10</text:span></text:span><text:span text:style-name="Strong_20_Emphasis"><text:span text:style-name="T754"> Data transmission: </text:span></text:span><text:span text:style-name="Source_20_Text"><text:span text:style-name="T743">send</text:span></text:span><text:span text:style-name="Strong_20_Emphasis"><text:span text:style-name="T754"> and </text:span></text:span><text:span text:style-name="Source_20_Text"><text:span text:style-name="T743">recv</text:span></text:span></text:p>
      <text:p text:style-name="P107"><text:span text:style-name="Strong_20_Emphasis"><text:span text:style-name="T754"><text:tab/>VI.5.</text:span></text:span><text:span text:style-name="Strong_20_Emphasis"><text:span text:style-name="T761">1</text:span></text:span><text:span text:style-name="Strong_20_Emphasis"><text:span text:style-name="T762">1</text:span></text:span><text:span text:style-name="Strong_20_Emphasis"><text:span text:style-name="T754"> Conection-oriented client-server </text:span></text:span><text:span text:style-name="Strong_20_Emphasis"><text:span text:style-name="T763">uptime service</text:span></text:span></text:p>
      <text:p text:style-name="P107"><text:span text:style-name="Strong_20_Emphasis"><text:span text:style-name="T754"><text:tab/>VI.5.</text:span></text:span><text:span text:style-name="Strong_20_Emphasis"><text:span text:style-name="T761">1</text:span></text:span><text:span text:style-name="Strong_20_Emphasis"><text:span text:style-name="T762">2</text:span></text:span><text:span text:style-name="Strong_20_Emphasis"><text:span text:style-name="T754"> </text:span></text:span><text:span text:style-name="Strong_20_Emphasis"><text:span text:style-name="T764">N</text:span></text:span><text:span text:style-name="Strong_20_Emphasis"><text:span text:style-name="T765">on-blocking</text:span></text:span><text:span text:style-name="Strong_20_Emphasis"><text:span text:style-name="T766"> sockets </text:span></text:span><text:span text:style-name="Strong_20_Emphasis"><text:span text:style-name="T764">and asynchronous I/O</text:span></text:span></text:p>
      <text:p text:style-name="P107"><text:span text:style-name="Strong_20_Emphasis"><text:span text:style-name="T754"><text:tab/>VI.5.</text:span></text:span><text:span text:style-name="Strong_20_Emphasis"><text:span text:style-name="T761">1</text:span></text:span><text:span text:style-name="Strong_20_Emphasis"><text:span text:style-name="T767">3</text:span></text:span><text:span text:style-name="Strong_20_Emphasis"><text:span text:style-name="T754"> </text:span></text:span><text:span text:style-name="Strong_20_Emphasis"><text:span text:style-name="T767">Out-of-band data: </text:span></text:span><text:span text:style-name="Source_20_Text"><text:span text:style-name="T743">sockatmark</text:span></text:span></text:p>
      <text:p text:style-name="P107"><text:span text:style-name="Strong_20_Emphasis"><text:span text:style-name="T754"><text:tab/>VI.5.</text:span></text:span><text:span text:style-name="Strong_20_Emphasis"><text:span text:style-name="T760">1</text:span></text:span><text:span text:style-name="Strong_20_Emphasis"><text:span text:style-name="T767">4</text:span></text:span><text:span text:style-name="Strong_20_Emphasis"><text:span text:style-name="T754"> Send</text:span></text:span><text:span text:style-name="Strong_20_Emphasis"><text:span text:style-name="T763">ing</text:span></text:span><text:span text:style-name="Strong_20_Emphasis"><text:span text:style-name="T754"> and receiv</text:span></text:span><text:span text:style-name="Strong_20_Emphasis"><text:span text:style-name="T763">ing</text:span></text:span><text:span text:style-name="Strong_20_Emphasis"><text:span text:style-name="T754"> multiple messages: </text:span></text:span><text:span text:style-name="Source_20_Text"><text:span text:style-name="T743">sendmmsg</text:span></text:span><text:span text:style-name="Strong_20_Emphasis"><text:span text:style-name="T754"> and </text:span></text:span><text:span text:style-name="Source_20_Text"><text:span text:style-name="T743">recvmmsg</text:span></text:span></text:p>
      <text:p text:style-name="P107"><text:span text:style-name="Strong_20_Emphasis"><text:span text:style-name="T740">VI.</text:span></text:span><text:span text:style-name="Strong_20_Emphasis"><text:span text:style-name="T747">6</text:span></text:span><text:span text:style-name="Strong_20_Emphasis"><text:span text:style-name="T740"> </text:span></text:span><text:span text:style-name="Strong_20_Emphasis"><text:span text:style-name="T749">UNIX </text:span></text:span><text:span text:style-name="Strong_20_Emphasis"><text:span text:style-name="T768">D</text:span></text:span><text:span text:style-name="Strong_20_Emphasis"><text:span text:style-name="T749">omain </text:span></text:span><text:span text:style-name="Strong_20_Emphasis"><text:span text:style-name="T768">S</text:span></text:span><text:span text:style-name="Strong_20_Emphasis"><text:span text:style-name="T749">ockets</text:span></text:span></text:p>
      <text:p text:style-name="P107"><text:span text:style-name="Strong_20_Emphasis"><text:span text:style-name="T749"><text:tab/></text:span></text:span><text:span text:style-name="Strong_20_Emphasis"><text:span text:style-name="T769">VI.6.1 </text:span></text:span><text:span text:style-name="Strong_20_Emphasis"><text:span text:style-name="T770">Unnamed UNIX domain sockets: </text:span></text:span><text:span text:style-name="Strong_20_Emphasis"><text:span text:style-name="T771">socketpair</text:span></text:span></text:p>
      <text:p text:style-name="P107"><text:span text:style-name="Strong_20_Emphasis"><text:span text:style-name="T749"><text:tab/></text:span></text:span><text:span text:style-name="Strong_20_Emphasis"><text:span text:style-name="T769">VI.6.</text:span></text:span><text:span text:style-name="Strong_20_Emphasis"><text:span text:style-name="T770">2</text:span></text:span><text:span text:style-name="Strong_20_Emphasis"><text:span text:style-name="T769"> </text:span></text:span><text:span text:style-name="Strong_20_Emphasis"><text:span text:style-name="T770">Named UNIX domain sockets: </text:span></text:span><text:span text:style-name="Strong_20_Emphasis"><text:span text:style-name="T771">sockaddr_un</text:span></text:span></text:p>
      <text:p text:style-name="P107"><text:span text:style-name="Strong_20_Emphasis"><text:span text:style-name="T749"><text:tab/></text:span></text:span><text:span text:style-name="Strong_20_Emphasis"><text:span text:style-name="T770">VI.6.3 </text:span></text:span><text:span text:style-name="Strong_20_Emphasis"><text:span text:style-name="T772">Datagram s</text:span></text:span><text:span text:style-name="Strong_20_Emphasis"><text:span text:style-name="T770">ocket</text:span></text:span><text:span text:style-name="Strong_20_Emphasis"><text:span text:style-name="T772">s: </text:span></text:span><text:span text:style-name="Strong_20_Emphasis"><text:span text:style-name="T771">SOCK_DGRAM</text:span></text:span></text:p>
      <text:p text:style-name="P107"><text:span text:style-name="Strong_20_Emphasis"><text:span text:style-name="T770"><text:tab/>VI.6.</text:span></text:span><text:span text:style-name="Strong_20_Emphasis"><text:span text:style-name="T772">4</text:span></text:span><text:span text:style-name="Strong_20_Emphasis"><text:span text:style-name="T770"> </text:span></text:span><text:span text:style-name="Strong_20_Emphasis"><text:span text:style-name="T773">Stream-oriented sockets and message-oriented sockets</text:span></text:span></text:p>
      <text:p text:style-name="P107"><text:span text:style-name="Strong_20_Emphasis"><text:span text:style-name="T770"><text:tab/>VI.6.</text:span></text:span><text:span text:style-name="Strong_20_Emphasis"><text:span text:style-name="T774">5</text:span></text:span><text:span text:style-name="Strong_20_Emphasis"><text:span text:style-name="T770"> </text:span></text:span><text:span text:style-name="Strong_20_Emphasis"><text:span text:style-name="T774">Abstract</text:span></text:span><text:span text:style-name="Strong_20_Emphasis"><text:span text:style-name="T773"> sockets</text:span></text:span></text:p>
      <text:p text:style-name="P107"><text:span text:style-name="Strong_20_Emphasis"><text:span text:style-name="T749"><text:tab/></text:span></text:span><text:span text:style-name="Strong_20_Emphasis"><text:span text:style-name="T770">VI.6.</text:span></text:span><text:span text:style-name="Strong_20_Emphasis"><text:span text:style-name="T774">6</text:span></text:span><text:span text:style-name="Strong_20_Emphasis"><text:span text:style-name="T770"> Socket options and ancillary messages: </text:span></text:span><text:span text:style-name="Strong_20_Emphasis"><text:span text:style-name="T775">cmsg</text:span></text:span></text:p>
      <text:p text:style-name="P107"><text:span text:style-name="Strong_20_Emphasis"><text:span text:style-name="T770"><text:tab/>VI.6.</text:span></text:span><text:span text:style-name="Strong_20_Emphasis"><text:span text:style-name="T774">7</text:span></text:span><text:span text:style-name="Strong_20_Emphasis"><text:span text:style-name="T770"> Passing file descriptors </text:span></text:span><text:span text:style-name="Strong_20_Emphasis"><text:span text:style-name="T776">within a single process</text:span></text:span></text:p>
      <text:p text:style-name="P107"><text:span text:style-name="Strong_20_Emphasis"><text:span text:style-name="T770"><text:tab/>VI.6.</text:span></text:span><text:span text:style-name="Strong_20_Emphasis"><text:span text:style-name="T774">8</text:span></text:span><text:span text:style-name="Strong_20_Emphasis"><text:span text:style-name="T770"> Passing file descriptors </text:span></text:span><text:span text:style-name="Strong_20_Emphasis"><text:span text:style-name="T776">between parent and child processes</text:span></text:span></text:p>
      <text:p text:style-name="P107"><text:span text:style-name="Strong_20_Emphasis"><text:span text:style-name="T770"><text:tab/>VI.6.</text:span></text:span><text:span text:style-name="Strong_20_Emphasis"><text:span text:style-name="T774">9</text:span></text:span><text:span text:style-name="Strong_20_Emphasis"><text:span text:style-name="T770"> Passing file descriptors </text:span></text:span><text:span text:style-name="Strong_20_Emphasis"><text:span text:style-name="T777">and credentials </text:span></text:span><text:span text:style-name="Strong_20_Emphasis"><text:span text:style-name="T776">between unrelated processes</text:span></text:span></text:p>
      <text:p text:style-name="P107"><text:span text:style-name="Strong_20_Emphasis"><text:span text:style-name="T770"><text:tab/>VI.6.</text:span></text:span><text:span text:style-name="Strong_20_Emphasis"><text:span text:style-name="T774">10</text:span></text:span><text:span text:style-name="Strong_20_Emphasis"><text:span text:style-name="T770"> </text:span></text:span><text:span text:style-name="Strong_20_Emphasis"><text:span text:style-name="T772">A </text:span></text:span><text:span text:style-name="Strong_20_Emphasis"><text:span text:style-name="T778">secure file access </text:span></text:span><text:span text:style-name="Strong_20_Emphasis"><text:span text:style-name="T772">ser</text:span></text:span><text:span text:style-name="Strong_20_Emphasis"><text:span text:style-name="T778">vice</text:span></text:span></text:p>
      <text:p text:style-name="P119"><text:span text:style-name="Strong_20_Emphasis"><text:span text:style-name="T14"><text:tab/>V</text:span></text:span><text:span text:style-name="Strong_20_Emphasis"><text:span text:style-name="T779">I</text:span></text:span><text:span text:style-name="Strong_20_Emphasis"><text:span text:style-name="T14">.6.</text:span></text:span><text:span text:style-name="Strong_20_Emphasis"><text:span text:style-name="T780">1</text:span></text:span><text:span text:style-name="Strong_20_Emphasis"><text:span text:style-name="T781">1</text:span></text:span><text:span text:style-name="Strong_20_Emphasis"><text:span text:style-name="T780"> Sequenced-packet sockets: </text:span></text:span><text:span text:style-name="Strong_20_Emphasis"><text:span text:style-name="T782">SOCK_SEQPACKET</text:span></text:span></text:p>
      <text:p text:style-name="P107"><text:span text:style-name="Strong_20_Emphasis"><text:span text:style-name="T740">VI.</text:span></text:span><text:span text:style-name="Strong_20_Emphasis"><text:span text:style-name="T724">7</text:span></text:span><text:span text:style-name="Strong_20_Emphasis"><text:span text:style-name="T740"> Terminal I/O.</text:span></text:span></text:p>
      <text:p text:style-name="P107"><text:span text:style-name="Strong_20_Emphasis"><text:span text:style-name="T740"><text:tab/></text:span></text:span><text:span text:style-name="Strong_20_Emphasis"><text:span text:style-name="T783">V</text:span></text:span><text:span text:style-name="Strong_20_Emphasis"><text:span text:style-name="T784">I.7.1 Identifying </text:span></text:span><text:span text:style-name="Strong_20_Emphasis"><text:span text:style-name="T783">t</text:span></text:span><text:span text:style-name="Strong_20_Emphasis"><text:span text:style-name="T784">erminal </text:span></text:span><text:span text:style-name="Strong_20_Emphasis"><text:span text:style-name="T783">f</text:span></text:span><text:span text:style-name="Strong_20_Emphasis"><text:span text:style-name="T784">ile </text:span></text:span><text:span text:style-name="Strong_20_Emphasis"><text:span text:style-name="T783">d</text:span></text:span><text:span text:style-name="Strong_20_Emphasis"><text:span text:style-name="T784">escriptors: </text:span></text:span><text:span text:style-name="Strong_20_Emphasis"><text:span text:style-name="T785">isatty</text:span></text:span></text:p>
      <text:p text:style-name="P107"><text:soft-page-break/><text:span text:style-name="Strong_20_Emphasis"><text:span text:style-name="T740"><text:tab/>VI.</text:span></text:span><text:span text:style-name="Strong_20_Emphasis"><text:span text:style-name="T725">7</text:span></text:span><text:span text:style-name="Strong_20_Emphasis"><text:span text:style-name="T740">.</text:span></text:span><text:span text:style-name="Strong_20_Emphasis"><text:span text:style-name="T786">2</text:span></text:span><text:span text:style-name="Strong_20_Emphasis"><text:span text:style-name="T740"> Terminal properties: </text:span></text:span><text:span text:style-name="Strong_20_Emphasis"><text:span text:style-name="T787">termios</text:span></text:span></text:p>
      <text:p text:style-name="P107"><text:span text:style-name="Strong_20_Emphasis"><text:span text:style-name="T740"><text:tab/></text:span></text:span><text:span text:style-name="Strong_20_Emphasis"><text:span text:style-name="T788">V</text:span></text:span><text:span text:style-name="Strong_20_Emphasis"><text:span text:style-name="T740">I.7.3 Retrieving and changing terminal settings: </text:span></text:span><text:span text:style-name="Strong_20_Emphasis"><text:span text:style-name="T785">tcgetattr</text:span></text:span><text:span text:style-name="Strong_20_Emphasis"><text:span text:style-name="T789"> and </text:span></text:span><text:span text:style-name="Strong_20_Emphasis"><text:span text:style-name="T785">tcsetattr</text:span></text:span></text:p>
      <text:p text:style-name="P107"><text:span text:style-name="Strong_20_Emphasis"><text:span text:style-name="T740"><text:tab/></text:span></text:span><text:span text:style-name="Strong_20_Emphasis"><text:span text:style-name="T790">V</text:span></text:span><text:span text:style-name="Strong_20_Emphasis"><text:span text:style-name="T791">I</text:span></text:span><text:span text:style-name="Strong_20_Emphasis"><text:span text:style-name="T792">.</text:span></text:span><text:span text:style-name="Strong_20_Emphasis"><text:span text:style-name="T725">7</text:span></text:span><text:span text:style-name="Strong_20_Emphasis"><text:span text:style-name="T792">.</text:span></text:span><text:span text:style-name="Strong_20_Emphasis"><text:span text:style-name="T793">4</text:span></text:span><text:span text:style-name="Strong_20_Emphasis"><text:span text:style-name="T788"> </text:span></text:span><text:span text:style-name="Strong_20_Emphasis"><text:span text:style-name="T793">Canonical, noncanonical </text:span></text:span><text:span text:style-name="Strong_20_Emphasis"><text:span text:style-name="T794">and raw </text:span></text:span><text:span text:style-name="Strong_20_Emphasis"><text:span text:style-name="T793">mode</text:span></text:span></text:p>
      <text:p text:style-name="P107"><text:span text:style-name="Strong_20_Emphasis"><text:span text:style-name="T740"><text:tab/></text:span></text:span><text:span text:style-name="Strong_20_Emphasis"><text:span text:style-name="T790">V</text:span></text:span><text:span text:style-name="Strong_20_Emphasis"><text:span text:style-name="T791">I</text:span></text:span><text:span text:style-name="Strong_20_Emphasis"><text:span text:style-name="T792">.</text:span></text:span><text:span text:style-name="Strong_20_Emphasis"><text:span text:style-name="T725">7</text:span></text:span><text:span text:style-name="Strong_20_Emphasis"><text:span text:style-name="T792">.</text:span></text:span><text:span text:style-name="Strong_20_Emphasis"><text:span text:style-name="T795">5</text:span></text:span><text:span text:style-name="Strong_20_Emphasis"><text:span text:style-name="T788"> </text:span></text:span><text:span text:style-name="Strong_20_Emphasis"><text:span text:style-name="T795">Line control</text:span></text:span></text:p>
      <text:p text:style-name="P107"><text:span text:style-name="Strong_20_Emphasis"><text:span text:style-name="T740"><text:tab/></text:span></text:span><text:span text:style-name="Strong_20_Emphasis"><text:span text:style-name="T790">V</text:span></text:span><text:span text:style-name="Strong_20_Emphasis"><text:span text:style-name="T791">I</text:span></text:span><text:span text:style-name="Strong_20_Emphasis"><text:span text:style-name="T792">.</text:span></text:span><text:span text:style-name="Strong_20_Emphasis"><text:span text:style-name="T725">7</text:span></text:span><text:span text:style-name="Strong_20_Emphasis"><text:span text:style-name="T792">.</text:span></text:span><text:span text:style-name="Strong_20_Emphasis"><text:span text:style-name="T796">6</text:span></text:span><text:span text:style-name="Strong_20_Emphasis"><text:span text:style-name="T788"> </text:span></text:span><text:span text:style-name="Strong_20_Emphasis"><text:span text:style-name="T795">Line </text:span></text:span><text:span text:style-name="Strong_20_Emphasis"><text:span text:style-name="T796">speed</text:span></text:span></text:p>
      <text:p text:style-name="P107"><text:span text:style-name="Strong_20_Emphasis"><text:span text:style-name="T740"><text:tab/></text:span></text:span><text:span text:style-name="Strong_20_Emphasis"><text:span text:style-name="T790">V</text:span></text:span><text:span text:style-name="Strong_20_Emphasis"><text:span text:style-name="T791">I</text:span></text:span><text:span text:style-name="Strong_20_Emphasis"><text:span text:style-name="T792">.</text:span></text:span><text:span text:style-name="Strong_20_Emphasis"><text:span text:style-name="T725">7</text:span></text:span><text:span text:style-name="Strong_20_Emphasis"><text:span text:style-name="T792">.</text:span></text:span><text:span text:style-name="Strong_20_Emphasis"><text:span text:style-name="T797">7</text:span></text:span><text:span text:style-name="Strong_20_Emphasis"><text:span text:style-name="T788"> </text:span></text:span><text:span text:style-name="Strong_20_Emphasis"><text:span text:style-name="T797">Special characters</text:span></text:span></text:p>
      <text:p text:style-name="P107"><text:span text:style-name="Strong_20_Emphasis"><text:span text:style-name="T740"><text:tab/></text:span></text:span><text:span text:style-name="Strong_20_Emphasis"><text:span text:style-name="T790">V</text:span></text:span><text:span text:style-name="Strong_20_Emphasis"><text:span text:style-name="T791">I</text:span></text:span><text:span text:style-name="Strong_20_Emphasis"><text:span text:style-name="T792">.</text:span></text:span><text:span text:style-name="Strong_20_Emphasis"><text:span text:style-name="T725">7</text:span></text:span><text:span text:style-name="Strong_20_Emphasis"><text:span text:style-name="T792">.</text:span></text:span><text:span text:style-name="Strong_20_Emphasis"><text:span text:style-name="T797">8</text:span></text:span><text:span text:style-name="Strong_20_Emphasis"><text:span text:style-name="T788"> </text:span></text:span><text:span text:style-name="Strong_20_Emphasis"><text:span text:style-name="T797">Window terminal size</text:span></text:span></text:p>
      <text:p text:style-name="P107"><text:span text:style-name="Strong_20_Emphasis"><text:span text:style-name="T797"><text:tab/></text:span></text:span><text:span text:style-name="Strong_20_Emphasis"><text:span text:style-name="T798">VI.7.9 Command-line utilities</text:span></text:span></text:p>
      <text:p text:style-name="P107"><text:span text:style-name="Strong_20_Emphasis"><text:span text:style-name="T740"><text:tab/></text:span></text:span><text:span text:style-name="Strong_20_Emphasis"><text:span text:style-name="T790">V</text:span></text:span><text:span text:style-name="Strong_20_Emphasis"><text:span text:style-name="T791">I</text:span></text:span><text:span text:style-name="Strong_20_Emphasis"><text:span text:style-name="T792">.</text:span></text:span><text:span text:style-name="Strong_20_Emphasis"><text:span text:style-name="T725">7</text:span></text:span><text:span text:style-name="Strong_20_Emphasis"><text:span text:style-name="T792">.</text:span></text:span><text:span text:style-name="Strong_20_Emphasis"><text:span text:style-name="T798">10</text:span></text:span><text:span text:style-name="Strong_20_Emphasis"><text:span text:style-name="T788"> </text:span></text:span><text:span text:style-name="Strong_20_Emphasis"><text:span text:style-name="T785">ncurses</text:span></text:span></text:p>
      <text:p text:style-name="P107"><text:span text:style-name="Strong_20_Emphasis"><text:span text:style-name="T740">VI.</text:span></text:span><text:span text:style-name="Strong_20_Emphasis"><text:span text:style-name="T724">8</text:span></text:span><text:span text:style-name="Strong_20_Emphasis"><text:span text:style-name="T740"> Pseudo terminals</text:span></text:span></text:p>
      <text:p text:style-name="P107"><text:span text:style-name="Strong_20_Emphasis"><text:span text:style-name="T791"><text:tab/>VI.8.</text:span></text:span><text:span text:style-name="Strong_20_Emphasis"><text:span text:style-name="T799">1 Overview</text:span></text:span></text:p>
      <text:p text:style-name="P107"><text:span text:style-name="Strong_20_Emphasis"><text:span text:style-name="T791"><text:tab/>VI.8.</text:span></text:span><text:span text:style-name="Strong_20_Emphasis"><text:span text:style-name="T799">2</text:span></text:span><text:span text:style-name="Strong_20_Emphasis"><text:span text:style-name="T791"> UNIX 98 pseudoterminal</text:span></text:span></text:p>
      <text:p text:style-name="P107"><text:span text:style-name="Strong_20_Emphasis"><text:span text:style-name="T791"><text:tab/>VI.8.</text:span></text:span><text:span text:style-name="Strong_20_Emphasis"><text:span text:style-name="T800">3</text:span></text:span><text:span text:style-name="Strong_20_Emphasis"><text:span text:style-name="T791"> </text:span></text:span><text:span text:style-name="Strong_20_Emphasis"><text:span text:style-name="T785">script</text:span></text:span><text:span text:style-name="Strong_20_Emphasis"><text:span text:style-name="T800"> and </text:span></text:span><text:span text:style-name="Strong_20_Emphasis"><text:span text:style-name="T785">expect</text:span></text:span></text:p>
      <text:p text:style-name="P107"><text:span text:style-name="Strong_20_Emphasis"><text:span text:style-name="T791"><text:tab/>VI.8.</text:span></text:span><text:span text:style-name="Strong_20_Emphasis"><text:span text:style-name="T799">3</text:span></text:span><text:span text:style-name="Strong_20_Emphasis"><text:span text:style-name="T791"> </text:span></text:span><text:span text:style-name="Strong_20_Emphasis"><text:span text:style-name="T801">Opening pseudoterminal: </text:span></text:span><text:span text:style-name="Strong_20_Emphasis"><text:span text:style-name="T785">getpt</text:span></text:span><text:span text:style-name="Strong_20_Emphasis"><text:span text:style-name="T799"> and </text:span></text:span><text:span text:style-name="Strong_20_Emphasis"><text:span text:style-name="T785">posix_openpt</text:span></text:span></text:p>
      <text:p text:style-name="P107"><text:span text:style-name="T802"><text:tab/>VI.8.4 Unlocking pseudoterminal: </text:span><text:span text:style-name="Strong_20_Emphasis"><text:span text:style-name="T785">grantpt</text:span></text:span><text:span text:style-name="T802"> and </text:span><text:span text:style-name="Strong_20_Emphasis"><text:span text:style-name="T785">unlockpt</text:span></text:span></text:p>
      <text:p text:style-name="P107"><text:span text:style-name="T802"><text:tab/>VI.8.5 Getting pseudoterminal name: </text:span><text:span text:style-name="Strong_20_Emphasis"><text:span text:style-name="T785">ptsname</text:span></text:span></text:p>
      <text:p text:style-name="P107"><text:span text:style-name="T802"><text:tab/>VI.8.6 Pseudoterminal pair: </text:span><text:span text:style-name="Strong_20_Emphasis"><text:span text:style-name="T785">openpty</text:span></text:span><text:span text:style-name="T802">, </text:span><text:span text:style-name="Strong_20_Emphasis"><text:span text:style-name="T785">forkpty</text:span></text:span><text:span text:style-name="T802"> and </text:span><text:span text:style-name="Strong_20_Emphasis"><text:span text:style-name="T785">loginpty</text:span></text:span></text:p>
      <text:p text:style-name="P120">VI.<text:span text:style-name="T803">9</text:span> Theory and insights </text:p>
      <text:p text:style-name="P120"><text:tab/><text:span text:style-name="T804">VI.</text:span><text:span text:style-name="T805">9</text:span><text:span text:style-name="T804">.1 </text:span><text:span text:style-name="T624">POSIX Message queues limits files</text:span><text:span text:style-name="T806"> </text:span></text:p>
      <text:p text:style-name="P107"><text:span text:style-name="Strong_20_Emphasis"><text:span text:style-name="T749"><text:tab/>VI.9.2 System V interprocess communication</text:span></text:span></text:p>
      <text:p text:style-name="P107"><text:span text:style-name="Strong_20_Emphasis"><text:span text:style-name="T749"><text:tab/>VI.9.</text:span></text:span><text:span text:style-name="Strong_20_Emphasis"><text:span text:style-name="T807">3</text:span></text:span><text:span text:style-name="Strong_20_Emphasis"><text:span text:style-name="T749"> Network interfaces functions</text:span></text:span></text:p>
      <text:p text:style-name="P107"><text:span text:style-name="Strong_20_Emphasis"><text:span text:style-name="T749"><text:tab/>VI.9.</text:span></text:span><text:span text:style-name="Strong_20_Emphasis"><text:span text:style-name="T808">4</text:span></text:span><text:span text:style-name="Strong_20_Emphasis"><text:span text:style-name="T749"> </text:span></text:span><text:span text:style-name="Strong_20_Emphasis"><text:span text:style-name="T808">Virtual console: </text:span></text:span><text:span text:style-name="Strong_20_Emphasis"><text:span text:style-name="T785">vcs</text:span></text:span></text:p>
      <text:p text:style-name="P107"><text:span text:style-name="Strong_20_Emphasis"><text:span text:style-name="T749"><text:tab/>VI.9.</text:span></text:span><text:span text:style-name="Strong_20_Emphasis"><text:span text:style-name="T809">5</text:span></text:span><text:span text:style-name="Strong_20_Emphasis"><text:span text:style-name="T749"> </text:span></text:span><text:span text:style-name="Strong_20_Emphasis"><text:span text:style-name="T809">Serial terminal lines: </text:span></text:span><text:span text:style-name="Strong_20_Emphasis"><text:span text:style-name="T785">ttyS</text:span></text:span></text:p>
      <text:p text:style-name="P120">List of tables</text:p>
      <text:p text:style-name="P121">List of figures</text:p>
      <text:p text:style-name="P120"><text:span text:style-name="Strong_20_Emphasis"><text:span text:style-name="T802"/></text:span></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3"><text:soft-page-break/>Annotated table of contents</text:p>
      <text:p text:style-name="P124"/>
      <text:p text:style-name="P125"><text:span text:style-name="Strong_20_Emphasis"><text:span text:style-name="T21">Chapter </text:span></text:span><text:span text:style-name="Strong_20_Emphasis"><text:span text:style-name="T810">0</text:span></text:span><text:span text:style-name="Strong_20_Emphasis"><text:span text:style-name="T21"> — </text:span></text:span><text:span text:style-name="Strong_20_Emphasis"><text:span text:style-name="T810">Tools</text:span></text:span></text:p>
      <text:p text:style-name="P124">This introductory chapter presents the essential tools commonly used for software development in a Linux environment, along with an overview of the standards that define software behavior and portability. It is intended to provide readers with the necessary background for the topics covered in the rest of the book; those already familiar with these concepts may choose to skip it.</text:p>
      <text:p text:style-name="P124"/>
      <text:p text:style-name="P124">The chapter covers the compilation process and the use of key development tools such as <text:span text:style-name="Emphasis">gcc</text:span>, <text:span text:style-name="Emphasis">make</text:span>, and <text:span text:style-name="Emphasis">autoconf</text:span>, as well as debugging with <text:span text:style-name="Emphasis">gdb</text:span>. It also introduces the source code and how it can be obtained and organized in a Linux system. In addition, it outlines the most widely used software standards at a high level and includes a simple introduction to the GNU General Public License (GPL) and its role in software development and distribution.</text:p>
      <text:p text:style-name="Standard"/>
      <text:p text:style-name="P125"><text:span text:style-name="Strong_20_Emphasis"><text:span text:style-name="T810">Chapter 1 — File I/O</text:span></text:span></text:p>
      <text:p text:style-name="P124">This chapter introduces file input/output operations, starting from fundamental system calls such as <text:span text:style-name="Emphasis">open</text:span>, <text:span text:style-name="Emphasis">read</text:span>, <text:span text:style-name="Emphasis">write</text:span>, and <text:span text:style-name="Emphasis">close</text:span>, and progressing to more advanced mechanisms. Topics include file truncation and appending, file descriptor duplication, I/O multiplexing, buffering strategies, asynchronous I/O (both POSIX and Linux-specific), file locking, and interprocess communication through pipes and FIFOs.</text:p>
      <text:p text:style-name="Standard"><text:span text:style-name="Strong_20_Emphasis"/></text:p>
      <text:p text:style-name="P125"><text:span text:style-name="Strong_20_Emphasis"><text:span text:style-name="T21">Chapter 2 — Files </text:span></text:span><text:span text:style-name="Strong_20_Emphasis"><text:span text:style-name="T810">and Directories</text:span></text:span></text:p>
      <text:p text:style-name="P124">This chapter examines the APIs used to interact with the filesystem. It covers file metadata (<text:span text:style-name="Emphasis">stat</text:span>), links, permissions, and inode structures, as well as operations on directories such as creation, deletion, and renaming. Additional topics include device files, Linux capabilities, filesystem organization, quotas, and resource limits.</text:p>
      <text:p text:style-name="P124"/>
      <text:p text:style-name="P125"><text:span text:style-name="Strong_20_Emphasis"><text:span text:style-name="T810">Chapter 3 — Environment and system Databases</text:span></text:span></text:p>
      <text:p text:style-name="P124">This chapter explores the process environment and its interaction with the operating system. It includes functions for handling time and date, environment variables, and localization (locale). It also provides a detailed overview of system databases, such as user and group information, along with login records and system identification (<text:span text:style-name="Emphasis">uname</text:span>). The chapter concludes with a dedicated section on Pluggable Authentication Modules (PAM).</text:p>
      <text:p text:style-name="P126"><text:span text:style-name="Strong_20_Emphasis"/></text:p>
      <text:p text:style-name="P125"><text:span text:style-name="Strong_20_Emphasis"><text:span text:style-name="T810">Chapter 4 — Memory</text:span></text:span></text:p>
      <text:p text:style-name="P124">This chapter provides an in-depth analysis of memory management in Linux. It covers dynamic memory allocation, memory mapping, memory protection, and locking mechanisms. It also examines dynamically loaded objects and presents a detailed study of the ELF (Executable and Linkable Format), including how programs are loaded into memory and how processes start and terminate.</text:p>
      <text:p text:style-name="P125"/>
      <text:p text:style-name="P125"><text:span text:style-name="Strong_20_Emphasis"><text:span text:style-name="T810">Chapter 5 — Processes</text:span></text:span></text:p>
      <text:p text:style-name="P124">This chapter focuses on process management and multithreading. It covers process creation and control through <text:span text:style-name="Emphasis">fork</text:span>, <text:span text:style-name="Emphasis">clone</text:span>, <text:span text:style-name="Emphasis">execve</text:span>, and <text:span text:style-name="Emphasis">wait</text:span>, as well as security features such as <text:span text:style-name="Emphasis">seccomp</text:span>. Additional topics include process groups, sessions, terminal control, signal handling, timers, thread programming, and daemon processes, all supported by practical examples.</text:p>
      <text:p text:style-name="P126"><text:span text:style-name="Strong_20_Emphasis"/></text:p>
      <text:p text:style-name="P125"><text:span text:style-name="Strong_20_Emphasis"><text:span text:style-name="T810">Chapter 6 — Interprocess Communication and Terminals</text:span></text:span></text:p>
      <text:p text:style-name="P124"><text:soft-page-break/>This chapter covers the main IPC mechanisms available in Linux, including POSIX message queues, semaphores, shared memory, and sockets. It also explores UNIX domain sockets in detail, along with terminal and pseudoterminal interfaces, providing numerous examples to illustrate their use in real-world scenarios.</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7"><text:soft-page-break/><text:span text:style-name="T811">Sample Chapter</text:span><text:span text:style-name="T812">s</text:span></text:p>
      <text:p text:style-name="P128"/>
      <text:p text:style-name="P129">Chapter I</text:p>
      <text:p text:style-name="P130"/>
      <text:p text:style-name="P131">File I/O</text:p>
      <text:p text:style-name="P131"/>
      <text:p text:style-name="P132"><text:bookmark-start text:name="1.1"/>I.1 Reading files<text:bookmark-end text:name="1.1"/></text:p>
      <text:p text:style-name="P133"/>
      <text:p text:style-name="P133">In Linux, almost everything is represented as a file: the keyboard, hard disks, terminals, printers, and even communication devices are exposed through the filesystem interface. Regular files are also represented in the same way. Files can be opened to perform read and/or write operations, and each file has associated attributes such as size, access permissions, ownership, and type.</text:p>
      <text:p text:style-name="P134"><text:span text:style-name="T813">Like most Unix-like operating systems, Linux defines three standard streams as the primary input/output interfaces for programs: </text:span><text:span text:style-name="T814">standard input</text:span><text:span text:style-name="T813">, </text:span><text:span text:style-name="T814">standard output</text:span><text:span text:style-name="T813">, and </text:span><text:span text:style-name="T814">standard error</text:span><text:span text:style-name="T813">. In Linux, these streams are represented as file descriptors and are identified by both a name and a numeric value.</text:span></text:p>
      <text:p text:style-name="P133"/>
      <text:p text:style-name="P135"/>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6">stdin</text:p>
          </table:table-cell>
          <table:table-cell table:style-name="Table1.A1" office:value-type="string">
            <text:p text:style-name="P137">0</text:p>
          </table:table-cell>
          <table:table-cell table:style-name="Table1.C1" office:value-type="string">
            <text:p text:style-name="P135">Standard input</text:p>
          </table:table-cell>
        </table:table-row>
        <table:table-row table:style-name="Table1.2">
          <table:table-cell table:style-name="Table1.A2" office:value-type="string">
            <text:p text:style-name="P136">stdout</text:p>
          </table:table-cell>
          <table:table-cell table:style-name="Table1.A2" office:value-type="string">
            <text:p text:style-name="P137">1</text:p>
          </table:table-cell>
          <table:table-cell table:style-name="Table1.C2" office:value-type="string">
            <text:p text:style-name="P135">Standard output</text:p>
          </table:table-cell>
        </table:table-row>
        <table:table-row table:style-name="Table1.2">
          <table:table-cell table:style-name="Table1.A2" office:value-type="string">
            <text:p text:style-name="P136">stderr</text:p>
          </table:table-cell>
          <table:table-cell table:style-name="Table1.A2" office:value-type="string">
            <text:p text:style-name="P137">2</text:p>
          </table:table-cell>
          <table:table-cell table:style-name="Table1.C2" office:value-type="string">
            <text:p text:style-name="P135">Standard error</text:p>
          </table:table-cell>
        </table:table-row>
      </table:table>
      <text:p text:style-name="P138"/>
      <text:p text:style-name="P139"><text:span text:style-name="T815">Tab1</text:span><text:span text:style-name="T813">. The main I/O devices</text:span></text:p>
      <text:p text:style-name="P140"/>
      <text:p text:style-name="P140"/>
      <text:p text:style-name="P134"><text:span text:style-name="T816">When we execute a command from the shell, its output is normally displayed on the </text:span><text:span text:style-name="T814">standard</text:span><text:span text:style-name="T816"> </text:span><text:span text:style-name="T814">output</text:span><text:span text:style-name="T816">, while error messages are sent to the </text:span><text:span text:style-name="T814">standard error</text:span><text:span text:style-name="T816"> stream. </text:span><text:span text:style-name="T814">Standard input</text:span><text:span text:style-name="T816"> represents the source from which data is read, typically the keyboard. </text:span><text:span text:style-name="T814">Standard output</text:span><text:span text:style-name="T816"> may correspond to the terminal, a printer, or a file used to store the results of program execution. Likewise, </text:span><text:span text:style-name="T814">standard input</text:span><text:span text:style-name="T816"> and </text:span><text:span text:style-name="T814">standard error</text:span><text:span text:style-name="T816"> can also be redirected to files or other devices instead of the console.</text:span></text:p>
      <text:p text:style-name="P140"/>
      <text:p text:style-name="P141"/>
      <text:p text:style-name="P139"><text:span text:style-name="T375">I.1.1 Opening files: </text:span><text:span text:style-name="T817">open</text:span><text:span text:style-name="T375"> and </text:span><text:span text:style-name="T817">close</text:span></text:p>
      <text:p text:style-name="P140"/>
      <text:p text:style-name="P134"><text:span text:style-name="T816">The </text:span><text:span text:style-name="Source_20_Text"><text:span text:style-name="T818">open</text:span></text:span><text:span text:style-name="Source_20_Text"><text:span text:style-name="T819"><text:note text:id="ftn1" text:note-class="footnote"><text:note-citation>1</text:note-citation><text:note-body><text:p text:style-name="Footnote"><text:span text:style-name="T820">See the </text:span><text:span text:style-name="T821">open(2)</text:span><text:span text:style-name="T820"> manual page</text:span></text:p></text:note-body></text:note></text:span></text:span><text:span text:style-name="T816"> function opens the file specified by its first argument according to the mode indicated by the second argument, and returns a </text:span><text:span text:style-name="T814">file descriptor</text:span><text:span text:style-name="T816">. A file descriptor is a positive integer used by the operating system to identify an open file within a program. Every file opened by a process in the system is associated with a file descriptor.</text:span></text:p>
      <text:p text:style-name="P142"/>
      <table:table table:name="Table2" table:style-name="Table2">
        <table:table-column table:style-name="Table2.A"/>
        <table:table-row table:style-name="Table2.1">
          <table:table-cell table:style-name="Table2.A1" office:value-type="string">
            <text:p text:style-name="P134"><text:span text:style-name="T822">#include </text:span><text:span text:style-name="T823">&lt;fcntl.h&gt;</text:span></text:p>
            <text:p text:style-name="P143"/>
            <text:p text:style-name="P144"><text:span text:style-name="T824">int</text:span><text:span text:style-name="T825"> </text:span><text:span text:style-name="T826">open</text:span><text:span text:style-name="T825">(</text:span><text:span text:style-name="T824">const</text:span><text:span text:style-name="T825"> </text:span><text:span text:style-name="T824">char</text:span><text:span text:style-name="T825"> *</text:span><text:span text:style-name="T827">pathname</text:span><text:span text:style-name="T825">, </text:span><text:span text:style-name="T824">int</text:span><text:span text:style-name="T825"> </text:span><text:span text:style-name="T827">flags</text:span><text:span text:style-name="T825">);</text:span></text:p>
            <text:p text:style-name="P145"><text:soft-page-break/></text:p>
            <text:p text:style-name="P146"><text:span text:style-name="T828"><text:s text:c="24"/></text:span><text:span text:style-name="T829">Returns: the new file descriptor, -1 on error</text:span></text:p>
          </table:table-cell>
        </table:table-row>
      </table:table>
      <text:p text:style-name="P133"/>
      <text:p text:style-name="P133"/>
      <text:p text:style-name="P134"><text:span text:style-name="T813">The </text:span><text:span text:style-name="T818">openfile.c</text:span><text:span text:style-name="T813"> program provides an example of how this works.</text:span></text:p>
      <text:p text:style-name="P147"/>
      <text:p text:style-name="P134"><text:span text:style-name="T830">1 </text:span><text:span text:style-name="T822">#include </text:span><text:span text:style-name="T823">&lt;stdio.h&gt;</text:span></text:p>
      <text:p text:style-name="P144"><text:span text:style-name="T830">2 </text:span><text:span text:style-name="T824">#include </text:span><text:span text:style-name="T831">&lt;fcntl.h&gt;</text:span></text:p>
      <text:p text:style-name="P143"/>
      <text:p text:style-name="P144"><text:span text:style-name="T830">3 </text:span><text:span text:style-name="T824">int</text:span><text:span text:style-name="T825"> main (</text:span><text:span text:style-name="T824">int</text:span><text:span text:style-name="T825"> argc, </text:span><text:span text:style-name="T824">char</text:span><text:span text:style-name="T825"> *argv</text:span><text:span text:style-name="T824">[]</text:span><text:span text:style-name="T825">)</text:span></text:p>
      <text:p text:style-name="P144"><text:span text:style-name="T830">4 </text:span><text:span text:style-name="T825">{</text:span></text:p>
      <text:p text:style-name="P144"><text:span text:style-name="T830">5 <text:tab/></text:span><text:span text:style-name="T824">int</text:span><text:span text:style-name="T825"> fd;</text:span></text:p>
      <text:p text:style-name="P144"><text:span text:style-name="T830">6 <text:tab/></text:span><text:span text:style-name="T824">int</text:span><text:span text:style-name="T825"> fd2;</text:span></text:p>
      <text:p text:style-name="P144"><text:span text:style-name="T830">7 <text:tab/></text:span><text:span text:style-name="T824">int</text:span><text:span text:style-name="T825"> fd3;</text:span></text:p>
      <text:p text:style-name="P143"/>
      <text:p text:style-name="P144"><text:span text:style-name="T830">8 <text:tab/></text:span><text:span text:style-name="T825">fd = </text:span><text:span text:style-name="T826">open</text:span><text:span text:style-name="T825">(</text:span><text:span text:style-name="T831">"file.txt"</text:span><text:span text:style-name="T825">, </text:span><text:span text:style-name="T824">O_RDONLY</text:span><text:span text:style-name="T825">);</text:span></text:p>
      <text:p text:style-name="P144"><text:span text:style-name="T830">9 <text:tab/></text:span><text:span text:style-name="T825">fd2 = </text:span><text:span text:style-name="T826">open</text:span><text:span text:style-name="T825">(</text:span><text:span text:style-name="T831">"file2.txt"</text:span><text:span text:style-name="T825">, </text:span><text:span text:style-name="T824">O_WRONLY</text:span><text:span text:style-name="T825">);</text:span></text:p>
      <text:p text:style-name="P144"><text:span text:style-name="T830">10 <text:tab/></text:span><text:span text:style-name="T825">fd3 = </text:span><text:span text:style-name="T826">open</text:span><text:span text:style-name="T825">(</text:span><text:span text:style-name="T831">"file3.txt"</text:span><text:span text:style-name="T825">, </text:span><text:span text:style-name="T824">O_RDWR</text:span><text:span text:style-name="T825">);</text:span></text:p>
      <text:p text:style-name="P144"><text:span text:style-name="T830">11 <text:tab/></text:span><text:span text:style-name="T825">printf(</text:span><text:span text:style-name="T831">"fd = %d"</text:span><text:span text:style-name="T825">, fd);</text:span></text:p>
      <text:p text:style-name="P144"><text:span text:style-name="T830">12 <text:tab/></text:span><text:span text:style-name="T825">printf(</text:span><text:span text:style-name="T831">"\nfd2 = %d"</text:span><text:span text:style-name="T825">, fd2);</text:span></text:p>
      <text:p text:style-name="P144"><text:span text:style-name="T830">13 <text:tab/></text:span><text:span text:style-name="T825">printf(</text:span><text:span text:style-name="T831">"\nfd3 = %d"</text:span><text:span text:style-name="T825">, fd3);</text:span></text:p>
      <text:p text:style-name="P144"><text:span text:style-name="T830">14 <text:tab/></text:span><text:span text:style-name="T824">return</text:span><text:span text:style-name="T825"> </text:span><text:span text:style-name="T832">0</text:span><text:span text:style-name="T825">;</text:span></text:p>
      <text:p text:style-name="P144"><text:span text:style-name="T830">15 </text:span><text:span text:style-name="T825">}</text:span></text:p>
      <text:p text:style-name="P147"/>
      <text:p text:style-name="P139"><text:span text:style-name="T833">openfile.c</text:span> Opens three files in different modes</text:p>
      <text:p text:style-name="P148"/>
      <text:p text:style-name="P149"><text:span text:style-name="T221">Line 1. Includes the header file for standard I/O functions<text:line-break/>Line 2. Includes the header file required for the </text:span><text:span text:style-name="Source_20_Text"><text:span text:style-name="T834">open</text:span></text:span><text:span text:style-name="T221"> function<text:line-break/>Lines 5–7. Declare three file descriptors<text:line-break/>Line 8. Opens the file in read-only mode<text:line-break/>Line 9. Opens the file in write-only mode<text:line-break/>Line 10. Opens the file in read/write mode<text:line-break/>Lines 11–13. Print the values of the file descriptors</text:span></text:p>
      <text:p text:style-name="P148"/>
      <text:p text:style-name="P135">We create two files and then run the program. </text:p>
      <text:p text:style-name="P135"/>
      <table:table table:name="Table3" table:style-name="Table3">
        <table:table-column table:style-name="Table3.A"/>
        <table:table-row table:style-name="Table3.1">
          <table:table-cell table:style-name="Table3.A1" office:value-type="string">
            <text:p text:style-name="P150"><text:span text:style-name="T835">[</text:span><text:a xlink:type="simple" xlink:href="mailto:linux@io" text:style-name="Internet_20_link" text:visited-style-name="Visited_20_Internet_20_Link"><text:span text:style-name="Internet_20_link"><text:span text:style-name="T835">linux@io</text:span></text:span></text:a><text:span text:style-name="T835">] touch file.txt file2.txt</text:span></text:p>
            <text:p text:style-name="P150"><text:span text:style-name="T835">[</text:span><text:a xlink:type="simple" xlink:href="mailto:linux@io" text:style-name="Internet_20_link" text:visited-style-name="Visited_20_Internet_20_Link"><text:span text:style-name="Internet_20_link"><text:span text:style-name="T835">linux@io</text:span></text:span></text:a><text:span text:style-name="T835">] ./openfile</text:span></text:p>
            <text:p text:style-name="P151">fd = 3</text:p>
            <text:p text:style-name="P151">fd2 = 4</text:p>
            <text:p text:style-name="P151">fd3 = -1 <text:s/></text:p>
          </table:table-cell>
        </table:table-row>
      </table:table>
      <text:p text:style-name="P135"/>
      <text:p text:style-name="P134"><text:span text:style-name="T813">The value of the third descriptor is </text:span><text:span text:style-name="Source_20_Text"><text:span text:style-name="T818">-1</text:span></text:span><text:span text:style-name="T813"> because the file we attempted to open does not exist. The first descriptor has the value </text:span><text:span text:style-name="Source_20_Text"><text:span text:style-name="T818">3</text:span></text:span><text:span text:style-name="T813"> because the descriptors </text:span><text:span text:style-name="Source_20_Text"><text:span text:style-name="T818">0</text:span></text:span><text:span text:style-name="T813">, </text:span><text:span text:style-name="Source_20_Text"><text:span text:style-name="T818">1</text:span></text:span><text:span text:style-name="T813">, and </text:span><text:span text:style-name="Source_20_Text"><text:span text:style-name="T818">2</text:span></text:span><text:span text:style-name="T813"> are already reserved for </text:span><text:span text:style-name="Source_20_Text"><text:span text:style-name="T818">stdin</text:span></text:span><text:span text:style-name="T813">, </text:span><text:span text:style-name="Source_20_Text"><text:span text:style-name="T818">stdout</text:span></text:span><text:span text:style-name="T813">, and </text:span><text:span text:style-name="Source_20_Text"><text:span text:style-name="T818">stderr</text:span></text:span><text:span text:style-name="T813">, respectively. For each additional file opened, the operating system typically assigns the next available file descriptor. Therefore, if </text:span><text:span text:style-name="Source_20_Text"><text:span text:style-name="T818">file3.txt</text:span></text:span><text:span text:style-name="T813"> existed and were opened successfully, its descriptor would likely be </text:span><text:span text:style-name="Source_20_Text"><text:span text:style-name="T818">5</text:span></text:span><text:span text:style-name="T813">, and so on.</text:span></text:p>
      <text:p text:style-name="P133"><text:soft-page-break/></text:p>
      <text:p text:style-name="P134"><text:span text:style-name="T813">The values for the </text:span><text:span text:style-name="Source_20_Text"><text:span text:style-name="T818">flags</text:span></text:span><text:span text:style-name="T813"> argument are listed in the following table.</text:span></text:p>
      <text:p text:style-name="P142"/>
      <table:table table:name="Table4" table:style-name="Table4">
        <table:table-column table:style-name="Table4.A"/>
        <table:table-column table:style-name="Table4.B"/>
        <table:table-row table:style-name="Table4.1">
          <table:table-cell table:style-name="Table4.A1" office:value-type="string">
            <text:p text:style-name="P152">O_RDONLY</text:p>
          </table:table-cell>
          <table:table-cell table:style-name="Table4.B1" office:value-type="string">
            <text:p text:style-name="P153">Read only</text:p>
          </table:table-cell>
        </table:table-row>
        <table:table-row table:style-name="Table4.1">
          <table:table-cell table:style-name="Table4.A2" office:value-type="string">
            <text:p text:style-name="P152">O_WRONLY</text:p>
          </table:table-cell>
          <table:table-cell table:style-name="Table4.B2" office:value-type="string">
            <text:p text:style-name="P153">Write only</text:p>
          </table:table-cell>
        </table:table-row>
        <table:table-row table:style-name="Table4.1">
          <table:table-cell table:style-name="Table4.A2" office:value-type="string">
            <text:p text:style-name="P152">O_RDWR</text:p>
          </table:table-cell>
          <table:table-cell table:style-name="Table4.B2" office:value-type="string">
            <text:p text:style-name="P153">Read/Write</text:p>
          </table:table-cell>
        </table:table-row>
        <table:table-row table:style-name="Table4.1">
          <table:table-cell table:style-name="Table4.A2" office:value-type="string">
            <text:p text:style-name="P152">O_APPEND</text:p>
          </table:table-cell>
          <table:table-cell table:style-name="Table4.B2" office:value-type="string">
            <text:p text:style-name="P153">Append</text:p>
          </table:table-cell>
        </table:table-row>
      </table:table>
      <text:p text:style-name="P138"/>
      <text:p text:style-name="P139"><text:span text:style-name="T815">Tab 2. </text:span><text:span text:style-name="T813">O</text:span><text:span text:style-name="T836">pening modes </text:span><text:span text:style-name="T813">(</text:span><text:span text:style-name="T837">open</text:span><text:span text:style-name="T813">)</text:span></text:p>
      <text:p text:style-name="P154"/>
      <text:p text:style-name="P134"><text:span text:style-name="T816">The </text:span><text:span text:style-name="T837">close</text:span><text:span text:style-name="footnote_20_reference1"><text:span text:style-name="T837"><text:note text:id="ftn2" text:note-class="footnote"><text:note-citation>2</text:note-citation><text:note-body><text:p text:style-name="Footnote">See the <text:span text:style-name="T821">close(2)</text:span><text:span text:style-name="T820"> manual page</text:span></text:p></text:note-body></text:note></text:span></text:span><text:span text:style-name="T816"> function closes the file associated with the file descriptor passed as an argument.</text:span></text:p>
      <text:p text:style-name="P140"/>
      <table:table table:name="Table5" table:style-name="Table5">
        <table:table-column table:style-name="Table5.A"/>
        <table:table-row table:style-name="Table5.1">
          <table:table-cell table:style-name="Table5.A1" office:value-type="string">
            <text:p text:style-name="P134"><text:span text:style-name="T822">#include </text:span><text:span text:style-name="T823">&lt;unistd.h&gt;</text:span></text:p>
            <text:p text:style-name="P143"/>
            <text:p text:style-name="P144"><text:span text:style-name="T824">int</text:span><text:span text:style-name="T825"> </text:span><text:span text:style-name="T826">close</text:span><text:span text:style-name="T825">(</text:span><text:span text:style-name="T824">int</text:span><text:span text:style-name="T825"> </text:span><text:span text:style-name="T827">fd</text:span><text:span text:style-name="T825">);</text:span></text:p>
            <text:p text:style-name="P155"/>
            <text:p text:style-name="P156"><text:span text:style-name="T838"><text:s text:c="40"/></text:span><text:span text:style-name="T829">Returns: 0 on success, -1 on error</text:span></text:p>
          </table:table-cell>
        </table:table-row>
      </table:table>
      <text:p text:style-name="P140"/>
      <text:p text:style-name="P134"><text:span text:style-name="T816">The </text:span><text:span text:style-name="T819">closefile.c</text:span><text:span text:style-name="T816"> program shows an example.</text:span></text:p>
      <text:p text:style-name="P157"/>
      <text:p text:style-name="P134"><text:span text:style-name="T839">1 </text:span><text:span text:style-name="T840">#include </text:span><text:span text:style-name="T841">&lt;stdio.h&gt;</text:span></text:p>
      <text:p text:style-name="P144"><text:span text:style-name="T839">2 </text:span><text:span text:style-name="T824">#include </text:span><text:span text:style-name="T831">&lt;fcntl.h&gt;</text:span></text:p>
      <text:p text:style-name="P144"><text:span text:style-name="T839">3 </text:span><text:span text:style-name="T824">#include </text:span><text:span text:style-name="T831">&lt;unistd.h&gt;</text:span></text:p>
      <text:p text:style-name="P143"/>
      <text:p text:style-name="P144"><text:span text:style-name="T839">4 </text:span><text:span text:style-name="T824">int</text:span><text:span text:style-name="T825"> main (</text:span><text:span text:style-name="T824">int</text:span><text:span text:style-name="T825"> argc, </text:span><text:span text:style-name="T824">char</text:span><text:span text:style-name="T825"> *argv</text:span><text:span text:style-name="T824">[]</text:span><text:span text:style-name="T825">)</text:span></text:p>
      <text:p text:style-name="P144"><text:span text:style-name="T839">5 </text:span><text:span text:style-name="T825">{</text:span></text:p>
      <text:p text:style-name="P144"><text:span text:style-name="T839">6 <text:tab/></text:span><text:span text:style-name="T824">int</text:span><text:span text:style-name="T825"> fd; </text:span></text:p>
      <text:p text:style-name="P144"><text:span text:style-name="T839">7 <text:tab/></text:span><text:span text:style-name="T825">open(</text:span><text:span text:style-name="T831">"file.txt"</text:span><text:span text:style-name="T825">, </text:span><text:span text:style-name="T824">O_RDONLY</text:span><text:span text:style-name="T825">);</text:span></text:p>
      <text:p text:style-name="P144"><text:span text:style-name="T839">8 <text:tab/></text:span><text:span text:style-name="T826">close</text:span><text:span text:style-name="T825">(fd);</text:span></text:p>
      <text:p text:style-name="P144"><text:span text:style-name="T839">9 <text:tab/></text:span><text:span text:style-name="T824">return</text:span><text:span text:style-name="T825"> </text:span><text:span text:style-name="T832">0</text:span><text:span text:style-name="T825">;</text:span></text:p>
      <text:p text:style-name="P144"><text:span text:style-name="T839">10 </text:span><text:span text:style-name="T825">}</text:span></text:p>
      <text:p text:style-name="P147"/>
      <text:p text:style-name="P139"><text:span text:style-name="T833">closefile.c</text:span> Open and close a file</text:p>
      <text:p text:style-name="P149"/>
      <text:p text:style-name="P149"><text:span text:style-name="T221">Line 3. Includes the header file required for the </text:span><text:span text:style-name="T842">close</text:span><text:span text:style-name="T221"> function</text:span></text:p>
      <text:p text:style-name="P148">Line 6. Declare a descriptor</text:p>
      <text:p text:style-name="P148">Line 7. Opens the file in read-only mode</text:p>
      <text:p text:style-name="P149"><text:span text:style-name="T221">Line 8. Closes the file associated with the </text:span><text:span text:style-name="T842">fd</text:span><text:span text:style-name="T221"> descriptor</text:span></text:p>
      <text:p text:style-name="P158"/>
      <text:p text:style-name="P140">We execute the program</text:p>
      <text:p text:style-name="P140"/>
      <table:table table:name="Table6" table:style-name="Table6">
        <table:table-column table:style-name="Table6.A"/>
        <table:table-row table:style-name="Table6.1">
          <table:table-cell table:style-name="Table6.A1" office:value-type="string">
            <text:p text:style-name="P159"><text:span text:style-name="T835">[</text:span><text:a xlink:type="simple" xlink:href="mailto:linux@io" text:style-name="Internet_20_link" text:visited-style-name="Visited_20_Internet_20_Link"><text:span text:style-name="Internet_20_link"><text:span text:style-name="T835">linux@io</text:span></text:span></text:a><text:span text:style-name="T835">] ./closefile</text:span></text:p>
            <text:p text:style-name="P159"><text:span text:style-name="T835">[</text:span><text:a xlink:type="simple" xlink:href="mailto:linux@io" text:style-name="Internet_20_link" text:visited-style-name="Visited_20_Internet_20_Link"><text:span text:style-name="Internet_20_link"><text:span text:style-name="T835">linux@io</text:span></text:span></text:a><text:span text:style-name="T835">] </text:span></text:p>
          </table:table-cell>
        </table:table-row>
      </table:table>
      <text:p text:style-name="P133"/>
      <text:p text:style-name="P134"><text:span text:style-name="T813">The program opens and then closes the file. </text:span><text:span text:style-name="T818">close</text:span><text:span text:style-name="T813"> can return one of the following errors</text:span><text:span text:style-name="footnote_20_reference1"><text:span text:style-name="T813"><text:note text:id="ftn3" text:note-class="footnote"><text:note-citation>3</text:note-citation><text:note-body><text:p text:style-name="Footnote">For a complete list see the <text:span text:style-name="T843">close(2)</text:span><text:span text:style-name="T820"> manual page</text:span></text:p></text:note-body></text:note></text:span></text:span></text:p>
      <text:p text:style-name="P133"/>
      <table:table table:name="Table7" table:style-name="Table7">
        <table:table-column table:style-name="Table7.A"/>
        <table:table-column table:style-name="Table7.B"/>
        <table:table-row table:style-name="Table7.1">
          <table:table-cell table:style-name="Table7.A1" office:value-type="string">
            <text:p text:style-name="P152">EBADF</text:p>
          </table:table-cell>
          <table:table-cell table:style-name="Table7.B1" office:value-type="string">
            <text:p text:style-name="P151">The descriptor is not a valid descriptor</text:p>
          </table:table-cell>
        </table:table-row>
        <table:table-row table:style-name="Table7.1">
          <table:table-cell table:style-name="Table7.A2" office:value-type="string">
            <text:p text:style-name="P152">EINTR</text:p>
          </table:table-cell>
          <table:table-cell table:style-name="Table7.B2" office:value-type="string">
            <text:p text:style-name="P151">The call was interrupted by a signal</text:p>
          </table:table-cell>
        </table:table-row>
        <table:table-row table:style-name="Table7.1">
          <table:table-cell table:style-name="Table7.A2" office:value-type="string">
            <text:p text:style-name="P152">EIO</text:p>
          </table:table-cell>
          <table:table-cell table:style-name="Table7.B2" office:value-type="string">
            <text:p text:style-name="P151">I/O Error</text:p>
          </table:table-cell>
        </table:table-row>
        <table:table-row table:style-name="Table7.1">
          <table:table-cell table:style-name="Table7.A2" office:value-type="string">
            <text:p text:style-name="P152">ENOSPC</text:p>
          </table:table-cell>
          <table:table-cell table:style-name="Table7.B2" office:value-type="string">
            <text:p text:style-name="P151">Not enough space on the disk</text:p>
          </table:table-cell>
        </table:table-row>
        <table:table-row table:style-name="Table7.1">
          <table:table-cell table:style-name="Table7.A2" office:value-type="string">
            <text:p text:style-name="P152">EDQUOT</text:p>
          </table:table-cell>
          <table:table-cell table:style-name="Table7.B2" office:value-type="string">
            <text:p text:style-name="P151">The user quote on fs is finished</text:p>
          </table:table-cell>
        </table:table-row>
      </table:table>
      <text:p text:style-name="P133"/>
      <text:p text:style-name="P139"><text:span text:style-name="T815">Tab 3</text:span><text:span text:style-name="T813">. </text:span><text:span text:style-name="T818">close</text:span><text:span text:style-name="T813"> errors</text:span></text:p>
      <text:p text:style-name="P154"/>
      <text:p text:style-name="P139"><text:span text:style-name="T375">I.1.2 Reading from file: </text:span><text:span text:style-name="T817">read</text:span></text:p>
      <text:p text:style-name="P142"/>
      <text:p text:style-name="P134"><text:span text:style-name="T813">The </text:span><text:span text:style-name="T818">read</text:span><text:span text:style-name="footnote_20_reference1"><text:span text:style-name="T818"><text:note text:id="ftn4" text:note-class="footnote"><text:note-citation>4</text:note-citation><text:note-body><text:p text:style-name="Footnote">See the <text:span text:style-name="T843">read(2)</text:span> manual page</text:p></text:note-body></text:note></text:span></text:span><text:span text:style-name="T813"> function reads a count of characters from the file descriptor </text:span><text:span text:style-name="T818">fd</text:span><text:span text:style-name="T813"> and stores them in </text:span><text:span text:style-name="T818">buf</text:span><text:span text:style-name="T813">.</text:span></text:p>
      <text:p text:style-name="P133"/>
      <table:table table:name="Table8" table:style-name="Table8">
        <table:table-column table:style-name="Table8.A"/>
        <table:table-row table:style-name="Table8.1">
          <table:table-cell table:style-name="Table8.A1" office:value-type="string">
            <text:p text:style-name="P134"><text:span text:style-name="T840">#include </text:span><text:span text:style-name="T841">&lt;unistd.h&gt;</text:span></text:p>
            <text:p text:style-name="P143"/>
            <text:p text:style-name="P144"><text:span text:style-name="T824">ssize_t</text:span><text:span text:style-name="T825"> </text:span><text:span text:style-name="T826">read</text:span><text:span text:style-name="T825">(</text:span><text:span text:style-name="T824">int</text:span><text:span text:style-name="T825"> </text:span><text:span text:style-name="T827">fd</text:span><text:span text:style-name="T825">, </text:span><text:span text:style-name="T824">void</text:span><text:span text:style-name="T825"> *</text:span><text:span text:style-name="T827">buf</text:span><text:span text:style-name="T825">, </text:span><text:span text:style-name="T824">size_t</text:span><text:span text:style-name="T825"> </text:span><text:span text:style-name="T827">count</text:span><text:span text:style-name="T825">);</text:span></text:p>
            <text:p text:style-name="P160"/>
            <text:p text:style-name="P146"><text:span text:style-name="T838"><text:s text:c="2"/></text:span><text:span text:style-name="T844"><text:s text:c="21"/></text:span><text:span text:style-name="T829">Returns: the number of bytes read, -1 on error</text:span></text:p>
          </table:table-cell>
        </table:table-row>
      </table:table>
      <text:p text:style-name="P133"/>
      <text:p text:style-name="P134"><text:span text:style-name="T845">When </text:span><text:span text:style-name="T818">read</text:span><text:span text:style-name="T845"> is invoked, it returns the number of bytes actually read. I</text:span>n some cases, this value may be smaller than the number of bytes requested, for example, when the <text:span text:style-name="T221">end of file</text:span> is reached before the requested amount has been read, when reading from a terminal device, a network device, or a pipe, or when the operation is interrupted by a signal.</text:p>
      <text:p text:style-name="P134">After a successful call, the file offset is automatically increased by the number of bytes read.</text:p>
      <text:p text:style-name="P161"/>
      <text:p text:style-name="P134"><text:span text:style-name="T813">The </text:span><text:span text:style-name="T819">readfromfile.c</text:span><text:span text:style-name="T813"> program reads from a file.</text:span></text:p>
      <text:p text:style-name="P147"/>
      <text:p text:style-name="P162"><text:span text:style-name="T846">1 </text:span><text:span text:style-name="T847">#include </text:span><text:span text:style-name="T848">&lt;stdio.h&gt;</text:span></text:p>
      <text:p text:style-name="P144"><text:span text:style-name="T846">2 </text:span><text:span text:style-name="T824">#include </text:span><text:span text:style-name="T831">&lt;fcntl.h&gt;</text:span></text:p>
      <text:p text:style-name="P144"><text:span text:style-name="T846">3 </text:span><text:span text:style-name="T824">#include </text:span><text:span text:style-name="T831">&lt;unistd.h&gt;</text:span></text:p>
      <text:p text:style-name="P143"/>
      <text:p text:style-name="P144"><text:span text:style-name="T846">4 </text:span><text:span text:style-name="T824">#define COUNT </text:span><text:span text:style-name="T832">128</text:span></text:p>
      <text:p text:style-name="P144"><text:span text:style-name="T846">5 </text:span><text:span text:style-name="T824">int</text:span><text:span text:style-name="T825"> main (</text:span><text:span text:style-name="T824">int</text:span><text:span text:style-name="T825"> argc, </text:span><text:span text:style-name="T824">char</text:span><text:span text:style-name="T825"> *argv</text:span><text:span text:style-name="T824">[]</text:span><text:span text:style-name="T825">)</text:span></text:p>
      <text:p text:style-name="P144"><text:span text:style-name="T846">6 </text:span><text:span text:style-name="T825">{</text:span></text:p>
      <text:p text:style-name="P144"><text:span text:style-name="T846">7 <text:tab/></text:span><text:span text:style-name="T824">int</text:span><text:span text:style-name="T825"> fd;</text:span></text:p>
      <text:p text:style-name="P144"><text:span text:style-name="T846">8 <text:tab/></text:span><text:span text:style-name="T824">int</text:span><text:span text:style-name="T825"> n;</text:span></text:p>
      <text:p text:style-name="P144"><text:span text:style-name="T846">9 <text:tab/></text:span><text:span text:style-name="T824">char</text:span><text:span text:style-name="T825"> buffer[</text:span><text:span text:style-name="T824">COUNT</text:span><text:span text:style-name="T825">];</text:span></text:p>
      <text:p text:style-name="P143"/>
      <text:p text:style-name="P144"><text:span text:style-name="T846">10 <text:tab/></text:span><text:span text:style-name="T825">fd = open(</text:span><text:span text:style-name="T831">"./file.txt"</text:span><text:span text:style-name="T825">, </text:span><text:span text:style-name="T824">O_RDONLY</text:span><text:span text:style-name="T825">);</text:span></text:p>
      <text:p text:style-name="P144"><text:span text:style-name="T846">11 <text:tab/></text:span><text:span text:style-name="T824">if</text:span><text:span text:style-name="T825"> (fd &lt; </text:span><text:span text:style-name="T832">0</text:span><text:span text:style-name="T825">) {</text:span></text:p>
      <text:p text:style-name="P144"><text:span text:style-name="T846">12 <text:tab/><text:tab/></text:span><text:span text:style-name="T825">printf(</text:span><text:span text:style-name="T831">"Open error - exit.."</text:span><text:span text:style-name="T825">);</text:span></text:p>
      <text:p text:style-name="P144"><text:soft-page-break/><text:span text:style-name="T846">13 <text:tab/><text:tab/></text:span><text:span text:style-name="T824">return</text:span><text:span text:style-name="T825"> </text:span><text:span text:style-name="T832">1</text:span><text:span text:style-name="T825">;</text:span></text:p>
      <text:p text:style-name="P144"><text:span text:style-name="T846">14 <text:tab/></text:span><text:span text:style-name="T825">}</text:span></text:p>
      <text:p text:style-name="P143"/>
      <text:p text:style-name="P144"><text:span text:style-name="T846">15 <text:tab/></text:span><text:span text:style-name="T825">n = </text:span><text:span text:style-name="T826">read</text:span><text:span text:style-name="T825">(fd, buffer, </text:span><text:span text:style-name="T824">COUNT</text:span><text:span text:style-name="T825">);</text:span></text:p>
      <text:p text:style-name="P144"><text:span text:style-name="T846">16 <text:tab/></text:span><text:span text:style-name="T825">printf(</text:span><text:span text:style-name="T831">"Bytes read: %d"</text:span><text:span text:style-name="T825">, n);</text:span></text:p>
      <text:p text:style-name="P144"><text:span text:style-name="T846">17 <text:tab/></text:span><text:span text:style-name="T825">printf(</text:span><text:span text:style-name="T831">"\nContent: %s"</text:span><text:span text:style-name="T825">, buffer);</text:span></text:p>
      <text:p text:style-name="P144"><text:span text:style-name="T846">18 <text:tab/></text:span><text:span text:style-name="T825">close(fd);</text:span></text:p>
      <text:p text:style-name="P144"><text:span text:style-name="T846">19 <text:tab/></text:span><text:span text:style-name="T824">return</text:span><text:span text:style-name="T825"> </text:span><text:span text:style-name="T832">0</text:span><text:span text:style-name="T825">;</text:span></text:p>
      <text:p text:style-name="P144"><text:span text:style-name="T846">20 </text:span><text:span text:style-name="T825">}</text:span></text:p>
      <text:p text:style-name="P147"/>
      <text:p text:style-name="P139"><text:span text:style-name="T815">readfromfile.c</text:span><text:span text:style-name="T813"> Reads the content of the file </text:span></text:p>
      <text:p text:style-name="P154"/>
      <text:p text:style-name="P149"><text:span text:style-name="T814">Line 4. Constant defining the number of bytes to read from the file<text:line-break/>Line 7. File descriptor<text:line-break/>Line 8. Integer variable that stores the number of bytes actually read<text:line-break/>Line 9. Array of 128 characters used as a buffer to store the data read from the file<text:line-break/>Line 10. Opens the file<text:line-break/>Line 11. Checks whether </text:span><text:span text:style-name="Source_20_Text"><text:span text:style-name="T842">open</text:span></text:span><text:span text:style-name="T814"> returned </text:span><text:span text:style-name="Source_20_Text"><text:span text:style-name="T842">-1</text:span></text:span><text:span text:style-name="T814"> (indicating failure to open the file)<text:line-break/>Lines 12–13. Prints an error message and exits the program<text:line-break/>Line 15. Attempts to read 128 bytes from the file and store them in the buffer<text:line-break/>Line 16. Prints the number of bytes read<text:line-break/>Line 17. Prints the contents of the buffer<text:line-break/>Line 18. Closes the file</text:span></text:p>
      <text:p text:style-name="P163"/>
      <text:p text:style-name="P134"><text:span text:style-name="T813">We write some data into the </text:span><text:span text:style-name="T837">file.txt</text:span><text:span text:style-name="T813"> file and then run the program.</text:span></text:p>
      <text:p text:style-name="P133"/>
      <table:table table:name="Table9" table:style-name="Table9">
        <table:table-column table:style-name="Table9.A"/>
        <table:table-row table:style-name="Table9.1">
          <table:table-cell table:style-name="Table9.A1" office:value-type="string">
            <text:p text:style-name="P159"><text:span text:style-name="T835">[</text:span><text:a xlink:type="simple" xlink:href="mailto:linux@io" text:style-name="Internet_20_link" text:visited-style-name="Visited_20_Internet_20_Link"><text:span text:style-name="Internet_20_link"><text:span text:style-name="T835">linux@io</text:span></text:span></text:a><text:span text:style-name="T835">] echo Linux &gt; file.txt</text:span></text:p>
            <text:p text:style-name="P159"><text:span text:style-name="T835">[</text:span><text:a xlink:type="simple" xlink:href="mailto:linux@io" text:style-name="Internet_20_link" text:visited-style-name="Visited_20_Internet_20_Link"><text:span text:style-name="Internet_20_link"><text:span text:style-name="T835">linux@io</text:span></text:span></text:a><text:span text:style-name="T835">] ./readfromfile</text:span></text:p>
            <text:p text:style-name="P164">Readed bytes: 6</text:p>
            <text:p text:style-name="P164">Content: Linux</text:p>
          </table:table-cell>
        </table:table-row>
      </table:table>
      <text:p text:style-name="P133"/>
      <text:p text:style-name="P134"><text:span text:style-name="T813">The buffer size is 128 bytes, but the file contains only 6 bytes. The </text:span><text:span text:style-name="Source_20_Text"><text:span text:style-name="T837">read</text:span></text:span><text:span text:style-name="T813"> function reads data from the file up to the specified buffer size (128 bytes). This means it will return up to 128 bytes if available; however, since the file is smaller, only 6 bytes are actually read, and no additional data is returned beyond the end of the file.</text:span></text:p>
      <text:p text:style-name="P133"/>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39"><text:soft-page-break/><text:span text:style-name="T375">I.1.3 Writing to file: </text:span><text:span text:style-name="T817">write</text:span></text:p>
      <text:p text:style-name="P133"/>
      <text:p text:style-name="P134"><text:span text:style-name="T849">The </text:span><text:span text:style-name="T819">write</text:span><text:span text:style-name="footnote_20_reference1"><text:span text:style-name="T819"><text:note text:id="ftn5" text:note-class="footnote"><text:note-citation>5</text:note-citation><text:note-body><text:p text:style-name="Footnote">See the <text:span text:style-name="T843">write(2)</text:span> manual page</text:p></text:note-body></text:note></text:span></text:span><text:span text:style-name="T849"> function is used to write data to a file descriptor. It writes up to </text:span><text:span text:style-name="Source_20_Text"><text:span text:style-name="T819">count</text:span></text:span><text:span text:style-name="T849"> bytes from the buffer </text:span><text:span text:style-name="Source_20_Text"><text:span text:style-name="T819">buf</text:span></text:span><text:span text:style-name="T849"> to the file descriptor </text:span><text:span text:style-name="Source_20_Text"><text:span text:style-name="T819">fd</text:span></text:span><text:span text:style-name="T849"> and returns the number of bytes actually written.</text:span></text:p>
      <text:p text:style-name="P165"/>
      <table:table table:name="Table10" table:style-name="Table10">
        <table:table-column table:style-name="Table10.A"/>
        <table:table-row table:style-name="Table10.1">
          <table:table-cell table:style-name="Table10.A1" office:value-type="string">
            <text:p text:style-name="P134"><text:span text:style-name="T840">#include </text:span><text:span text:style-name="T841">&lt;unistd.h&gt;</text:span></text:p>
            <text:p text:style-name="P143"/>
            <text:p text:style-name="P144"><text:span text:style-name="T824">ssize_t</text:span><text:span text:style-name="T825"> </text:span><text:span text:style-name="T826">write</text:span><text:span text:style-name="T825">(</text:span><text:span text:style-name="T824">int</text:span><text:span text:style-name="T825"> </text:span><text:span text:style-name="T827">fd</text:span><text:span text:style-name="T825">, </text:span><text:span text:style-name="T824">const</text:span><text:span text:style-name="T825"> </text:span><text:span text:style-name="T824">void</text:span><text:span text:style-name="T825"> *</text:span><text:span text:style-name="T827">buf</text:span><text:span text:style-name="T825">, </text:span><text:span text:style-name="T824">size_t</text:span><text:span text:style-name="T825"> </text:span><text:span text:style-name="T827">count</text:span><text:span text:style-name="T825">);</text:span></text:p>
            <text:p text:style-name="P166"/>
            <text:p text:style-name="P146"><text:span text:style-name="T844"><text:s text:c="17"/></text:span><text:span text:style-name="T829">Returns: the number of written bytes, -1 on error</text:span></text:p>
          </table:table-cell>
        </table:table-row>
      </table:table>
      <text:p text:style-name="P140"/>
      <text:p text:style-name="P134"><text:span text:style-name="T816">For the </text:span><text:span text:style-name="T814">standard input</text:span><text:span text:style-name="T816">, </text:span><text:span text:style-name="T814">standard output</text:span><text:span text:style-name="T816"> and </text:span><text:span text:style-name="T814">standard error</text:span><text:span text:style-name="T816">, the corresponding constants are defined in the </text:span><text:span text:style-name="T819">unistd.h</text:span><text:span text:style-name="T816"> header file. These constants refer to their respective file descriptors.</text:span></text:p>
      <text:p text:style-name="P140"/>
      <text:p text:style-name="P140"/>
      <table:table table:name="Table11" table:style-name="Table11">
        <table:table-column table:style-name="Table11.A"/>
        <table:table-column table:style-name="Table11.B"/>
        <table:table-row table:style-name="Table11.1">
          <table:table-cell table:style-name="Table11.A1" office:value-type="string">
            <text:p text:style-name="P167">STDIN_FILENO</text:p>
          </table:table-cell>
          <table:table-cell table:style-name="Table11.B1" office:value-type="string">
            <text:p text:style-name="P168">0</text:p>
          </table:table-cell>
        </table:table-row>
        <table:table-row table:style-name="Table11.1">
          <table:table-cell table:style-name="Table11.A2" office:value-type="string">
            <text:p text:style-name="P167">STDOUT_FILENO</text:p>
          </table:table-cell>
          <table:table-cell table:style-name="Table11.B2" office:value-type="string">
            <text:p text:style-name="P168">1</text:p>
          </table:table-cell>
        </table:table-row>
        <table:table-row table:style-name="Table11.1">
          <table:table-cell table:style-name="Table11.A2" office:value-type="string">
            <text:p text:style-name="P167">STDERR_FILENO</text:p>
          </table:table-cell>
          <table:table-cell table:style-name="Table11.B2" office:value-type="string">
            <text:p text:style-name="P168">2</text:p>
          </table:table-cell>
        </table:table-row>
      </table:table>
      <text:p text:style-name="P140"/>
      <text:p text:style-name="P139"><text:span text:style-name="T850">Tab 4</text:span><text:span text:style-name="T816">. Standard descriptors</text:span></text:p>
      <text:p text:style-name="P140"/>
      <text:p text:style-name="P134"><text:span text:style-name="T816">The </text:span><text:span text:style-name="Source_20_Text"><text:span text:style-name="T819">readfile.c</text:span></text:span><text:span text:style-name="T816"> program opens a file, repeatedly reads from it until at least one byte is obtained, prints the number of bytes read along with the data, and then closes the file.</text:span></text:p>
      <text:p text:style-name="P157"/>
      <text:p text:style-name="P162"><text:span text:style-name="T830">1 </text:span><text:span text:style-name="T822">#include </text:span><text:span text:style-name="T823">&lt;stdio.h&gt;</text:span></text:p>
      <text:p text:style-name="P144"><text:span text:style-name="T830">2 </text:span><text:span text:style-name="T824">#include </text:span><text:span text:style-name="T831">&lt;fcntl.h&gt;</text:span></text:p>
      <text:p text:style-name="P144"><text:span text:style-name="T830">3 </text:span><text:span text:style-name="T824">#include </text:span><text:span text:style-name="T831">&lt;unistd.h&gt;</text:span></text:p>
      <text:p text:style-name="P143"/>
      <text:p text:style-name="P144"><text:span text:style-name="T830">4 </text:span><text:span text:style-name="T824">#define COUNT </text:span><text:span text:style-name="T832">128</text:span></text:p>
      <text:p text:style-name="P143"/>
      <text:p text:style-name="P144"><text:span text:style-name="T830">5 </text:span><text:span text:style-name="T824">int</text:span><text:span text:style-name="T825"> main()</text:span></text:p>
      <text:p text:style-name="P144"><text:span text:style-name="T830">6 </text:span><text:span text:style-name="T825">{</text:span></text:p>
      <text:p text:style-name="P144"><text:span text:style-name="T830">7 <text:tab/></text:span><text:span text:style-name="T824">int</text:span><text:span text:style-name="T825"> fd;</text:span></text:p>
      <text:p text:style-name="P144"><text:span text:style-name="T830">8 <text:tab/></text:span><text:span text:style-name="T824">char</text:span><text:span text:style-name="T825"> buffer[</text:span><text:span text:style-name="T824">COUNT</text:span><text:span text:style-name="T825">];</text:span></text:p>
      <text:p text:style-name="P143"/>
      <text:p text:style-name="P144"><text:span text:style-name="T830">9 <text:tab/></text:span><text:span text:style-name="T825">fd = open(</text:span><text:span text:style-name="T831">"./file.txt"</text:span><text:span text:style-name="T825">, </text:span><text:span text:style-name="T824">O_RDONLY</text:span><text:span text:style-name="T825">);</text:span></text:p>
      <text:p text:style-name="P144"><text:span text:style-name="T830">10 <text:tab/></text:span><text:span text:style-name="T824">if</text:span><text:span text:style-name="T825"> (fd &lt; </text:span><text:span text:style-name="T832">0</text:span><text:span text:style-name="T825">) {</text:span></text:p>
      <text:p text:style-name="P144"><text:span text:style-name="T830">11 <text:tab/><text:tab/></text:span><text:span text:style-name="T825">printf(</text:span><text:span text:style-name="T831">"Open error - exit.."</text:span><text:span text:style-name="T825">);</text:span></text:p>
      <text:p text:style-name="P144"><text:span text:style-name="T830">12 <text:tab/><text:tab/></text:span><text:span text:style-name="T824">return</text:span><text:span text:style-name="T825"> </text:span><text:span text:style-name="T832">1</text:span><text:span text:style-name="T825">;</text:span></text:p>
      <text:p text:style-name="P144"><text:span text:style-name="T830">13 <text:tab/></text:span><text:span text:style-name="T825">}</text:span></text:p>
      <text:p text:style-name="P143"/>
      <text:p text:style-name="P144"><text:span text:style-name="T830">14 <text:tab/></text:span><text:span text:style-name="T824">while</text:span><text:span text:style-name="T825">(read(fd, buffer, </text:span><text:span text:style-name="T824">COUNT</text:span><text:span text:style-name="T825">) &gt; </text:span><text:span text:style-name="T832">0</text:span><text:span text:style-name="T825">)</text:span></text:p>
      <text:p text:style-name="P144"><text:span text:style-name="T830">15 <text:tab/><text:tab/></text:span><text:span text:style-name="T826">write</text:span><text:span text:style-name="T825"> (</text:span><text:span text:style-name="T824">STDOUT_FILENO</text:span><text:span text:style-name="T825">, buffer, </text:span><text:span text:style-name="T824">COUNT</text:span><text:span text:style-name="T825">);</text:span></text:p>
      <text:p text:style-name="P144"><text:span text:style-name="T830">16 <text:tab/></text:span><text:span text:style-name="T825">close(fd);</text:span></text:p>
      <text:p text:style-name="P144"><text:soft-page-break/><text:span text:style-name="T830">17 <text:tab/></text:span><text:span text:style-name="T824">return</text:span><text:span text:style-name="T825"> </text:span><text:span text:style-name="T832">0</text:span><text:span text:style-name="T825">;</text:span></text:p>
      <text:p text:style-name="P144"><text:span text:style-name="T830">18 </text:span><text:span text:style-name="T825">}</text:span></text:p>
      <text:p text:style-name="P157"/>
      <text:p text:style-name="P139"><text:span text:style-name="T815">readfile.c </text:span><text:span text:style-name="T813">Reads a file </text:span><text:bookmark text:name="tw-target-text"/><text:span text:style-name="T851">a certain number of bytes at a time</text:span></text:p>
      <text:p text:style-name="P154"/>
      <text:p text:style-name="P149"><text:span text:style-name="T221">Line 3. Includes the header file for the </text:span><text:span text:style-name="Source_20_Text"><text:span text:style-name="T834">read</text:span></text:span><text:span text:style-name="T221"> function<text:line-break/>Line 4. Defines the constant </text:span><text:span text:style-name="Source_20_Text"><text:span text:style-name="T834">COUNT</text:span></text:span><text:span text:style-name="T221"> with value 128<text:line-break/>Line 7. File descriptor<text:line-break/>Line 8. Character array of 128 bytes used as a buffer<text:line-break/>Line 9. Opens the file<text:line-break/>Line 10. Checks if </text:span><text:span text:style-name="Source_20_Text"><text:span text:style-name="T834">open</text:span></text:span><text:span text:style-name="T221"> returns </text:span><text:span text:style-name="Source_20_Text"><text:span text:style-name="T834">-1</text:span></text:span><text:span text:style-name="T221"><text:line-break/>Lines 11–12. Prints an error message and exits the program<text:line-break/>Line 14. Loop that reads 128 bytes at a time until at least one byte is read<text:line-break/>Line 15. Prints the number of bytes read<text:line-break/>Line 16. Closes the file</text:span></text:p>
      <text:p text:style-name="P169"/>
      <text:p text:style-name="P169">We execute the program</text:p>
      <text:p text:style-name="P133"/>
      <table:table table:name="Table12" table:style-name="Table12">
        <table:table-column table:style-name="Table12.A"/>
        <table:table-row table:style-name="Table12.1">
          <table:table-cell table:style-name="Table12.A1" office:value-type="string">
            <text:p text:style-name="P159"><text:span text:style-name="T835">[</text:span><text:a xlink:type="simple" xlink:href="mailto:linux@io" text:style-name="Internet_20_link" text:visited-style-name="Visited_20_Internet_20_Link"><text:span text:style-name="Internet_20_link"><text:span text:style-name="T835">linux@io</text:span></text:span></text:a><text:span text:style-name="T835">] ./readfile</text:span></text:p>
            <text:p text:style-name="P164">Linux</text:p>
          </table:table-cell>
        </table:table-row>
      </table:table>
      <text:p text:style-name="P169"/>
      <text:p text:style-name="P134"><text:span text:style-name="T851">Unlike the </text:span><text:span text:style-name="Source_20_Text"><text:span text:style-name="T852">readfromfile.c</text:span></text:span><text:span text:style-name="T851"> program, the </text:span><text:span text:style-name="Source_20_Text"><text:span text:style-name="T852">readfile.c</text:span></text:span><text:span text:style-name="T851"> program reads from the file until data is available. Each call to </text:span><text:span text:style-name="Source_20_Text"><text:span text:style-name="T852">read</text:span></text:span><text:span text:style-name="T851"> retrieves up to 128 bytes from the file. Let’s run both programs using a file larger than 128 bytes.</text:span></text:p>
      <text:p text:style-name="P133"/>
      <table:table table:name="Table13" table:style-name="Table13">
        <table:table-column table:style-name="Table13.A"/>
        <table:table-row table:style-name="Table13.1">
          <table:table-cell table:style-name="Table13.A1" office:value-type="string">
            <text:p text:style-name="P159"><text:span text:style-name="T835">[</text:span><text:a xlink:type="simple" xlink:href="mailto:linux@io" text:style-name="Internet_20_link" text:visited-style-name="Visited_20_Internet_20_Link"><text:span text:style-name="Internet_20_link"><text:span text:style-name="T835">linux@io</text:span></text:span></text:a><text:span text:style-name="T835">] cp /etc/passwd file.txt</text:span></text:p>
            <text:p text:style-name="P159"><text:span text:style-name="T835">[</text:span><text:a xlink:type="simple" xlink:href="mailto:linux@io" text:style-name="Internet_20_link" text:visited-style-name="Visited_20_Internet_20_Link"><text:span text:style-name="Internet_20_link"><text:span text:style-name="T835">linux@io</text:span></text:span></text:a><text:span text:style-name="T835">] ./readfromfile</text:span></text:p>
            <text:p text:style-name="P164">Bytes read: 128</text:p>
            <text:p text:style-name="P164">Content: io:1000:1000::/home/io:/usr/bin/zsh</text:p>
            <text:p text:style-name="P164">root:x:0:0:root:/root:/usr/bin/zsh</text:p>
            <text:p text:style-name="P164">daemon:x:1:1:daemon:/usr/sbin:/usr/sbin/nologin <text:s text:c="25"/></text:p>
            <text:p text:style-name="P164"/>
            <text:p text:style-name="P159"><text:span text:style-name="T835">[</text:span><text:a xlink:type="simple" xlink:href="mailto:linux@io" text:style-name="Internet_20_link" text:visited-style-name="Visited_20_Internet_20_Link"><text:span text:style-name="Internet_20_link"><text:span text:style-name="T835">linux@io</text:span></text:span></text:a><text:span text:style-name="T835">] ./readfile</text:span></text:p>
            <text:p text:style-name="P164">io:1000:1000::/home/io:/usr/bin/zsh</text:p>
            <text:p text:style-name="P164">root:x:0:0:root:/root:/usr/bin/zsh</text:p>
            <text:p text:style-name="P164">daemon:x:1:1:daemon:/usr/sbin:/usr/sbin/nologin</text:p>
            <text:p text:style-name="P164">bin:x:2:2:bin:/bin:/usr/sbin/nologin</text:p>
            <text:p text:style-name="P170">...output...</text:p>
          </table:table-cell>
        </table:table-row>
      </table:table>
      <text:p text:style-name="P171"/>
      <text:p text:style-name="P134"><text:span text:style-name="T853">The </text:span><text:span text:style-name="Source_20_Text"><text:span text:style-name="T854">readfromfile.c</text:span></text:span><text:span text:style-name="T853"> program reads 128 bytes from the file, while the </text:span><text:span text:style-name="Source_20_Text"><text:span text:style-name="T854">readfile.c</text:span></text:span><text:span text:style-name="T853"> program continues reading the entire file in chunks of 128 bytes (the size of the buffer). The size of </text:span><text:span text:style-name="Source_20_Text"><text:span text:style-name="T853">buf</text:span></text:span><text:span text:style-name="T853"> can be greater than </text:span><text:span text:style-name="Source_20_Text"><text:span text:style-name="T854">count</text:span></text:span><text:span text:style-name="T853">, but </text:span><text:span text:style-name="Source_20_Text"><text:span text:style-name="T854">write</text:span></text:span><text:span text:style-name="T853"> will still write only </text:span><text:span text:style-name="Source_20_Text"><text:span text:style-name="T853">count</text:span></text:span><text:span text:style-name="T853"> bytes. The data type </text:span><text:span text:style-name="Source_20_Text"><text:span text:style-name="T854">ssize_t</text:span></text:span><text:span text:style-name="Source_20_Text"><text:span text:style-name="T854"><text:note text:id="ftn6" text:note-class="footnote"><text:note-citation>6</text:note-citation><text:note-body><text:p text:style-name="Footnote"><text:span text:style-name="T855">See the </text:span><text:span text:style-name="T821">system_data_types(7)</text:span><text:span text:style-name="T6"> manual page</text:span></text:p></text:note-body></text:note></text:span></text:span><text:span text:style-name="T853"> is used for counting bytes and is defined in the </text:span><text:span text:style-name="Source_20_Text"><text:span text:style-name="T854">sys/types.h</text:span></text:span><text:span text:style-name="T853"> and </text:span><text:span text:style-name="Source_20_Text"><text:span text:style-name="T854">unistd.h</text:span></text:span><text:span text:style-name="T853"> header files.</text:span></text:p>
      <text:p text:style-name="P172"/>
      <text:p text:style-name="P172"/>
      <text:p text:style-name="P139"><text:soft-page-break/><text:span text:style-name="T375">I.1.4 The standard library functions: </text:span><text:span text:style-name="T817">fopen</text:span><text:span text:style-name="T375">, </text:span><text:span text:style-name="T817">fclose</text:span><text:span text:style-name="T375"> and </text:span><text:span text:style-name="T817">fcloseall</text:span></text:p>
      <text:p text:style-name="P140"/>
      <text:p text:style-name="P134"><text:span text:style-name="T816">The </text:span><text:span text:style-name="Source_20_Text"><text:span text:style-name="T856">open</text:span></text:span><text:span text:style-name="T816">, </text:span><text:span text:style-name="Source_20_Text"><text:span text:style-name="T856">read</text:span></text:span><text:span text:style-name="T816">, </text:span><text:span text:style-name="Source_20_Text"><text:span text:style-name="T856">close</text:span></text:span><text:span text:style-name="T816">, and </text:span><text:span text:style-name="Source_20_Text"><text:span text:style-name="T856">write</text:span></text:span><text:span text:style-name="T816"> functions are </text:span><text:span text:style-name="T814">system calls</text:span><text:span text:style-name="T816">. The </text:span><text:span text:style-name="T814">standard library</text:span><text:span text:style-name="T816"> provides a set of file I/O functions that allow files to be handled as </text:span><text:span text:style-name="T814">streams</text:span><text:span text:style-name="T816">. These functions are not Linux system calls; they belong to the </text:span><text:span text:style-name="T814">C standard library</text:span><text:span text:style-name="T816"> and are defined in the </text:span><text:span text:style-name="Source_20_Text"><text:span text:style-name="T856">stdio.h</text:span></text:span><text:span text:style-name="T816"> header file.</text:span></text:p>
      <text:p text:style-name="P140"/>
      <text:p text:style-name="P134"><text:span text:style-name="T816">The </text:span><text:span text:style-name="Source_20_Text"><text:span text:style-name="T856">fopen</text:span></text:span><text:span text:style-name="Source_20_Text"><text:span text:style-name="T857"><text:note text:id="ftn7" text:note-class="footnote"><text:note-citation>7</text:note-citation><text:note-body><text:p text:style-name="Footnote">See the <text:span text:style-name="T843">fopen(3)</text:span> manual page </text:p></text:note-body></text:note></text:span></text:span><text:span text:style-name="T816"> function is used to open a file and associate it with a </text:span><text:span text:style-name="T814">stream</text:span><text:span text:style-name="T816">. It takes as arguments the file name and the opening mode, and returns a pointer to the corresponding </text:span><text:span text:style-name="T814">file stream</text:span><text:span text:style-name="T816">. The </text:span><text:span text:style-name="Source_20_Text"><text:span text:style-name="T856">fclose</text:span></text:span><text:span text:style-name="Source_20_Text"><text:span text:style-name="T857"><text:note text:id="ftn8" text:note-class="footnote"><text:note-citation>8</text:note-citation><text:note-body><text:p text:style-name="Footnote">See the <text:span text:style-name="T821">fclose(3) </text:span>manual page </text:p></text:note-body></text:note></text:span></text:span><text:span text:style-name="T816"> function closes the file associated with the stream passed as its argument.</text:span></text:p>
      <text:p text:style-name="P140"/>
      <table:table table:name="Table14" table:style-name="Table14">
        <table:table-column table:style-name="Table14.A"/>
        <table:table-row table:style-name="Table14.1">
          <table:table-cell table:style-name="Table14.A1" office:value-type="string">
            <text:p text:style-name="P134"><text:span text:style-name="T824">#include </text:span><text:span text:style-name="T831">&lt;stdio.h&gt;</text:span></text:p>
            <text:p text:style-name="P143"/>
            <text:p text:style-name="P144"><text:span text:style-name="T824">FILE</text:span><text:span text:style-name="T825"> *</text:span><text:span text:style-name="T826">fopen</text:span><text:span text:style-name="T825">(</text:span><text:span text:style-name="T824">const</text:span><text:span text:style-name="T825"> </text:span><text:span text:style-name="T824">char</text:span><text:span text:style-name="T825"> *</text:span><text:span text:style-name="T827">pathname</text:span><text:span text:style-name="T825">, </text:span><text:span text:style-name="T824">const</text:span><text:span text:style-name="T825"> </text:span><text:span text:style-name="T824">char</text:span><text:span text:style-name="T825"> *</text:span><text:span text:style-name="T827">mode</text:span><text:span text:style-name="T825">);</text:span></text:p>
            <text:p text:style-name="P143"/>
            <text:p text:style-name="P144"><text:span text:style-name="T858"><text:s text:c="35"/></text:span><text:span text:style-name="T859">Return: a pointer to the file, NULL on error</text:span></text:p>
            <text:p text:style-name="P143"/>
            <text:p text:style-name="P144"><text:span text:style-name="T824">int</text:span><text:span text:style-name="T825"> </text:span><text:span text:style-name="T826">fclose</text:span><text:span text:style-name="T825">(</text:span><text:span text:style-name="T824">FILE</text:span><text:span text:style-name="T825"> *</text:span><text:span text:style-name="T827">stream</text:span><text:span text:style-name="T825">);</text:span></text:p>
            <text:p text:style-name="P173"/>
            <text:p text:style-name="P146"><text:span text:style-name="T860"><text:s text:c="40"/></text:span><text:span text:style-name="T861">Returns: 0 on success, EOF on error</text:span></text:p>
          </table:table-cell>
        </table:table-row>
      </table:table>
      <text:p text:style-name="P133"/>
      <text:p text:style-name="P134"><text:span text:style-name="T813">When working with multiple open files, it may be useful to close all streams at once. The </text:span><text:span text:style-name="Source_20_Text"><text:span text:style-name="T837">fcloseall</text:span></text:span><text:span text:style-name="Source_20_Text"><text:span text:style-name="T837"><text:note text:id="ftn9" text:note-class="footnote"><text:note-citation>9</text:note-citation><text:note-body><text:p text:style-name="Footnote">See the <text:span text:style-name="T821">fcloseall(3)</text:span> manual page</text:p></text:note-body></text:note></text:span></text:span><text:span text:style-name="T813"> function closes all streams opened by the process.</text:span></text:p>
      <text:p text:style-name="P133"/>
      <table:table table:name="Table15" table:style-name="Table15">
        <table:table-column table:style-name="Table15.A"/>
        <table:table-row table:style-name="Table15.1">
          <table:table-cell table:style-name="Table15.A1" office:value-type="string">
            <text:p text:style-name="P134"><text:span text:style-name="T847">#include </text:span><text:span text:style-name="T848">&lt;stdio.h&gt;</text:span></text:p>
            <text:p text:style-name="P143"/>
            <text:p text:style-name="P144"><text:span text:style-name="T824">int</text:span><text:span text:style-name="T825"> </text:span><text:span text:style-name="T826">fcloseall</text:span><text:span text:style-name="T825">(</text:span><text:span text:style-name="T824">void</text:span><text:span text:style-name="T825">);</text:span></text:p>
            <text:p text:style-name="P174"/>
            <text:p text:style-name="P146"><text:span text:style-name="T862"><text:s text:c="40"/></text:span><text:span text:style-name="T863">Returns: 0 on success, EOF on error</text:span></text:p>
          </table:table-cell>
        </table:table-row>
      </table:table>
      <text:p text:style-name="P175"/>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39"><text:soft-page-break/><text:span text:style-name="T375">I.1.5 Reading one character at a time: </text:span><text:span text:style-name="T817">fgetc</text:span><text:span text:style-name="T375"> and </text:span><text:span text:style-name="T817">fputc</text:span></text:p>
      <text:p text:style-name="P133"/>
      <text:p text:style-name="P134"><text:span text:style-name="T813">The </text:span><text:span text:style-name="Source_20_Text"><text:span text:style-name="T864">fgetc</text:span></text:span><text:span text:style-name="Source_20_Text"><text:span text:style-name="T864"><text:note text:id="ftn10" text:note-class="footnote"><text:note-citation>10</text:note-citation><text:note-body><text:p text:style-name="Footnote">See the <text:span text:style-name="T821">fgetc(3)</text:span><text:span text:style-name="T820"> manual page</text:span></text:p></text:note-body></text:note></text:span></text:span><text:span text:style-name="T813"> and </text:span><text:span text:style-name="Source_20_Text"><text:span text:style-name="T864">fputc</text:span></text:span><text:span text:style-name="Source_20_Text"><text:span text:style-name="T864"><text:note text:id="ftn11" text:note-class="footnote"><text:note-citation>11</text:note-citation><text:note-body><text:p text:style-name="Footnote">See the <text:span text:style-name="T843">puts(3)</text:span><text:span text:style-name="T820"> manual page</text:span></text:p></text:note-body></text:note></text:span></text:span><text:span text:style-name="T813"> functions are used to read and write a single character, respectively. The first reads a character from the specified input stream and returns it. The second writes a character to the specified output stream and returns the written character.</text:span></text:p>
      <text:p text:style-name="P133"/>
      <table:table table:name="Table16" table:style-name="Table16">
        <table:table-column table:style-name="Table16.A"/>
        <table:table-row table:style-name="Table16.1">
          <table:table-cell table:style-name="Table16.A1" office:value-type="string">
            <text:p text:style-name="P134"><text:span text:style-name="T824">#include </text:span><text:span text:style-name="T831">&lt;stdio.h&gt;</text:span></text:p>
            <text:p text:style-name="P176"/>
            <text:p text:style-name="P144"><text:span text:style-name="T824">int</text:span><text:span text:style-name="T825"> </text:span><text:span text:style-name="T826">fgetc</text:span><text:span text:style-name="T825">(</text:span><text:span text:style-name="T824">FILE</text:span><text:span text:style-name="T825"> </text:span><text:span text:style-name="T827">*stream</text:span><text:span text:style-name="T825">);</text:span></text:p>
            <text:p text:style-name="P177"><text:span text:style-name="T859"><text:s text:c="30"/>Returns: the read character, EOF on error</text:span></text:p>
            <text:p text:style-name="P143"/>
            <text:p text:style-name="P144"><text:span text:style-name="T824">int</text:span><text:span text:style-name="T825"> </text:span><text:span text:style-name="T826">fputc</text:span><text:span text:style-name="T825">(</text:span><text:span text:style-name="T824">int</text:span><text:span text:style-name="T825"> c, </text:span><text:span text:style-name="T824">FILE</text:span><text:span text:style-name="T825"> </text:span><text:span text:style-name="T827">*stream</text:span><text:span text:style-name="T825">);</text:span></text:p>
            <text:p text:style-name="P146"><text:span text:style-name="T865"><text:s text:c="20"/></text:span><text:span text:style-name="T861">Return: the written character, EOF on error</text:span></text:p>
          </table:table-cell>
        </table:table-row>
      </table:table>
      <text:p text:style-name="P133"/>
      <text:p text:style-name="P134"><text:span text:style-name="T813">The </text:span><text:span text:style-name="T837">readfilef.c</text:span><text:span text:style-name="T813"> program reads the contents of the file and prints them to the screen.</text:span></text:p>
      <text:p text:style-name="P157"/>
      <text:p text:style-name="P134"><text:span text:style-name="T830">1 </text:span><text:span text:style-name="T822">#include </text:span><text:span text:style-name="T823">&lt;stdio.h&gt;</text:span></text:p>
      <text:p text:style-name="P143"/>
      <text:p text:style-name="P144"><text:span text:style-name="T830">2 </text:span><text:span text:style-name="T824">int</text:span><text:span text:style-name="T825"> main()</text:span></text:p>
      <text:p text:style-name="P144"><text:span text:style-name="T830">3 </text:span><text:span text:style-name="T825">{</text:span></text:p>
      <text:p text:style-name="P144"><text:span text:style-name="T830">4 <text:tab/></text:span><text:span text:style-name="T824">FILE</text:span><text:span text:style-name="T825"> *file;</text:span></text:p>
      <text:p text:style-name="P144"><text:span text:style-name="T830">5 <text:tab/></text:span><text:span text:style-name="T824">char</text:span><text:span text:style-name="T825"> c;</text:span></text:p>
      <text:p text:style-name="P143"/>
      <text:p text:style-name="P144"><text:span text:style-name="T830">6 <text:tab/></text:span><text:span text:style-name="T825">file = </text:span><text:span text:style-name="T826">fopen</text:span><text:span text:style-name="T825">(</text:span><text:span text:style-name="T831">"./file.txt"</text:span><text:span text:style-name="T825">, </text:span><text:span text:style-name="T831">"r"</text:span><text:span text:style-name="T825">);</text:span></text:p>
      <text:p text:style-name="P144"><text:span text:style-name="T830">7 <text:tab/></text:span><text:span text:style-name="T824">while</text:span><text:span text:style-name="T825"> (c!=</text:span><text:span text:style-name="T824">EOF</text:span><text:span text:style-name="T825">) {</text:span></text:p>
      <text:p text:style-name="P144"><text:span text:style-name="T830">8 <text:tab/><text:tab/></text:span><text:span text:style-name="T825">c=</text:span><text:span text:style-name="T826">fgetc</text:span><text:span text:style-name="T825">(file);</text:span></text:p>
      <text:p text:style-name="P144"><text:span text:style-name="T830">9 <text:tab/><text:tab/></text:span><text:span text:style-name="T824">if</text:span><text:span text:style-name="T825">(c!=</text:span><text:span text:style-name="T824">EOF</text:span><text:span text:style-name="T825">)</text:span></text:p>
      <text:p text:style-name="P144"><text:span text:style-name="T830">10 <text:tab/><text:tab/><text:tab/></text:span><text:span text:style-name="T826">fputc</text:span><text:span text:style-name="T825">(c, </text:span><text:span text:style-name="T824">stdout</text:span><text:span text:style-name="T825">);</text:span></text:p>
      <text:p text:style-name="P144"><text:span text:style-name="T830">11 <text:tab/></text:span><text:span text:style-name="T825">}</text:span></text:p>
      <text:p text:style-name="P144"><text:span text:style-name="T830">12 <text:tab/></text:span><text:span text:style-name="T826">fclose</text:span><text:span text:style-name="T825">(file);</text:span></text:p>
      <text:p text:style-name="P144"><text:span text:style-name="T830">13 <text:tab/></text:span><text:span text:style-name="T824">return</text:span><text:span text:style-name="T825"> </text:span><text:span text:style-name="T832">0</text:span><text:span text:style-name="T825">;</text:span></text:p>
      <text:p text:style-name="P144"><text:span text:style-name="T830">14 </text:span><text:span text:style-name="T825">}</text:span></text:p>
      <text:p text:style-name="P157"/>
      <text:p text:style-name="P139"><text:span text:style-name="T815">readfilef.c </text:span><text:span text:style-name="T813">Read one character at a time</text:span></text:p>
      <text:p text:style-name="P154"/>
      <text:p text:style-name="P134"><text:span text:style-name="T814">Line 4. Declaration of a </text:span><text:span text:style-name="T842">FILE</text:span><text:span text:style-name="T814"> pointer</text:span></text:p>
      <text:p text:style-name="P134"><text:span text:style-name="T814">Line 5. Declaration of a </text:span><text:span text:style-name="T842">char</text:span><text:span text:style-name="T814"> variable</text:span></text:p>
      <text:p text:style-name="P158">Line 6. Opens the file</text:p>
      <text:p text:style-name="P134"><text:span text:style-name="T814">Line 7. Loop that continues until the character read from the file is equal to </text:span><text:span text:style-name="Source_20_Text"><text:span text:style-name="T842">EOF</text:span></text:span><text:span text:style-name="T814"> (End of File)</text:span></text:p>
      <text:p text:style-name="P158">Line 8. Reads one character from the file </text:p>
      <text:p text:style-name="P134"><text:span text:style-name="T814">Line 9. Checks whether the character is not </text:span><text:span text:style-name="T842">EOF</text:span></text:p>
      <text:p text:style-name="P158">Line 10. Prints the character</text:p>
      <text:p text:style-name="P158">Line 10. Closes the file</text:p>
      <text:p text:style-name="P133"/>
      <text:p text:style-name="P133"><text:soft-page-break/>The program opens the file, loops through its contents reading one character at a time, prints each character to the screen, and continues until it reaches the end of the file, after which it closes the file.</text:p>
      <text:p text:style-name="P133"/>
      <text:p text:style-name="P158">file.txt</text:p>
      <table:table table:name="Table17" table:style-name="Table17">
        <table:table-column table:style-name="Table17.A"/>
        <table:table-row table:style-name="Table17.1">
          <table:table-cell table:style-name="Table17.A1" office:value-type="string">
            <text:p text:style-name="P164">Linux Programming</text:p>
            <text:p text:style-name="P164">1234567890</text:p>
          </table:table-cell>
        </table:table-row>
      </table:table>
      <text:p text:style-name="P133"/>
      <text:p text:style-name="P133">The program is executed</text:p>
      <text:p text:style-name="P133"/>
      <table:table table:name="Table18" table:style-name="Table18">
        <table:table-column table:style-name="Table18.A"/>
        <table:table-row table:style-name="Table18.1">
          <table:table-cell table:style-name="Table18.A1" office:value-type="string">
            <text:p text:style-name="P159"><text:span text:style-name="T835">[</text:span><text:a xlink:type="simple" xlink:href="mailto:linux@io" text:style-name="Internet_20_link" text:visited-style-name="Visited_20_Internet_20_Link"><text:span text:style-name="Internet_20_link"><text:span text:style-name="T835">linux@io</text:span></text:span></text:a><text:span text:style-name="T835">] ./readfilef</text:span></text:p>
            <text:p text:style-name="P164">Linux Programming</text:p>
            <text:p text:style-name="P164">1234567890</text:p>
          </table:table-cell>
        </table:table-row>
      </table:table>
      <text:p text:style-name="P133"/>
      <text:p text:style-name="P134"><text:span text:style-name="T813">The </text:span><text:span text:style-name="Source_20_Text"><text:span text:style-name="T818">FILE</text:span></text:span><text:span text:style-name="T813"> data type is an object used to represent streams, and it is defined in the </text:span><text:span text:style-name="Source_20_Text"><text:span text:style-name="T818">stdio.h</text:span></text:span><text:span text:style-name="T813"> header file.</text:span></text:p>
      <text:p text:style-name="P134"><text:span text:style-name="T813">The standard library also defines constants in </text:span><text:span text:style-name="Source_20_Text"><text:span text:style-name="T818">stdio.h</text:span></text:span><text:span text:style-name="T813"> for standard input, standard output, standard error, and end-of-file handling.</text:span></text:p>
      <text:p text:style-name="P133"/>
      <text:p text:style-name="P133"/>
      <table:table table:name="Table19" table:style-name="Table19">
        <table:table-column table:style-name="Table19.A"/>
        <table:table-column table:style-name="Table19.B"/>
        <table:table-row table:style-name="Table19.1">
          <table:table-cell table:style-name="Table19.A1" office:value-type="string">
            <text:p text:style-name="P178">stdin</text:p>
          </table:table-cell>
          <table:table-cell table:style-name="Table19.B1" office:value-type="string">
            <text:p text:style-name="P178">0</text:p>
          </table:table-cell>
        </table:table-row>
        <table:table-row table:style-name="Table19.1">
          <table:table-cell table:style-name="Table19.A2" office:value-type="string">
            <text:p text:style-name="P178">stdout</text:p>
          </table:table-cell>
          <table:table-cell table:style-name="Table19.B2" office:value-type="string">
            <text:p text:style-name="P178">1</text:p>
          </table:table-cell>
        </table:table-row>
        <table:table-row table:style-name="Table19.1">
          <table:table-cell table:style-name="Table19.A2" office:value-type="string">
            <text:p text:style-name="P178">stderr</text:p>
          </table:table-cell>
          <table:table-cell table:style-name="Table19.B2" office:value-type="string">
            <text:p text:style-name="P178">2</text:p>
          </table:table-cell>
        </table:table-row>
        <table:table-row table:style-name="Table19.1">
          <table:table-cell table:style-name="Table19.A2" office:value-type="string">
            <text:p text:style-name="P178">EOF</text:p>
          </table:table-cell>
          <table:table-cell table:style-name="Table19.B2" office:value-type="string">
            <text:p text:style-name="P178">-1</text:p>
          </table:table-cell>
        </table:table-row>
      </table:table>
      <text:p text:style-name="P154"/>
      <text:p text:style-name="P139"><text:span text:style-name="T815">Tab 5.</text:span><text:span text:style-name="T813"> The standard streams</text:span></text:p>
      <text:p text:style-name="P133"/>
      <text:p text:style-name="P133">We present the same program using a more concise syntax.</text:p>
      <text:p text:style-name="P157"/>
      <text:p text:style-name="P134"><text:span text:style-name="T866">1 </text:span><text:span text:style-name="T824">#include </text:span><text:span text:style-name="T831">&lt;stdio.h&gt;</text:span></text:p>
      <text:p text:style-name="P143"/>
      <text:p text:style-name="P144"><text:span text:style-name="T866">2 </text:span><text:span text:style-name="T824">int</text:span><text:span text:style-name="T825"> main() </text:span></text:p>
      <text:p text:style-name="P144"><text:span text:style-name="T866">3 </text:span><text:span text:style-name="T825">{</text:span></text:p>
      <text:p text:style-name="P144"><text:span text:style-name="T866">4 <text:tab/></text:span><text:span text:style-name="T824">char</text:span><text:span text:style-name="T825"> c;</text:span></text:p>
      <text:p text:style-name="P144"><text:span text:style-name="T866">5<text:tab/></text:span><text:span text:style-name="T824">FILE</text:span><text:span text:style-name="T825"> *fp;</text:span></text:p>
      <text:p text:style-name="P144"><text:span text:style-name="T866">6 <text:tab/></text:span><text:span text:style-name="T825">fp = </text:span><text:span text:style-name="T826">fopen</text:span><text:span text:style-name="T825">(</text:span><text:span text:style-name="T831">"./file.txt"</text:span><text:span text:style-name="T825">, </text:span><text:span text:style-name="T831">"r"</text:span><text:span text:style-name="T825">);</text:span></text:p>
      <text:p text:style-name="P144"><text:span text:style-name="T866">7 <text:tab/></text:span><text:span text:style-name="T824">while</text:span><text:span text:style-name="T825"> ((c=</text:span><text:span text:style-name="T826">fgetc</text:span><text:span text:style-name="T825">(fp)) != </text:span><text:span text:style-name="T824">EOF</text:span><text:span text:style-name="T825">)</text:span></text:p>
      <text:p text:style-name="P144"><text:span text:style-name="T866">8 <text:tab/><text:tab/></text:span><text:span text:style-name="T826">fputc</text:span><text:span text:style-name="T825">(c, </text:span><text:span text:style-name="T824">stdout</text:span><text:span text:style-name="T825">);</text:span></text:p>
      <text:p text:style-name="P143"/>
      <text:p text:style-name="P144"><text:span text:style-name="T866">9 <text:tab/></text:span><text:span text:style-name="T826">fclose</text:span><text:span text:style-name="T825">(fp);</text:span></text:p>
      <text:p text:style-name="P144"><text:span text:style-name="T866">10 <text:tab/></text:span><text:span text:style-name="T824">return</text:span><text:span text:style-name="T825"> </text:span><text:span text:style-name="T832">0</text:span><text:span text:style-name="T825">;</text:span></text:p>
      <text:p text:style-name="P144"><text:span text:style-name="T866">11 </text:span><text:span text:style-name="T825">}</text:span></text:p>
      <text:p text:style-name="P179"/>
      <text:p text:style-name="P180">readfilefs.c</text:p>
      <text:p text:style-name="P140">The program is executed</text:p>
      <text:p text:style-name="P158"><text:soft-page-break/></text:p>
      <table:table table:name="Table20" table:style-name="Table20">
        <table:table-column table:style-name="Table20.A"/>
        <table:table-row table:style-name="Table20.1">
          <table:table-cell table:style-name="Table20.A1" office:value-type="string">
            <text:p text:style-name="P159"><text:span text:style-name="T835">[</text:span><text:a xlink:type="simple" xlink:href="mailto:linux@io" text:style-name="Internet_20_link" text:visited-style-name="Visited_20_Internet_20_Link"><text:span text:style-name="Internet_20_link"><text:span text:style-name="T835">linux@io</text:span></text:span></text:a><text:span text:style-name="T835">] ./readfilefs</text:span></text:p>
            <text:p text:style-name="P164">Linux Programming</text:p>
            <text:p text:style-name="P164">1234567890</text:p>
          </table:table-cell>
        </table:table-row>
      </table:table>
      <text:p text:style-name="P142"/>
      <text:p text:style-name="P134"><text:span text:style-name="T813">The </text:span><text:span text:style-name="T856">fopen</text:span><text:span text:style-name="T813"> function accepts the following flags</text:span></text:p>
      <text:p text:style-name="P133"/>
      <table:table table:name="Table21" table:style-name="Table21">
        <table:table-column table:style-name="Table21.A"/>
        <table:table-column table:style-name="Table21.B"/>
        <table:table-row table:style-name="Table21.1">
          <table:table-cell table:style-name="Table21.A1" office:value-type="string">
            <text:p text:style-name="P136">r <text:tab/></text:p>
          </table:table-cell>
          <table:table-cell table:style-name="Table21.B1" office:value-type="string">
            <text:p text:style-name="P133">Read</text:p>
          </table:table-cell>
        </table:table-row>
        <table:table-row table:style-name="Table21.1">
          <table:table-cell table:style-name="Table21.A2" office:value-type="string">
            <text:p text:style-name="P136">r+</text:p>
          </table:table-cell>
          <table:table-cell table:style-name="Table21.B2" office:value-type="string">
            <text:p text:style-name="P133">Read and Write</text:p>
          </table:table-cell>
        </table:table-row>
        <table:table-row table:style-name="Table21.1">
          <table:table-cell table:style-name="Table21.A2" office:value-type="string">
            <text:p text:style-name="P152">w</text:p>
          </table:table-cell>
          <table:table-cell table:style-name="Table21.B2" office:value-type="string">
            <text:p text:style-name="P133">Write. If the file exists its contents are truncated to zero</text:p>
          </table:table-cell>
        </table:table-row>
        <table:table-row table:style-name="Table21.1">
          <table:table-cell table:style-name="Table21.A2" office:value-type="string">
            <text:p text:style-name="P152">w+</text:p>
          </table:table-cell>
          <table:table-cell table:style-name="Table21.B2" office:value-type="string">
            <text:p text:style-name="P133">Read and Write. If the file does not exist it is created</text:p>
          </table:table-cell>
        </table:table-row>
        <table:table-row table:style-name="Table21.1">
          <table:table-cell table:style-name="Table21.A2" office:value-type="string">
            <text:p text:style-name="P152">a</text:p>
          </table:table-cell>
          <table:table-cell table:style-name="Table21.B2" office:value-type="string">
            <text:p text:style-name="P133">Writes at the end of the file (appends to existing content)</text:p>
          </table:table-cell>
        </table:table-row>
        <table:table-row table:style-name="Table21.1">
          <table:table-cell table:style-name="Table21.A2" office:value-type="string">
            <text:p text:style-name="P152">a+</text:p>
          </table:table-cell>
          <table:table-cell table:style-name="Table21.B2" office:value-type="string">
            <text:p text:style-name="P133">Reading and queuing. If the file does not exist it is created</text:p>
          </table:table-cell>
        </table:table-row>
      </table:table>
      <text:p text:style-name="P133"/>
      <text:p text:style-name="P139"><text:span text:style-name="T815">Tab 6. </text:span><text:span text:style-name="T813">File opening modes of </text:span><text:span text:style-name="T837">fopen</text:span></text:p>
      <text:p text:style-name="P133"/>
      <text:p text:style-name="P134"><text:span text:style-name="T813">In addition to the standard flags </text:span><text:span text:style-name="T837">fopen</text:span><text:span text:style-name="T813"> also accepts the following</text:span></text:p>
      <text:p text:style-name="P133"/>
      <table:table table:name="Table22" table:style-name="Table22">
        <table:table-column table:style-name="Table22.A"/>
        <table:table-column table:style-name="Table22.B"/>
        <table:table-row table:style-name="Table22.1">
          <table:table-cell table:style-name="Table22.A1" office:value-type="string">
            <text:p text:style-name="P181">c</text:p>
          </table:table-cell>
          <table:table-cell table:style-name="Table22.B1" office:value-type="string">
            <text:p text:style-name="P164">The file opens with deletion disabled</text:p>
          </table:table-cell>
        </table:table-row>
        <table:table-row table:style-name="Table22.1">
          <table:table-cell table:style-name="Table22.A2" office:value-type="string">
            <text:p text:style-name="P181">e</text:p>
          </table:table-cell>
          <table:table-cell table:style-name="Table22.B2" office:value-type="string">
            <text:p text:style-name="P159"><text:span text:style-name="T835">The descriptor will be closed if one of the </text:span><text:span text:style-name="T818">exec</text:span><text:span text:style-name="footnote_20_reference1"><text:span text:style-name="T818"><text:note text:id="ftn12" text:note-class="footnote"><text:note-citation>12</text:note-citation><text:note-body><text:p text:style-name="Footnote">See the <text:span text:style-name="T867">exec(3)</text:span> manual page</text:p></text:note-body></text:note></text:span></text:span><text:span text:style-name="T835"> functions is used (corresponds to the</text:span><text:span text:style-name="T818"> FD_CLOEXEC</text:span><text:span text:style-name="T835">)</text:span></text:p>
          </table:table-cell>
        </table:table-row>
        <table:table-row table:style-name="Table22.1">
          <table:table-cell table:style-name="Table22.A2" office:value-type="string">
            <text:p text:style-name="P181">m</text:p>
          </table:table-cell>
          <table:table-cell table:style-name="Table22.B2" office:value-type="string">
            <text:p text:style-name="P159"><text:span text:style-name="T835">The file is opened and accessed via </text:span><text:span text:style-name="T818">mmap</text:span><text:span text:style-name="footnote_20_reference1"><text:span text:style-name="T835"><text:note text:id="ftn13" text:note-class="footnote"><text:note-citation>13</text:note-citation><text:note-body><text:p text:style-name="Footnote"><text:span text:style-name="T868">See the </text:span><text:span text:style-name="T869">mmap(2)</text:span><text:span text:style-name="T868"> manual page </text:span></text:p></text:note-body></text:note></text:span></text:span></text:p>
          </table:table-cell>
        </table:table-row>
        <table:table-row table:style-name="Table22.1">
          <table:table-cell table:style-name="Table22.A2" office:value-type="string">
            <text:p text:style-name="P181">x</text:p>
          </table:table-cell>
          <table:table-cell table:style-name="Table22.B2" office:value-type="string">
            <text:p text:style-name="P164">Open the file exclusively</text:p>
          </table:table-cell>
        </table:table-row>
      </table:table>
      <text:p text:style-name="P182"/>
      <text:p text:style-name="P139"><text:span text:style-name="T870">Tab 7</text:span><text:span text:style-name="T845">. </text:span><text:span text:style-name="T837">fopen</text:span><text:span text:style-name="T835"> flags</text:span></text:p>
      <text:p text:style-name="P133"/>
      <text:p text:style-name="P134"><text:span text:style-name="T813">The correspondence between the </text:span><text:span text:style-name="T818">fopen</text:span><text:span text:style-name="T813"> and </text:span><text:span text:style-name="T818">open</text:span><text:span text:style-name="T813"> flags is shown in the following table.</text:span></text:p>
      <text:p text:style-name="P133"/>
      <table:table table:name="Table23" table:style-name="Table23">
        <table:table-column table:style-name="Table23.A"/>
        <table:table-column table:style-name="Table23.B"/>
        <table:table-row table:style-name="Table23.1">
          <table:table-cell table:style-name="Table23.A1" office:value-type="string">
            <text:p text:style-name="P183">fopen</text:p>
          </table:table-cell>
          <table:table-cell table:style-name="Table23.B1" office:value-type="string">
            <text:p text:style-name="P183">open</text:p>
          </table:table-cell>
        </table:table-row>
        <table:table-row table:style-name="Table23.1">
          <table:table-cell table:style-name="Table23.A2" office:value-type="string">
            <text:p text:style-name="P184">r</text:p>
          </table:table-cell>
          <table:table-cell table:style-name="Table23.B2" office:value-type="string">
            <text:p text:style-name="P181">O_RDONLY</text:p>
          </table:table-cell>
        </table:table-row>
        <table:table-row table:style-name="Table23.1">
          <table:table-cell table:style-name="Table23.A2" office:value-type="string">
            <text:p text:style-name="P184">w</text:p>
          </table:table-cell>
          <table:table-cell table:style-name="Table23.B2" office:value-type="string">
            <text:p text:style-name="P181">O_WRONLY | O_CREAT | O_TRUNC</text:p>
          </table:table-cell>
        </table:table-row>
        <table:table-row table:style-name="Table23.1">
          <table:table-cell table:style-name="Table23.A2" office:value-type="string">
            <text:p text:style-name="P184">a</text:p>
          </table:table-cell>
          <table:table-cell table:style-name="Table23.B2" office:value-type="string">
            <text:p text:style-name="P181">O_WRONLY | O_CREAT | O_APPEND</text:p>
          </table:table-cell>
        </table:table-row>
        <table:table-row table:style-name="Table23.1">
          <table:table-cell table:style-name="Table23.A2" office:value-type="string">
            <text:p text:style-name="P184">r+</text:p>
          </table:table-cell>
          <table:table-cell table:style-name="Table23.B2" office:value-type="string">
            <text:p text:style-name="P181">O_RDWR</text:p>
          </table:table-cell>
        </table:table-row>
        <table:table-row table:style-name="Table23.1">
          <table:table-cell table:style-name="Table23.A2" office:value-type="string">
            <text:p text:style-name="P184">w+</text:p>
          </table:table-cell>
          <table:table-cell table:style-name="Table23.B2" office:value-type="string">
            <text:p text:style-name="P181">O_RDWR | O_CREAT | O_TRUNC</text:p>
          </table:table-cell>
        </table:table-row>
        <table:table-row table:style-name="Table23.1">
          <table:table-cell table:style-name="Table23.A2" office:value-type="string">
            <text:p text:style-name="P184">a+</text:p>
          </table:table-cell>
          <table:table-cell table:style-name="Table23.B2" office:value-type="string">
            <text:p text:style-name="P181">O_RDWR | O_CREAT | O_APPEND</text:p>
          </table:table-cell>
        </table:table-row>
      </table:table>
      <text:p text:style-name="P140"/>
      <text:p text:style-name="P139"><text:span text:style-name="T850">Tab 8</text:span><text:span text:style-name="T816">. File opening methods (</text:span><text:span text:style-name="T837">open</text:span><text:span text:style-name="T816"> and </text:span><text:span text:style-name="T837">fopen</text:span><text:span text:style-name="T816">)</text:span></text:p>
      <text:p text:style-name="P134"><text:soft-page-break/><text:span text:style-name="T816">The </text:span><text:span text:style-name="T837">stdin2stdout.c</text:span><text:span text:style-name="T816"> program copies data from standard input to the standard output, one character at a time.</text:span></text:p>
      <text:p text:style-name="P157"/>
      <text:p text:style-name="P134"><text:span text:style-name="T839">1 </text:span><text:span text:style-name="T840">#include </text:span><text:span text:style-name="T841">&lt;stdio.h&gt;</text:span></text:p>
      <text:p text:style-name="P143"/>
      <text:p text:style-name="P144"><text:span text:style-name="T839">2 </text:span><text:span text:style-name="T824">int</text:span><text:span text:style-name="T825"> main()</text:span></text:p>
      <text:p text:style-name="P144"><text:span text:style-name="T839">3 </text:span><text:span text:style-name="T825">{</text:span></text:p>
      <text:p text:style-name="P144"><text:span text:style-name="T839">4 <text:tab/></text:span><text:span text:style-name="T824">char</text:span><text:span text:style-name="T825"> c;</text:span></text:p>
      <text:p text:style-name="P143"/>
      <text:p text:style-name="P144"><text:span text:style-name="T839">5 <text:tab/></text:span><text:span text:style-name="T824">while</text:span><text:span text:style-name="T825">(c=</text:span><text:span text:style-name="T826">fgetc</text:span><text:span text:style-name="T825">(</text:span><text:span text:style-name="T824">stdin</text:span><text:span text:style-name="T825">))</text:span></text:p>
      <text:p text:style-name="P144"><text:span text:style-name="T839">6 <text:tab/><text:tab/></text:span><text:span text:style-name="T826">fputc</text:span><text:span text:style-name="T825">(c, </text:span><text:span text:style-name="T824">stdout</text:span><text:span text:style-name="T825">);</text:span></text:p>
      <text:p text:style-name="P144"><text:span text:style-name="T839">7 </text:span><text:span text:style-name="T825">}</text:span></text:p>
      <text:p text:style-name="P147"/>
      <text:p text:style-name="P139"><text:span text:style-name="T850">stdin2stdout.c </text:span><text:span text:style-name="T816">Copy </text:span><text:span text:style-name="T819">stdin</text:span><text:span text:style-name="T816"> to </text:span><text:span text:style-name="T819">stdout</text:span></text:p>
      <text:p text:style-name="P140"/>
      <text:p text:style-name="P134"><text:span text:style-name="T816">The program reads one character at a time from standard input (</text:span><text:span text:style-name="Source_20_Text"><text:span text:style-name="T819">stdin</text:span></text:span><text:span text:style-name="T816">) and prints it to standard output (</text:span><text:span text:style-name="Source_20_Text"><text:span text:style-name="T819">stdout</text:span></text:span><text:span text:style-name="T816">), effectively echoing the characters typed by the user onto the screen.</text:span></text:p>
      <text:p text:style-name="P140"/>
      <table:table table:name="Table24" table:style-name="Table24">
        <table:table-column table:style-name="Table24.A"/>
        <table:table-row table:style-name="Table24.1">
          <table:table-cell table:style-name="Table24.A1" office:value-type="string">
            <text:p text:style-name="P159"><text:span text:style-name="T835">[</text:span><text:a xlink:type="simple" xlink:href="mailto:linux@io" text:style-name="Internet_20_link" text:visited-style-name="Visited_20_Internet_20_Link"><text:span text:style-name="Internet_20_link"><text:span text:style-name="T835">linux@io</text:span></text:span></text:a><text:span text:style-name="T835">] ./Stdin2Stdout</text:span></text:p>
            <text:p text:style-name="P164">hello</text:p>
            <text:p text:style-name="P164">hello</text:p>
            <text:p text:style-name="P164">Linux</text:p>
            <text:p text:style-name="P164">Linux</text:p>
          </table:table-cell>
        </table:table-row>
      </table:table>
      <text:p text:style-name="P141"/>
      <text:p text:style-name="P140"/>
      <text:p text:style-name="P140"/>
      <text:p text:style-name="P133"/>
      <text:p text:style-name="P133"/>
      <text:p text:style-name="P133"/>
      <text:p text:style-name="P133"/>
      <text:p text:style-name="P133"/>
      <text:p text:style-name="P133"/>
      <text:p text:style-name="P133"/>
      <text:p text:style-name="P133"/>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39"><text:soft-page-break/><text:span text:style-name="T375">I.1.6 Reading one line at a time: </text:span><text:span text:style-name="T817">fgets</text:span><text:span text:style-name="T375"> and </text:span><text:span text:style-name="T817">fputs</text:span></text:p>
      <text:p text:style-name="P133"/>
      <text:p text:style-name="P134"><text:span text:style-name="T813">The </text:span><text:span text:style-name="Source_20_Text"><text:span text:style-name="T819">fgets</text:span></text:span><text:span text:style-name="Source_20_Text"><text:span text:style-name="T819"><text:note text:id="ftn14" text:note-class="footnote"><text:note-citation>14</text:note-citation><text:note-body><text:p text:style-name="Footnote">See the <text:span text:style-name="T843">fgetc(3)</text:span><text:span text:style-name="T820"> manual page</text:span></text:p></text:note-body></text:note></text:span></text:span><text:span text:style-name="T813"> function reads a line from the file passed as an argument and stores it in a buffer. It takes as parameters the buffer where the line will be stored, the maximum number of bytes to read, and the file stream from which to read, and it returns the resulting string.</text:span></text:p>
      <text:p text:style-name="P134"><text:span text:style-name="T813">The </text:span><text:span text:style-name="Source_20_Text"><text:span text:style-name="T819">fputs</text:span></text:span><text:span text:style-name="Source_20_Text"><text:span text:style-name="T819"><text:note text:id="ftn15" text:note-class="footnote"><text:note-citation>15</text:note-citation><text:note-body><text:p text:style-name="Footnote">See the <text:span text:style-name="T821">puts(3)</text:span><text:span text:style-name="T820"> manual page</text:span></text:p></text:note-body></text:note></text:span></text:span><text:span text:style-name="Source_20_Text"><text:span text:style-name="T819"> </text:span></text:span><text:span text:style-name="T813">function writes a line to the file passed as an argument. It takes as parameters the buffer containing the data to be written and the output file stream.</text:span></text:p>
      <text:p text:style-name="P133"/>
      <table:table table:name="Table25" table:style-name="Table25">
        <table:table-column table:style-name="Table25.A"/>
        <table:table-row table:style-name="Table25.1">
          <table:table-cell table:style-name="Table25.A1" office:value-type="string">
            <text:p text:style-name="P134"><text:span text:style-name="T824">#include </text:span><text:span text:style-name="T831">&lt;stdio.h&gt;</text:span></text:p>
            <text:p text:style-name="P185"/>
            <text:p text:style-name="P144"><text:span text:style-name="T824">char</text:span><text:span text:style-name="T825"> *</text:span><text:span text:style-name="T826">fgets</text:span><text:span text:style-name="T825">(</text:span><text:span text:style-name="T824">char</text:span><text:span text:style-name="T825"> *</text:span><text:span text:style-name="T827">s</text:span><text:span text:style-name="T825">, </text:span><text:span text:style-name="T824">int</text:span><text:span text:style-name="T825"> </text:span><text:span text:style-name="T827">size</text:span><text:span text:style-name="T825">, </text:span><text:span text:style-name="T824">FILE</text:span><text:span text:style-name="T825"> *</text:span><text:span text:style-name="T827">stream</text:span><text:span text:style-name="T825">);</text:span></text:p>
            <text:p text:style-name="P186"/>
            <text:p text:style-name="P177"><text:span text:style-name="T859"><text:s text:c="33"/>Return: the buffer read, NULL on error</text:span><text:span text:style-name="T871"> </text:span></text:p>
            <text:p text:style-name="P186"/>
            <text:p text:style-name="P144"><text:span text:style-name="T824">int</text:span><text:span text:style-name="T825"> </text:span><text:span text:style-name="T826">fputs</text:span><text:span text:style-name="T825">(</text:span><text:span text:style-name="T824">const</text:span><text:span text:style-name="T825"> </text:span><text:span text:style-name="T824">char</text:span><text:span text:style-name="T825"> *</text:span><text:span text:style-name="T827">s</text:span><text:span text:style-name="T825">, </text:span><text:span text:style-name="T824">FILE</text:span><text:span text:style-name="T825"> *</text:span><text:span text:style-name="T827">stream)</text:span><text:span text:style-name="T825">;</text:span></text:p>
            <text:p text:style-name="P187"/>
            <text:p text:style-name="P146"><text:span text:style-name="T860"><text:s text:c="24"/></text:span><text:span text:style-name="T859">Return: a non negative integer, EOF on error</text:span></text:p>
          </table:table-cell>
        </table:table-row>
      </table:table>
      <text:p text:style-name="P133"/>
      <text:p text:style-name="P134"><text:span text:style-name="T813">The r</text:span><text:span text:style-name="T856">eadfileline.c</text:span><text:span text:style-name="T813"> program uses </text:span><text:span text:style-name="T856">fgets</text:span><text:span text:style-name="T813"> to read the file one line at a time.</text:span></text:p>
      <text:p text:style-name="P157"/>
      <text:p text:style-name="P134"><text:span text:style-name="T866">1</text:span><text:span text:style-name="T872"> </text:span><text:span text:style-name="T824">#include </text:span><text:span text:style-name="T831">&lt;stdio.h&gt;</text:span></text:p>
      <text:p text:style-name="P143"/>
      <text:p text:style-name="P144"><text:span text:style-name="T866">2</text:span><text:span text:style-name="T872"> </text:span><text:span text:style-name="T824">int</text:span><text:span text:style-name="T825"> main()</text:span></text:p>
      <text:p text:style-name="P144"><text:span text:style-name="T866">3</text:span><text:span text:style-name="T872"> </text:span><text:span text:style-name="T825">{</text:span></text:p>
      <text:p text:style-name="P144"><text:span text:style-name="T866">4</text:span><text:span text:style-name="T872"> <text:tab/></text:span><text:span text:style-name="T824">FILE</text:span><text:span text:style-name="T825"> *file;</text:span></text:p>
      <text:p text:style-name="P144"><text:span text:style-name="T866">5<text:tab/></text:span><text:span text:style-name="T824">char</text:span><text:span text:style-name="T825"> buffer[</text:span><text:span text:style-name="T832">1024</text:span><text:span text:style-name="T825">];</text:span></text:p>
      <text:p text:style-name="P144"><text:span text:style-name="T866">6</text:span><text:span text:style-name="T872"> <text:tab/></text:span><text:span text:style-name="T824">int</text:span><text:span text:style-name="T825"> count = </text:span><text:span text:style-name="T832">1024</text:span><text:span text:style-name="T825">;</text:span></text:p>
      <text:p text:style-name="P143"/>
      <text:p text:style-name="P144"><text:span text:style-name="T866">7</text:span><text:span text:style-name="T872"> <text:tab/></text:span><text:span text:style-name="T824">if</text:span><text:span text:style-name="T825"> ((file = </text:span><text:span text:style-name="T873">fopen</text:span><text:span text:style-name="T825">(</text:span><text:span text:style-name="T831">"./file.txt"</text:span><text:span text:style-name="T825">, </text:span><text:span text:style-name="T831">"r"</text:span><text:span text:style-name="T825">)) == </text:span><text:span text:style-name="T824">NULL</text:span><text:span text:style-name="T825">) {</text:span></text:p>
      <text:p text:style-name="P144"><text:span text:style-name="T866">8</text:span><text:span text:style-name="T872"> <text:tab/><text:tab/></text:span><text:span text:style-name="T825">printf (</text:span><text:span text:style-name="T831">"Error opening file"</text:span><text:span text:style-name="T825">);</text:span></text:p>
      <text:p text:style-name="P144"><text:span text:style-name="T866">9</text:span><text:span text:style-name="T872"> <text:tab/><text:tab/></text:span><text:span text:style-name="T824">return</text:span><text:span text:style-name="T825"> </text:span><text:span text:style-name="T832">1</text:span><text:span text:style-name="T825">;</text:span></text:p>
      <text:p text:style-name="P144"><text:span text:style-name="T866">10</text:span><text:span text:style-name="T872"> <text:tab/></text:span><text:span text:style-name="T825">}</text:span></text:p>
      <text:p text:style-name="P143"/>
      <text:p text:style-name="P144"><text:span text:style-name="T866">11</text:span><text:span text:style-name="T872"> <text:tab/></text:span><text:span text:style-name="T824">while</text:span><text:span text:style-name="T825"> (</text:span><text:span text:style-name="T826">fgets</text:span><text:span text:style-name="T825"> (buffer, count, file))</text:span></text:p>
      <text:p text:style-name="P144"><text:span text:style-name="T866">12</text:span><text:span text:style-name="T872"> <text:tab/><text:tab/></text:span><text:span text:style-name="T826">fputs</text:span><text:span text:style-name="T825"> (buffer, </text:span><text:span text:style-name="T824">stdout</text:span><text:span text:style-name="T825">);</text:span></text:p>
      <text:p text:style-name="P143"/>
      <text:p text:style-name="P144"><text:span text:style-name="T866">13</text:span><text:span text:style-name="T872"> <text:tab/></text:span><text:span text:style-name="T825">fclose (file);</text:span></text:p>
      <text:p text:style-name="P144"><text:span text:style-name="T866">14</text:span><text:span text:style-name="T872"> <text:tab/></text:span><text:span text:style-name="T824">return</text:span><text:span text:style-name="T825"> </text:span><text:span text:style-name="T832">0</text:span><text:span text:style-name="T825">;</text:span></text:p>
      <text:p text:style-name="P144"><text:span text:style-name="T866">15</text:span><text:span text:style-name="T872"> </text:span><text:span text:style-name="T825">}</text:span></text:p>
      <text:p text:style-name="P157"/>
      <text:p text:style-name="P139"><text:span text:style-name="T815">readfileline.c </text:span><text:span text:style-name="T813">Read the file one line at a time</text:span></text:p>
      <text:p text:style-name="P135"/>
      <text:p text:style-name="P149"><text:span text:style-name="T814">Line 4. Declares a file pointer<text:line-break/>Line 5. Declares a 1024-byte character array<text:line-break/></text:span><text:soft-page-break/><text:span text:style-name="T814">Line 7. Opens the file in read mode<text:line-break/>Lines 8–9. If the file cannot be opened (</text:span><text:span text:style-name="Source_20_Text"><text:span text:style-name="T842">fopen</text:span></text:span><text:span text:style-name="T814"> returns </text:span><text:span text:style-name="Source_20_Text"><text:span text:style-name="T842">NULL</text:span></text:span><text:span text:style-name="T814">), it prints an error message and exits the program<text:line-break/>Line 11. Loops through the file; </text:span><text:span text:style-name="Source_20_Text"><text:span text:style-name="T842">fgets</text:span></text:span><text:span text:style-name="T814"> reads up to the specified number of bytes and stores them in the buffer<text:line-break/>Line 12. Prints the buffer to standard output<text:line-break/>Line 13. Closes the file</text:span></text:p>
      <text:p text:style-name="P188"/>
      <text:p text:style-name="P134"><text:span text:style-name="T813">This version of the program uses </text:span><text:span text:style-name="T856">fopen</text:span><text:span text:style-name="T813"> to open the file, </text:span><text:span text:style-name="T856">fgets</text:span><text:span text:style-name="T813"> to read from the stream, and </text:span><text:span text:style-name="T856">fputs</text:span><text:span text:style-name="T813"> to output the read data to the screen.</text:span></text:p>
      <text:p text:style-name="P133"/>
      <table:table table:name="Table26" table:style-name="Table26">
        <table:table-column table:style-name="Table26.A"/>
        <table:table-row table:style-name="Table26.1">
          <table:table-cell table:style-name="Table26.A1" office:value-type="string">
            <text:p text:style-name="P159"><text:span text:style-name="T835">[</text:span><text:a xlink:type="simple" xlink:href="mailto:linux@io" text:style-name="Internet_20_link" text:visited-style-name="Visited_20_Internet_20_Link"><text:span text:style-name="Internet_20_link"><text:span text:style-name="T835">linux@io</text:span></text:span></text:a><text:span text:style-name="T835">] ./readfileline</text:span></text:p>
            <text:p text:style-name="P164">Hello world</text:p>
            <text:p text:style-name="P164"/>
            <text:p text:style-name="P164">1234567890</text:p>
          </table:table-cell>
        </table:table-row>
      </table:table>
      <text:p text:style-name="P133"/>
      <text:p text:style-name="P134"><text:span text:style-name="T813">The program reads the file one line at a time and prints it to the screen. The </text:span><text:span text:style-name="Source_20_Text"><text:span text:style-name="T818">fgets</text:span></text:span><text:span text:style-name="T813"> function attempts to read up to </text:span><text:span text:style-name="Source_20_Text"><text:span text:style-name="T818">count - 1</text:span></text:span><text:span text:style-name="T813"> bytes from the stream; if it encounters an end-of-file (</text:span><text:span text:style-name="Source_20_Text"><text:span text:style-name="T818">EOF</text:span></text:span><text:span text:style-name="T813">) or a newline character, it stops reading.</text:span></text:p>
      <text:p text:style-name="P189"/>
      <text:p text:style-name="P134"><text:span text:style-name="T816">The s</text:span><text:span text:style-name="T818">tdin2stdoutline.c</text:span><text:span text:style-name="T816"> program copies standard input to standard output, line by line.</text:span></text:p>
      <text:p text:style-name="P157"/>
      <text:p text:style-name="P134"><text:span text:style-name="T839">1 </text:span><text:span text:style-name="T840">#include </text:span><text:span text:style-name="T841">&lt;stdio.h&gt;</text:span></text:p>
      <text:p text:style-name="P143"/>
      <text:p text:style-name="P144"><text:span text:style-name="T839">2 </text:span><text:span text:style-name="T824">int</text:span><text:span text:style-name="T825"> main()</text:span></text:p>
      <text:p text:style-name="P144"><text:span text:style-name="T839">3 </text:span><text:span text:style-name="T825">{</text:span></text:p>
      <text:p text:style-name="P144"><text:span text:style-name="T839">4 </text:span><text:span text:style-name="T824"><text:tab/>char</text:span><text:span text:style-name="T825"> buf[</text:span><text:span text:style-name="T832">256</text:span><text:span text:style-name="T825">];</text:span></text:p>
      <text:p text:style-name="P144"><text:span text:style-name="T839">5 </text:span><text:span text:style-name="T824"><text:tab/>while</text:span><text:span text:style-name="T825">(</text:span><text:span text:style-name="T826">fgets</text:span><text:span text:style-name="T825">(buf, </text:span><text:span text:style-name="T832">256</text:span><text:span text:style-name="T825">, </text:span><text:span text:style-name="T824">stdin</text:span><text:span text:style-name="T825">) != </text:span><text:span text:style-name="T824">NULL</text:span><text:span text:style-name="T825">)</text:span></text:p>
      <text:p text:style-name="P144"><text:span text:style-name="T839">6 </text:span><text:span text:style-name="T825"><text:tab/><text:tab/></text:span><text:span text:style-name="T826">fputs</text:span><text:span text:style-name="T825">(buf, </text:span><text:span text:style-name="T824">stdout</text:span><text:span text:style-name="T825">);</text:span></text:p>
      <text:p text:style-name="P144"><text:span text:style-name="T839">7 </text:span><text:span text:style-name="T825">}</text:span></text:p>
      <text:p text:style-name="P157"/>
      <text:p text:style-name="P139"><text:span text:style-name="T850">stdin2stdoutline.c </text:span><text:span text:style-name="T816">Copy </text:span><text:span text:style-name="T819">stdin</text:span><text:span text:style-name="T816"> to </text:span><text:span text:style-name="T819">stdout</text:span><text:span text:style-name="T816"> one line at a time</text:span></text:p>
      <text:p text:style-name="P135"/>
      <text:p text:style-name="P162"><text:span text:style-name="T814">Line 5. </text:span><text:span text:style-name="Source_20_Text"><text:span text:style-name="T842">fgets</text:span></text:span><text:span text:style-name="T814"> attempts to read up to 256 bytes from standard input until it encounters an </text:span><text:span text:style-name="Source_20_Text"><text:span text:style-name="T842">EOF</text:span></text:span><text:span text:style-name="T814"> or a newline character, and stores the data in the buffer </text:span><text:span text:style-name="Source_20_Text"><text:span text:style-name="T842">buf</text:span></text:span><text:span text:style-name="T814">.<text:line-break/>Line 6. </text:span><text:span text:style-name="Source_20_Text"><text:span text:style-name="T842">fputs</text:span></text:span><text:span text:style-name="T814"> writes the contents of </text:span><text:span text:style-name="Source_20_Text"><text:span text:style-name="T842">buf</text:span></text:span><text:span text:style-name="T814"> to standard output.</text:span></text:p>
      <text:p text:style-name="P188"/>
      <text:p text:style-name="P190">The program is executed</text:p>
      <text:p text:style-name="P142"/>
      <table:table table:name="Table27" table:style-name="Table27">
        <table:table-column table:style-name="Table27.A"/>
        <table:table-row table:style-name="Table27.1">
          <table:table-cell table:style-name="Table27.A1" office:value-type="string">
            <text:p text:style-name="P159"><text:span text:style-name="T835">[</text:span><text:a xlink:type="simple" xlink:href="mailto:linux@io" text:style-name="Internet_20_link" text:visited-style-name="Visited_20_Internet_20_Link"><text:span text:style-name="Internet_20_link"><text:span text:style-name="T835">linux@io</text:span></text:span></text:a><text:span text:style-name="T835">] ./stdin2stdoutline</text:span></text:p>
            <text:p text:style-name="P164">hello Linux</text:p>
            <text:p text:style-name="P164">hello Linux</text:p>
          </table:table-cell>
        </table:table-row>
      </table:table>
      <text:p text:style-name="P133"/>
      <text:p text:style-name="P133">The program copies each input line to standard output.</text:p>
      <text:p text:style-name="P191"/>
      <text:p text:style-name="P191">Chapter I continues…..</text:p>
      <text:p text:style-name="P192"><text:soft-page-break/><text:span text:style-name="T833">Chapter II</text:span></text:p>
      <text:p text:style-name="P130"/>
      <text:p text:style-name="P131">Files and directories</text:p>
      <text:p text:style-name="P193"/>
      <text:p text:style-name="P193"/>
      <text:p text:style-name="P132"><text:bookmark-start text:name="2.1"/>II.1 Files<text:bookmark-end text:name="2.1"/></text:p>
      <text:p text:style-name="P194"/>
      <text:p text:style-name="P133">As mentioned in the previous chapter, on a Linux operating system everything is a file. A file is a structure that contains data and information about that data. In the C Library there are functions that allow you to read the information of the files and others that allow you to modify the properties of the files. In Linux there are different types of files, e.g. to manage a device (terminal, keyboard, screen, etc..) and to represent it in the file system it is used a different type of file than the one used to represent a simple text (or data) file. Each file in a Linux file system belongs to a particulat user and group, has a creation date and a last modification date and has a set of permissions that define who and how can access the file and what operation can be performed on it (read, write, execute). A directory is a point of access in the file system and within it there can be files or directories. However a directory also is a file like everything else in a Linux fs.</text:p>
      <text:p text:style-name="P133"/>
      <text:p text:style-name="P133"/>
      <text:p text:style-name="P139"><text:span text:style-name="T375">II.1.1 Stat of files: </text:span><text:span text:style-name="T817">stat</text:span><text:span text:style-name="T375">, </text:span><text:span text:style-name="T817">fstat</text:span><text:span text:style-name="T375"> and </text:span><text:span text:style-name="T817">lstat</text:span></text:p>
      <text:p text:style-name="P133"/>
      <text:p text:style-name="P133">To retrieve the information about a file the following functions are used.</text:p>
      <text:p text:style-name="P133"/>
      <table:table table:name="Table28" table:style-name="Table28">
        <table:table-column table:style-name="Table28.A"/>
        <table:table-row table:style-name="Table28.1">
          <table:table-cell table:style-name="Table28.A1" office:value-type="string">
            <text:p text:style-name="P134"><text:span text:style-name="T874">#include </text:span><text:span text:style-name="T875">&lt;sys/stat.h&gt;</text:span></text:p>
            <text:p text:style-name="P143"/>
            <text:p text:style-name="P144"><text:span text:style-name="T824">int</text:span><text:span text:style-name="T825"> </text:span><text:span text:style-name="T826">stat</text:span><text:span text:style-name="T825">(</text:span><text:span text:style-name="T824">const</text:span><text:span text:style-name="T825"> </text:span><text:span text:style-name="T824">char</text:span><text:span text:style-name="T825"> *</text:span><text:span text:style-name="T824">restrict</text:span><text:span text:style-name="T825"> </text:span><text:span text:style-name="T827">pathname</text:span><text:span text:style-name="T825">, </text:span><text:span text:style-name="T824">struct</text:span><text:span text:style-name="T825"> </text:span><text:span text:style-name="T824">stat</text:span><text:span text:style-name="T825"> *</text:span><text:span text:style-name="T824">restrict</text:span><text:span text:style-name="T825"> </text:span><text:span text:style-name="T827">statbuf</text:span><text:span text:style-name="T825">);</text:span></text:p>
            <text:p text:style-name="P195"/>
            <text:p text:style-name="P144"><text:span text:style-name="T824">int</text:span><text:span text:style-name="T825"> </text:span><text:span text:style-name="T826">fstat</text:span><text:span text:style-name="T825">(</text:span><text:span text:style-name="T824">int</text:span><text:span text:style-name="T825"> </text:span><text:span text:style-name="T827">fd</text:span><text:span text:style-name="T825">, </text:span><text:span text:style-name="T824">struct</text:span><text:span text:style-name="T825"> stat *</text:span><text:span text:style-name="T827">statbuf</text:span><text:span text:style-name="T825">);</text:span></text:p>
            <text:p text:style-name="P195"/>
            <text:p text:style-name="P144"><text:span text:style-name="T824">int</text:span><text:span text:style-name="T825"> </text:span><text:span text:style-name="T826">lstat</text:span><text:span text:style-name="T825">(</text:span><text:span text:style-name="T824">const</text:span><text:span text:style-name="T825"> </text:span><text:span text:style-name="T824">char</text:span><text:span text:style-name="T825"> *</text:span><text:span text:style-name="T824">restrict</text:span><text:span text:style-name="T825"> </text:span><text:span text:style-name="T827">pathname</text:span><text:span text:style-name="T825">, </text:span><text:span text:style-name="T824">struct</text:span><text:span text:style-name="T825"> </text:span><text:span text:style-name="T824">stat</text:span><text:span text:style-name="T825"> *</text:span><text:span text:style-name="T824">restrict <text:s/></text:span></text:p>
            <text:p text:style-name="P144"><text:span text:style-name="T824"><text:s text:c="10"/></text:span><text:span text:style-name="T827">statbuf</text:span><text:span text:style-name="T825">);</text:span></text:p>
            <text:p text:style-name="P143"/>
            <text:p text:style-name="P144"><text:span text:style-name="T824">#include </text:span><text:span text:style-name="T831">&lt;fcntl.h&gt;</text:span><text:span text:style-name="T824"> </text:span></text:p>
            <text:p text:style-name="P144"><text:span text:style-name="T824">#include </text:span><text:span text:style-name="T831">&lt;sys/stat.h&gt;</text:span></text:p>
            <text:p text:style-name="P143"/>
            <text:p text:style-name="P144"><text:span text:style-name="T824">int</text:span><text:span text:style-name="T825"> </text:span><text:span text:style-name="T826">fstatat</text:span><text:span text:style-name="T825">(</text:span><text:span text:style-name="T824">int</text:span><text:span text:style-name="T825"> </text:span><text:span text:style-name="T827">dirfd</text:span><text:span text:style-name="T825">, </text:span><text:span text:style-name="T824">const</text:span><text:span text:style-name="T825"> </text:span><text:span text:style-name="T824">char</text:span><text:span text:style-name="T825"> *</text:span><text:span text:style-name="T824">restrict</text:span><text:span text:style-name="T825"> </text:span><text:span text:style-name="T827">pathname</text:span><text:span text:style-name="T825">, </text:span><text:span text:style-name="T824">struct</text:span><text:span text:style-name="T825"> </text:span><text:span text:style-name="T824">stat</text:span><text:span text:style-name="T825"> <text:s text:c="4"/></text:span></text:p>
            <text:p text:style-name="P144"><text:span text:style-name="T825"><text:s text:c="12"/>*</text:span><text:span text:style-name="T824">restrict</text:span><text:span text:style-name="T825"> </text:span><text:span text:style-name="T827">statbuf</text:span><text:span text:style-name="T825">, </text:span><text:span text:style-name="T824">int</text:span><text:span text:style-name="T825"> </text:span><text:span text:style-name="T827">flags</text:span><text:span text:style-name="T825">);</text:span></text:p>
            <text:p text:style-name="P196"/>
            <text:p text:style-name="P146"><text:span text:style-name="T860"><text:s text:c="9"/></text:span><text:span text:style-name="T861">Return: on success 0, on error -1 and errno</text:span></text:p>
          </table:table-cell>
        </table:table-row>
      </table:table>
      <text:p text:style-name="P133"/>
      <text:p text:style-name="P134"><text:span text:style-name="T813">All this functions return information about a file in a buffer called </text:span><text:span text:style-name="T876">statbuf</text:span><text:span text:style-name="T814">. </text:span><text:span text:style-name="T816">To retrieve information about a file the program must have the permission to traverse all the directories of the path where <text:s/>the file reside. Permissions required are those of execution because to traverse a </text:span><text:soft-page-break/><text:span text:style-name="T816">directory the user or the program need to ‘execute’ that directory.</text:span><text:span text:style-name="footnote_20_reference1"><text:span text:style-name="T816"><text:note text:id="ftn16" text:note-class="footnote"><text:note-citation>16</text:note-citation><text:note-body><text:p text:style-name="Footnote">To execute a directory means literally ‘go inside the directory’, to read a directory means ‘read the content of the directory’</text:p></text:note-body></text:note></text:span></text:span><text:span text:style-name="T816"> </text:span><text:span text:style-name="T819">stat</text:span><text:span text:style-name="T816">, </text:span><text:span text:style-name="T819">fstatat</text:span><text:span text:style-name="T816"> and </text:span><text:span text:style-name="T819">lstat</text:span><text:span text:style-name="T816"> need these permissions to reach the file and read the metadata. </text:span></text:p>
      <text:p text:style-name="P134"><text:span text:style-name="T819">stat</text:span><text:span text:style-name="T816"> and </text:span><text:span text:style-name="T819">fstatat </text:span><text:span text:style-name="T849">retrieve the information about the file pointed by </text:span><text:span text:style-name="T819">pathname</text:span></text:p>
      <text:p text:style-name="P134"><text:span text:style-name="T819">lstat</text:span><text:span text:style-name="T849"> is identical to stat but </text:span><text:span text:style-name="T819">pathname</text:span><text:span text:style-name="T849"> is a symbolic link so it return information about the link not the file pointed by the link</text:span></text:p>
      <text:p text:style-name="P134"><text:span text:style-name="T819">fstat</text:span><text:span text:style-name="T849"> is identical to </text:span><text:span text:style-name="T819">stat</text:span><text:span text:style-name="T849"> except that the file is specified by a file descriptor (</text:span><text:span text:style-name="T819">fd</text:span><text:span text:style-name="T849">) instead of the pathname </text:span></text:p>
      <text:p text:style-name="P134"><text:span text:style-name="T849">All the functions return the information in a </text:span><text:span text:style-name="T819">stat</text:span><text:span text:style-name="footnote_20_reference1"><text:span text:style-name="T819"><text:note text:id="ftn17" text:note-class="footnote"><text:note-citation>17</text:note-citation><text:note-body><text:p text:style-name="Footnote">See the <text:span text:style-name="T843">stat(3)</text:span> manual page </text:p></text:note-body></text:note></text:span></text:span><text:span text:style-name="T849"> structure (</text:span><text:span text:style-name="T819">statbuf</text:span><text:span text:style-name="T849">). Since the goal of theese functions is to retrieve information about a file it is necessary for the structure that contains the information and for the pathname to be accessible only by one pointer, this is the reason why </text:span><text:span text:style-name="T819">pathname</text:span><text:span text:style-name="T849"> and </text:span><text:span text:style-name="T819">statbuf</text:span><text:span text:style-name="T849"> are declared </text:span><text:span text:style-name="T819">restrict</text:span><text:span text:style-name="footnote_20_reference1"><text:span text:style-name="T819"><text:note text:id="ftn18" text:note-class="footnote"><text:note-citation>18</text:note-citation><text:note-body><text:p text:style-name="Footnote">About the use of the keyword <text:span text:style-name="T843">restrict</text:span> consult the <text:span text:style-name="T221">C/99 Standard</text:span>, the link is in the bibliograpy</text:p></text:note-body></text:note></text:span></text:span><text:span text:style-name="T849">. The argument </text:span><text:span text:style-name="T819">dirfd</text:span><text:span text:style-name="T849"> in </text:span><text:span text:style-name="T819">fstatat</text:span><text:span text:style-name="T849"> specifies the way to calculate the path of the file based on the following rules:</text:span></text:p>
      <text:p text:style-name="P165"/>
      <text:p text:style-name="P134"><text:span text:style-name="T849">a. if the pathname in </text:span><text:span text:style-name="T819">pathname</text:span><text:span text:style-name="T849"> is relative then is interpreted relative to the directory specified in </text:span></text:p>
      <text:p text:style-name="P134"><text:span text:style-name="T849"><text:s text:c="3"/></text:span><text:span text:style-name="T819">dirfd</text:span><text:span text:style-name="T849"> <text:s/>rather than relative to the current work directory</text:span></text:p>
      <text:p text:style-name="P134"><text:span text:style-name="T849">b. if </text:span><text:span text:style-name="T819">pathname</text:span><text:span text:style-name="T849"> is relative and </text:span><text:span text:style-name="T819">dirfd</text:span><text:span text:style-name="T849"> has the special value </text:span><text:span text:style-name="T819">AT_FDCWD</text:span><text:span text:style-name="T849"> then </text:span><text:span text:style-name="T819">pathname</text:span><text:span text:style-name="T849"> is </text:span></text:p>
      <text:p text:style-name="P134"><text:span text:style-name="T849"><text:s text:c="4"/>interpreted relative to the current working directory. </text:span></text:p>
      <text:p text:style-name="P134"><text:span text:style-name="T849">c. If the pathname specified in </text:span><text:span text:style-name="T819">pathname</text:span><text:span text:style-name="T849"> is absolute </text:span><text:span text:style-name="T819">dirfd</text:span><text:span text:style-name="T849"> is ignored.</text:span></text:p>
      <text:p text:style-name="P134"/>
      <text:p text:style-name="P134"><text:span text:style-name="T849">The argument </text:span><text:span text:style-name="T819">flags</text:span><text:span text:style-name="T849"> can </text:span><text:span text:style-name="T819">0</text:span><text:span text:style-name="T849"> or one of the following values:</text:span></text:p>
      <text:p text:style-name="P134"/>
      <table:table table:name="Table29" table:style-name="Table29">
        <table:table-column table:style-name="Table29.A"/>
        <table:table-column table:style-name="Table29.B"/>
        <table:table-row table:style-name="Table29.1">
          <table:table-cell table:style-name="Table29.A1" office:value-type="string">
            <text:p text:style-name="P197">AT_EMPTY_PATH</text:p>
          </table:table-cell>
          <table:table-cell table:style-name="Table29.B1" office:value-type="string">
            <text:p text:style-name="P134">If <text:span text:style-name="T819">pathname</text:span> is an empty string the function will operate on the file referred to by <text:span text:style-name="T819">dirfd</text:span>. This last in this case can refer to any type of file. If <text:span text:style-name="T819">dirfd</text:span> is <text:span text:style-name="T819">AT_FDCWD</text:span> the function operate on the current working directory.</text:p>
          </table:table-cell>
        </table:table-row>
        <table:table-row table:style-name="Table29.1">
          <table:table-cell table:style-name="Table29.A2" office:value-type="string">
            <text:p text:style-name="P197">AT_NO_AUTOMOUNT</text:p>
          </table:table-cell>
          <table:table-cell table:style-name="Table29.B2" office:value-type="string">
            <text:p text:style-name="P134">Don’t automount the terminal (“basename”) component of <text:span text:style-name="T819">pathname</text:span></text:p>
          </table:table-cell>
        </table:table-row>
        <table:table-row table:style-name="Table29.1">
          <table:table-cell table:style-name="Table29.A2" office:value-type="string">
            <text:p text:style-name="P197">AT_SYMLINK_NOFOLLOW</text:p>
          </table:table-cell>
          <table:table-cell table:style-name="Table29.B2" office:value-type="string">
            <text:p text:style-name="P134">If <text:span text:style-name="T819">pathname</text:span> is a symbolic link do not dereference it and return information on the link itself</text:p>
          </table:table-cell>
        </table:table-row>
      </table:table>
      <text:p text:style-name="P134"/>
      <text:p text:style-name="P139"><text:span text:style-name="T877">Tab 1.</text:span><text:span text:style-name="T849"> Values of the </text:span><text:span text:style-name="T819">flags</text:span><text:span text:style-name="T849"> argument of </text:span><text:span text:style-name="T819">fstatat</text:span></text:p>
      <text:p text:style-name="P134"/>
      <text:p text:style-name="P134"><text:span text:style-name="T849">The possible errors returned in </text:span><text:span text:style-name="T819">errno</text:span><text:span text:style-name="T849"> are the following</text:span></text:p>
      <text:p text:style-name="P134"/>
      <table:table table:name="Table30" table:style-name="Table30">
        <table:table-column table:style-name="Table30.A"/>
        <table:table-column table:style-name="Table30.B"/>
        <table:table-row table:style-name="Table30.1">
          <table:table-cell table:style-name="Table30.A1" office:value-type="string">
            <text:p text:style-name="P197">EACCESS</text:p>
          </table:table-cell>
          <table:table-cell table:style-name="Table30.B1" office:value-type="string">
            <text:p text:style-name="P159">search permission is denied for one of the directories in the path</text:p>
          </table:table-cell>
        </table:table-row>
        <table:table-row table:style-name="Table30.1">
          <table:table-cell table:style-name="Table30.A2" office:value-type="string">
            <text:p text:style-name="P197">EBADF</text:p>
          </table:table-cell>
          <table:table-cell table:style-name="Table30.B2" office:value-type="string">
            <text:p text:style-name="P134"><text:span text:style-name="T819">fd</text:span> is not a valid file descriptor</text:p>
          </table:table-cell>
        </table:table-row>
        <table:table-row table:style-name="Table30.1">
          <table:table-cell table:style-name="Table30.A2" office:value-type="string">
            <text:p text:style-name="P197">EBADF (fstatat)</text:p>
          </table:table-cell>
          <table:table-cell table:style-name="Table30.B2" office:value-type="string">
            <text:p text:style-name="P134"><text:span text:style-name="T819">pathname</text:span> is relative but <text:span text:style-name="T819">dirfd</text:span> is not <text:span text:style-name="T819">AT_FDCWD</text:span> nor a valid descriptor</text:p>
          </table:table-cell>
        </table:table-row>
        <table:table-row table:style-name="Table30.1">
          <table:table-cell table:style-name="Table30.A2" office:value-type="string">
            <text:p text:style-name="P197">EFAULT</text:p>
          </table:table-cell>
          <table:table-cell table:style-name="Table30.B2" office:value-type="string">
            <text:p text:style-name="P159">bad address</text:p>
          </table:table-cell>
        </table:table-row>
        <text:soft-page-break/>
        <table:table-row table:style-name="Table30.1">
          <table:table-cell table:style-name="Table30.A2" office:value-type="string">
            <text:p text:style-name="P197">EINVAL (fstatat)</text:p>
          </table:table-cell>
          <table:table-cell table:style-name="Table30.B2" office:value-type="string">
            <text:p text:style-name="P134"><text:span text:style-name="T819">flags</text:span> has not a valid value</text:p>
          </table:table-cell>
        </table:table-row>
        <table:table-row table:style-name="Table30.1">
          <table:table-cell table:style-name="Table30.A2" office:value-type="string">
            <text:p text:style-name="P197">ELOOP</text:p>
          </table:table-cell>
          <table:table-cell table:style-name="Table30.B2" office:value-type="string">
            <text:p text:style-name="P159">too many symbolic links encountered while traversing the path</text:p>
          </table:table-cell>
        </table:table-row>
        <table:table-row table:style-name="Table30.1">
          <table:table-cell table:style-name="Table30.A2" office:value-type="string">
            <text:p text:style-name="P197">ENAMETOOLONG</text:p>
          </table:table-cell>
          <table:table-cell table:style-name="Table30.B2" office:value-type="string">
            <text:p text:style-name="P134"><text:span text:style-name="T819">pathname</text:span> is too long</text:p>
          </table:table-cell>
        </table:table-row>
        <table:table-row table:style-name="Table30.1">
          <table:table-cell table:style-name="Table30.A2" office:value-type="string">
            <text:p text:style-name="P197">ENOENT</text:p>
          </table:table-cell>
          <table:table-cell table:style-name="Table30.B2" office:value-type="string">
            <text:p text:style-name="P134">a component of <text:span text:style-name="T819">pathname</text:span> does not exist or is a not valid symbolic link</text:p>
          </table:table-cell>
        </table:table-row>
        <table:table-row table:style-name="Table30.1">
          <table:table-cell table:style-name="Table30.A2" office:value-type="string">
            <text:p text:style-name="P197">ENOENT (fstatat)</text:p>
          </table:table-cell>
          <table:table-cell table:style-name="Table30.B2" office:value-type="string">
            <text:p text:style-name="P134"><text:span text:style-name="T819">pathname</text:span> is an empty string and <text:span text:style-name="T819">AT_EMPTY_PATH</text:span> is not specified</text:p>
          </table:table-cell>
        </table:table-row>
        <table:table-row table:style-name="Table30.1">
          <table:table-cell table:style-name="Table30.A2" office:value-type="string">
            <text:p text:style-name="P197">ENOMEM</text:p>
          </table:table-cell>
          <table:table-cell table:style-name="Table30.B2" office:value-type="string">
            <text:p text:style-name="P159">out of memeory</text:p>
          </table:table-cell>
        </table:table-row>
        <table:table-row table:style-name="Table30.1">
          <table:table-cell table:style-name="Table30.A2" office:value-type="string">
            <text:p text:style-name="P197">ENOTDIR</text:p>
          </table:table-cell>
          <table:table-cell table:style-name="Table30.B2" office:value-type="string">
            <text:p text:style-name="P134">a component of <text:span text:style-name="T819">pathname</text:span> is not a directory </text:p>
          </table:table-cell>
        </table:table-row>
        <table:table-row table:style-name="Table30.1">
          <table:table-cell table:style-name="Table30.A2" office:value-type="string">
            <text:p text:style-name="P197">ENOTDIR (fstatat)</text:p>
          </table:table-cell>
          <table:table-cell table:style-name="Table30.B2" office:value-type="string">
            <text:p text:style-name="P134"><text:span text:style-name="T819">pathname</text:span> is relative and <text:span text:style-name="T819">dirfd</text:span> is a file descriptor referring to a file other than a directtory</text:p>
          </table:table-cell>
        </table:table-row>
        <table:table-row table:style-name="Table30.1">
          <table:table-cell table:style-name="Table30.A2" office:value-type="string">
            <text:p text:style-name="P197">EOVERFLOW</text:p>
          </table:table-cell>
          <table:table-cell table:style-name="Table30.B2" office:value-type="string">
            <text:p text:style-name="P134"><text:span text:style-name="T819">pathname</text:span> or <text:span text:style-name="T819">fd</text:span> refers to a file whose size, inode number, or number of blocks cannot be represented in, respectively, the types <text:span text:style-name="T819">off_t</text:span>, <text:span text:style-name="T819">ino_t</text:span>, <text:span text:style-name="T819">blkcnt_t</text:span><text:span text:style-name="footnote_20_reference1"><text:note text:id="ftn19" text:note-class="footnote"><text:note-citation>19</text:note-citation><text:note-body><text:p text:style-name="Footnote">See the <text:span text:style-name="T843">stat(2)</text:span> manual page for an example of this error and the manual pages: <text:span text:style-name="T821">off_t(3type)</text:span>, <text:span text:style-name="T821">stat(3type)</text:span>, <text:span text:style-name="T821">blkcnt_t(3type)</text:span><text:span text:style-name="T820">for the types</text:span></text:p></text:note-body></text:note></text:span> </text:p>
          </table:table-cell>
        </table:table-row>
      </table:table>
      <text:p text:style-name="P134"/>
      <text:p text:style-name="P139"><text:span text:style-name="T878">Tab 2.</text:span><text:span text:style-name="T879"> </text:span><text:span text:style-name="T819">errno</text:span><text:span text:style-name="T879"> values for the </text:span><text:span text:style-name="T819">stat</text:span><text:span text:style-name="T879"> functions</text:span></text:p>
      <text:p text:style-name="P198"/>
      <text:p text:style-name="P134"><text:span text:style-name="T879">The information retrieved from the file are stored in the structure of type </text:span><text:span text:style-name="T819">stat</text:span><text:span text:style-name="footnote_20_reference1"><text:span text:style-name="T819"><text:note text:id="ftn20" text:note-class="footnote"><text:note-citation>20</text:note-citation><text:note-body><text:p text:style-name="Footnote">See the <text:span text:style-name="T821">stat(3type)</text:span> manual page </text:p></text:note-body></text:note></text:span></text:span><text:span text:style-name="T819">.</text:span><text:span text:style-name="T879"> This structure represent the file status.</text:span></text:p>
      <text:p text:style-name="P199"/>
      <table:table table:name="Table31" table:style-name="Table31">
        <table:table-column table:style-name="Table31.A"/>
        <table:table-row table:style-name="Table31.1">
          <table:table-cell table:style-name="Table31.A1" office:value-type="string">
            <text:p text:style-name="P134"><text:span text:style-name="T840">#include </text:span><text:span text:style-name="T841">&lt;sys/stat.h&gt;</text:span></text:p>
            <text:p text:style-name="P143"/>
            <text:p text:style-name="P144"><text:span text:style-name="T824">struct</text:span><text:span text:style-name="T825"> stat {</text:span></text:p>
            <text:p text:style-name="P144"><text:span text:style-name="T824"><text:s text:c="3"/>dev_t</text:span><text:span text:style-name="T825"> st_dev;</text:span><text:span text:style-name="T880"> <text:s text:c="13"/>/* ID of device containing file */</text:span></text:p>
            <text:p text:style-name="P144"><text:span text:style-name="T824"><text:s text:c="3"/>ino_t</text:span><text:span text:style-name="T825"> st_ino;</text:span><text:span text:style-name="T880"> <text:s text:c="13"/>/* Inode number */</text:span></text:p>
            <text:p text:style-name="P144"><text:span text:style-name="T824"><text:s text:c="3"/>mode_t</text:span><text:span text:style-name="T825"> st_mode;</text:span><text:span text:style-name="T880"> <text:s text:c="11"/>/* File type and mode */</text:span></text:p>
            <text:p text:style-name="P144"><text:span text:style-name="T824"><text:s text:c="3"/>nlink_t</text:span><text:span text:style-name="T825"> st_nlink;</text:span><text:span text:style-name="T880"> <text:s text:c="9"/>/* Number of hard links */</text:span></text:p>
            <text:p text:style-name="P144"><text:span text:style-name="T824"><text:s text:c="3"/>uid_t</text:span><text:span text:style-name="T825"> st_uid;</text:span><text:span text:style-name="T880"> <text:s text:c="13"/>/* User ID of owner */</text:span></text:p>
            <text:p text:style-name="P144"><text:span text:style-name="T824"><text:s text:c="3"/>gid_t</text:span><text:span text:style-name="T825"> st_gid;</text:span><text:span text:style-name="T880"> <text:s text:c="13"/>/* Group ID of owner */</text:span></text:p>
            <text:p text:style-name="P144"><text:span text:style-name="T824"><text:s text:c="3"/>dev_t</text:span><text:span text:style-name="T825"> st_rdev;</text:span><text:span text:style-name="T880"> <text:s text:c="12"/>/* Device ID (if special file) */</text:span></text:p>
            <text:p text:style-name="P144"><text:span text:style-name="T824"><text:s text:c="3"/>off_t</text:span><text:span text:style-name="T825"> st_size;</text:span><text:span text:style-name="T880"> <text:s text:c="12"/>/* Total size, in bytes */</text:span></text:p>
            <text:p text:style-name="P144"><text:span text:style-name="T824"><text:s text:c="3"/>blksize_t</text:span><text:span text:style-name="T825"> st_blksize;</text:span><text:span text:style-name="T880"> <text:s text:c="5"/>/* Block size for filesystem I/O */</text:span></text:p>
            <text:p text:style-name="P144"><text:span text:style-name="T824"><text:s text:c="3"/>blkcnt_t</text:span><text:span text:style-name="T825"> st_blocks;</text:span><text:span text:style-name="T880"> <text:s text:c="7"/>/* Number of 512 B blocks allocated */</text:span></text:p>
            <text:p text:style-name="P143"/>
            <text:p text:style-name="P144"><text:span text:style-name="T880"><text:s text:c="3"/>/* Since POSIX.1-2008, this structure supports nanosecond</text:span></text:p>
            <text:p text:style-name="P144"><text:span text:style-name="T880"><text:s text:c="6"/>precision for the following timestamp fields */</text:span></text:p>
            <text:p text:style-name="P143"/>
            <text:p text:style-name="P144"><text:span text:style-name="T824"><text:s text:c="3"/>struct</text:span><text:span text:style-name="T825"> </text:span><text:span text:style-name="T824">timespec</text:span><text:span text:style-name="T825"> st_atim;</text:span><text:span text:style-name="T880"> <text:s text:c="6"/>/* Time of last access */</text:span></text:p>
            <text:p text:style-name="P144"><text:span text:style-name="T824"><text:s text:c="3"/>struct</text:span><text:span text:style-name="T825"> </text:span><text:span text:style-name="T824">timespec</text:span><text:span text:style-name="T825"> st_mtim;</text:span><text:span text:style-name="T880"> <text:s text:c="6"/>/* Time of last modification */</text:span></text:p>
            <text:p text:style-name="P144"><text:span text:style-name="T824"><text:s text:c="3"/>struct</text:span><text:span text:style-name="T825"> </text:span><text:span text:style-name="T824">timespec</text:span><text:span text:style-name="T825"> st_ctim;</text:span><text:span text:style-name="T880"> <text:s text:c="6"/>/* Time of last status change */</text:span></text:p>
            <text:p text:style-name="P143"/>
            <text:p text:style-name="P144"><text:soft-page-break/><text:span text:style-name="T824"><text:s text:c="3"/>#define st_atime st_atim.tv_sec</text:span><text:span text:style-name="T880"> /* Backward compatibility */</text:span></text:p>
            <text:p text:style-name="P144"><text:span text:style-name="T824"><text:s text:c="3"/>#define st_mtime st_mtim.tv_sec</text:span></text:p>
            <text:p text:style-name="P144"><text:span text:style-name="T824"><text:s text:c="3"/>#define st_ctime st_ctim.tv_sec</text:span></text:p>
            <text:p text:style-name="P195">};</text:p>
            <text:p text:style-name="P200"/>
          </table:table-cell>
        </table:table-row>
      </table:table>
      <text:p text:style-name="P199"/>
      <text:p text:style-name="P134"><text:span text:style-name="T879">The </text:span><text:span text:style-name="T819">stat</text:span><text:span text:style-name="T879"> structure is composed by the following fields:</text:span></text:p>
      <text:p text:style-name="P198"/>
      <table:table table:name="Table32" table:style-name="Table32">
        <table:table-column table:style-name="Table32.A"/>
        <table:table-column table:style-name="Table32.B"/>
        <table:table-row table:style-name="Table32.1">
          <table:table-cell table:style-name="Table32.A1" office:value-type="string">
            <text:p text:style-name="P197">st_dev</text:p>
          </table:table-cell>
          <table:table-cell table:style-name="Table32.B1" office:value-type="string">
            <text:p text:style-name="P159">device on which the file resides </text:p>
          </table:table-cell>
        </table:table-row>
        <table:table-row table:style-name="Table32.1">
          <table:table-cell table:style-name="Table32.A2" office:value-type="string">
            <text:p text:style-name="P197">st_ino</text:p>
          </table:table-cell>
          <table:table-cell table:style-name="Table32.B2" office:value-type="string">
            <text:p text:style-name="P159">the inode<text:span text:style-name="footnote_20_reference1"><text:note text:id="ftn21" text:note-class="footnote"><text:note-citation>21</text:note-citation><text:note-body><text:p text:style-name="Footnote">An inode is a number that identifies a file on the file system, each file and directory has his unique inode number</text:p></text:note-body></text:note></text:span> number of the file</text:p>
          </table:table-cell>
        </table:table-row>
        <table:table-row table:style-name="Table32.1">
          <table:table-cell table:style-name="Table32.A2" office:value-type="string">
            <text:p text:style-name="P197">st_mode</text:p>
          </table:table-cell>
          <table:table-cell table:style-name="Table32.B2" office:value-type="string">
            <text:p text:style-name="P159">type and mode of the file</text:p>
          </table:table-cell>
        </table:table-row>
        <table:table-row table:style-name="Table32.1">
          <table:table-cell table:style-name="Table32.A2" office:value-type="string">
            <text:p text:style-name="P197">st_nlink</text:p>
          </table:table-cell>
          <table:table-cell table:style-name="Table32.B2" office:value-type="string">
            <text:p text:style-name="P159">number of hard links to the file</text:p>
          </table:table-cell>
        </table:table-row>
        <table:table-row table:style-name="Table32.1">
          <table:table-cell table:style-name="Table32.A2" office:value-type="string">
            <text:p text:style-name="P197">st_uid</text:p>
          </table:table-cell>
          <table:table-cell table:style-name="Table32.B2" office:value-type="string">
            <text:p text:style-name="P159">user ID of owner of the file</text:p>
          </table:table-cell>
        </table:table-row>
        <table:table-row table:style-name="Table32.1">
          <table:table-cell table:style-name="Table32.A2" office:value-type="string">
            <text:p text:style-name="P197">st_gid</text:p>
          </table:table-cell>
          <table:table-cell table:style-name="Table32.B2" office:value-type="string">
            <text:p text:style-name="P159">group ID of the owner of the file</text:p>
          </table:table-cell>
        </table:table-row>
        <table:table-row table:style-name="Table32.1">
          <table:table-cell table:style-name="Table32.A2" office:value-type="string">
            <text:p text:style-name="P197">st_rdev</text:p>
          </table:table-cell>
          <table:table-cell table:style-name="Table32.B2" office:value-type="string">
            <text:p text:style-name="P159">device represented by the file</text:p>
          </table:table-cell>
        </table:table-row>
        <table:table-row table:style-name="Table32.1">
          <table:table-cell table:style-name="Table32.A2" office:value-type="string">
            <text:p text:style-name="P197">st_size</text:p>
          </table:table-cell>
          <table:table-cell table:style-name="Table32.B2" office:value-type="string">
            <text:p text:style-name="P159">size of the file</text:p>
          </table:table-cell>
        </table:table-row>
        <table:table-row table:style-name="Table32.1">
          <table:table-cell table:style-name="Table32.A2" office:value-type="string">
            <text:p text:style-name="P197">st_blksize</text:p>
          </table:table-cell>
          <table:table-cell table:style-name="Table32.B2" office:value-type="string">
            <text:p text:style-name="P159">block size</text:p>
          </table:table-cell>
        </table:table-row>
        <table:table-row table:style-name="Table32.1">
          <table:table-cell table:style-name="Table32.A2" office:value-type="string">
            <text:p text:style-name="P197">st_blocks</text:p>
          </table:table-cell>
          <table:table-cell table:style-name="Table32.B2" office:value-type="string">
            <text:p text:style-name="P159">number of blocks allocated to the file (1 block = 512 bytes)</text:p>
          </table:table-cell>
        </table:table-row>
        <table:table-row table:style-name="Table32.1">
          <table:table-cell table:style-name="Table32.A2" office:value-type="string">
            <text:p text:style-name="P197">st_atime</text:p>
          </table:table-cell>
          <table:table-cell table:style-name="Table32.B2" office:value-type="string">
            <text:p text:style-name="P159">time of last access to the file data</text:p>
          </table:table-cell>
        </table:table-row>
        <table:table-row table:style-name="Table32.1">
          <table:table-cell table:style-name="Table32.A2" office:value-type="string">
            <text:p text:style-name="P197">st_mtime</text:p>
          </table:table-cell>
          <table:table-cell table:style-name="Table32.B2" office:value-type="string">
            <text:p text:style-name="P159">time of last modification of file data</text:p>
          </table:table-cell>
        </table:table-row>
        <table:table-row table:style-name="Table32.1">
          <table:table-cell table:style-name="Table32.A2" office:value-type="string">
            <text:p text:style-name="P134"><text:span text:style-name="T819">st_ctime</text:span> </text:p>
          </table:table-cell>
          <table:table-cell table:style-name="Table32.B2" office:value-type="string">
            <text:p text:style-name="P159">file's last status change timestamp</text:p>
          </table:table-cell>
        </table:table-row>
      </table:table>
      <text:p text:style-name="P198"/>
      <text:p text:style-name="P139"><text:span text:style-name="T878">Tab 3.</text:span><text:span text:style-name="T879"> Fields of the </text:span><text:span text:style-name="T876">stat</text:span><text:span text:style-name="T879"> structure</text:span></text:p>
      <text:p text:style-name="P198"/>
      <text:p text:style-name="P134"><text:span text:style-name="T879">The other fields (</text:span><text:span text:style-name="T876">st_atim.tv_sec</text:span><text:span text:style-name="T881">, </text:span><text:span text:style-name="T876">st_mtim.tv_sec</text:span><text:span text:style-name="T881">, </text:span><text:span text:style-name="T876">st_ctim.tv_sec</text:span><text:span text:style-name="T879">)</text:span><text:span text:style-name="T881"> </text:span><text:span text:style-name="T879">are used for backward compatibility. The field </text:span><text:span text:style-name="T876">st_ino</text:span><text:span text:style-name="T879"> represent the inode number of the file. The inode is a number that identifies the file in the file system. Each file or directory in the file system has his inode. On the Linux systems, to see the information about a file is available the program </text:span><text:span text:style-name="T876">stat</text:span><text:span text:style-name="T879">. When we create a symbolic link to a file we create a pointer to the inode number of that file. </text:span></text:p>
      <text:p text:style-name="P198"/>
      <text:p text:style-name="P201">Let's create a file and write some text inside it </text:p>
      <text:p text:style-name="P198"/>
      <table:table table:name="Table33" table:style-name="Table33">
        <table:table-column table:style-name="Table33.A"/>
        <table:table-row table:style-name="Table33.1">
          <table:table-cell table:style-name="Table33.A1" office:value-type="string">
            <text:p text:style-name="P150"><text:span text:style-name="T835">[</text:span><text:a xlink:type="simple" xlink:href="mailto:linux@io" text:style-name="Internet_20_link" text:visited-style-name="Visited_20_Internet_20_Link"><text:span text:style-name="Internet_20_link"><text:span text:style-name="T882">linux@</text:span></text:span></text:a><text:span text:style-name="T882">fidir</text:span><text:span text:style-name="T835">] touch file.txt</text:span></text:p>
            <text:p text:style-name="P150"><text:span text:style-name="T835">[</text:span><text:a xlink:type="simple" xlink:href="mailto:linux@io" text:style-name="Internet_20_link" text:visited-style-name="Visited_20_Internet_20_Link"><text:span text:style-name="Internet_20_link"><text:span text:style-name="T882">linux@</text:span></text:span></text:a><text:span text:style-name="T882">fidir</text:span><text:span text:style-name="T835">] echo 'hello' &gt; file.txt</text:span></text:p>
          </table:table-cell>
        </table:table-row>
      </table:table>
      <text:p text:style-name="P198"/>
      <text:p text:style-name="P134"><text:span text:style-name="T879">Then create a symbolic link to the file with the command </text:span><text:span text:style-name="T876">ln</text:span><text:span text:style-name="T879"> and the option </text:span><text:span text:style-name="T876">-s</text:span></text:p>
      <text:p text:style-name="P198"/>
      <table:table table:name="Table34" table:style-name="Table34">
        <table:table-column table:style-name="Table34.A"/>
        <table:table-row table:style-name="Table34.1">
          <table:table-cell table:style-name="Table34.A1" office:value-type="string">
            <text:p text:style-name="P150"><text:span text:style-name="T835">[</text:span><text:a xlink:type="simple" xlink:href="mailto:linux@io" text:style-name="Internet_20_link" text:visited-style-name="Visited_20_Internet_20_Link"><text:span text:style-name="Internet_20_link"><text:span text:style-name="T882">linux@</text:span></text:span></text:a><text:span text:style-name="T882">fidir</text:span><text:span text:style-name="T835">] ln -s file.txt file2</text:span></text:p>
            <text:p text:style-name="P150"><text:span text:style-name="T835">[</text:span><text:a xlink:type="simple" xlink:href="mailto:linux@io" text:style-name="Internet_20_link" text:visited-style-name="Visited_20_Internet_20_Link"><text:span text:style-name="Internet_20_link"><text:span text:style-name="T882">linux@</text:span></text:span></text:a><text:span text:style-name="T882">fidir</text:span><text:span text:style-name="T835">] ls -l</text:span></text:p>
            <text:p text:style-name="P151">total 4</text:p>
            <text:p text:style-name="P151"><text:soft-page-break/>lrwxrwxrwx <text:s/>1 fidir fidir <text:s text:c="5"/>8 Mar 23 19:58 <text:s/>file2 -&gt; file.txt</text:p>
            <text:p text:style-name="P151">-rw-r--r-- <text:s text:c="6"/>1 fidir fidir <text:s text:c="5"/>6 Mar 23 19:58 <text:s/>file.txt</text:p>
          </table:table-cell>
        </table:table-row>
      </table:table>
      <text:p text:style-name="P198"/>
      <text:p text:style-name="P134"><text:span text:style-name="T879">As we can see the link </text:span><text:span text:style-name="T876">file2</text:span><text:span text:style-name="T879"> point to the file </text:span><text:span text:style-name="T876">file.txt</text:span><text:span text:style-name="T879">, if we execute </text:span><text:span text:style-name="T876">cat</text:span><text:span text:style-name="T879"> on </text:span><text:span text:style-name="T876">file2</text:span><text:span text:style-name="T879"> we see the content of </text:span><text:span text:style-name="T876">file.txt</text:span></text:p>
      <text:p text:style-name="P198"/>
      <table:table table:name="Table35" table:style-name="Table35">
        <table:table-column table:style-name="Table35.A"/>
        <table:table-row table:style-name="Table35.1">
          <table:table-cell table:style-name="Table35.A1" office:value-type="string">
            <text:p text:style-name="P150"><text:span text:style-name="T835">[</text:span><text:a xlink:type="simple" xlink:href="mailto:linux@io" text:style-name="Internet_20_link" text:visited-style-name="Visited_20_Internet_20_Link"><text:span text:style-name="Internet_20_link"><text:span text:style-name="T882">linux@</text:span></text:span></text:a><text:span text:style-name="T882">fidir</text:span><text:span text:style-name="T835">] cat file2</text:span></text:p>
            <text:p text:style-name="P151">hello</text:p>
          </table:table-cell>
        </table:table-row>
      </table:table>
      <text:p text:style-name="P134"/>
      <text:p text:style-name="P134"><text:span text:style-name="T879">To see the information about the file let's use the </text:span><text:span text:style-name="T876">stat</text:span><text:span text:style-name="T879"> command</text:span></text:p>
      <text:p text:style-name="P201"/>
      <table:table table:name="Table36" table:style-name="Table36">
        <table:table-column table:style-name="Table36.A"/>
        <table:table-row table:style-name="Table36.1">
          <table:table-cell table:style-name="Table36.A1" office:value-type="string">
            <text:p text:style-name="P150"><text:span text:style-name="T835">[</text:span><text:a xlink:type="simple" xlink:href="mailto:linux@io" text:style-name="Internet_20_link" text:visited-style-name="Visited_20_Internet_20_Link"><text:span text:style-name="Internet_20_link"><text:span text:style-name="T882">linux@</text:span></text:span></text:a><text:span text:style-name="T882">fidir</text:span><text:span text:style-name="T835">] stat file.txt</text:span></text:p>
            <text:p text:style-name="P150"><text:span text:style-name="T835"><text:s text:c="2"/>File: file.txt</text:span></text:p>
            <text:p text:style-name="P150"><text:span text:style-name="T835"><text:s text:c="2"/>Size: 6 <text:s text:c="8"/><text:tab/>Blocks: 8 <text:s text:c="9"/>IO Block: 4096 <text:s text:c="2"/>regular file</text:span></text:p>
            <text:p text:style-name="P150"><text:span text:style-name="T835">Device: 259,2<text:tab/></text:span><text:span text:style-name="T815">Inode: 23364606</text:span><text:span text:style-name="T835"> <text:s text:c="3"/></text:span><text:span text:style-name="T815">Links: 1</text:span></text:p>
            <text:p text:style-name="P151">Access: (0644/-rw-r--r--) <text:s/>Uid: ( 1000/ <text:s text:c="2"/>fidir) <text:s text:c="2"/>Gid: ( 1000/ <text:s text:c="2"/>fidir)</text:p>
            <text:p text:style-name="P151">Access: 2024-03-23 20:01:37.452040888 +0700</text:p>
            <text:p text:style-name="P151">Modify: 2024-03-23 19:58:18.396035269 +0700</text:p>
            <text:p text:style-name="P151">Change: 2024-03-23 19:59:46.536037757 +0700</text:p>
            <text:p text:style-name="P150"><text:span text:style-name="T835"><text:s/>Birth: 2024-03-23 19:58:11.664035079 +0700</text:span></text:p>
          </table:table-cell>
        </table:table-row>
      </table:table>
      <text:p text:style-name="P202"/>
      <text:p text:style-name="P201">In the firs three lines of the output we can see the size, the number of the blocks, the type of the file, the device, the inode and the number of links pointing to this file </text:p>
      <text:p text:style-name="P202"/>
      <text:p text:style-name="P134"><text:span text:style-name="T879">Let's execute the </text:span><text:span text:style-name="T876">stat</text:span><text:span text:style-name="T879"> command on the symbolic link </text:span><text:span text:style-name="T876">file2</text:span></text:p>
      <text:p text:style-name="P202"/>
      <table:table table:name="Table37" table:style-name="Table37">
        <table:table-column table:style-name="Table37.A"/>
        <table:table-row table:style-name="Table37.1">
          <table:table-cell table:style-name="Table37.A1" office:value-type="string">
            <text:p text:style-name="P150"><text:span text:style-name="T835">[</text:span><text:a xlink:type="simple" xlink:href="mailto:linux@io" text:style-name="Internet_20_link" text:visited-style-name="Visited_20_Internet_20_Link"><text:span text:style-name="Internet_20_link"><text:span text:style-name="T882">linux@</text:span></text:span></text:a><text:span text:style-name="T882">fidir</text:span><text:span text:style-name="T835">] stat file2</text:span></text:p>
            <text:p text:style-name="P150"><text:span text:style-name="T835"><text:s text:c="2"/>File: file2 -&gt; file.txt</text:span></text:p>
            <text:p text:style-name="P150"><text:span text:style-name="T835"><text:s text:c="2"/>Size: 8 <text:s text:c="8"/><text:tab/>Blocks: 0 <text:s text:c="9"/>IO Block: 4096 <text:s text:c="2"/>symbolic link</text:span></text:p>
            <text:p text:style-name="P150"><text:span text:style-name="T835">Device: 259,2<text:tab/></text:span><text:span text:style-name="T815">Inode: 23364884 <text:s text:c="3"/>Links: 1</text:span></text:p>
            <text:p text:style-name="P151">Access: (0777/lrwxrwxrwx) <text:s/>Uid: ( 1000/ <text:s text:c="2"/>fidir) <text:s text:c="2"/>Gid: ( 1000/ <text:s text:c="2"/>fidir)</text:p>
            <text:p text:style-name="P151">Access: 2024-03-23 19:59:54.840037991 +0700</text:p>
            <text:p text:style-name="P151">Modify: 2024-03-23 19:58:38.512035836 +0700</text:p>
            <text:p text:style-name="P151">Change: 2024-03-23 19:59:46.536037757 +0700</text:p>
            <text:p text:style-name="P150"><text:span text:style-name="T835"><text:s/>Birth: 2024-03-23 19:58:38.512035836 +0700</text:span></text:p>
          </table:table-cell>
        </table:table-row>
      </table:table>
      <text:p text:style-name="P201"/>
      <text:p text:style-name="P201">The inode numbers are different because a symbolic link is treated as a separate file in the filesystem, with its own inode. A symbolic link acts as a pointer to another file, but it is still considered an independent filesystem object.</text:p>
      <text:p text:style-name="P134"><text:span text:style-name="T879">If inode </text:span><text:span text:style-name="Source_20_Text"><text:span text:style-name="T876">23364884</text:span></text:span><text:span text:style-name="T879"> is deleted, the symbolic link (</text:span><text:span text:style-name="Source_20_Text"><text:span text:style-name="T876">file2</text:span></text:span><text:span text:style-name="T879">) is removed, while </text:span><text:span text:style-name="Source_20_Text"><text:span text:style-name="T876">file.txt</text:span></text:span><text:span text:style-name="T879"> remains unaffected. On the other hand, if inode </text:span><text:span text:style-name="Source_20_Text"><text:span text:style-name="T876">23364606</text:span></text:span><text:span text:style-name="T879"> is deleted, </text:span><text:span text:style-name="Source_20_Text"><text:span text:style-name="T876">file.txt</text:span></text:span><text:span text:style-name="T879"> is removed, and </text:span><text:span text:style-name="Source_20_Text"><text:span text:style-name="T876">file2</text:span></text:span><text:span text:style-name="T879"> becomes a broken symbolic link that points to a non-existent file.</text:span></text:p>
      <text:p text:style-name="P201"/>
      <text:p text:style-name="P134"><text:span text:style-name="T879">The </text:span><text:span text:style-name="Source_20_Text"><text:span text:style-name="T876">Links</text:span></text:span><text:span text:style-name="T879"> field in the output does not refer to symbolic links; it refers to </text:span><text:span text:style-name="T883">hard links</text:span><text:span text:style-name="T879">. A </text:span><text:span text:style-name="T883">hard link</text:span><text:span text:style-name="T879"> is a reference to a file that, unlike a symbolic link, is not a separate filesystem entity. Multiple hard links can point to the same </text:span><text:span text:style-name="T883">inode</text:span><text:span text:style-name="T879">, meaning a single inode number may correspond to multiple filenames.</text:span></text:p>
      <text:p text:style-name="P201"><text:soft-page-break/>For this reason, a symbolic link has its own inode number, different from the target file, while a hard link shares the same inode number as the original file.</text:p>
      <text:p text:style-name="P134"><text:span text:style-name="T879">We now create a hard link to the file </text:span><text:span text:style-name="T876">file.txt</text:span><text:span text:style-name="T879"> (command </text:span><text:span text:style-name="T876">ln</text:span><text:span text:style-name="T879"> without options) and execute the </text:span><text:span text:style-name="T876">stat</text:span><text:span text:style-name="T879"> command.</text:span></text:p>
      <text:p text:style-name="P202"/>
      <table:table table:name="Table38" table:style-name="Table38">
        <table:table-column table:style-name="Table38.A"/>
        <table:table-row table:style-name="Table38.1">
          <table:table-cell table:style-name="Table38.A1" office:value-type="string">
            <text:p text:style-name="P150"><text:span text:style-name="T835">[</text:span><text:a xlink:type="simple" xlink:href="mailto:linux@io" text:style-name="Internet_20_link" text:visited-style-name="Visited_20_Internet_20_Link"><text:span text:style-name="Internet_20_link"><text:span text:style-name="T882">linux@</text:span></text:span></text:a><text:span text:style-name="T882">fidir</text:span><text:span text:style-name="T835">] ln file.txt hfile3</text:span></text:p>
            <text:p text:style-name="P150"><text:span text:style-name="T835">[</text:span><text:a xlink:type="simple" xlink:href="mailto:linux@io" text:style-name="Internet_20_link" text:visited-style-name="Visited_20_Internet_20_Link"><text:span text:style-name="Internet_20_link"><text:span text:style-name="T882">linux@</text:span></text:span></text:a><text:span text:style-name="T882">fidir</text:span><text:span text:style-name="T835">] stat hfile3</text:span></text:p>
            <text:p text:style-name="P150"><text:span text:style-name="T835"><text:s text:c="2"/>File: hfile3</text:span></text:p>
            <text:p text:style-name="P150"><text:span text:style-name="T835"><text:s text:c="2"/>Size: 6 <text:s text:c="8"/><text:tab/>Blocks: 8 <text:s text:c="9"/>IO Block: 4096 <text:s text:c="2"/>regular file</text:span></text:p>
            <text:p text:style-name="P150"><text:span text:style-name="T835">Device: 259,2<text:tab/></text:span><text:span text:style-name="T815">Inode: 23364606 <text:s text:c="3"/>Links: 2</text:span></text:p>
            <text:p text:style-name="P151">Access: (0644/-rw-r--r--) <text:s/>Uid: ( 1000/ <text:s text:c="2"/>fidir) <text:s text:c="2"/>Gid: ( 1000/ <text:s text:c="2"/>fidir)</text:p>
            <text:p text:style-name="P151">Access: 2024-03-23 20:01:37.452040888 +0700</text:p>
            <text:p text:style-name="P151">Modify: 2024-03-23 19:58:18.396035269 +0700</text:p>
            <text:p text:style-name="P151">Change: 2024-03-23 20:08:06.860051880 +0700</text:p>
            <text:p text:style-name="P150"><text:span text:style-name="T835"><text:s/>Birth: 2024-03-23 19:58:11.664035079 +0700</text:span></text:p>
          </table:table-cell>
        </table:table-row>
      </table:table>
      <text:p text:style-name="P202"/>
      <text:p text:style-name="P134"><text:span text:style-name="T879">The inode number of </text:span><text:span text:style-name="T876">hfile3</text:span><text:span text:style-name="T879"> is the same as that of </text:span><text:span text:style-name="T876">file.txt</text:span><text:span text:style-name="T879">, and number of links is 2 because the same inode is associated with two filenames: </text:span><text:span text:style-name="T876">file.txt</text:span><text:span text:style-name="T879"> and </text:span><text:span text:style-name="T876">hfile3</text:span><text:span text:style-name="T879">. However, if we execute </text:span><text:span text:style-name="T876">ls -l</text:span><text:span text:style-name="T879">, we can see that </text:span><text:span text:style-name="T876">hfile3</text:span><text:span text:style-name="T879"> appears as a separate file and does not point to </text:span><text:span text:style-name="T876">file.txt</text:span><text:span text:style-name="T879">.</text:span></text:p>
      <text:p text:style-name="P134"/>
      <table:table table:name="Table39" table:style-name="Table39">
        <table:table-column table:style-name="Table39.A"/>
        <table:table-row table:style-name="Table39.1">
          <table:table-cell table:style-name="Table39.A1" office:value-type="string">
            <text:p text:style-name="P150"><text:span text:style-name="T835">[</text:span><text:a xlink:type="simple" xlink:href="mailto:linux@io" text:style-name="Internet_20_link" text:visited-style-name="Visited_20_Internet_20_Link"><text:span text:style-name="Internet_20_link"><text:span text:style-name="T882">linux@</text:span></text:span></text:a><text:span text:style-name="T882">fidir</text:span><text:span text:style-name="T835">] ls -l</text:span></text:p>
            <text:p text:style-name="P151">total 8</text:p>
            <text:p text:style-name="P151">lrwxrwxrwx 1 fidir fidir 8 Mar 23 19:58 file2 -&gt; file.txt</text:p>
            <text:p text:style-name="P151">-rw-r--r-- <text:s text:c="5"/>2 fidir fidir 6 Mar 23 19:58 file.txt</text:p>
            <text:p text:style-name="P151">-rw-r--r-- <text:s text:c="5"/>2 fidir fidir 6 Mar 23 19:58 hfile3</text:p>
          </table:table-cell>
        </table:table-row>
      </table:table>
      <text:p text:style-name="P201"/>
      <text:p text:style-name="P134"><text:span text:style-name="T879">In reality, </text:span><text:span text:style-name="Source_20_Text"><text:span text:style-name="T876">hfile3</text:span></text:span><text:span text:style-name="T879"> is not a different file, but another reference to the same file. Even though it appears as a separate file in the output of </text:span><text:span text:style-name="Source_20_Text"><text:span text:style-name="T876">ls</text:span></text:span><text:span text:style-name="T879">, it is simply another filename used to access the same underlying data and inode.</text:span></text:p>
      <text:p text:style-name="P201"/>
      <text:p text:style-name="P134"><text:span text:style-name="T879">We add some text to </text:span><text:span text:style-name="T876">file.txt</text:span><text:span text:style-name="T879"> and look at the content of </text:span><text:span text:style-name="T876">hfile3</text:span></text:p>
      <text:p text:style-name="P202"/>
      <table:table table:name="Table40" table:style-name="Table40">
        <table:table-column table:style-name="Table40.A"/>
        <table:table-row table:style-name="Table40.1">
          <table:table-cell table:style-name="Table40.A1" office:value-type="string">
            <text:p text:style-name="P150"><text:span text:style-name="T835">[</text:span><text:a xlink:type="simple" xlink:href="mailto:linux@io" text:style-name="Internet_20_link" text:visited-style-name="Visited_20_Internet_20_Link"><text:span text:style-name="Internet_20_link"><text:span text:style-name="T882">linux@</text:span></text:span></text:a><text:span text:style-name="T882">fidir</text:span><text:span text:style-name="T835">] echo 'world' &gt;&gt; file.txt</text:span></text:p>
            <text:p text:style-name="P150"><text:span text:style-name="T835">[</text:span><text:a xlink:type="simple" xlink:href="mailto:linux@io" text:style-name="Internet_20_link" text:visited-style-name="Visited_20_Internet_20_Link"><text:span text:style-name="Internet_20_link"><text:span text:style-name="T882">linux@</text:span></text:span></text:a><text:span text:style-name="T882">fidir</text:span><text:span text:style-name="T835">] cat hfile3</text:span></text:p>
            <text:p text:style-name="P151">hello</text:p>
            <text:p text:style-name="P151">world</text:p>
          </table:table-cell>
        </table:table-row>
      </table:table>
      <text:p text:style-name="P202"/>
      <text:p text:style-name="P134"><text:span text:style-name="T879">When we write in </text:span><text:span text:style-name="T876">file.txt</text:span><text:span text:style-name="T879"> we are effectively telling Linux: 'Write this text into the file identified by inode number 23364606". Since this inode has two references (two filenames that refer to the same data), Linux updates the data associated with that inode, and both references will then access the updated content.</text:span></text:p>
      <text:p text:style-name="P134"><text:span text:style-name="T879">If we execute </text:span><text:span text:style-name="T881">cat</text:span><text:span text:style-name="T879"> on the symbolik link </text:span><text:span text:style-name="T876">file2</text:span><text:span text:style-name="T879">, it will display the contents of </text:span><text:span text:style-name="T876">file.txt</text:span><text:span text:style-name="T879">. However, </text:span><text:span text:style-name="T876">file2</text:span><text:span text:style-name="T879"> is not a direct reference to </text:span><text:span text:style-name="T876">file.txt</text:span><text:span text:style-name="T879"> in the same way a hard link is. Instead, </text:span><text:span text:style-name="T876">file2</text:span><text:span text:style-name="T879"> is a separate file whose inode contains a pointer to the path of another file. </text:span>In other words, <text:span text:style-name="Source_20_Text"><text:span text:style-name="T876">file2</text:span></text:span> is itself a filesystem object (with its own inode), and that inode stores information that directs the operating system to <text:span text:style-name="Source_20_Text"><text:span text:style-name="T876">file.txt</text:span></text:span>. Therefore, unlike a hard link, a symbolic link does not share the same inode or data as the target file. </text:p>
      <text:p text:style-name="P201"><text:soft-page-break/>The following picture shows this relationship.</text:p>
      <text:p text:style-name="P201"><draw:frame draw:style-name="fr1" draw:name="Image1" text:anchor-type="char" svg:x="0.4173in" svg:y="0.1209in" svg:width="5.6717in" svg:height="4.0839in" draw:z-index="1"><draw:image xlink:href="Pictures/10000001000006C6000005448D02636D.png" xlink:type="simple" xlink:show="embed" xlink:actuate="onLoad" draw:mime-type="image/png"/></draw:frame></text:p>
      <text:p text:style-name="P139"><text:span text:style-name="T878">Fig 1.</text:span><text:span text:style-name="T879"> Relationship between hard links and symbolic links</text:span></text:p>
      <text:p text:style-name="P203"/>
      <text:p text:style-name="P134"><text:span text:style-name="T876">file2</text:span><text:span text:style-name="T879"> is an hard link to the inode 23364884 that is a symbolic link to </text:span><text:span text:style-name="T876">file.txt</text:span><text:span text:style-name="T879"> that is an hard link to the inode 23364606. </text:span><text:span text:style-name="T876">hfile3</text:span><text:span text:style-name="T879"> is another hard link to the same inode. We can also create another hard link to the inode 23364884.</text:span></text:p>
      <text:p text:style-name="P204"/>
      <table:table table:name="Table41" table:style-name="Table41">
        <table:table-column table:style-name="Table41.A"/>
        <table:table-row table:style-name="Table41.1">
          <table:table-cell table:style-name="Table41.A1" office:value-type="string">
            <text:p text:style-name="P150">[<text:a xlink:type="simple" xlink:href="mailto:linux@io" text:style-name="Internet_20_link" text:visited-style-name="Visited_20_Internet_20_Link"><text:span text:style-name="Internet_20_link"><text:span text:style-name="T884">linux@</text:span></text:span></text:a><text:span text:style-name="T884">fidir</text:span>] ln file2 sfile4 </text:p>
            <text:p text:style-name="P150"><text:span text:style-name="T835">[</text:span><text:a xlink:type="simple" xlink:href="mailto:linux@io" text:style-name="Internet_20_link" text:visited-style-name="Visited_20_Internet_20_Link"><text:span text:style-name="Internet_20_link"><text:span text:style-name="T882">linux@</text:span></text:span></text:a><text:span text:style-name="T882">fidir</text:span><text:span text:style-name="T835">] ls -l</text:span></text:p>
            <text:p text:style-name="P151">total 8</text:p>
            <text:p text:style-name="P151">lrwxrwxrwx 2 fidir fidir 8 Mar 23 20:38 file2 -&gt; file.txt</text:p>
            <text:p text:style-name="P151">-rw-r--r-- <text:s text:c="5"/>2 fidir fidir 6 Mar 23 20:38 file.txt</text:p>
            <text:p text:style-name="P151">-rw-r--r-- <text:s text:c="5"/>2 fidir fidir 6 Mar 23 20:38 hfile3</text:p>
            <text:p text:style-name="P151">lrwxrwxrwx 2 fidir fidir 8 Mar 23 20:38 sfile4 -&gt; file.txt</text:p>
          </table:table-cell>
        </table:table-row>
      </table:table>
      <text:p text:style-name="P204"/>
      <text:p text:style-name="P134"><text:span text:style-name="T876">sfile4</text:span><text:span text:style-name="T879"> is another symbolic link to </text:span><text:span text:style-name="T876">file.txt</text:span><text:span text:style-name="T879">, this because we create an hard link that is a reference to an inode that points to another file (</text:span><text:span text:style-name="T876">file.txt</text:span><text:span text:style-name="T879">). </text:span></text:p>
      <text:p text:style-name="P134"><text:span text:style-name="T879">Let's execute </text:span><text:span text:style-name="T876">stat</text:span><text:span text:style-name="T879"> on </text:span><text:span text:style-name="T876">sfile4</text:span></text:p>
      <text:p text:style-name="P201"/>
      <table:table table:name="Table42" table:style-name="Table42">
        <table:table-column table:style-name="Table42.A"/>
        <table:table-row table:style-name="Table42.1">
          <table:table-cell table:style-name="Table42.A1" office:value-type="string">
            <text:p text:style-name="P150">[<text:a xlink:type="simple" xlink:href="mailto:linux@io" text:style-name="Internet_20_link" text:visited-style-name="Visited_20_Internet_20_Link"><text:span text:style-name="Internet_20_link"><text:span text:style-name="T884">linux@</text:span></text:span></text:a><text:span text:style-name="T884">fidir</text:span>] stat sfile4</text:p>
            <text:p text:style-name="P150"><text:s text:c="2"/>File: sfile4 -&gt; file.txt</text:p>
            <text:p text:style-name="P150"><text:s text:c="2"/>Size: 8 <text:s text:c="8"/><text:tab/>Blocks: 0 <text:s text:c="9"/>IO Block: 4096 <text:s text:c="2"/>symbolic link</text:p>
            <text:p text:style-name="P150">Device: 259,2<text:tab/><text:span text:style-name="T833">Inode: </text:span><text:span text:style-name="T815">23364884</text:span><text:span text:style-name="T833"> <text:s text:c="3"/>Links: 2</text:span></text:p>
            <text:p text:style-name="P150">Access: (0777/lrwxrwxrwx) <text:s/>Uid: ( 1000/ <text:s text:c="2"/>fidir) <text:s text:c="2"/>Gid: ( 1000/ <text:s text:c="2"/>fidir)</text:p>
            <text:p text:style-name="P150">Access: 2024-03-23 20:53:24.412128593 +0700</text:p>
            <text:p text:style-name="P150">Modify: 2024-03-23 20:38:10.584102797 +0700</text:p>
            <text:p text:style-name="P150"><text:soft-page-break/>Change: 2024-03-23 20:53:22.808128548 +0700</text:p>
            <text:p text:style-name="P150"><text:s/>Birth: 2024-03-23 20:38:10.584102797 +0700</text:p>
          </table:table-cell>
        </table:table-row>
      </table:table>
      <text:p text:style-name="P201"/>
      <text:p text:style-name="P134"><text:span text:style-name="T879">The inode number is the same of </text:span><text:span text:style-name="T876">file2</text:span><text:span text:style-name="T879">. The following picture show the current scenario.</text:span></text:p>
      <text:p text:style-name="P201"/>
      <text:p text:style-name="P201"><draw:frame draw:style-name="fr2" draw:name="Image2" text:anchor-type="char" svg:width="5.952in" svg:height="4.3819in" draw:z-index="2"><draw:image xlink:href="Pictures/10000001000006FA0000052327E06D51.png" xlink:type="simple" xlink:show="embed" xlink:actuate="onLoad" draw:mime-type="image/png"/></draw:frame></text:p>
      <text:p text:style-name="P139"><text:span text:style-name="T878">Fig 2.</text:span><text:span text:style-name="T879"> Relationship between symbolic and hard links</text:span></text:p>
      <text:p text:style-name="P203"/>
      <text:p text:style-name="P134"><text:span text:style-name="T876">sfile4</text:span><text:span text:style-name="T879"> (like </text:span><text:span text:style-name="T876">file2</text:span><text:span text:style-name="T879">) is an hard link to a symbolic link, or better to an inode that is a symbolic link. </text:span>Both the inodes 23364606 and 23364884 represent a file, but the second represents a file that is a pointer to another file. A symbolic link has no content, is only a pointer to the data of another file.</text:p>
      <text:p text:style-name="P201"/>
      <text:p text:style-name="P201">Let's view the content af all the files </text:p>
      <text:p text:style-name="P201"/>
      <table:table table:name="Table43" table:style-name="Table43">
        <table:table-column table:style-name="Table43.A"/>
        <table:table-row table:style-name="Table43.1">
          <table:table-cell table:style-name="Table43.A1" office:value-type="string">
            <text:p text:style-name="P150">[<text:a xlink:type="simple" xlink:href="mailto:linux@io" text:style-name="Internet_20_link" text:visited-style-name="Visited_20_Internet_20_Link"><text:span text:style-name="Internet_20_link"><text:span text:style-name="T884">linux@</text:span></text:span></text:a><text:span text:style-name="T884">fidir</text:span>] cat *</text:p>
            <text:p text:style-name="P150">hello</text:p>
            <text:p text:style-name="P150">world</text:p>
            <text:p text:style-name="P150">hello</text:p>
            <text:p text:style-name="P150">world</text:p>
            <text:p text:style-name="P150">hello</text:p>
            <text:p text:style-name="P150">world</text:p>
            <text:p text:style-name="P150">hello</text:p>
            <text:p text:style-name="P150">world</text:p>
          </table:table-cell>
        </table:table-row>
      </table:table>
      <text:p text:style-name="P201">We have four references to the same data with only two inodes. </text:p>
      <text:p text:style-name="P134"><text:span text:style-name="T879">The field </text:span><text:span text:style-name="T876">st_nlink </text:span><text:span text:style-name="T879">of the </text:span><text:span text:style-name="T876">stat</text:span><text:span text:style-name="T879"> structure represent the number of the hard links of the file.</text:span></text:p>
      <text:p text:style-name="P134"><text:soft-page-break/><text:span text:style-name="T879">The field </text:span><text:span text:style-name="T876">st_mode</text:span><text:span text:style-name="T879"> define the type and mode of the file.</text:span></text:p>
      <text:p text:style-name="P201"/>
      <text:p text:style-name="P201">On a Linux system, files can be of different types:</text:p>
      <text:p text:style-name="P201"/>
      <text:p text:style-name="P205">Regular file</text:p>
      <text:p text:style-name="P201"><text:tab/>A file that contains data, it can be text or binary</text:p>
      <text:p text:style-name="P201"><text:tab/></text:p>
      <text:p text:style-name="P205">Directory</text:p>
      <text:p text:style-name="P201"><text:tab/>An access point in the file system containing other files and directories</text:p>
      <text:p text:style-name="P201"><text:tab/></text:p>
      <text:p text:style-name="P205">Block file</text:p>
      <text:p text:style-name="P201"><text:tab/>A file that provides buffered I/O access to devices with a fixed-size units of data</text:p>
      <text:p text:style-name="P201"><text:tab/></text:p>
      <text:p text:style-name="P205">Character file</text:p>
      <text:p text:style-name="P201"><text:tab/>A file that provides unbuffered I/O access to devices with variable-size units of data</text:p>
      <text:p text:style-name="P201"/>
      <text:p text:style-name="P205">FIFO</text:p>
      <text:p text:style-name="P134"><text:span text:style-name="T879"><text:tab/>Used for communication between processes, also called </text:span><text:span text:style-name="T883">named pipe</text:span></text:p>
      <text:p text:style-name="P201"/>
      <text:p text:style-name="P205">Socket</text:p>
      <text:p text:style-name="P134"><text:span text:style-name="T883"><text:tab/></text:span><text:span text:style-name="T879">Used for network communication between processes and for non-network <text:tab/>communication between processes on the same host (</text:span><text:span text:style-name="T883">interprocess communication</text:span><text:span text:style-name="T879">)</text:span></text:p>
      <text:p text:style-name="P201"/>
      <text:p text:style-name="P205">Symbolic link</text:p>
      <text:p text:style-name="P201"><text:tab/>A file that points to another file</text:p>
      <text:p text:style-name="P201"/>
      <text:p text:style-name="P201"/>
      <text:p text:style-name="P134"><text:span text:style-name="T879">These types are specified in the </text:span><text:span text:style-name="T876">st_mode</text:span><text:span text:style-name="T879"> field as listed in the following table.</text:span></text:p>
      <text:p text:style-name="P201"/>
      <text:p text:style-name="P201"/>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97">S_IFMT</text:p>
          </table:table-cell>
          <table:table-cell table:style-name="Table44.A1" office:value-type="string">
            <text:p text:style-name="P197">0170000</text:p>
          </table:table-cell>
          <table:table-cell table:style-name="Table44.C1" office:value-type="string">
            <text:p text:style-name="P159">bit mask for the file type bit field</text:p>
          </table:table-cell>
        </table:table-row>
        <table:table-row table:style-name="Table44.1">
          <table:table-cell table:style-name="Table44.A2" office:value-type="string">
            <text:p text:style-name="P197">S_IFBLK</text:p>
          </table:table-cell>
          <table:table-cell table:style-name="Table44.A2" office:value-type="string">
            <text:p text:style-name="P197">0060000</text:p>
          </table:table-cell>
          <table:table-cell table:style-name="Table44.C2" office:value-type="string">
            <text:p text:style-name="P159">block device</text:p>
          </table:table-cell>
        </table:table-row>
        <table:table-row table:style-name="Table44.1">
          <table:table-cell table:style-name="Table44.A2" office:value-type="string">
            <text:p text:style-name="P197">S_IFCHR</text:p>
          </table:table-cell>
          <table:table-cell table:style-name="Table44.A2" office:value-type="string">
            <text:p text:style-name="P197">0020000</text:p>
          </table:table-cell>
          <table:table-cell table:style-name="Table44.C2" office:value-type="string">
            <text:p text:style-name="P159">character device</text:p>
          </table:table-cell>
        </table:table-row>
        <table:table-row table:style-name="Table44.1">
          <table:table-cell table:style-name="Table44.A2" office:value-type="string">
            <text:p text:style-name="P197">S_IFDIR</text:p>
          </table:table-cell>
          <table:table-cell table:style-name="Table44.A2" office:value-type="string">
            <text:p text:style-name="P197">0040000</text:p>
          </table:table-cell>
          <table:table-cell table:style-name="Table44.C2" office:value-type="string">
            <text:p text:style-name="P159">directory</text:p>
          </table:table-cell>
        </table:table-row>
        <table:table-row table:style-name="Table44.1">
          <table:table-cell table:style-name="Table44.A2" office:value-type="string">
            <text:p text:style-name="P197">S_IFIFO</text:p>
          </table:table-cell>
          <table:table-cell table:style-name="Table44.A2" office:value-type="string">
            <text:p text:style-name="P197">0010000</text:p>
          </table:table-cell>
          <table:table-cell table:style-name="Table44.C2" office:value-type="string">
            <text:p text:style-name="P159">FIFO</text:p>
          </table:table-cell>
        </table:table-row>
        <table:table-row table:style-name="Table44.1">
          <table:table-cell table:style-name="Table44.A2" office:value-type="string">
            <text:p text:style-name="P197">S_IFLNK</text:p>
          </table:table-cell>
          <table:table-cell table:style-name="Table44.A2" office:value-type="string">
            <text:p text:style-name="P197">0120000</text:p>
          </table:table-cell>
          <table:table-cell table:style-name="Table44.C2" office:value-type="string">
            <text:p text:style-name="P159">symbolic link</text:p>
          </table:table-cell>
        </table:table-row>
        <table:table-row table:style-name="Table44.1">
          <table:table-cell table:style-name="Table44.A2" office:value-type="string">
            <text:p text:style-name="P197">S_IFREG</text:p>
          </table:table-cell>
          <table:table-cell table:style-name="Table44.A2" office:value-type="string">
            <text:p text:style-name="P197">0100000</text:p>
          </table:table-cell>
          <table:table-cell table:style-name="Table44.C2" office:value-type="string">
            <text:p text:style-name="P159">regular file</text:p>
          </table:table-cell>
        </table:table-row>
        <table:table-row table:style-name="Table44.1">
          <table:table-cell table:style-name="Table44.A2" office:value-type="string">
            <text:p text:style-name="P197">S_IFSOCK</text:p>
          </table:table-cell>
          <table:table-cell table:style-name="Table44.A2" office:value-type="string">
            <text:p text:style-name="P197">0140000</text:p>
          </table:table-cell>
          <table:table-cell table:style-name="Table44.C2" office:value-type="string">
            <text:p text:style-name="P159">socket</text:p>
          </table:table-cell>
        </table:table-row>
      </table:table>
      <text:p text:style-name="P139"/>
      <text:p text:style-name="P139"><text:span text:style-name="T878">Tab 4.</text:span><text:span text:style-name="T879"> Values of <text:s/></text:span><text:span text:style-name="T876">st_mode</text:span></text:p>
      <text:p text:style-name="P139"/>
      <text:p text:style-name="P134"><text:span text:style-name="T879">The program </text:span><text:span text:style-name="T876">getinfo.c</text:span><text:span text:style-name="T879"> retrieves information about the file supplied on the command line</text:span><text:span text:style-name="footnote_20_reference1"><text:span text:style-name="T879"><text:note text:id="ftn22" text:note-class="footnote"><text:note-citation>22</text:note-citation><text:note-body><text:p text:style-name="Footnote">The code is taken from the <text:span text:style-name="T843">stat(2)</text:span> manual page</text:p></text:note-body></text:note></text:span></text:span><text:span text:style-name="T879">.</text:span></text:p>
      <text:p text:style-name="P201"/>
      <text:p text:style-name="P206"/>
      <text:p text:style-name="P162"><text:soft-page-break/><text:span text:style-name="T839">1</text:span><text:span text:style-name="T840"> #include </text:span><text:span text:style-name="T841">&lt;stdint.h&gt;</text:span></text:p>
      <text:p text:style-name="P144"><text:span text:style-name="T839">2 </text:span><text:span text:style-name="T824">#include </text:span><text:span text:style-name="T831">&lt;stdio.h&gt;</text:span></text:p>
      <text:p text:style-name="P144"><text:span text:style-name="T839">3 </text:span><text:span text:style-name="T824">#include </text:span><text:span text:style-name="T831">&lt;stdlib.h&gt;</text:span></text:p>
      <text:p text:style-name="P144"><text:span text:style-name="T839">4 </text:span><text:span text:style-name="T824">#include </text:span><text:span text:style-name="T831">&lt;sys/stat.h&gt;</text:span></text:p>
      <text:p text:style-name="P144"><text:span text:style-name="T839">5 </text:span><text:span text:style-name="T824">#include </text:span><text:span text:style-name="T831">&lt;sys/sysmacros.h&gt;</text:span></text:p>
      <text:p text:style-name="P144"><text:span text:style-name="T839">6 </text:span><text:span text:style-name="T824">#include </text:span><text:span text:style-name="T831">&lt;time.h&gt;</text:span></text:p>
      <text:p text:style-name="P143"/>
      <text:p text:style-name="P144"><text:span text:style-name="T839">7 </text:span><text:span text:style-name="T824">int</text:span><text:span text:style-name="T825"> main (</text:span><text:span text:style-name="T824">int</text:span><text:span text:style-name="T825"> argc, </text:span><text:span text:style-name="T824">char</text:span><text:span text:style-name="T825"> *argv</text:span><text:span text:style-name="T824">[]</text:span><text:span text:style-name="T825">)</text:span></text:p>
      <text:p text:style-name="P144"><text:span text:style-name="T839">8 </text:span><text:span text:style-name="T825">{</text:span></text:p>
      <text:p text:style-name="P144"><text:span text:style-name="T839">9 </text:span><text:span text:style-name="T824"><text:tab/>struct</text:span><text:span text:style-name="T825"> stat sb;</text:span></text:p>
      <text:p text:style-name="P144"><text:span text:style-name="T839">10 </text:span><text:span text:style-name="T824"><text:tab/>if</text:span><text:span text:style-name="T825"> (argc != </text:span><text:span text:style-name="T832">2</text:span><text:span text:style-name="T825">) {</text:span></text:p>
      <text:p text:style-name="P144"><text:span text:style-name="T839">11 </text:span><text:span text:style-name="T825"><text:tab/><text:tab/>fprintf(</text:span><text:span text:style-name="T824">stderr</text:span><text:span text:style-name="T825">, </text:span><text:span text:style-name="T831">"Usage: %s &lt;pathanme&gt;\n"</text:span><text:span text:style-name="T825">, argv[</text:span><text:span text:style-name="T832">0</text:span><text:span text:style-name="T825">]);</text:span></text:p>
      <text:p text:style-name="P144"><text:span text:style-name="T839">12 </text:span><text:span text:style-name="T825"><text:tab/><text:tab/>exit (</text:span><text:span text:style-name="T824">EXIT_FAILURE</text:span><text:span text:style-name="T825">);</text:span></text:p>
      <text:p text:style-name="P144"><text:span text:style-name="T839">13 </text:span><text:span text:style-name="T825"><text:tab/>}</text:span></text:p>
      <text:p text:style-name="P144"><text:span text:style-name="T839">14 </text:span><text:span text:style-name="T824"><text:tab/>if</text:span><text:span text:style-name="T825"> (</text:span><text:span text:style-name="T826">lstat</text:span><text:span text:style-name="T825">(argv[</text:span><text:span text:style-name="T832">1</text:span><text:span text:style-name="T825">], &amp;sb) == -</text:span><text:span text:style-name="T832">1</text:span><text:span text:style-name="T825">) {</text:span></text:p>
      <text:p text:style-name="P144"><text:span text:style-name="T839">15</text:span><text:span text:style-name="T825"><text:tab/><text:tab/>perror(</text:span><text:span text:style-name="T831">"lstat"</text:span><text:span text:style-name="T825">);</text:span></text:p>
      <text:p text:style-name="P144"><text:span text:style-name="T839">16 </text:span><text:span text:style-name="T825"><text:tab/><text:tab/>exit (</text:span><text:span text:style-name="T824">EXIT_FAILURE</text:span><text:span text:style-name="T825">);</text:span></text:p>
      <text:p text:style-name="P144"><text:span text:style-name="T839">17 </text:span><text:span text:style-name="T825"><text:tab/>}</text:span></text:p>
      <text:p text:style-name="P144"><text:span text:style-name="T839">18 </text:span><text:span text:style-name="T825"><text:tab/>printf(</text:span><text:span text:style-name="T831">"ID of device: [%x, %x]\n"</text:span><text:span text:style-name="T825">, </text:span><text:span text:style-name="T824">major</text:span><text:span text:style-name="T825">(sb.st_dev), \ <text:tab/><text:tab/><text:tab/><text:tab/></text:span><text:span text:style-name="T824">minor</text:span><text:span text:style-name="T825">(sb.st_dev));</text:span></text:p>
      <text:p text:style-name="P144"><text:span text:style-name="T839">19 </text:span><text:span text:style-name="T825"><text:tab/>printf(</text:span><text:span text:style-name="T831">"File type: "</text:span><text:span text:style-name="T825">);</text:span></text:p>
      <text:p text:style-name="P144"><text:span text:style-name="T839">20 </text:span><text:span text:style-name="T824"><text:tab/>switch</text:span><text:span text:style-name="T825">(sb.st_mode &amp; S_IFMT) {</text:span></text:p>
      <text:p text:style-name="P144"><text:span text:style-name="T839">21 </text:span><text:span text:style-name="T824"><text:tab/><text:tab/>case</text:span><text:span text:style-name="T825"> S_IFBLK: printf (</text:span><text:span text:style-name="T831">"block device \n"</text:span><text:span text:style-name="T825">); </text:span><text:span text:style-name="T824">break</text:span><text:span text:style-name="T825">;</text:span></text:p>
      <text:p text:style-name="P144"><text:span text:style-name="T839">22 </text:span><text:span text:style-name="T824"><text:tab/><text:tab/>case</text:span><text:span text:style-name="T825"> S_IFCHR: printf (</text:span><text:span text:style-name="T831">"character device \n"</text:span><text:span text:style-name="T825">); </text:span><text:span text:style-name="T824">break</text:span><text:span text:style-name="T825">;</text:span></text:p>
      <text:p text:style-name="P144"><text:span text:style-name="T839">23 </text:span><text:span text:style-name="T824"><text:tab/><text:tab/>case</text:span><text:span text:style-name="T825"> S_IFDIR: printf (</text:span><text:span text:style-name="T831">"directory \n"</text:span><text:span text:style-name="T825">); </text:span><text:span text:style-name="T824">break</text:span><text:span text:style-name="T825">; </text:span></text:p>
      <text:p text:style-name="P144"><text:span text:style-name="T839">24 </text:span><text:span text:style-name="T824"><text:tab/><text:tab/>case</text:span><text:span text:style-name="T825"> S_IFIFO: printf (</text:span><text:span text:style-name="T831">"FIFO/pipe \n"</text:span><text:span text:style-name="T825">); </text:span><text:span text:style-name="T824">break</text:span><text:span text:style-name="T825">; </text:span></text:p>
      <text:p text:style-name="P144"><text:span text:style-name="T839">25 </text:span><text:span text:style-name="T824"><text:tab/><text:tab/>case</text:span><text:span text:style-name="T825"> S_IFLNK: printf (</text:span><text:span text:style-name="T831">"symlink \n"</text:span><text:span text:style-name="T825">); </text:span><text:span text:style-name="T824">break</text:span><text:span text:style-name="T825">; </text:span></text:p>
      <text:p text:style-name="P144"><text:span text:style-name="T839">26 </text:span><text:span text:style-name="T824"><text:tab/><text:tab/>case</text:span><text:span text:style-name="T825"> S_IFREG: printf (</text:span><text:span text:style-name="T831">"regular file \n"</text:span><text:span text:style-name="T825">); </text:span><text:span text:style-name="T824">break</text:span><text:span text:style-name="T825">; </text:span></text:p>
      <text:p text:style-name="P144"><text:span text:style-name="T839">27 </text:span><text:span text:style-name="T824"><text:tab/><text:tab/>case</text:span><text:span text:style-name="T825"> S_IFSOCK: printf (</text:span><text:span text:style-name="T831">"socket \n"</text:span><text:span text:style-name="T825">); </text:span><text:span text:style-name="T824">break</text:span><text:span text:style-name="T825">; </text:span></text:p>
      <text:p text:style-name="P144"><text:span text:style-name="T839">28 </text:span><text:span text:style-name="T824"><text:tab/><text:tab/>default</text:span><text:span text:style-name="T825">: printf(</text:span><text:span text:style-name="T831">"unknown? \n"</text:span><text:span text:style-name="T825">); </text:span><text:span text:style-name="T824">break</text:span><text:span text:style-name="T825">;</text:span></text:p>
      <text:p text:style-name="P144"><text:span text:style-name="T839">29 </text:span><text:span text:style-name="T825"><text:tab/>} </text:span></text:p>
      <text:p text:style-name="P144"><text:span text:style-name="T839">30 </text:span><text:span text:style-name="T825"><text:tab/>printf (</text:span><text:span text:style-name="T831">"I-node number: %ju\n"</text:span><text:span text:style-name="T825">, (</text:span><text:span text:style-name="T824">uintmax_t</text:span><text:span text:style-name="T825">) sb.st_ino);</text:span></text:p>
      <text:p text:style-name="P144"><text:span text:style-name="T839">31 </text:span><text:span text:style-name="T825"><text:tab/>printf (</text:span><text:span text:style-name="T831">"Mode: %jo (octal)\n"</text:span><text:span text:style-name="T825">, (</text:span><text:span text:style-name="T824">uintmax_t</text:span><text:span text:style-name="T825">) sb.st_mode);</text:span></text:p>
      <text:p text:style-name="P144"><text:span text:style-name="T839">32 </text:span><text:span text:style-name="T825"><text:tab/>printf (</text:span><text:span text:style-name="T831">"link count: %ju\n"</text:span><text:span text:style-name="T825">, (</text:span><text:span text:style-name="T824">uintmax_t</text:span><text:span text:style-name="T825">) sb.st_nlink);</text:span></text:p>
      <text:p text:style-name="P144"><text:span text:style-name="T839">33 </text:span><text:span text:style-name="T825"><text:tab/>printf (</text:span><text:span text:style-name="T831">"Ownership: UID=%ju GID=%ju\n"</text:span><text:span text:style-name="T825">, (</text:span><text:span text:style-name="T824">uintmax_t</text:span><text:span text:style-name="T825">) sb.st_uid,\ <text:tab/><text:tab/><text:tab/>(</text:span><text:span text:style-name="T824">uintmax_t</text:span><text:span text:style-name="T825">) sb.st_gid);</text:span></text:p>
      <text:p text:style-name="P144"><text:span text:style-name="T839">34 </text:span><text:span text:style-name="T825"><text:tab/>printf (</text:span><text:span text:style-name="T831">"I/O block size: i %jd bytes\n"</text:span><text:span text:style-name="T825">, (</text:span><text:span text:style-name="T824">intmax_t</text:span><text:span text:style-name="T825">) sb.st_blksize);</text:span></text:p>
      <text:p text:style-name="P144"><text:span text:style-name="T839">35 </text:span><text:span text:style-name="T825"><text:tab/>printf (</text:span><text:span text:style-name="T831">"File size: %jd bytes\n"</text:span><text:span text:style-name="T825">, (</text:span><text:span text:style-name="T824">intmax_t</text:span><text:span text:style-name="T825">) sb.st_blocks);</text:span></text:p>
      <text:p text:style-name="P144"><text:span text:style-name="T839">36 </text:span><text:span text:style-name="T825"><text:tab/>printf (</text:span><text:span text:style-name="T831">"Block allocated: %jd\n"</text:span><text:span text:style-name="T825">, (</text:span><text:span text:style-name="T824">intmax_t</text:span><text:span text:style-name="T825">) sb.st_blocks);</text:span></text:p>
      <text:p text:style-name="P144"><text:span text:style-name="T839">37 </text:span><text:span text:style-name="T825"><text:tab/>printf (</text:span><text:span text:style-name="T831">"Last staus change: %s"</text:span><text:span text:style-name="T825">, ctime(&amp;sb.st_ctime));</text:span></text:p>
      <text:p text:style-name="P144"><text:span text:style-name="T839">38 </text:span><text:span text:style-name="T825"><text:tab/>printf (</text:span><text:span text:style-name="T831">"Last file access: %s"</text:span><text:span text:style-name="T825">, ctime(&amp;sb.st_atime)); </text:span></text:p>
      <text:p text:style-name="P144"><text:span text:style-name="T839">39 </text:span><text:span text:style-name="T825"><text:tab/>printf (</text:span><text:span text:style-name="T831">"Last file modifications: %s"</text:span><text:span text:style-name="T825">, ctime(&amp;sb.st_mtime)); </text:span></text:p>
      <text:p text:style-name="P144"><text:span text:style-name="T839">40 </text:span><text:span text:style-name="T825"><text:tab/>exit (</text:span><text:span text:style-name="T824">EXIT_SUCCESS</text:span><text:span text:style-name="T825">);</text:span></text:p>
      <text:p text:style-name="P144"><text:span text:style-name="T839">41 </text:span><text:span text:style-name="T825">}</text:span></text:p>
      <text:p text:style-name="P147"/>
      <text:p text:style-name="P139"><text:span text:style-name="T878">getinfo.c </text:span><text:span text:style-name="T879">Gets the information of the file</text:span></text:p>
      <text:p text:style-name="P207"/>
      <text:p text:style-name="P134"><text:soft-page-break/><text:span text:style-name="T885">At line 9, the program declares a variable of type </text:span><text:span text:style-name="Source_20_Text"><text:span text:style-name="T886">struct stat</text:span></text:span><text:span text:style-name="T885"> named </text:span><text:span text:style-name="Source_20_Text"><text:span text:style-name="T886">sb</text:span></text:span><text:span text:style-name="T885">, which will store the file information returned by </text:span><text:span text:style-name="Source_20_Text"><text:span text:style-name="T886">lstat</text:span></text:span><text:span text:style-name="T885">, and at line 10, it checks whether exactly one pathname argument was provided on the command line.</text:span></text:p>
      <text:p text:style-name="P134"><text:span text:style-name="T885">At lines 11–12, if the pathname is missing, we print a usage message to </text:span><text:span text:style-name="Source_20_Text"><text:span text:style-name="T886">stderr</text:span></text:span><text:span text:style-name="T885"> and terminates using </text:span><text:span text:style-name="Source_20_Text"><text:span text:style-name="T886">exit(EXIT_FAILURE)</text:span></text:span><text:span text:style-name="T885">.</text:span></text:p>
      <text:p text:style-name="P134"><text:span text:style-name="T885">At line 14, the program calls </text:span><text:span text:style-name="Source_20_Text"><text:span text:style-name="T886">lstat</text:span></text:span><text:span text:style-name="T885">, passing the pathname provided by the user and the address of the </text:span><text:span text:style-name="Source_20_Text"><text:span text:style-name="T886">sb</text:span></text:span><text:span text:style-name="T885"> structure, where the file metadata will be stored. Next, at lines 15–16, if </text:span><text:span text:style-name="Source_20_Text"><text:span text:style-name="T886">lstat</text:span></text:span><text:span text:style-name="T885"> fails, we print the corresponding error message using </text:span><text:span text:style-name="Source_20_Text"><text:span text:style-name="T886">perror</text:span></text:span><text:span text:style-name="T885"> and terminates with </text:span><text:span text:style-name="Source_20_Text"><text:span text:style-name="T886">EXIT_FAILURE</text:span></text:span><text:span text:style-name="T885">.</text:span></text:p>
      <text:p text:style-name="P134"><text:span text:style-name="T885">At line 18, the program prints the major and minor numbers of the device containing the file by using the functions </text:span><text:span text:style-name="Source_20_Text"><text:span text:style-name="T886">major</text:span></text:span><text:span text:style-name="T885"> and </text:span><text:span text:style-name="Source_20_Text"><text:span text:style-name="T886">minor</text:span></text:span><text:span text:style-name="Source_20_Text"><text:span text:style-name="T887"><text:note text:id="ftn23" text:note-class="footnote"><text:note-citation>23</text:note-citation><text:note-body><text:p text:style-name="Footnote">On Linux each device has a major and a minor number, the major number represents the device driver (IDE/SATA disk driver, floppy, serial port, etc..), the minor number identifies the device (many devices can share the same device driver)</text:p></text:note-body></text:note></text:span></text:span><text:span text:style-name="T885"> defined in </text:span><text:span text:style-name="Source_20_Text"><text:span text:style-name="T886">sys/sysmacros.h</text:span></text:span><text:span text:style-name="T885">.</text:span></text:p>
      <text:p text:style-name="P134"><text:span text:style-name="T885">At line 19, it starts to print the type of the file. The program performs a bitwise AND operation between </text:span><text:span text:style-name="Source_20_Text"><text:span text:style-name="T886">sb.st_mode</text:span></text:span><text:span text:style-name="T885"> and the constant </text:span><text:span text:style-name="Source_20_Text"><text:span text:style-name="T886">S_IFMT</text:span></text:span><text:span text:style-name="Source_20_Text"><text:span text:style-name="T888"><text:note text:id="ftn24" text:note-class="footnote"><text:note-citation>24</text:note-citation><text:note-body><text:p text:style-name="Footnote"><text:span text:style-name="T843">S_IFMT</text:span> is the bitmask for the file type, AND-ing with <text:span text:style-name="T821">sb.st_mode</text:span> return the file type. It is defined in <text:span text:style-name="T821">sys/stat.h</text:span></text:p></text:note-body></text:note></text:span></text:span><text:span text:style-name="T885"> at line 20, in order to extract the file type information from the </text:span><text:span text:style-name="Source_20_Text"><text:span text:style-name="T886">mode</text:span></text:span><text:span text:style-name="T885"> field.</text:span></text:p>
      <text:p text:style-name="P134"><text:span text:style-name="T885">At lines 21–28, we use a </text:span><text:span text:style-name="Source_20_Text"><text:span text:style-name="T886">switch</text:span></text:span><text:span text:style-name="T885"> statement to determine the file type and print the</text:span><text:span text:style-name="T889"> </text:span><text:span text:style-name="T885">corresponding description, such as regular file, directory, symbolic link, socket, or device. Then, at line 30, we print the inode number stored in </text:span><text:span text:style-name="Source_20_Text"><text:span text:style-name="T886">sb.st_ino</text:span></text:span><text:span text:style-name="T885"> after casting it to </text:span><text:span text:style-name="Source_20_Text"><text:span text:style-name="T886">uintmax_t</text:span></text:span><text:span text:style-name="Source_20_Text"><text:span text:style-name="T888"><text:note text:id="ftn25" text:note-class="footnote"><text:note-citation>25</text:note-citation><text:note-body><text:p text:style-name="Footnote"><text:span text:style-name="T843">intmax_t</text:span> and <text:span text:style-name="T843">uintmax_t</text:span> are the signed and signed types to represent any value of any integer type supported by the implementation, see the <text:span text:style-name="T821">intmax(3type)</text:span><text:span text:style-name="T820"> manual page. </text:span>It is used for the inodes because this can have larger values. Theese types are defined in <text:span text:style-name="T843">stdint.h</text:span></text:p></text:note-body></text:note></text:span></text:span><text:span text:style-name="T885">.</text:span></text:p>
      <text:p text:style-name="P134"><text:span text:style-name="T885">At line 31, the file mode in octal format is printed after casting </text:span><text:span text:style-name="Source_20_Text"><text:span text:style-name="T886">sb.st_mode</text:span></text:span><text:span text:style-name="T885"> to </text:span><text:span text:style-name="Source_20_Text"><text:span text:style-name="T886">uintmax_t</text:span></text:span><text:span text:style-name="T885">.</text:span></text:p>
      <text:p text:style-name="P134"><text:span text:style-name="T885">At line 32, the number of hard links associated with the file is printed using the field </text:span><text:span text:style-name="Source_20_Text"><text:span text:style-name="T886">sb.st_nlink</text:span></text:span><text:span text:style-name="T885">.</text:span></text:p>
      <text:p text:style-name="P134"><text:span text:style-name="T885">After printing the user ID (</text:span><text:span text:style-name="Source_20_Text"><text:span text:style-name="T885">UID</text:span></text:span><text:span text:style-name="T885">) and group ID (</text:span><text:span text:style-name="Source_20_Text"><text:span text:style-name="T885">GID</text:span></text:span><text:span text:style-name="T885">) that own the file at line 33, the program prints the preferred I/O block size for the filesystem and at line 35 prints the size of the file.</text:span></text:p>
      <text:p text:style-name="P207">At line 36, it prints the number of allocated blocks used by the file.</text:p>
      <text:p text:style-name="P134"><text:span text:style-name="T885">At lines 37–39, it calls </text:span><text:span text:style-name="Source_20_Text"><text:span text:style-name="T886">ctime</text:span></text:span><text:span text:style-name="Source_20_Text"><text:span text:style-name="T887"><text:note text:id="ftn26" text:note-class="footnote"><text:note-citation>26</text:note-citation><text:note-body><text:p text:style-name="Footnote"><text:span text:style-name="T843">ctim</text:span><text:span text:style-name="T821">e</text:span> takes a pointer as argument, is defined in <text:span text:style-name="T843">time.h</text:span></text:p></text:note-body></text:note></text:span></text:span><text:span text:style-name="T885"> to convert the timestamps stored in </text:span><text:span text:style-name="Source_20_Text"><text:span text:style-name="T886">sb.st_ctime</text:span></text:span><text:span text:style-name="T885">, </text:span><text:span text:style-name="Source_20_Text"><text:span text:style-name="T886">sb.st_atime</text:span></text:span><text:span text:style-name="T885">, and </text:span><text:span text:style-name="Source_20_Text"><text:span text:style-name="T886">sb.st_mtime</text:span></text:span><text:span text:style-name="T885"> from </text:span><text:span text:style-name="Source_20_Text"><text:span text:style-name="T886">time_t</text:span></text:span><text:span text:style-name="T885"> format into human-readable ASCII strings, and then prints them.</text:span></text:p>
      <text:p text:style-name="P207"/>
      <text:p text:style-name="P207">Let's execute the program passing the source file</text:p>
      <text:p text:style-name="P207"/>
      <table:table table:name="Table45" table:style-name="Table45">
        <table:table-column table:style-name="Table45.A"/>
        <table:table-row table:style-name="Table45.1">
          <table:table-cell table:style-name="Table45.A1" office:value-type="string">
            <text:p text:style-name="P150">[<text:a xlink:type="simple" xlink:href="mailto:linux@io" text:style-name="Internet_20_link" text:visited-style-name="Visited_20_Internet_20_Link"><text:span text:style-name="Internet_20_link"><text:span text:style-name="T884">linux@</text:span></text:span></text:a><text:span text:style-name="T884">fidir</text:span>] ./getinfo getinfo.c</text:p>
            <text:p text:style-name="P208">ID of device: <text:tab/><text:tab/><text:tab/>[103, 2]</text:p>
            <text:p text:style-name="P208">File type: <text:s text:c="2"/><text:tab/><text:tab/><text:tab/>regular file </text:p>
            <text:p text:style-name="P208">I-node number:<text:tab/><text:tab/>23629952</text:p>
            <text:p text:style-name="P208">Mode: <text:tab/><text:tab/><text:tab/><text:tab/>100644 (octal)</text:p>
            <text:p text:style-name="P208">link count: <text:tab/><text:tab/><text:tab/>1</text:p>
            <text:p text:style-name="P208">Ownership: <text:tab/><text:tab/><text:tab/>UID=1000 <text:s text:c="2"/>GID=1000</text:p>
            <text:p text:style-name="P208">I/O block size: i<text:tab/><text:tab/>4096 bytes</text:p>
            <text:p text:style-name="P208">File size: <text:tab/><text:tab/><text:tab/>8 bytes</text:p>
            <text:p text:style-name="P208">Block allocated: <text:tab/><text:tab/>8</text:p>
            <text:p text:style-name="P208">Last staus change: <text:tab/><text:tab/>Sun Mar 24 22:06:09 2024</text:p>
            <text:p text:style-name="P208"><text:soft-page-break/>Last file access: <text:tab/><text:tab/>Sun Mar 24 22:06:29 2024</text:p>
            <text:p text:style-name="P208">Last file modifications:<text:tab/>Sun Mar 24 22:06:09 2024</text:p>
          </table:table-cell>
        </table:table-row>
      </table:table>
      <text:p text:style-name="P207"/>
      <text:p text:style-name="P207">Let's execute the program passing a device file</text:p>
      <text:p text:style-name="P207"/>
      <table:table table:name="Table46" table:style-name="Table46">
        <table:table-column table:style-name="Table46.A"/>
        <table:table-row table:style-name="Table46.1">
          <table:table-cell table:style-name="Table46.A1" office:value-type="string">
            <text:p text:style-name="P150">[<text:a xlink:type="simple" xlink:href="mailto:linux@io" text:style-name="Internet_20_link" text:visited-style-name="Visited_20_Internet_20_Link"><text:span text:style-name="Internet_20_link"><text:span text:style-name="T884">linux@</text:span></text:span></text:a><text:span text:style-name="T884">fidir</text:span>] ./getInfo /dev/tty0</text:p>
            <text:p text:style-name="P150">ID of device: <text:tab/><text:tab/><text:tab/>[0, 5]</text:p>
            <text:p text:style-name="P150">File type: <text:s text:c="2"/><text:tab/><text:tab/><text:tab/>character device </text:p>
            <text:p text:style-name="P150">I-node number:<text:tab/><text:tab/>13</text:p>
            <text:p text:style-name="P150">Mode: <text:tab/><text:tab/><text:tab/><text:tab/>20620 (octal)</text:p>
            <text:p text:style-name="P150">link count: <text:tab/><text:tab/><text:tab/>1</text:p>
            <text:p text:style-name="P150">Ownership: <text:tab/><text:tab/><text:tab/>UID=0 <text:s text:c="2"/>GID=5</text:p>
            <text:p text:style-name="P150">I/O block size: i<text:tab/><text:tab/>4096 bytes</text:p>
            <text:p text:style-name="P150">File size: <text:tab/><text:tab/><text:tab/>0 bytes</text:p>
            <text:p text:style-name="P150">Block allocated: <text:tab/><text:tab/>0</text:p>
            <text:p text:style-name="P150">Last staus change: <text:tab/><text:tab/>Wed Mar 20 17:57:16 2024</text:p>
            <text:p text:style-name="P150">Last file access: <text:tab/><text:tab/>Wed Mar 20 17:57:16 2024</text:p>
            <text:p text:style-name="P150">Last file modifications:<text:tab/>Wed Mar 20 17:57:16 2024</text:p>
          </table:table-cell>
        </table:table-row>
      </table:table>
      <text:p text:style-name="P207"/>
      <text:p text:style-name="P207"/>
      <text:p text:style-name="P207"/>
      <text:p text:style-name="P207"/>
      <text:p text:style-name="P209">Permissions</text:p>
      <text:p text:style-name="P207"/>
      <text:p text:style-name="P207">On Linux system (and Unix systems) each file has a set of permissions that defines the access mode to the file. </text:p>
      <text:p text:style-name="P207"><draw:frame draw:style-name="fr2" draw:name="Image3" text:anchor-type="char" svg:width="3.8417in" svg:height="1.3091in" draw:z-index="0"><draw:image xlink:href="Pictures/10000001000001EA000000A709FAD2B7.png" xlink:type="simple" xlink:show="embed" xlink:actuate="onLoad" draw:mime-type="image/png"/></draw:frame></text:p>
      <text:p text:style-name="P204"/>
      <text:p text:style-name="P204"/>
      <text:p text:style-name="P198"/>
      <text:p text:style-name="P198"/>
      <text:p text:style-name="P198"/>
      <text:p text:style-name="P198"/>
      <text:p text:style-name="P198"/>
      <text:p text:style-name="P139"><text:span text:style-name="T890">Fig 3.</text:span><text:span text:style-name="T885"> File permissions</text:span></text:p>
      <text:p text:style-name="P198"/>
      <text:p text:style-name="P207">Permission are divided in 3 categories: permissions of the Owner (user) of the file, permissions of the Group (of the owner and therefore of the file) and Other (other users). The first field defines the type of the file.</text:p>
      <text:p text:style-name="P210"/>
      <table:table table:name="Table47" table:style-name="Table47">
        <table:table-column table:style-name="Table47.A"/>
        <table:table-column table:style-name="Table47.B"/>
        <table:table-row table:style-name="Table47.1">
          <table:table-cell table:style-name="Table47.A1" office:value-type="string">
            <text:p text:style-name="P211">-</text:p>
          </table:table-cell>
          <table:table-cell table:style-name="Table47.B1" office:value-type="string">
            <text:p text:style-name="P159">regular file</text:p>
          </table:table-cell>
        </table:table-row>
        <table:table-row table:style-name="Table47.1">
          <table:table-cell table:style-name="Table47.A2" office:value-type="string">
            <text:p text:style-name="P211">l</text:p>
          </table:table-cell>
          <table:table-cell table:style-name="Table47.B2" office:value-type="string">
            <text:p text:style-name="P159">symbolic link</text:p>
          </table:table-cell>
        </table:table-row>
        <table:table-row table:style-name="Table47.1">
          <table:table-cell table:style-name="Table47.A2" office:value-type="string">
            <text:p text:style-name="P211">b</text:p>
          </table:table-cell>
          <table:table-cell table:style-name="Table47.B2" office:value-type="string">
            <text:p text:style-name="P159">block device file</text:p>
          </table:table-cell>
        </table:table-row>
        <table:table-row table:style-name="Table47.1">
          <table:table-cell table:style-name="Table47.A2" office:value-type="string">
            <text:p text:style-name="P211">c</text:p>
          </table:table-cell>
          <table:table-cell table:style-name="Table47.B2" office:value-type="string">
            <text:p text:style-name="P159">character device file</text:p>
          </table:table-cell>
        </table:table-row>
        <table:table-row table:style-name="Table47.1">
          <table:table-cell table:style-name="Table47.A2" office:value-type="string">
            <text:p text:style-name="P211">d</text:p>
          </table:table-cell>
          <table:table-cell table:style-name="Table47.B2" office:value-type="string">
            <text:p text:style-name="P159">directory</text:p>
          </table:table-cell>
        </table:table-row>
        <table:table-row table:style-name="Table47.1">
          <table:table-cell table:style-name="Table47.A2" office:value-type="string">
            <text:p text:style-name="P211">p</text:p>
          </table:table-cell>
          <table:table-cell table:style-name="Table47.B2" office:value-type="string">
            <text:p text:style-name="P159">FIFO (named pipe)</text:p>
          </table:table-cell>
        </table:table-row>
        <text:soft-page-break/>
        <table:table-row table:style-name="Table47.1">
          <table:table-cell table:style-name="Table47.A2" office:value-type="string">
            <text:p text:style-name="P211">s</text:p>
          </table:table-cell>
          <table:table-cell table:style-name="Table47.B2" office:value-type="string">
            <text:p text:style-name="P159">socket</text:p>
          </table:table-cell>
        </table:table-row>
      </table:table>
      <text:p text:style-name="P212"/>
      <text:p text:style-name="P139"><text:span text:style-name="T890">Tab 5.</text:span><text:span text:style-name="T885"> File types</text:span></text:p>
      <text:p text:style-name="P198"/>
      <text:p text:style-name="P207">The second field represents the permissions: the first set (3 elements) defines the owner's permissions, the next the group's permissions, the last the others permissions. Each permission has a numeric and a string value.</text:p>
      <text:p text:style-name="P213"/>
      <text:p text:style-name="P213"/>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211">r</text:p>
          </table:table-cell>
          <table:table-cell table:style-name="Table48.A1" office:value-type="string">
            <text:p text:style-name="P159">read</text:p>
          </table:table-cell>
          <table:table-cell table:style-name="Table48.C1" office:value-type="string">
            <text:p text:style-name="P159">4</text:p>
          </table:table-cell>
        </table:table-row>
        <table:table-row table:style-name="Table48.1">
          <table:table-cell table:style-name="Table48.A2" office:value-type="string">
            <text:p text:style-name="P211">w</text:p>
          </table:table-cell>
          <table:table-cell table:style-name="Table48.A2" office:value-type="string">
            <text:p text:style-name="P159">write</text:p>
          </table:table-cell>
          <table:table-cell table:style-name="Table48.C2" office:value-type="string">
            <text:p text:style-name="P159">2</text:p>
          </table:table-cell>
        </table:table-row>
        <table:table-row table:style-name="Table48.1">
          <table:table-cell table:style-name="Table48.A2" office:value-type="string">
            <text:p text:style-name="P211">x</text:p>
          </table:table-cell>
          <table:table-cell table:style-name="Table48.A2" office:value-type="string">
            <text:p text:style-name="P159">execute</text:p>
          </table:table-cell>
          <table:table-cell table:style-name="Table48.C2" office:value-type="string">
            <text:p text:style-name="P159">1</text:p>
          </table:table-cell>
        </table:table-row>
      </table:table>
      <text:p text:style-name="P214"/>
      <text:p text:style-name="P139"><text:span text:style-name="T890">Tab 6.</text:span><text:span text:style-name="T885"> Types of permissions</text:span></text:p>
      <text:p text:style-name="P214"/>
      <text:p text:style-name="P214"/>
      <text:p text:style-name="P134"><text:span text:style-name="T885">Read permission means the user can read the contents of the file, write permission means the user can modify the file's contents, execute means the file can be executed. Concerning the directories: read means the user can view the directory's contents</text:span><text:span text:style-name="footnote_20_reference1"><text:span text:style-name="T885"><text:note text:id="ftn27" text:note-class="footnote"><text:note-citation>27</text:note-citation><text:note-body><text:p text:style-name="Footnote">To see the files attributes (as shown by <text:span text:style-name="T843">ls -l</text:span>) the execution permission is required for the directory</text:p></text:note-body></text:note></text:span></text:span><text:span text:style-name="T885">, write is the ability to add and delete files in the directory</text:span><text:span text:style-name="footnote_20_reference1"><text:span text:style-name="T885"><text:note text:id="ftn28" text:note-class="footnote"><text:note-citation>28</text:note-citation><text:note-body><text:p text:style-name="Footnote">An user can delete a file in a directory if he has the write permission on that directory even if he is not the owner of that file</text:p></text:note-body></text:note></text:span></text:span><text:span text:style-name="T885">, execute means the user can traverse the directory (enter in the directory with the cd command)</text:span><text:span text:style-name="footnote_20_reference1"><text:span text:style-name="T885"><text:note text:id="ftn29" text:note-class="footnote"><text:note-citation>29</text:note-citation><text:note-body><text:p text:style-name="Footnote">To execute <text:span text:style-name="T821">cd /var/log</text:span> the user must have the execution permission for all the directories of the path: <text:s/><text:span text:style-name="T821">/</text:span>, <text:s/><text:span text:style-name="T843">var</text:span> and <text:span text:style-name="T843">log</text:span></text:p></text:note-body></text:note></text:span></text:span><text:span text:style-name="T885">. To add and delete files in a directory the user needs execute and write permissions on it. </text:span></text:p>
      <text:p text:style-name="P134"><text:span text:style-name="T885">The sum of these type specifies the permissions for the user/owner/other, so for example the owner can have a permission of 6 (6 = 4+2) that means read and write and no execute, the group can have a permission of 5 (5 = 4 + 1) that means read and execute but no write. All the possible combinations of 4,2 and 1 define a specific permission. The lowest permission is </text:span><text:span text:style-name="T876">000</text:span><text:span text:style-name="T885"> that is defined by </text:span><text:span text:style-name="T876">---</text:span><text:span text:style-name="T885">. Where there is no permission, Linux use a </text:span><text:span text:style-name="T876">-</text:span><text:span text:style-name="T885"> to represent it. The highest permission is </text:span><text:span text:style-name="T876">777</text:span><text:span text:style-name="T885">, where 7 is the sum of 4 + 2 + 1 which means read, write and execute.</text:span></text:p>
      <text:p text:style-name="P207"/>
      <text:p text:style-name="P207">The following table shows the possible combinations of values.</text:p>
      <text:p text:style-name="P207"/>
      <text:p text:style-name="P207"/>
      <table:table table:name="Table49" table:style-name="Table49">
        <table:table-column table:style-name="Table49.A"/>
        <table:table-column table:style-name="Table49.B"/>
        <table:table-column table:style-name="Table49.C"/>
        <table:table-column table:style-name="Table49.D"/>
        <table:table-row table:style-name="Table49.1">
          <table:table-cell table:style-name="Table49.A1" office:value-type="string">
            <text:p text:style-name="P215">Total</text:p>
          </table:table-cell>
          <table:table-cell table:style-name="Table49.A1" office:value-type="string">
            <text:p text:style-name="P215">Sum</text:p>
          </table:table-cell>
          <table:table-cell table:style-name="Table49.A1" office:value-type="string">
            <text:p text:style-name="P215">rwx</text:p>
          </table:table-cell>
          <table:table-cell table:style-name="Table49.D1" office:value-type="string">
            <text:p text:style-name="P215">Permission</text:p>
          </table:table-cell>
        </table:table-row>
        <table:table-row table:style-name="Table49.1">
          <table:table-cell table:style-name="Table49.A2" office:value-type="string">
            <text:p text:style-name="P211">7</text:p>
          </table:table-cell>
          <table:table-cell table:style-name="Table49.A2" office:value-type="string">
            <text:p text:style-name="P159">4 + 2 + 1</text:p>
          </table:table-cell>
          <table:table-cell table:style-name="Table49.A2" office:value-type="string">
            <text:p text:style-name="P211">rwx</text:p>
          </table:table-cell>
          <table:table-cell table:style-name="Table49.D2" office:value-type="string">
            <text:p text:style-name="P159">read, write, execute</text:p>
          </table:table-cell>
        </table:table-row>
        <table:table-row table:style-name="Table49.1">
          <table:table-cell table:style-name="Table49.A2" office:value-type="string">
            <text:p text:style-name="P211">6</text:p>
          </table:table-cell>
          <table:table-cell table:style-name="Table49.A2" office:value-type="string">
            <text:p text:style-name="P159">4 + 2</text:p>
          </table:table-cell>
          <table:table-cell table:style-name="Table49.A2" office:value-type="string">
            <text:p text:style-name="P134"><text:span text:style-name="T876">rw</text:span>-</text:p>
          </table:table-cell>
          <table:table-cell table:style-name="Table49.D2" office:value-type="string">
            <text:p text:style-name="P159">read and write</text:p>
          </table:table-cell>
        </table:table-row>
        <table:table-row table:style-name="Table49.1">
          <table:table-cell table:style-name="Table49.A2" office:value-type="string">
            <text:p text:style-name="P211">5</text:p>
          </table:table-cell>
          <table:table-cell table:style-name="Table49.A2" office:value-type="string">
            <text:p text:style-name="P159">4 + 1</text:p>
          </table:table-cell>
          <table:table-cell table:style-name="Table49.A2" office:value-type="string">
            <text:p text:style-name="P211">r-x</text:p>
          </table:table-cell>
          <table:table-cell table:style-name="Table49.D2" office:value-type="string">
            <text:p text:style-name="P159">read and execute</text:p>
          </table:table-cell>
        </table:table-row>
        <table:table-row table:style-name="Table49.1">
          <table:table-cell table:style-name="Table49.A2" office:value-type="string">
            <text:p text:style-name="P211">4</text:p>
          </table:table-cell>
          <table:table-cell table:style-name="Table49.A2" office:value-type="string">
            <text:p text:style-name="P159">4</text:p>
          </table:table-cell>
          <table:table-cell table:style-name="Table49.A2" office:value-type="string">
            <text:p text:style-name="P211">r--</text:p>
          </table:table-cell>
          <table:table-cell table:style-name="Table49.D2" office:value-type="string">
            <text:p text:style-name="P159">read only</text:p>
          </table:table-cell>
        </table:table-row>
        <table:table-row table:style-name="Table49.1">
          <table:table-cell table:style-name="Table49.A2" office:value-type="string">
            <text:p text:style-name="P211">3</text:p>
          </table:table-cell>
          <table:table-cell table:style-name="Table49.A2" office:value-type="string">
            <text:p text:style-name="P159">2 + 1</text:p>
          </table:table-cell>
          <table:table-cell table:style-name="Table49.A2" office:value-type="string">
            <text:p text:style-name="P211">-wx</text:p>
          </table:table-cell>
          <table:table-cell table:style-name="Table49.D2" office:value-type="string">
            <text:p text:style-name="P159">write and execute</text:p>
          </table:table-cell>
        </table:table-row>
        <table:table-row table:style-name="Table49.1">
          <table:table-cell table:style-name="Table49.A2" office:value-type="string">
            <text:p text:style-name="P211">2</text:p>
          </table:table-cell>
          <table:table-cell table:style-name="Table49.A2" office:value-type="string">
            <text:p text:style-name="P159">2</text:p>
          </table:table-cell>
          <table:table-cell table:style-name="Table49.A2" office:value-type="string">
            <text:p text:style-name="P211">-w-</text:p>
          </table:table-cell>
          <table:table-cell table:style-name="Table49.D2" office:value-type="string">
            <text:p text:style-name="P159">write only</text:p>
          </table:table-cell>
        </table:table-row>
        <text:soft-page-break/>
        <table:table-row table:style-name="Table49.1">
          <table:table-cell table:style-name="Table49.A2" office:value-type="string">
            <text:p text:style-name="P211">1</text:p>
          </table:table-cell>
          <table:table-cell table:style-name="Table49.A2" office:value-type="string">
            <text:p text:style-name="P159">1</text:p>
          </table:table-cell>
          <table:table-cell table:style-name="Table49.A2" office:value-type="string">
            <text:p text:style-name="P211">--x</text:p>
          </table:table-cell>
          <table:table-cell table:style-name="Table49.D2" office:value-type="string">
            <text:p text:style-name="P159">execute only</text:p>
          </table:table-cell>
        </table:table-row>
        <table:table-row table:style-name="Table49.1">
          <table:table-cell table:style-name="Table49.A2" office:value-type="string">
            <text:p text:style-name="P211">0</text:p>
          </table:table-cell>
          <table:table-cell table:style-name="Table49.A2" office:value-type="string">
            <text:p text:style-name="P159">0</text:p>
          </table:table-cell>
          <table:table-cell table:style-name="Table49.A2" office:value-type="string">
            <text:p text:style-name="P211">---</text:p>
          </table:table-cell>
          <table:table-cell table:style-name="Table49.D2" office:value-type="string">
            <text:p text:style-name="P159">none</text:p>
          </table:table-cell>
        </table:table-row>
      </table:table>
      <text:p text:style-name="P213"/>
      <text:p text:style-name="P139"><text:span text:style-name="T891">Tab 7. </text:span><text:span text:style-name="T868">Combinations of the permissions values</text:span></text:p>
      <text:p text:style-name="P213"/>
      <text:p text:style-name="P207">The following table shows some examples.</text:p>
      <text:p text:style-name="P213"/>
      <table:table table:name="Table50" table:style-name="Table50">
        <table:table-column table:style-name="Table50.A"/>
        <table:table-column table:style-name="Table50.B"/>
        <table:table-row table:style-name="Table50.1">
          <table:table-cell table:style-name="Table50.A1" office:value-type="string">
            <text:p text:style-name="P211">777</text:p>
          </table:table-cell>
          <table:table-cell table:style-name="Table50.B1" office:value-type="string">
            <text:p text:style-name="P159">user: read, write, execute; group: read, write, execute; other: read, write execute</text:p>
          </table:table-cell>
        </table:table-row>
        <table:table-row table:style-name="Table50.1">
          <table:table-cell table:style-name="Table50.A2" office:value-type="string">
            <text:p text:style-name="P211">664</text:p>
          </table:table-cell>
          <table:table-cell table:style-name="Table50.B2" office:value-type="string">
            <text:p text:style-name="P159">user: red, write; group: read, write, other: read</text:p>
          </table:table-cell>
        </table:table-row>
        <table:table-row table:style-name="Table50.1">
          <table:table-cell table:style-name="Table50.A2" office:value-type="string">
            <text:p text:style-name="P211">755</text:p>
          </table:table-cell>
          <table:table-cell table:style-name="Table50.B2" office:value-type="string">
            <text:p text:style-name="P159">user: read, write, execute; group: read, execute; oher: read, execute</text:p>
          </table:table-cell>
        </table:table-row>
        <table:table-row table:style-name="Table50.1">
          <table:table-cell table:style-name="Table50.A2" office:value-type="string">
            <text:p text:style-name="P211">5--</text:p>
          </table:table-cell>
          <table:table-cell table:style-name="Table50.B2" office:value-type="string">
            <text:p text:style-name="P159">user: read, execute; group and others no permissions</text:p>
          </table:table-cell>
        </table:table-row>
        <table:table-row table:style-name="Table50.1">
          <table:table-cell table:style-name="Table50.A2" office:value-type="string">
            <text:p text:style-name="P211">-62</text:p>
          </table:table-cell>
          <table:table-cell table:style-name="Table50.B2" office:value-type="string">
            <text:p text:style-name="P159">user: no permission; group: read and write; other: write</text:p>
          </table:table-cell>
        </table:table-row>
      </table:table>
      <text:p text:style-name="P213"/>
      <text:p text:style-name="P139"><text:span text:style-name="T890">Tab 8.</text:span><text:span text:style-name="T885"> Example of permissions</text:span></text:p>
      <text:p text:style-name="P134"/>
      <text:p text:style-name="P134"><text:span text:style-name="T885">To view permissions we can use </text:span><text:span text:style-name="T876">ls</text:span><text:span text:style-name="T885"> with the option </text:span><text:span text:style-name="T876">-l</text:span></text:p>
      <text:p text:style-name="P211"/>
      <table:table table:name="Table51" table:style-name="Table51">
        <table:table-column table:style-name="Table51.A"/>
        <table:table-row table:style-name="Table51.1">
          <table:table-cell table:style-name="Table51.A1" office:value-type="string">
            <text:p text:style-name="P150">[<text:a xlink:type="simple" xlink:href="mailto:linux@io" text:style-name="Internet_20_link" text:visited-style-name="Visited_20_Internet_20_Link"><text:span text:style-name="Internet_20_link"><text:span text:style-name="T884">linux@</text:span></text:span></text:a><text:span text:style-name="T884">fidir</text:span>] ls -l</text:p>
            <text:p text:style-name="P150">total 8</text:p>
            <text:p text:style-name="P150">lrwxrwxrwx 2 fidir fidir <text:s/>8 Mar 23 20:38 file2 -&gt; file.txt</text:p>
            <text:p text:style-name="P150">-rw-r--r-- 2 <text:s text:c="5"/>fidir fidir 12 Mar 23 21:09 file.txt</text:p>
            <text:p text:style-name="P150">-rw-r--r-- 2 <text:s text:c="5"/>fidir fidir 12 Mar 23 21:09 hfile3</text:p>
            <text:p text:style-name="P150">lrwxrwxrwx 2 fidir fidir <text:s/>8 Mar 23 20:38 sfile4 -&gt; file.txt</text:p>
          </table:table-cell>
        </table:table-row>
      </table:table>
      <text:p text:style-name="P198"/>
      <text:p text:style-name="P134"><text:span text:style-name="T876">file.txt</text:span><text:span text:style-name="T885"> and </text:span><text:span text:style-name="T876">hfile3</text:span><text:span text:style-name="T885"> are regular file with </text:span><text:span text:style-name="T876">644</text:span><text:span text:style-name="T885">, </text:span><text:span text:style-name="T876">file2</text:span><text:span text:style-name="T885"> and </text:span><text:span text:style-name="T876">sfile4</text:span><text:span text:style-name="T885"> are symbolic links with </text:span><text:span text:style-name="T876">777</text:span><text:span text:style-name="T885">.</text:span></text:p>
      <text:p text:style-name="P134"><text:span text:style-name="T885">In the previous example we executed our program passing the file </text:span><text:span text:style-name="T876">/dev/tty</text:span><text:span text:style-name="T885">, the output for the </text:span><text:span text:style-name="T876">st_mode</text:span><text:span text:style-name="T885"> field was </text:span></text:p>
      <text:p text:style-name="P213"/>
      <text:p text:style-name="P207">Mode: <text:tab/><text:tab/>20620 (octal)</text:p>
      <text:p text:style-name="P213"/>
      <text:p text:style-name="P207">This means the file has the set of permission Owner: 6, Group: 2, Others. 0.</text:p>
      <text:p text:style-name="P198"/>
      <text:p text:style-name="P134"><text:span text:style-name="T885">On Linux systems a regular file is represented in the first bit of the permissions with a </text:span><text:span text:style-name="T876">-</text:span><text:span text:style-name="T885">.</text:span></text:p>
      <text:p text:style-name="P134"><text:span text:style-name="T885">The permissions mask is a bitmask of 10 bit where the first bit represents the type of the file and the others 9 bits represent the three-bit fields of the owner, group and others</text:span><text:span text:style-name="footnote_20_reference1"><text:span text:style-name="T885"><text:note text:id="ftn30" text:note-class="footnote"><text:note-citation>30</text:note-citation><text:note-body><text:p text:style-name="Footnote">To change the permissions of a file see the manual page <text:span text:style-name="T821">chmod(1)</text:span></text:p></text:note-body></text:note></text:span></text:span><text:span text:style-name="T885">. The field </text:span><text:span text:style-name="T876">st_mode</text:span><text:span text:style-name="T885"> of the structure </text:span><text:span text:style-name="T876">stat</text:span><text:span text:style-name="T885"> is a bit mask containing the permissions and the type of the file. The file's type can be extracted by ANDing the value of the field with the constant </text:span><text:span text:style-name="T876">S_IFMT</text:span><text:span text:style-name="T885">. In the </text:span><text:span text:style-name="T876">getInfo.c</text:span><text:span text:style-name="T885"> program we compared this values with the constants to print the type of file. To perform this operation are also available the following macros defined in </text:span><text:span text:style-name="T876">sys/stat.h</text:span><text:span text:style-name="T885">.</text:span></text:p>
      <text:p text:style-name="P134"/>
      <text:p text:style-name="P134"/>
      <table:table table:name="Table52" table:style-name="Table52">
        <table:table-column table:style-name="Table52.A"/>
        <table:table-column table:style-name="Table52.B"/>
        <text:soft-page-break/>
        <table:table-row table:style-name="Table52.1">
          <table:table-cell table:style-name="Table52.A1" office:value-type="string">
            <text:p text:style-name="P216">Macro</text:p>
          </table:table-cell>
          <table:table-cell table:style-name="Table52.B1" office:value-type="string">
            <text:p text:style-name="P216">Value</text:p>
          </table:table-cell>
        </table:table-row>
        <table:table-row table:style-name="Table52.1">
          <table:table-cell table:style-name="Table52.A2" office:value-type="string">
            <text:p text:style-name="P162"><text:span text:style-name="T892">S_ISLNK</text:span><text:span text:style-name="T876">(m)<text:tab/></text:span></text:p>
          </table:table-cell>
          <table:table-cell table:style-name="Table52.B2" office:value-type="string">
            <text:p text:style-name="P162"><text:span text:style-name="T876">(((m) &amp; </text:span><text:span text:style-name="T893">S_IFMT</text:span><text:span text:style-name="T876">) == </text:span><text:span text:style-name="T892">S_IFLNK</text:span><text:span text:style-name="T876">)</text:span></text:p>
          </table:table-cell>
        </table:table-row>
        <table:table-row table:style-name="Table52.1">
          <table:table-cell table:style-name="Table52.A2" office:value-type="string">
            <text:p text:style-name="P162"><text:span text:style-name="T892">S_ISREG</text:span><text:span text:style-name="T876">(m)<text:tab/></text:span></text:p>
          </table:table-cell>
          <table:table-cell table:style-name="Table52.B2" office:value-type="string">
            <text:p text:style-name="P162"><text:span text:style-name="T876">(((m) &amp; </text:span><text:span text:style-name="T894">S_IFMT</text:span><text:span text:style-name="T876">) == </text:span><text:span text:style-name="T892">S_IFREG</text:span><text:span text:style-name="T876">)</text:span></text:p>
          </table:table-cell>
        </table:table-row>
        <table:table-row table:style-name="Table52.1">
          <table:table-cell table:style-name="Table52.A2" office:value-type="string">
            <text:p text:style-name="P162"><text:span text:style-name="T892">S_ISDIR</text:span><text:span text:style-name="T876">(m)<text:tab/></text:span></text:p>
          </table:table-cell>
          <table:table-cell table:style-name="Table52.B2" office:value-type="string">
            <text:p text:style-name="P162"><text:span text:style-name="T876">(((m) &amp; </text:span><text:span text:style-name="T894">S_IFMT</text:span><text:span text:style-name="T876">) == </text:span><text:span text:style-name="T892">S_IFDIR</text:span><text:span text:style-name="T876">)</text:span></text:p>
          </table:table-cell>
        </table:table-row>
        <table:table-row table:style-name="Table52.1">
          <table:table-cell table:style-name="Table52.A2" office:value-type="string">
            <text:p text:style-name="P162"><text:span text:style-name="T892">S_ISCHR</text:span><text:span text:style-name="T876">(m)<text:tab/></text:span></text:p>
          </table:table-cell>
          <table:table-cell table:style-name="Table52.B2" office:value-type="string">
            <text:p text:style-name="P162"><text:span text:style-name="T876">(((m) &amp; </text:span><text:span text:style-name="T894">S_IFMT</text:span><text:span text:style-name="T876">) == </text:span><text:span text:style-name="T892">S_IFCHR</text:span><text:span text:style-name="T876">)</text:span></text:p>
          </table:table-cell>
        </table:table-row>
        <table:table-row table:style-name="Table52.1">
          <table:table-cell table:style-name="Table52.A2" office:value-type="string">
            <text:p text:style-name="P162"><text:span text:style-name="T892">S_ISBLK</text:span><text:span text:style-name="T876">(m)<text:tab/></text:span></text:p>
          </table:table-cell>
          <table:table-cell table:style-name="Table52.B2" office:value-type="string">
            <text:p text:style-name="P162"><text:span text:style-name="T876">(((m) &amp; </text:span><text:span text:style-name="T894">S_IFMT</text:span><text:span text:style-name="T876">) == </text:span><text:span text:style-name="T892">S_IFBLK</text:span><text:span text:style-name="T876">)</text:span></text:p>
          </table:table-cell>
        </table:table-row>
        <table:table-row table:style-name="Table52.1">
          <table:table-cell table:style-name="Table52.A2" office:value-type="string">
            <text:p text:style-name="P162"><text:span text:style-name="T892">S_ISFIFO</text:span><text:span text:style-name="T876">(m)<text:tab/></text:span></text:p>
          </table:table-cell>
          <table:table-cell table:style-name="Table52.B2" office:value-type="string">
            <text:p text:style-name="P162"><text:span text:style-name="T876">(((m) &amp; </text:span><text:span text:style-name="T894">S_IFMT</text:span><text:span text:style-name="T876">) == </text:span><text:span text:style-name="T892">S_IFIFO</text:span><text:span text:style-name="T876">)</text:span></text:p>
          </table:table-cell>
        </table:table-row>
        <table:table-row table:style-name="Table52.1">
          <table:table-cell table:style-name="Table52.A2" office:value-type="string">
            <text:p text:style-name="P162"><text:span text:style-name="T892">S_ISSOCK</text:span><text:span text:style-name="T876">(m)<text:tab/></text:span></text:p>
          </table:table-cell>
          <table:table-cell table:style-name="Table52.B2" office:value-type="string">
            <text:p text:style-name="P162"><text:span text:style-name="T876">(((m) &amp; </text:span><text:span text:style-name="T894">S_IFMT</text:span><text:span text:style-name="T876">) == </text:span><text:span text:style-name="T892">S_IFSOCK</text:span><text:span text:style-name="T876">)</text:span></text:p>
          </table:table-cell>
        </table:table-row>
      </table:table>
      <text:p text:style-name="P134"/>
      <text:p text:style-name="P139"><text:span text:style-name="T890">Tab 9. </text:span><text:span text:style-name="T885">Macro to retrieve the type of file </text:span></text:p>
      <text:p text:style-name="P139"/>
      <text:p text:style-name="P217"/>
      <text:p text:style-name="P217"/>
      <text:p text:style-name="P217"/>
      <text:p text:style-name="P217"/>
      <text:p text:style-name="P162"><text:span text:style-name="T885">The program </text:span><text:span text:style-name="T876">getfiletype.c</text:span><text:span text:style-name="T885"> retrieves the type of the file supplied on the command line.</text:span></text:p>
      <text:p text:style-name="P134"/>
      <text:p text:style-name="P147"/>
      <text:p text:style-name="P134"><text:span text:style-name="T895">1</text:span><text:span text:style-name="T896"> </text:span><text:span text:style-name="T840">#include </text:span><text:span text:style-name="T841">&lt;stdio.h&gt;</text:span></text:p>
      <text:p text:style-name="P144"><text:span text:style-name="T895">2</text:span><text:span text:style-name="T896"> </text:span><text:span text:style-name="T824">#include </text:span><text:span text:style-name="T831">&lt;stdlib.h&gt;</text:span></text:p>
      <text:p text:style-name="P144"><text:span text:style-name="T895">3</text:span><text:span text:style-name="T896"> </text:span><text:span text:style-name="T824">#include </text:span><text:span text:style-name="T831">&lt;sys/stat.h&gt;</text:span></text:p>
      <text:p text:style-name="P144"><text:span text:style-name="T895">4</text:span><text:span text:style-name="T896"> </text:span><text:span text:style-name="T824">int</text:span><text:span text:style-name="T825"> main (</text:span><text:span text:style-name="T824">int</text:span><text:span text:style-name="T825"> argc, </text:span><text:span text:style-name="T824">char</text:span><text:span text:style-name="T825"> *argv</text:span><text:span text:style-name="T824">[]</text:span><text:span text:style-name="T825">) </text:span></text:p>
      <text:p text:style-name="P144"><text:span text:style-name="T895">5</text:span><text:span text:style-name="T896"> </text:span><text:span text:style-name="T825">{</text:span></text:p>
      <text:p text:style-name="P144"><text:span text:style-name="T895">6</text:span><text:span text:style-name="T896"> <text:tab/></text:span><text:span text:style-name="T824">struct</text:span><text:span text:style-name="T825"> </text:span><text:span text:style-name="T824">stat</text:span><text:span text:style-name="T825"> sb;</text:span></text:p>
      <text:p text:style-name="P144"><text:span text:style-name="T895">7</text:span><text:span text:style-name="T896"> <text:tab/></text:span><text:span text:style-name="T824">if</text:span><text:span text:style-name="T825"> (argc != </text:span><text:span text:style-name="T832">2</text:span><text:span text:style-name="T825">) {</text:span></text:p>
      <text:p text:style-name="P144"><text:span text:style-name="T895">8</text:span><text:span text:style-name="T896"> <text:tab/><text:tab/></text:span><text:span text:style-name="T825">printf(</text:span><text:span text:style-name="T831">"\nUsage: %s &lt;file&gt;"</text:span><text:span text:style-name="T825">, argv[</text:span><text:span text:style-name="T832">0</text:span><text:span text:style-name="T825">]);</text:span></text:p>
      <text:p text:style-name="P144"><text:span text:style-name="T895">9</text:span><text:span text:style-name="T896"> <text:tab/><text:tab/></text:span><text:span text:style-name="T825">exit(</text:span><text:span text:style-name="T824">EXIT_FAILURE</text:span><text:span text:style-name="T825">);</text:span></text:p>
      <text:p text:style-name="P144"><text:span text:style-name="T895">10</text:span><text:span text:style-name="T896"> <text:tab/></text:span><text:span text:style-name="T825">}</text:span></text:p>
      <text:p text:style-name="P144"><text:span text:style-name="T895">11</text:span><text:span text:style-name="T896"> <text:tab/></text:span><text:span text:style-name="T824">if</text:span><text:span text:style-name="T825"> (</text:span><text:span text:style-name="T826">lstat</text:span><text:span text:style-name="T825">(argv[</text:span><text:span text:style-name="T832">1</text:span><text:span text:style-name="T825">], &amp;sb) == -</text:span><text:span text:style-name="T832">1</text:span><text:span text:style-name="T825">) {</text:span></text:p>
      <text:p text:style-name="P144"><text:span text:style-name="T895">12</text:span><text:span text:style-name="T896"> <text:tab/><text:tab/></text:span><text:span text:style-name="T825">perror(</text:span><text:span text:style-name="T831">"lstat"</text:span><text:span text:style-name="T825">);</text:span></text:p>
      <text:p text:style-name="P144"><text:span text:style-name="T895">13</text:span><text:span text:style-name="T896"> <text:tab/><text:tab/></text:span><text:span text:style-name="T825">exit (</text:span><text:span text:style-name="T824">EXIT_FAILURE</text:span><text:span text:style-name="T825">);</text:span></text:p>
      <text:p text:style-name="P144"><text:span text:style-name="T895">14</text:span><text:span text:style-name="T896"> <text:tab/></text:span><text:span text:style-name="T825">}</text:span></text:p>
      <text:p text:style-name="P144"><text:span text:style-name="T895">15</text:span><text:span text:style-name="T896"> <text:tab/></text:span><text:span text:style-name="T824">int</text:span><text:span text:style-name="T825"> type = sb.st_mode &amp; S_IFMT;</text:span></text:p>
      <text:p text:style-name="P144"><text:span text:style-name="T895">16</text:span><text:span text:style-name="T896"> <text:tab/></text:span><text:span text:style-name="T824">if</text:span><text:span text:style-name="T825"> (</text:span><text:span text:style-name="T824">S_ISREG</text:span><text:span text:style-name="T825">(type)) </text:span></text:p>
      <text:p text:style-name="P144"><text:span text:style-name="T895">17</text:span><text:span text:style-name="T896"> <text:tab/><text:tab/></text:span><text:span text:style-name="T825">printf(</text:span><text:span text:style-name="T831">"\n%s: Regular file"</text:span><text:span text:style-name="T825">, argv[</text:span><text:span text:style-name="T832">1</text:span><text:span text:style-name="T825">]);</text:span></text:p>
      <text:p text:style-name="P144"><text:span text:style-name="T895">18</text:span><text:span text:style-name="T896"> <text:tab/></text:span><text:span text:style-name="T824">else</text:span><text:span text:style-name="T825"> </text:span><text:span text:style-name="T824">if</text:span><text:span text:style-name="T825">(</text:span><text:span text:style-name="T824">S_ISLNK</text:span><text:span text:style-name="T825">(type)) </text:span></text:p>
      <text:p text:style-name="P144"><text:span text:style-name="T895">19</text:span><text:span text:style-name="T896"> <text:tab/><text:tab/></text:span><text:span text:style-name="T825">printf(</text:span><text:span text:style-name="T831">"\n%s: Symbolic link"</text:span><text:span text:style-name="T825">, argv[</text:span><text:span text:style-name="T832">1</text:span><text:span text:style-name="T825">]);</text:span></text:p>
      <text:p text:style-name="P144"><text:span text:style-name="T895">20</text:span><text:span text:style-name="T896"> <text:tab/></text:span><text:span text:style-name="T824">else</text:span><text:span text:style-name="T825"> </text:span><text:span text:style-name="T824">if</text:span><text:span text:style-name="T825">(</text:span><text:span text:style-name="T824">S_ISDIR</text:span><text:span text:style-name="T825">(type)) </text:span></text:p>
      <text:p text:style-name="P144"><text:span text:style-name="T895">21</text:span><text:span text:style-name="T896"> <text:tab/><text:tab/></text:span><text:span text:style-name="T825">printf(</text:span><text:span text:style-name="T831">"\n%s: Directory"</text:span><text:span text:style-name="T825">, argv[</text:span><text:span text:style-name="T832">1</text:span><text:span text:style-name="T825">]);</text:span></text:p>
      <text:p text:style-name="P144"><text:span text:style-name="T895">22</text:span><text:span text:style-name="T896"> <text:tab/></text:span><text:span text:style-name="T824">else</text:span><text:span text:style-name="T825"> </text:span><text:span text:style-name="T824">if</text:span><text:span text:style-name="T825">(</text:span><text:span text:style-name="T824">S_ISCHR</text:span><text:span text:style-name="T825">(type)) </text:span></text:p>
      <text:p text:style-name="P144"><text:span text:style-name="T895">23</text:span><text:span text:style-name="T896"> <text:tab/><text:tab/></text:span><text:span text:style-name="T825">printf(</text:span><text:span text:style-name="T831">"\n%s: Character device"</text:span><text:span text:style-name="T825">, argv[</text:span><text:span text:style-name="T832">1</text:span><text:span text:style-name="T825">]);</text:span></text:p>
      <text:p text:style-name="P144"><text:span text:style-name="T895">24</text:span><text:span text:style-name="T896"> <text:tab/></text:span><text:span text:style-name="T824">else</text:span><text:span text:style-name="T825"> </text:span><text:span text:style-name="T824">if</text:span><text:span text:style-name="T825">(</text:span><text:span text:style-name="T824">S_ISBLK</text:span><text:span text:style-name="T825">(type)) </text:span></text:p>
      <text:p text:style-name="P144"><text:span text:style-name="T895">25</text:span><text:span text:style-name="T896"> <text:tab/><text:tab/></text:span><text:span text:style-name="T825">printf(</text:span><text:span text:style-name="T831">"\n%s: Block device"</text:span><text:span text:style-name="T825">, argv[</text:span><text:span text:style-name="T832">1</text:span><text:span text:style-name="T825">]);</text:span></text:p>
      <text:p text:style-name="P144"><text:span text:style-name="T895">26</text:span><text:span text:style-name="T896"> <text:tab/></text:span><text:span text:style-name="T824">else</text:span><text:span text:style-name="T825"> </text:span><text:span text:style-name="T824">if</text:span><text:span text:style-name="T825">(</text:span><text:span text:style-name="T824">S_ISFIFO</text:span><text:span text:style-name="T825">(type)) </text:span></text:p>
      <text:p text:style-name="P144"><text:span text:style-name="T895">27</text:span><text:span text:style-name="T896"> <text:tab/><text:tab/></text:span><text:span text:style-name="T825">printf(</text:span><text:span text:style-name="T831">"\n%s: FIFO"</text:span><text:span text:style-name="T825">, argv[</text:span><text:span text:style-name="T832">1</text:span><text:span text:style-name="T825">]);</text:span></text:p>
      <text:p text:style-name="P144"><text:soft-page-break/><text:span text:style-name="T895">28</text:span><text:span text:style-name="T896"> <text:tab/></text:span><text:span text:style-name="T824">else</text:span><text:span text:style-name="T825"> </text:span><text:span text:style-name="T824">if</text:span><text:span text:style-name="T825">(S_ISSOCK(type)) </text:span></text:p>
      <text:p text:style-name="P144"><text:span text:style-name="T895">29</text:span><text:span text:style-name="T896"> <text:tab/><text:tab/></text:span><text:span text:style-name="T825">printf(</text:span><text:span text:style-name="T831">"\n%s: Socket"</text:span><text:span text:style-name="T825">, argv[</text:span><text:span text:style-name="T832">1</text:span><text:span text:style-name="T825">]); </text:span></text:p>
      <text:p text:style-name="P144"><text:span text:style-name="T895">30</text:span><text:span text:style-name="T896"> <text:tab/></text:span><text:span text:style-name="T824">return</text:span><text:span text:style-name="T825"> </text:span><text:span text:style-name="T832">0</text:span><text:span text:style-name="T825">;</text:span></text:p>
      <text:p text:style-name="P144"><text:span text:style-name="T895">31</text:span><text:span text:style-name="T896"> </text:span><text:span text:style-name="T825">}</text:span></text:p>
      <text:p text:style-name="P147"/>
      <text:p text:style-name="P139"><text:span text:style-name="T890">getfiletype.c</text:span><text:span text:style-name="T885"> Gets the file type</text:span></text:p>
      <text:p text:style-name="P207"/>
      <text:p text:style-name="P134"><text:span text:style-name="T885">At line 6, the program declares a variable of type </text:span><text:span text:style-name="Source_20_Text"><text:span text:style-name="T886">struct stat</text:span></text:span><text:span text:style-name="T885"> named </text:span><text:span text:style-name="Source_20_Text"><text:span text:style-name="T886">sb</text:span></text:span><text:span text:style-name="T885">, which will store the file information returned by </text:span><text:span text:style-name="Source_20_Text"><text:span text:style-name="T886">lstat</text:span></text:span><text:span text:style-name="T885">.</text:span></text:p>
      <text:p text:style-name="P134"><text:span text:style-name="T885">At line 11, the program calls </text:span><text:span text:style-name="Source_20_Text"><text:span text:style-name="T886">lstat</text:span></text:span><text:span text:style-name="T885"> to retrieve information about the file specified on the command line and stores the result in the </text:span><text:span text:style-name="Source_20_Text"><text:span text:style-name="T885">sb</text:span></text:span><text:span text:style-name="T885"> structure.</text:span></text:p>
      <text:p text:style-name="P134"><text:span text:style-name="T885">At line 15, the program performs a bitwise AND operation between </text:span><text:span text:style-name="Source_20_Text"><text:span text:style-name="T886">sb.st_mode</text:span></text:span><text:span text:style-name="T885"> and the constant </text:span><text:span text:style-name="Source_20_Text"><text:span text:style-name="T886">S_IFMT</text:span></text:span><text:span text:style-name="T885"> to extract the file type information, and stores the result in the variable </text:span><text:span text:style-name="Source_20_Text"><text:span text:style-name="T886">type</text:span></text:span><text:span text:style-name="T885">.</text:span></text:p>
      <text:p text:style-name="P134"><text:span text:style-name="T885">At lines 16–29, the program checks the file type using macros such as </text:span><text:span text:style-name="Source_20_Text"><text:span text:style-name="T886">S_ISREG</text:span></text:span><text:span text:style-name="T885">, </text:span><text:span text:style-name="Source_20_Text"><text:span text:style-name="T886">S_ISLNK</text:span></text:span><text:span text:style-name="T885">, </text:span><text:span text:style-name="Source_20_Text"><text:span text:style-name="T886">S_ISDIR</text:span></text:span><text:span text:style-name="T885">, and others, then prints the corresponding file type description.</text:span></text:p>
      <text:p text:style-name="P207"/>
      <text:p text:style-name="P207">Let's execute the program.</text:p>
      <text:p text:style-name="P213"/>
      <table:table table:name="Table53" table:style-name="Table53">
        <table:table-column table:style-name="Table53.A"/>
        <table:table-row table:style-name="Table53.1">
          <table:table-cell table:style-name="Table53.A1" office:value-type="string">
            <text:p text:style-name="P150">[<text:a xlink:type="simple" xlink:href="mailto:linux@io" text:style-name="Internet_20_link" text:visited-style-name="Visited_20_Internet_20_Link"><text:span text:style-name="Internet_20_link"><text:span text:style-name="T884">linux@</text:span></text:span></text:a><text:span text:style-name="T884">fidir</text:span>] ./getfiletype getfiletype.c</text:p>
            <text:p text:style-name="P150">getfiletype.c: Regular file <text:s text:c="3"/></text:p>
            <text:p text:style-name="P150"><text:s text:c="234"/></text:p>
            <text:p text:style-name="P150">[<text:a xlink:type="simple" xlink:href="mailto:linux@io" text:style-name="Internet_20_link" text:visited-style-name="Visited_20_Internet_20_Link"><text:span text:style-name="Internet_20_link"><text:span text:style-name="T884">linux@</text:span></text:span></text:a><text:span text:style-name="T884">fidir</text:span>] ./getfiletype /home</text:p>
            <text:p text:style-name="P150">/home: Directory <text:s text:c="4"/></text:p>
            <text:p text:style-name="P150"><text:s text:c="233"/></text:p>
            <text:p text:style-name="P150">[<text:a xlink:type="simple" xlink:href="mailto:linux@io" text:style-name="Internet_20_link" text:visited-style-name="Visited_20_Internet_20_Link"><text:span text:style-name="Internet_20_link"><text:span text:style-name="T884">linux@</text:span></text:span></text:a><text:span text:style-name="T884">fidir</text:span>] ./getfiletype /usr/bin/X</text:p>
            <text:p text:style-name="P150">/usr/bin/X: Symbolic link <text:s text:c="9"/></text:p>
            <text:p text:style-name="P150"><text:s text:c="228"/></text:p>
            <text:p text:style-name="P150">[<text:a xlink:type="simple" xlink:href="mailto:linux@io" text:style-name="Internet_20_link" text:visited-style-name="Visited_20_Internet_20_Link"><text:span text:style-name="Internet_20_link"><text:span text:style-name="T884">linux@</text:span></text:span></text:a><text:span text:style-name="T884">fidir</text:span>] ./getfiletype /tmp/dbus-5HHov05X </text:p>
            <text:p text:style-name="P150">/tmp/dbus-5HHov05X: Socket <text:s text:c="237"/></text:p>
          </table:table-cell>
        </table:table-row>
      </table:table>
      <text:p text:style-name="P207"/>
      <text:p text:style-name="P134"><text:span text:style-name="T885">By using the </text:span><text:span text:style-name="Source_20_Text"><text:span text:style-name="T886">stat</text:span></text:span><text:span text:style-name="T885"> structure, we can develop programs for many different purposes. For example, we can write a program that searches for files with specific permissions, files with a given last modification date, or files whose size is greater or smaller than a specified threshold, and many other similar criteria.</text:span></text:p>
      <text:p text:style-name="P191"/>
      <text:p text:style-name="P191">Chapter II continues...</text:p>
      <text:p text:style-name="P191"/>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218"><text:soft-page-break/><text:span text:style-name="T897">The competition</text:span></text:p>
      <text:p text:style-name="P219"/>
      <text:p text:style-name="P219">The field of Linux system programming is supported by several well-established and respected texts. While these works provide strong foundations, they often differ in scope, structure, and level of modernization. This book is designed to complement and extend these resources by addressing gaps in coverage, pedagogy, and practical application.</text:p>
      <text:p text:style-name="P219"/>
      <text:p text:style-name="P219"><text:span text:style-name="Strong_20_Emphasis">Advanced Programming in the UNIX Environment</text:span></text:p>
      <text:p text:style-name="P219">This is one of the most influential and widely used texts in system programming. It provides a clear and rigorous introduction to UNIX system interfaces and remains a standard reference in both academic and professional contexts.</text:p>
      <text:p text:style-name="P219"/>
      <text:p text:style-name="P219"><text:span text:style-name="Strong_20_Emphasis">Strengths:</text:span></text:p>
      <text:list text:style-name="L10">
        <text:list-item>
          <text:p text:style-name="P220">Strong conceptual clarity and foundational coverage </text:p>
        </text:list-item>
        <text:list-item>
          <text:p text:style-name="P220">Well-structured explanations of core UNIX principles </text:p>
        </text:list-item>
        <text:list-item>
          <text:p text:style-name="P220">Widely trusted and historically significant </text:p>
        </text:list-item>
      </text:list>
      <text:p text:style-name="P219"><text:span text:style-name="Strong_20_Emphasis"/></text:p>
      <text:p text:style-name="P219"><text:span text:style-name="Strong_20_Emphasis">Limitations in the current context:</text:span></text:p>
      <text:list text:style-name="L11">
        <text:list-item>
          <text:p text:style-name="P221">Focuses on general UNIX concepts rather than Linux-specific behavior </text:p>
        </text:list-item>
        <text:list-item>
          <text:p text:style-name="P221">Limited coverage of modern Linux features and recent system interfaces </text:p>
        </text:list-item>
        <text:list-item>
          <text:p text:style-name="P221">Primarily conceptual, with less emphasis on runtime analysis and debugging workflows </text:p>
        </text:list-item>
      </text:list>
      <text:p text:style-name="P219"><text:span text:style-name="Strong_20_Emphasis"/></text:p>
      <text:p text:style-name="P219"><text:span text:style-name="Strong_20_Emphasis">Positioning of this book:</text:span><text:line-break/>This book builds on the same foundational topics but focuses specifically on <text:span text:style-name="Strong_20_Emphasis"><text:span text:style-name="T6">modern Linux systems</text:span></text:span><text:span text:style-name="T6">,</text:span> integrating newer features and emphasizing how programs behave in practice through tools such as tracing and debugging.</text:p>
      <text:p text:style-name="P219"/>
      <text:p text:style-name="P219"><text:span text:style-name="Strong_20_Emphasis">The Linux Programming Interface</text:span></text:p>
      <text:p text:style-name="P219">A comprehensive and authoritative reference for Linux system programming, this book offers extensive coverage of system calls and library functions.</text:p>
      <text:p text:style-name="P219"><text:span text:style-name="Strong_20_Emphasis"/></text:p>
      <text:p text:style-name="P219"><text:span text:style-name="Strong_20_Emphasis">Strengths:</text:span></text:p>
      <text:list text:style-name="L12">
        <text:list-item>
          <text:p text:style-name="P222">Extremely detailed and comprehensive </text:p>
        </text:list-item>
        <text:list-item>
          <text:p text:style-name="P222">Linux-specific focus </text:p>
        </text:list-item>
        <text:list-item>
          <text:p text:style-name="P222">Excellent as a long-term reference </text:p>
          <text:p text:style-name="P222"/>
        </text:list-item>
      </text:list>
      <text:p text:style-name="P219"><text:span text:style-name="Strong_20_Emphasis">Limitations in the current context:</text:span></text:p>
      <text:list text:style-name="L13">
        <text:list-item>
          <text:p text:style-name="P223">Structured primarily as a reference manual rather than a guided learning path </text:p>
        </text:list-item>
        <text:list-item>
          <text:p text:style-name="P223">Less emphasis on building progressive understanding from fundamentals to advanced topics </text:p>
        </text:list-item>
        <text:list-item>
          <text:p text:style-name="P223">Limited integration of modern Linux developments such as newer asynchronous I/O models and evolving kernel features </text:p>
        </text:list-item>
      </text:list>
      <text:p text:style-name="P219"><text:span text:style-name="Strong_20_Emphasis"/></text:p>
      <text:p text:style-name="P219"><text:span text:style-name="Strong_20_Emphasis">Positioning of this book:</text:span><text:line-break/><text:span text:style-name="T6">While maintaining a high level of technical depth, this book is designed as a </text:span><text:span text:style-name="Strong_20_Emphasis"><text:span text:style-name="T6">structured learning journey</text:span></text:span><text:span text:style-name="T6">, helping readers progressively develop mastery rather than navigate a reference. It also incorporates </text:span><text:span text:style-name="Strong_20_Emphasis"><text:span text:style-name="T6">more recent Linux features and practices</text:span></text:span><text:span text:style-name="T6">.</text:span></text:p>
      <text:p text:style-name="P219"/>
      <text:p text:style-name="P219"/>
      <text:p text:style-name="P219"/>
      <text:p text:style-name="P219"/>
      <text:p text:style-name="P224"><text:soft-page-break/>Other Resources (Online Documentation and Tutorials)</text:p>
      <text:p text:style-name="P219">Developers often rely on:</text:p>
      <text:list text:style-name="L14">
        <text:list-item>
          <text:p text:style-name="P225">Linux manual pages </text:p>
        </text:list-item>
        <text:list-item>
          <text:p text:style-name="P225">online tutorials and blog posts </text:p>
        </text:list-item>
        <text:list-item>
          <text:p text:style-name="P225">fragmented educational resources </text:p>
          <text:p text:style-name="P225"/>
        </text:list-item>
      </text:list>
      <text:p text:style-name="P219"><text:span text:style-name="Strong_20_Emphasis">Strengths:</text:span></text:p>
      <text:list text:style-name="L15">
        <text:list-item>
          <text:p text:style-name="P226">Easily accessible and up-to-date </text:p>
        </text:list-item>
        <text:list-item>
          <text:p text:style-name="P226">Useful for quick reference and specific problems </text:p>
        </text:list-item>
      </text:list>
      <text:p text:style-name="P219"><text:span text:style-name="Strong_20_Emphasis"/></text:p>
      <text:p text:style-name="P219"><text:span text:style-name="Strong_20_Emphasis">Limitations:</text:span></text:p>
      <text:list text:style-name="L16">
        <text:list-item>
          <text:p text:style-name="P227">Lack of structure and continuity </text:p>
        </text:list-item>
        <text:list-item>
          <text:p text:style-name="P227">Inconsistent quality and depth </text:p>
        </text:list-item>
        <text:list-item>
          <text:p text:style-name="P227">Minimal guidance on how concepts connect or scale to real-world systems </text:p>
        </text:list-item>
      </text:list>
      <text:p text:style-name="P219"><text:span text:style-name="Strong_20_Emphasis"/></text:p>
      <text:p text:style-name="P219"><text:span text:style-name="Strong_20_Emphasis">Positioning of this book:</text:span><text:line-break/><text:span text:style-name="T6">This book transforms these fragmented resources into a </text:span><text:span text:style-name="Strong_20_Emphasis"><text:span text:style-name="T6">coherent and structured body of knowledge</text:span></text:span><text:span text:style-name="T6">, enabling readers to move from isolated understanding to a complete system-level perspective.</text:span></text:p>
      <text:p text:style-name="P219"/>
      <text:p text:style-name="P219"><text:span text:style-name="Strong_20_Emphasis">Summary of Differentiation</text:span></text:p>
      <text:p text:style-name="P219">This book differentiates itself by combining:</text:p>
      <text:p text:style-name="P219"/>
      <text:list text:style-name="L17">
        <text:list-item>
          <text:p text:style-name="P228"><text:span text:style-name="Strong_20_Emphasis">Modern Linux focus</text:span><text:line-break/>Including features and practices not fully covered in existing classic texts </text:p>
        </text:list-item>
        <text:list-item>
          <text:p text:style-name="P228"><text:span text:style-name="Strong_20_Emphasis">Structured progression</text:span><text:line-break/>Moving from foundational concepts to advanced topics in a guided manner </text:p>
        </text:list-item>
        <text:list-item>
          <text:p text:style-name="P228"><text:span text:style-name="Strong_20_Emphasis">Runtime-oriented approach</text:span><text:line-break/>Emphasizing how programs behave using tools like <text:span text:style-name="Source_20_Text"><text:span text:style-name="T7">strace</text:span></text:span> and <text:span text:style-name="Source_20_Text"><text:span text:style-name="T7">gdb</text:span></text:span> </text:p>
        </text:list-item>
        <text:list-item>
          <text:p text:style-name="P228"><text:span text:style-name="Strong_20_Emphasis">Bridging documentation and practice</text:span><text:line-break/>Turning manual pages into practical learning tools through extensive examples</text:p>
        </text:list-item>
      </text:list>
      <text:p text:style-name="P21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30"><text:soft-page-break/><text:span text:style-name="T898">Contact Information</text:span></text:p>
      <text:p text:style-name="P231"/>
      <text:p text:style-name="P232">Full name: Marco Bruno</text:p>
      <text:p text:style-name="P232">Address: Viale Giustiniano Imperatore 274, 00145, Rome, Italy</text:p>
      <text:p text:style-name="P233"><text:span text:style-name="T899">Email: </text:span><text:a xlink:type="simple" xlink:href="mailto:mr.marco.bruno.2022@gmail.com" text:style-name="Internet_20_link" text:visited-style-name="Visited_20_Internet_20_Link"><text:span text:style-name="T899">mr.marco.bruno.2022@gmail.com</text:span></text:a><text:span text:style-name="T899"> </text:span></text:p>
      <text:p text:style-name="P232">Tel: +855 96374172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ourier" svg:font-family="Courier, 'Courier New'" style:font-family-generic="modern"/>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style:font-family-asian="'Noto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reference1" style:display-name="footnote reference1"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20"/><text:page-number text:select-page="current">54</text:page-number><text:bookmark-end text:name="PageNumWizard_FOOTER_Default Page Style20"/></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22T11:22:48.694255098</meta:creation-date>
    <dc:date>2026-05-13T22:06:16.804228016</dc:date>
    <meta:editing-duration>PT1H13M1S</meta:editing-duration>
    <meta:editing-cycles>22</meta:editing-cycles>
    <meta:generator>LibreOffice/26.2.1.2$Linux_X86_64 LibreOffice_project/620$Build-2</meta:generator>
    <meta:print-date>2026-05-08T00:59:25.732940070</meta:print-date>
    <meta:printed-by>PDF files</meta:printed-by>
    <meta:document-statistic meta:table-count="53" meta:image-count="3" meta:object-count="0" meta:page-count="54" meta:paragraph-count="1585" meta:word-count="11953" meta:character-count="78096" meta:non-whitespace-character-count="65203"/>
  </office:meta>
</office:document-meta>
</file>