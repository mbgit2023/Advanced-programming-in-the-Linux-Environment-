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5pt solid #000000"/>
    </style:style>
    <style:style style:name="Table21" style:family="table">
      <style:table-properties style:width="3.8549in" fo:margin-left="1.4389in" table:align="left"/>
    </style:style>
    <style:style style:name="Table21.A" style:family="table-column">
      <style:table-column-properties style:column-width="1.9076in"/>
    </style:style>
    <style:style style:name="Table21.B" style:family="table-column">
      <style:table-column-properties style:column-width="1.9472in"/>
    </style:style>
    <style:style style:name="Table21.A1" style:family="table-cell">
      <style:table-cell-properties fo:padding="0.0382in" fo:border-left="0.5pt solid #000000" fo:border-right="none" fo:border-top="0.5pt solid #000000" fo:border-bottom="0.5pt solid #000000"/>
    </style:style>
    <style:style style:name="Table21.B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B2" style:family="table-cell">
      <style:table-cell-properties fo:padding="0.0382in" fo:border-left="0.5pt solid #000000" fo:border-right="0.5pt solid #000000" fo:border-top="none" fo:border-bottom="0.5pt solid #000000"/>
    </style:style>
    <style:style style:name="Table21.11" style:family="table-row">
      <style:table-row-properties style:min-row-height="0.2833in"/>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5pt solid #000000"/>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5pt solid #000000"/>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0.5pt solid #000000"/>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0.5pt solid #000000"/>
    </style:style>
    <style:style style:name="Table26" style:family="table">
      <style:table-properties style:width="6.6931in" table:align="margins"/>
    </style:style>
    <style:style style:name="Table26.A" style:family="table-column">
      <style:table-column-properties style:column-width="6.6931in" style:rel-column-width="65535*"/>
    </style:style>
    <style:style style:name="Table26.A1" style:family="table-cell">
      <style:table-cell-properties fo:padding="0.0382in" fo:border="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5pt solid #000000"/>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0.5pt solid #000000"/>
    </style:style>
    <style:style style:name="Table36" style:family="table">
      <style:table-properties style:width="6.6931in" table:align="margins"/>
    </style:style>
    <style:style style:name="Table36.A" style:family="table-column">
      <style:table-column-properties style:column-width="6.6931in" style:rel-column-width="65535*"/>
    </style:style>
    <style:style style:name="Table36.A1" style:family="table-cell">
      <style:table-cell-properties fo:padding="0.0382in" fo:border="0.5pt solid #000000"/>
    </style:style>
    <style:style style:name="Table28" style:family="table">
      <style:table-properties style:width="6.6931in" table:align="margins"/>
    </style:style>
    <style:style style:name="Table28.A" style:family="table-column">
      <style:table-column-properties style:column-width="6.6931in" style:rel-column-width="65535*"/>
    </style:style>
    <style:style style:name="Table28.A1" style:family="table-cell">
      <style:table-cell-properties fo:padding="0.0382in" fo:border="0.5pt solid #000000"/>
    </style:style>
    <style:style style:name="Table29" style:family="table">
      <style:table-properties style:width="6.6931in" table:align="margins"/>
    </style:style>
    <style:style style:name="Table29.A" style:family="table-column">
      <style:table-column-properties style:column-width="6.6931in" style:rel-column-width="65535*"/>
    </style:style>
    <style:style style:name="Table29.A1" style:family="table-cell">
      <style:table-cell-properties fo:padding="0.0382in" fo:border="0.5pt solid #000000"/>
    </style:style>
    <style:style style:name="Table30" style:family="table">
      <style:table-properties style:width="6.6931in" table:align="margins"/>
    </style:style>
    <style:style style:name="Table30.A" style:family="table-column">
      <style:table-column-properties style:column-width="6.6931in" style:rel-column-width="65535*"/>
    </style:style>
    <style:style style:name="Table30.A1" style:family="table-cell">
      <style:table-cell-properties fo:padding="0.0382in" fo:border="0.5pt solid #000000"/>
    </style:style>
    <style:style style:name="Table31" style:family="table">
      <style:table-properties style:width="6.6931in" table:align="margins"/>
    </style:style>
    <style:style style:name="Table31.A" style:family="table-column">
      <style:table-column-properties style:column-width="6.6931in" style:rel-column-width="65535*"/>
    </style:style>
    <style:style style:name="Table31.A1" style:family="table-cell">
      <style:table-cell-properties fo:padding="0.0382in" fo:border="0.5pt solid #000000"/>
    </style:style>
    <style:style style:name="Table32" style:family="table">
      <style:table-properties style:width="6.6931in" table:align="margins"/>
    </style:style>
    <style:style style:name="Table32.A" style:family="table-column">
      <style:table-column-properties style:column-width="6.6931in" style:rel-column-width="65535*"/>
    </style:style>
    <style:style style:name="Table32.A1" style:family="table-cell">
      <style:table-cell-properties fo:padding="0.0382in" fo:border="0.5pt solid #000000"/>
    </style:style>
    <style:style style:name="Table38" style:family="table">
      <style:table-properties style:width="6.6931in" table:align="margins"/>
    </style:style>
    <style:style style:name="Table38.A" style:family="table-column">
      <style:table-column-properties style:column-width="6.6931in" style:rel-column-width="65535*"/>
    </style:style>
    <style:style style:name="Table38.A1" style:family="table-cell">
      <style:table-cell-properties fo:padding="0.0382in" fo:border="0.5pt solid #000000"/>
    </style:style>
    <style:style style:name="Table37" style:family="table">
      <style:table-properties style:width="6.6931in" table:align="margins"/>
    </style:style>
    <style:style style:name="Table37.A" style:family="table-column">
      <style:table-column-properties style:column-width="6.6931in" style:rel-column-width="65535*"/>
    </style:style>
    <style:style style:name="Table37.A1" style:family="table-cell">
      <style:table-cell-properties fo:padding="0.0382in" fo:border="0.5pt solid #000000"/>
    </style:style>
    <style:style style:name="Table39" style:family="table">
      <style:table-properties style:width="6.6931in" table:align="margins"/>
    </style:style>
    <style:style style:name="Table39.A" style:family="table-column">
      <style:table-column-properties style:column-width="6.6931in" style:rel-column-width="65535*"/>
    </style:style>
    <style:style style:name="Table39.A1" style:family="table-cell">
      <style:table-cell-properties fo:padding="0.0382in" fo:border="0.5pt solid #000000"/>
    </style:style>
    <style:style style:name="Table40" style:family="table">
      <style:table-properties style:width="6.6931in" table:align="margins"/>
    </style:style>
    <style:style style:name="Table40.A" style:family="table-column">
      <style:table-column-properties style:column-width="6.6931in" style:rel-column-width="65535*"/>
    </style:style>
    <style:style style:name="Table40.A1" style:family="table-cell">
      <style:table-cell-properties fo:padding="0.0382in" fo:border="0.5pt solid #000000"/>
    </style:style>
    <style:style style:name="Table41" style:family="table">
      <style:table-properties style:width="6.6931in" table:align="margins"/>
    </style:style>
    <style:style style:name="Table41.A" style:family="table-column">
      <style:table-column-properties style:column-width="6.6931in" style:rel-column-width="65535*"/>
    </style:style>
    <style:style style:name="Table41.A1" style:family="table-cell">
      <style:table-cell-properties fo:padding="0.0382in" fo:border="0.5pt solid #000000"/>
    </style:style>
    <style:style style:name="Table42" style:family="table">
      <style:table-properties style:width="6.6931in" table:align="margins"/>
    </style:style>
    <style:style style:name="Table42.A" style:family="table-column">
      <style:table-column-properties style:column-width="6.6931in" style:rel-column-width="65535*"/>
    </style:style>
    <style:style style:name="Table42.A1" style:family="table-cell">
      <style:table-cell-properties fo:padding="0.0382in" fo:border="0.5pt solid #000000"/>
    </style:style>
    <style:style style:name="Table43" style:family="table">
      <style:table-properties style:width="6.6931in" table:align="margins"/>
    </style:style>
    <style:style style:name="Table43.A" style:family="table-column">
      <style:table-column-properties style:column-width="6.6931in" style:rel-column-width="65535*"/>
    </style:style>
    <style:style style:name="Table43.A1" style:family="table-cell">
      <style:table-cell-properties fo:padding="0.0382in" fo:border="0.5pt solid #000000"/>
    </style:style>
    <style:style style:name="Table44" style:family="table">
      <style:table-properties style:width="6.6931in" table:align="margins"/>
    </style:style>
    <style:style style:name="Table44.A" style:family="table-column">
      <style:table-column-properties style:column-width="6.6931in" style:rel-column-width="65535*"/>
    </style:style>
    <style:style style:name="Table44.A1" style:family="table-cell">
      <style:table-cell-properties fo:padding="0.0382in" fo:border="0.5pt solid #000000"/>
    </style:style>
    <style:style style:name="P1" style:family="paragraph" style:parent-style-name="Standard">
      <style:paragraph-properties fo:text-align="center" style:justify-single-word="false"/>
      <style:text-properties fo:font-size="16pt" fo:font-weight="bold" officeooo:rsid="001f978e" officeooo:paragraph-rsid="001f978e"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20pt" fo:font-weight="bold" officeooo:rsid="001f978e" officeooo:paragraph-rsid="001f978e"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fo:font-weight="normal" officeooo:rsid="001f978e" officeooo:paragraph-rsid="001f978e" style:font-size-asian="20pt" style:font-weight-asian="normal" style:font-size-complex="20pt" style:font-weight-complex="normal"/>
    </style:style>
    <style:style style:name="P4" style:family="paragraph" style:parent-style-name="Standard">
      <style:paragraph-properties fo:text-align="justify" style:justify-single-word="false"/>
      <style:text-properties fo:font-size="14pt" fo:font-weight="normal" officeooo:rsid="001f978e" officeooo:paragraph-rsid="001f978e"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6pt" fo:font-weight="bold" officeooo:rsid="001f978e" officeooo:paragraph-rsid="001f978e" style:font-size-asian="16pt" style:font-weight-asian="bold" style:font-size-complex="16pt" style:font-weight-complex="bold"/>
    </style:style>
    <style:style style:name="P6" style:family="paragraph" style:parent-style-name="Standard">
      <style:paragraph-properties fo:text-align="justify" style:justify-single-word="false"/>
      <style:text-properties fo:font-size="14pt" fo:font-weight="normal" officeooo:rsid="001f978e" officeooo:paragraph-rsid="002c3b03"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font-size="14pt" fo:font-weight="bold" officeooo:rsid="001f978e" officeooo:paragraph-rsid="001f978e" style:font-size-asian="12.25pt" style:font-weight-asian="bold" style:font-size-complex="14pt" style:font-weight-complex="bold"/>
    </style:style>
    <style:style style:name="P8" style:family="paragraph" style:parent-style-name="Standard">
      <style:paragraph-properties fo:text-align="justify" style:justify-single-word="false"/>
      <style:text-properties officeooo:paragraph-rsid="00202600"/>
    </style:style>
    <style:style style:name="P9" style:family="paragraph" style:parent-style-name="Standard">
      <style:paragraph-properties fo:text-align="justify" style:justify-single-word="false"/>
      <style:text-properties fo:font-size="12pt" fo:font-weight="normal" officeooo:rsid="00202600" officeooo:paragraph-rsid="00202600"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officeooo:paragraph-rsid="00202600" style:font-size-asian="12pt" style:font-size-complex="12pt"/>
    </style:style>
    <style:style style:name="P11" style:family="paragraph" style:parent-style-name="Standard">
      <style:paragraph-properties fo:text-align="justify" style:justify-single-word="false"/>
      <style:text-properties fo:font-size="14pt" fo:font-weight="bold" officeooo:rsid="0020e2f6" officeooo:paragraph-rsid="0020e2f6"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fo:font-size="13pt" fo:font-style="italic" fo:font-weight="bold" officeooo:rsid="0020e2f6" officeooo:paragraph-rsid="0020e2f6" style:font-size-asian="11.3500003814697pt" style:font-style-asian="italic" style:font-weight-asian="bold" style:font-size-complex="13pt" style:font-style-complex="italic" style:font-weight-complex="bold"/>
    </style:style>
    <style:style style:name="P13" style:family="paragraph" style:parent-style-name="Standard">
      <style:paragraph-properties fo:text-align="justify" style:justify-single-word="false"/>
      <style:text-properties fo:font-size="12pt" fo:font-style="normal" fo:font-weight="normal" officeooo:rsid="0021fd63" officeooo:paragraph-rsid="0021fd63"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6pt" fo:font-style="normal" fo:font-weight="bold" officeooo:rsid="00225b0b" officeooo:paragraph-rsid="00225b0b" style:font-size-asian="16pt" style:font-style-asian="normal" style:font-weight-asian="bold" style:font-size-complex="16pt" style:font-style-complex="normal" style:font-weight-complex="bold"/>
    </style:style>
    <style:style style:name="P15" style:family="paragraph" style:parent-style-name="Standard">
      <style:paragraph-properties fo:text-align="left" style:justify-single-word="false"/>
      <style:text-properties fo:font-size="14pt" fo:font-weight="bold" officeooo:rsid="08142063" officeooo:paragraph-rsid="00225b0b" style:font-size-asian="14pt" style:font-weight-asian="bold" style:font-size-complex="14pt" style:font-weight-complex="bold"/>
    </style:style>
    <style:style style:name="P16" style:family="paragraph" style:parent-style-name="Standard">
      <style:paragraph-properties fo:text-align="left" style:justify-single-word="false"/>
      <style:text-properties fo:font-size="13pt" fo:font-weight="bold" officeooo:rsid="08142063" officeooo:paragraph-rsid="00225b0b" style:font-size-asian="11.3500003814697pt" style:font-weight-asian="bold" style:font-size-complex="13pt" style:font-weight-complex="bold"/>
    </style:style>
    <style:style style:name="P17" style:family="paragraph" style:parent-style-name="Standard">
      <style:paragraph-properties fo:text-align="justify" style:justify-single-word="false"/>
      <style:text-properties fo:font-size="14pt" fo:font-weight="normal" officeooo:rsid="0069734c" officeooo:paragraph-rsid="00225b0b"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3pt" fo:font-weight="normal" officeooo:rsid="0024c6a2" officeooo:paragraph-rsid="00225b0b" style:font-size-asian="13pt" style:font-weight-asian="normal" style:font-size-complex="13pt" style:font-weight-complex="normal"/>
    </style:style>
    <style:style style:name="P19" style:family="paragraph" style:parent-style-name="Standard">
      <style:paragraph-properties fo:text-align="justify" style:justify-single-word="false"/>
      <style:text-properties fo:font-size="13pt" fo:font-weight="normal" officeooo:rsid="002b79c2" officeooo:paragraph-rsid="00225b0b" style:font-size-asian="13pt" style:font-weight-asian="normal" style:font-size-complex="13pt" style:font-weight-complex="normal"/>
    </style:style>
    <style:style style:name="P20" style:family="paragraph" style:parent-style-name="Standard">
      <style:paragraph-properties fo:text-align="justify" style:justify-single-word="false"/>
      <style:text-properties fo:font-size="13pt" fo:font-weight="normal" officeooo:rsid="041ca23c" officeooo:paragraph-rsid="00225b0b" style:font-size-asian="13pt" style:font-weight-asian="normal" style:font-size-complex="13pt" style:font-weight-complex="normal"/>
    </style:style>
    <style:style style:name="P21" style:family="paragraph" style:parent-style-name="Standard">
      <style:paragraph-properties fo:text-align="justify" style:justify-single-word="false"/>
      <style:text-properties fo:font-size="13pt" fo:font-weight="normal" officeooo:rsid="05bc05ed" officeooo:paragraph-rsid="00225b0b" style:font-size-asian="13pt" style:font-weight-asian="normal" style:font-size-complex="13pt" style:font-weight-complex="normal"/>
    </style:style>
    <style:style style:name="P22" style:family="paragraph" style:parent-style-name="Standard">
      <style:paragraph-properties fo:text-align="justify" style:justify-single-word="false"/>
      <style:text-properties fo:font-size="13pt" fo:font-weight="normal" officeooo:rsid="022f6448" officeooo:paragraph-rsid="00225b0b" style:font-size-asian="13pt" style:font-weight-asian="normal" style:font-size-complex="13pt" style:font-weight-complex="normal"/>
    </style:style>
    <style:style style:name="P23" style:family="paragraph" style:parent-style-name="Standard">
      <style:paragraph-properties fo:text-align="justify" style:justify-single-word="false"/>
      <style:text-properties fo:font-size="13pt" fo:font-weight="normal" officeooo:rsid="0028f9b0" officeooo:paragraph-rsid="00225b0b"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fo:font-size="13pt" fo:font-weight="normal" officeooo:rsid="06a6b977" officeooo:paragraph-rsid="00225b0b" style:font-size-asian="13pt" style:font-weight-asian="normal" style:font-size-complex="13pt" style:font-weight-complex="normal"/>
    </style:style>
    <style:style style:name="P25" style:family="paragraph" style:parent-style-name="Standard">
      <style:paragraph-properties fo:text-align="justify" style:justify-single-word="false"/>
      <style:text-properties fo:font-size="13pt" fo:font-weight="normal" officeooo:rsid="02391998" officeooo:paragraph-rsid="00225b0b" style:font-size-asian="13pt" style:font-weight-asian="normal" style:font-size-complex="13pt" style:font-weight-complex="normal"/>
    </style:style>
    <style:style style:name="P26" style:family="paragraph" style:parent-style-name="Standard">
      <style:paragraph-properties fo:text-align="justify" style:justify-single-word="false"/>
      <style:text-properties fo:font-size="13pt" fo:font-weight="normal" officeooo:rsid="066cfbbe" officeooo:paragraph-rsid="00225b0b" style:font-size-asian="13pt" style:font-weight-asian="normal" style:font-size-complex="13pt" style:font-weight-complex="normal"/>
    </style:style>
    <style:style style:name="P27" style:family="paragraph" style:parent-style-name="Standard">
      <style:paragraph-properties fo:text-align="justify" style:justify-single-word="false"/>
      <style:text-properties fo:font-size="13pt" fo:font-weight="normal" officeooo:rsid="023abbef" officeooo:paragraph-rsid="00225b0b" style:font-size-asian="13pt" style:font-weight-asian="normal" style:font-size-complex="13pt" style:font-weight-complex="normal"/>
    </style:style>
    <style:style style:name="P28" style:family="paragraph" style:parent-style-name="Standard">
      <style:paragraph-properties fo:text-align="justify" style:justify-single-word="false"/>
      <style:text-properties officeooo:paragraph-rsid="00225b0b"/>
    </style:style>
    <style:style style:name="P29" style:family="paragraph" style:parent-style-name="Standard">
      <style:paragraph-properties fo:text-align="justify" style:justify-single-word="false"/>
      <style:text-properties fo:font-size="13pt" fo:font-weight="normal" officeooo:rsid="0459d7a3" officeooo:paragraph-rsid="00225b0b" style:font-size-asian="13pt" style:font-weight-asian="normal" style:font-size-complex="13pt" style:font-weight-complex="normal"/>
    </style:style>
    <style:style style:name="P30" style:family="paragraph" style:parent-style-name="Standard">
      <style:paragraph-properties fo:text-align="justify" style:justify-single-word="false"/>
      <style:text-properties fo:font-size="13pt" fo:font-weight="normal" officeooo:rsid="002b451b" officeooo:paragraph-rsid="00225b0b" style:font-size-asian="13pt" style:font-weight-asian="normal" style:font-size-complex="13pt" style:font-weight-complex="normal"/>
    </style:style>
    <style:style style:name="P31" style:family="paragraph" style:parent-style-name="Standard">
      <style:paragraph-properties fo:text-align="justify" style:justify-single-word="false"/>
      <style:text-properties fo:font-size="13pt" fo:font-weight="normal" officeooo:rsid="07abb34e" officeooo:paragraph-rsid="00225b0b" style:font-size-asian="13pt" style:font-weight-asian="normal" style:font-size-complex="13pt" style:font-weight-complex="normal"/>
    </style:style>
    <style:style style:name="P32" style:family="paragraph" style:parent-style-name="Standard">
      <style:paragraph-properties fo:text-align="justify" style:justify-single-word="false"/>
      <style:text-properties fo:font-size="13pt" fo:font-weight="normal" officeooo:rsid="05d29cca" officeooo:paragraph-rsid="00225b0b" style:font-size-asian="13pt" style:font-weight-asian="normal" style:font-size-complex="13pt" style:font-weight-complex="normal"/>
    </style:style>
    <style:style style:name="P33" style:family="paragraph" style:parent-style-name="Standard">
      <style:paragraph-properties fo:text-align="justify" style:justify-single-word="false"/>
      <style:text-properties fo:font-size="13pt" fo:font-weight="normal" officeooo:rsid="05e2350d" officeooo:paragraph-rsid="00225b0b" style:font-size-asian="13pt" style:font-weight-asian="normal" style:font-size-complex="13pt" style:font-weight-complex="normal"/>
    </style:style>
    <style:style style:name="P34" style:family="paragraph" style:parent-style-name="Standard">
      <style:paragraph-properties fo:text-align="justify" style:justify-single-word="false"/>
      <style:text-properties fo:font-size="14pt" fo:font-weight="bold" officeooo:rsid="081dc5d0" officeooo:paragraph-rsid="00225b0b" style:font-size-asian="14pt" style:font-weight-asian="bold" style:font-size-complex="14pt" style:font-weight-complex="bold"/>
    </style:style>
    <style:style style:name="P35" style:family="paragraph" style:parent-style-name="Standard">
      <style:paragraph-properties fo:text-align="justify" style:justify-single-word="false"/>
      <style:text-properties fo:font-size="13pt" fo:font-weight="normal" officeooo:rsid="006d0dae" officeooo:paragraph-rsid="00225b0b" style:font-size-asian="13pt" style:font-weight-asian="normal" style:font-size-complex="13pt" style:font-weight-complex="normal"/>
    </style:style>
    <style:style style:name="P36" style:family="paragraph" style:parent-style-name="Standard">
      <style:paragraph-properties fo:text-align="justify" style:justify-single-word="false"/>
      <style:text-properties fo:font-size="13pt" fo:font-weight="normal" officeooo:rsid="0011a5c1" officeooo:paragraph-rsid="00225b0b" style:font-size-asian="13pt" style:font-weight-asian="normal" style:font-size-complex="13pt" style:font-weight-complex="normal"/>
    </style:style>
    <style:style style:name="P37" style:family="paragraph" style:parent-style-name="Standard">
      <style:paragraph-properties fo:text-align="justify" style:justify-single-word="false"/>
      <style:text-properties fo:font-size="13pt" fo:font-weight="normal" officeooo:rsid="00d726d4" officeooo:paragraph-rsid="00225b0b" style:font-size-asian="13pt" style:font-weight-asian="normal" style:font-size-complex="13pt" style:font-weight-complex="normal"/>
    </style:style>
    <style:style style:name="P38" style:family="paragraph" style:parent-style-name="Standard">
      <style:paragraph-properties fo:text-align="justify" style:justify-single-word="false"/>
      <style:text-properties fo:font-size="13pt" fo:font-weight="normal" officeooo:rsid="0ceb4a89" officeooo:paragraph-rsid="00225b0b" style:font-size-asian="13pt" style:font-weight-asian="normal" style:font-size-complex="13pt" style:font-weight-complex="normal"/>
    </style:style>
    <style:style style:name="P39" style:family="paragraph" style:parent-style-name="Standard">
      <style:paragraph-properties fo:text-align="justify" style:justify-single-word="false"/>
      <style:text-properties fo:font-size="13pt" fo:font-weight="normal" officeooo:rsid="2dda129f" officeooo:paragraph-rsid="00225b0b" style:font-size-asian="13pt" style:font-weight-asian="normal" style:font-size-complex="13pt" style:font-weight-complex="normal"/>
    </style:style>
    <style:style style:name="P40" style:family="paragraph" style:parent-style-name="Standard">
      <style:paragraph-properties fo:text-align="justify" style:justify-single-word="false"/>
      <style:text-properties fo:font-size="13pt" fo:font-weight="normal" officeooo:rsid="2e13b514" officeooo:paragraph-rsid="00225b0b" style:font-size-asian="13pt" style:font-weight-asian="normal" style:font-size-complex="13pt" style:font-weight-complex="normal"/>
    </style:style>
    <style:style style:name="P41" style:family="paragraph" style:parent-style-name="Standard">
      <style:paragraph-properties fo:text-align="justify" style:justify-single-word="false"/>
      <style:text-properties fo:font-size="13pt" fo:font-weight="normal" officeooo:rsid="307fae26" officeooo:paragraph-rsid="00225b0b" style:font-size-asian="13pt" style:font-weight-asian="normal" style:font-size-complex="13pt" style:font-weight-complex="normal"/>
    </style:style>
    <style:style style:name="P42" style:family="paragraph" style:parent-style-name="Standard">
      <style:paragraph-properties fo:text-align="justify" style:justify-single-word="false"/>
      <style:text-properties fo:font-size="13pt" fo:font-weight="normal" officeooo:rsid="0c64dfb5" officeooo:paragraph-rsid="00225b0b" style:font-size-asian="13pt" style:font-weight-asian="normal" style:font-size-complex="13pt" style:font-weight-complex="normal"/>
    </style:style>
    <style:style style:name="P43" style:family="paragraph" style:parent-style-name="Standard">
      <style:paragraph-properties fo:text-align="justify" style:justify-single-word="false"/>
      <style:text-properties fo:font-size="13pt" style:text-underline-style="none" fo:font-weight="normal" officeooo:rsid="00d726d4" officeooo:paragraph-rsid="00225b0b" style:font-size-asian="13pt" style:font-weight-asian="normal" style:font-size-complex="13pt" style:font-weight-complex="normal"/>
    </style:style>
    <style:style style:name="P44" style:family="paragraph" style:parent-style-name="Standard">
      <style:paragraph-properties fo:text-align="justify" style:justify-single-word="false"/>
      <style:text-properties fo:font-size="13pt" style:text-underline-style="none" fo:font-weight="bold" officeooo:rsid="084b28ad" officeooo:paragraph-rsid="00225b0b" style:font-size-asian="13pt" style:font-weight-asian="bold" style:font-size-complex="13pt" style:font-weight-complex="bold"/>
    </style:style>
    <style:style style:name="P45" style:family="paragraph" style:parent-style-name="Standard">
      <style:paragraph-properties fo:text-align="justify" style:justify-single-word="false"/>
      <style:text-properties fo:font-size="13pt" style:text-underline-style="none" fo:font-weight="normal" officeooo:rsid="00133120" officeooo:paragraph-rsid="00225b0b" style:font-size-asian="13pt" style:font-weight-asian="normal" style:font-size-complex="13pt" style:font-weight-complex="normal"/>
    </style:style>
    <style:style style:name="P46" style:family="paragraph" style:parent-style-name="Standard">
      <style:paragraph-properties fo:text-align="justify" style:justify-single-word="false"/>
      <style:text-properties fo:font-size="14pt" style:text-underline-style="none" fo:font-weight="bold" officeooo:rsid="0ff0543e" officeooo:paragraph-rsid="00225b0b" style:font-size-asian="14pt" style:font-weight-asian="bold" style:font-size-complex="14pt" style:font-weight-complex="bold"/>
    </style:style>
    <style:style style:name="P47" style:family="paragraph" style:parent-style-name="Standard">
      <style:paragraph-properties fo:text-align="justify" style:justify-single-word="false"/>
      <style:text-properties fo:font-size="13pt" style:text-underline-style="none" fo:font-weight="normal" officeooo:rsid="001c2776" officeooo:paragraph-rsid="00225b0b" style:font-size-asian="13pt" style:font-weight-asian="normal" style:font-size-complex="13pt" style:font-weight-complex="normal"/>
    </style:style>
    <style:style style:name="P48" style:family="paragraph" style:parent-style-name="Standard">
      <style:paragraph-properties fo:text-align="justify" style:justify-single-word="false"/>
      <style:text-properties fo:font-size="13pt" style:text-underline-style="none" fo:font-weight="normal" officeooo:rsid="002a45bb" officeooo:paragraph-rsid="00225b0b" style:font-size-asian="13pt" style:font-weight-asian="normal" style:font-size-complex="13pt" style:font-weight-complex="normal"/>
    </style:style>
    <style:style style:name="P49" style:family="paragraph" style:parent-style-name="Standard">
      <style:paragraph-properties fo:text-align="justify" style:justify-single-word="false"/>
      <style:text-properties fo:font-size="13pt" officeooo:paragraph-rsid="00225b0b" style:font-size-asian="13pt" style:font-size-complex="13pt"/>
    </style:style>
    <style:style style:name="P50" style:family="paragraph" style:parent-style-name="Standard">
      <style:paragraph-properties fo:text-align="justify" style:justify-single-word="false"/>
      <style:text-properties fo:font-size="13pt" fo:font-weight="bold" officeooo:rsid="2e13b514" officeooo:paragraph-rsid="00225b0b" style:font-size-asian="13pt" style:font-weight-asian="bold" style:font-size-complex="13pt" style:font-weight-complex="bold"/>
    </style:style>
    <style:style style:name="P51" style:family="paragraph" style:parent-style-name="Standard">
      <style:paragraph-properties fo:text-align="justify" style:justify-single-word="false"/>
      <style:text-properties fo:font-size="13pt" fo:font-weight="normal" officeooo:rsid="19ad516a" officeooo:paragraph-rsid="00225b0b" style:font-size-asian="13pt" style:font-weight-asian="normal" style:font-size-complex="13pt" style:font-weight-complex="normal"/>
    </style:style>
    <style:style style:name="P52" style:family="paragraph" style:parent-style-name="Standard">
      <style:paragraph-properties fo:text-align="justify" style:justify-single-word="false"/>
      <style:text-properties fo:font-size="13pt" style:text-underline-style="none" fo:font-weight="normal" officeooo:rsid="00799967" officeooo:paragraph-rsid="00225b0b" style:font-size-asian="13pt" style:font-weight-asian="normal" style:font-size-complex="13pt" style:font-weight-complex="normal"/>
    </style:style>
    <style:style style:name="P53" style:family="paragraph" style:parent-style-name="Standard">
      <style:paragraph-properties fo:text-align="justify" style:justify-single-word="false"/>
      <style:text-properties fo:font-size="13pt" style:text-underline-style="none" fo:font-weight="normal" officeooo:rsid="34f1674c" officeooo:paragraph-rsid="00225b0b" style:font-size-asian="13pt" style:font-weight-asian="normal" style:font-size-complex="13pt" style:font-weight-complex="normal"/>
    </style:style>
    <style:style style:name="P54" style:family="paragraph" style:parent-style-name="Standard">
      <style:paragraph-properties fo:text-align="left" style:justify-single-word="false"/>
      <style:text-properties fo:font-size="13pt" style:text-underline-style="none" fo:font-weight="normal" officeooo:rsid="35410923" officeooo:paragraph-rsid="00225b0b" style:font-size-asian="13pt" style:font-weight-asian="normal" style:font-size-complex="13pt" style:font-weight-complex="normal"/>
    </style:style>
    <style:style style:name="P55" style:family="paragraph" style:parent-style-name="Standard">
      <style:paragraph-properties fo:text-align="left" style:justify-single-word="false"/>
      <style:text-properties fo:font-size="13pt" style:text-underline-style="none" fo:font-weight="normal" officeooo:rsid="35452f34" officeooo:paragraph-rsid="00225b0b" style:font-size-asian="13pt" style:font-weight-asian="normal" style:font-size-complex="13pt" style:font-weight-complex="normal"/>
    </style:style>
    <style:style style:name="P56" style:family="paragraph" style:parent-style-name="Standard">
      <style:paragraph-properties fo:text-align="justify" style:justify-single-word="false"/>
      <style:text-properties fo:font-size="13pt" style:text-underline-style="none" fo:font-weight="normal" officeooo:rsid="2ab48cd4" officeooo:paragraph-rsid="00225b0b" style:font-size-asian="13pt" style:font-weight-asian="normal" style:font-size-complex="13pt" style:font-weight-complex="normal"/>
    </style:style>
    <style:style style:name="P57" style:family="paragraph" style:parent-style-name="Standard">
      <style:paragraph-properties fo:text-align="justify" style:justify-single-word="false"/>
      <style:text-properties fo:font-size="13pt" style:text-underline-style="none" fo:font-weight="normal" officeooo:rsid="367889a9" officeooo:paragraph-rsid="00225b0b" style:font-size-asian="13pt" style:font-weight-asian="normal" style:font-size-complex="13pt" style:font-weight-complex="normal"/>
    </style:style>
    <style:style style:name="P58" style:family="paragraph" style:parent-style-name="Standard">
      <style:paragraph-properties fo:text-align="justify" style:justify-single-word="false"/>
      <style:text-properties fo:font-size="13pt" fo:font-weight="normal" officeooo:rsid="002210b6" officeooo:paragraph-rsid="00225b0b" style:font-size-asian="13pt" style:font-weight-asian="normal" style:font-size-complex="13pt" style:font-weight-complex="normal"/>
    </style:style>
    <style:style style:name="P59" style:family="paragraph" style:parent-style-name="Standard">
      <style:paragraph-properties fo:text-align="left" style:justify-single-word="false"/>
      <style:text-properties officeooo:paragraph-rsid="00225b0b"/>
    </style:style>
    <style:style style:name="P60" style:family="paragraph" style:parent-style-name="Standard">
      <style:paragraph-properties fo:text-align="left" style:justify-single-word="false"/>
      <style:text-properties fo:font-size="13pt" fo:font-weight="normal" officeooo:rsid="00c7186a" officeooo:paragraph-rsid="00225b0b" style:font-size-asian="13pt" style:font-weight-asian="normal" style:font-size-complex="13pt" style:font-weight-complex="normal"/>
    </style:style>
    <style:style style:name="P61" style:family="paragraph" style:parent-style-name="Standard">
      <style:paragraph-properties fo:text-align="left" style:justify-single-word="false"/>
      <style:text-properties fo:font-size="13pt" fo:font-weight="normal" officeooo:rsid="04bcd0e5" officeooo:paragraph-rsid="00225b0b" style:font-size-asian="13pt" style:font-weight-asian="normal" style:font-size-complex="13pt" style:font-weight-complex="normal"/>
    </style:style>
    <style:style style:name="P62" style:family="paragraph" style:parent-style-name="Standard">
      <style:paragraph-properties fo:text-align="left" style:justify-single-word="false"/>
      <style:text-properties fo:font-size="13pt" style:text-underline-style="none" fo:font-weight="normal" officeooo:rsid="00b107fb" officeooo:paragraph-rsid="00225b0b" style:font-size-asian="13pt" style:font-weight-asian="normal" style:font-size-complex="13pt" style:font-weight-complex="normal"/>
    </style:style>
    <style:style style:name="P63" style:family="paragraph" style:parent-style-name="Standard">
      <style:paragraph-properties fo:text-align="justify" style:justify-single-word="false"/>
      <style:text-properties fo:font-size="13pt" fo:font-weight="normal" officeooo:rsid="04bcd0e5" officeooo:paragraph-rsid="00225b0b" style:font-size-asian="13pt" style:font-weight-asian="normal" style:font-size-complex="13pt" style:font-weight-complex="normal"/>
    </style:style>
    <style:style style:name="P64" style:family="paragraph" style:parent-style-name="Standard">
      <style:paragraph-properties fo:text-align="justify" style:justify-single-word="false"/>
      <style:text-properties fo:font-size="13pt" fo:font-weight="normal" officeooo:rsid="04beb33d" officeooo:paragraph-rsid="00225b0b" style:font-size-asian="13pt" style:font-weight-asian="normal" style:font-size-complex="13pt" style:font-weight-complex="normal"/>
    </style:style>
    <style:style style:name="P65" style:family="paragraph" style:parent-style-name="Standard">
      <style:paragraph-properties fo:text-align="justify" style:justify-single-word="false"/>
      <style:text-properties fo:font-size="13pt" fo:font-weight="normal" officeooo:rsid="0aefaf02" officeooo:paragraph-rsid="00225b0b" style:font-size-asian="13pt" style:font-weight-asian="normal" style:font-size-complex="13pt" style:font-weight-complex="normal"/>
    </style:style>
    <style:style style:name="P66" style:family="paragraph" style:parent-style-name="Standard">
      <style:paragraph-properties fo:text-align="justify" style:justify-single-word="false"/>
      <style:text-properties fo:color="#000000" loext:opacity="100%" style:font-name="Liberation Serif" fo:font-size="13pt" fo:font-style="normal" fo:font-weight="normal" officeooo:rsid="00b4a934" officeooo:paragraph-rsid="00225b0b" style:font-size-asian="13pt" style:font-style-asian="normal" style:font-weight-asian="normal" style:font-size-complex="13pt" style:font-style-complex="normal" style:font-weight-complex="normal"/>
    </style:style>
    <style:style style:name="P67" style:family="paragraph" style:parent-style-name="Standard">
      <style:paragraph-properties fo:text-align="left" style:justify-single-word="false"/>
      <style:text-properties fo:font-size="13pt" fo:font-weight="normal" officeooo:rsid="006d0dae" officeooo:paragraph-rsid="00225b0b" style:font-size-asian="13pt" style:font-weight-asian="normal" style:font-size-complex="13pt" style:font-weight-complex="normal"/>
    </style:style>
    <style:style style:name="P68" style:family="paragraph" style:parent-style-name="Standard">
      <style:paragraph-properties fo:text-align="justify" style:justify-single-word="false"/>
      <style:text-properties fo:color="#000000" loext:opacity="100%" style:font-name="Liberation Serif" fo:font-size="13pt" fo:font-style="normal" style:text-underline-style="none" fo:font-weight="normal" officeooo:rsid="00c05ced" officeooo:paragraph-rsid="00225b0b" style:font-size-asian="13pt" style:font-style-asian="normal" style:font-weight-asian="normal" style:font-size-complex="13pt" style:font-style-complex="normal" style:font-weight-complex="normal"/>
    </style:style>
    <style:style style:name="P69" style:family="paragraph" style:parent-style-name="Standard">
      <style:paragraph-properties fo:text-align="left" style:justify-single-word="false"/>
      <style:text-properties fo:color="#000000" loext:opacity="100%" style:font-name="Liberation Serif" fo:font-size="13pt" fo:font-style="normal" style:text-underline-style="none" fo:font-weight="normal" officeooo:rsid="00c05ced" officeooo:paragraph-rsid="00225b0b" style:font-size-asian="13pt" style:font-style-asian="normal" style:font-weight-asian="normal" style:font-size-complex="13pt" style:font-style-complex="normal" style:font-weight-complex="normal"/>
    </style:style>
    <style:style style:name="P70" style:family="paragraph" style:parent-style-name="Standard">
      <style:paragraph-properties fo:text-align="justify" style:justify-single-word="false"/>
      <style:text-properties fo:font-size="13pt" fo:font-weight="normal" officeooo:rsid="002795f6" officeooo:paragraph-rsid="00225b0b" style:font-size-asian="13pt" style:font-weight-asian="normal" style:font-size-complex="13pt" style:font-weight-complex="normal"/>
    </style:style>
    <style:style style:name="P71" style:family="paragraph" style:parent-style-name="Standard">
      <style:text-properties officeooo:paragraph-rsid="00225b0b"/>
    </style:style>
    <style:style style:name="P72" style:family="paragraph" style:parent-style-name="Standard">
      <style:text-properties fo:font-size="13pt" officeooo:paragraph-rsid="00225b0b" style:font-size-asian="13pt" style:font-size-complex="13pt"/>
    </style:style>
    <style:style style:name="P73" style:family="paragraph" style:parent-style-name="Standard">
      <style:paragraph-properties fo:text-align="justify" style:justify-single-word="false"/>
      <style:text-properties fo:font-size="13pt" fo:font-weight="normal" officeooo:rsid="00433ec1" officeooo:paragraph-rsid="00225b0b" style:font-size-asian="13pt" style:font-weight-asian="normal" style:font-size-complex="13pt" style:font-weight-complex="normal"/>
    </style:style>
    <style:style style:name="P74" style:family="paragraph" style:parent-style-name="Standard">
      <style:paragraph-properties fo:text-align="left" style:justify-single-word="false"/>
      <style:text-properties fo:font-size="13pt" officeooo:paragraph-rsid="00225b0b" style:font-size-asian="13pt" style:font-size-complex="13pt"/>
    </style:style>
    <style:style style:name="P75" style:family="paragraph" style:parent-style-name="Standard">
      <style:paragraph-properties fo:text-align="left" style:justify-single-word="false"/>
      <style:text-properties style:use-window-font-color="true" loext:opacity="0%" fo:font-size="13pt" fo:font-style="normal" fo:font-weight="normal" officeooo:rsid="013533f3" officeooo:paragraph-rsid="00225b0b" style:font-size-asian="13pt" style:font-style-asian="normal" style:font-weight-asian="normal" style:font-size-complex="13pt" style:font-style-complex="normal" style:font-weight-complex="normal"/>
    </style:style>
    <style:style style:name="P76" style:family="paragraph" style:parent-style-name="Standard">
      <style:paragraph-properties fo:text-align="left" style:justify-single-word="false"/>
      <style:text-properties fo:font-size="13pt" fo:font-weight="normal" officeooo:rsid="02d6aa2d" officeooo:paragraph-rsid="00225b0b" style:font-size-asian="13pt" style:font-weight-asian="normal" style:font-size-complex="13pt" style:font-weight-complex="normal"/>
    </style:style>
    <style:style style:name="P77" style:family="paragraph" style:parent-style-name="Standard">
      <style:paragraph-properties fo:text-align="left" style:justify-single-word="false"/>
      <style:text-properties fo:font-size="13pt" fo:font-weight="normal" officeooo:rsid="054941da" officeooo:paragraph-rsid="00225b0b" style:font-size-asian="13pt" style:font-weight-asian="normal" style:font-size-complex="13pt" style:font-weight-complex="normal"/>
    </style:style>
    <style:style style:name="P78" style:family="paragraph" style:parent-style-name="Standard">
      <style:paragraph-properties fo:text-align="left" style:justify-single-word="false"/>
      <style:text-properties fo:font-size="13pt" fo:font-weight="normal" officeooo:rsid="0009729a" officeooo:paragraph-rsid="00225b0b" style:font-size-asian="13pt" style:font-weight-asian="normal" style:font-size-complex="13pt" style:font-weight-complex="normal"/>
    </style:style>
    <style:style style:name="P79" style:family="paragraph" style:parent-style-name="Standard">
      <style:paragraph-properties fo:text-align="left" style:justify-single-word="false"/>
      <style:text-properties fo:font-size="13pt" fo:font-weight="normal" officeooo:rsid="0141b2e9" officeooo:paragraph-rsid="00225b0b" style:font-size-asian="13pt" style:font-weight-asian="normal" style:font-size-complex="13pt" style:font-weight-complex="normal"/>
    </style:style>
    <style:style style:name="P80" style:family="paragraph" style:parent-style-name="Standard">
      <style:paragraph-properties fo:text-align="left" style:justify-single-word="false"/>
      <style:text-properties fo:font-size="13pt" fo:font-weight="normal" officeooo:rsid="0275d905" officeooo:paragraph-rsid="00225b0b" style:font-size-asian="13pt" style:font-weight-asian="normal" style:font-size-complex="13pt" style:font-weight-complex="normal"/>
    </style:style>
    <style:style style:name="P81" style:family="paragraph" style:parent-style-name="Standard">
      <style:paragraph-properties fo:text-align="left" style:justify-single-word="false"/>
      <style:text-properties fo:font-size="13pt" fo:font-style="normal" fo:font-weight="normal" officeooo:rsid="025ce238" officeooo:paragraph-rsid="00225b0b" style:font-size-asian="13pt" style:font-style-asian="normal" style:font-weight-asian="normal" style:font-size-complex="13pt" style:font-style-complex="normal" style:font-weight-complex="normal"/>
    </style:style>
    <style:style style:name="P82" style:family="paragraph" style:parent-style-name="Standard">
      <style:paragraph-properties fo:text-align="left" style:justify-single-word="false"/>
      <style:text-properties fo:font-size="13pt" fo:font-style="normal" fo:font-weight="normal" officeooo:rsid="04d96e96" officeooo:paragraph-rsid="00225b0b" style:font-size-asian="13pt" style:font-style-asian="normal" style:font-weight-asian="normal" style:font-size-complex="13pt" style:font-style-complex="normal" style:font-weight-complex="normal"/>
    </style:style>
    <style:style style:name="P83" style:family="paragraph" style:parent-style-name="Standard">
      <style:paragraph-properties fo:text-align="left" style:justify-single-word="false"/>
      <style:text-properties fo:font-size="13pt" fo:font-style="normal" fo:font-weight="normal" officeooo:rsid="045f7d9d" officeooo:paragraph-rsid="00225b0b" style:font-size-asian="13pt" style:font-style-asian="normal" style:font-weight-asian="normal" style:font-size-complex="13pt" style:font-style-complex="normal" style:font-weight-complex="normal"/>
    </style:style>
    <style:style style:name="P84" style:family="paragraph" style:parent-style-name="Standard">
      <style:paragraph-properties fo:text-align="left" style:justify-single-word="false"/>
      <style:text-properties fo:font-size="13pt" fo:font-style="normal" fo:font-weight="normal" officeooo:rsid="043c8fa7" officeooo:paragraph-rsid="00225b0b" style:font-size-asian="13pt" style:font-style-asian="normal" style:font-weight-asian="normal" style:font-size-complex="13pt" style:font-style-complex="normal" style:font-weight-complex="normal"/>
    </style:style>
    <style:style style:name="P85" style:family="paragraph" style:parent-style-name="Standard">
      <style:paragraph-properties fo:text-align="left" style:justify-single-word="false"/>
      <style:text-properties fo:font-size="13pt" fo:font-style="normal" fo:font-weight="normal" officeooo:rsid="05ab584a" officeooo:paragraph-rsid="00225b0b" style:font-size-asian="13pt" style:font-style-asian="normal" style:font-weight-asian="normal" style:font-size-complex="13pt" style:font-style-complex="normal" style:font-weight-complex="normal"/>
    </style:style>
    <style:style style:name="P86" style:family="paragraph" style:parent-style-name="Standard">
      <style:paragraph-properties fo:text-align="left" style:justify-single-word="false"/>
      <style:text-properties fo:font-size="13pt" fo:font-style="normal" fo:font-weight="normal" officeooo:rsid="06cb99cc" officeooo:paragraph-rsid="00225b0b" style:font-size-asian="13pt" style:font-style-asian="normal" style:font-weight-asian="normal" style:font-size-complex="13pt" style:font-style-complex="normal" style:font-weight-complex="normal"/>
    </style:style>
    <style:style style:name="P87" style:family="paragraph" style:parent-style-name="Standard">
      <style:paragraph-properties fo:text-align="left" style:justify-single-word="false"/>
      <style:text-properties fo:font-size="13pt" fo:font-weight="normal" officeooo:rsid="025ce238" officeooo:paragraph-rsid="00225b0b" style:font-size-asian="13pt" style:font-weight-asian="normal" style:font-size-complex="13pt" style:font-weight-complex="normal"/>
    </style:style>
    <style:style style:name="P88" style:family="paragraph" style:parent-style-name="Standard">
      <style:paragraph-properties fo:text-align="left" style:justify-single-word="false"/>
      <style:text-properties fo:font-size="13pt" fo:font-style="normal" fo:font-weight="normal" officeooo:rsid="043ccbbb" officeooo:paragraph-rsid="00225b0b" style:font-size-asian="13pt" style:font-style-asian="normal" style:font-weight-asian="normal" style:font-size-complex="13pt" style:font-style-complex="normal" style:font-weight-complex="normal"/>
    </style:style>
    <style:style style:name="P89" style:family="paragraph" style:parent-style-name="Standard">
      <style:paragraph-properties fo:text-align="left" style:justify-single-word="false"/>
      <style:text-properties fo:font-size="13pt" fo:font-weight="normal" officeooo:rsid="00234dd1" officeooo:paragraph-rsid="00225b0b" style:font-size-asian="13pt" style:font-weight-asian="normal" style:font-size-complex="13pt" style:font-weight-complex="normal"/>
    </style:style>
    <style:style style:name="P90" style:family="paragraph" style:parent-style-name="Standard">
      <style:paragraph-properties fo:text-align="left" style:justify-single-word="false"/>
      <style:text-properties fo:font-size="13pt" fo:font-weight="normal" officeooo:rsid="08885293" officeooo:paragraph-rsid="00225b0b" style:font-size-asian="13pt" style:font-weight-asian="normal" style:font-size-complex="13pt" style:font-weight-complex="normal"/>
    </style:style>
    <style:style style:name="P91" style:family="paragraph" style:parent-style-name="Standard">
      <style:paragraph-properties fo:text-align="left" style:justify-single-word="false"/>
      <style:text-properties fo:font-size="13pt" fo:font-weight="normal" officeooo:rsid="09c71189" officeooo:paragraph-rsid="00225b0b" style:font-size-asian="13pt" style:font-weight-asian="normal" style:font-size-complex="13pt" style:font-weight-complex="normal"/>
    </style:style>
    <style:style style:name="P92" style:family="paragraph" style:parent-style-name="Standard">
      <style:paragraph-properties fo:text-align="left" style:justify-single-word="false"/>
      <style:text-properties fo:font-size="13pt" fo:font-weight="normal" officeooo:rsid="078aa5bb" officeooo:paragraph-rsid="00225b0b" style:font-size-asian="13pt" style:font-weight-asian="normal" style:font-size-complex="13pt" style:font-weight-complex="normal"/>
    </style:style>
    <style:style style:name="P93" style:family="paragraph" style:parent-style-name="Standard">
      <style:paragraph-properties fo:text-align="left" style:justify-single-word="false"/>
      <style:text-properties style:use-window-font-color="true" loext:opacity="0%" fo:font-size="13pt" fo:font-weight="normal" officeooo:rsid="0b4c7da5" officeooo:paragraph-rsid="00225b0b" style:font-size-asian="13pt" style:font-weight-asian="normal" style:font-size-complex="13pt" style:font-weight-complex="normal"/>
    </style:style>
    <style:style style:name="P94" style:family="paragraph" style:parent-style-name="Standard">
      <style:paragraph-properties fo:text-align="left" style:justify-single-word="false"/>
      <style:text-properties style:use-window-font-color="true" loext:opacity="0%" fo:font-size="13pt" fo:font-weight="normal" officeooo:rsid="0b9efa32" officeooo:paragraph-rsid="00225b0b" style:font-size-asian="13pt" style:font-weight-asian="normal" style:font-size-complex="13pt" style:font-weight-complex="normal"/>
    </style:style>
    <style:style style:name="P95" style:family="paragraph" style:parent-style-name="Standard">
      <style:paragraph-properties fo:text-align="left" style:justify-single-word="false"/>
      <style:text-properties style:use-window-font-color="true" loext:opacity="0%" fo:font-size="13pt" fo:font-weight="normal" officeooo:rsid="0c2ddbb8" officeooo:paragraph-rsid="00225b0b" style:font-size-asian="13pt" style:font-weight-asian="normal" style:font-size-complex="13pt" style:font-weight-complex="normal"/>
    </style:style>
    <style:style style:name="P96" style:family="paragraph" style:parent-style-name="Standard">
      <style:paragraph-properties fo:text-align="left" style:justify-single-word="false"/>
      <style:text-properties style:use-window-font-color="true" loext:opacity="0%" fo:font-size="13pt" fo:font-weight="bold" officeooo:rsid="0308615e" officeooo:paragraph-rsid="00225b0b" style:font-size-asian="13pt" style:font-weight-asian="bold" style:font-size-complex="13pt" style:font-weight-complex="bold"/>
    </style:style>
    <style:style style:name="P97" style:family="paragraph" style:parent-style-name="Standard">
      <style:paragraph-properties fo:text-align="left" style:justify-single-word="false"/>
      <style:text-properties style:font-name="Liberation Serif" fo:font-size="13pt" fo:font-weight="normal" officeooo:rsid="0136fe3d" officeooo:paragraph-rsid="00225b0b" style:font-size-asian="13pt" style:font-weight-asian="normal" style:font-size-complex="13pt" style:font-weight-complex="normal"/>
    </style:style>
    <style:style style:name="P98" style:family="paragraph" style:parent-style-name="Standard">
      <style:paragraph-properties fo:text-align="left" style:justify-single-word="false"/>
      <style:text-properties style:font-name="Liberation Serif" fo:font-size="13pt" fo:font-weight="normal" officeooo:rsid="043ff174" officeooo:paragraph-rsid="00225b0b" style:font-size-asian="13pt" style:font-weight-asian="normal" style:font-size-complex="13pt" style:font-weight-complex="normal"/>
    </style:style>
    <style:style style:name="P99" style:family="paragraph" style:parent-style-name="Standard">
      <style:paragraph-properties fo:text-align="left" style:justify-single-word="false"/>
      <style:text-properties style:font-name="Liberation Serif" fo:font-size="14pt" fo:font-weight="bold" officeooo:rsid="00225b0b" officeooo:paragraph-rsid="00225b0b" style:font-size-asian="14pt" style:font-weight-asian="bold" style:font-size-complex="14pt" style:font-weight-complex="bold"/>
    </style:style>
    <style:style style:name="P100" style:family="paragraph" style:parent-style-name="Standard">
      <style:paragraph-properties fo:text-align="justify" style:justify-single-word="false"/>
      <style:text-properties officeooo:paragraph-rsid="0023b133"/>
    </style:style>
    <style:style style:name="P101" style:family="paragraph" style:parent-style-name="Standard">
      <style:text-properties officeooo:paragraph-rsid="0023b133"/>
    </style:style>
    <style:style style:name="P102" style:family="paragraph" style:parent-style-name="Standard">
      <style:paragraph-properties fo:text-align="justify" style:justify-single-word="false"/>
    </style:style>
    <style:style style:name="P103" style:family="paragraph" style:parent-style-name="Standard">
      <style:text-properties fo:font-size="15pt" fo:font-weight="bold" officeooo:rsid="002598fa" officeooo:paragraph-rsid="00261cd4" style:font-size-asian="15pt" style:font-weight-asian="bold" style:font-size-complex="15pt" style:font-weight-complex="bold"/>
    </style:style>
    <style:style style:name="P104" style:family="paragraph" style:parent-style-name="Standard">
      <style:paragraph-properties fo:text-align="center" style:justify-single-word="false"/>
      <style:text-properties fo:font-size="15pt" fo:font-weight="bold" officeooo:rsid="002598fa" officeooo:paragraph-rsid="00261cd4" style:font-size-asian="15pt" style:font-weight-asian="bold" style:font-size-complex="15pt" style:font-weight-complex="bold"/>
    </style:style>
    <style:style style:name="P105" style:family="paragraph" style:parent-style-name="Standard">
      <style:paragraph-properties fo:text-align="center" style:justify-single-word="false"/>
      <style:text-properties fo:font-size="18pt" fo:font-weight="bold" officeooo:rsid="052baf14" officeooo:paragraph-rsid="00261cd4" style:font-size-asian="18pt" style:font-weight-asian="bold" style:font-size-complex="18pt" style:font-weight-complex="bold"/>
    </style:style>
    <style:style style:name="P106" style:family="paragraph" style:parent-style-name="Standard">
      <style:text-properties officeooo:paragraph-rsid="00261cd4"/>
    </style:style>
    <style:style style:name="P107" style:family="paragraph" style:parent-style-name="Standard" style:list-style-name="L1">
      <style:text-properties officeooo:paragraph-rsid="00261cd4"/>
    </style:style>
    <style:style style:name="P108" style:family="paragraph" style:parent-style-name="Standard">
      <style:text-properties style:font-name="Liberation Serif" officeooo:paragraph-rsid="00261cd4"/>
    </style:style>
    <style:style style:name="P109" style:family="paragraph" style:parent-style-name="Standard" style:list-style-name="L1">
      <style:text-properties officeooo:rsid="00126fcf" officeooo:paragraph-rsid="00261cd4"/>
    </style:style>
    <style:style style:name="P110" style:family="paragraph" style:parent-style-name="Standard" style:list-style-name="L1">
      <style:text-properties style:font-name="Liberation Serif" officeooo:rsid="0013fdd7" officeooo:paragraph-rsid="00261cd4"/>
    </style:style>
    <style:style style:name="P111" style:family="paragraph" style:parent-style-name="Standard" style:list-style-name="L1">
      <style:text-properties officeooo:rsid="0013fdd7" officeooo:paragraph-rsid="00261cd4"/>
    </style:style>
    <style:style style:name="P112" style:family="paragraph" style:parent-style-name="Standard">
      <style:paragraph-properties fo:text-align="justify" style:justify-single-word="false"/>
      <style:text-properties officeooo:paragraph-rsid="00261cd4"/>
    </style:style>
    <style:style style:name="P113" style:family="paragraph" style:parent-style-name="Standard">
      <style:paragraph-properties fo:text-align="justify" style:justify-single-word="false"/>
      <style:text-properties fo:font-weight="normal" officeooo:paragraph-rsid="00261cd4" style:font-weight-asian="normal" style:font-weight-complex="normal"/>
    </style:style>
    <style:style style:name="P114" style:family="paragraph" style:parent-style-name="Footnote">
      <style:text-properties officeooo:rsid="00155def" officeooo:paragraph-rsid="00155def"/>
    </style:style>
    <style:style style:name="P115" style:family="paragraph" style:parent-style-name="Standard">
      <style:paragraph-properties fo:text-align="justify" style:justify-single-word="false"/>
      <style:text-properties fo:font-weight="normal" officeooo:rsid="00155def" officeooo:paragraph-rsid="00261cd4" style:font-weight-asian="normal" style:font-weight-complex="normal"/>
    </style:style>
    <style:style style:name="P116" style:family="paragraph" style:parent-style-name="Standard">
      <style:paragraph-properties fo:text-align="center" style:justify-single-word="false"/>
      <style:text-properties officeooo:paragraph-rsid="00261cd4"/>
    </style:style>
    <style:style style:name="P117" style:family="paragraph" style:parent-style-name="Standard">
      <style:paragraph-properties fo:text-align="justify" style:justify-single-word="false"/>
      <style:text-properties fo:font-weight="normal" officeooo:rsid="004e1dc3" officeooo:paragraph-rsid="00261cd4" style:font-weight-asian="normal" style:font-weight-complex="normal"/>
    </style:style>
    <style:style style:name="P118" style:family="paragraph" style:parent-style-name="Standard">
      <style:paragraph-properties fo:text-align="justify" style:justify-single-word="false"/>
      <style:text-properties officeooo:rsid="004e1dc3" officeooo:paragraph-rsid="00261cd4"/>
    </style:style>
    <style:style style:name="P119" style:family="paragraph" style:parent-style-name="Footnote">
      <style:text-properties officeooo:paragraph-rsid="004acbd8"/>
    </style:style>
    <style:style style:name="P120" style:family="paragraph" style:parent-style-name="Table_20_Contents">
      <style:paragraph-properties fo:text-align="left" style:justify-single-word="false"/>
      <style:text-properties officeooo:paragraph-rsid="00261cd4"/>
    </style:style>
    <style:style style:name="P121" style:family="paragraph" style:parent-style-name="Standard">
      <style:paragraph-properties fo:text-align="left" style:justify-single-word="false"/>
      <style:text-properties officeooo:paragraph-rsid="00261cd4"/>
    </style:style>
    <style:style style:name="P122" style:family="paragraph" style:parent-style-name="Standard">
      <style:paragraph-properties fo:text-align="justify" style:justify-single-word="false"/>
      <style:text-properties fo:font-weight="normal" officeooo:rsid="006b484f" officeooo:paragraph-rsid="00261cd4" style:font-weight-asian="normal" style:font-weight-complex="normal"/>
    </style:style>
    <style:style style:name="P123" style:family="paragraph" style:parent-style-name="Footnote">
      <style:text-properties officeooo:paragraph-rsid="006b484f"/>
    </style:style>
    <style:style style:name="P124" style:family="paragraph" style:parent-style-name="Standard">
      <style:paragraph-properties fo:text-align="center" style:justify-single-word="false"/>
      <style:text-properties fo:font-weight="bold" officeooo:paragraph-rsid="00261cd4" style:font-weight-asian="bold" style:font-weight-complex="bold"/>
    </style:style>
    <style:style style:name="P125" style:family="paragraph" style:parent-style-name="Standard">
      <style:paragraph-properties fo:text-align="left" style:justify-single-word="false"/>
      <style:text-properties style:font-name="Courier" officeooo:paragraph-rsid="00261cd4"/>
    </style:style>
    <style:style style:name="P126" style:family="paragraph" style:parent-style-name="Footnote">
      <style:text-properties officeooo:rsid="0064dce0" officeooo:paragraph-rsid="0064dce0"/>
    </style:style>
    <style:style style:name="P127" style:family="paragraph" style:parent-style-name="Standard">
      <style:paragraph-properties fo:text-align="justify" style:justify-single-word="false"/>
      <style:text-properties fo:font-weight="normal" officeooo:rsid="0064dce0" officeooo:paragraph-rsid="00261cd4" style:font-weight-asian="normal" style:font-weight-complex="normal"/>
    </style:style>
    <style:style style:name="P128" style:family="paragraph" style:parent-style-name="Standard">
      <style:paragraph-properties fo:text-align="justify" style:justify-single-word="false"/>
      <style:text-properties fo:color="#000000" loext:opacity="100%" style:font-name="Courier" fo:font-size="11pt" fo:font-weight="normal" officeooo:paragraph-rsid="00261cd4" fo:background-color="#ffffff" style:font-size-asian="11pt" style:font-size-complex="11pt"/>
    </style:style>
    <style:style style:name="P129" style:family="paragraph" style:parent-style-name="Standard">
      <style:paragraph-properties fo:margin-left="0in" fo:margin-right="0in" style:line-height-at-least="0.198in" fo:text-indent="0in" style:auto-text-indent="false"/>
      <style:text-properties fo:color="#000000" loext:opacity="100%" style:font-name="Courier" fo:font-size="11pt" fo:font-weight="normal" officeooo:paragraph-rsid="00261cd4" fo:background-color="#ffffff" style:font-size-asian="11pt" style:font-size-complex="11pt"/>
    </style:style>
    <style:style style:name="P130" style:family="paragraph" style:parent-style-name="Standard">
      <style:paragraph-properties style:line-height-at-least="0.198in"/>
      <style:text-properties style:font-name="Courier" fo:font-size="11pt" officeooo:paragraph-rsid="00261cd4" style:font-size-asian="11pt" style:font-size-complex="11pt"/>
    </style:style>
    <style:style style:name="P131" style:family="paragraph" style:parent-style-name="Standard">
      <style:paragraph-properties fo:margin-left="0in" fo:margin-right="0in" style:line-height-at-least="0.198in" fo:text-indent="0in" style:auto-text-indent="false"/>
      <style:text-properties officeooo:paragraph-rsid="00261cd4"/>
    </style:style>
    <style:style style:name="P132" style:family="paragraph" style:parent-style-name="Standard">
      <style:paragraph-properties fo:margin-left="0in" fo:margin-right="0in" style:line-height-at-least="0.198in" fo:text-indent="0in" style:auto-text-indent="false"/>
      <style:text-properties style:font-name="Courier" fo:font-size="11pt" officeooo:paragraph-rsid="00261cd4" style:font-size-asian="11pt" style:font-size-complex="11pt"/>
    </style:style>
    <style:style style:name="P133" style:family="paragraph" style:parent-style-name="Standard">
      <style:paragraph-properties fo:margin-left="0in" fo:margin-right="0in" style:line-height-at-least="0.198in" fo:text-align="right" style:justify-single-word="false" fo:text-indent="0in" style:auto-text-indent="false"/>
      <style:text-properties fo:color="#00a933" loext:opacity="100%" style:font-name="Courier" fo:font-size="10pt" fo:font-style="italic" fo:font-weight="normal" officeooo:rsid="0064dce0" officeooo:paragraph-rsid="00261cd4" fo:background-color="#ffffff" style:font-size-asian="10pt" style:font-style-asian="italic" style:font-size-complex="10pt" style:font-style-complex="italic"/>
    </style:style>
    <style:style style:name="P134" style:family="paragraph" style:parent-style-name="Standard">
      <style:text-properties fo:font-weight="normal" officeooo:rsid="00658f40" officeooo:paragraph-rsid="00261cd4" style:font-weight-asian="normal" style:font-weight-complex="normal"/>
    </style:style>
    <style:style style:name="P135" style:family="paragraph" style:parent-style-name="Standard">
      <style:paragraph-properties fo:margin-left="0in" fo:margin-right="0in" style:line-height-at-least="0.198in" fo:text-indent="0in" style:auto-text-indent="false"/>
      <style:text-properties fo:color="#008000" loext:opacity="100%" style:font-name="Courier" fo:font-size="11pt" fo:font-weight="normal" officeooo:paragraph-rsid="00261cd4" fo:background-color="#ffffff" style:font-size-asian="11pt" style:font-size-complex="11pt"/>
    </style:style>
    <style:style style:name="P136" style:family="paragraph" style:parent-style-name="Standard">
      <style:text-properties fo:font-weight="normal" officeooo:rsid="0066cb1d" officeooo:paragraph-rsid="00261cd4" style:font-weight-asian="normal" style:font-weight-complex="normal"/>
    </style:style>
    <style:style style:name="P137" style:family="paragraph" style:parent-style-name="Footnote">
      <style:text-properties officeooo:rsid="0066cb1d" officeooo:paragraph-rsid="0066cb1d"/>
    </style:style>
    <style:style style:name="P138" style:family="paragraph" style:parent-style-name="Standard">
      <style:text-properties style:font-name="Courier" fo:font-size="11pt" officeooo:paragraph-rsid="00261cd4" style:font-size-asian="11pt" style:font-size-complex="11pt"/>
    </style:style>
    <style:style style:name="P139" style:family="paragraph" style:parent-style-name="Standard">
      <style:paragraph-properties fo:text-align="right" style:justify-single-word="false"/>
      <style:text-properties fo:color="#00a933" loext:opacity="100%" style:font-name="Courier" fo:font-size="10pt" fo:font-style="italic" officeooo:rsid="0066cb1d" officeooo:paragraph-rsid="00261cd4" style:font-size-asian="10pt" style:font-style-asian="italic" style:font-size-complex="10pt" style:font-style-complex="italic"/>
    </style:style>
    <style:style style:name="P140" style:family="paragraph" style:parent-style-name="Footnote">
      <style:text-properties officeooo:paragraph-rsid="00683d8e"/>
    </style:style>
    <style:style style:name="P141" style:family="paragraph" style:parent-style-name="Standard">
      <style:text-properties fo:font-weight="normal" officeooo:rsid="00683d8e" officeooo:paragraph-rsid="00261cd4" style:font-weight-asian="normal" style:font-weight-complex="normal"/>
    </style:style>
    <style:style style:name="P142" style:family="paragraph" style:parent-style-name="Standard">
      <style:text-properties fo:font-weight="normal" officeooo:rsid="0068abaa" officeooo:paragraph-rsid="00261cd4" style:font-weight-asian="normal" style:font-weight-complex="normal"/>
    </style:style>
    <style:style style:name="P143" style:family="paragraph" style:parent-style-name="Footnote">
      <style:text-properties officeooo:paragraph-rsid="0068abaa"/>
    </style:style>
    <style:style style:name="P144" style:family="paragraph" style:parent-style-name="Standard">
      <style:paragraph-properties style:line-height-at-least="0.198in"/>
      <style:text-properties fo:color="#000000" loext:opacity="100%" style:font-name="Courier" fo:font-size="11pt" fo:font-weight="normal" officeooo:paragraph-rsid="00261cd4" fo:background-color="#ffffff" style:font-size-asian="11pt" style:font-size-complex="11pt"/>
    </style:style>
    <style:style style:name="P145" style:family="paragraph" style:parent-style-name="Table_20_Contents">
      <style:paragraph-properties fo:text-align="right" style:justify-single-word="false"/>
      <style:text-properties fo:color="#00a933" loext:opacity="100%" style:font-name="Courier" fo:font-size="10pt" fo:font-style="italic" officeooo:rsid="0068abaa" officeooo:paragraph-rsid="00261cd4" style:font-size-asian="10pt" style:font-style-asian="italic" style:font-size-complex="10pt" style:font-style-complex="italic"/>
    </style:style>
    <style:style style:name="P146" style:family="paragraph" style:parent-style-name="Standard">
      <style:paragraph-properties fo:text-align="justify" style:justify-single-word="false"/>
      <style:text-properties fo:font-weight="normal" officeooo:rsid="0068abaa" officeooo:paragraph-rsid="00261cd4" style:font-weight-asian="normal" style:font-weight-complex="normal"/>
    </style:style>
    <style:style style:name="P147" style:family="paragraph" style:parent-style-name="Footnote">
      <style:text-properties officeooo:rsid="006a5ed7" officeooo:paragraph-rsid="006a5ed7"/>
    </style:style>
    <style:style style:name="P148" style:family="paragraph" style:parent-style-name="Standard">
      <style:paragraph-properties fo:text-align="justify" style:justify-single-word="false"/>
      <style:text-properties fo:font-weight="normal" officeooo:rsid="006a5ed7" officeooo:paragraph-rsid="00261cd4" style:font-weight-asian="normal" style:font-weight-complex="normal"/>
    </style:style>
    <style:style style:name="P149" style:family="paragraph" style:parent-style-name="Standard">
      <style:paragraph-properties fo:text-align="justify" style:justify-single-word="false"/>
      <style:text-properties fo:color="#000000" loext:opacity="100%" style:font-name="Courier" fo:font-size="11pt" fo:font-weight="normal" officeooo:paragraph-rsid="00261cd4" style:font-size-asian="11pt" style:font-size-complex="11pt"/>
    </style:style>
    <style:style style:name="P150" style:family="paragraph" style:parent-style-name="Horizontal_20_Line">
      <style:text-properties officeooo:paragraph-rsid="00261cd4"/>
    </style:style>
    <style:style style:name="P151" style:family="paragraph" style:parent-style-name="Standard">
      <style:text-properties officeooo:rsid="007acaea" officeooo:paragraph-rsid="00261cd4"/>
    </style:style>
    <style:style style:name="P152" style:family="paragraph" style:parent-style-name="Standard" style:list-style-name="L2">
      <style:text-properties officeooo:paragraph-rsid="00261cd4"/>
    </style:style>
    <style:style style:name="P153" style:family="paragraph" style:parent-style-name="Standard" style:list-style-name="L3">
      <style:text-properties officeooo:rsid="007acaea" officeooo:paragraph-rsid="00261cd4"/>
    </style:style>
    <style:style style:name="P154" style:family="paragraph" style:parent-style-name="Standard">
      <style:text-properties officeooo:rsid="007deb16" officeooo:paragraph-rsid="00261cd4"/>
    </style:style>
    <style:style style:name="P155" style:family="paragraph" style:parent-style-name="Standard">
      <style:paragraph-properties fo:text-align="justify" style:justify-single-word="false"/>
      <style:text-properties officeooo:rsid="007deb16" officeooo:paragraph-rsid="00261cd4"/>
    </style:style>
    <style:style style:name="P156" style:family="paragraph" style:parent-style-name="Standard" style:list-style-name="L4">
      <style:paragraph-properties fo:text-align="justify" style:justify-single-word="false"/>
      <style:text-properties officeooo:paragraph-rsid="00261cd4"/>
    </style:style>
    <style:style style:name="P157" style:family="paragraph" style:parent-style-name="Standard">
      <style:text-properties officeooo:rsid="008157ea" officeooo:paragraph-rsid="00261cd4"/>
    </style:style>
    <style:style style:name="P158" style:family="paragraph" style:parent-style-name="Standard">
      <style:text-properties fo:font-style="italic" officeooo:rsid="008157ea" officeooo:paragraph-rsid="00261cd4" style:font-style-asian="italic" style:font-style-complex="italic"/>
    </style:style>
    <style:style style:name="P159" style:family="paragraph" style:parent-style-name="Table_20_Contents">
      <style:text-properties officeooo:paragraph-rsid="00261cd4"/>
    </style:style>
    <style:style style:name="P160" style:family="paragraph" style:parent-style-name="Standard">
      <style:paragraph-properties fo:text-align="justify" style:justify-single-word="false"/>
      <style:text-properties officeooo:rsid="008157ea" officeooo:paragraph-rsid="00261cd4"/>
    </style:style>
    <style:style style:name="P161" style:family="paragraph" style:parent-style-name="Standard">
      <style:paragraph-properties fo:text-align="justify" style:justify-single-word="false"/>
      <style:text-properties officeooo:rsid="00b390a0" officeooo:paragraph-rsid="00261cd4"/>
    </style:style>
    <style:style style:name="P162" style:family="paragraph" style:parent-style-name="Footnote">
      <style:text-properties officeooo:rsid="006d198d" officeooo:paragraph-rsid="006d198d"/>
    </style:style>
    <style:style style:name="P163" style:family="paragraph" style:parent-style-name="Standard">
      <style:paragraph-properties fo:text-align="justify" style:justify-single-word="false"/>
      <style:text-properties style:font-name="Courier" officeooo:paragraph-rsid="00261cd4"/>
    </style:style>
    <style:style style:name="P164" style:family="paragraph" style:parent-style-name="Standard">
      <style:paragraph-properties fo:text-align="justify" style:justify-single-word="false"/>
      <style:text-properties officeooo:rsid="006e7c48" officeooo:paragraph-rsid="00261cd4"/>
    </style:style>
    <style:style style:name="P165" style:family="paragraph" style:parent-style-name="Standard">
      <style:paragraph-properties fo:text-align="justify" style:justify-single-word="false"/>
      <style:text-properties style:font-name="Courier" fo:font-size="11pt" officeooo:paragraph-rsid="00261cd4" style:font-size-asian="11pt" style:font-size-complex="11pt"/>
    </style:style>
    <style:style style:name="P166" style:family="paragraph" style:parent-style-name="Standard">
      <style:text-properties officeooo:rsid="0085df3d" officeooo:paragraph-rsid="00261cd4"/>
    </style:style>
    <style:style style:name="P167" style:family="paragraph" style:parent-style-name="Standard">
      <style:paragraph-properties fo:text-align="justify" style:justify-single-word="false"/>
      <style:text-properties fo:font-weight="normal" officeooo:rsid="0085df3d" officeooo:paragraph-rsid="00261cd4" style:font-weight-asian="normal" style:font-weight-complex="normal"/>
    </style:style>
    <style:style style:name="P168" style:family="paragraph" style:parent-style-name="Standard">
      <style:paragraph-properties fo:text-align="justify" style:justify-single-word="false"/>
      <style:text-properties fo:font-style="italic" officeooo:rsid="008157ea" officeooo:paragraph-rsid="00261cd4" style:font-style-asian="italic" style:font-style-complex="italic"/>
    </style:style>
    <style:style style:name="P169" style:family="paragraph" style:parent-style-name="Standard">
      <style:paragraph-properties fo:margin-left="0in" fo:margin-right="0in" style:line-height-at-least="0.198in" fo:text-indent="0in" style:auto-text-indent="false"/>
      <style:text-properties style:font-name="Courier" fo:font-size="11pt" officeooo:rsid="00b789f0" officeooo:paragraph-rsid="00261cd4" style:font-size-asian="11pt" style:font-size-complex="11pt"/>
    </style:style>
    <style:style style:name="P170" style:family="paragraph" style:parent-style-name="Standard">
      <style:paragraph-properties fo:text-align="justify" style:justify-single-word="false"/>
      <style:text-properties fo:font-weight="normal" officeooo:rsid="00b9772b" officeooo:paragraph-rsid="00261cd4" style:font-weight-asian="normal" style:font-weight-complex="normal"/>
    </style:style>
    <style:style style:name="P171" style:family="paragraph" style:parent-style-name="Standard">
      <style:paragraph-properties fo:text-align="justify" style:justify-single-word="false"/>
      <style:text-properties fo:font-weight="normal" officeooo:rsid="00ba640d" officeooo:paragraph-rsid="00261cd4" style:font-weight-asian="normal" style:font-weight-complex="normal"/>
    </style:style>
    <style:style style:name="P172" style:family="paragraph" style:parent-style-name="Standard">
      <style:paragraph-properties fo:text-align="justify" style:justify-single-word="false"/>
      <style:text-properties fo:font-weight="normal" officeooo:rsid="00bbb1e7" officeooo:paragraph-rsid="00261cd4" style:font-weight-asian="normal" style:font-weight-complex="normal"/>
    </style:style>
    <style:style style:name="P173" style:family="paragraph" style:parent-style-name="Footnote">
      <style:text-properties officeooo:rsid="008adbc2" officeooo:paragraph-rsid="008adbc2"/>
    </style:style>
    <style:style style:name="P174" style:family="paragraph" style:parent-style-name="Table_20_Contents">
      <style:paragraph-properties fo:text-align="justify" style:justify-single-word="false"/>
      <style:text-properties style:font-name="Courier" fo:font-size="11pt" officeooo:paragraph-rsid="00261cd4" style:font-size-asian="11pt" style:font-size-complex="11pt"/>
    </style:style>
    <style:style style:name="P175" style:family="paragraph" style:parent-style-name="Table_20_Contents">
      <style:paragraph-properties fo:text-align="right" style:justify-single-word="false"/>
      <style:text-properties fo:color="#00a933" loext:opacity="100%" style:font-name="Courier" fo:font-size="10pt" fo:font-style="italic" officeooo:rsid="008adbc2" officeooo:paragraph-rsid="00261cd4" style:font-size-asian="10pt" style:font-style-asian="italic" style:font-size-complex="10pt" style:font-style-complex="italic"/>
    </style:style>
    <style:style style:name="P176" style:family="paragraph" style:parent-style-name="Standard">
      <style:paragraph-properties fo:text-align="justify" style:justify-single-word="false"/>
      <style:text-properties fo:font-weight="normal" officeooo:rsid="008c467b" officeooo:paragraph-rsid="00261cd4" style:font-weight-asian="normal" style:font-weight-complex="normal"/>
    </style:style>
    <style:style style:name="P177" style:family="paragraph" style:parent-style-name="Standard" style:list-style-name="L5">
      <style:text-properties officeooo:paragraph-rsid="00261cd4"/>
    </style:style>
    <style:style style:name="P178" style:family="paragraph" style:parent-style-name="Standard">
      <style:text-properties officeooo:rsid="009bd28f" officeooo:paragraph-rsid="00261cd4"/>
    </style:style>
    <style:style style:name="P179" style:family="paragraph" style:parent-style-name="Standard">
      <style:text-properties fo:font-style="italic" officeooo:rsid="009bd28f" officeooo:paragraph-rsid="00261cd4" style:font-style-asian="italic" style:font-style-complex="italic"/>
    </style:style>
    <style:style style:name="P180" style:family="paragraph" style:parent-style-name="Standard">
      <style:paragraph-properties fo:text-align="center" style:justify-single-word="false"/>
      <style:text-properties fo:font-weight="bold" officeooo:rsid="00c93525" officeooo:paragraph-rsid="00261cd4" style:font-weight-asian="bold" style:font-weight-complex="bold"/>
    </style:style>
    <style:style style:name="P181" style:family="paragraph" style:parent-style-name="Standard">
      <style:paragraph-properties fo:text-align="justify" style:justify-single-word="false"/>
      <style:text-properties fo:font-weight="normal" officeooo:rsid="00bd5a1b" officeooo:paragraph-rsid="00261cd4" style:font-weight-asian="normal" style:font-weight-complex="normal"/>
    </style:style>
    <style:style style:name="P182" style:family="paragraph" style:parent-style-name="Standard">
      <style:paragraph-properties fo:text-align="justify" style:justify-single-word="false"/>
      <style:text-properties style:use-window-font-color="true" loext:opacity="0%" style:font-name="Liberation Serif" fo:font-weight="normal" officeooo:rsid="00bed9c3" officeooo:paragraph-rsid="00261cd4" style:font-weight-asian="normal" style:font-weight-complex="normal"/>
    </style:style>
    <style:style style:name="P183" style:family="paragraph" style:parent-style-name="Standard" style:list-style-name="L6">
      <style:paragraph-properties fo:text-align="justify" style:justify-single-word="false"/>
      <style:text-properties officeooo:paragraph-rsid="00261cd4"/>
    </style:style>
    <style:style style:name="P184" style:family="paragraph" style:parent-style-name="Standard">
      <style:paragraph-properties fo:margin-left="0in" fo:margin-right="0in" style:line-height-at-least="0.198in" fo:text-indent="0in" style:auto-text-indent="false"/>
      <style:text-properties style:use-window-font-color="true" loext:opacity="0%" style:font-name="Courier" fo:font-size="10pt" fo:font-weight="normal" officeooo:rsid="00bd5a1b" officeooo:paragraph-rsid="00261cd4" fo:background-color="#ffffff" style:font-size-asian="10pt" style:font-size-complex="10pt"/>
    </style:style>
    <style:style style:name="P185" style:family="paragraph" style:parent-style-name="Standard">
      <style:paragraph-properties fo:margin-left="0in" fo:margin-right="0in" style:line-height-at-least="0.198in" fo:text-indent="0in" style:auto-text-indent="false"/>
      <style:text-properties fo:color="#000000" loext:opacity="100%" style:font-name="Courier" fo:font-weight="normal" officeooo:paragraph-rsid="00261cd4"/>
    </style:style>
    <style:style style:name="P186" style:family="paragraph" style:parent-style-name="Standard" style:list-style-name="L7">
      <style:paragraph-properties fo:text-align="justify" style:justify-single-word="false"/>
      <style:text-properties officeooo:paragraph-rsid="00261cd4"/>
    </style:style>
    <style:style style:name="P187" style:family="paragraph" style:parent-style-name="Standard">
      <style:paragraph-properties fo:text-align="justify" style:justify-single-word="false"/>
      <style:text-properties fo:font-weight="normal" officeooo:rsid="00c19845" officeooo:paragraph-rsid="00261cd4" style:font-weight-asian="normal" style:font-weight-complex="normal"/>
    </style:style>
    <style:style style:name="P188" style:family="paragraph" style:parent-style-name="Standard">
      <style:paragraph-properties fo:text-align="justify" style:justify-single-word="false"/>
      <style:text-properties fo:font-style="italic" fo:font-weight="normal" officeooo:rsid="00c19845" officeooo:paragraph-rsid="00261cd4" style:font-style-asian="italic" style:font-weight-asian="normal" style:font-style-complex="italic" style:font-weight-complex="normal"/>
    </style:style>
    <style:style style:name="P189" style:family="paragraph" style:parent-style-name="Standard">
      <style:paragraph-properties fo:text-align="justify" style:justify-single-word="false"/>
      <style:text-properties fo:font-size="12pt" officeooo:paragraph-rsid="00261cd4" style:font-size-asian="12pt" style:font-size-complex="12pt"/>
    </style:style>
    <style:style style:name="P190" style:family="paragraph" style:parent-style-name="Standard">
      <style:paragraph-properties fo:text-align="justify" style:justify-single-word="false"/>
      <style:text-properties fo:font-size="12pt" fo:font-weight="normal" officeooo:rsid="00c2d228" officeooo:paragraph-rsid="00261cd4" style:font-size-asian="12pt" style:font-weight-asian="normal" style:font-size-complex="12pt" style:font-weight-complex="normal"/>
    </style:style>
    <style:style style:name="P191" style:family="paragraph" style:parent-style-name="Standard">
      <style:paragraph-properties fo:text-align="justify" style:justify-single-word="false"/>
      <style:text-properties fo:font-size="12pt" fo:font-weight="normal" officeooo:rsid="00c3d5c5" officeooo:paragraph-rsid="00261cd4" style:font-size-asian="12pt" style:font-weight-asian="normal" style:font-size-complex="12pt" style:font-weight-complex="normal"/>
    </style:style>
    <style:style style:name="P192" style:family="paragraph" style:parent-style-name="Standard">
      <style:paragraph-properties fo:text-align="justify" style:justify-single-word="false"/>
      <style:text-properties fo:font-weight="normal" officeooo:rsid="00c4d2f6" officeooo:paragraph-rsid="00261cd4" style:font-weight-asian="normal" style:font-weight-complex="normal"/>
    </style:style>
    <style:style style:name="P193" style:family="paragraph" style:parent-style-name="Standard">
      <style:paragraph-properties fo:text-align="justify" style:justify-single-word="false"/>
      <style:text-properties fo:font-weight="normal" officeooo:rsid="00c93525" officeooo:paragraph-rsid="00261cd4" style:font-weight-asian="normal" style:font-weight-complex="normal"/>
    </style:style>
    <style:style style:name="P194" style:family="paragraph" style:parent-style-name="Standard">
      <style:paragraph-properties fo:margin-left="0in" fo:margin-right="0in" style:line-height-at-least="0.198in" fo:text-indent="0in" style:auto-text-indent="false"/>
      <style:text-properties fo:font-weight="normal" officeooo:paragraph-rsid="00261cd4"/>
    </style:style>
    <style:style style:name="P195" style:family="paragraph" style:parent-style-name="Standard">
      <style:paragraph-properties fo:text-align="justify" style:justify-single-word="false"/>
      <style:text-properties officeooo:rsid="00c7aed8" officeooo:paragraph-rsid="00261cd4"/>
    </style:style>
    <style:style style:name="P196" style:family="paragraph" style:parent-style-name="Standard">
      <style:paragraph-properties fo:text-align="justify" style:justify-single-word="false"/>
      <style:text-properties fo:font-size="16pt" fo:font-style="normal" fo:font-weight="bold" officeooo:rsid="0027bfe5" officeooo:paragraph-rsid="0027bfe5" style:font-size-asian="16pt" style:font-style-asian="normal" style:font-weight-asian="bold" style:font-size-complex="16pt" style:font-style-complex="normal" style:font-weight-complex="bold"/>
    </style:style>
    <style:style style:name="P197" style:family="paragraph" style:parent-style-name="Standard">
      <style:paragraph-properties fo:text-align="justify" style:justify-single-word="false"/>
      <style:text-properties fo:font-size="12pt" fo:font-style="normal" fo:font-weight="normal" officeooo:rsid="0027bfe5" officeooo:paragraph-rsid="0027bfe5" style:font-size-asian="10.5pt" style:font-style-asian="normal" style:font-weight-asian="normal" style:font-size-complex="12pt" style:font-style-complex="normal" style:font-weight-complex="normal"/>
    </style:style>
    <style:style style:name="P198" style:family="paragraph" style:parent-style-name="Table_20_Contents">
      <style:paragraph-properties fo:text-align="justify" style:justify-single-word="false"/>
      <style:text-properties fo:font-size="12pt" fo:font-weight="bold" officeooo:rsid="0027bfe5" officeooo:paragraph-rsid="0027bfe5" style:font-size-asian="12pt" style:font-weight-asian="bold" style:font-size-complex="12pt" style:font-weight-complex="bold"/>
    </style:style>
    <style:style style:name="P199" style:family="paragraph" style:parent-style-name="Table_20_Contents">
      <style:paragraph-properties fo:text-align="justify" style:justify-single-word="false"/>
      <style:text-properties fo:font-size="12pt" officeooo:paragraph-rsid="0027bfe5" style:font-size-asian="10.5pt" style:font-size-complex="12pt"/>
    </style:style>
    <style:style style:name="P200" style:family="paragraph" style:parent-style-name="Table_20_Contents">
      <style:paragraph-properties fo:text-align="justify" style:justify-single-word="false"/>
      <style:text-properties fo:font-size="12pt" officeooo:paragraph-rsid="0027bfe5" style:font-size-asian="12pt" style:font-size-complex="12pt"/>
    </style:style>
    <style:style style:name="P201" style:family="paragraph" style:parent-style-name="Table_20_Contents">
      <style:paragraph-properties fo:text-align="justify" style:justify-single-word="false"/>
      <style:text-properties fo:font-size="12pt" fo:font-style="normal" fo:font-weight="normal" officeooo:rsid="0027bfe5" officeooo:paragraph-rsid="0027bfe5" style:font-size-asian="10.5pt" style:font-style-asian="normal" style:font-weight-asian="normal" style:font-size-complex="12pt" style:font-style-complex="normal" style:font-weight-complex="normal"/>
    </style:style>
    <style:style style:name="P202" style:family="paragraph" style:parent-style-name="Standard">
      <style:text-properties fo:font-size="12pt" fo:font-weight="bold" officeooo:paragraph-rsid="0027bfe5" style:font-size-asian="12pt" style:font-weight-asian="bold" style:font-size-complex="12pt" style:font-weight-complex="bold"/>
    </style:style>
    <style:style style:name="P203" style:family="paragraph" style:parent-style-name="Table_20_Contents">
      <style:paragraph-properties fo:text-align="justify" style:justify-single-word="false"/>
      <style:text-properties officeooo:paragraph-rsid="0027bfe5"/>
    </style:style>
    <style:style style:name="P204" style:family="paragraph" style:parent-style-name="Standard">
      <style:text-properties fo:font-size="12pt" officeooo:paragraph-rsid="0027bfe5" style:font-size-asian="12pt" style:font-size-complex="12pt"/>
    </style:style>
    <style:style style:name="P205" style:family="paragraph" style:parent-style-name="Table_20_Contents">
      <style:paragraph-properties fo:text-align="justify" style:justify-single-word="false"/>
      <style:text-properties fo:font-size="16pt" officeooo:paragraph-rsid="002b565e" style:font-size-asian="16pt" style:font-size-complex="16pt"/>
    </style:style>
    <style:style style:name="P206" style:family="paragraph" style:parent-style-name="Table_20_Contents">
      <style:paragraph-properties fo:text-align="justify" style:justify-single-word="false"/>
      <style:text-properties fo:font-size="16pt" fo:font-weight="bold" officeooo:rsid="002b565e" officeooo:paragraph-rsid="002b565e" style:font-size-asian="16pt" style:font-weight-asian="bold" style:font-size-complex="16pt" style:font-weight-complex="bold"/>
    </style:style>
    <style:style style:name="P207" style:family="paragraph" style:parent-style-name="Table_20_Contents">
      <style:paragraph-properties fo:text-align="justify" style:justify-single-word="false"/>
      <style:text-properties fo:font-size="16pt" fo:font-weight="normal" officeooo:rsid="002b565e" officeooo:paragraph-rsid="002b565e" style:font-size-asian="16pt" style:font-weight-asian="normal" style:font-size-complex="16pt" style:font-weight-complex="normal"/>
    </style:style>
    <style:style style:name="T1" style:family="text">
      <style:text-properties officeooo:rsid="002c3b03"/>
    </style:style>
    <style:style style:name="T2" style:family="text">
      <style:text-properties officeooo:rsid="0020e2f6"/>
    </style:style>
    <style:style style:name="T3" style:family="text">
      <style:text-properties fo:font-size="12pt" fo:font-weight="normal" officeooo:rsid="00202600" style:font-size-asian="12pt" style:font-weight-asian="normal" style:font-size-complex="12pt" style:font-weight-complex="normal"/>
    </style:style>
    <style:style style:name="T4" style:family="text">
      <style:text-properties fo:font-weight="normal" officeooo:rsid="00202600" style:font-weight-asian="normal" style:font-weight-complex="normal"/>
    </style:style>
    <style:style style:name="T5" style:family="text">
      <style:text-properties officeooo:rsid="001f978e"/>
    </style:style>
    <style:style style:name="T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officeooo:rsid="0021fd63"/>
    </style:style>
    <style:style style:name="T8" style:family="text">
      <style:text-properties officeooo:rsid="05695b86"/>
    </style:style>
    <style:style style:name="T9" style:family="text">
      <style:text-properties officeooo:rsid="0459d7a3"/>
    </style:style>
    <style:style style:name="T10" style:family="text">
      <style:text-properties fo:font-size="13pt" style:font-size-asian="13pt" style:font-size-complex="13pt"/>
    </style:style>
    <style:style style:name="T11" style:family="text">
      <style:text-properties fo:font-size="13pt" officeooo:rsid="0459d7a3" style:font-size-asian="13pt" style:font-size-complex="13pt"/>
    </style:style>
    <style:style style:name="T12" style:family="text">
      <style:text-properties fo:font-size="13pt" officeooo:rsid="061520c8" style:font-size-asian="13pt" style:font-size-complex="13pt"/>
    </style:style>
    <style:style style:name="T13" style:family="text">
      <style:text-properties officeooo:rsid="0069734c"/>
    </style:style>
    <style:style style:name="T14" style:family="text">
      <style:text-properties officeooo:rsid="006a3ce0"/>
    </style:style>
    <style:style style:name="T15" style:family="text">
      <style:text-properties officeooo:rsid="006c151f"/>
    </style:style>
    <style:style style:name="T16" style:family="text">
      <style:text-properties officeooo:rsid="0464fbaa"/>
    </style:style>
    <style:style style:name="T17" style:family="text">
      <style:text-properties officeooo:rsid="05e2c1c7"/>
    </style:style>
    <style:style style:name="T18" style:family="text">
      <style:text-properties officeooo:rsid="0471668c"/>
    </style:style>
    <style:style style:name="T19" style:family="text">
      <style:text-properties officeooo:rsid="027fd63e"/>
    </style:style>
    <style:style style:name="T20" style:family="text">
      <style:text-properties officeooo:rsid="023cad51"/>
    </style:style>
    <style:style style:name="T21" style:family="text">
      <style:text-properties officeooo:rsid="054e85af"/>
    </style:style>
    <style:style style:name="T22" style:family="text">
      <style:text-properties officeooo:rsid="023abbef"/>
    </style:style>
    <style:style style:name="T23" style:family="text">
      <style:text-properties officeooo:rsid="041d0ffe"/>
    </style:style>
    <style:style style:name="T24" style:family="text">
      <style:text-properties officeooo:rsid="06a6b977"/>
    </style:style>
    <style:style style:name="T25" style:family="text">
      <style:text-properties officeooo:rsid="00310325"/>
    </style:style>
    <style:style style:name="T26" style:family="text">
      <style:text-properties officeooo:rsid="08cc7e67"/>
    </style:style>
    <style:style style:name="T27" style:family="text">
      <style:text-properties officeooo:rsid="063afee4"/>
    </style:style>
    <style:style style:name="T28" style:family="text">
      <style:text-properties fo:font-size="13pt" fo:font-weight="normal" officeooo:rsid="05c60ac2" style:font-size-asian="13pt" style:font-weight-asian="normal" style:font-size-complex="13pt" style:font-weight-complex="normal"/>
    </style:style>
    <style:style style:name="T29" style:family="text">
      <style:text-properties style:font-name="Courier" fo:font-size="13pt" fo:font-weight="normal" officeooo:rsid="05c7c60d" style:font-size-asian="13pt" style:font-weight-asian="normal" style:font-size-complex="13pt" style:font-weight-complex="normal"/>
    </style:style>
    <style:style style:name="T30" style:family="text">
      <style:text-properties fo:font-size="13pt" fo:font-weight="normal" officeooo:rsid="054e85af" style:font-size-asian="13pt" style:font-weight-asian="normal" style:font-size-complex="13pt" style:font-weight-complex="normal"/>
    </style:style>
    <style:style style:name="T31" style:family="text">
      <style:text-properties fo:font-size="13pt" fo:font-weight="normal" officeooo:rsid="0634eb79" style:font-size-asian="13pt" style:font-weight-asian="normal" style:font-size-complex="13pt" style:font-weight-complex="normal"/>
    </style:style>
    <style:style style:name="T32" style:family="text">
      <style:text-properties style:font-name="Courier" fo:font-size="13pt" fo:font-weight="normal" officeooo:rsid="05e987ab" style:font-size-asian="13pt" style:font-weight-asian="normal" style:font-size-complex="13pt" style:font-weight-complex="normal"/>
    </style:style>
    <style:style style:name="T33" style:family="text">
      <style:text-properties fo:font-size="13pt" fo:font-weight="normal" officeooo:rsid="05c7c60d" style:font-size-asian="13pt" style:font-weight-asian="normal" style:font-size-complex="13pt" style:font-weight-complex="normal"/>
    </style:style>
    <style:style style:name="T34" style:family="text">
      <style:text-properties officeooo:rsid="05c7c60d"/>
    </style:style>
    <style:style style:name="T35" style:family="text">
      <style:text-properties style:font-name="Courier" officeooo:rsid="05c7c60d"/>
    </style:style>
    <style:style style:name="T36" style:family="text">
      <style:text-properties fo:font-size="13pt" fo:font-weight="normal" officeooo:rsid="023abbef" style:font-size-asian="13pt" style:font-weight-asian="normal" style:font-size-complex="13pt" style:font-weight-complex="normal"/>
    </style:style>
    <style:style style:name="T37" style:family="text">
      <style:text-properties officeooo:rsid="05d71e03"/>
    </style:style>
    <style:style style:name="T38" style:family="text">
      <style:text-properties fo:font-style="italic" officeooo:rsid="05d71e03" style:font-style-asian="italic" style:font-style-complex="italic"/>
    </style:style>
    <style:style style:name="T39" style:family="text">
      <style:text-properties fo:font-style="italic" officeooo:rsid="05c7c60d" style:font-style-asian="italic" style:font-style-complex="italic"/>
    </style:style>
    <style:style style:name="T40" style:family="text">
      <style:text-properties officeooo:rsid="006d8a4c"/>
    </style:style>
    <style:style style:name="T41" style:family="text">
      <style:text-properties officeooo:rsid="07aea5c8"/>
    </style:style>
    <style:style style:name="T42" style:family="text">
      <style:text-properties fo:font-size="13pt" fo:font-weight="normal" officeooo:rsid="0068d3c8" style:font-size-asian="13pt" style:font-weight-asian="normal" style:font-size-complex="13pt" style:font-weight-complex="normal"/>
    </style:style>
    <style:style style:name="T43" style:family="text">
      <style:text-properties fo:font-size="13pt" fo:font-weight="normal" officeooo:rsid="006d8a4c" style:font-size-asian="13pt" style:font-weight-asian="normal" style:font-size-complex="13pt" style:font-weight-complex="normal"/>
    </style:style>
    <style:style style:name="T44" style:family="text">
      <style:text-properties fo:font-size="13pt" fo:font-weight="normal" officeooo:rsid="07aea5c8" style:font-size-asian="13pt" style:font-weight-asian="normal" style:font-size-complex="13pt" style:font-weight-complex="normal"/>
    </style:style>
    <style:style style:name="T45" style:family="text">
      <style:text-properties fo:font-size="13pt" fo:font-weight="normal" officeooo:rsid="0459d7a3" style:font-size-asian="13pt" style:font-weight-asian="normal" style:font-size-complex="13pt" style:font-weight-complex="normal"/>
    </style:style>
    <style:style style:name="T46" style:family="text">
      <style:text-properties officeooo:rsid="05d43e74"/>
    </style:style>
    <style:style style:name="T47" style:family="text">
      <style:text-properties officeooo:rsid="05d584cc"/>
    </style:style>
    <style:style style:name="T48" style:family="text">
      <style:text-properties officeooo:rsid="05d58dd4"/>
    </style:style>
    <style:style style:name="T49" style:family="text">
      <style:text-properties style:font-name="Courier" officeooo:rsid="05d584cc"/>
    </style:style>
    <style:style style:name="T50" style:family="text">
      <style:text-properties fo:font-size="13pt" fo:font-weight="normal" officeooo:rsid="05d29cca" style:font-size-asian="13pt" style:font-weight-asian="normal" style:font-size-complex="13pt" style:font-weight-complex="normal"/>
    </style:style>
    <style:style style:name="T51" style:family="text">
      <style:text-properties fo:font-size="13pt" fo:font-weight="normal" officeooo:rsid="05d43e74" style:font-size-asian="13pt" style:font-weight-asian="normal" style:font-size-complex="13pt" style:font-weight-complex="normal"/>
    </style:style>
    <style:style style:name="T52" style:family="text">
      <style:text-properties fo:font-size="13pt" fo:font-weight="normal" officeooo:rsid="05d584cc" style:font-size-asian="13pt" style:font-weight-asian="normal" style:font-size-complex="13pt" style:font-weight-complex="normal"/>
    </style:style>
    <style:style style:name="T53" style:family="text">
      <style:text-properties style:font-name="Courier" fo:font-size="13pt" fo:font-weight="normal" officeooo:rsid="05d584cc" style:font-size-asian="13pt" style:font-weight-asian="normal" style:font-size-complex="13pt" style:font-weight-complex="normal"/>
    </style:style>
    <style:style style:name="T54" style:family="text">
      <style:text-properties officeooo:rsid="05d82001"/>
    </style:style>
    <style:style style:name="T55" style:family="text">
      <style:text-properties fo:font-size="13pt" fo:font-weight="normal" officeooo:rsid="06356f43" style:font-size-asian="13pt" style:font-weight-asian="normal" style:font-size-complex="13pt" style:font-weight-complex="normal"/>
    </style:style>
    <style:style style:name="T56" style:family="text">
      <style:text-properties fo:font-size="13pt" fo:font-weight="normal" officeooo:rsid="05e2350d" style:font-size-asian="13pt" style:font-weight-asian="normal" style:font-size-complex="13pt" style:font-weight-complex="normal"/>
    </style:style>
    <style:style style:name="T57" style:family="text">
      <style:text-properties officeooo:rsid="2ae3b35d"/>
    </style:style>
    <style:style style:name="T58" style:family="text">
      <style:text-properties officeooo:rsid="2b49777b"/>
    </style:style>
    <style:style style:name="T59" style:family="text">
      <style:text-properties officeooo:rsid="08218bbd"/>
    </style:style>
    <style:style style:name="T60" style:family="text">
      <style:text-properties officeooo:rsid="264d65d8"/>
    </style:style>
    <style:style style:name="T61" style:family="text">
      <style:text-properties officeooo:rsid="36e2991d"/>
    </style:style>
    <style:style style:name="T62" style:family="text">
      <style:text-properties fo:font-size="13pt" fo:font-weight="normal" officeooo:rsid="2b573621" style:font-size-asian="13pt" style:font-weight-asian="normal" style:font-size-complex="13pt" style:font-weight-complex="normal"/>
    </style:style>
    <style:style style:name="T63" style:family="text">
      <style:text-properties fo:font-size="13pt" fo:font-weight="normal" officeooo:rsid="36e2991d" style:font-size-asian="13pt" style:font-weight-asian="normal" style:font-size-complex="13pt" style:font-weight-complex="normal"/>
    </style:style>
    <style:style style:name="T64" style:family="text">
      <style:text-properties style:font-name="Courier" fo:font-size="13pt" fo:font-weight="normal" officeooo:rsid="36d38bf9" style:font-size-asian="13pt" style:font-weight-asian="normal" style:font-size-complex="13pt" style:font-weight-complex="normal"/>
    </style:style>
    <style:style style:name="T65" style:family="text">
      <style:text-properties style:font-name="Courier" fo:font-size="13pt" fo:font-weight="normal" officeooo:rsid="36d4d048" style:font-size-asian="13pt" style:font-weight-asian="normal" style:font-size-complex="13pt" style:font-weight-complex="normal"/>
    </style:style>
    <style:style style:name="T66" style:family="text">
      <style:text-properties fo:font-size="13pt" fo:font-weight="normal" officeooo:rsid="006d0dae" style:font-size-asian="13pt" style:font-weight-asian="normal" style:font-size-complex="13pt" style:font-weight-complex="normal"/>
    </style:style>
    <style:style style:name="T67" style:family="text">
      <style:text-properties fo:font-size="13pt" fo:font-weight="normal" officeooo:rsid="2b5d990e" style:font-size-asian="13pt" style:font-weight-asian="normal" style:font-size-complex="13pt" style:font-weight-complex="normal"/>
    </style:style>
    <style:style style:name="T68" style:family="text">
      <style:text-properties fo:font-size="13pt" fo:font-weight="normal" officeooo:rsid="2b6ad416" style:font-size-asian="13pt" style:font-weight-asian="normal" style:font-size-complex="13pt" style:font-weight-complex="normal"/>
    </style:style>
    <style:style style:name="T69" style:family="text">
      <style:text-properties fo:font-size="13pt" fo:font-weight="normal" officeooo:rsid="36d38bf9" style:font-size-asian="13pt" style:font-weight-asian="normal" style:font-size-complex="13pt" style:font-weight-complex="normal"/>
    </style:style>
    <style:style style:name="T70" style:family="text">
      <style:text-properties fo:font-size="13pt" fo:font-weight="normal" officeooo:rsid="2b78ba5c" style:font-size-asian="13pt" style:font-weight-asian="normal" style:font-size-complex="13pt" style:font-weight-complex="normal"/>
    </style:style>
    <style:style style:name="T71" style:family="text">
      <style:text-properties fo:font-size="13pt" fo:font-weight="normal" officeooo:rsid="2b79f754" style:font-size-asian="13pt" style:font-weight-asian="normal" style:font-size-complex="13pt" style:font-weight-complex="normal"/>
    </style:style>
    <style:style style:name="T72" style:family="text">
      <style:text-properties fo:font-size="13pt" fo:font-weight="normal" officeooo:rsid="36d4d048" style:font-size-asian="13pt" style:font-weight-asian="normal" style:font-size-complex="13pt" style:font-weight-complex="normal"/>
    </style:style>
    <style:style style:name="T73" style:family="text">
      <style:text-properties fo:font-size="13pt" fo:font-weight="normal" officeooo:rsid="2b9c3804" style:font-size-asian="13pt" style:font-weight-asian="normal" style:font-size-complex="13pt" style:font-weight-complex="normal"/>
    </style:style>
    <style:style style:name="T74" style:family="text">
      <style:text-properties fo:font-size="13pt" fo:font-weight="normal" officeooo:rsid="2c1e122d" style:font-size-asian="13pt" style:font-weight-asian="normal" style:font-size-complex="13pt" style:font-weight-complex="normal"/>
    </style:style>
    <style:style style:name="T75" style:family="text">
      <style:text-properties style:font-name="Courier" fo:font-size="13pt" fo:font-weight="normal" officeooo:rsid="2c1e122d" style:font-size-asian="13pt" style:font-weight-asian="normal" style:font-size-complex="13pt" style:font-weight-complex="normal"/>
    </style:style>
    <style:style style:name="T76" style:family="text">
      <style:text-properties fo:font-size="13pt" fo:font-weight="normal" officeooo:rsid="36ba595f" style:font-size-asian="13pt" style:font-weight-asian="normal" style:font-size-complex="13pt" style:font-weight-complex="normal"/>
    </style:style>
    <style:style style:name="T77" style:family="text">
      <style:text-properties fo:font-size="13pt" fo:font-weight="normal" officeooo:rsid="0011a5c1" style:font-size-asian="13pt" style:font-weight-asian="normal" style:font-size-complex="13pt" style:font-weight-complex="normal"/>
    </style:style>
    <style:style style:name="T78" style:family="text">
      <style:text-properties officeooo:rsid="2c1e122d"/>
    </style:style>
    <style:style style:name="T79" style:family="text">
      <style:text-properties officeooo:rsid="2c42ca2d"/>
    </style:style>
    <style:style style:name="T80" style:family="text">
      <style:text-properties style:font-name="Courier" officeooo:rsid="2c1e122d"/>
    </style:style>
    <style:style style:name="T81" style:family="text">
      <style:text-properties fo:font-size="13pt" fo:font-weight="normal" officeooo:rsid="00d726d4" style:font-size-asian="13pt" style:font-weight-asian="normal" style:font-size-complex="13pt" style:font-weight-complex="normal"/>
    </style:style>
    <style:style style:name="T82" style:family="text">
      <style:text-properties fo:font-size="13pt" fo:font-weight="normal" officeooo:rsid="264d65d8" style:font-size-asian="13pt" style:font-weight-asian="normal" style:font-size-complex="13pt" style:font-weight-complex="normal"/>
    </style:style>
    <style:style style:name="T83" style:family="text">
      <style:text-properties officeooo:rsid="0011a5c1"/>
    </style:style>
    <style:style style:name="T84" style:family="text">
      <style:text-properties officeooo:rsid="360854b5"/>
    </style:style>
    <style:style style:name="T85" style:family="text">
      <style:text-properties officeooo:rsid="2c7b5bf0"/>
    </style:style>
    <style:style style:name="T86" style:family="text">
      <style:text-properties fo:font-size="13pt" fo:font-weight="normal" officeooo:rsid="2c92e2ef" style:font-size-asian="13pt" style:font-weight-asian="normal" style:font-size-complex="13pt" style:font-weight-complex="normal"/>
    </style:style>
    <style:style style:name="T87" style:family="text">
      <style:text-properties style:font-name="Courier" fo:font-size="13pt" fo:font-weight="normal" officeooo:rsid="36d4f779" style:font-size-asian="13pt" style:font-weight-asian="normal" style:font-size-complex="13pt" style:font-weight-complex="normal"/>
    </style:style>
    <style:style style:name="T88" style:family="text">
      <style:text-properties fo:font-size="13pt" fo:font-weight="normal" officeooo:rsid="2d04fe28" style:font-size-asian="13pt" style:font-weight-asian="normal" style:font-size-complex="13pt" style:font-weight-complex="normal"/>
    </style:style>
    <style:style style:name="T89" style:family="text">
      <style:text-properties officeooo:rsid="00d726d4"/>
    </style:style>
    <style:style style:name="T90" style:family="text">
      <style:text-properties fo:font-size="13pt" fo:font-weight="normal" officeooo:rsid="2d3a685c" style:font-size-asian="13pt" style:font-weight-asian="normal" style:font-size-complex="13pt" style:font-weight-complex="normal"/>
    </style:style>
    <style:style style:name="T91" style:family="text">
      <style:text-properties fo:font-size="13pt" fo:font-weight="normal" officeooo:rsid="002487c2" style:font-size-asian="13pt" style:font-weight-asian="normal" style:font-size-complex="13pt" style:font-weight-complex="normal"/>
    </style:style>
    <style:style style:name="T92" style:family="text">
      <style:text-properties officeooo:rsid="2dab0386"/>
    </style:style>
    <style:style style:name="T93" style:family="text">
      <style:text-properties officeooo:rsid="2daa0998"/>
    </style:style>
    <style:style style:name="T94" style:family="text">
      <style:text-properties fo:font-size="13pt" fo:font-weight="normal" officeooo:rsid="2dda129f" style:font-size-asian="13pt" style:font-weight-asian="normal" style:font-size-complex="13pt" style:font-weight-complex="normal"/>
    </style:style>
    <style:style style:name="T95" style:family="text">
      <style:text-properties officeooo:rsid="2df2f8c1"/>
    </style:style>
    <style:style style:name="T96" style:family="text">
      <style:text-properties style:font-name="Courier" officeooo:rsid="2df2f8c1"/>
    </style:style>
    <style:style style:name="T97" style:family="text">
      <style:text-properties fo:font-size="13pt" fo:font-weight="normal" officeooo:rsid="2df2f8c1" style:font-size-asian="13pt" style:font-weight-asian="normal" style:font-size-complex="13pt" style:font-weight-complex="normal"/>
    </style:style>
    <style:style style:name="T98" style:family="text">
      <style:text-properties officeooo:rsid="00267f21"/>
    </style:style>
    <style:style style:name="T99" style:family="text">
      <style:text-properties officeooo:rsid="3604c6b8"/>
    </style:style>
    <style:style style:name="T100" style:family="text">
      <style:text-properties fo:font-size="13pt" fo:font-weight="normal" officeooo:rsid="2e0f9c9f" style:font-size-asian="13pt" style:font-weight-asian="normal" style:font-size-complex="13pt" style:font-weight-complex="normal"/>
    </style:style>
    <style:style style:name="T101" style:family="text">
      <style:text-properties officeooo:rsid="2e0f9c9f"/>
    </style:style>
    <style:style style:name="T102" style:family="text">
      <style:text-properties fo:font-weight="bold" officeooo:rsid="2e13b514" style:font-weight-asian="bold" style:font-weight-complex="bold"/>
    </style:style>
    <style:style style:name="T103" style:family="text">
      <style:text-properties officeooo:rsid="2e13b514"/>
    </style:style>
    <style:style style:name="T104" style:family="text">
      <style:text-properties officeooo:rsid="2e39bca3"/>
    </style:style>
    <style:style style:name="T105" style:family="text">
      <style:text-properties officeooo:rsid="2764ff7c"/>
    </style:style>
    <style:style style:name="T106" style:family="text">
      <style:text-properties officeooo:rsid="19529644"/>
    </style:style>
    <style:style style:name="T107" style:family="text">
      <style:text-properties officeooo:rsid="2e4eb961"/>
    </style:style>
    <style:style style:name="T108" style:family="text">
      <style:text-properties officeooo:rsid="2e519194"/>
    </style:style>
    <style:style style:name="T109" style:family="text">
      <style:text-properties officeooo:rsid="27668e9b"/>
    </style:style>
    <style:style style:name="T110" style:family="text">
      <style:text-properties officeooo:rsid="2766b146"/>
    </style:style>
    <style:style style:name="T111" style:family="text">
      <style:text-properties officeooo:rsid="2ea3a460"/>
    </style:style>
    <style:style style:name="T112" style:family="text">
      <style:text-properties officeooo:rsid="2ec435ff"/>
    </style:style>
    <style:style style:name="T113" style:family="text">
      <style:text-properties officeooo:rsid="2ea853f7"/>
    </style:style>
    <style:style style:name="T114" style:family="text">
      <style:text-properties officeooo:rsid="2ffb1d57"/>
    </style:style>
    <style:style style:name="T115" style:family="text">
      <style:text-properties style:font-name="Courier" officeooo:rsid="2ffb1d57"/>
    </style:style>
    <style:style style:name="T116" style:family="text">
      <style:text-properties fo:font-size="13pt" fo:font-weight="normal" officeooo:rsid="2ffb1d57" style:font-size-asian="13pt" style:font-weight-asian="normal" style:font-size-complex="13pt" style:font-weight-complex="normal"/>
    </style:style>
    <style:style style:name="T117" style:family="text">
      <style:text-properties style:font-name="Courier" fo:font-size="13pt" fo:font-weight="normal" officeooo:rsid="2ffb1d57" style:font-size-asian="13pt" style:font-weight-asian="normal" style:font-size-complex="13pt" style:font-weight-complex="normal"/>
    </style:style>
    <style:style style:name="T118" style:family="text">
      <style:text-properties fo:font-size="13pt" fo:font-weight="normal" officeooo:rsid="307fae26" style:font-size-asian="13pt" style:font-weight-asian="normal" style:font-size-complex="13pt" style:font-weight-complex="normal"/>
    </style:style>
    <style:style style:name="T119" style:family="text">
      <style:text-properties fo:font-size="13pt" fo:font-weight="normal" officeooo:rsid="30804776" style:font-size-asian="13pt" style:font-weight-asian="normal" style:font-size-complex="13pt" style:font-weight-complex="normal"/>
    </style:style>
    <style:style style:name="T120" style:family="text">
      <style:text-properties style:font-name="Courier" fo:font-size="13pt" fo:font-weight="normal" officeooo:rsid="307fae26" style:font-size-asian="13pt" style:font-weight-asian="normal" style:font-size-complex="13pt" style:font-weight-complex="normal"/>
    </style:style>
    <style:style style:name="T121" style:family="text">
      <style:text-properties officeooo:rsid="307fae26"/>
    </style:style>
    <style:style style:name="T122" style:family="text">
      <style:text-properties fo:font-style="italic" officeooo:rsid="307fae26" style:font-style-asian="italic" style:font-style-complex="italic"/>
    </style:style>
    <style:style style:name="T123" style:family="text">
      <style:text-properties officeooo:rsid="3093ef1f"/>
    </style:style>
    <style:style style:name="T124" style:family="text">
      <style:text-properties fo:font-style="italic" officeooo:rsid="3093ef1f" style:font-style-asian="italic" style:font-style-complex="italic"/>
    </style:style>
    <style:style style:name="T125" style:family="text">
      <style:text-properties fo:font-size="13pt" fo:font-weight="normal" officeooo:rsid="30b723f2" style:font-size-asian="13pt" style:font-weight-asian="normal" style:font-size-complex="13pt" style:font-weight-complex="normal"/>
    </style:style>
    <style:style style:name="T126" style:family="text">
      <style:text-properties officeooo:rsid="30ff3815"/>
    </style:style>
    <style:style style:name="T127" style:family="text">
      <style:text-properties fo:font-size="13pt" fo:font-weight="normal" officeooo:rsid="30ff3815" style:font-size-asian="13pt" style:font-weight-asian="normal" style:font-size-complex="13pt" style:font-weight-complex="normal"/>
    </style:style>
    <style:style style:name="T128" style:family="text">
      <style:text-properties fo:font-size="13pt" fo:font-weight="normal" officeooo:rsid="0c64dfb5" style:font-size-asian="13pt" style:font-weight-asian="normal" style:font-size-complex="13pt" style:font-weight-complex="normal"/>
    </style:style>
    <style:style style:name="T129" style:family="text">
      <style:text-properties style:font-name="Courier" fo:font-size="13pt" fo:font-weight="normal" officeooo:rsid="0c64dfb5" style:font-size-asian="13pt" style:font-weight-asian="normal" style:font-size-complex="13pt" style:font-weight-complex="normal"/>
    </style:style>
    <style:style style:name="T130" style:family="text">
      <style:text-properties officeooo:rsid="315d8c70"/>
    </style:style>
    <style:style style:name="T131" style:family="text">
      <style:text-properties fo:font-weight="normal" style:font-weight-asian="normal" style:font-weight-complex="normal"/>
    </style:style>
    <style:style style:name="T132" style:family="text">
      <style:text-properties fo:font-weight="normal" officeooo:rsid="2daa0998" style:font-weight-asian="normal" style:font-weight-complex="normal"/>
    </style:style>
    <style:style style:name="T133" style:family="text">
      <style:text-properties fo:font-weight="normal" officeooo:rsid="0ceb4a89" style:font-weight-asian="normal" style:font-weight-complex="normal"/>
    </style:style>
    <style:style style:name="T134" style:family="text">
      <style:text-properties fo:font-weight="normal" officeooo:rsid="0e5cb7ad" style:font-weight-asian="normal" style:font-weight-complex="normal"/>
    </style:style>
    <style:style style:name="T135" style:family="text">
      <style:text-properties fo:font-size="13pt" style:text-underline-style="none" fo:font-weight="normal" officeooo:rsid="31a68dfb" style:font-size-asian="13pt" style:font-weight-asian="normal" style:font-size-complex="13pt" style:font-weight-complex="normal"/>
    </style:style>
    <style:style style:name="T136" style:family="text">
      <style:text-properties fo:font-size="13pt" style:text-underline-style="none" fo:font-weight="normal" officeooo:rsid="36ba595f" style:font-size-asian="13pt" style:font-weight-asian="normal" style:font-size-complex="13pt" style:font-weight-complex="normal"/>
    </style:style>
    <style:style style:name="T137" style:family="text">
      <style:text-properties fo:font-size="13pt" style:text-underline-style="none" fo:font-weight="normal" officeooo:rsid="2ab48cd4" style:font-size-asian="13pt" style:font-weight-asian="normal" style:font-size-complex="13pt" style:font-weight-complex="normal"/>
    </style:style>
    <style:style style:name="T138" style:family="text">
      <style:text-properties fo:font-size="13pt" fo:font-weight="normal" style:font-size-asian="13pt" style:font-weight-asian="normal" style:font-size-complex="13pt" style:font-weight-complex="normal"/>
    </style:style>
    <style:style style:name="T139" style:family="text">
      <style:text-properties fo:font-size="13pt" fo:font-weight="normal" officeooo:rsid="2daa0998" style:font-size-asian="13pt" style:font-weight-asian="normal" style:font-size-complex="13pt" style:font-weight-complex="normal"/>
    </style:style>
    <style:style style:name="T140" style:family="text">
      <style:text-properties fo:font-size="13pt" fo:font-weight="normal" officeooo:rsid="001f5623" style:font-size-asian="13pt" style:font-weight-asian="normal" style:font-size-complex="13pt" style:font-weight-complex="normal"/>
    </style:style>
    <style:style style:name="T141" style:family="text">
      <style:text-properties fo:font-size="13pt" style:text-underline-style="none" fo:font-weight="normal" officeooo:rsid="31fe0d12" style:font-size-asian="13pt" style:font-weight-asian="normal" style:font-size-complex="13pt" style:font-weight-complex="normal"/>
    </style:style>
    <style:style style:name="T142" style:family="text">
      <style:text-properties fo:font-size="13pt" style:text-underline-style="none" fo:font-weight="normal" officeooo:rsid="3207159f" style:font-size-asian="13pt" style:font-weight-asian="normal" style:font-size-complex="13pt" style:font-weight-complex="normal"/>
    </style:style>
    <style:style style:name="T143" style:family="text">
      <style:text-properties fo:font-size="13pt" style:text-underline-style="none" fo:font-weight="normal" officeooo:rsid="00d726d4" style:font-size-asian="13pt" style:font-weight-asian="normal" style:font-size-complex="13pt" style:font-weight-complex="normal"/>
    </style:style>
    <style:style style:name="T144" style:family="text">
      <style:text-properties officeooo:rsid="00285b0a"/>
    </style:style>
    <style:style style:name="T145" style:family="text">
      <style:text-properties fo:font-size="13pt" style:text-underline-style="none" fo:font-weight="normal" officeooo:rsid="002a45bb" style:font-size-asian="13pt" style:font-weight-asian="normal" style:font-size-complex="13pt" style:font-weight-complex="normal"/>
    </style:style>
    <style:style style:name="T146" style:family="text">
      <style:text-properties fo:font-size="13pt" style:text-underline-style="none" fo:font-weight="normal" officeooo:rsid="32fe5b37" style:font-size-asian="13pt" style:font-weight-asian="normal" style:font-size-complex="13pt" style:font-weight-complex="normal"/>
    </style:style>
    <style:style style:name="T147" style:family="text">
      <style:text-properties fo:font-size="13pt" style:text-underline-style="none" fo:font-weight="normal" officeooo:rsid="334504c6" style:font-size-asian="13pt" style:font-weight-asian="normal" style:font-size-complex="13pt" style:font-weight-complex="normal"/>
    </style:style>
    <style:style style:name="T148" style:family="text">
      <style:text-properties officeooo:rsid="33f6145c"/>
    </style:style>
    <style:style style:name="T149" style:family="text">
      <style:text-properties style:font-name="Courier" officeooo:rsid="33f6145c"/>
    </style:style>
    <style:style style:name="T150" style:family="text">
      <style:text-properties officeooo:rsid="2ec28270"/>
    </style:style>
    <style:style style:name="T151" style:family="text">
      <style:text-properties officeooo:rsid="2f7822ce"/>
    </style:style>
    <style:style style:name="T152" style:family="text">
      <style:text-properties officeooo:rsid="2ec06dc2"/>
    </style:style>
    <style:style style:name="T153" style:family="text">
      <style:text-properties officeooo:rsid="2e678e5a"/>
    </style:style>
    <style:style style:name="T154" style:family="text">
      <style:text-properties officeooo:rsid="2e67dcd3"/>
    </style:style>
    <style:style style:name="T155" style:family="text">
      <style:text-properties officeooo:rsid="27685bef"/>
    </style:style>
    <style:style style:name="T156" style:family="text">
      <style:text-properties fo:font-weight="normal" officeooo:rsid="2e99a1da" style:font-weight-asian="normal" style:font-weight-complex="normal"/>
    </style:style>
    <style:style style:name="T157" style:family="text">
      <style:text-properties fo:font-weight="normal" officeooo:rsid="2ec28270" style:font-weight-asian="normal" style:font-weight-complex="normal"/>
    </style:style>
    <style:style style:name="T158" style:family="text">
      <style:text-properties fo:font-weight="normal" officeooo:rsid="2ec435ff" style:font-weight-asian="normal" style:font-weight-complex="normal"/>
    </style:style>
    <style:style style:name="T159" style:family="text">
      <style:text-properties fo:font-weight="normal" officeooo:rsid="2773be8d" style:font-weight-asian="normal" style:font-weight-complex="normal"/>
    </style:style>
    <style:style style:name="T160" style:family="text">
      <style:text-properties fo:font-weight="normal" officeooo:rsid="36e2991d" style:font-weight-asian="normal" style:font-weight-complex="normal"/>
    </style:style>
    <style:style style:name="T161" style:family="text">
      <style:text-properties fo:font-weight="normal" officeooo:rsid="199e58d1" style:font-weight-asian="normal" style:font-weight-complex="normal"/>
    </style:style>
    <style:style style:name="T162" style:family="text">
      <style:text-properties fo:font-weight="normal" officeooo:rsid="19ad516a" style:font-weight-asian="normal" style:font-weight-complex="normal"/>
    </style:style>
    <style:style style:name="T163" style:family="text">
      <style:text-properties fo:font-weight="normal" officeooo:rsid="2ec27bff" style:font-weight-asian="normal" style:font-weight-complex="normal"/>
    </style:style>
    <style:style style:name="T164" style:family="text">
      <style:text-properties fo:font-weight="normal" officeooo:rsid="2ec957c6" style:font-weight-asian="normal" style:font-weight-complex="normal"/>
    </style:style>
    <style:style style:name="T165" style:family="text">
      <style:text-properties style:text-underline-style="none" officeooo:rsid="2e99a1da"/>
    </style:style>
    <style:style style:name="T166" style:family="text">
      <style:text-properties style:text-underline-style="none" officeooo:rsid="2ec27bff"/>
    </style:style>
    <style:style style:name="T167" style:family="text">
      <style:text-properties style:text-underline-style="none" officeooo:rsid="2ec435ff"/>
    </style:style>
    <style:style style:name="T168" style:family="text">
      <style:text-properties style:text-underline-style="none" officeooo:rsid="2ef9d278"/>
    </style:style>
    <style:style style:name="T169" style:family="text">
      <style:text-properties style:text-underline-style="none" officeooo:rsid="2ee775c0"/>
    </style:style>
    <style:style style:name="T170" style:family="text">
      <style:text-properties style:text-underline-style="none" officeooo:rsid="2ef6a930"/>
    </style:style>
    <style:style style:name="T171" style:family="text">
      <style:text-properties fo:font-size="12pt" style:text-underline-style="none" officeooo:rsid="2ec27bff" style:font-size-asian="12pt" style:font-size-complex="12pt"/>
    </style:style>
    <style:style style:name="T172" style:family="text">
      <style:text-properties style:font-name="Courier" fo:font-size="12pt" style:text-underline-style="none" officeooo:rsid="2ec27bff" style:font-size-asian="12pt" style:font-size-complex="12pt"/>
    </style:style>
    <style:style style:name="T173" style:family="text">
      <style:text-properties fo:font-size="13pt" style:text-underline-style="none" fo:font-weight="normal" officeooo:rsid="2f17ee4b" style:font-size-asian="13pt" style:font-weight-asian="normal" style:font-size-complex="13pt" style:font-weight-complex="normal"/>
    </style:style>
    <style:style style:name="T174" style:family="text">
      <style:text-properties fo:font-size="13pt" style:text-underline-style="none" fo:font-weight="normal" officeooo:rsid="2e99a1da" style:font-size-asian="13pt" style:font-weight-asian="normal" style:font-size-complex="13pt" style:font-weight-complex="normal"/>
    </style:style>
    <style:style style:name="T175" style:family="text">
      <style:text-properties fo:font-size="13pt" style:text-underline-style="none" fo:font-weight="normal" officeooo:rsid="2ec27bff" style:font-size-asian="13pt" style:font-weight-asian="normal" style:font-size-complex="13pt" style:font-weight-complex="normal"/>
    </style:style>
    <style:style style:name="T176" style:family="text">
      <style:text-properties fo:font-size="13pt" style:text-underline-style="none" fo:font-weight="normal" officeooo:rsid="2ec435ff" style:font-size-asian="13pt" style:font-weight-asian="normal" style:font-size-complex="13pt" style:font-weight-complex="normal"/>
    </style:style>
    <style:style style:name="T177" style:family="text">
      <style:text-properties fo:font-size="13pt" style:text-underline-style="none" fo:font-weight="normal" officeooo:rsid="2f28ea93" style:font-size-asian="13pt" style:font-weight-asian="normal" style:font-size-complex="13pt" style:font-weight-complex="normal"/>
    </style:style>
    <style:style style:name="T178" style:family="text">
      <style:text-properties fo:font-size="13pt" style:text-underline-style="none" fo:font-weight="normal" officeooo:rsid="2ee775c0" style:font-size-asian="13pt" style:font-weight-asian="normal" style:font-size-complex="13pt" style:font-weight-complex="normal"/>
    </style:style>
    <style:style style:name="T179" style:family="text">
      <style:text-properties fo:font-size="13pt" style:text-underline-style="none" fo:font-weight="normal" officeooo:rsid="2f226cdf" style:font-size-asian="13pt" style:font-weight-asian="normal" style:font-size-complex="13pt" style:font-weight-complex="normal"/>
    </style:style>
    <style:style style:name="T180" style:family="text">
      <style:text-properties style:font-name="Courier" fo:font-size="12pt" style:text-underline-style="none" fo:font-weight="normal" officeooo:rsid="2ec27bff" style:font-size-asian="12pt" style:font-weight-asian="normal" style:font-size-complex="12pt" style:font-weight-complex="normal"/>
    </style:style>
    <style:style style:name="T181" style:family="text">
      <style:text-properties officeooo:rsid="2f74b80f"/>
    </style:style>
    <style:style style:name="T182" style:family="text">
      <style:text-properties officeooo:rsid="2e99a1da"/>
    </style:style>
    <style:style style:name="T183" style:family="text">
      <style:text-properties officeooo:rsid="2fa861bc"/>
    </style:style>
    <style:style style:name="T184" style:family="text">
      <style:text-properties style:font-name="Courier" fo:font-size="12pt" officeooo:rsid="2ec27bff" style:font-size-asian="12pt" style:font-size-complex="12pt"/>
    </style:style>
    <style:style style:name="T185" style:family="text">
      <style:text-properties officeooo:rsid="2f6498e1"/>
    </style:style>
    <style:style style:name="T186" style:family="text">
      <style:text-properties fo:font-size="13pt" style:text-underline-style="none" fo:font-weight="normal" officeooo:rsid="2f74b80f" style:font-size-asian="13pt" style:font-weight-asian="normal" style:font-size-complex="13pt" style:font-weight-complex="normal"/>
    </style:style>
    <style:style style:name="T187" style:family="text">
      <style:text-properties fo:font-size="13pt" style:text-underline-style="none" fo:font-weight="normal" officeooo:rsid="2fa861bc" style:font-size-asian="13pt" style:font-weight-asian="normal" style:font-size-complex="13pt" style:font-weight-complex="normal"/>
    </style:style>
    <style:style style:name="T188" style:family="text">
      <style:text-properties fo:font-size="13pt" style:text-underline-style="none" fo:font-weight="normal" officeooo:rsid="2f6498e1" style:font-size-asian="13pt" style:font-weight-asian="normal" style:font-size-complex="13pt" style:font-weight-complex="normal"/>
    </style:style>
    <style:style style:name="T189" style:family="text">
      <style:text-properties fo:font-size="13pt" fo:font-style="italic" style:text-underline-style="none" fo:font-weight="normal" officeooo:rsid="2fa861bc" style:font-size-asian="13pt" style:font-style-asian="italic" style:font-weight-asian="normal" style:font-size-complex="13pt" style:font-style-complex="italic" style:font-weight-complex="normal"/>
    </style:style>
    <style:style style:name="T190" style:family="text">
      <style:text-properties officeooo:rsid="2f7a0eab"/>
    </style:style>
    <style:style style:name="T191" style:family="text">
      <style:text-properties fo:font-size="13pt" style:text-underline-style="none" fo:font-weight="normal" officeooo:rsid="00799967" style:font-size-asian="13pt" style:font-weight-asian="normal" style:font-size-complex="13pt" style:font-weight-complex="normal"/>
    </style:style>
    <style:style style:name="T192" style:family="text">
      <style:text-properties fo:font-size="13pt" style:text-underline-style="none" fo:font-weight="normal" officeooo:rsid="34f1674c" style:font-size-asian="13pt" style:font-weight-asian="normal" style:font-size-complex="13pt" style:font-weight-complex="normal"/>
    </style:style>
    <style:style style:name="T193" style:family="text">
      <style:text-properties officeooo:rsid="34f1674c"/>
    </style:style>
    <style:style style:name="T194" style:family="text">
      <style:text-properties officeooo:rsid="3511e3b7"/>
    </style:style>
    <style:style style:name="T195" style:family="text">
      <style:text-properties officeooo:rsid="35452f34"/>
    </style:style>
    <style:style style:name="T196" style:family="text">
      <style:text-properties officeooo:rsid="357ad8ce"/>
    </style:style>
    <style:style style:name="T197" style:family="text">
      <style:text-properties fo:font-size="13pt" style:text-underline-style="none" fo:font-weight="normal" officeooo:rsid="35452f34" style:font-size-asian="13pt" style:font-weight-asian="normal" style:font-size-complex="13pt" style:font-weight-complex="normal"/>
    </style:style>
    <style:style style:name="T198" style:family="text">
      <style:text-properties fo:font-size="13pt" style:text-underline-style="none" fo:font-weight="normal" officeooo:rsid="364ef61f" style:font-size-asian="13pt" style:font-weight-asian="normal" style:font-size-complex="13pt" style:font-weight-complex="normal"/>
    </style:style>
    <style:style style:name="T199" style:family="text">
      <style:text-properties fo:font-size="13pt" style:text-underline-style="none" fo:font-weight="normal" officeooo:rsid="365f52e3" style:font-size-asian="13pt" style:font-weight-asian="normal" style:font-size-complex="13pt" style:font-weight-complex="normal"/>
    </style:style>
    <style:style style:name="T200" style:family="text">
      <style:text-properties officeooo:rsid="364ef61f"/>
    </style:style>
    <style:style style:name="T201" style:family="text">
      <style:text-properties officeooo:rsid="365f3b69"/>
    </style:style>
    <style:style style:name="T202" style:family="text">
      <style:text-properties fo:font-size="13pt" style:text-underline-style="none" fo:font-weight="normal" officeooo:rsid="2f7b0358" style:font-size-asian="13pt" style:font-weight-asian="normal" style:font-size-complex="13pt" style:font-weight-complex="normal"/>
    </style:style>
    <style:style style:name="T203" style:family="text">
      <style:text-properties fo:font-size="13pt" style:text-underline-style="none" fo:font-weight="normal" officeooo:rsid="2f7a0eab" style:font-size-asian="13pt" style:font-weight-asian="normal" style:font-size-complex="13pt" style:font-weight-complex="normal"/>
    </style:style>
    <style:style style:name="T204" style:family="text">
      <style:text-properties style:font-name="Courier" fo:font-style="normal" style:font-style-asian="normal" style:font-style-complex="normal"/>
    </style:style>
    <style:style style:name="T205" style:family="text">
      <style:text-properties officeooo:rsid="0031c008"/>
    </style:style>
    <style:style style:name="T206" style:family="text">
      <style:text-properties officeooo:rsid="35d72cd0"/>
    </style:style>
    <style:style style:name="T207" style:family="text">
      <style:text-properties officeooo:rsid="2aea5849"/>
    </style:style>
    <style:style style:name="T208" style:family="text">
      <style:text-properties officeooo:rsid="36ba595f"/>
    </style:style>
    <style:style style:name="T209" style:family="text">
      <style:text-properties officeooo:rsid="35f78c86"/>
    </style:style>
    <style:style style:name="T210" style:family="text">
      <style:text-properties officeooo:rsid="354ceede"/>
    </style:style>
    <style:style style:name="T211" style:family="text">
      <style:text-properties fo:font-style="italic" style:font-style-asian="italic" style:font-style-complex="italic"/>
    </style:style>
    <style:style style:name="T212" style:family="text">
      <style:text-properties style:font-name="Courier"/>
    </style:style>
    <style:style style:name="T213" style:family="text">
      <style:text-properties fo:font-size="13pt" style:text-underline-style="none" fo:font-weight="normal" officeooo:rsid="35f78c86" style:font-size-asian="13pt" style:font-weight-asian="normal" style:font-size-complex="13pt" style:font-weight-complex="normal"/>
    </style:style>
    <style:style style:name="T214" style:family="text">
      <style:text-properties style:font-name="Courier" fo:font-size="13pt" style:text-underline-style="none" fo:font-weight="normal" officeooo:rsid="00d726d4" style:font-size-asian="13pt" style:font-weight-asian="normal" style:font-size-complex="13pt" style:font-weight-complex="normal"/>
    </style:style>
    <style:style style:name="T215" style:family="text">
      <style:text-properties officeooo:rsid="30f0860a"/>
    </style:style>
    <style:style style:name="T216" style:family="text">
      <style:text-properties officeooo:rsid="312d4908"/>
    </style:style>
    <style:style style:name="T217" style:family="text">
      <style:text-properties officeooo:rsid="36dd49d9"/>
    </style:style>
    <style:style style:name="T218" style:family="text">
      <style:text-properties style:font-name="Courier" officeooo:rsid="36dd49d9"/>
    </style:style>
    <style:style style:name="T219" style:family="text">
      <style:text-properties fo:font-size="13pt" style:text-underline-style="none" fo:font-weight="normal" officeooo:rsid="36dd49d9" style:font-size-asian="13pt" style:font-weight-asian="normal" style:font-size-complex="13pt" style:font-weight-complex="normal"/>
    </style:style>
    <style:style style:name="T220" style:family="text">
      <style:text-properties fo:font-size="13pt" style:text-underline-style="none" fo:font-weight="normal" officeooo:rsid="36e2991d" style:font-size-asian="13pt" style:font-weight-asian="normal" style:font-size-complex="13pt" style:font-weight-complex="normal"/>
    </style:style>
    <style:style style:name="T221" style:family="text">
      <style:text-properties officeooo:rsid="002795f6"/>
    </style:style>
    <style:style style:name="T222" style:family="text">
      <style:text-properties officeooo:rsid="004997ab"/>
    </style:style>
    <style:style style:name="T223" style:family="text">
      <style:text-properties officeooo:rsid="0bd95cea"/>
    </style:style>
    <style:style style:name="T224" style:family="text">
      <style:text-properties officeooo:rsid="000481a6"/>
    </style:style>
    <style:style style:name="T225" style:family="text">
      <style:text-properties officeooo:rsid="02edeb14"/>
    </style:style>
    <style:style style:name="T226" style:family="text">
      <style:text-properties officeooo:rsid="00052d9c"/>
    </style:style>
    <style:style style:name="T227" style:family="text">
      <style:text-properties officeooo:rsid="02f7a692"/>
    </style:style>
    <style:style style:name="T228" style:family="text">
      <style:text-properties fo:color="#000000" loext:opacity="100%" style:font-name="Courier" fo:font-size="13pt" fo:font-style="normal" fo:font-weight="normal" officeooo:rsid="0cf00cd3" style:font-size-asian="13pt" style:font-style-asian="normal" style:font-weight-asian="normal" style:font-size-complex="13pt" style:font-style-complex="normal" style:font-weight-complex="normal"/>
    </style:style>
    <style:style style:name="T229" style:family="text">
      <style:text-properties fo:font-size="13pt" fo:font-weight="normal" officeooo:rsid="02fb5076" style:font-size-asian="13pt" style:font-weight-asian="normal" style:font-size-complex="13pt" style:font-weight-complex="normal"/>
    </style:style>
    <style:style style:name="T230" style:family="text">
      <style:text-properties fo:font-size="13pt" fo:font-weight="normal" officeooo:rsid="00c7186a" style:font-size-asian="13pt" style:font-weight-asian="normal" style:font-size-complex="13pt" style:font-weight-complex="normal"/>
    </style:style>
    <style:style style:name="T231" style:family="text">
      <style:text-properties fo:font-size="13pt" fo:font-weight="normal" officeooo:rsid="04beb33d" style:font-size-asian="13pt" style:font-weight-asian="normal" style:font-size-complex="13pt" style:font-weight-complex="normal"/>
    </style:style>
    <style:style style:name="T232" style:family="text">
      <style:text-properties fo:font-size="13pt" fo:font-weight="normal" officeooo:rsid="06998ecd" style:font-size-asian="13pt" style:font-weight-asian="normal" style:font-size-complex="13pt" style:font-weight-complex="normal"/>
    </style:style>
    <style:style style:name="T233" style:family="text">
      <style:text-properties fo:font-size="13pt" fo:font-weight="normal" officeooo:rsid="00ab0d39" style:font-size-asian="13pt" style:font-weight-asian="normal" style:font-size-complex="13pt" style:font-weight-complex="normal"/>
    </style:style>
    <style:style style:name="T234" style:family="text">
      <style:text-properties officeooo:rsid="04beb33d"/>
    </style:style>
    <style:style style:name="T235" style:family="text">
      <style:text-properties officeooo:rsid="07cd7585"/>
    </style:style>
    <style:style style:name="T236" style:family="text">
      <style:text-properties officeooo:rsid="07fa8e0e"/>
    </style:style>
    <style:style style:name="T237" style:family="text">
      <style:text-properties fo:font-size="13pt" fo:font-weight="normal" officeooo:rsid="00b107fb" style:font-size-asian="13pt" style:font-weight-asian="normal" style:font-size-complex="13pt" style:font-weight-complex="normal"/>
    </style:style>
    <style:style style:name="T238" style:family="text">
      <style:text-properties officeooo:rsid="00b3700d"/>
    </style:style>
    <style:style style:name="T239" style:family="text">
      <style:text-properties officeooo:rsid="03060c86"/>
    </style:style>
    <style:style style:name="T240" style:family="text">
      <style:text-properties officeooo:rsid="0c003523"/>
    </style:style>
    <style:style style:name="T241" style:family="text">
      <style:text-properties fo:font-size="13pt" fo:font-weight="normal" officeooo:rsid="04bcd0e5" style:font-size-asian="13pt" style:font-weight-asian="normal" style:font-size-complex="13pt" style:font-weight-complex="normal"/>
    </style:style>
    <style:style style:name="T242" style:family="text">
      <style:text-properties fo:font-size="13pt" fo:font-style="normal" fo:font-weight="normal" officeooo:rsid="08c26451" style:font-size-asian="13pt" style:font-style-asian="normal" style:font-weight-asian="normal" style:font-size-complex="13pt" style:font-style-complex="normal" style:font-weight-complex="normal"/>
    </style:style>
    <style:style style:name="T243" style:family="text">
      <style:text-properties officeooo:rsid="06ec8a56"/>
    </style:style>
    <style:style style:name="T244" style:family="text">
      <style:text-properties officeooo:rsid="06998ecd"/>
    </style:style>
    <style:style style:name="T245" style:family="text">
      <style:text-properties officeooo:rsid="0bbf3e59"/>
    </style:style>
    <style:style style:name="T246" style:family="text">
      <style:text-properties officeooo:rsid="030d16f3"/>
    </style:style>
    <style:style style:name="T247" style:family="text">
      <style:text-properties officeooo:rsid="063eb840"/>
    </style:style>
    <style:style style:name="T248" style:family="text">
      <style:text-properties fo:color="#000000" loext:opacity="100%" style:font-name="Liberation Serif" fo:font-style="normal" officeooo:rsid="00b467b9" style:font-style-asian="normal" style:font-style-complex="normal"/>
    </style:style>
    <style:style style:name="T249" style:family="text">
      <style:text-properties fo:color="#000000" loext:opacity="100%" style:font-name="Liberation Serif" fo:font-style="normal" officeooo:rsid="02f7a692" style:font-style-asian="normal" style:font-style-complex="normal"/>
    </style:style>
    <style:style style:name="T250" style:family="text">
      <style:text-properties fo:color="#000000" loext:opacity="100%" style:font-name="Liberation Serif" fo:font-style="normal" officeooo:rsid="030d16f3" style:font-style-asian="normal" style:font-style-complex="normal"/>
    </style:style>
    <style:style style:name="T251" style:family="text">
      <style:text-properties fo:color="#000000" loext:opacity="100%" style:font-name="Liberation Serif" fo:font-style="normal" officeooo:rsid="0b8038d1" style:font-style-asian="normal" style:font-style-complex="normal"/>
    </style:style>
    <style:style style:name="T252" style:family="text">
      <style:text-properties fo:color="#000000" loext:opacity="100%" style:font-name="Liberation Serif" fo:font-style="italic" officeooo:rsid="030d16f3" style:font-style-asian="italic" style:font-style-complex="italic"/>
    </style:style>
    <style:style style:name="T253" style:family="text">
      <style:text-properties fo:color="#000000" loext:opacity="100%" style:font-name="Liberation Serif" fo:font-style="italic" officeooo:rsid="0a12c951" style:font-style-asian="italic" style:font-style-complex="italic"/>
    </style:style>
    <style:style style:name="T254" style:family="text">
      <style:text-properties fo:color="#000000" loext:opacity="100%" style:font-name="Liberation Serif" fo:font-style="normal" officeooo:rsid="0a12c951" style:font-style-asian="normal" style:font-style-complex="normal"/>
    </style:style>
    <style:style style:name="T255" style:family="text">
      <style:text-properties officeooo:rsid="0bc20d64"/>
    </style:style>
    <style:style style:name="T256" style:family="text">
      <style:text-properties officeooo:rsid="00b467b9"/>
    </style:style>
    <style:style style:name="T257" style:family="text">
      <style:text-properties officeooo:rsid="00bfd644"/>
    </style:style>
    <style:style style:name="T258" style:family="text">
      <style:text-properties officeooo:rsid="0aefaf02"/>
    </style:style>
    <style:style style:name="T259" style:family="text">
      <style:text-properties fo:font-style="italic" officeooo:rsid="00b467b9" style:font-style-asian="italic" style:font-style-complex="italic"/>
    </style:style>
    <style:style style:name="T260" style:family="text">
      <style:text-properties fo:color="#000000" loext:opacity="100%" style:font-name="Liberation Serif" fo:font-style="normal" officeooo:rsid="00b4a934" style:font-style-asian="normal" style:font-style-complex="normal"/>
    </style:style>
    <style:style style:name="T261" style:family="text">
      <style:text-properties fo:color="#000000" loext:opacity="100%" style:font-name="Liberation Serif" fo:font-style="normal" officeooo:rsid="00bfd644" style:font-style-asian="normal" style:font-style-complex="normal"/>
    </style:style>
    <style:style style:name="T262" style:family="text">
      <style:text-properties fo:color="#000000" loext:opacity="100%" style:font-name="Liberation Serif" fo:font-style="italic" officeooo:rsid="0b1409a9" style:font-style-asian="italic" style:font-style-complex="italic"/>
    </style:style>
    <style:style style:name="T263" style:family="text">
      <style:text-properties fo:color="#000000" loext:opacity="100%" style:font-name="Liberation Serif" fo:font-style="normal" officeooo:rsid="0b1409a9" style:font-style-asian="normal" style:font-style-complex="normal"/>
    </style:style>
    <style:style style:name="T264" style:family="text">
      <style:text-properties officeooo:rsid="0b496393"/>
    </style:style>
    <style:style style:name="T265" style:family="text">
      <style:text-properties officeooo:rsid="030da4e7"/>
    </style:style>
    <style:style style:name="T266" style:family="text">
      <style:text-properties officeooo:rsid="0b65060f"/>
    </style:style>
    <style:style style:name="T267" style:family="text">
      <style:text-properties officeooo:rsid="00b57936"/>
    </style:style>
    <style:style style:name="T268" style:family="text">
      <style:text-properties officeooo:rsid="0219f66e"/>
    </style:style>
    <style:style style:name="T269" style:family="text">
      <style:text-properties officeooo:rsid="0543519c"/>
    </style:style>
    <style:style style:name="T270" style:family="text">
      <style:text-properties officeooo:rsid="055c724c"/>
    </style:style>
    <style:style style:name="T271" style:family="text">
      <style:text-properties fo:color="#000000" loext:opacity="100%" style:font-name="Liberation Serif" fo:font-style="normal" officeooo:rsid="00b57936" style:font-style-asian="normal" style:font-style-complex="normal"/>
    </style:style>
    <style:style style:name="T272" style:family="text">
      <style:text-properties fo:color="#000000" loext:opacity="100%" style:font-name="Liberation Serif" fo:font-style="normal" officeooo:rsid="02a80d80" style:font-style-asian="normal" style:font-style-complex="normal"/>
    </style:style>
    <style:style style:name="T273" style:family="text">
      <style:text-properties fo:color="#000000" loext:opacity="100%" style:font-name="Liberation Serif" fo:font-style="italic" officeooo:rsid="02a80d80" style:font-style-asian="italic" style:font-style-complex="italic"/>
    </style:style>
    <style:style style:name="T274" style:family="text">
      <style:text-properties fo:color="#000000" loext:opacity="100%" style:font-name="Liberation Serif" fo:font-size="13pt" fo:font-style="normal" fo:font-weight="normal" officeooo:rsid="02a80d80" style:font-size-asian="13pt" style:font-style-asian="normal" style:font-weight-asian="normal" style:font-size-complex="13pt" style:font-style-complex="normal" style:font-weight-complex="normal"/>
    </style:style>
    <style:style style:name="T275" style:family="text">
      <style:text-properties fo:color="#000000" loext:opacity="100%" style:font-name="Courier" fo:font-size="13pt" fo:font-style="normal" fo:font-weight="normal" officeooo:rsid="02a80d80" style:font-size-asian="13pt" style:font-style-asian="normal" style:font-weight-asian="normal" style:font-size-complex="13pt" style:font-style-complex="normal" style:font-weight-complex="normal"/>
    </style:style>
    <style:style style:name="T276" style:family="text">
      <style:text-properties fo:color="#000000" loext:opacity="100%" style:font-name="Liberation Serif" fo:font-size="13pt" fo:font-style="italic" fo:font-weight="normal" officeooo:rsid="02a80d80" style:font-size-asian="13pt" style:font-style-asian="italic" style:font-weight-asian="normal" style:font-size-complex="13pt" style:font-style-complex="italic" style:font-weight-complex="normal"/>
    </style:style>
    <style:style style:name="T277" style:family="text">
      <style:text-properties officeooo:rsid="001b898f"/>
    </style:style>
    <style:style style:name="T278" style:family="text">
      <style:text-properties officeooo:rsid="030fe645"/>
    </style:style>
    <style:style style:name="T279" style:family="text">
      <style:text-properties officeooo:rsid="02ef25e9"/>
    </style:style>
    <style:style style:name="T280" style:family="text">
      <style:text-properties officeooo:rsid="0d2442ae"/>
    </style:style>
    <style:style style:name="T281" style:family="text">
      <style:text-properties style:use-window-font-color="true" loext:opacity="0%" fo:font-size="13pt" fo:font-weight="normal" officeooo:rsid="02ab4278" style:font-size-asian="13pt" style:font-weight-asian="normal" style:font-size-complex="13pt" style:font-weight-complex="normal"/>
    </style:style>
    <style:style style:name="T282" style:family="text">
      <style:text-properties style:text-underline-style="none" officeooo:rsid="0031c008"/>
    </style:style>
    <style:style style:name="T283" style:family="text">
      <style:text-properties style:text-underline-style="none" officeooo:rsid="04c10c81"/>
    </style:style>
    <style:style style:name="T284" style:family="text">
      <style:text-properties style:text-underline-style="none" officeooo:rsid="0083cf94"/>
    </style:style>
    <style:style style:name="T285" style:family="text">
      <style:text-properties style:text-underline-style="none" officeooo:rsid="02f7a692"/>
    </style:style>
    <style:style style:name="T286" style:family="text">
      <style:text-properties style:text-underline-style="none" officeooo:rsid="2aea5849"/>
    </style:style>
    <style:style style:name="T287" style:family="text">
      <style:text-properties style:text-underline-style="none" officeooo:rsid="02edeb14"/>
    </style:style>
    <style:style style:name="T288" style:family="text">
      <style:text-properties style:use-window-font-color="true" loext:opacity="0%" style:font-name="Liberation Serif" fo:font-size="13pt" fo:font-style="normal" style:text-underline-style="none" fo:font-weight="normal" officeooo:rsid="00bcebde" style:font-size-asian="13pt" style:font-style-asian="normal" style:font-weight-asian="normal" style:font-size-complex="13pt" style:font-style-complex="normal" style:font-weight-complex="normal"/>
    </style:style>
    <style:style style:name="T289" style:family="text">
      <style:text-properties style:use-window-font-color="true" loext:opacity="0%" style:font-name="Liberation Serif" fo:font-size="13pt" fo:font-style="normal" style:text-underline-style="none" fo:font-weight="normal" officeooo:rsid="02f7a692" style:font-size-asian="13pt" style:font-style-asian="normal" style:font-weight-asian="normal" style:font-size-complex="13pt" style:font-style-complex="normal" style:font-weight-complex="normal"/>
    </style:style>
    <style:style style:name="T290" style:family="text">
      <style:text-properties style:use-window-font-color="true" loext:opacity="0%" style:font-name="Liberation Serif" fo:font-size="13pt" fo:font-style="normal" style:text-underline-style="none" fo:font-weight="normal" officeooo:rsid="0a911c24" style:font-size-asian="13pt" style:font-style-asian="normal" style:font-weight-asian="normal" style:font-size-complex="13pt" style:font-style-complex="normal" style:font-weight-complex="normal"/>
    </style:style>
    <style:style style:name="T291" style:family="text">
      <style:text-properties style:use-window-font-color="true" loext:opacity="0%" style:font-name="Liberation Serif" fo:font-size="13pt" fo:font-style="normal" style:text-underline-style="none" fo:font-weight="normal" officeooo:rsid="03110ac3" style:font-size-asian="13pt" style:font-style-asian="normal" style:font-weight-asian="normal" style:font-size-complex="13pt" style:font-style-complex="normal" style:font-weight-complex="normal"/>
    </style:style>
    <style:style style:name="T292" style:family="text">
      <style:text-properties style:use-window-font-color="true" loext:opacity="0%" style:font-name="Courier" fo:font-size="13pt" fo:font-style="normal" style:text-underline-style="none" fo:font-weight="normal" officeooo:rsid="0a911c24" style:font-size-asian="13pt" style:font-style-asian="normal" style:font-weight-asian="normal" style:font-size-complex="13pt" style:font-style-complex="normal" style:font-weight-complex="normal"/>
    </style:style>
    <style:style style:name="T293" style:family="text">
      <style:text-properties fo:color="#000000" loext:opacity="100%" style:font-name="Liberation Serif" fo:font-size="13pt" fo:font-style="normal" style:text-underline-style="none" fo:font-weight="normal" officeooo:rsid="00c05ced" style:font-size-asian="13pt" style:font-style-asian="normal" style:font-weight-asian="normal" style:font-size-complex="13pt" style:font-style-complex="normal" style:font-weight-complex="normal"/>
    </style:style>
    <style:style style:name="T294" style:family="text">
      <style:text-properties fo:color="#000000" loext:opacity="100%" style:font-name="Liberation Serif" fo:font-size="13pt" fo:font-style="normal" style:text-underline-style="none" fo:font-weight="normal" officeooo:rsid="02c8c044" style:font-size-asian="13pt" style:font-style-asian="normal" style:font-weight-asian="normal" style:font-size-complex="13pt" style:font-style-complex="normal" style:font-weight-complex="normal"/>
    </style:style>
    <style:style style:name="T295" style:family="text">
      <style:text-properties fo:color="#000000" loext:opacity="100%" style:font-name="Liberation Serif" fo:font-size="13pt" fo:font-style="normal" style:text-underline-style="none" fo:font-weight="normal" officeooo:rsid="03110ac3" style:font-size-asian="13pt" style:font-style-asian="normal" style:font-weight-asian="normal" style:font-size-complex="13pt" style:font-style-complex="normal" style:font-weight-complex="normal"/>
    </style:style>
    <style:style style:name="T296" style:family="text">
      <style:text-properties style:use-window-font-color="true" loext:opacity="0%" style:font-name="Liberation Serif" fo:font-size="13pt" fo:font-style="italic" style:text-underline-style="none" fo:font-weight="normal" officeooo:rsid="0a911c24" style:font-size-asian="13pt" style:font-style-asian="italic" style:font-weight-asian="normal" style:font-size-complex="13pt" style:font-style-complex="italic" style:font-weight-complex="normal"/>
    </style:style>
    <style:style style:name="T297" style:family="text">
      <style:text-properties officeooo:rsid="0464cdc6"/>
    </style:style>
    <style:style style:name="T298" style:family="text">
      <style:text-properties officeooo:rsid="03110ac3"/>
    </style:style>
    <style:style style:name="T299" style:family="text">
      <style:text-properties officeooo:rsid="0b6b1693"/>
    </style:style>
    <style:style style:name="T300" style:family="text">
      <style:text-properties officeooo:rsid="0cb0bc50"/>
    </style:style>
    <style:style style:name="T301" style:family="text">
      <style:text-properties style:use-window-font-color="true" loext:opacity="0%"/>
    </style:style>
    <style:style style:name="T302" style:family="text">
      <style:text-properties style:use-window-font-color="true" loext:opacity="0%" officeooo:rsid="0b8774a2"/>
    </style:style>
    <style:style style:name="T303" style:family="text">
      <style:text-properties style:use-window-font-color="true" loext:opacity="0%" style:font-name="Courier" officeooo:rsid="0b8774a2"/>
    </style:style>
    <style:style style:name="T304" style:family="text">
      <style:text-properties style:use-window-font-color="true" loext:opacity="0%" officeooo:rsid="0b9793fa"/>
    </style:style>
    <style:style style:name="T305" style:family="text">
      <style:text-properties style:use-window-font-color="true" loext:opacity="0%" style:font-name="Courier" officeooo:rsid="0b9793fa"/>
    </style:style>
    <style:style style:name="T306" style:family="text">
      <style:text-properties fo:color="#000000" loext:opacity="100%" style:font-name="Liberation Serif" fo:font-size="13pt" fo:font-style="normal" style:text-underline-style="none" fo:font-weight="normal" officeooo:rsid="0b6b1693" style:font-size-asian="13pt" style:font-style-asian="normal" style:font-weight-asian="normal" style:font-size-complex="13pt" style:font-style-complex="normal" style:font-weight-complex="normal"/>
    </style:style>
    <style:style style:name="T307" style:family="text">
      <style:text-properties style:use-window-font-color="true" loext:opacity="0%" style:font-name="Courier" fo:font-size="13pt" fo:font-style="normal" style:text-underline-style="none" fo:font-weight="normal" officeooo:rsid="0b9793fa" style:font-size-asian="13pt" style:font-style-asian="normal" style:font-weight-asian="normal" style:font-size-complex="13pt" style:font-style-complex="normal" style:font-weight-complex="normal"/>
    </style:style>
    <style:style style:name="T308" style:family="text">
      <style:text-properties style:use-window-font-color="true" loext:opacity="0%" officeooo:rsid="0c6a10ed"/>
    </style:style>
    <style:style style:name="T309" style:family="text">
      <style:text-properties style:use-window-font-color="true" loext:opacity="0%" officeooo:rsid="03110ac3"/>
    </style:style>
    <style:style style:name="T310" style:family="text">
      <style:text-properties fo:font-style="italic" officeooo:rsid="0a183561" style:font-style-asian="italic" style:font-style-complex="italic"/>
    </style:style>
    <style:style style:name="T311" style:family="text">
      <style:text-properties fo:font-style="italic" officeooo:rsid="0a9a5515" style:font-style-asian="italic" style:font-style-complex="italic"/>
    </style:style>
    <style:style style:name="T312" style:family="text">
      <style:text-properties officeooo:rsid="0a9a5515"/>
    </style:style>
    <style:style style:name="T313" style:family="text">
      <style:text-properties fo:font-style="italic" officeooo:rsid="0c718a5f" style:font-style-asian="italic" style:font-style-complex="italic"/>
    </style:style>
    <style:style style:name="T314" style:family="text">
      <style:text-properties officeooo:rsid="0c718a5f"/>
    </style:style>
    <style:style style:name="T315" style:family="text">
      <style:text-properties officeooo:rsid="00c06208"/>
    </style:style>
    <style:style style:name="T316" style:family="text">
      <style:text-properties officeooo:rsid="0c753a84"/>
    </style:style>
    <style:style style:name="T317" style:family="text">
      <style:text-properties officeooo:rsid="0ca7cc94"/>
    </style:style>
    <style:style style:name="T318" style:family="text">
      <style:text-properties style:use-window-font-color="true" loext:opacity="0%" officeooo:rsid="00c06208"/>
    </style:style>
    <style:style style:name="T319" style:family="text">
      <style:text-properties style:use-window-font-color="true" loext:opacity="0%" officeooo:rsid="02a373bf"/>
    </style:style>
    <style:style style:name="T320" style:family="text">
      <style:text-properties style:use-window-font-color="true" loext:opacity="0%" style:font-name="Courier" officeooo:rsid="0cdcd997"/>
    </style:style>
    <style:style style:name="T321" style:family="text">
      <style:text-properties style:use-window-font-color="true" loext:opacity="0%" officeooo:rsid="0cdcd997"/>
    </style:style>
    <style:style style:name="T322" style:family="text">
      <style:text-properties style:use-window-font-color="true" loext:opacity="0%" officeooo:rsid="014a94a1"/>
    </style:style>
    <style:style style:name="T323" style:family="text">
      <style:text-properties style:use-window-font-color="true" loext:opacity="0%" fo:font-style="italic" officeooo:rsid="014a94a1" style:font-style-asian="italic" style:font-style-complex="italic"/>
    </style:style>
    <style:style style:name="T324" style:family="text">
      <style:text-properties style:use-window-font-color="true" loext:opacity="0%" officeooo:rsid="0ceeb8ea"/>
    </style:style>
    <style:style style:name="T325" style:family="text">
      <style:text-properties style:use-window-font-color="true" loext:opacity="0%" style:font-name="Courier" officeooo:rsid="0ceeb8ea"/>
    </style:style>
    <style:style style:name="T326" style:family="text">
      <style:text-properties officeooo:rsid="0cee8f1e"/>
    </style:style>
    <style:style style:name="T327" style:family="text">
      <style:text-properties officeooo:rsid="02c8c044"/>
    </style:style>
    <style:style style:name="T328" style:family="text">
      <style:text-properties officeooo:rsid="018faa62"/>
    </style:style>
    <style:style style:name="T329" style:family="text">
      <style:text-properties officeooo:rsid="01b282b7"/>
    </style:style>
    <style:style style:name="T330" style:family="text">
      <style:text-properties officeooo:rsid="01f0899b"/>
    </style:style>
    <style:style style:name="T331" style:family="text">
      <style:text-properties officeooo:rsid="01f317b4"/>
    </style:style>
    <style:style style:name="T332" style:family="text">
      <style:text-properties officeooo:rsid="02196ba9"/>
    </style:style>
    <style:style style:name="T333" style:family="text">
      <style:text-properties officeooo:rsid="0083cf94"/>
    </style:style>
    <style:style style:name="T334" style:family="text">
      <style:text-properties fo:font-style="italic" officeooo:rsid="0083cf94" style:font-style-asian="italic" style:font-style-complex="italic"/>
    </style:style>
    <style:style style:name="T335" style:family="text">
      <style:text-properties officeooo:rsid="00433ec1"/>
    </style:style>
    <style:style style:name="T336" style:family="text">
      <style:text-properties officeooo:rsid="022fd930"/>
    </style:style>
    <style:style style:name="T337" style:family="text">
      <style:text-properties officeooo:rsid="05a8edf2"/>
    </style:style>
    <style:style style:name="T338" style:family="text">
      <style:text-properties style:font-name="Courier" fo:font-size="13pt" style:font-size-asian="13pt" style:font-size-complex="13pt"/>
    </style:style>
    <style:style style:name="T339" style:family="text">
      <style:text-properties fo:font-size="13pt" officeooo:rsid="05b1c80e" style:font-size-asian="13pt" style:font-size-complex="13pt"/>
    </style:style>
    <style:style style:name="T340" style:family="text">
      <style:text-properties fo:font-weight="normal" officeooo:rsid="006d0dae" style:font-weight-asian="normal" style:font-weight-complex="normal"/>
    </style:style>
    <style:style style:name="T341" style:family="text">
      <style:text-properties fo:font-weight="normal" officeooo:rsid="00052d9c" style:font-weight-asian="normal" style:font-weight-complex="normal"/>
    </style:style>
    <style:style style:name="T342" style:family="text">
      <style:text-properties fo:font-weight="normal" officeooo:rsid="0219f66e" style:font-weight-asian="normal" style:font-weight-complex="normal"/>
    </style:style>
    <style:style style:name="T343" style:family="text">
      <style:text-properties fo:font-weight="normal" officeooo:rsid="02ae708c" style:font-weight-asian="normal" style:font-weight-complex="normal"/>
    </style:style>
    <style:style style:name="T344" style:family="text">
      <style:text-properties fo:font-weight="normal" officeooo:rsid="00433ec1" style:font-weight-asian="normal" style:font-weight-complex="normal"/>
    </style:style>
    <style:style style:name="T345" style:family="text">
      <style:text-properties officeooo:rsid="022e43de"/>
    </style:style>
    <style:style style:name="T346" style:family="text">
      <style:text-properties style:font-name="Courier" officeooo:rsid="0219f66e"/>
    </style:style>
    <style:style style:name="T347" style:family="text">
      <style:text-properties style:font-name="Courier" officeooo:rsid="022e43de"/>
    </style:style>
    <style:style style:name="T348" style:family="text">
      <style:text-properties style:use-window-font-color="true" loext:opacity="0%" officeooo:rsid="057bb34d"/>
    </style:style>
    <style:style style:name="T349" style:family="text">
      <style:text-properties style:use-window-font-color="true" loext:opacity="0%" officeooo:rsid="011e5481"/>
    </style:style>
    <style:style style:name="T350" style:family="text">
      <style:text-properties style:use-window-font-color="true" loext:opacity="0%" fo:font-size="13pt" fo:font-weight="normal" officeooo:rsid="011e5481" style:font-size-asian="13pt" style:font-weight-asian="normal" style:font-size-complex="13pt" style:font-weight-complex="normal"/>
    </style:style>
    <style:style style:name="T351" style:family="text">
      <style:text-properties style:font-name="Courier" fo:font-size="13pt" fo:font-weight="normal" officeooo:rsid="022e43de" style:font-size-asian="13pt" style:font-weight-asian="normal" style:font-size-complex="13pt" style:font-weight-complex="normal"/>
    </style:style>
    <style:style style:name="T352" style:family="text">
      <style:text-properties fo:font-weight="normal" officeooo:rsid="022e43de" style:font-weight-asian="normal" style:font-weight-complex="normal"/>
    </style:style>
    <style:style style:name="T353" style:family="text">
      <style:text-properties style:font-name="Courier" fo:font-weight="normal" officeooo:rsid="022e43de" style:font-weight-asian="normal" style:font-weight-complex="normal"/>
    </style:style>
    <style:style style:name="T354" style:family="text">
      <style:text-properties style:use-window-font-color="true" loext:opacity="0%" fo:font-size="13pt" fo:font-style="normal" fo:font-weight="normal" officeooo:rsid="0584881b" style:font-size-asian="13pt" style:font-style-asian="normal" style:font-weight-asian="normal" style:font-size-complex="13pt" style:font-style-complex="normal" style:font-weight-complex="normal"/>
    </style:style>
    <style:style style:name="T355" style:family="text">
      <style:text-properties style:use-window-font-color="true" loext:opacity="0%" fo:font-size="13pt" fo:font-style="normal" fo:font-weight="normal" officeooo:rsid="013533f3" style:font-size-asian="13pt" style:font-style-asian="normal" style:font-weight-asian="normal" style:font-size-complex="13pt" style:font-style-complex="normal" style:font-weight-complex="normal"/>
    </style:style>
    <style:style style:name="T356" style:family="text">
      <style:text-properties style:use-window-font-color="true" loext:opacity="0%" fo:font-size="13pt" fo:font-style="normal" fo:font-weight="normal" officeooo:rsid="05bf9719" style:font-size-asian="13pt" style:font-style-asian="normal" style:font-weight-asian="normal" style:font-size-complex="13pt" style:font-style-complex="normal" style:font-weight-complex="normal"/>
    </style:style>
    <style:style style:name="T357" style:family="text">
      <style:text-properties officeooo:rsid="021b494b"/>
    </style:style>
    <style:style style:name="T358" style:family="text">
      <style:text-properties fo:font-weight="normal" officeooo:rsid="021b494b" style:font-weight-asian="normal" style:font-weight-complex="normal"/>
    </style:style>
    <style:style style:name="T359" style:family="text">
      <style:text-properties style:use-window-font-color="true" loext:opacity="0%" fo:font-size="13pt" fo:font-weight="normal" officeooo:rsid="02ce6f9e" style:font-size-asian="13pt" style:font-weight-asian="normal" style:font-size-complex="13pt" style:font-weight-complex="normal"/>
    </style:style>
    <style:style style:name="T360" style:family="text">
      <style:text-properties style:use-window-font-color="true" loext:opacity="0%" fo:font-size="13pt" fo:font-weight="normal" officeooo:rsid="05c6a7ac" style:font-size-asian="13pt" style:font-weight-asian="normal" style:font-size-complex="13pt" style:font-weight-complex="normal"/>
    </style:style>
    <style:style style:name="T361" style:family="text">
      <style:text-properties fo:font-size="13pt" fo:font-weight="bold" style:font-size-asian="13pt" style:font-weight-asian="bold" style:font-size-complex="13pt" style:font-weight-complex="bold"/>
    </style:style>
    <style:style style:name="T362" style:family="text">
      <style:text-properties officeooo:rsid="02d54aa5"/>
    </style:style>
    <style:style style:name="T363" style:family="text">
      <style:text-properties style:use-window-font-color="true" loext:opacity="0%" fo:font-size="13pt" fo:font-weight="normal" officeooo:rsid="030f2e60" style:font-size-asian="13pt" style:font-weight-asian="normal" style:font-size-complex="13pt" style:font-weight-complex="normal"/>
    </style:style>
    <style:style style:name="T364" style:family="text">
      <style:text-properties officeooo:rsid="02d6aa2d"/>
    </style:style>
    <style:style style:name="T365" style:family="text">
      <style:text-properties officeooo:rsid="053e7be2"/>
    </style:style>
    <style:style style:name="T366" style:family="text">
      <style:text-properties style:use-window-font-color="true" loext:opacity="0%" fo:font-weight="normal" officeooo:rsid="059bfa11" style:font-weight-asian="normal" style:font-weight-complex="normal"/>
    </style:style>
    <style:style style:name="T367" style:family="text">
      <style:text-properties style:use-window-font-color="true" loext:opacity="0%" fo:font-weight="normal" officeooo:rsid="0345ea21" style:font-weight-asian="normal" style:font-weight-complex="normal"/>
    </style:style>
    <style:style style:name="T368" style:family="text">
      <style:text-properties style:use-window-font-color="true" loext:opacity="0%" style:font-name="Courier" fo:font-weight="normal" officeooo:rsid="03438345" style:font-weight-asian="normal" style:font-weight-complex="normal"/>
    </style:style>
    <style:style style:name="T369" style:family="text">
      <style:text-properties style:use-window-font-color="true" loext:opacity="0%" style:font-name="Courier" fo:font-weight="normal" officeooo:rsid="03450b33" style:font-weight-asian="normal" style:font-weight-complex="normal"/>
    </style:style>
    <style:style style:name="T370" style:family="text">
      <style:text-properties style:use-window-font-color="true" loext:opacity="0%" fo:font-weight="normal" officeooo:rsid="0368d6c9" style:font-weight-asian="normal" style:font-weight-complex="normal"/>
    </style:style>
    <style:style style:name="T371" style:family="text">
      <style:text-properties style:use-window-font-color="true" loext:opacity="0%" style:font-name="Courier" fo:font-weight="normal" officeooo:rsid="059bfa11" style:font-weight-asian="normal" style:font-weight-complex="normal"/>
    </style:style>
    <style:style style:name="T372" style:family="text">
      <style:text-properties style:use-window-font-color="true" loext:opacity="0%" style:font-name="Courier" fo:font-weight="normal" officeooo:rsid="0368d6c9" style:font-weight-asian="normal" style:font-weight-complex="normal"/>
    </style:style>
    <style:style style:name="T373" style:family="text">
      <style:text-properties style:use-window-font-color="true" loext:opacity="0%" fo:font-weight="normal" officeooo:rsid="0398501c" style:font-weight-asian="normal" style:font-weight-complex="normal"/>
    </style:style>
    <style:style style:name="T374" style:family="text">
      <style:text-properties style:use-window-font-color="true" loext:opacity="0%" fo:font-weight="normal" officeooo:rsid="059cd2b4" style:font-weight-asian="normal" style:font-weight-complex="normal"/>
    </style:style>
    <style:style style:name="T375" style:family="text">
      <style:text-properties style:use-window-font-color="true" loext:opacity="0%" fo:font-weight="normal" officeooo:rsid="03add424" style:font-weight-asian="normal" style:font-weight-complex="normal"/>
    </style:style>
    <style:style style:name="T376" style:family="text">
      <style:text-properties officeooo:rsid="024ca763"/>
    </style:style>
    <style:style style:name="T377" style:family="text">
      <style:text-properties style:use-window-font-color="true" loext:opacity="0%" fo:font-size="13pt" fo:font-weight="normal" officeooo:rsid="03dcb6ad" style:font-size-asian="13pt" style:font-weight-asian="normal" style:font-size-complex="13pt" style:font-weight-complex="normal"/>
    </style:style>
    <style:style style:name="T378" style:family="text">
      <style:text-properties style:use-window-font-color="true" loext:opacity="0%" style:font-name="Courier" fo:font-size="13pt" fo:font-weight="normal" officeooo:rsid="03450b33" style:font-size-asian="13pt" style:font-weight-asian="normal" style:font-size-complex="13pt" style:font-weight-complex="normal"/>
    </style:style>
    <style:style style:name="T379" style:family="text">
      <style:text-properties fo:font-weight="normal" officeooo:rsid="02d6aa2d" style:font-weight-asian="normal" style:font-weight-complex="normal"/>
    </style:style>
    <style:style style:name="T380" style:family="text">
      <style:text-properties fo:font-weight="normal" officeooo:rsid="05a47c7f" style:font-weight-asian="normal" style:font-weight-complex="normal"/>
    </style:style>
    <style:style style:name="T381" style:family="text">
      <style:text-properties fo:font-weight="normal" officeooo:rsid="05a8edf2" style:font-weight-asian="normal" style:font-weight-complex="normal"/>
    </style:style>
    <style:style style:name="T382" style:family="text">
      <style:text-properties officeooo:rsid="05a47c7f"/>
    </style:style>
    <style:style style:name="T383" style:family="text">
      <style:text-properties officeooo:rsid="00052570"/>
    </style:style>
    <style:style style:name="T384" style:family="text">
      <style:text-properties officeooo:rsid="0005ae83"/>
    </style:style>
    <style:style style:name="T385" style:family="text">
      <style:text-properties officeooo:rsid="043f9efc"/>
    </style:style>
    <style:style style:name="T386" style:family="text">
      <style:text-properties officeooo:rsid="008e351d"/>
    </style:style>
    <style:style style:name="T387" style:family="text">
      <style:text-properties fo:font-style="italic" officeooo:rsid="008e351d" style:font-style-asian="italic" style:font-style-complex="italic"/>
    </style:style>
    <style:style style:name="T388" style:family="text">
      <style:text-properties style:use-window-font-color="true" loext:opacity="0%" fo:font-size="13pt" fo:font-weight="normal" officeooo:rsid="0039ab08" style:font-size-asian="13pt" style:font-weight-asian="normal" style:font-size-complex="13pt" style:font-weight-complex="normal"/>
    </style:style>
    <style:style style:name="T389" style:family="text">
      <style:text-properties style:use-window-font-color="true" loext:opacity="0%" fo:font-size="13pt" fo:font-weight="normal" officeooo:rsid="008e351d" style:font-size-asian="13pt" style:font-weight-asian="normal" style:font-size-complex="13pt" style:font-weight-complex="normal"/>
    </style:style>
    <style:style style:name="T390" style:family="text">
      <style:text-properties style:use-window-font-color="true" loext:opacity="0%" fo:font-size="13pt" fo:font-weight="normal" officeooo:rsid="087c846e" style:font-size-asian="13pt" style:font-weight-asian="normal" style:font-size-complex="13pt" style:font-weight-complex="normal"/>
    </style:style>
    <style:style style:name="T391" style:family="text">
      <style:text-properties officeooo:rsid="045f7d9d"/>
    </style:style>
    <style:style style:name="T392" style:family="text">
      <style:text-properties fo:font-size="13pt" fo:font-weight="normal" officeooo:rsid="0009729a" style:font-size-asian="13pt" style:font-weight-asian="normal" style:font-size-complex="13pt" style:font-weight-complex="normal"/>
    </style:style>
    <style:style style:name="T393" style:family="text">
      <style:text-properties style:font-name="Courier" fo:font-size="13pt" fo:font-weight="normal" officeooo:rsid="0009729a" style:font-size-asian="13pt" style:font-weight-asian="normal" style:font-size-complex="13pt" style:font-weight-complex="normal"/>
    </style:style>
    <style:style style:name="T394" style:family="text">
      <style:text-properties fo:font-size="13pt" fo:font-weight="normal" officeooo:rsid="045f7d9d" style:font-size-asian="13pt" style:font-weight-asian="normal" style:font-size-complex="13pt" style:font-weight-complex="normal"/>
    </style:style>
    <style:style style:name="T395" style:family="text">
      <style:text-properties fo:font-size="13pt" fo:font-weight="normal" officeooo:rsid="00d80f8a" style:font-size-asian="13pt" style:font-weight-asian="normal" style:font-size-complex="13pt" style:font-weight-complex="normal"/>
    </style:style>
    <style:style style:name="T396" style:family="text">
      <style:text-properties fo:font-size="13pt" fo:font-weight="normal" officeooo:rsid="012c13b6" style:font-size-asian="13pt" style:font-weight-asian="normal" style:font-size-complex="13pt" style:font-weight-complex="normal"/>
    </style:style>
    <style:style style:name="T397" style:family="text">
      <style:text-properties fo:font-size="13pt" fo:font-weight="normal" officeooo:rsid="012d36de" style:font-size-asian="13pt" style:font-weight-asian="normal" style:font-size-complex="13pt" style:font-weight-complex="normal"/>
    </style:style>
    <style:style style:name="T398" style:family="text">
      <style:text-properties officeooo:rsid="000b5c99"/>
    </style:style>
    <style:style style:name="T399" style:family="text">
      <style:text-properties fo:font-size="13pt" fo:font-weight="normal" officeooo:rsid="0141b2e9" style:font-size-asian="13pt" style:font-weight-asian="normal" style:font-size-complex="13pt" style:font-weight-complex="normal"/>
    </style:style>
    <style:style style:name="T400" style:family="text">
      <style:text-properties fo:font-size="13pt" fo:font-weight="normal" officeooo:rsid="01518a7b" style:font-size-asian="13pt" style:font-weight-asian="normal" style:font-size-complex="13pt" style:font-weight-complex="normal"/>
    </style:style>
    <style:style style:name="T401" style:family="text">
      <style:text-properties fo:font-size="13pt" fo:font-weight="normal" officeooo:rsid="016c804b" style:font-size-asian="13pt" style:font-weight-asian="normal" style:font-size-complex="13pt" style:font-weight-complex="normal"/>
    </style:style>
    <style:style style:name="T402" style:family="text">
      <style:text-properties officeooo:rsid="0141b2e9"/>
    </style:style>
    <style:style style:name="T403" style:family="text">
      <style:text-properties officeooo:rsid="01518a7b"/>
    </style:style>
    <style:style style:name="T404" style:family="text">
      <style:text-properties officeooo:rsid="01b76ec5"/>
    </style:style>
    <style:style style:name="T405" style:family="text">
      <style:text-properties fo:font-style="italic" officeooo:rsid="0141b2e9" style:font-style-asian="italic" style:font-style-complex="italic"/>
    </style:style>
    <style:style style:name="T406" style:family="text">
      <style:text-properties fo:font-style="normal" officeooo:rsid="01b76ec5" style:font-style-asian="normal" style:font-style-complex="normal"/>
    </style:style>
    <style:style style:name="T407" style:family="text">
      <style:text-properties fo:font-size="13pt" fo:font-weight="normal" officeooo:rsid="0275d905" style:font-size-asian="13pt" style:font-weight-asian="normal" style:font-size-complex="13pt" style:font-weight-complex="normal"/>
    </style:style>
    <style:style style:name="T408" style:family="text">
      <style:text-properties officeooo:rsid="0379ac2f"/>
    </style:style>
    <style:style style:name="T409" style:family="text">
      <style:text-properties fo:font-size="13pt" fo:font-style="normal" fo:font-weight="normal" officeooo:rsid="0275d905" style:font-size-asian="13pt" style:font-style-asian="normal" style:font-weight-asian="normal" style:font-size-complex="13pt" style:font-style-complex="normal" style:font-weight-complex="normal"/>
    </style:style>
    <style:style style:name="T410" style:family="text">
      <style:text-properties fo:font-size="13pt" fo:font-weight="normal" officeooo:rsid="0379ac2f" style:font-size-asian="13pt" style:font-weight-asian="normal" style:font-size-complex="13pt" style:font-weight-complex="normal"/>
    </style:style>
    <style:style style:name="T411" style:family="text">
      <style:text-properties style:font-name="Courier" fo:font-size="13pt" fo:font-weight="normal" officeooo:rsid="0275d905" style:font-size-asian="13pt" style:font-weight-asian="normal" style:font-size-complex="13pt" style:font-weight-complex="normal"/>
    </style:style>
    <style:style style:name="T412" style:family="text">
      <style:text-properties style:font-name="Courier" officeooo:rsid="02ce9666"/>
    </style:style>
    <style:style style:name="T413" style:family="text">
      <style:text-properties fo:font-style="normal" officeooo:rsid="01518a7b" style:font-style-asian="normal" style:font-style-complex="normal"/>
    </style:style>
    <style:style style:name="T414" style:family="text">
      <style:text-properties fo:font-style="normal" officeooo:rsid="0379ac2f" style:font-style-asian="normal" style:font-style-complex="normal"/>
    </style:style>
    <style:style style:name="T415" style:family="text">
      <style:text-properties fo:font-style="normal" officeooo:rsid="025ce238" style:font-style-asian="normal" style:font-style-complex="normal"/>
    </style:style>
    <style:style style:name="T416" style:family="text">
      <style:text-properties officeooo:rsid="04429afc"/>
    </style:style>
    <style:style style:name="T417" style:family="text">
      <style:text-properties style:font-name="Courier" officeooo:rsid="04429afc"/>
    </style:style>
    <style:style style:name="T418" style:family="text">
      <style:text-properties fo:font-size="13pt" fo:font-style="normal" fo:font-weight="normal" officeooo:rsid="025ce238" style:font-size-asian="13pt" style:font-style-asian="normal" style:font-weight-asian="normal" style:font-size-complex="13pt" style:font-style-complex="normal" style:font-weight-complex="normal"/>
    </style:style>
    <style:style style:name="T419" style:family="text">
      <style:text-properties officeooo:rsid="03a8ce87"/>
    </style:style>
    <style:style style:name="T420" style:family="text">
      <style:text-properties officeooo:rsid="0378b75c"/>
    </style:style>
    <style:style style:name="T421" style:family="text">
      <style:text-properties fo:font-size="13pt" fo:font-style="normal" fo:font-weight="normal" officeooo:rsid="03fda6d3" style:font-size-asian="13pt" style:font-style-asian="normal" style:font-weight-asian="normal" style:font-size-complex="13pt" style:font-style-complex="normal" style:font-weight-complex="normal"/>
    </style:style>
    <style:style style:name="T422" style:family="text">
      <style:text-properties fo:font-size="13pt" fo:font-style="normal" fo:font-weight="normal" officeooo:rsid="0405340e" style:font-size-asian="13pt" style:font-style-asian="normal" style:font-weight-asian="normal" style:font-size-complex="13pt" style:font-style-complex="normal" style:font-weight-complex="normal"/>
    </style:style>
    <style:style style:name="T423" style:family="text">
      <style:text-properties fo:font-size="13pt" fo:font-style="normal" fo:font-weight="normal" officeooo:rsid="04032b4e" style:font-size-asian="13pt" style:font-style-asian="normal" style:font-weight-asian="normal" style:font-size-complex="13pt" style:font-style-complex="normal" style:font-weight-complex="normal"/>
    </style:style>
    <style:style style:name="T424" style:family="text">
      <style:text-properties fo:font-size="13pt" fo:font-style="normal" fo:font-weight="normal" officeooo:rsid="03ffed0c" style:font-size-asian="13pt" style:font-style-asian="normal" style:font-weight-asian="normal" style:font-size-complex="13pt" style:font-style-complex="normal" style:font-weight-complex="normal"/>
    </style:style>
    <style:style style:name="T425" style:family="text">
      <style:text-properties fo:font-size="13pt" fo:font-style="normal" fo:font-weight="normal" officeooo:rsid="03a8ce87" style:font-size-asian="13pt" style:font-style-asian="normal" style:font-weight-asian="normal" style:font-size-complex="13pt" style:font-style-complex="normal" style:font-weight-complex="normal"/>
    </style:style>
    <style:style style:name="T426" style:family="text">
      <style:text-properties officeooo:rsid="025ce238"/>
    </style:style>
    <style:style style:name="T427" style:family="text">
      <style:text-properties fo:font-size="13pt" fo:font-style="normal" fo:font-weight="normal" officeooo:rsid="04077d98" style:font-size-asian="13pt" style:font-style-asian="normal" style:font-weight-asian="normal" style:font-size-complex="13pt" style:font-style-complex="normal" style:font-weight-complex="normal"/>
    </style:style>
    <style:style style:name="T428" style:family="text">
      <style:text-properties fo:font-size="13pt" fo:font-style="normal" fo:font-weight="normal" officeooo:rsid="04616397" style:font-size-asian="13pt" style:font-style-asian="normal" style:font-weight-asian="normal" style:font-size-complex="13pt" style:font-style-complex="normal" style:font-weight-complex="normal"/>
    </style:style>
    <style:style style:name="T429" style:family="text">
      <style:text-properties fo:font-size="13pt" fo:font-style="normal" fo:font-weight="normal" officeooo:rsid="045f7d9d" style:font-size-asian="13pt" style:font-style-asian="normal" style:font-weight-asian="normal" style:font-size-complex="13pt" style:font-style-complex="normal" style:font-weight-complex="normal"/>
    </style:style>
    <style:style style:name="T430" style:family="text">
      <style:text-properties fo:font-size="13pt" fo:font-style="normal" fo:font-weight="normal" officeooo:rsid="04648f82" style:font-size-asian="13pt" style:font-style-asian="normal" style:font-weight-asian="normal" style:font-size-complex="13pt" style:font-style-complex="normal" style:font-weight-complex="normal"/>
    </style:style>
    <style:style style:name="T431" style:family="text">
      <style:text-properties fo:font-size="13pt" fo:font-style="normal" fo:font-weight="normal" officeooo:rsid="04aeaba9" style:font-size-asian="13pt" style:font-style-asian="normal" style:font-weight-asian="normal" style:font-size-complex="13pt" style:font-style-complex="normal" style:font-weight-complex="normal"/>
    </style:style>
    <style:style style:name="T432" style:family="text">
      <style:text-properties officeooo:rsid="043c8fa7"/>
    </style:style>
    <style:style style:name="T433" style:family="text">
      <style:text-properties officeooo:rsid="04d96e96"/>
    </style:style>
    <style:style style:name="T434" style:family="text">
      <style:text-properties officeooo:rsid="03fda6d3"/>
    </style:style>
    <style:style style:name="T435" style:family="text">
      <style:text-properties fo:font-size="13pt" fo:font-style="normal" fo:font-weight="normal" officeooo:rsid="043c8fa7" style:font-size-asian="13pt" style:font-style-asian="normal" style:font-weight-asian="normal" style:font-size-complex="13pt" style:font-style-complex="normal" style:font-weight-complex="normal"/>
    </style:style>
    <style:style style:name="T436" style:family="text">
      <style:text-properties fo:font-size="13pt" fo:font-style="normal" fo:font-weight="normal" officeooo:rsid="05255891" style:font-size-asian="13pt" style:font-style-asian="normal" style:font-weight-asian="normal" style:font-size-complex="13pt" style:font-style-complex="normal" style:font-weight-complex="normal"/>
    </style:style>
    <style:style style:name="T437" style:family="text">
      <style:text-properties fo:font-size="13pt" fo:font-style="normal" fo:font-weight="normal" officeooo:rsid="066521cf" style:font-size-asian="13pt" style:font-style-asian="normal" style:font-weight-asian="normal" style:font-size-complex="13pt" style:font-style-complex="normal" style:font-weight-complex="normal"/>
    </style:style>
    <style:style style:name="T438" style:family="text">
      <style:text-properties fo:font-size="13pt" fo:font-style="normal" fo:font-weight="normal" officeooo:rsid="05adc768" style:font-size-asian="13pt" style:font-style-asian="normal" style:font-weight-asian="normal" style:font-size-complex="13pt" style:font-style-complex="normal" style:font-weight-complex="normal"/>
    </style:style>
    <style:style style:name="T439" style:family="text">
      <style:text-properties fo:font-size="13pt" fo:font-style="normal" fo:font-weight="normal" officeooo:rsid="06664955" style:font-size-asian="13pt" style:font-style-asian="normal" style:font-weight-asian="normal" style:font-size-complex="13pt" style:font-style-complex="normal" style:font-weight-complex="normal"/>
    </style:style>
    <style:style style:name="T440" style:family="text">
      <style:text-properties fo:font-size="13pt" fo:font-style="normal" fo:font-weight="normal" officeooo:rsid="06641261" style:font-size-asian="13pt" style:font-style-asian="normal" style:font-weight-asian="normal" style:font-size-complex="13pt" style:font-style-complex="normal" style:font-weight-complex="normal"/>
    </style:style>
    <style:style style:name="T441" style:family="text">
      <style:text-properties fo:font-size="13pt" fo:font-weight="normal" officeooo:rsid="05adc768" style:font-size-asian="13pt" style:font-weight-asian="normal" style:font-size-complex="13pt" style:font-weight-complex="normal"/>
    </style:style>
    <style:style style:name="T442" style:family="text">
      <style:text-properties fo:font-size="13pt" fo:font-weight="normal" officeooo:rsid="06664955" style:font-size-asian="13pt" style:font-weight-asian="normal" style:font-size-complex="13pt" style:font-weight-complex="normal"/>
    </style:style>
    <style:style style:name="T443" style:family="text">
      <style:text-properties fo:font-size="13pt" fo:font-style="normal" fo:font-weight="normal" officeooo:rsid="0665d229" style:font-size-asian="13pt" style:font-style-asian="normal" style:font-weight-asian="normal" style:font-size-complex="13pt" style:font-style-complex="normal" style:font-weight-complex="normal"/>
    </style:style>
    <style:style style:name="T444" style:family="text">
      <style:text-properties style:use-window-font-color="true" loext:opacity="0%" officeooo:rsid="058c20aa"/>
    </style:style>
    <style:style style:name="T445" style:family="text">
      <style:text-properties style:use-window-font-color="true" loext:opacity="0%" officeooo:rsid="06673146"/>
    </style:style>
    <style:style style:name="T446" style:family="text">
      <style:text-properties style:use-window-font-color="true" loext:opacity="0%" officeooo:rsid="058c6d72"/>
    </style:style>
    <style:style style:name="T447" style:family="text">
      <style:text-properties style:use-window-font-color="true" loext:opacity="0%" style:font-name="Courier" officeooo:rsid="058c20aa"/>
    </style:style>
    <style:style style:name="T448" style:family="text">
      <style:text-properties style:use-window-font-color="true" loext:opacity="0%" fo:font-size="13pt" fo:font-style="normal" fo:font-weight="normal" officeooo:rsid="058c20aa" style:font-size-asian="13pt" style:font-style-asian="normal" style:font-weight-asian="normal" style:font-size-complex="13pt" style:font-style-complex="normal" style:font-weight-complex="normal"/>
    </style:style>
    <style:style style:name="T449" style:family="text">
      <style:text-properties style:use-window-font-color="true" loext:opacity="0%" fo:font-size="13pt" fo:font-style="normal" fo:font-weight="normal" officeooo:rsid="06673146" style:font-size-asian="13pt" style:font-style-asian="normal" style:font-weight-asian="normal" style:font-size-complex="13pt" style:font-style-complex="normal" style:font-weight-complex="normal"/>
    </style:style>
    <style:style style:name="T450" style:family="text">
      <style:text-properties style:use-window-font-color="true" loext:opacity="0%" fo:font-size="13pt" fo:font-style="normal" fo:font-weight="normal" officeooo:rsid="058c6d72" style:font-size-asian="13pt" style:font-style-asian="normal" style:font-weight-asian="normal" style:font-size-complex="13pt" style:font-style-complex="normal" style:font-weight-complex="normal"/>
    </style:style>
    <style:style style:name="T451" style:family="text">
      <style:text-properties style:use-window-font-color="true" loext:opacity="0%" style:font-name="Courier" fo:font-size="13pt" fo:font-style="normal" fo:font-weight="normal" officeooo:rsid="058c20aa" style:font-size-asian="13pt" style:font-style-asian="normal" style:font-weight-asian="normal" style:font-size-complex="13pt" style:font-style-complex="normal" style:font-weight-complex="normal"/>
    </style:style>
    <style:style style:name="T452" style:family="text">
      <style:text-properties fo:font-size="13pt" fo:font-style="normal" fo:font-weight="normal" officeooo:rsid="05ab584a" style:font-size-asian="13pt" style:font-style-asian="normal" style:font-weight-asian="normal" style:font-size-complex="13pt" style:font-style-complex="normal" style:font-weight-complex="normal"/>
    </style:style>
    <style:style style:name="T453" style:family="text">
      <style:text-properties fo:font-size="13pt" fo:font-style="normal" fo:font-weight="normal" officeooo:rsid="06673146" style:font-size-asian="13pt" style:font-style-asian="normal" style:font-weight-asian="normal" style:font-size-complex="13pt" style:font-style-complex="normal" style:font-weight-complex="normal"/>
    </style:style>
    <style:style style:name="T454" style:family="text">
      <style:text-properties fo:font-size="13pt" fo:font-style="normal" fo:font-weight="normal" officeooo:rsid="05e76f8c" style:font-size-asian="13pt" style:font-style-asian="normal" style:font-weight-asian="normal" style:font-size-complex="13pt" style:font-style-complex="normal" style:font-weight-complex="normal"/>
    </style:style>
    <style:style style:name="T455" style:family="text">
      <style:text-properties officeooo:rsid="06673146"/>
    </style:style>
    <style:style style:name="T456" style:family="text">
      <style:text-properties officeooo:rsid="05e76f8c"/>
    </style:style>
    <style:style style:name="T457" style:family="text">
      <style:text-properties officeooo:rsid="0879c07d"/>
    </style:style>
    <style:style style:name="T458" style:family="text">
      <style:text-properties officeooo:rsid="063cd2ef"/>
    </style:style>
    <style:style style:name="T459" style:family="text">
      <style:text-properties officeooo:rsid="07199f3b"/>
    </style:style>
    <style:style style:name="T460" style:family="text">
      <style:text-properties officeooo:rsid="088f223c"/>
    </style:style>
    <style:style style:name="T461" style:family="text">
      <style:text-properties style:font-name="Courier" officeooo:rsid="07199f3b"/>
    </style:style>
    <style:style style:name="T462" style:family="text">
      <style:text-properties officeooo:rsid="0732332b"/>
    </style:style>
    <style:style style:name="T463" style:family="text">
      <style:text-properties style:font-name="Courier" officeooo:rsid="0732332b"/>
    </style:style>
    <style:style style:name="T464" style:family="text">
      <style:text-properties fo:font-style="normal" fo:font-weight="bold" officeooo:rsid="07199f3b" style:font-style-asian="normal" style:font-weight-asian="bold" style:font-style-complex="normal" style:font-weight-complex="bold"/>
    </style:style>
    <style:style style:name="T465" style:family="text">
      <style:text-properties fo:font-style="normal" officeooo:rsid="07199f3b" style:font-style-asian="normal" style:font-style-complex="normal"/>
    </style:style>
    <style:style style:name="T466" style:family="text">
      <style:text-properties fo:font-style="normal" officeooo:rsid="073b07ff" style:font-style-asian="normal" style:font-style-complex="normal"/>
    </style:style>
    <style:style style:name="T467" style:family="text">
      <style:text-properties fo:font-style="normal" officeooo:rsid="088f223c" style:font-style-asian="normal" style:font-style-complex="normal"/>
    </style:style>
    <style:style style:name="T468" style:family="text">
      <style:text-properties style:font-name="Courier" fo:font-style="normal" officeooo:rsid="07199f3b" style:font-style-asian="normal" style:font-style-complex="normal"/>
    </style:style>
    <style:style style:name="T469" style:family="text">
      <style:text-properties style:font-name="Courier" fo:font-style="normal" officeooo:rsid="073b07ff" style:font-style-asian="normal" style:font-style-complex="normal"/>
    </style:style>
    <style:style style:name="T470" style:family="text">
      <style:text-properties officeooo:rsid="073b07ff"/>
    </style:style>
    <style:style style:name="T471" style:family="text">
      <style:text-properties style:font-name="Courier" officeooo:rsid="073b07ff"/>
    </style:style>
    <style:style style:name="T472" style:family="text">
      <style:text-properties officeooo:rsid="079460f9"/>
    </style:style>
    <style:style style:name="T473" style:family="text">
      <style:text-properties officeooo:rsid="07956789"/>
    </style:style>
    <style:style style:name="T474" style:family="text">
      <style:text-properties style:font-name="Courier" officeooo:rsid="07956789"/>
    </style:style>
    <style:style style:name="T475" style:family="text">
      <style:text-properties style:font-name="Courier" officeooo:rsid="0795c261"/>
    </style:style>
    <style:style style:name="T476" style:family="text">
      <style:text-properties officeooo:rsid="0405e429"/>
    </style:style>
    <style:style style:name="T477" style:family="text">
      <style:text-properties officeooo:rsid="0665d229"/>
    </style:style>
    <style:style style:name="T478" style:family="text">
      <style:text-properties officeooo:rsid="0801bff9"/>
    </style:style>
    <style:style style:name="T479" style:family="text">
      <style:text-properties fo:font-size="13pt" fo:font-style="normal" fo:font-weight="normal" officeooo:rsid="0405e429" style:font-size-asian="13pt" style:font-style-asian="normal" style:font-weight-asian="normal" style:font-size-complex="13pt" style:font-style-complex="normal" style:font-weight-complex="normal"/>
    </style:style>
    <style:style style:name="T480" style:family="text">
      <style:text-properties fo:font-size="13pt" fo:font-style="normal" fo:font-weight="normal" officeooo:rsid="0801bff9" style:font-size-asian="13pt" style:font-style-asian="normal" style:font-weight-asian="normal" style:font-size-complex="13pt" style:font-style-complex="normal" style:font-weight-complex="normal"/>
    </style:style>
    <style:style style:name="T481" style:family="text">
      <style:text-properties fo:font-size="13pt" fo:font-style="normal" fo:font-weight="normal" officeooo:rsid="081da6f3" style:font-size-asian="13pt" style:font-style-asian="normal" style:font-weight-asian="normal" style:font-size-complex="13pt" style:font-style-complex="normal" style:font-weight-complex="normal"/>
    </style:style>
    <style:style style:name="T482" style:family="text">
      <style:text-properties officeooo:rsid="043ccbbb"/>
    </style:style>
    <style:style style:name="T483" style:family="text">
      <style:text-properties officeooo:rsid="08283568"/>
    </style:style>
    <style:style style:name="T484" style:family="text">
      <style:text-properties fo:font-size="13pt" fo:font-style="normal" fo:font-weight="normal" officeooo:rsid="043ccbbb" style:font-size-asian="13pt" style:font-style-asian="normal" style:font-weight-asian="normal" style:font-size-complex="13pt" style:font-style-complex="normal" style:font-weight-complex="normal"/>
    </style:style>
    <style:style style:name="T485" style:family="text">
      <style:text-properties fo:font-size="13pt" fo:font-style="normal" fo:font-weight="normal" officeooo:rsid="088f223c" style:font-size-asian="13pt" style:font-style-asian="normal" style:font-weight-asian="normal" style:font-size-complex="13pt" style:font-style-complex="normal" style:font-weight-complex="normal"/>
    </style:style>
    <style:style style:name="T486" style:family="text">
      <style:text-properties fo:font-size="13pt" fo:font-style="normal" fo:font-weight="normal" officeooo:rsid="085fea43" style:font-size-asian="13pt" style:font-style-asian="normal" style:font-weight-asian="normal" style:font-size-complex="13pt" style:font-style-complex="normal" style:font-weight-complex="normal"/>
    </style:style>
    <style:style style:name="T487" style:family="text">
      <style:text-properties officeooo:rsid="086be570"/>
    </style:style>
    <style:style style:name="T488" style:family="text">
      <style:text-properties style:font-name="Courier" officeooo:rsid="086be570"/>
    </style:style>
    <style:style style:name="T489" style:family="text">
      <style:text-properties officeooo:rsid="001a636e"/>
    </style:style>
    <style:style style:name="T490" style:family="text">
      <style:text-properties officeooo:rsid="007885bf"/>
    </style:style>
    <style:style style:name="T491" style:family="text">
      <style:text-properties officeooo:rsid="00d77e21"/>
    </style:style>
    <style:style style:name="T492" style:family="text">
      <style:text-properties fo:font-size="13pt" fo:font-weight="normal" officeooo:rsid="008e351d" style:font-size-asian="13pt" style:font-weight-asian="normal" style:font-size-complex="13pt" style:font-weight-complex="normal"/>
    </style:style>
    <style:style style:name="T493" style:family="text">
      <style:text-properties fo:font-size="13pt" fo:font-weight="normal" officeooo:rsid="004af1a9" style:font-size-asian="13pt" style:font-weight-asian="normal" style:font-size-complex="13pt" style:font-weight-complex="normal"/>
    </style:style>
    <style:style style:name="T494" style:family="text">
      <style:text-properties style:font-name="Courier" fo:font-size="13pt" fo:font-weight="normal" officeooo:rsid="004af1a9" style:font-size-asian="13pt" style:font-weight-asian="normal" style:font-size-complex="13pt" style:font-weight-complex="normal"/>
    </style:style>
    <style:style style:name="T495" style:family="text">
      <style:text-properties style:font-name="Courier" fo:font-size="13pt" fo:font-weight="normal" officeooo:rsid="03fa0a83" style:font-size-asian="13pt" style:font-weight-asian="normal" style:font-size-complex="13pt" style:font-weight-complex="normal"/>
    </style:style>
    <style:style style:name="T496" style:family="text">
      <style:text-properties fo:font-weight="normal" officeooo:rsid="004c8410" style:font-weight-asian="normal" style:font-weight-complex="normal"/>
    </style:style>
    <style:style style:name="T497" style:family="text">
      <style:text-properties fo:font-weight="normal" officeooo:rsid="006864b9" style:font-weight-asian="normal" style:font-weight-complex="normal"/>
    </style:style>
    <style:style style:name="T498" style:family="text">
      <style:text-properties style:font-name="Courier" fo:font-weight="normal" officeooo:rsid="006864b9" style:font-weight-asian="normal" style:font-weight-complex="normal"/>
    </style:style>
    <style:style style:name="T499" style:family="text">
      <style:text-properties fo:font-weight="normal" officeooo:rsid="008dc2a5" style:font-weight-asian="normal" style:font-weight-complex="normal"/>
    </style:style>
    <style:style style:name="T500" style:family="text">
      <style:text-properties fo:font-weight="normal" officeooo:rsid="00dec05f" style:font-weight-asian="normal" style:font-weight-complex="normal"/>
    </style:style>
    <style:style style:name="T501" style:family="text">
      <style:text-properties fo:font-size="13pt" fo:font-weight="normal" officeooo:rsid="00234dd1" style:font-size-asian="13pt" style:font-weight-asian="normal" style:font-size-complex="13pt" style:font-weight-complex="normal"/>
    </style:style>
    <style:style style:name="T502" style:family="text">
      <style:text-properties fo:font-size="13pt" fo:font-weight="normal" officeooo:rsid="004c8410" style:font-size-asian="13pt" style:font-weight-asian="normal" style:font-size-complex="13pt" style:font-weight-complex="normal"/>
    </style:style>
    <style:style style:name="T503" style:family="text">
      <style:text-properties fo:font-size="13pt" fo:font-weight="normal" officeooo:rsid="00de071c" style:font-size-asian="13pt" style:font-weight-asian="normal" style:font-size-complex="13pt" style:font-weight-complex="normal"/>
    </style:style>
    <style:style style:name="T504" style:family="text">
      <style:text-properties style:font-name="Courier" fo:font-size="13pt" fo:font-weight="normal" officeooo:rsid="00de071c" style:font-size-asian="13pt" style:font-weight-asian="normal" style:font-size-complex="13pt" style:font-weight-complex="normal"/>
    </style:style>
    <style:style style:name="T505" style:family="text">
      <style:text-properties style:font-name="Courier" fo:font-size="13pt" fo:font-weight="normal" officeooo:rsid="014b0e74" style:font-size-asian="13pt" style:font-weight-asian="normal" style:font-size-complex="13pt" style:font-weight-complex="normal"/>
    </style:style>
    <style:style style:name="T506" style:family="text">
      <style:text-properties fo:font-size="13pt" fo:font-weight="normal" officeooo:rsid="014ba655" style:font-size-asian="13pt" style:font-weight-asian="normal" style:font-size-complex="13pt" style:font-weight-complex="normal"/>
    </style:style>
    <style:style style:name="T507" style:family="text">
      <style:text-properties fo:font-size="13pt" fo:font-weight="normal" officeooo:rsid="014b0e74" style:font-size-asian="13pt" style:font-weight-asian="normal" style:font-size-complex="13pt" style:font-weight-complex="normal"/>
    </style:style>
    <style:style style:name="T508" style:family="text">
      <style:text-properties fo:font-size="13pt" fo:font-weight="normal" officeooo:rsid="0166a333" style:font-size-asian="13pt" style:font-weight-asian="normal" style:font-size-complex="13pt" style:font-weight-complex="normal"/>
    </style:style>
    <style:style style:name="T509" style:family="text">
      <style:text-properties fo:font-size="13pt" fo:font-weight="normal" officeooo:rsid="0156e94b" style:font-size-asian="13pt" style:font-weight-asian="normal" style:font-size-complex="13pt" style:font-weight-complex="normal"/>
    </style:style>
    <style:style style:name="T510" style:family="text">
      <style:text-properties fo:font-size="13pt" fo:font-weight="normal" officeooo:rsid="014fb68a" style:font-size-asian="13pt" style:font-weight-asian="normal" style:font-size-complex="13pt" style:font-weight-complex="normal"/>
    </style:style>
    <style:style style:name="T511" style:family="text">
      <style:text-properties fo:font-size="13pt" fo:font-weight="normal" officeooo:rsid="0204cb2f" style:font-size-asian="13pt" style:font-weight-asian="normal" style:font-size-complex="13pt" style:font-weight-complex="normal"/>
    </style:style>
    <style:style style:name="T512" style:family="text">
      <style:text-properties fo:font-size="13pt" fo:font-weight="normal" officeooo:rsid="024aed47" style:font-size-asian="13pt" style:font-weight-asian="normal" style:font-size-complex="13pt" style:font-weight-complex="normal"/>
    </style:style>
    <style:style style:name="T513" style:family="text">
      <style:text-properties style:font-name="Courier" fo:font-size="13pt" fo:font-weight="normal" officeooo:rsid="014fb68a" style:font-size-asian="13pt" style:font-weight-asian="normal" style:font-size-complex="13pt" style:font-weight-complex="normal"/>
    </style:style>
    <style:style style:name="T514" style:family="text">
      <style:text-properties style:font-name="Courier" fo:font-size="13pt" fo:font-weight="normal" officeooo:rsid="024aed47" style:font-size-asian="13pt" style:font-weight-asian="normal" style:font-size-complex="13pt" style:font-weight-complex="normal"/>
    </style:style>
    <style:style style:name="T515" style:family="text">
      <style:text-properties fo:font-size="13pt" fo:font-weight="normal" officeooo:rsid="01518fbf" style:font-size-asian="13pt" style:font-weight-asian="normal" style:font-size-complex="13pt" style:font-weight-complex="normal"/>
    </style:style>
    <style:style style:name="T516" style:family="text">
      <style:text-properties fo:font-size="13pt" fo:font-weight="normal" officeooo:rsid="02d055ab" style:font-size-asian="13pt" style:font-weight-asian="normal" style:font-size-complex="13pt" style:font-weight-complex="normal"/>
    </style:style>
    <style:style style:name="T517" style:family="text">
      <style:text-properties fo:font-size="13pt" fo:font-weight="normal" officeooo:rsid="030ae4f6" style:font-size-asian="13pt" style:font-weight-asian="normal" style:font-size-complex="13pt" style:font-weight-complex="normal"/>
    </style:style>
    <style:style style:name="T518" style:family="text">
      <style:text-properties style:font-name="Courier" fo:font-size="13pt" fo:font-weight="normal" officeooo:rsid="01518fbf" style:font-size-asian="13pt" style:font-weight-asian="normal" style:font-size-complex="13pt" style:font-weight-complex="normal"/>
    </style:style>
    <style:style style:name="T519" style:family="text">
      <style:text-properties fo:font-size="13pt" fo:font-weight="normal" officeooo:rsid="0348836a" style:font-size-asian="13pt" style:font-weight-asian="normal" style:font-size-complex="13pt" style:font-weight-complex="normal"/>
    </style:style>
    <style:style style:name="T520" style:family="text">
      <style:text-properties style:font-name="Courier" fo:font-size="13pt" fo:font-weight="normal" officeooo:rsid="03492ce7" style:font-size-asian="13pt" style:font-weight-asian="normal" style:font-size-complex="13pt" style:font-weight-complex="normal"/>
    </style:style>
    <style:style style:name="T521" style:family="text">
      <style:text-properties style:use-window-font-color="true" loext:opacity="0%" fo:font-size="13pt" fo:font-weight="normal" officeooo:rsid="01518fbf" style:font-size-asian="13pt" style:font-weight-asian="normal" style:font-size-complex="13pt" style:font-weight-complex="normal"/>
    </style:style>
    <style:style style:name="T522" style:family="text">
      <style:text-properties style:use-window-font-color="true" loext:opacity="0%" fo:font-size="13pt" fo:font-weight="normal" officeooo:rsid="004c8410" style:font-size-asian="13pt" style:font-weight-asian="normal" style:font-size-complex="13pt" style:font-weight-complex="normal"/>
    </style:style>
    <style:style style:name="T523" style:family="text">
      <style:text-properties style:use-window-font-color="true" loext:opacity="0%" fo:font-size="13pt" fo:font-weight="normal" officeooo:rsid="02ceba75" style:font-size-asian="13pt" style:font-weight-asian="normal" style:font-size-complex="13pt" style:font-weight-complex="normal"/>
    </style:style>
    <style:style style:name="T524" style:family="text">
      <style:text-properties style:use-window-font-color="true" loext:opacity="0%" fo:font-size="13pt" fo:font-weight="normal" officeooo:rsid="03e21558" style:font-size-asian="13pt" style:font-weight-asian="normal" style:font-size-complex="13pt" style:font-weight-complex="normal"/>
    </style:style>
    <style:style style:name="T525" style:family="text">
      <style:text-properties style:use-window-font-color="true" loext:opacity="0%" fo:font-size="13pt" fo:font-weight="normal" officeooo:rsid="014fb68a" style:font-size-asian="13pt" style:font-weight-asian="normal" style:font-size-complex="13pt" style:font-weight-complex="normal"/>
    </style:style>
    <style:style style:name="T526" style:family="text">
      <style:text-properties style:use-window-font-color="true" loext:opacity="0%" fo:font-size="13pt" fo:font-weight="normal" officeooo:rsid="033f59ca" style:font-size-asian="13pt" style:font-weight-asian="normal" style:font-size-complex="13pt" style:font-weight-complex="normal"/>
    </style:style>
    <style:style style:name="T527" style:family="text">
      <style:text-properties style:use-window-font-color="true" loext:opacity="0%" style:font-name="Courier" fo:font-size="13pt" fo:font-weight="normal" officeooo:rsid="014fb68a" style:font-size-asian="13pt" style:font-weight-asian="normal" style:font-size-complex="13pt" style:font-weight-complex="normal"/>
    </style:style>
    <style:style style:name="T528" style:family="text">
      <style:text-properties style:use-window-font-color="true" loext:opacity="0%" style:font-name="Courier" fo:font-size="13pt" fo:font-weight="normal" officeooo:rsid="033f59ca" style:font-size-asian="13pt" style:font-weight-asian="normal" style:font-size-complex="13pt" style:font-weight-complex="normal"/>
    </style:style>
    <style:style style:name="T529" style:family="text">
      <style:text-properties fo:font-size="13pt" fo:font-weight="normal" officeooo:rsid="03f8cde5" style:font-size-asian="13pt" style:font-weight-asian="normal" style:font-size-complex="13pt" style:font-weight-complex="normal"/>
    </style:style>
    <style:style style:name="T530" style:family="text">
      <style:text-properties fo:font-size="13pt" fo:font-weight="normal" officeooo:rsid="04356ea4" style:font-size-asian="13pt" style:font-weight-asian="normal" style:font-size-complex="13pt" style:font-weight-complex="normal"/>
    </style:style>
    <style:style style:name="T531" style:family="text">
      <style:text-properties fo:font-size="13pt" fo:font-weight="normal" officeooo:rsid="04704c88" style:font-size-asian="13pt" style:font-weight-asian="normal" style:font-size-complex="13pt" style:font-weight-complex="normal"/>
    </style:style>
    <style:style style:name="T532" style:family="text">
      <style:text-properties fo:font-size="13pt" fo:font-weight="normal" officeooo:rsid="0474bcc3" style:font-size-asian="13pt" style:font-weight-asian="normal" style:font-size-complex="13pt" style:font-weight-complex="normal"/>
    </style:style>
    <style:style style:name="T533" style:family="text">
      <style:text-properties fo:font-size="13pt" fo:font-weight="normal" officeooo:rsid="045a9dda" style:font-size-asian="13pt" style:font-weight-asian="normal" style:font-size-complex="13pt" style:font-weight-complex="normal"/>
    </style:style>
    <style:style style:name="T534" style:family="text">
      <style:text-properties fo:font-size="13pt" fo:font-weight="normal" officeooo:rsid="04b4df36" style:font-size-asian="13pt" style:font-weight-asian="normal" style:font-size-complex="13pt" style:font-weight-complex="normal"/>
    </style:style>
    <style:style style:name="T535" style:family="text">
      <style:text-properties style:use-window-font-color="true" loext:opacity="0%" style:font-name="Liberation Serif" fo:font-size="13pt" fo:font-weight="normal" officeooo:rsid="01fe0cb9" style:font-size-asian="13pt" style:font-weight-asian="normal" style:font-size-complex="13pt" style:font-weight-complex="normal"/>
    </style:style>
    <style:style style:name="T536" style:family="text">
      <style:text-properties style:use-window-font-color="true" loext:opacity="0%" style:font-name="Liberation Serif" fo:font-size="13pt" fo:font-weight="normal" officeooo:rsid="0634b71e" style:font-size-asian="13pt" style:font-weight-asian="normal" style:font-size-complex="13pt" style:font-weight-complex="normal"/>
    </style:style>
    <style:style style:name="T537" style:family="text">
      <style:text-properties style:use-window-font-color="true" loext:opacity="0%" style:font-name="Courier" fo:font-size="13pt" fo:font-weight="normal" officeooo:rsid="060fb7bd" style:font-size-asian="13pt" style:font-weight-asian="normal" style:font-size-complex="13pt" style:font-weight-complex="normal"/>
    </style:style>
    <style:style style:name="T538" style:family="text">
      <style:text-properties fo:font-size="13pt" fo:font-weight="normal" officeooo:rsid="0634b71e" style:font-size-asian="13pt" style:font-weight-asian="normal" style:font-size-complex="13pt" style:font-weight-complex="normal"/>
    </style:style>
    <style:style style:name="T539" style:family="text">
      <style:text-properties fo:font-size="13pt" fo:font-weight="normal" officeooo:rsid="05b550d4" style:font-size-asian="13pt" style:font-weight-asian="normal" style:font-size-complex="13pt" style:font-weight-complex="normal"/>
    </style:style>
    <style:style style:name="T540" style:family="text">
      <style:text-properties fo:font-size="13pt" fo:font-weight="normal" officeooo:rsid="064c0b8d" style:font-size-asian="13pt" style:font-weight-asian="normal" style:font-size-complex="13pt" style:font-weight-complex="normal"/>
    </style:style>
    <style:style style:name="T541" style:family="text">
      <style:text-properties fo:font-size="13pt" fo:font-weight="normal" officeooo:rsid="0712497a" style:font-size-asian="13pt" style:font-weight-asian="normal" style:font-size-complex="13pt" style:font-weight-complex="normal"/>
    </style:style>
    <style:style style:name="T542" style:family="text">
      <style:text-properties style:use-window-font-color="true" loext:opacity="0%" style:font-name="Liberation Serif" fo:font-size="13pt" fo:font-weight="normal" officeooo:rsid="02a1a47b" style:font-size-asian="13pt" style:font-weight-asian="normal" style:font-size-complex="13pt" style:font-weight-complex="normal"/>
    </style:style>
    <style:style style:name="T543" style:family="text">
      <style:text-properties style:use-window-font-color="true" loext:opacity="0%" style:font-name="Liberation Serif" fo:font-size="13pt" fo:font-weight="normal" officeooo:rsid="07859e8c" style:font-size-asian="13pt" style:font-weight-asian="normal" style:font-size-complex="13pt" style:font-weight-complex="normal"/>
    </style:style>
    <style:style style:name="T544" style:family="text">
      <style:text-properties style:use-window-font-color="true" loext:opacity="0%" style:font-name="Liberation Serif" fo:font-size="13pt" fo:font-weight="normal" officeooo:rsid="07144a15" style:font-size-asian="13pt" style:font-weight-asian="normal" style:font-size-complex="13pt" style:font-weight-complex="normal"/>
    </style:style>
    <style:style style:name="T545" style:family="text">
      <style:text-properties style:use-window-font-color="true" loext:opacity="0%" style:font-name="Liberation Serif" fo:font-size="13pt" fo:font-weight="normal" officeooo:rsid="07149684" style:font-size-asian="13pt" style:font-weight-asian="normal" style:font-size-complex="13pt" style:font-weight-complex="normal"/>
    </style:style>
    <style:style style:name="T546" style:family="text">
      <style:text-properties style:use-window-font-color="true" loext:opacity="0%" style:font-name="Liberation Serif" fo:font-size="13pt" fo:font-weight="normal" officeooo:rsid="0787281f" style:font-size-asian="13pt" style:font-weight-asian="normal" style:font-size-complex="13pt" style:font-weight-complex="normal"/>
    </style:style>
    <style:style style:name="T547" style:family="text">
      <style:text-properties fo:font-size="13pt" fo:font-weight="normal" officeooo:rsid="078aa5bb" style:font-size-asian="13pt" style:font-weight-asian="normal" style:font-size-complex="13pt" style:font-weight-complex="normal"/>
    </style:style>
    <style:style style:name="T548" style:family="text">
      <style:text-properties fo:font-size="13pt" fo:font-weight="normal" officeooo:rsid="07fc7058" style:font-size-asian="13pt" style:font-weight-asian="normal" style:font-size-complex="13pt" style:font-weight-complex="normal"/>
    </style:style>
    <style:style style:name="T549" style:family="text">
      <style:text-properties style:use-window-font-color="true" loext:opacity="0%" fo:font-size="13pt" fo:font-weight="normal" officeooo:rsid="07c7d7d9" style:font-size-asian="13pt" style:font-weight-asian="normal" style:font-size-complex="13pt" style:font-weight-complex="normal"/>
    </style:style>
    <style:style style:name="T550" style:family="text">
      <style:text-properties style:use-window-font-color="true" loext:opacity="0%" fo:font-size="13pt" fo:font-weight="normal" officeooo:rsid="08468d70" style:font-size-asian="13pt" style:font-weight-asian="normal" style:font-size-complex="13pt" style:font-weight-complex="normal"/>
    </style:style>
    <style:style style:name="T551" style:family="text">
      <style:text-properties style:use-window-font-color="true" loext:opacity="0%" fo:font-size="13pt" fo:font-weight="normal" officeooo:rsid="0809a0b3" style:font-size-asian="13pt" style:font-weight-asian="normal" style:font-size-complex="13pt" style:font-weight-complex="normal"/>
    </style:style>
    <style:style style:name="T552" style:family="text">
      <style:text-properties style:use-window-font-color="true" loext:opacity="0%" style:font-name="Courier" fo:font-size="13pt" fo:font-weight="normal" officeooo:rsid="08468d70" style:font-size-asian="13pt" style:font-weight-asian="normal" style:font-size-complex="13pt" style:font-weight-complex="normal"/>
    </style:style>
    <style:style style:name="T553" style:family="text">
      <style:text-properties style:use-window-font-color="true" loext:opacity="0%" style:font-name="Courier" fo:font-size="13pt" fo:font-weight="normal" officeooo:rsid="08488214" style:font-size-asian="13pt" style:font-weight-asian="normal" style:font-size-complex="13pt" style:font-weight-complex="normal"/>
    </style:style>
    <style:style style:name="T554" style:family="text">
      <style:text-properties style:use-window-font-color="true" loext:opacity="0%" officeooo:rsid="07c7d7d9"/>
    </style:style>
    <style:style style:name="T555" style:family="text">
      <style:text-properties style:use-window-font-color="true" loext:opacity="0%" officeooo:rsid="085b7131"/>
    </style:style>
    <style:style style:name="T556" style:family="text">
      <style:text-properties style:use-window-font-color="true" loext:opacity="0%" officeooo:rsid="0809a0b3"/>
    </style:style>
    <style:style style:name="T557" style:family="text">
      <style:text-properties style:use-window-font-color="true" loext:opacity="0%" style:font-name="Courier" officeooo:rsid="085b7131"/>
    </style:style>
    <style:style style:name="T558" style:family="text">
      <style:text-properties officeooo:rsid="07c7d7d9"/>
    </style:style>
    <style:style style:name="T559" style:family="text">
      <style:text-properties officeooo:rsid="08885293"/>
    </style:style>
    <style:style style:name="T560" style:family="text">
      <style:text-properties officeooo:rsid="0809a0b3"/>
    </style:style>
    <style:style style:name="T561" style:family="text">
      <style:text-properties style:font-name="Courier" officeooo:rsid="08885293"/>
    </style:style>
    <style:style style:name="T562" style:family="text">
      <style:text-properties fo:font-size="13pt" fo:font-weight="normal" officeooo:rsid="08885293" style:font-size-asian="13pt" style:font-weight-asian="normal" style:font-size-complex="13pt" style:font-weight-complex="normal"/>
    </style:style>
    <style:style style:name="T563" style:family="text">
      <style:text-properties fo:font-size="13pt" fo:font-weight="normal" officeooo:rsid="08ebbca1" style:font-size-asian="13pt" style:font-weight-asian="normal" style:font-size-complex="13pt" style:font-weight-complex="normal"/>
    </style:style>
    <style:style style:name="T564" style:family="text">
      <style:text-properties style:font-name="Courier" fo:font-size="13pt" fo:font-weight="normal" officeooo:rsid="08885293" style:font-size-asian="13pt" style:font-weight-asian="normal" style:font-size-complex="13pt" style:font-weight-complex="normal"/>
    </style:style>
    <style:style style:name="T565" style:family="text">
      <style:text-properties style:font-name="Courier" fo:font-size="13pt" fo:font-weight="normal" officeooo:rsid="08e247f7" style:font-size-asian="13pt" style:font-weight-asian="normal" style:font-size-complex="13pt" style:font-weight-complex="normal"/>
    </style:style>
    <style:style style:name="T566" style:family="text">
      <style:text-properties fo:font-size="13pt" fo:font-weight="normal" officeooo:rsid="08e247f7" style:font-size-asian="13pt" style:font-weight-asian="normal" style:font-size-complex="13pt" style:font-weight-complex="normal"/>
    </style:style>
    <style:style style:name="T567" style:family="text">
      <style:text-properties style:font-name="Courier" fo:font-size="13pt" fo:font-weight="normal" officeooo:rsid="08ebbca1" style:font-size-asian="13pt" style:font-weight-asian="normal" style:font-size-complex="13pt" style:font-weight-complex="normal"/>
    </style:style>
    <style:style style:name="T568" style:family="text">
      <style:text-properties fo:font-size="13pt" fo:font-weight="normal" officeooo:rsid="08ebcc25" style:font-size-asian="13pt" style:font-weight-asian="normal" style:font-size-complex="13pt" style:font-weight-complex="normal"/>
    </style:style>
    <style:style style:name="T569" style:family="text">
      <style:text-properties fo:font-size="13pt" fo:font-weight="normal" officeooo:rsid="08904239" style:font-size-asian="13pt" style:font-weight-asian="normal" style:font-size-complex="13pt" style:font-weight-complex="normal"/>
    </style:style>
    <style:style style:name="T570" style:family="text">
      <style:text-properties fo:font-size="13pt" fo:font-weight="normal" officeooo:rsid="08fa6f82" style:font-size-asian="13pt" style:font-weight-asian="normal" style:font-size-complex="13pt" style:font-weight-complex="normal"/>
    </style:style>
    <style:style style:name="T571" style:family="text">
      <style:text-properties fo:font-size="13pt" fo:font-weight="normal" officeooo:rsid="09140800" style:font-size-asian="13pt" style:font-weight-asian="normal" style:font-size-complex="13pt" style:font-weight-complex="normal"/>
    </style:style>
    <style:style style:name="T572" style:family="text">
      <style:text-properties style:font-name="Courier" fo:font-size="13pt" fo:font-weight="normal" officeooo:rsid="09211f6d" style:font-size-asian="13pt" style:font-weight-asian="normal" style:font-size-complex="13pt" style:font-weight-complex="normal"/>
    </style:style>
    <style:style style:name="T573" style:family="text">
      <style:text-properties style:font-name="Courier" fo:font-size="13pt" fo:font-weight="normal" officeooo:rsid="0919c9db" style:font-size-asian="13pt" style:font-weight-asian="normal" style:font-size-complex="13pt" style:font-weight-complex="normal"/>
    </style:style>
    <style:style style:name="T574" style:family="text">
      <style:text-properties officeooo:rsid="08ebcc25"/>
    </style:style>
    <style:style style:name="T575" style:family="text">
      <style:text-properties officeooo:rsid="09140800"/>
    </style:style>
    <style:style style:name="T576" style:family="text">
      <style:text-properties officeooo:rsid="09042dd4"/>
    </style:style>
    <style:style style:name="T577" style:family="text">
      <style:text-properties officeooo:rsid="08904239"/>
    </style:style>
    <style:style style:name="T578" style:family="text">
      <style:text-properties style:font-name="Courier" officeooo:rsid="09042dd4"/>
    </style:style>
    <style:style style:name="T579" style:family="text">
      <style:text-properties fo:font-size="13pt" fo:font-weight="normal" officeooo:rsid="09042dd4" style:font-size-asian="13pt" style:font-weight-asian="normal" style:font-size-complex="13pt" style:font-weight-complex="normal"/>
    </style:style>
    <style:style style:name="T580" style:family="text">
      <style:text-properties style:font-name="Courier" fo:font-size="13pt" fo:font-weight="normal" officeooo:rsid="09042dd4" style:font-size-asian="13pt" style:font-weight-asian="normal" style:font-size-complex="13pt" style:font-weight-complex="normal"/>
    </style:style>
    <style:style style:name="T581" style:family="text">
      <style:text-properties officeooo:rsid="094d63ad"/>
    </style:style>
    <style:style style:name="T582" style:family="text">
      <style:text-properties style:font-name="Courier" officeooo:rsid="092524a0"/>
    </style:style>
    <style:style style:name="T583" style:family="text">
      <style:text-properties style:font-name="Courier" officeooo:rsid="094d63ad"/>
    </style:style>
    <style:style style:name="T584" style:family="text">
      <style:text-properties officeooo:rsid="098e363e"/>
    </style:style>
    <style:style style:name="T585" style:family="text">
      <style:text-properties officeooo:rsid="097a24a1"/>
    </style:style>
    <style:style style:name="T586" style:family="text">
      <style:text-properties fo:font-weight="normal" officeooo:rsid="097a24a1" style:font-weight-asian="normal" style:font-weight-complex="normal"/>
    </style:style>
    <style:style style:name="T587" style:family="text">
      <style:text-properties fo:font-weight="normal" officeooo:rsid="097fe33b" style:font-weight-asian="normal" style:font-weight-complex="normal"/>
    </style:style>
    <style:style style:name="T588" style:family="text">
      <style:text-properties fo:font-size="13pt" fo:font-weight="normal" officeooo:rsid="098e363e" style:font-size-asian="13pt" style:font-weight-asian="normal" style:font-size-complex="13pt" style:font-weight-complex="normal"/>
    </style:style>
    <style:style style:name="T589" style:family="text">
      <style:text-properties fo:font-size="13pt" fo:font-weight="normal" officeooo:rsid="09ccd5c2" style:font-size-asian="13pt" style:font-weight-asian="normal" style:font-size-complex="13pt" style:font-weight-complex="normal"/>
    </style:style>
    <style:style style:name="T590" style:family="text">
      <style:text-properties officeooo:rsid="09cb8809"/>
    </style:style>
    <style:style style:name="T591" style:family="text">
      <style:text-properties style:font-name="Courier" officeooo:rsid="097fe33b"/>
    </style:style>
    <style:style style:name="T592" style:family="text">
      <style:text-properties style:font-name="Courier" officeooo:rsid="09cb8809"/>
    </style:style>
    <style:style style:name="T593" style:family="text">
      <style:text-properties fo:font-size="13pt" fo:font-weight="normal" officeooo:rsid="09ce7a96" style:font-size-asian="13pt" style:font-weight-asian="normal" style:font-size-complex="13pt" style:font-weight-complex="normal"/>
    </style:style>
    <style:style style:name="T594" style:family="text">
      <style:text-properties fo:font-size="13pt" fo:font-weight="normal" officeooo:rsid="09ee1102" style:font-size-asian="13pt" style:font-weight-asian="normal" style:font-size-complex="13pt" style:font-weight-complex="normal"/>
    </style:style>
    <style:style style:name="T595" style:family="text">
      <style:text-properties style:font-name="Courier" fo:font-size="13pt" fo:font-weight="normal" officeooo:rsid="09cb8809" style:font-size-asian="13pt" style:font-weight-asian="normal" style:font-size-complex="13pt" style:font-weight-complex="normal"/>
    </style:style>
    <style:style style:name="T596" style:family="text">
      <style:text-properties fo:font-size="13pt" fo:font-weight="normal" officeooo:rsid="09c5238a" style:font-size-asian="13pt" style:font-weight-asian="normal" style:font-size-complex="13pt" style:font-weight-complex="normal"/>
    </style:style>
    <style:style style:name="T597" style:family="text">
      <style:text-properties fo:font-size="13pt" fo:font-weight="normal" officeooo:rsid="09c7f084" style:font-size-asian="13pt" style:font-weight-asian="normal" style:font-size-complex="13pt" style:font-weight-complex="normal"/>
    </style:style>
    <style:style style:name="T598" style:family="text">
      <style:text-properties fo:font-size="13pt" fo:font-weight="normal" officeooo:rsid="09c3b51b" style:font-size-asian="13pt" style:font-weight-asian="normal" style:font-size-complex="13pt" style:font-weight-complex="normal"/>
    </style:style>
    <style:style style:name="T599" style:family="text">
      <style:text-properties style:font-name="Courier" fo:font-size="13pt" fo:font-weight="normal" officeooo:rsid="09c9e7ef" style:font-size-asian="13pt" style:font-weight-asian="normal" style:font-size-complex="13pt" style:font-weight-complex="normal"/>
    </style:style>
    <style:style style:name="T600" style:family="text">
      <style:text-properties fo:font-size="13pt" fo:font-weight="normal" officeooo:rsid="09c71189" style:font-size-asian="13pt" style:font-weight-asian="normal" style:font-size-complex="13pt" style:font-weight-complex="normal"/>
    </style:style>
    <style:style style:name="T601" style:family="text">
      <style:text-properties fo:font-size="13pt" fo:font-weight="normal" officeooo:rsid="0a6ff7e2" style:font-size-asian="13pt" style:font-weight-asian="normal" style:font-size-complex="13pt" style:font-weight-complex="normal"/>
    </style:style>
    <style:style style:name="T602" style:family="text">
      <style:text-properties fo:font-size="13pt" fo:font-weight="normal" officeooo:rsid="0a8490f2" style:font-size-asian="13pt" style:font-weight-asian="normal" style:font-size-complex="13pt" style:font-weight-complex="normal"/>
    </style:style>
    <style:style style:name="T603" style:family="text">
      <style:text-properties style:font-name="Courier" fo:font-size="13pt" fo:font-weight="normal" officeooo:rsid="0a8490f2" style:font-size-asian="13pt" style:font-weight-asian="normal" style:font-size-complex="13pt" style:font-weight-complex="normal"/>
    </style:style>
    <style:style style:name="T604" style:family="text">
      <style:text-properties officeooo:rsid="09c71189"/>
    </style:style>
    <style:style style:name="T605" style:family="text">
      <style:text-properties officeooo:rsid="006bb723"/>
    </style:style>
    <style:style style:name="T606" style:family="text">
      <style:text-properties style:use-window-font-color="true" loext:opacity="0%" officeooo:rsid="052baf14"/>
    </style:style>
    <style:style style:name="T607" style:family="text">
      <style:text-properties style:use-window-font-color="true" loext:opacity="0%" officeooo:rsid="0bd69f2b"/>
    </style:style>
    <style:style style:name="T608" style:family="text">
      <style:text-properties style:use-window-font-color="true" loext:opacity="0%" style:font-name="Courier" officeooo:rsid="052baf14"/>
    </style:style>
    <style:style style:name="T609" style:family="text">
      <style:text-properties style:use-window-font-color="true" loext:opacity="0%" officeooo:rsid="0ab79033"/>
    </style:style>
    <style:style style:name="T610" style:family="text">
      <style:text-properties officeooo:rsid="00064ed3"/>
    </style:style>
    <style:style style:name="T611" style:family="text">
      <style:text-properties style:font-name="Courier" officeooo:rsid="0ab79033"/>
    </style:style>
    <style:style style:name="T612" style:family="text">
      <style:text-properties style:font-name="Courier" officeooo:rsid="0ab90c98"/>
    </style:style>
    <style:style style:name="T613" style:family="text">
      <style:text-properties style:use-window-font-color="true" loext:opacity="0%" fo:font-size="13pt" fo:font-weight="normal" officeooo:rsid="052baf14" style:font-size-asian="13pt" style:font-weight-asian="normal" style:font-size-complex="13pt" style:font-weight-complex="normal"/>
    </style:style>
    <style:style style:name="T614" style:family="text">
      <style:text-properties style:use-window-font-color="true" loext:opacity="0%" fo:font-size="13pt" fo:font-weight="normal" officeooo:rsid="0bd69f2b" style:font-size-asian="13pt" style:font-weight-asian="normal" style:font-size-complex="13pt" style:font-weight-complex="normal"/>
    </style:style>
    <style:style style:name="T615" style:family="text">
      <style:text-properties style:use-window-font-color="true" loext:opacity="0%" fo:font-size="13pt" fo:font-weight="normal" officeooo:rsid="0ac2672e" style:font-size-asian="13pt" style:font-weight-asian="normal" style:font-size-complex="13pt" style:font-weight-complex="normal"/>
    </style:style>
    <style:style style:name="T616" style:family="text">
      <style:text-properties style:use-window-font-color="true" loext:opacity="0%" fo:font-size="13pt" fo:font-weight="normal" officeooo:rsid="0ac0eedd" style:font-size-asian="13pt" style:font-weight-asian="normal" style:font-size-complex="13pt" style:font-weight-complex="normal"/>
    </style:style>
    <style:style style:name="T617" style:family="text">
      <style:text-properties fo:font-size="13pt" fo:font-weight="normal" officeooo:rsid="00064ed3" style:font-size-asian="13pt" style:font-weight-asian="normal" style:font-size-complex="13pt" style:font-weight-complex="normal"/>
    </style:style>
    <style:style style:name="T618" style:family="text">
      <style:text-properties fo:font-size="13pt" fo:font-weight="normal" officeooo:rsid="0ac0eedd" style:font-size-asian="13pt" style:font-weight-asian="normal" style:font-size-complex="13pt" style:font-weight-complex="normal"/>
    </style:style>
    <style:style style:name="T619" style:family="text">
      <style:text-properties style:font-name="Courier" fo:font-size="13pt" fo:font-weight="normal" officeooo:rsid="0ab90c98" style:font-size-asian="13pt" style:font-weight-asian="normal" style:font-size-complex="13pt" style:font-weight-complex="normal"/>
    </style:style>
    <style:style style:name="T620" style:family="text">
      <style:text-properties style:font-name="Courier" fo:font-size="13pt" fo:font-weight="normal" officeooo:rsid="0ac2672e" style:font-size-asian="13pt" style:font-weight-asian="normal" style:font-size-complex="13pt" style:font-weight-complex="normal"/>
    </style:style>
    <style:style style:name="T621" style:family="text">
      <style:text-properties style:font-name="Courier" fo:font-size="13pt" fo:font-weight="normal" officeooo:rsid="0c92c8fd" style:font-size-asian="13pt" style:font-weight-asian="normal" style:font-size-complex="13pt" style:font-weight-complex="normal"/>
    </style:style>
    <style:style style:name="T622" style:family="text">
      <style:text-properties style:use-window-font-color="true" loext:opacity="0%" fo:font-size="13pt" fo:font-weight="normal" officeooo:rsid="0af7d8f8" style:font-size-asian="13pt" style:font-weight-asian="normal" style:font-size-complex="13pt" style:font-weight-complex="normal"/>
    </style:style>
    <style:style style:name="T623" style:family="text">
      <style:text-properties style:use-window-font-color="true" loext:opacity="0%" fo:font-size="13pt" fo:font-weight="normal" officeooo:rsid="0ae44914" style:font-size-asian="13pt" style:font-weight-asian="normal" style:font-size-complex="13pt" style:font-weight-complex="normal"/>
    </style:style>
    <style:style style:name="T624" style:family="text">
      <style:text-properties style:font-name="Courier" fo:font-size="13pt" fo:font-weight="normal" officeooo:rsid="0ae44914" style:font-size-asian="13pt" style:font-weight-asian="normal" style:font-size-complex="13pt" style:font-weight-complex="normal"/>
    </style:style>
    <style:style style:name="T625" style:family="text">
      <style:text-properties style:font-name="Courier" fo:font-size="13pt" fo:font-weight="normal" officeooo:rsid="0ae49cca" style:font-size-asian="13pt" style:font-weight-asian="normal" style:font-size-complex="13pt" style:font-weight-complex="normal"/>
    </style:style>
    <style:style style:name="T626" style:family="text">
      <style:text-properties fo:font-size="13pt" fo:font-weight="normal" officeooo:rsid="0bd69f2b" style:font-size-asian="13pt" style:font-weight-asian="normal" style:font-size-complex="13pt" style:font-weight-complex="normal"/>
    </style:style>
    <style:style style:name="T627" style:family="text">
      <style:text-properties style:use-window-font-color="true" loext:opacity="0%" officeooo:rsid="0ae44914"/>
    </style:style>
    <style:style style:name="T628" style:family="text">
      <style:text-properties style:use-window-font-color="true" loext:opacity="0%" officeooo:rsid="0b4c7da5"/>
    </style:style>
    <style:style style:name="T629" style:family="text">
      <style:text-properties style:use-window-font-color="true" loext:opacity="0%" style:font-name="Courier" officeooo:rsid="0af7d8f8"/>
    </style:style>
    <style:style style:name="T630" style:family="text">
      <style:text-properties style:use-window-font-color="true" loext:opacity="0%" style:font-name="Courier" officeooo:rsid="0b4c7da5"/>
    </style:style>
    <style:style style:name="T631" style:family="text">
      <style:text-properties style:use-window-font-color="true" loext:opacity="0%" officeooo:rsid="0af7d8f8"/>
    </style:style>
    <style:style style:name="T632" style:family="text">
      <style:text-properties style:use-window-font-color="true" loext:opacity="0%" fo:font-size="13pt" fo:font-weight="normal" officeooo:rsid="0b88cc35" style:font-size-asian="13pt" style:font-weight-asian="normal" style:font-size-complex="13pt" style:font-weight-complex="normal"/>
    </style:style>
    <style:style style:name="T633" style:family="text">
      <style:text-properties style:use-window-font-color="true" loext:opacity="0%" fo:font-size="13pt" fo:font-weight="normal" officeooo:rsid="0b4c7da5" style:font-size-asian="13pt" style:font-weight-asian="normal" style:font-size-complex="13pt" style:font-weight-complex="normal"/>
    </style:style>
    <style:style style:name="T634" style:family="text">
      <style:text-properties style:use-window-font-color="true" loext:opacity="0%" style:font-name="Courier" fo:font-size="13pt" fo:font-weight="normal" officeooo:rsid="0af7d8f8" style:font-size-asian="13pt" style:font-weight-asian="normal" style:font-size-complex="13pt" style:font-weight-complex="normal"/>
    </style:style>
    <style:style style:name="T635" style:family="text">
      <style:text-properties style:use-window-font-color="true" loext:opacity="0%" style:font-name="Courier" fo:font-size="13pt" fo:font-weight="normal" officeooo:rsid="0b88cc35" style:font-size-asian="13pt" style:font-weight-asian="normal" style:font-size-complex="13pt" style:font-weight-complex="normal"/>
    </style:style>
    <style:style style:name="T636" style:family="text">
      <style:text-properties officeooo:rsid="0bd69f2b"/>
    </style:style>
    <style:style style:name="T637" style:family="text">
      <style:text-properties officeooo:rsid="0b9efa32"/>
    </style:style>
    <style:style style:name="T638" style:family="text">
      <style:text-properties style:use-window-font-color="true" loext:opacity="0%" fo:font-size="13pt" fo:font-weight="normal" officeooo:rsid="0b9d1b1b" style:font-size-asian="13pt" style:font-weight-asian="normal" style:font-size-complex="13pt" style:font-weight-complex="normal"/>
    </style:style>
    <style:style style:name="T639" style:family="text">
      <style:text-properties style:use-window-font-color="true" loext:opacity="0%" fo:font-size="13pt" fo:font-weight="normal" officeooo:rsid="0bf57559" style:font-size-asian="13pt" style:font-weight-asian="normal" style:font-size-complex="13pt" style:font-weight-complex="normal"/>
    </style:style>
    <style:style style:name="T640" style:family="text">
      <style:text-properties style:use-window-font-color="true" loext:opacity="0%" style:font-name="Courier" fo:font-size="13pt" fo:font-weight="normal" officeooo:rsid="0b9d1b1b" style:font-size-asian="13pt" style:font-weight-asian="normal" style:font-size-complex="13pt" style:font-weight-complex="normal"/>
    </style:style>
    <style:style style:name="T641" style:family="text">
      <style:text-properties officeooo:rsid="0c28311d"/>
    </style:style>
    <style:style style:name="T642" style:family="text">
      <style:text-properties officeooo:rsid="0ca69737"/>
    </style:style>
    <style:style style:name="T643" style:family="text">
      <style:text-properties officeooo:rsid="0c2ddbb8"/>
    </style:style>
    <style:style style:name="T644" style:family="text">
      <style:text-properties style:use-window-font-color="true" loext:opacity="0%" fo:font-size="13pt" fo:font-weight="normal" officeooo:rsid="0b9efa32" style:font-size-asian="13pt" style:font-weight-asian="normal" style:font-size-complex="13pt" style:font-weight-complex="normal"/>
    </style:style>
    <style:style style:name="T645" style:family="text">
      <style:text-properties style:use-window-font-color="true" loext:opacity="0%" fo:font-size="13pt" fo:font-weight="normal" officeooo:rsid="0ca69737" style:font-size-asian="13pt" style:font-weight-asian="normal" style:font-size-complex="13pt" style:font-weight-complex="normal"/>
    </style:style>
    <style:style style:name="T646" style:family="text">
      <style:text-properties style:use-window-font-color="true" loext:opacity="0%" fo:font-size="13pt" fo:font-weight="normal" officeooo:rsid="0c2ddbb8" style:font-size-asian="13pt" style:font-weight-asian="normal" style:font-size-complex="13pt" style:font-weight-complex="normal"/>
    </style:style>
    <style:style style:name="T647" style:family="text">
      <style:text-properties style:font-name="Courier" fo:font-size="13pt" officeooo:rsid="0b9d1b1b" style:font-size-asian="11.3500003814697pt" style:font-size-complex="13pt"/>
    </style:style>
    <style:style style:name="T648" style:family="text">
      <style:text-properties officeooo:rsid="0c98db93"/>
    </style:style>
    <style:style style:name="T649" style:family="text">
      <style:text-properties style:use-window-font-color="true" loext:opacity="0%" fo:font-size="13pt" fo:font-weight="normal" officeooo:rsid="0c28311d" style:font-size-asian="13pt" style:font-weight-asian="normal" style:font-size-complex="13pt" style:font-weight-complex="normal"/>
    </style:style>
    <style:style style:name="T650" style:family="text">
      <style:text-properties style:use-window-font-color="true" loext:opacity="0%" fo:font-size="13pt" fo:font-weight="normal" officeooo:rsid="0c98db93" style:font-size-asian="13pt" style:font-weight-asian="normal" style:font-size-complex="13pt" style:font-weight-complex="normal"/>
    </style:style>
    <style:style style:name="T651" style:family="text">
      <style:text-properties officeooo:rsid="0d0709dc"/>
    </style:style>
    <style:style style:name="T652" style:family="text">
      <style:text-properties style:use-window-font-color="true" loext:opacity="0%" officeooo:rsid="0cfab8ec"/>
    </style:style>
    <style:style style:name="T653" style:family="text">
      <style:text-properties style:use-window-font-color="true" loext:opacity="0%" fo:font-weight="normal" officeooo:rsid="0cfab8ec" style:font-weight-asian="normal" style:font-weight-complex="normal"/>
    </style:style>
    <style:style style:name="T654" style:family="text">
      <style:text-properties style:font-name="Courier" officeooo:rsid="0b9d1b1b"/>
    </style:style>
    <style:style style:name="T655" style:family="text">
      <style:text-properties style:use-window-font-color="true" loext:opacity="0%" style:font-name="Liberation Serif" fo:font-size="13pt" fo:font-weight="normal" officeooo:rsid="0cfab8ec" style:font-size-asian="13pt" style:font-weight-asian="normal" style:font-size-complex="13pt" style:font-weight-complex="normal"/>
    </style:style>
    <style:style style:name="T656" style:family="text">
      <style:text-properties style:use-window-font-color="true" loext:opacity="0%" style:font-name="Liberation Serif" fo:font-size="13pt" fo:font-weight="normal" officeooo:rsid="0d0551c3" style:font-size-asian="13pt" style:font-weight-asian="normal" style:font-size-complex="13pt" style:font-weight-complex="normal"/>
    </style:style>
    <style:style style:name="T657" style:family="text">
      <style:text-properties style:use-window-font-color="true" loext:opacity="0%" style:font-name="Liberation Serif" fo:font-size="13pt" fo:font-weight="normal" officeooo:rsid="0d185951" style:font-size-asian="13pt" style:font-weight-asian="normal" style:font-size-complex="13pt" style:font-weight-complex="normal"/>
    </style:style>
    <style:style style:name="T658" style:family="text">
      <style:text-properties style:use-window-font-color="true" loext:opacity="0%" style:font-name="Courier" fo:font-size="13pt" fo:font-weight="normal" officeooo:rsid="0d094322" style:font-size-asian="13pt" style:font-weight-asian="normal" style:font-size-complex="13pt" style:font-weight-complex="normal"/>
    </style:style>
    <style:style style:name="T659" style:family="text">
      <style:text-properties style:use-window-font-color="true" loext:opacity="0%" style:font-name="Liberation Serif" fo:font-size="13pt" fo:font-weight="normal" officeooo:rsid="0d094322" style:font-size-asian="13pt" style:font-weight-asian="normal" style:font-size-complex="13pt" style:font-weight-complex="normal"/>
    </style:style>
    <style:style style:name="T660" style:family="text">
      <style:text-properties style:font-name="Courier" fo:font-size="13pt" fo:font-weight="normal" officeooo:rsid="0b9d1b1b" style:font-size-asian="11.3500003814697pt" style:font-weight-asian="normal" style:font-size-complex="13pt" style:font-weight-complex="normal"/>
    </style:style>
    <style:style style:name="T661" style:family="text">
      <style:text-properties style:use-window-font-color="true" loext:opacity="0%" fo:font-size="13pt" fo:font-weight="normal" officeooo:rsid="0cfab8ec" style:font-size-asian="13pt" style:font-weight-asian="normal" style:font-size-complex="13pt" style:font-weight-complex="normal"/>
    </style:style>
    <style:style style:name="T662" style:family="text">
      <style:text-properties style:use-window-font-color="true" loext:opacity="0%" fo:font-size="13pt" fo:font-weight="normal" officeooo:rsid="0d094322" style:font-size-asian="13pt" style:font-weight-asian="normal" style:font-size-complex="13pt" style:font-weight-complex="normal"/>
    </style:style>
    <style:style style:name="T663" style:family="text">
      <style:text-properties style:use-window-font-color="true" loext:opacity="0%" fo:font-size="13pt" fo:font-weight="normal" officeooo:rsid="0d085950" style:font-size-asian="13pt" style:font-weight-asian="normal" style:font-size-complex="13pt" style:font-weight-complex="normal"/>
    </style:style>
    <style:style style:name="T664" style:family="text">
      <style:text-properties style:font-name="Courier" fo:font-size="13pt" officeooo:rsid="0b9d1b1b" style:font-size-asian="13pt" style:font-size-complex="13pt"/>
    </style:style>
    <style:style style:name="T665" style:family="text">
      <style:text-properties style:font-name="Courier" fo:font-size="13pt" officeooo:rsid="0d094322" style:font-size-asian="13pt" style:font-size-complex="13pt"/>
    </style:style>
    <style:style style:name="T666" style:family="text">
      <style:text-properties fo:font-style="normal" fo:font-weight="normal" officeooo:rsid="025ce238" style:font-style-asian="normal" style:font-weight-asian="normal" style:font-style-complex="normal" style:font-weight-complex="normal"/>
    </style:style>
    <style:style style:name="T667" style:family="text">
      <style:text-properties fo:font-style="normal" fo:font-weight="normal" officeooo:rsid="09c71189" style:font-style-asian="normal" style:font-weight-asian="normal" style:font-style-complex="normal" style:font-weight-complex="normal"/>
    </style:style>
    <style:style style:name="T668" style:family="text">
      <style:text-properties fo:font-style="normal" fo:font-weight="normal" officeooo:rsid="0405e429" style:font-style-asian="normal" style:font-weight-asian="normal" style:font-style-complex="normal" style:font-weight-complex="normal"/>
    </style:style>
    <style:style style:name="T669" style:family="text">
      <style:text-properties fo:font-style="normal" fo:font-weight="normal" officeooo:rsid="045f7d9d" style:font-style-asian="normal" style:font-weight-asian="normal" style:font-style-complex="normal" style:font-weight-complex="normal"/>
    </style:style>
    <style:style style:name="T670" style:family="text">
      <style:text-properties style:use-window-font-color="true" loext:opacity="0%" fo:font-size="13pt" fo:font-style="normal" fo:font-weight="normal" officeooo:rsid="059f3a87" style:font-size-asian="13pt" style:font-style-asian="normal" style:font-weight-asian="normal" style:font-size-complex="13pt" style:font-style-complex="normal" style:font-weight-complex="normal"/>
    </style:style>
    <style:style style:name="T671" style:family="text">
      <style:text-properties style:use-window-font-color="true" loext:opacity="0%" fo:font-size="13pt" fo:font-style="normal" fo:font-weight="normal" officeooo:rsid="02a1a47b" style:font-size-asian="13pt" style:font-style-asian="normal" style:font-weight-asian="normal" style:font-size-complex="13pt" style:font-style-complex="normal" style:font-weight-complex="normal"/>
    </style:style>
    <style:style style:name="T672" style:family="text">
      <style:text-properties style:use-window-font-color="true" loext:opacity="0%" fo:font-size="13pt" fo:font-style="normal" fo:font-weight="normal" officeooo:rsid="07891e70" style:font-size-asian="13pt" style:font-style-asian="normal" style:font-weight-asian="normal" style:font-size-complex="13pt" style:font-style-complex="normal" style:font-weight-complex="normal"/>
    </style:style>
    <style:style style:name="T673" style:family="text">
      <style:text-properties style:use-window-font-color="true" loext:opacity="0%" style:font-name="Courier" fo:font-size="13pt" fo:font-style="normal" fo:font-weight="normal" officeooo:rsid="02a1a47b" style:font-size-asian="13pt" style:font-style-asian="normal" style:font-weight-asian="normal" style:font-size-complex="13pt" style:font-style-complex="normal" style:font-weight-complex="normal"/>
    </style:style>
    <style:style style:name="T674" style:family="text">
      <style:text-properties fo:font-size="13pt" fo:font-style="normal" fo:font-weight="normal" officeooo:rsid="001a636e" style:font-size-asian="13pt" style:font-style-asian="normal" style:font-weight-asian="normal" style:font-size-complex="13pt" style:font-style-complex="normal" style:font-weight-complex="normal"/>
    </style:style>
    <style:style style:name="T675" style:family="text">
      <style:text-properties fo:font-size="13pt" fo:font-style="normal" fo:font-weight="normal" officeooo:rsid="07891e70" style:font-size-asian="13pt" style:font-style-asian="normal" style:font-weight-asian="normal" style:font-size-complex="13pt" style:font-style-complex="normal" style:font-weight-complex="normal"/>
    </style:style>
    <style:style style:name="T676" style:family="text">
      <style:text-properties style:use-window-font-color="true" loext:opacity="0%" officeooo:rsid="05e95017"/>
    </style:style>
    <style:style style:name="T677" style:family="text">
      <style:text-properties style:use-window-font-color="true" loext:opacity="0%" officeooo:rsid="07891e70"/>
    </style:style>
    <style:style style:name="T678" style:family="text">
      <style:text-properties style:use-window-font-color="true" loext:opacity="0%" style:font-name="Courier" officeooo:rsid="05e95017"/>
    </style:style>
    <style:style style:name="T679" style:family="text">
      <style:text-properties style:use-window-font-color="true" loext:opacity="0%" fo:font-style="normal" fo:font-weight="bold" officeooo:rsid="0704ad3c" style:font-style-asian="normal" style:font-weight-asian="bold" style:font-style-complex="normal" style:font-weight-complex="bold"/>
    </style:style>
    <style:style style:name="T680" style:family="text">
      <style:text-properties style:use-window-font-color="true" loext:opacity="0%" fo:font-style="normal" fo:font-weight="normal" officeooo:rsid="05e95017" style:font-style-asian="normal" style:font-weight-asian="normal" style:font-style-complex="normal" style:font-weight-complex="normal"/>
    </style:style>
    <style:style style:name="T681" style:family="text">
      <style:text-properties style:use-window-font-color="true" loext:opacity="0%" fo:font-style="normal" fo:font-weight="normal" officeooo:rsid="07891e70" style:font-style-asian="normal" style:font-weight-asian="normal" style:font-style-complex="normal" style:font-weight-complex="normal"/>
    </style:style>
    <style:style style:name="T682" style:family="text">
      <style:text-properties fo:font-size="13pt" fo:font-weight="bold" officeooo:rsid="0704ad3c" style:font-size-asian="13pt" style:font-weight-asian="bold" style:font-size-complex="13pt" style:font-weight-complex="bold"/>
    </style:style>
    <style:style style:name="T683" style:family="text">
      <style:text-properties fo:font-size="13pt" officeooo:rsid="07891e70" style:font-size-asian="13pt" style:font-size-complex="13pt"/>
    </style:style>
    <style:style style:name="T684" style:family="text">
      <style:text-properties fo:font-size="13pt" officeooo:rsid="0d593b64" style:font-size-asian="13pt" style:font-size-complex="13pt"/>
    </style:style>
    <style:style style:name="T685" style:family="text">
      <style:text-properties style:use-window-font-color="true" loext:opacity="0%" style:font-name="Courier" fo:font-size="13pt" fo:font-style="normal" fo:font-weight="normal" officeooo:rsid="05e95017" style:font-size-asian="13pt" style:font-style-asian="normal" style:font-weight-asian="normal" style:font-size-complex="13pt" style:font-style-complex="normal" style:font-weight-complex="normal"/>
    </style:style>
    <style:style style:name="T686" style:family="text">
      <style:text-properties style:use-window-font-color="true" loext:opacity="0%" fo:font-size="13pt" fo:font-style="normal" fo:font-weight="normal" officeooo:rsid="05e95017" style:font-size-asian="13pt" style:font-style-asian="normal" style:font-weight-asian="normal" style:font-size-complex="13pt" style:font-style-complex="normal" style:font-weight-complex="normal"/>
    </style:style>
    <style:style style:name="T687" style:family="text">
      <style:text-properties style:use-window-font-color="true" loext:opacity="0%" fo:font-size="13pt" fo:font-style="normal" fo:font-weight="normal" officeooo:rsid="0d5c6edc" style:font-size-asian="13pt" style:font-style-asian="normal" style:font-weight-asian="normal" style:font-size-complex="13pt" style:font-style-complex="normal" style:font-weight-complex="normal"/>
    </style:style>
    <style:style style:name="T688" style:family="text">
      <style:text-properties style:use-window-font-color="true" loext:opacity="0%" fo:font-size="13pt" fo:font-weight="normal" officeooo:rsid="045a9dda" style:font-size-asian="13pt" style:font-weight-asian="normal" style:font-size-complex="13pt" style:font-weight-complex="normal"/>
    </style:style>
    <style:style style:name="T689" style:family="text">
      <style:text-properties style:use-window-font-color="true" loext:opacity="0%" fo:font-size="13pt" fo:font-weight="normal" officeooo:rsid="07891e70" style:font-size-asian="13pt" style:font-weight-asian="normal" style:font-size-complex="13pt" style:font-weight-complex="normal"/>
    </style:style>
    <style:style style:name="T690" style:family="text">
      <style:text-properties style:use-window-font-color="true" loext:opacity="0%" fo:font-size="13pt" fo:font-weight="normal" officeooo:rsid="071101c9" style:font-size-asian="13pt" style:font-weight-asian="normal" style:font-size-complex="13pt" style:font-weight-complex="normal"/>
    </style:style>
    <style:style style:name="T691" style:family="text">
      <style:text-properties style:use-window-font-color="true" loext:opacity="0%" fo:font-size="13pt" fo:font-weight="normal" officeooo:rsid="0d5c6edc" style:font-size-asian="13pt" style:font-weight-asian="normal" style:font-size-complex="13pt" style:font-weight-complex="normal"/>
    </style:style>
    <style:style style:name="T692" style:family="text">
      <style:text-properties style:font-name="Liberation Serif" fo:font-size="13pt" fo:font-weight="normal" officeooo:rsid="01fe0cb9" style:font-size-asian="13pt" style:font-weight-asian="normal" style:font-size-complex="13pt" style:font-weight-complex="normal"/>
    </style:style>
    <style:style style:name="T693" style:family="text">
      <style:text-properties style:font-name="Liberation Serif" fo:font-size="13pt" fo:font-weight="normal" officeooo:rsid="0d5c6edc" style:font-size-asian="13pt" style:font-weight-asian="normal" style:font-size-complex="13pt" style:font-weight-complex="normal"/>
    </style:style>
    <style:style style:name="T694" style:family="text">
      <style:text-properties style:font-name="Liberation Serif" fo:font-size="13pt" fo:font-weight="normal" officeooo:rsid="0d555741" style:font-size-asian="13pt" style:font-weight-asian="normal" style:font-size-complex="13pt" style:font-weight-complex="normal"/>
    </style:style>
    <style:style style:name="T695" style:family="text">
      <style:text-properties style:font-name="Liberation Serif" fo:font-size="13pt" fo:font-weight="normal" officeooo:rsid="0cf44c87" style:font-size-asian="13pt" style:font-weight-asian="normal" style:font-size-complex="13pt" style:font-weight-complex="normal"/>
    </style:style>
    <style:style style:name="T696" style:family="text">
      <style:text-properties style:font-name="Liberation Serif" fo:font-size="13pt" fo:font-weight="normal" officeooo:rsid="0b59c79f" style:font-size-asian="13pt" style:font-weight-asian="normal" style:font-size-complex="13pt" style:font-weight-complex="normal"/>
    </style:style>
    <style:style style:name="T697" style:family="text">
      <style:text-properties officeooo:rsid="00069d61"/>
    </style:style>
    <style:style style:name="T698" style:family="text">
      <style:text-properties officeooo:rsid="000fcf39"/>
    </style:style>
    <style:style style:name="T699" style:family="text">
      <style:text-properties officeooo:rsid="00124173"/>
    </style:style>
    <style:style style:name="T700" style:family="text">
      <style:text-properties style:font-name="Liberation Serif" fo:font-weight="normal" officeooo:rsid="0005ae83" style:font-weight-asian="normal" style:font-weight-complex="normal"/>
    </style:style>
    <style:style style:name="T701" style:family="text">
      <style:text-properties style:font-name="Liberation Serif" fo:font-weight="normal" officeooo:rsid="000fcf39" style:font-weight-asian="normal" style:font-weight-complex="normal"/>
    </style:style>
    <style:style style:name="T702" style:family="text">
      <style:text-properties style:font-name="Liberation Serif" fo:font-weight="normal" officeooo:rsid="006d0dae" style:font-weight-asian="normal" style:font-weight-complex="normal"/>
    </style:style>
    <style:style style:name="T703" style:family="text">
      <style:text-properties style:font-name="Liberation Serif" fo:font-weight="normal" officeooo:rsid="00155def" style:font-weight-asian="normal" style:font-weight-complex="normal"/>
    </style:style>
    <style:style style:name="T704" style:family="text">
      <style:text-properties style:font-name="Liberation Serif" fo:font-size="13pt" fo:font-weight="normal" officeooo:rsid="0051ab87" style:font-size-asian="13pt" style:font-weight-asian="normal" style:font-size-complex="13pt" style:font-weight-complex="normal"/>
    </style:style>
    <style:style style:name="T705" style:family="text">
      <style:text-properties style:font-name="Liberation Serif" fo:font-size="13pt" fo:font-weight="normal" officeooo:rsid="0153c134" style:font-size-asian="13pt" style:font-weight-asian="normal" style:font-size-complex="13pt" style:font-weight-complex="normal"/>
    </style:style>
    <style:style style:name="T706" style:family="text">
      <style:text-properties style:font-name="Liberation Serif" fo:font-size="13pt" fo:font-weight="normal" officeooo:rsid="0158fdbc" style:font-size-asian="13pt" style:font-weight-asian="normal" style:font-size-complex="13pt" style:font-weight-complex="normal"/>
    </style:style>
    <style:style style:name="T707" style:family="text">
      <style:text-properties style:font-name="Liberation Serif" fo:font-size="13pt" fo:font-style="normal" fo:font-weight="normal" officeooo:rsid="013c9f8a" style:font-size-asian="13pt" style:font-style-asian="normal" style:font-weight-asian="normal" style:font-size-complex="13pt" style:font-style-complex="normal" style:font-weight-complex="normal"/>
    </style:style>
    <style:style style:name="T708" style:family="text">
      <style:text-properties style:font-name="Liberation Serif" fo:font-size="13pt" fo:font-style="normal" fo:font-weight="normal" officeooo:rsid="0154b84b" style:font-size-asian="13pt" style:font-style-asian="normal" style:font-weight-asian="normal" style:font-size-complex="13pt" style:font-style-complex="normal" style:font-weight-complex="normal"/>
    </style:style>
    <style:style style:name="T709" style:family="text">
      <style:text-properties style:font-name="Liberation Serif" fo:font-size="13pt" fo:font-style="normal" fo:font-weight="normal" officeooo:rsid="0087bea9" style:font-size-asian="13pt" style:font-style-asian="normal" style:font-weight-asian="normal" style:font-size-complex="13pt" style:font-style-complex="normal" style:font-weight-complex="normal"/>
    </style:style>
    <style:style style:name="T710" style:family="text">
      <style:text-properties style:font-name="Liberation Serif" fo:font-size="13pt" fo:font-style="normal" fo:font-weight="normal" officeooo:rsid="0051ab87" style:font-size-asian="13pt" style:font-style-asian="normal" style:font-weight-asian="normal" style:font-size-complex="13pt" style:font-style-complex="normal" style:font-weight-complex="normal"/>
    </style:style>
    <style:style style:name="T711" style:family="text">
      <style:text-properties style:font-name="Liberation Serif" fo:font-size="13pt" fo:font-style="normal" fo:font-weight="normal" officeooo:rsid="00155def" style:font-size-asian="13pt" style:font-style-asian="normal" style:font-weight-asian="normal" style:font-size-complex="13pt" style:font-style-complex="normal" style:font-weight-complex="normal"/>
    </style:style>
    <style:style style:name="T712" style:family="text">
      <style:text-properties style:font-name="Courier" fo:font-size="13pt" fo:font-style="normal" fo:font-weight="normal" officeooo:rsid="0087bea9" style:font-size-asian="13pt" style:font-style-asian="normal" style:font-weight-asian="normal" style:font-size-complex="13pt" style:font-style-complex="normal" style:font-weight-complex="normal"/>
    </style:style>
    <style:style style:name="T713" style:family="text">
      <style:text-properties style:font-name="Liberation Serif" fo:font-size="13pt" fo:font-weight="normal" officeooo:rsid="006b484f" style:font-size-asian="13pt" style:font-weight-asian="normal" style:font-size-complex="13pt" style:font-weight-complex="normal"/>
    </style:style>
    <style:style style:name="T714" style:family="text">
      <style:text-properties style:font-name="Courier" fo:font-size="13pt" fo:font-weight="normal" officeooo:rsid="006b484f" style:font-size-asian="13pt" style:font-weight-asian="normal" style:font-size-complex="13pt" style:font-weight-complex="normal"/>
    </style:style>
    <style:style style:name="T715" style:family="text">
      <style:text-properties style:font-name="Liberation Serif" fo:font-size="13pt" fo:font-style="normal" fo:font-weight="normal" officeooo:rsid="006b484f" style:font-size-asian="13pt" style:font-style-asian="normal" style:font-weight-asian="normal" style:font-size-complex="13pt" style:font-style-complex="normal" style:font-weight-complex="normal"/>
    </style:style>
    <style:style style:name="T716" style:family="text">
      <style:text-properties style:font-name="Liberation Serif" fo:font-size="13pt" fo:font-style="normal" fo:font-weight="normal" officeooo:rsid="01556250" style:font-size-asian="13pt" style:font-style-asian="normal" style:font-weight-asian="normal" style:font-size-complex="13pt" style:font-style-complex="normal" style:font-weight-complex="normal"/>
    </style:style>
    <style:style style:name="T717" style:family="text">
      <style:text-properties style:font-name="Liberation Serif" fo:font-size="13pt" fo:font-weight="normal" officeooo:rsid="0087bea9" style:font-size-asian="13pt" style:font-weight-asian="normal" style:font-size-complex="13pt" style:font-weight-complex="normal"/>
    </style:style>
    <style:style style:name="T718" style:family="text">
      <style:text-properties style:font-name="Courier" fo:font-size="13pt" fo:font-weight="normal" officeooo:rsid="0087bea9" style:font-size-asian="13pt" style:font-weight-asian="normal" style:font-size-complex="13pt" style:font-weight-complex="normal"/>
    </style:style>
    <style:style style:name="T719" style:family="text">
      <style:text-properties style:font-name="Liberation Serif" fo:font-size="13pt" fo:font-weight="normal" officeooo:rsid="00155def" style:font-size-asian="13pt" style:font-weight-asian="normal" style:font-size-complex="13pt" style:font-weight-complex="normal"/>
    </style:style>
    <style:style style:name="T720" style:family="text">
      <style:text-properties style:font-name="Liberation Serif" fo:font-size="13pt" fo:font-weight="normal" officeooo:rsid="00dc43c5" style:font-size-asian="13pt" style:font-weight-asian="normal" style:font-size-complex="13pt" style:font-weight-complex="normal"/>
    </style:style>
    <style:style style:name="T721" style:family="text">
      <style:text-properties style:font-name="Liberation Serif" fo:font-size="13pt" fo:font-weight="normal" officeooo:rsid="01556250" style:font-size-asian="13pt" style:font-weight-asian="normal" style:font-size-complex="13pt" style:font-weight-complex="normal"/>
    </style:style>
    <style:style style:name="T722" style:family="text">
      <style:text-properties style:font-name="Courier" fo:font-size="13pt" fo:font-weight="normal" officeooo:rsid="01556250" style:font-size-asian="13pt" style:font-weight-asian="normal" style:font-size-complex="13pt" style:font-weight-complex="normal"/>
    </style:style>
    <style:style style:name="T723" style:family="text">
      <style:text-properties style:font-name="Liberation Serif" fo:font-size="13pt" fo:font-style="normal" fo:font-weight="normal" officeooo:rsid="01575da7" style:font-size-asian="13pt" style:font-style-asian="normal" style:font-weight-asian="normal" style:font-size-complex="13pt" style:font-style-complex="normal" style:font-weight-complex="normal"/>
    </style:style>
    <style:style style:name="T724" style:family="text">
      <style:text-properties style:font-name="Liberation Serif" fo:font-size="13pt" fo:font-weight="normal" officeooo:rsid="00da9ca8" style:font-size-asian="13pt" style:font-weight-asian="normal" style:font-size-complex="13pt" style:font-weight-complex="normal"/>
    </style:style>
    <style:style style:name="T725" style:family="text">
      <style:text-properties style:font-name="Liberation Serif" fo:font-size="13pt" fo:font-weight="normal" officeooo:rsid="01575da7" style:font-size-asian="13pt" style:font-weight-asian="normal" style:font-size-complex="13pt" style:font-weight-complex="normal"/>
    </style:style>
    <style:style style:name="T726" style:family="text">
      <style:text-properties style:font-name="Liberation Serif" fo:font-size="13pt" fo:font-weight="normal" officeooo:rsid="013439f6" style:font-size-asian="13pt" style:font-weight-asian="normal" style:font-size-complex="13pt" style:font-weight-complex="normal"/>
    </style:style>
    <style:style style:name="T727" style:family="text">
      <style:text-properties style:font-name="Liberation Serif" fo:font-size="13pt" fo:font-weight="normal" officeooo:rsid="01260b36" style:font-size-asian="13pt" style:font-weight-asian="normal" style:font-size-complex="13pt" style:font-weight-complex="normal"/>
    </style:style>
    <style:style style:name="T728" style:family="text">
      <style:text-properties style:font-name="Liberation Serif" fo:font-size="13pt" fo:font-weight="normal" officeooo:rsid="013c9f8a" style:font-size-asian="13pt" style:font-weight-asian="normal" style:font-size-complex="13pt" style:font-weight-complex="normal"/>
    </style:style>
    <style:style style:name="T729" style:family="text">
      <style:text-properties style:font-name="Liberation Serif" fo:font-size="13pt" fo:font-weight="normal" officeooo:rsid="01658177" style:font-size-asian="13pt" style:font-weight-asian="normal" style:font-size-complex="13pt" style:font-weight-complex="normal"/>
    </style:style>
    <style:style style:name="T730" style:family="text">
      <style:text-properties style:font-name="Liberation Serif" fo:font-size="13pt" fo:font-weight="normal" officeooo:rsid="01da5ccc" style:font-size-asian="13pt" style:font-weight-asian="normal" style:font-size-complex="13pt" style:font-weight-complex="normal"/>
    </style:style>
    <style:style style:name="T731" style:family="text">
      <style:text-properties style:font-name="Courier" fo:font-size="13pt" fo:font-weight="normal" officeooo:rsid="019ecc5d" style:font-size-asian="13pt" style:font-weight-asian="normal" style:font-size-complex="13pt" style:font-weight-complex="normal"/>
    </style:style>
    <style:style style:name="T732" style:family="text">
      <style:text-properties style:font-name="Liberation Serif" fo:font-size="13pt" fo:font-style="normal" fo:font-weight="normal" officeooo:rsid="0158fdbc" style:font-size-asian="13pt" style:font-style-asian="normal" style:font-weight-asian="normal" style:font-size-complex="13pt" style:font-style-complex="normal" style:font-weight-complex="normal"/>
    </style:style>
    <style:style style:name="T733" style:family="text">
      <style:text-properties style:font-name="Liberation Serif" fo:font-size="13pt" fo:font-style="normal" fo:font-weight="normal" officeooo:rsid="01658177" style:font-size-asian="13pt" style:font-style-asian="normal" style:font-weight-asian="normal" style:font-size-complex="13pt" style:font-style-complex="normal" style:font-weight-complex="normal"/>
    </style:style>
    <style:style style:name="T734" style:family="text">
      <style:text-properties style:font-name="Liberation Serif" fo:font-size="13pt" fo:font-style="normal" fo:font-weight="normal" officeooo:rsid="02814868" style:font-size-asian="13pt" style:font-style-asian="normal" style:font-weight-asian="normal" style:font-size-complex="13pt" style:font-style-complex="normal" style:font-weight-complex="normal"/>
    </style:style>
    <style:style style:name="T735" style:family="text">
      <style:text-properties style:font-name="Liberation Serif" fo:font-size="13pt" fo:font-style="normal" fo:font-weight="normal" officeooo:rsid="015ab19d" style:font-size-asian="13pt" style:font-style-asian="normal" style:font-weight-asian="normal" style:font-size-complex="13pt" style:font-style-complex="normal" style:font-weight-complex="normal"/>
    </style:style>
    <style:style style:name="T736" style:family="text">
      <style:text-properties style:font-name="Courier" fo:font-size="13pt" fo:font-style="normal" fo:font-weight="normal" officeooo:rsid="0198b9eb" style:font-size-asian="13pt" style:font-style-asian="normal" style:font-weight-asian="normal" style:font-size-complex="13pt" style:font-style-complex="normal" style:font-weight-complex="normal"/>
    </style:style>
    <style:style style:name="T737" style:family="text">
      <style:text-properties style:font-name="Courier" fo:font-size="13pt" fo:font-style="normal" fo:font-weight="normal" officeooo:rsid="01556250" style:font-size-asian="13pt" style:font-style-asian="normal" style:font-weight-asian="normal" style:font-size-complex="13pt" style:font-style-complex="normal" style:font-weight-complex="normal"/>
    </style:style>
    <style:style style:name="T738" style:family="text">
      <style:text-properties style:font-name="Liberation Serif" fo:font-size="13pt" fo:font-style="normal" fo:font-weight="normal" officeooo:rsid="019a5f94" style:font-size-asian="13pt" style:font-style-asian="normal" style:font-weight-asian="normal" style:font-size-complex="13pt" style:font-style-complex="normal" style:font-weight-complex="normal"/>
    </style:style>
    <style:style style:name="T739" style:family="text">
      <style:text-properties style:font-name="Liberation Serif" fo:font-size="13pt" fo:font-style="normal" fo:font-weight="normal" officeooo:rsid="01c73ee8" style:font-size-asian="13pt" style:font-style-asian="normal" style:font-weight-asian="normal" style:font-size-complex="13pt" style:font-style-complex="normal" style:font-weight-complex="normal"/>
    </style:style>
    <style:style style:name="T740" style:family="text">
      <style:text-properties style:font-name="Liberation Serif" fo:font-size="13pt" fo:font-style="normal" fo:font-weight="normal" officeooo:rsid="021fe2ab" style:font-size-asian="13pt" style:font-style-asian="normal" style:font-weight-asian="normal" style:font-size-complex="13pt" style:font-style-complex="normal" style:font-weight-complex="normal"/>
    </style:style>
    <style:style style:name="T741" style:family="text">
      <style:text-properties style:font-name="Liberation Serif" fo:font-size="13pt" fo:font-style="normal" fo:font-weight="normal" officeooo:rsid="0235e4a9" style:font-size-asian="13pt" style:font-style-asian="normal" style:font-weight-asian="normal" style:font-size-complex="13pt" style:font-style-complex="normal" style:font-weight-complex="normal"/>
    </style:style>
    <style:style style:name="T742" style:family="text">
      <style:text-properties style:font-name="Liberation Serif" fo:font-size="13pt" fo:font-style="normal" fo:font-weight="normal" officeooo:rsid="02322fa4" style:font-size-asian="13pt" style:font-style-asian="normal" style:font-weight-asian="normal" style:font-size-complex="13pt" style:font-style-complex="normal" style:font-weight-complex="normal"/>
    </style:style>
    <style:style style:name="T743" style:family="text">
      <style:text-properties style:font-name="Liberation Serif" fo:font-size="13pt" fo:font-style="normal" fo:font-weight="normal" officeooo:rsid="0266f7a1" style:font-size-asian="13pt" style:font-style-asian="normal" style:font-weight-asian="normal" style:font-size-complex="13pt" style:font-style-complex="normal" style:font-weight-complex="normal"/>
    </style:style>
    <style:style style:name="T744" style:family="text">
      <style:text-properties style:font-name="Liberation Serif" fo:font-size="13pt" fo:font-style="normal" fo:font-weight="normal" officeooo:rsid="024fe8bb" style:font-size-asian="13pt" style:font-style-asian="normal" style:font-weight-asian="normal" style:font-size-complex="13pt" style:font-style-complex="normal" style:font-weight-complex="normal"/>
    </style:style>
    <style:style style:name="T745" style:family="text">
      <style:text-properties style:font-name="Liberation Serif" fo:font-size="13pt" fo:font-style="normal" fo:font-weight="normal" officeooo:rsid="024881fc" style:font-size-asian="13pt" style:font-style-asian="normal" style:font-weight-asian="normal" style:font-size-complex="13pt" style:font-style-complex="normal" style:font-weight-complex="normal"/>
    </style:style>
    <style:style style:name="T746" style:family="text">
      <style:text-properties style:font-name="Liberation Serif" fo:font-size="13pt" fo:font-style="normal" fo:font-weight="normal" officeooo:rsid="0267108e" style:font-size-asian="13pt" style:font-style-asian="normal" style:font-weight-asian="normal" style:font-size-complex="13pt" style:font-style-complex="normal" style:font-weight-complex="normal"/>
    </style:style>
    <style:style style:name="T747" style:family="text">
      <style:text-properties style:font-name="Liberation Serif" fo:font-size="13pt" fo:font-weight="normal" officeooo:rsid="03423f1a" style:font-size-asian="13pt" style:font-weight-asian="normal" style:font-size-complex="13pt" style:font-weight-complex="normal"/>
    </style:style>
    <style:style style:name="T748" style:family="text">
      <style:text-properties style:font-name="Liberation Serif" fo:font-size="13pt" fo:font-weight="normal" officeooo:rsid="028de297" style:font-size-asian="13pt" style:font-weight-asian="normal" style:font-size-complex="13pt" style:font-weight-complex="normal"/>
    </style:style>
    <style:style style:name="T749" style:family="text">
      <style:text-properties style:font-name="Liberation Serif" fo:font-size="13pt" fo:font-weight="normal" officeooo:rsid="02a08520" style:font-size-asian="13pt" style:font-weight-asian="normal" style:font-size-complex="13pt" style:font-weight-complex="normal"/>
    </style:style>
    <style:style style:name="T750" style:family="text">
      <style:text-properties style:font-name="Courier" fo:font-size="13pt" fo:font-weight="normal" officeooo:rsid="02a08520" style:font-size-asian="13pt" style:font-weight-asian="normal" style:font-size-complex="13pt" style:font-weight-complex="normal"/>
    </style:style>
    <style:style style:name="T751" style:family="text">
      <style:text-properties style:font-name="Liberation Serif" fo:font-size="13pt" fo:font-weight="normal" officeooo:rsid="030cbd58" style:font-size-asian="13pt" style:font-weight-asian="normal" style:font-size-complex="13pt" style:font-weight-complex="normal"/>
    </style:style>
    <style:style style:name="T752" style:family="text">
      <style:text-properties style:font-name="Liberation Serif" fo:font-size="13pt" fo:font-weight="normal" officeooo:rsid="031b7397" style:font-size-asian="13pt" style:font-weight-asian="normal" style:font-size-complex="13pt" style:font-weight-complex="normal"/>
    </style:style>
    <style:style style:name="T753" style:family="text">
      <style:text-properties style:font-name="Liberation Serif" fo:font-size="13pt" fo:font-weight="normal" officeooo:rsid="034eae6b" style:font-size-asian="13pt" style:font-weight-asian="normal" style:font-size-complex="13pt" style:font-weight-complex="normal"/>
    </style:style>
    <style:style style:name="T754" style:family="text">
      <style:text-properties style:font-name="Courier" fo:font-size="13pt" fo:font-weight="normal" officeooo:rsid="030cbd58" style:font-size-asian="13pt" style:font-weight-asian="normal" style:font-size-complex="13pt" style:font-weight-complex="normal"/>
    </style:style>
    <style:style style:name="T755" style:family="text">
      <style:text-properties style:font-name="Liberation Serif" fo:font-size="13pt" fo:font-weight="normal" officeooo:rsid="02ca5b7c" style:font-size-asian="13pt" style:font-weight-asian="normal" style:font-size-complex="13pt" style:font-weight-complex="normal"/>
    </style:style>
    <style:style style:name="T756" style:family="text">
      <style:text-properties style:font-name="Liberation Serif" fo:font-size="13pt" fo:font-weight="normal" officeooo:rsid="03090ab7" style:font-size-asian="13pt" style:font-weight-asian="normal" style:font-size-complex="13pt" style:font-weight-complex="normal"/>
    </style:style>
    <style:style style:name="T757" style:family="text">
      <style:text-properties style:font-name="Liberation Serif" fo:font-size="13pt" fo:font-weight="normal" officeooo:rsid="03418623" style:font-size-asian="13pt" style:font-weight-asian="normal" style:font-size-complex="13pt" style:font-weight-complex="normal"/>
    </style:style>
    <style:style style:name="T758" style:family="text">
      <style:text-properties style:font-name="Liberation Serif" fo:font-weight="normal" style:font-weight-asian="normal" style:font-weight-complex="normal"/>
    </style:style>
    <style:style style:name="T759" style:family="text">
      <style:text-properties style:font-name="Liberation Serif" fo:font-weight="normal" officeooo:rsid="03418623" style:font-weight-asian="normal" style:font-weight-complex="normal"/>
    </style:style>
    <style:style style:name="T760" style:family="text">
      <style:text-properties style:font-name="Liberation Serif" fo:font-weight="normal" officeooo:rsid="033bd02a" style:font-weight-asian="normal" style:font-weight-complex="normal"/>
    </style:style>
    <style:style style:name="T761" style:family="text">
      <style:text-properties style:font-name="Liberation Serif" fo:font-weight="normal" officeooo:rsid="034eae6b" style:font-weight-asian="normal" style:font-weight-complex="normal"/>
    </style:style>
    <style:style style:name="T762" style:family="text">
      <style:text-properties style:font-name="Courier" fo:font-weight="normal" officeooo:rsid="033bd02a" style:font-weight-asian="normal" style:font-weight-complex="normal"/>
    </style:style>
    <style:style style:name="T763" style:family="text">
      <style:text-properties style:font-name="Liberation Serif" fo:font-size="13pt" fo:font-weight="normal" officeooo:rsid="035e9e48" style:font-name-asian="Liberation Mono" style:font-size-asian="13pt" style:font-weight-asian="normal" style:font-name-complex="Liberation Mono" style:font-size-complex="13pt" style:font-weight-complex="normal"/>
    </style:style>
    <style:style style:name="T764" style:family="text">
      <style:text-properties style:font-name="Liberation Serif" fo:font-size="13pt" fo:font-weight="normal" officeooo:rsid="052baf14" style:font-name-asian="Liberation Mono" style:font-size-asian="13pt" style:font-weight-asian="normal" style:font-name-complex="Liberation Mono" style:font-size-complex="13pt" style:font-weight-complex="normal"/>
    </style:style>
    <style:style style:name="T765" style:family="text">
      <style:text-properties style:font-name="Courier" fo:font-size="13pt" fo:font-weight="normal" officeooo:rsid="052baf14" style:font-name-asian="Liberation Mono" style:font-size-asian="13pt" style:font-weight-asian="normal" style:font-name-complex="Liberation Mono" style:font-size-complex="13pt" style:font-weight-complex="normal"/>
    </style:style>
    <style:style style:name="T766" style:family="text">
      <style:text-properties style:font-name="Liberation Serif" fo:font-size="13pt" fo:font-weight="normal" officeooo:rsid="035e9e48" style:font-size-asian="13pt" style:font-weight-asian="normal" style:font-size-complex="13pt" style:font-weight-complex="normal"/>
    </style:style>
    <style:style style:name="T767" style:family="text">
      <style:text-properties style:font-name="Courier" fo:font-size="13pt" fo:font-weight="normal" officeooo:rsid="00155def" style:font-size-asian="13pt" style:font-weight-asian="normal" style:font-size-complex="13pt" style:font-weight-complex="normal"/>
    </style:style>
    <style:style style:name="T768" style:family="text">
      <style:text-properties style:font-name="Liberation Serif" fo:font-size="13pt" fo:font-weight="normal" officeooo:rsid="0366b12e" style:font-size-asian="13pt" style:font-weight-asian="normal" style:font-size-complex="13pt" style:font-weight-complex="normal"/>
    </style:style>
    <style:style style:name="T769" style:family="text">
      <style:text-properties style:font-name="Liberation Serif" fo:font-size="13pt" fo:font-weight="normal" officeooo:rsid="0369675b" style:font-size-asian="13pt" style:font-weight-asian="normal" style:font-size-complex="13pt" style:font-weight-complex="normal"/>
    </style:style>
    <style:style style:name="T770" style:family="text">
      <style:text-properties style:font-name="Liberation Serif" fo:font-size="13pt" fo:font-weight="normal" officeooo:rsid="0367f432" style:font-size-asian="13pt" style:font-weight-asian="normal" style:font-size-complex="13pt" style:font-weight-complex="normal"/>
    </style:style>
    <style:style style:name="T771" style:family="text">
      <style:text-properties style:font-name="Liberation Serif" fo:font-size="13pt" fo:font-weight="normal" officeooo:rsid="000fcf39" style:font-size-asian="13pt" style:font-weight-asian="normal" style:font-size-complex="13pt" style:font-weight-complex="normal"/>
    </style:style>
    <style:style style:name="T772" style:family="text">
      <style:text-properties style:font-name="Liberation Serif" fo:font-size="13pt" fo:font-weight="normal" officeooo:rsid="052baf14" style:font-size-asian="13pt" style:font-weight-asian="normal" style:font-size-complex="13pt" style:font-weight-complex="normal"/>
    </style:style>
    <style:style style:name="T773" style:family="text">
      <style:text-properties style:font-name="Liberation Serif" fo:font-size="13pt" fo:font-weight="normal" officeooo:rsid="0377db5f" style:font-size-asian="13pt" style:font-weight-asian="normal" style:font-size-complex="13pt" style:font-weight-complex="normal"/>
    </style:style>
    <style:style style:name="T774" style:family="text">
      <style:text-properties style:font-name="Liberation Serif" fo:font-size="13pt" fo:font-weight="normal" officeooo:rsid="03987419" style:font-size-asian="13pt" style:font-weight-asian="normal" style:font-size-complex="13pt" style:font-weight-complex="normal"/>
    </style:style>
    <style:style style:name="T775" style:family="text">
      <style:text-properties style:font-name="Liberation Serif" fo:font-size="13pt" fo:font-weight="normal" officeooo:rsid="038febad" style:font-size-asian="13pt" style:font-weight-asian="normal" style:font-size-complex="13pt" style:font-weight-complex="normal"/>
    </style:style>
    <style:style style:name="T776" style:family="text">
      <style:text-properties style:font-name="Liberation Serif" fo:font-size="13pt" fo:font-weight="normal" officeooo:rsid="03a3064e" style:font-size-asian="13pt" style:font-weight-asian="normal" style:font-size-complex="13pt" style:font-weight-complex="normal"/>
    </style:style>
    <style:style style:name="T777" style:family="text">
      <style:text-properties style:font-name="Liberation Serif" fo:font-size="13pt" fo:font-weight="normal" officeooo:rsid="03c4b5c5" style:font-size-asian="13pt" style:font-weight-asian="normal" style:font-size-complex="13pt" style:font-weight-complex="normal"/>
    </style:style>
    <style:style style:name="T778" style:family="text">
      <style:text-properties style:font-name="Liberation Serif" fo:font-size="13pt" fo:font-weight="normal" officeooo:rsid="03cb522c" style:font-size-asian="13pt" style:font-weight-asian="normal" style:font-size-complex="13pt" style:font-weight-complex="normal"/>
    </style:style>
    <style:style style:name="T779" style:family="text">
      <style:text-properties style:font-name="Liberation Serif" fo:font-size="13pt" fo:font-weight="normal" officeooo:rsid="03e6c3b2" style:font-size-asian="13pt" style:font-weight-asian="normal" style:font-size-complex="13pt" style:font-weight-complex="normal"/>
    </style:style>
    <style:style style:name="T780" style:family="text">
      <style:text-properties style:font-name="Liberation Serif" fo:font-size="13pt" fo:font-weight="normal" officeooo:rsid="044662e3" style:font-size-asian="13pt" style:font-weight-asian="normal" style:font-size-complex="13pt" style:font-weight-complex="normal"/>
    </style:style>
    <style:style style:name="T781" style:family="text">
      <style:text-properties style:font-name="Liberation Serif" fo:font-size="13pt" fo:font-weight="normal" officeooo:rsid="03e563e0" style:font-size-asian="13pt" style:font-weight-asian="normal" style:font-size-complex="13pt" style:font-weight-complex="normal"/>
    </style:style>
    <style:style style:name="T782" style:family="text">
      <style:text-properties style:font-name="Liberation Serif" fo:font-size="13pt" fo:font-weight="normal" officeooo:rsid="0136fe3d" style:font-size-asian="13pt" style:font-weight-asian="normal" style:font-size-complex="13pt" style:font-weight-complex="normal"/>
    </style:style>
    <style:style style:name="T783" style:family="text">
      <style:text-properties officeooo:rsid="0153c134"/>
    </style:style>
    <style:style style:name="T784" style:family="text">
      <style:text-properties officeooo:rsid="013c9f8a"/>
    </style:style>
    <style:style style:name="T785" style:family="text">
      <style:text-properties officeooo:rsid="0158fdbc"/>
    </style:style>
    <style:style style:name="T786" style:family="text">
      <style:text-properties style:use-window-font-color="true" loext:opacity="0%" fo:font-weight="bold" officeooo:rsid="052baf14" style:font-weight-asian="bold" style:font-weight-complex="bold"/>
    </style:style>
    <style:style style:name="T787" style:family="text">
      <style:text-properties style:font-name="Liberation Serif" fo:font-size="13pt" fo:font-weight="normal" officeooo:rsid="026d3e86" style:font-size-asian="13pt" style:font-weight-asian="normal" style:font-size-complex="13pt" style:font-weight-complex="normal"/>
    </style:style>
    <style:style style:name="T788" style:family="text">
      <style:text-properties style:font-name="Liberation Serif" fo:font-size="13pt" fo:font-weight="normal" officeooo:rsid="045aea4b" style:font-size-asian="13pt" style:font-weight-asian="normal" style:font-size-complex="13pt" style:font-weight-complex="normal"/>
    </style:style>
    <style:style style:name="T789" style:family="text">
      <style:text-properties style:font-name="Liberation Serif" fo:font-size="13pt" fo:font-weight="normal" officeooo:rsid="045ccc33" style:font-size-asian="13pt" style:font-weight-asian="normal" style:font-size-complex="13pt" style:font-weight-complex="normal"/>
    </style:style>
    <style:style style:name="T790" style:family="text">
      <style:text-properties fo:font-size="13pt" officeooo:rsid="0023b133" style:font-size-asian="13pt" style:font-size-complex="13pt"/>
    </style:style>
    <style:style style:name="T791" style:family="text">
      <style:text-properties officeooo:rsid="00261cd4"/>
    </style:style>
    <style:style style:name="T792" style:family="text">
      <style:text-properties style:use-window-font-color="true" loext:opacity="0%" officeooo:rsid="00117cab"/>
    </style:style>
    <style:style style:name="T793" style:family="text">
      <style:text-properties style:use-window-font-color="true" loext:opacity="0%" officeooo:rsid="0153c134"/>
    </style:style>
    <style:style style:name="T794" style:family="text">
      <style:text-properties style:font-name="Liberation Serif" fo:font-style="normal" fo:font-weight="bold" officeooo:rsid="00155def" style:font-style-asian="normal" style:font-weight-asian="bold" style:font-style-complex="normal" style:font-weight-complex="bold"/>
    </style:style>
    <style:style style:name="T795" style:family="text">
      <style:text-properties style:font-name="Liberation Serif" fo:font-style="italic" fo:font-weight="normal" style:font-style-asian="italic" style:font-weight-asian="normal" style:font-style-complex="italic" style:font-weight-complex="normal"/>
    </style:style>
    <style:style style:name="T796" style:family="text">
      <style:text-properties style:font-name="Liberation Serif"/>
    </style:style>
    <style:style style:name="T797" style:family="text">
      <style:text-properties fo:font-style="italic" fo:font-weight="normal" style:font-style-asian="italic" style:font-weight-asian="normal" style:font-style-complex="italic" style:font-weight-complex="normal"/>
    </style:style>
    <style:style style:name="T798" style:family="text">
      <style:text-properties officeooo:rsid="0013fdd7"/>
    </style:style>
    <style:style style:name="T799" style:family="text">
      <style:text-properties style:use-window-font-color="true" loext:opacity="0%" fo:font-size="18pt" fo:font-weight="bold" officeooo:rsid="0153c134" style:font-size-asian="18pt" style:font-weight-asian="bold" style:font-size-complex="18pt" style:font-weight-complex="bold"/>
    </style:style>
    <style:style style:name="T800" style:family="text">
      <style:text-properties style:use-window-font-color="true" loext:opacity="0%" fo:font-size="18pt" fo:font-weight="bold" officeooo:rsid="0158fdbc" style:font-size-asian="18pt" style:font-weight-asian="bold" style:font-size-complex="18pt" style:font-weight-complex="bold"/>
    </style:style>
    <style:style style:name="T801" style:family="text">
      <style:text-properties style:font-name="Courier" fo:font-weight="normal" style:font-weight-asian="normal" style:font-weight-complex="normal"/>
    </style:style>
    <style:style style:name="T802" style:family="text">
      <style:text-properties fo:font-weight="normal" officeooo:rsid="0064dce0" style:font-weight-asian="normal" style:font-weight-complex="normal"/>
    </style:style>
    <style:style style:name="T803" style:family="text">
      <style:text-properties fo:font-weight="normal" officeooo:rsid="004acbd8" style:font-weight-asian="normal" style:font-weight-complex="normal"/>
    </style:style>
    <style:style style:name="T804" style:family="text">
      <style:text-properties fo:font-weight="normal" officeooo:rsid="005f9a7b" style:font-weight-asian="normal" style:font-weight-complex="normal"/>
    </style:style>
    <style:style style:name="T805" style:family="text">
      <style:text-properties fo:font-weight="normal" officeooo:rsid="005cb309" style:font-weight-asian="normal" style:font-weight-complex="normal"/>
    </style:style>
    <style:style style:name="T806" style:family="text">
      <style:text-properties fo:color="#000080" loext:opacity="100%" style:text-underline-style="solid" style:text-underline-width="auto" style:text-underline-color="font-color" officeooo:rsid="14c4e220" style:font-size-asian="12pt"/>
    </style:style>
    <style:style style:name="T807" style:family="text">
      <style:text-properties fo:color="#000080" loext:opacity="100%" style:text-underline-style="solid" style:text-underline-width="auto" style:text-underline-color="font-color" officeooo:rsid="001da499" style:font-size-asian="12pt"/>
    </style:style>
    <style:style style:name="T808" style:family="text">
      <style:text-properties officeooo:rsid="003e7d76"/>
    </style:style>
    <style:style style:name="T809" style:family="text">
      <style:text-properties officeooo:rsid="00607b6b"/>
    </style:style>
    <style:style style:name="T810" style:family="text">
      <style:text-properties fo:color="#000080" loext:opacity="100%" style:text-underline-style="solid" style:text-underline-width="auto" style:text-underline-color="font-color" fo:font-weight="normal" officeooo:rsid="14c4e220" style:font-size-asian="12pt" style:font-weight-asian="normal" style:font-weight-complex="normal"/>
    </style:style>
    <style:style style:name="T811" style:family="text">
      <style:text-properties fo:color="#000080" loext:opacity="100%" style:text-underline-style="solid" style:text-underline-width="auto" style:text-underline-color="font-color" fo:font-weight="normal" officeooo:rsid="001da499" style:font-size-asian="12pt" style:font-weight-asian="normal" style:font-weight-complex="normal"/>
    </style:style>
    <style:style style:name="T812" style:family="text">
      <style:text-properties fo:font-weight="normal" officeooo:rsid="003e7d76" style:font-weight-asian="normal" style:font-weight-complex="normal"/>
    </style:style>
    <style:style style:name="T813" style:family="text">
      <style:text-properties fo:font-weight="normal" officeooo:rsid="00607b6b" style:font-weight-asian="normal" style:font-weight-complex="normal"/>
    </style:style>
    <style:style style:name="T814" style:family="text">
      <style:text-properties officeooo:rsid="005f9a7b"/>
    </style:style>
    <style:style style:name="T815" style:family="text">
      <style:text-properties fo:font-weight="normal" officeooo:rsid="0063560b" style:font-weight-asian="normal" style:font-weight-complex="normal"/>
    </style:style>
    <style:style style:name="T816" style:family="text">
      <style:text-properties style:font-name="Courier" fo:font-weight="normal" officeooo:rsid="00607b6b" style:font-weight-asian="normal" style:font-weight-complex="normal"/>
    </style:style>
    <style:style style:name="T817" style:family="text">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T818" style:family="text">
      <style:text-properties style:font-name="Liberation Serif" fo:font-size="13pt" fo:font-style="normal" fo:font-weight="bold" officeooo:rsid="0154b84b" style:font-size-asian="13pt" style:font-style-asian="normal" style:font-weight-asian="bold" style:font-size-complex="13pt" style:font-style-complex="normal" style:font-weight-complex="bold"/>
    </style:style>
    <style:style style:name="T819" style:family="text">
      <style:text-properties style:font-name="Liberation Serif" fo:font-size="13pt" fo:font-style="normal" fo:font-weight="bold" officeooo:rsid="0087bea9" style:font-size-asian="13pt" style:font-style-asian="normal" style:font-weight-asian="bold" style:font-size-complex="13pt" style:font-style-complex="normal" style:font-weight-complex="bold"/>
    </style:style>
    <style:style style:name="T820" style:family="text">
      <style:text-properties style:font-name="Liberation Serif" fo:font-size="13pt" fo:font-style="normal" fo:font-weight="bold" officeooo:rsid="0051ab87" style:font-size-asian="13pt" style:font-style-asian="normal" style:font-weight-asian="bold" style:font-size-complex="13pt" style:font-style-complex="normal" style:font-weight-complex="bold"/>
    </style:style>
    <style:style style:name="T821" style:family="text">
      <style:text-properties style:font-name="Liberation Serif" fo:font-size="13pt" fo:font-style="normal" fo:font-weight="bold" officeooo:rsid="00155def" style:font-size-asian="13pt" style:font-style-asian="normal" style:font-weight-asian="bold" style:font-size-complex="13pt" style:font-style-complex="normal" style:font-weight-complex="bold"/>
    </style:style>
    <style:style style:name="T822" style:family="text">
      <style:text-properties style:font-name="Courier" fo:font-size="13pt" fo:font-style="normal" fo:font-weight="bold" officeooo:rsid="0087bea9" style:font-size-asian="13pt" style:font-style-asian="normal" style:font-weight-asian="bold" style:font-size-complex="13pt" style:font-style-complex="normal" style:font-weight-complex="bold"/>
    </style:style>
    <style:style style:name="T823" style:family="text">
      <style:text-properties style:font-name="Courier" fo:font-size="13pt" fo:font-style="normal" officeooo:rsid="0087bea9" style:font-size-asian="13pt" style:font-style-asian="normal" style:font-size-complex="13pt" style:font-style-complex="normal"/>
    </style:style>
    <style:style style:name="T824" style:family="text">
      <style:text-properties officeooo:rsid="006b484f"/>
    </style:style>
    <style:style style:name="T825" style:family="text">
      <style:text-properties style:font-name="Courier" fo:font-size="10pt" officeooo:rsid="0064dce0" style:font-size-asian="10pt" style:font-size-complex="10pt"/>
    </style:style>
    <style:style style:name="T826" style:family="text">
      <style:text-properties officeooo:rsid="009f9f5e"/>
    </style:style>
    <style:style style:name="T827" style:family="text">
      <style:text-properties fo:color="#800080" loext:opacity="100%"/>
    </style:style>
    <style:style style:name="T828" style:family="text">
      <style:text-properties fo:color="#800080" loext:opacity="100%" style:font-name="Courier"/>
    </style:style>
    <style:style style:name="T829" style:family="text">
      <style:text-properties style:font-name="Liberation Serif" fo:font-weight="bold" officeooo:rsid="004e1dc3" style:font-weight-asian="bold" style:font-weight-complex="bold"/>
    </style:style>
    <style:style style:name="T830" style:family="text">
      <style:text-properties style:font-name="Liberation Serif" fo:font-weight="bold" officeooo:rsid="006b484f" style:font-weight-asian="bold" style:font-weight-complex="bold"/>
    </style:style>
    <style:style style:name="T831" style:family="text">
      <style:text-properties style:font-name="Liberation Serif" officeooo:rsid="004e1dc3"/>
    </style:style>
    <style:style style:name="T832" style:family="text">
      <style:text-properties style:font-name="Liberation Serif" officeooo:rsid="006b484f"/>
    </style:style>
    <style:style style:name="T833" style:family="text">
      <style:text-properties style:font-name="Courier" officeooo:rsid="006d198d"/>
    </style:style>
    <style:style style:name="T834" style:family="text">
      <style:text-properties fo:color="#0000ff" loext:opacity="100%"/>
    </style:style>
    <style:style style:name="T835" style:family="text">
      <style:text-properties fo:color="#a31515" loext:opacity="100%"/>
    </style:style>
    <style:style style:name="T836" style:family="text">
      <style:text-properties fo:color="#0000ff" loext:opacity="100%" style:font-name="Courier" fo:font-size="11pt" fo:font-weight="normal" fo:background-color="#ffffff" loext:char-shading-value="0" style:font-size-asian="11pt" style:font-size-complex="11pt"/>
    </style:style>
    <style:style style:name="T837" style:family="text">
      <style:text-properties fo:color="#000000" loext:opacity="100%" style:font-name="Courier" fo:font-size="11pt" fo:font-weight="normal" fo:background-color="#ffffff" loext:char-shading-value="0" style:font-size-asian="11pt" style:font-size-complex="11pt"/>
    </style:style>
    <style:style style:name="T838" style:family="text">
      <style:text-properties fo:color="#800080" loext:opacity="100%" style:font-name="Courier" fo:font-size="11pt" fo:font-weight="normal" fo:background-color="#ffffff" loext:char-shading-value="0" style:font-size-asian="11pt" style:font-size-complex="11pt"/>
    </style:style>
    <style:style style:name="T839" style:family="text">
      <style:text-properties fo:color="#000000" loext:opacity="100%" style:font-name="Courier" fo:font-size="11pt" fo:font-style="italic" fo:font-weight="normal" fo:background-color="#ffffff" loext:char-shading-value="0" style:font-size-asian="11pt" style:font-style-asian="italic" style:font-size-complex="11pt" style:font-style-complex="italic"/>
    </style:style>
    <style:style style:name="T840" style:family="text">
      <style:text-properties fo:color="#000000" loext:opacity="100%" fo:font-style="italic" fo:font-weight="normal" fo:background-color="#ffffff" loext:char-shading-value="0" style:font-style-asian="italic" style:font-style-complex="italic"/>
    </style:style>
    <style:style style:name="T841" style:family="text">
      <style:text-properties fo:color="#000000" loext:opacity="100%" fo:font-weight="normal" fo:background-color="#ffffff" loext:char-shading-value="0"/>
    </style:style>
    <style:style style:name="T842" style:family="text">
      <style:text-properties fo:font-weight="normal" officeooo:rsid="00658f40" style:font-weight-asian="normal" style:font-weight-complex="normal"/>
    </style:style>
    <style:style style:name="T843" style:family="text">
      <style:text-properties fo:color="#008000" loext:opacity="100%"/>
    </style:style>
    <style:style style:name="T844" style:family="text">
      <style:text-properties officeooo:rsid="0061ebb3"/>
    </style:style>
    <style:style style:name="T845" style:family="text">
      <style:text-properties fo:font-style="italic" officeooo:rsid="0061ebb3" style:font-style-asian="italic" style:font-style-complex="italic"/>
    </style:style>
    <style:style style:name="T846" style:family="text">
      <style:text-properties fo:color="#0000ff" loext:opacity="100%" fo:font-weight="normal" fo:background-color="#ffffff" loext:char-shading-value="0"/>
    </style:style>
    <style:style style:name="T847" style:family="text">
      <style:text-properties fo:color="#a31515" loext:opacity="100%" fo:font-weight="normal" fo:background-color="#ffffff" loext:char-shading-value="0"/>
    </style:style>
    <style:style style:name="T848" style:family="text">
      <style:text-properties fo:color="#0000ff" loext:opacity="100%" style:font-name="Courier" fo:font-size="11pt" style:font-size-asian="11pt" style:font-size-complex="11pt"/>
    </style:style>
    <style:style style:name="T849" style:family="text">
      <style:text-properties style:font-name="Courier" fo:font-size="11pt" style:font-size-asian="11pt" style:font-size-complex="11pt"/>
    </style:style>
    <style:style style:name="T850" style:family="text">
      <style:text-properties fo:color="#800080" loext:opacity="100%" style:font-name="Courier" fo:font-size="11pt" style:font-size-asian="11pt" style:font-size-complex="11pt"/>
    </style:style>
    <style:style style:name="T851" style:family="text">
      <style:text-properties style:font-name="Courier" fo:font-size="11pt" fo:font-style="italic" style:font-size-asian="11pt" style:font-style-asian="italic" style:font-size-complex="11pt" style:font-style-complex="italic"/>
    </style:style>
    <style:style style:name="T852" style:family="text">
      <style:text-properties fo:font-weight="normal" officeooo:rsid="0066cb1d" style:font-weight-asian="normal" style:font-weight-complex="normal"/>
    </style:style>
    <style:style style:name="T853" style:family="text">
      <style:text-properties style:font-name="Courier" fo:font-weight="normal" officeooo:rsid="0066cb1d" style:font-weight-asian="normal" style:font-weight-complex="normal"/>
    </style:style>
    <style:style style:name="T854" style:family="text">
      <style:text-properties fo:font-weight="normal" officeooo:rsid="00683d8e" style:font-weight-asian="normal" style:font-weight-complex="normal"/>
    </style:style>
    <style:style style:name="T855" style:family="text">
      <style:text-properties officeooo:rsid="00683d8e"/>
    </style:style>
    <style:style style:name="T856" style:family="text">
      <style:text-properties style:font-name="Courier" fo:font-size="10pt" officeooo:rsid="0066cb1d" style:font-size-asian="10pt" style:font-size-complex="10pt"/>
    </style:style>
    <style:style style:name="T857" style:family="text">
      <style:text-properties style:font-name="Courier" fo:font-size="10pt" officeooo:rsid="006d198d" style:font-size-asian="10pt" style:font-size-complex="10pt"/>
    </style:style>
    <style:style style:name="T858" style:family="text">
      <style:text-properties fo:font-weight="normal" officeooo:rsid="0068481c" style:font-weight-asian="normal" style:font-weight-complex="normal"/>
    </style:style>
    <style:style style:name="T859" style:family="text">
      <style:text-properties fo:font-size="13pt" fo:font-weight="bold" officeooo:rsid="006b484f" style:font-size-asian="13pt" style:font-weight-asian="bold" style:font-size-complex="13pt" style:font-weight-complex="bold"/>
    </style:style>
    <style:style style:name="T860" style:family="text">
      <style:text-properties style:font-name="Courier" fo:font-size="13pt" fo:font-weight="bold" officeooo:rsid="006b484f" style:font-size-asian="13pt" style:font-weight-asian="bold" style:font-size-complex="13pt" style:font-weight-complex="bold"/>
    </style:style>
    <style:style style:name="T861" style:family="text">
      <style:text-properties officeooo:rsid="0068abaa"/>
    </style:style>
    <style:style style:name="T862" style:family="text">
      <style:text-properties fo:font-weight="normal" officeooo:rsid="0068abaa" style:font-weight-asian="normal" style:font-weight-complex="normal"/>
    </style:style>
    <style:style style:name="T863" style:family="text">
      <style:text-properties style:font-name="Courier" fo:font-weight="normal" officeooo:rsid="0068abaa" style:font-weight-asian="normal" style:font-weight-complex="normal"/>
    </style:style>
    <style:style style:name="T864" style:family="text">
      <style:text-properties fo:font-weight="normal" officeooo:rsid="006a5ed7" style:font-weight-asian="normal" style:font-weight-complex="normal"/>
    </style:style>
    <style:style style:name="T865" style:family="text">
      <style:text-properties fo:font-weight="normal" officeooo:rsid="00747a71" style:font-weight-asian="normal" style:font-weight-complex="normal"/>
    </style:style>
    <style:style style:name="T866" style:family="text">
      <style:text-properties style:font-name="Courier" fo:font-weight="normal" officeooo:rsid="00747a71" style:font-weight-asian="normal" style:font-weight-complex="normal"/>
    </style:style>
    <style:style style:name="T867" style:family="text">
      <style:text-properties fo:background-color="#ffffff" loext:char-shading-value="0"/>
    </style:style>
    <style:style style:name="T868" style:family="text">
      <style:text-properties style:use-window-font-color="true" loext:opacity="0%" style:font-name="Courier" fo:font-size="10pt" fo:font-weight="normal" officeooo:rsid="0075f999" fo:background-color="#ffffff" loext:char-shading-value="0" style:font-size-asian="10pt" style:font-weight-asian="normal" style:font-size-complex="10pt" style:font-weight-complex="normal"/>
    </style:style>
    <style:style style:name="T869" style:family="text">
      <style:text-properties fo:color="#0000ff" loext:opacity="100%" style:font-name="Courier" fo:font-size="11pt" fo:font-weight="normal" officeooo:rsid="001da499" fo:background-color="#ffffff" loext:char-shading-value="0" style:font-size-asian="11pt" style:font-weight-asian="normal" style:font-size-complex="11pt" style:font-weight-complex="normal"/>
    </style:style>
    <style:style style:name="T870" style:family="text">
      <style:text-properties fo:color="#a31515" loext:opacity="100%" style:font-name="Courier" fo:font-size="11pt" fo:font-weight="normal" officeooo:rsid="001da499" fo:background-color="#ffffff" loext:char-shading-value="0" style:font-size-asian="11pt" style:font-weight-asian="normal" style:font-size-complex="11pt" style:font-weight-complex="normal"/>
    </style:style>
    <style:style style:name="T871" style:family="text">
      <style:text-properties style:use-window-font-color="true" loext:opacity="0%" fo:font-size="10pt" fo:font-weight="normal" officeooo:rsid="0075f999" style:font-size-asian="10pt" style:font-weight-asian="normal" style:font-size-complex="10pt" style:font-weight-complex="normal"/>
    </style:style>
    <style:style style:name="T872" style:family="text">
      <style:text-properties fo:color="#098658" loext:opacity="100%"/>
    </style:style>
    <style:style style:name="T873" style:family="text">
      <style:text-properties style:use-window-font-color="true" loext:opacity="0%" fo:font-size="10pt" fo:font-weight="normal" officeooo:rsid="0075f999" fo:background-color="#ffffff" loext:char-shading-value="0" style:font-size-asian="10pt" style:font-weight-asian="normal" style:font-size-complex="10pt" style:font-weight-complex="normal"/>
    </style:style>
    <style:style style:name="T874" style:family="text">
      <style:text-properties fo:color="#800080" loext:opacity="100%" fo:font-weight="normal" fo:background-color="#ffffff" loext:char-shading-value="0"/>
    </style:style>
    <style:style style:name="T875" style:family="text">
      <style:text-properties style:use-window-font-color="true" loext:opacity="0%" fo:font-size="12pt" fo:font-weight="bold" officeooo:rsid="00747a71" style:font-size-asian="10.5pt" style:font-weight-asian="bold" style:font-size-complex="12pt" style:font-weight-complex="bold"/>
    </style:style>
    <style:style style:name="T876" style:family="text">
      <style:text-properties style:use-window-font-color="true" loext:opacity="0%" fo:font-size="12pt" fo:font-weight="normal" officeooo:rsid="0085df3d" style:font-size-asian="10.5pt" style:font-weight-asian="normal" style:font-size-complex="12pt" style:font-weight-complex="normal"/>
    </style:style>
    <style:style style:name="T877" style:family="text">
      <style:text-properties officeooo:rsid="007acaea"/>
    </style:style>
    <style:style style:name="T878" style:family="text">
      <style:text-properties style:font-name="Courier" officeooo:rsid="007acaea"/>
    </style:style>
    <style:style style:name="T879" style:family="text">
      <style:text-properties style:use-window-font-color="true" loext:opacity="0%" style:font-name="Courier" fo:font-size="10pt" fo:font-weight="normal" officeooo:rsid="00764629" fo:background-color="#ffffff" loext:char-shading-value="0" style:font-size-asian="10pt" style:font-weight-asian="normal" style:font-size-complex="10pt" style:font-weight-complex="normal"/>
    </style:style>
    <style:style style:name="T880" style:family="text">
      <style:text-properties style:use-window-font-color="true" loext:opacity="0%" fo:font-size="10pt" fo:font-weight="normal" officeooo:rsid="00764629" style:font-size-asian="10pt" style:font-weight-asian="normal" style:font-size-complex="10pt" style:font-weight-complex="normal"/>
    </style:style>
    <style:style style:name="T881" style:family="text">
      <style:text-properties style:use-window-font-color="true" loext:opacity="0%" fo:font-size="10pt" fo:font-weight="normal" officeooo:rsid="00764629" fo:background-color="#ffffff" loext:char-shading-value="0" style:font-size-asian="10pt" style:font-weight-asian="normal" style:font-size-complex="10pt" style:font-weight-complex="normal"/>
    </style:style>
    <style:style style:name="T882" style:family="text">
      <style:text-properties fo:color="#098658" loext:opacity="100%" fo:font-weight="normal" fo:background-color="#ffffff" loext:char-shading-value="0"/>
    </style:style>
    <style:style style:name="T883" style:family="text">
      <style:text-properties style:use-window-font-color="true" loext:opacity="0%" fo:font-size="12pt" fo:font-weight="normal" officeooo:rsid="00747a71" style:font-size-asian="10.5pt" style:font-weight-asian="normal" style:font-size-complex="12pt" style:font-weight-complex="normal"/>
    </style:style>
    <style:style style:name="T884" style:family="text">
      <style:text-properties officeooo:rsid="007deb16"/>
    </style:style>
    <style:style style:name="T885" style:family="text">
      <style:text-properties style:font-name="Courier" officeooo:rsid="007deb16"/>
    </style:style>
    <style:style style:name="T886" style:family="text">
      <style:text-properties fo:font-weight="normal" officeooo:rsid="008157ea" style:font-weight-asian="normal" style:font-weight-complex="normal"/>
    </style:style>
    <style:style style:name="T887" style:family="text">
      <style:text-properties officeooo:rsid="008157ea"/>
    </style:style>
    <style:style style:name="T888" style:family="text">
      <style:text-properties style:font-name="Courier" officeooo:rsid="008157ea"/>
    </style:style>
    <style:style style:name="T889" style:family="text">
      <style:text-properties style:font-name="Liberation Serif" fo:font-size="13pt" fo:font-style="normal" fo:font-weight="bold" officeooo:rsid="01556250" style:font-size-asian="13pt" style:font-style-asian="normal" style:font-weight-asian="bold" style:font-size-complex="13pt" style:font-style-complex="normal" style:font-weight-complex="bold"/>
    </style:style>
    <style:style style:name="T890" style:family="text">
      <style:text-properties officeooo:rsid="006d198d"/>
    </style:style>
    <style:style style:name="T891" style:family="text">
      <style:text-properties officeooo:rsid="006e7c48"/>
    </style:style>
    <style:style style:name="T892" style:family="text">
      <style:text-properties officeooo:rsid="006fbad5"/>
    </style:style>
    <style:style style:name="T893" style:family="text">
      <style:text-properties officeooo:rsid="0071499f"/>
    </style:style>
    <style:style style:name="T894" style:family="text">
      <style:text-properties officeooo:rsid="008175ff"/>
    </style:style>
    <style:style style:name="T895" style:family="text">
      <style:text-properties officeooo:rsid="008294f6"/>
    </style:style>
    <style:style style:name="T896" style:family="text">
      <style:text-properties style:use-window-font-color="true" loext:opacity="0%" fo:font-size="10pt" fo:font-weight="normal" officeooo:rsid="008294f6" fo:background-color="#ffffff" loext:char-shading-value="0" style:font-size-asian="10pt" style:font-size-complex="10pt"/>
    </style:style>
    <style:style style:name="T897" style:family="text">
      <style:text-properties fo:color="#0000ff" loext:opacity="100%" fo:font-weight="normal" officeooo:rsid="008175ff" fo:background-color="#ffffff" loext:char-shading-value="0"/>
    </style:style>
    <style:style style:name="T898" style:family="text">
      <style:text-properties fo:color="#a31515" loext:opacity="100%" fo:font-weight="normal" officeooo:rsid="008175ff" fo:background-color="#ffffff" loext:char-shading-value="0"/>
    </style:style>
    <style:style style:name="T899" style:family="text">
      <style:text-properties style:use-window-font-color="true" loext:opacity="0%" fo:font-size="10pt" officeooo:rsid="00845c38" style:font-size-asian="10pt" style:font-size-complex="10pt"/>
    </style:style>
    <style:style style:name="T900" style:family="text">
      <style:text-properties style:use-window-font-color="true" loext:opacity="0%" fo:font-size="10pt" officeooo:rsid="008294f6" style:font-size-asian="10pt" style:font-size-complex="10pt"/>
    </style:style>
    <style:style style:name="T901" style:family="text">
      <style:text-properties style:use-window-font-color="true" loext:opacity="0%" style:font-name="Courier" fo:font-size="10pt" fo:font-weight="normal" officeooo:rsid="00845c38" fo:background-color="#ffffff" loext:char-shading-value="0" style:font-size-asian="10pt" style:font-size-complex="10pt"/>
    </style:style>
    <style:style style:name="T902" style:family="text">
      <style:text-properties style:use-window-font-color="true" loext:opacity="0%" style:font-name="Courier" fo:font-size="10pt" fo:font-weight="normal" officeooo:rsid="008294f6" fo:background-color="#ffffff" loext:char-shading-value="0" style:font-size-asian="10pt" style:font-size-complex="10pt"/>
    </style:style>
    <style:style style:name="T903" style:family="text">
      <style:text-properties style:use-window-font-color="true" loext:opacity="0%" fo:font-size="10pt" fo:font-weight="normal" officeooo:rsid="00845c38" fo:background-color="#ffffff" loext:char-shading-value="0" style:font-size-asian="10pt" style:font-size-complex="10pt"/>
    </style:style>
    <style:style style:name="T904" style:family="text">
      <style:text-properties style:use-window-font-color="true" loext:opacity="0%" fo:font-size="12pt" fo:font-weight="bold" officeooo:rsid="008294f6" style:font-size-asian="10.5pt" style:font-weight-asian="bold" style:font-size-complex="12pt" style:font-weight-complex="bold"/>
    </style:style>
    <style:style style:name="T905" style:family="text">
      <style:text-properties style:use-window-font-color="true" loext:opacity="0%" fo:font-size="12pt" fo:font-weight="bold" officeooo:rsid="0085df3d" style:font-size-asian="10.5pt" style:font-weight-asian="bold" style:font-size-complex="12pt" style:font-weight-complex="bold"/>
    </style:style>
    <style:style style:name="T906" style:family="text">
      <style:text-properties officeooo:rsid="0085df3d"/>
    </style:style>
    <style:style style:name="T907" style:family="text">
      <style:text-properties fo:font-weight="normal" officeooo:rsid="0085df3d" style:font-weight-asian="normal" style:font-weight-complex="normal"/>
    </style:style>
    <style:style style:name="T908" style:family="text">
      <style:text-properties fo:font-weight="normal" officeooo:rsid="009eff5d" style:font-weight-asian="normal" style:font-weight-complex="normal"/>
    </style:style>
    <style:style style:name="T909" style:family="text">
      <style:text-properties fo:font-weight="normal" officeooo:rsid="00b5cba9" style:font-weight-asian="normal" style:font-weight-complex="normal"/>
    </style:style>
    <style:style style:name="T910" style:family="text">
      <style:text-properties style:font-name="Courier" fo:font-weight="normal" officeooo:rsid="00b5cba9" style:font-weight-asian="normal" style:font-weight-complex="normal"/>
    </style:style>
    <style:style style:name="T911" style:family="text">
      <style:text-properties style:use-window-font-color="true" loext:opacity="0%" fo:font-size="10pt" officeooo:rsid="00b5cba9" style:font-size-asian="10pt" style:font-size-complex="10pt"/>
    </style:style>
    <style:style style:name="T912" style:family="text">
      <style:text-properties style:use-window-font-color="true" loext:opacity="0%" fo:font-size="10pt" officeooo:rsid="00b789f0" style:font-size-asian="10pt" style:font-size-complex="10pt"/>
    </style:style>
    <style:style style:name="T913" style:family="text">
      <style:text-properties style:use-window-font-color="true" loext:opacity="0%" style:font-name="Courier" fo:font-size="10pt" fo:font-weight="normal" officeooo:rsid="00b789f0" fo:background-color="#ffffff" loext:char-shading-value="0" style:font-size-asian="10pt" style:font-size-complex="10pt"/>
    </style:style>
    <style:style style:name="T914" style:family="text">
      <style:text-properties style:use-window-font-color="true" loext:opacity="0%" style:font-name="Courier" fo:font-size="10pt" fo:font-weight="normal" officeooo:rsid="00b5cba9" fo:background-color="#ffffff" loext:char-shading-value="0" style:font-size-asian="10pt" style:font-size-complex="10pt"/>
    </style:style>
    <style:style style:name="T915" style:family="text">
      <style:text-properties style:use-window-font-color="true" loext:opacity="0%" fo:font-size="10pt" fo:font-weight="normal" officeooo:rsid="00b5cba9" fo:background-color="#ffffff" loext:char-shading-value="0" style:font-size-asian="10pt" style:font-size-complex="10pt"/>
    </style:style>
    <style:style style:name="T916" style:family="text">
      <style:text-properties style:use-window-font-color="true" loext:opacity="0%" fo:font-size="10pt" fo:font-weight="normal" officeooo:rsid="00b789f0" fo:background-color="#ffffff" loext:char-shading-value="0" style:font-size-asian="10pt" style:font-size-complex="10pt"/>
    </style:style>
    <style:style style:name="T917" style:family="text">
      <style:text-properties style:use-window-font-color="true" loext:opacity="0%" fo:font-size="12pt" fo:font-weight="bold" officeooo:rsid="00b5cba9" style:font-size-asian="10.5pt" style:font-weight-asian="bold" style:font-size-complex="12pt" style:font-weight-complex="bold"/>
    </style:style>
    <style:style style:name="T918" style:family="text">
      <style:text-properties style:use-window-font-color="true" loext:opacity="0%" fo:font-size="12pt" fo:font-weight="normal" officeooo:rsid="00b5cba9" style:font-size-asian="10.5pt" style:font-weight-asian="normal" style:font-size-complex="12pt" style:font-weight-complex="normal"/>
    </style:style>
    <style:style style:name="T919" style:family="text">
      <style:text-properties style:use-window-font-color="true" loext:opacity="0%" fo:font-size="10pt" officeooo:rsid="00b9772b" style:font-size-asian="10pt" style:font-size-complex="10pt"/>
    </style:style>
    <style:style style:name="T920" style:family="text">
      <style:text-properties style:use-window-font-color="true" loext:opacity="0%" style:font-name="Courier" fo:font-size="10pt" fo:font-weight="normal" officeooo:rsid="00b9772b" fo:background-color="#ffffff" loext:char-shading-value="0" style:font-size-asian="10pt" style:font-size-complex="10pt"/>
    </style:style>
    <style:style style:name="T921" style:family="text">
      <style:text-properties style:use-window-font-color="true" loext:opacity="0%" fo:font-size="10pt" fo:font-weight="normal" officeooo:rsid="00b9772b" fo:background-color="#ffffff" loext:char-shading-value="0" style:font-size-asian="10pt" style:font-size-complex="10pt"/>
    </style:style>
    <style:style style:name="T922" style:family="text">
      <style:text-properties fo:font-weight="normal" officeooo:rsid="00ba640d" style:font-weight-asian="normal" style:font-weight-complex="normal"/>
    </style:style>
    <style:style style:name="T923" style:family="text">
      <style:text-properties fo:color="#000000" loext:opacity="100%" style:font-name="Courier" fo:font-size="11pt" fo:font-weight="normal" officeooo:rsid="00ba640d" fo:background-color="#ffffff" loext:char-shading-value="0" style:font-size-asian="11pt" style:font-weight-asian="normal" style:font-size-complex="11pt" style:font-weight-complex="normal"/>
    </style:style>
    <style:style style:name="T924" style:family="text">
      <style:text-properties style:font-name="Courier" fo:font-weight="normal" officeooo:rsid="00ba640d" style:font-weight-asian="normal" style:font-weight-complex="normal"/>
    </style:style>
    <style:style style:name="T925" style:family="text">
      <style:text-properties fo:font-size="13pt" officeooo:rsid="0087bea9" style:font-size-asian="13pt" style:font-size-complex="13pt"/>
    </style:style>
    <style:style style:name="T926" style:family="text">
      <style:text-properties style:font-name="Courier" fo:font-size="13pt" officeooo:rsid="0087bea9" style:font-size-asian="13pt" style:font-size-complex="13pt"/>
    </style:style>
    <style:style style:name="T927" style:family="text">
      <style:text-properties officeooo:rsid="008adbc2"/>
    </style:style>
    <style:style style:name="T928" style:family="text">
      <style:text-properties style:font-name="Courier" officeooo:rsid="008adbc2"/>
    </style:style>
    <style:style style:name="T929" style:family="text">
      <style:text-properties fo:font-weight="normal" officeooo:rsid="008c467b" style:font-weight-asian="normal" style:font-weight-complex="normal"/>
    </style:style>
    <style:style style:name="T930" style:family="text">
      <style:text-properties officeooo:rsid="008c6065"/>
    </style:style>
    <style:style style:name="T931" style:family="text">
      <style:text-properties officeooo:rsid="008c467b"/>
    </style:style>
    <style:style style:name="T932" style:family="text">
      <style:text-properties style:font-name="Liberation Serif" fo:font-size="13pt" fo:font-weight="bold" officeooo:rsid="00c93525" style:font-size-asian="13pt" style:font-weight-asian="bold" style:font-size-complex="13pt" style:font-weight-complex="bold"/>
    </style:style>
    <style:style style:name="T933" style:family="text">
      <style:text-properties style:font-name="Courier" officeooo:rsid="0091feae"/>
    </style:style>
    <style:style style:name="T934" style:family="text">
      <style:text-properties officeooo:rsid="009eeba6"/>
    </style:style>
    <style:style style:name="T935" style:family="text">
      <style:text-properties style:font-name="Courier" officeooo:rsid="009eeba6"/>
    </style:style>
    <style:style style:name="T936" style:family="text">
      <style:text-properties style:use-window-font-color="true" loext:opacity="0%" fo:font-size="10pt" fo:font-weight="normal" officeooo:rsid="0091feae" fo:background-color="#ffffff" loext:char-shading-value="0" style:font-size-asian="10pt" style:font-size-complex="10pt"/>
    </style:style>
    <style:style style:name="T937" style:family="text">
      <style:text-properties style:use-window-font-color="true" loext:opacity="0%" fo:font-size="10pt" officeooo:rsid="0091feae" style:font-size-asian="10pt" style:font-size-complex="10pt"/>
    </style:style>
    <style:style style:name="T938" style:family="text">
      <style:text-properties style:use-window-font-color="true" loext:opacity="0%" style:font-name="Courier" fo:font-size="10pt" fo:font-weight="normal" officeooo:rsid="0091feae" fo:background-color="#ffffff" loext:char-shading-value="0" style:font-size-asian="10pt" style:font-size-complex="10pt"/>
    </style:style>
    <style:style style:name="T939" style:family="text">
      <style:text-properties fo:color="#008000" loext:opacity="100%" style:font-name="Courier" fo:font-size="11pt" fo:font-weight="normal" fo:background-color="#ffffff" loext:char-shading-value="0" style:font-size-asian="11pt" style:font-size-complex="11pt"/>
    </style:style>
    <style:style style:name="T940" style:family="text">
      <style:text-properties style:use-window-font-color="true" loext:opacity="0%" fo:font-size="12pt" fo:font-weight="bold" officeooo:rsid="0091feae" style:font-size-asian="10.5pt" style:font-weight-asian="bold" style:font-size-complex="12pt" style:font-weight-complex="bold"/>
    </style:style>
    <style:style style:name="T941" style:family="text">
      <style:text-properties style:use-window-font-color="true" loext:opacity="0%" fo:font-size="12pt" fo:font-weight="normal" officeooo:rsid="0091feae" style:font-size-asian="10.5pt" style:font-weight-asian="normal" style:font-size-complex="12pt" style:font-weight-complex="normal"/>
    </style:style>
    <style:style style:name="T942" style:family="text">
      <style:text-properties style:use-window-font-color="true" loext:opacity="0%" style:font-name="Courier" fo:font-size="10pt" officeooo:rsid="0091feae" fo:background-color="#ffffff" loext:char-shading-value="0" style:font-size-asian="10pt" style:font-size-complex="10pt"/>
    </style:style>
    <style:style style:name="T943" style:family="text">
      <style:text-properties fo:color="#0000ff" loext:opacity="100%" style:font-name="Courier" fo:font-size="11pt" fo:background-color="#ffffff" loext:char-shading-value="0" style:font-size-asian="11pt" style:font-size-complex="11pt"/>
    </style:style>
    <style:style style:name="T944" style:family="text">
      <style:text-properties fo:color="#000000" loext:opacity="100%" style:font-name="Courier" fo:font-size="11pt" fo:background-color="#ffffff" loext:char-shading-value="0" style:font-size-asian="11pt" style:font-size-complex="11pt"/>
    </style:style>
    <style:style style:name="T945" style:family="text">
      <style:text-properties style:use-window-font-color="true" loext:opacity="0%" fo:font-size="10pt" officeooo:rsid="0091feae" fo:background-color="#ffffff" loext:char-shading-value="0" style:font-size-asian="10pt" style:font-size-complex="10pt"/>
    </style:style>
    <style:style style:name="T946" style:family="text">
      <style:text-properties fo:color="#0000ff" loext:opacity="100%" fo:background-color="#ffffff" loext:char-shading-value="0"/>
    </style:style>
    <style:style style:name="T947" style:family="text">
      <style:text-properties fo:color="#000000" loext:opacity="100%" fo:background-color="#ffffff" loext:char-shading-value="0"/>
    </style:style>
    <style:style style:name="T948" style:family="text">
      <style:text-properties fo:color="#800080" loext:opacity="100%" fo:background-color="#ffffff" loext:char-shading-value="0"/>
    </style:style>
    <style:style style:name="T949" style:family="text">
      <style:text-properties fo:color="#098658" loext:opacity="100%" fo:background-color="#ffffff" loext:char-shading-value="0"/>
    </style:style>
    <style:style style:name="T950" style:family="text">
      <style:text-properties officeooo:rsid="0098792b"/>
    </style:style>
    <style:style style:name="T951" style:family="text">
      <style:text-properties officeooo:rsid="009a318e"/>
    </style:style>
    <style:style style:name="T952" style:family="text">
      <style:text-properties officeooo:rsid="00b4ecf3"/>
    </style:style>
    <style:style style:name="T953" style:family="text">
      <style:text-properties style:font-name="Courier" officeooo:rsid="00b5cba9"/>
    </style:style>
    <style:style style:name="T954" style:family="text">
      <style:text-properties officeooo:rsid="00b5cba9"/>
    </style:style>
    <style:style style:name="T955" style:family="text">
      <style:text-properties fo:color="#000000" loext:opacity="100%" style:font-name="Courier" fo:font-size="11pt" fo:font-weight="normal" officeooo:rsid="00b5cba9" fo:background-color="#ffffff" loext:char-shading-value="0" style:font-size-asian="11pt" style:font-size-complex="11pt"/>
    </style:style>
    <style:style style:name="T956" style:family="text">
      <style:text-properties fo:color="#098658" loext:opacity="100%" style:font-name="Courier" fo:font-size="11pt" fo:font-weight="normal" fo:background-color="#ffffff" loext:char-shading-value="0" style:font-size-asian="11pt" style:font-size-complex="11pt"/>
    </style:style>
    <style:style style:name="T957" style:family="text">
      <style:text-properties fo:font-weight="normal" officeooo:rsid="009bd28f" style:font-weight-asian="normal" style:font-weight-complex="normal"/>
    </style:style>
    <style:style style:name="T958" style:family="text">
      <style:text-properties style:font-name="Liberation Serif" fo:font-size="13pt" fo:font-style="normal" fo:font-weight="bold" officeooo:rsid="01575da7" style:font-size-asian="13pt" style:font-style-asian="normal" style:font-weight-asian="bold" style:font-size-complex="13pt" style:font-style-complex="normal" style:font-weight-complex="bold"/>
    </style:style>
    <style:style style:name="T959" style:family="text">
      <style:text-properties style:font-name="Liberation Serif" fo:font-size="13pt" style:font-size-asian="13pt" style:font-size-complex="13pt"/>
    </style:style>
    <style:style style:name="T960" style:family="text">
      <style:text-properties fo:font-weight="normal" officeooo:rsid="00bd5a1b" style:font-weight-asian="normal" style:font-weight-complex="normal"/>
    </style:style>
    <style:style style:name="T961" style:family="text">
      <style:text-properties style:font-name="Courier" officeooo:rsid="00bd5a1b"/>
    </style:style>
    <style:style style:name="T962" style:family="text">
      <style:text-properties officeooo:rsid="00bd5a1b"/>
    </style:style>
    <style:style style:name="T963" style:family="text">
      <style:text-properties fo:font-style="italic" officeooo:rsid="00bd5a1b" style:font-style-asian="italic" style:font-style-complex="italic"/>
    </style:style>
    <style:style style:name="T964" style:family="text">
      <style:text-properties style:use-window-font-color="true" loext:opacity="0%" fo:font-size="10pt" fo:font-weight="normal" officeooo:rsid="00bd5a1b" fo:background-color="#ffffff" loext:char-shading-value="0" style:font-size-asian="10pt" style:font-weight-asian="normal" style:font-size-complex="10pt" style:font-weight-complex="normal"/>
    </style:style>
    <style:style style:name="T965" style:family="text">
      <style:text-properties fo:color="#0000ff" loext:opacity="100%" fo:font-weight="normal" officeooo:rsid="00bd5a1b" fo:background-color="#ffffff" loext:char-shading-value="0" style:font-weight-asian="normal" style:font-weight-complex="normal"/>
    </style:style>
    <style:style style:name="T966" style:family="text">
      <style:text-properties fo:color="#a31515" loext:opacity="100%" fo:font-weight="normal" officeooo:rsid="00bd5a1b" fo:background-color="#ffffff" loext:char-shading-value="0" style:font-weight-asian="normal" style:font-weight-complex="normal"/>
    </style:style>
    <style:style style:name="T967" style:family="text">
      <style:text-properties style:use-window-font-color="true" loext:opacity="0%" fo:font-size="10pt" officeooo:rsid="00bd5a1b" style:font-size-asian="10pt" style:font-weight-asian="normal" style:font-size-complex="10pt" style:font-weight-complex="normal"/>
    </style:style>
    <style:style style:name="T968" style:family="text">
      <style:text-properties style:use-window-font-color="true" loext:opacity="0%" style:font-name="Courier" fo:font-size="10pt" fo:font-weight="normal" officeooo:rsid="00bd5a1b" fo:background-color="#ffffff" loext:char-shading-value="0" style:font-size-asian="10pt" style:font-weight-asian="normal" style:font-size-complex="10pt" style:font-weight-complex="normal"/>
    </style:style>
    <style:style style:name="T969" style:family="text">
      <style:text-properties fo:color="#008000" loext:opacity="100%" fo:font-weight="normal" fo:background-color="#ffffff" loext:char-shading-value="0"/>
    </style:style>
    <style:style style:name="T970" style:family="text">
      <style:text-properties style:use-window-font-color="true" loext:opacity="0%" fo:font-size="12pt" fo:font-weight="bold" officeooo:rsid="00bd5a1b" style:font-size-asian="10.5pt" style:font-weight-asian="bold" style:font-size-complex="12pt" style:font-weight-complex="bold"/>
    </style:style>
    <style:style style:name="T971" style:family="text">
      <style:text-properties style:use-window-font-color="true" loext:opacity="0%" fo:font-size="12pt" fo:font-weight="bold" officeooo:rsid="00c07bf3" style:font-size-asian="10.5pt" style:font-weight-asian="bold" style:font-size-complex="12pt" style:font-weight-complex="bold"/>
    </style:style>
    <style:style style:name="T972" style:family="text">
      <style:text-properties style:use-window-font-color="true" loext:opacity="0%" fo:font-size="12pt" fo:font-weight="normal" officeooo:rsid="00bd5a1b" style:font-size-asian="10.5pt" style:font-weight-asian="normal" style:font-size-complex="12pt" style:font-weight-complex="normal"/>
    </style:style>
    <style:style style:name="T973" style:family="text">
      <style:text-properties style:use-window-font-color="true" loext:opacity="0%" fo:font-size="12pt" fo:font-weight="normal" officeooo:rsid="00c07bf3" style:font-size-asian="10.5pt" style:font-weight-asian="normal" style:font-size-complex="12pt" style:font-weight-complex="normal"/>
    </style:style>
    <style:style style:name="T974" style:family="text">
      <style:text-properties style:font-name="Courier" fo:font-weight="normal" officeooo:rsid="00bd5a1b" style:font-weight-asian="normal" style:font-weight-complex="normal"/>
    </style:style>
    <style:style style:name="T975" style:family="text">
      <style:text-properties style:use-window-font-color="true" loext:opacity="0%" fo:font-size="10pt" officeooo:rsid="00bd5a1b" style:font-size-asian="10pt" style:font-size-complex="10pt"/>
    </style:style>
    <style:style style:name="T976" style:family="text">
      <style:text-properties officeooo:rsid="00bf0956"/>
    </style:style>
    <style:style style:name="T977" style:family="text">
      <style:text-properties style:use-window-font-color="true" loext:opacity="0%" fo:font-size="10pt" officeooo:rsid="00bd5a1b" fo:background-color="#ffffff" loext:char-shading-value="0" style:font-size-asian="10pt" style:font-size-complex="10pt"/>
    </style:style>
    <style:style style:name="T978" style:family="text">
      <style:text-properties fo:font-size="11pt" fo:background-color="#ffffff" loext:char-shading-value="0" style:font-size-asian="11pt" style:font-size-complex="11pt"/>
    </style:style>
    <style:style style:name="T979" style:family="text">
      <style:text-properties fo:color="#800080" loext:opacity="100%" fo:font-size="11pt" fo:background-color="#ffffff" loext:char-shading-value="0" style:font-size-asian="11pt" style:font-size-complex="11pt"/>
    </style:style>
    <style:style style:name="T980" style:family="text">
      <style:text-properties fo:color="#0000ff" loext:opacity="100%" fo:font-size="11pt" fo:background-color="#ffffff" loext:char-shading-value="0" style:font-size-asian="11pt" style:font-size-complex="11pt"/>
    </style:style>
    <style:style style:name="T981" style:family="text">
      <style:text-properties fo:font-style="italic" fo:font-weight="normal" officeooo:rsid="00bd5a1b" style:font-style-asian="italic" style:font-weight-asian="normal" style:font-style-complex="italic" style:font-weight-complex="normal"/>
    </style:style>
    <style:style style:name="T982" style:family="text">
      <style:text-properties style:font-name="Courier" fo:font-style="italic" fo:font-weight="normal" officeooo:rsid="00bd5a1b" style:font-style-asian="italic" style:font-weight-asian="normal" style:font-style-complex="italic" style:font-weight-complex="normal"/>
    </style:style>
    <style:style style:name="T983" style:family="text">
      <style:text-properties fo:font-weight="normal" officeooo:rsid="00c19845" style:font-weight-asian="normal" style:font-weight-complex="normal"/>
    </style:style>
    <style:style style:name="T984" style:family="text">
      <style:text-properties officeooo:rsid="00c19845"/>
    </style:style>
    <style:style style:name="T985" style:family="text">
      <style:text-properties fo:font-weight="normal" officeooo:rsid="00c2d228" style:font-weight-asian="normal" style:font-weight-complex="normal"/>
    </style:style>
    <style:style style:name="T986" style:family="text">
      <style:text-properties fo:color="#000000" loext:opacity="100%" style:font-name="Courier" fo:font-weight="normal" officeooo:rsid="00c2d228" fo:background-color="#ffffff" loext:char-shading-value="0" style:font-weight-asian="normal" style:font-weight-complex="normal"/>
    </style:style>
    <style:style style:name="T987" style:family="text">
      <style:text-properties fo:font-size="12pt" fo:font-weight="normal" officeooo:rsid="00c2d228" style:font-size-asian="12pt" style:font-weight-asian="normal" style:font-size-complex="12pt" style:font-weight-complex="normal"/>
    </style:style>
    <style:style style:name="T988" style:family="text">
      <style:text-properties fo:color="#000000" loext:opacity="100%" style:font-name="Courier" fo:font-size="12pt" fo:font-weight="normal" officeooo:rsid="00c2d228" fo:background-color="#ffffff" loext:char-shading-value="0" style:font-size-asian="12pt" style:font-weight-asian="normal" style:font-size-complex="12pt" style:font-weight-complex="normal"/>
    </style:style>
    <style:style style:name="T989" style:family="text">
      <style:text-properties fo:font-size="12pt" fo:font-weight="normal" officeooo:rsid="00c3d5c5" style:font-size-asian="12pt" style:font-weight-asian="normal" style:font-size-complex="12pt" style:font-weight-complex="normal"/>
    </style:style>
    <style:style style:name="T990" style:family="text">
      <style:text-properties fo:font-size="12pt" fo:font-style="italic" fo:font-weight="normal" officeooo:rsid="00c3d5c5" style:font-size-asian="12pt" style:font-style-asian="italic" style:font-weight-asian="normal" style:font-size-complex="12pt" style:font-style-complex="italic" style:font-weight-complex="normal"/>
    </style:style>
    <style:style style:name="T991" style:family="text">
      <style:text-properties style:use-window-font-color="true" loext:opacity="0%" fo:font-size="10pt" fo:font-weight="normal" officeooo:rsid="00c3d5c5" fo:background-color="#ffffff" loext:char-shading-value="0" style:font-size-asian="10pt" style:font-weight-asian="normal" style:font-size-complex="10pt" style:font-weight-complex="normal"/>
    </style:style>
    <style:style style:name="T992" style:family="text">
      <style:text-properties fo:color="#0000ff" loext:opacity="100%" fo:font-weight="normal" officeooo:rsid="00c2d228" fo:background-color="#ffffff" loext:char-shading-value="0" style:font-weight-asian="normal" style:font-weight-complex="normal"/>
    </style:style>
    <style:style style:name="T993" style:family="text">
      <style:text-properties fo:color="#a31515" loext:opacity="100%" fo:font-weight="normal" officeooo:rsid="00c2d228" fo:background-color="#ffffff" loext:char-shading-value="0" style:font-weight-asian="normal" style:font-weight-complex="normal"/>
    </style:style>
    <style:style style:name="T994" style:family="text">
      <style:text-properties style:use-window-font-color="true" loext:opacity="0%" fo:font-size="10pt" officeooo:rsid="00c3d5c5" style:font-size-asian="10pt" style:font-weight-asian="normal" style:font-size-complex="10pt" style:font-weight-complex="normal"/>
    </style:style>
    <style:style style:name="T995" style:family="text">
      <style:text-properties style:use-window-font-color="true" loext:opacity="0%" style:font-name="Courier" fo:font-size="10pt" fo:font-weight="normal" officeooo:rsid="00c3d5c5" fo:background-color="#ffffff" loext:char-shading-value="0" style:font-size-asian="10pt" style:font-weight-asian="normal" style:font-size-complex="10pt" style:font-weight-complex="normal"/>
    </style:style>
    <style:style style:name="T996" style:family="text">
      <style:text-properties style:use-window-font-color="true" loext:opacity="0%" fo:font-size="12pt" fo:font-weight="bold" officeooo:rsid="00c3d5c5" style:font-size-asian="10.5pt" style:font-weight-asian="bold" style:font-size-complex="12pt" style:font-weight-complex="bold"/>
    </style:style>
    <style:style style:name="T997" style:family="text">
      <style:text-properties style:use-window-font-color="true" loext:opacity="0%" fo:font-size="12pt" fo:font-weight="normal" officeooo:rsid="00c7aed8" style:font-size-asian="10.5pt" style:font-weight-asian="normal" style:font-size-complex="12pt" style:font-weight-complex="normal"/>
    </style:style>
    <style:style style:name="T998" style:family="text">
      <style:text-properties fo:font-weight="normal" officeooo:rsid="00c4d2f6" style:font-weight-asian="normal" style:font-weight-complex="normal"/>
    </style:style>
    <style:style style:name="T999" style:family="text">
      <style:text-properties style:font-name="Courier" fo:font-weight="normal" officeooo:rsid="00c4d2f6" style:font-weight-asian="normal" style:font-weight-complex="normal"/>
    </style:style>
    <style:style style:name="T1000" style:family="text">
      <style:text-properties style:use-window-font-color="true" loext:opacity="0%" fo:font-size="10pt" officeooo:rsid="00c3d5c5" style:font-size-asian="10pt" style:font-size-complex="10pt"/>
    </style:style>
    <style:style style:name="T1001" style:family="text">
      <style:text-properties fo:font-weight="normal" officeooo:rsid="00c5e026" style:font-weight-asian="normal" style:font-weight-complex="normal"/>
    </style:style>
    <style:style style:name="T1002" style:family="text">
      <style:text-properties officeooo:rsid="00c5e026"/>
    </style:style>
    <style:style style:name="T1003" style:family="text">
      <style:text-properties style:use-window-font-color="true" loext:opacity="0%" style:font-name="Courier" fo:font-size="10pt" officeooo:rsid="00c3d5c5" fo:background-color="#ffffff" loext:char-shading-value="0" style:font-size-asian="10pt" style:font-size-complex="10pt"/>
    </style:style>
    <style:style style:name="T1004" style:family="text">
      <style:text-properties fo:color="#800080" loext:opacity="100%" style:font-name="Courier" fo:font-size="11pt" fo:background-color="#ffffff" loext:char-shading-value="0" style:font-size-asian="11pt" style:font-size-complex="11pt"/>
    </style:style>
    <style:style style:name="T1005" style:family="text">
      <style:text-properties fo:color="#098658" loext:opacity="100%" style:font-name="Courier" fo:font-size="11pt" fo:background-color="#ffffff" loext:char-shading-value="0" style:font-size-asian="11pt" style:font-size-complex="11pt"/>
    </style:style>
    <style:style style:name="T1006" style:family="text">
      <style:text-properties fo:font-style="italic" fo:font-weight="normal" officeooo:rsid="00c4d2f6" style:font-style-asian="italic" style:font-weight-asian="normal" style:font-style-complex="italic" style:font-weight-complex="normal"/>
    </style:style>
    <style:style style:name="T1007" style:family="text">
      <style:text-properties style:font-name="Courier" fo:font-style="italic" fo:font-weight="normal" officeooo:rsid="00c4d2f6" style:font-style-asian="italic" style:font-weight-asian="normal" style:font-style-complex="italic" style:font-weight-complex="normal"/>
    </style:style>
    <style:style style:name="T1008" style:family="text">
      <style:text-properties officeooo:rsid="00c7aed8"/>
    </style:style>
    <style:style style:name="T1009" style:family="text">
      <style:text-properties officeooo:rsid="00c4d2f6"/>
    </style:style>
    <style:style style:name="T1010" style:family="text">
      <style:text-properties style:font-name="Courier" officeooo:rsid="00c4d2f6"/>
    </style:style>
    <style:style style:name="T1011" style:family="text">
      <style:text-properties officeooo:rsid="00295faa"/>
    </style:style>
    <style:style style:name="T1012" style:family="text">
      <style:text-properties officeooo:rsid="04d6b779"/>
    </style:style>
    <style:style style:name="T1013" style:family="text">
      <style:text-properties officeooo:rsid="002277f8"/>
    </style:style>
    <style:style style:name="T1014" style:family="text">
      <style:text-properties style:font-size-asian="12pt"/>
    </style:style>
    <style:style style:name="T1015" style:family="text">
      <style:text-properties officeooo:rsid="052a33d6"/>
    </style:style>
    <style:style style:name="T1016" style:family="text">
      <style:text-properties officeooo:rsid="00240c35"/>
    </style:style>
    <style:style style:name="T1017" style:family="text">
      <style:text-properties fo:font-size="12pt" fo:font-weight="normal" officeooo:rsid="0027bfe5" style:font-size-asian="12pt" style:font-weight-asian="normal" style:font-size-complex="12pt" style:font-weight-complex="normal"/>
    </style:style>
    <style:style style:name="T1018" style:family="text">
      <style:text-properties fo:font-size="12pt" fo:font-style="normal" fo:font-weight="normal" officeooo:rsid="0027bfe5" style:font-size-asian="12pt" style:font-style-asian="normal" style:font-weight-asian="normal" style:font-size-complex="12pt" style:font-style-complex="normal" style:font-weight-complex="normal"/>
    </style:style>
    <style:style style:name="T1019" style:family="text">
      <style:text-properties fo:font-size="12pt" style:font-size-asian="12pt" style:font-size-complex="12pt"/>
    </style:style>
    <style:style style:name="T1020" style:family="text">
      <style:text-properties officeooo:rsid="0029d5a1"/>
    </style:style>
    <style:style style:name="T1021" style:family="text">
      <style:text-properties fo:font-size="12pt" officeooo:rsid="00295faa" style:font-size-asian="12pt" style:font-size-complex="12pt"/>
    </style:style>
    <style:style style:name="T1022" style:family="text">
      <style:text-properties fo:font-weight="bold" style:font-weight-asian="bold" style:font-weight-complex="bold"/>
    </style:style>
    <style:style style:name="T1023" style:family="text">
      <style:text-properties fo:font-weight="bold" officeooo:rsid="0027bfe5" style:font-weight-asian="bold" style:font-weight-complex="bold"/>
    </style:style>
    <style:style style:name="T1024" style:family="text">
      <style:text-properties fo:font-weight="bold" officeooo:rsid="002a474c" style:font-weight-asian="bold" style:font-weight-complex="bold"/>
    </style:style>
    <style:style style:name="T1025" style:family="text">
      <style:text-properties fo:font-weight="bold" officeooo:rsid="002b565e"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2">Advanced programming in the Linux environment</text:p>
      <text:p text:style-name="P2"/>
      <text:p text:style-name="P2">Book Proposal</text:p>
      <text:p text:style-name="P2"/>
      <text:p text:style-name="P2"/>
      <text:p text:style-name="P3">by</text:p>
      <text:p text:style-name="P3">Marco Bruno</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Proposal contents</text:p>
      <text:p text:style-name="P4"/>
      <text:p text:style-name="P4">Description………………………………………………………………...<text:span text:style-name="T1">3</text:span></text:p>
      <text:p text:style-name="P4"/>
      <text:p text:style-name="P4">About the author<text:span text:style-name="T2">s…………………………………………………………..</text:span><text:span text:style-name="T1">4</text:span></text:p>
      <text:p text:style-name="P4"/>
      <text:p text:style-name="P6">Table of contents<text:span text:style-name="T2">………………………………………..…………………..</text:span><text:span text:style-name="T1">5</text:span></text:p>
      <text:p text:style-name="P4"/>
      <text:p text:style-name="P6">Annotated table of contents<text:span text:style-name="T2">………………………………………………..</text:span><text:span text:style-name="T1">18</text:span></text:p>
      <text:p text:style-name="P4"/>
      <text:p text:style-name="P6">Sample Chapter<text:span text:style-name="T2">…………………………………………………………….</text:span><text:span text:style-name="T1">20</text:span></text:p>
      <text:p text:style-name="P4"/>
      <text:p text:style-name="P6">The Competition<text:span text:style-name="T2">……………………………………………………………</text:span><text:span text:style-name="T1">47</text:span></text:p>
      <text:p text:style-name="P4"/>
      <text:p text:style-name="P6">Contact Information<text:span text:style-name="T2">………………………………………………………...</text:span><text:span text:style-name="T1">48</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Description</text:p>
      <text:p text:style-name="P4"/>
      <text:p text:style-name="P8"><text:span text:style-name="Emphasis"><text:span text:style-name="T3">Advanced Programming in the Linux Environment</text:span></text:span><text:span text:style-name="T3"> offers a comprehensive and rigorously structured exploration of system programming in C on Linux. Rooted in the authoritative Linux manual pages, the book organizes a vast and complex body of knowledge into a coherent progression, guiding readers from fundamental concepts to advanced system-level techniques.</text:span></text:p>
      <text:p text:style-name="P9"/>
      <text:p text:style-name="P9">The work is designed to function both as an academic text and as a professional reference. Its primary objective is to develop a deep, operational understanding of system programming, enabling readers to confidently apply concepts in study, teaching, and real-world software development. By combining theoretical clarity with practical implementation, the book addresses the needs of students, educators, and experienced programmers alike.</text:p>
      <text:p text:style-name="P9"/>
      <text:p text:style-name="P9">C programming on Linux remains the foundation for building user applications, system utilities, services, network software, and libraries. This book provides an extensive and detailed treatment of these domains through carefully documented code examples, in-depth technical analysis, and systematic testing. Each concept is illustrated through real, executable programs, ensuring both clarity and practical relevance.</text:p>
      <text:p text:style-name="P9"/>
      <text:p text:style-name="P9">A defining feature of the book is its close integration with the Linux manual pages. For each library function, multiple usage examples are presented, transforming reference material into an accessible and application-oriented resource. This methodology bridges the gap between documentation and practice, enabling readers to move seamlessly from understanding to implementation.</text:p>
      <text:p text:style-name="P9"/>
      <text:p text:style-name="P9">Beyond covering the standard topics expected in works of this kind, the book distinguishes itself by addressing advanced and often underrepresented areas, including recent developments in the Linux ecosystem. It thus serves as a complete and up-to-date reference for modern system programming in C.</text:p>
      <text:p text:style-name="P8"><text:span text:style-name="T3">Particular emphasis is placed on understanding how software operates at the system level. Programs are not only written and explained, but also analyzed using diagnostic and debugging tools such as </text:span><text:span text:style-name="Emphasis"><text:span text:style-name="T3">strace</text:span></text:span><text:span text:style-name="T3"> and </text:span><text:span text:style-name="Emphasis"><text:span text:style-name="T3">gdb</text:span></text:span><text:span text:style-name="T3">. Readers are guided through the lifecycle of a program, from loading into memory to execution, interaction with system components, and termination, gaining insight into the underlying mechanisms of the operating system.</text:span></text:p>
      <text:p text:style-name="P9"/>
      <text:p text:style-name="P10"><text:span text:style-name="T4">The book covers all core areas of system programming, including file I/O, file and directory interfaces, environment variables and system databases, memory management, processes and threads, interprocess communication (IPC), and terminal handling. Advanced topics such as asynchronous I/O, the ELF binary format, UNIX</text:span><text:span text:style-name="T5"> </text:span><text:span text:style-name="T4">domain sockets, multithreaded programming, system integration, and PAM modules are examined in depth.</text:span></text:p>
      <text:p text:style-name="P8"><text:span text:style-name="T3">Each chapter concludes with a dedicated </text:span><text:span text:style-name="Emphasis"><text:span text:style-name="T3">Theory and Insights</text:span></text:span><text:span text:style-name="T3"> section, offering deeper analysis and conceptual discussion to reinforce learning and encourage critical understanding of the material.</text:span></text:p>
      <text:p text:style-name="P8"><text:span text:style-name="T3">Combining breadth, depth, and practical focus, </text:span><text:span text:style-name="Emphasis"><text:span text:style-name="T3">Advanced Programming in the Linux Environment</text:span></text:span><text:span text:style-name="T3"> stands as a definitive resource for mastering system programming in C on Linux.</text:span></text:p>
      <text:p text:style-name="P4"/>
      <text:p text:style-name="P4"/>
      <text:p text:style-name="P11"/>
      <text:p text:style-name="P11"/>
      <text:p text:style-name="P11"/>
      <text:p text:style-name="P11"/>
      <text:p text:style-name="P11"><text:soft-page-break/>About the authors</text:p>
      <text:p text:style-name="P11"/>
      <text:p text:style-name="P12">Marco Bruno</text:p>
      <text:p text:style-name="Standard"><text:span text:style-name="T6">Marco Bruno</text:span> is a software developer and educator with over twenty years of experience in information technology and professional training. He began his career as a system administrator, working extensively with UNIX and Linux systems, where he developed strong expertise in system-level operations.</text:p>
      <text:p text:style-name="Standard"/>
      <text:p text:style-name="Standard">Over time, he specialized in C programming on Linux, focusing on system programming and low-level software development. He has taught these subjects through private courses and technical training programs, combining practical experience with a clear and methodical teaching approach.</text:p>
      <text:p text:style-name="Standard">He has also gained significant international working experience, collaborating with companies and professionals across different countries and technical environments. This exposure has contributed to a broad and adaptable perspective on software development practices and system architectures.</text:p>
      <text:p text:style-name="Standard"/>
      <text:p text:style-name="Standard">Throughout his career, Mr. <text:span text:style-name="T7">Bruno</text:span> has developed software for a wide range of companies, working across multiple domains, including system software, user applications, network programming, and web development. His experience spans several widely used programming languages, including C, Python, and Java.</text:p>
      <text:p text:style-name="Text_20_body">He combines extensive industry experience with a strong ability to both develop complex software systems and effectively teach their underlying principles.</text:p>
      <text:p text:style-name="Text_20_body"/>
      <text:p text:style-name="Standard"/>
      <text:p text:style-name="Standard"/>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Table of contents</text:p>
      <text:p text:style-name="P13"/>
      <text:p text:style-name="P15"><text:span text:style-name="T8">Chapter</text:span> 0 – <text:span text:style-name="T9">Tools</text:span></text:p>
      <text:p text:style-name="P16"/>
      <text:p text:style-name="P17"><text:span text:style-name="T10">0.1. </text:span><text:span text:style-name="T11">C</text:span><text:span text:style-name="T12">ode, functions and commands</text:span></text:p>
      <text:p text:style-name="P18"><text:span text:style-name="T13">0.2. </text:span>Compil<text:span text:style-name="T9">ation</text:span></text:p>
      <text:p text:style-name="P19"><text:span text:style-name="T14">0.3. </text:span><text:span text:style-name="T9">Build details</text:span></text:p>
      <text:p text:style-name="P20">0.<text:span text:style-name="T15">4.</text:span> <text:span text:style-name="T16">The </text:span>GNU C Compiler</text:p>
      <text:p text:style-name="P21"><text:tab/>0.4.1 The linker</text:p>
      <text:p text:style-name="P20"><text:tab/><text:span text:style-name="T17">0.4.2 </text:span><text:span text:style-name="T18">Executable files and </text:span><text:span text:style-name="T19">cross-compiling</text:span></text:p>
      <text:p text:style-name="P22">0.<text:span text:style-name="T15">5.</text:span> <text:span text:style-name="T9">The standard library and</text:span><text:span text:style-name="T20"> </text:span><text:span text:style-name="T21">the </text:span>header<text:span text:style-name="T9">s</text:span></text:p>
      <text:p text:style-name="P23"><text:span text:style-name="T22">0.</text:span><text:span text:style-name="T23">6. </text:span><text:span text:style-name="T22">Make</text:span></text:p>
      <text:p text:style-name="P24">0.7. Autoconf</text:p>
      <text:p text:style-name="P25">0.<text:span text:style-name="T24">8.</text:span> Gdb</text:p>
      <text:p text:style-name="P26">0.<text:span text:style-name="T25">9.</text:span> <text:span text:style-name="T9">The</text:span> Linux File System</text:p>
      <text:p text:style-name="P27">0.<text:span text:style-name="T26">10. </text:span><text:span text:style-name="T21">Documentatio</text:span><text:span text:style-name="T27">n</text:span></text:p>
      <text:p text:style-name="P28"><text:span text:style-name="T28"><text:tab/>0.10.1 </text:span><text:span text:style-name="T29">gman</text:span><text:span text:style-name="T30"> </text:span><text:span text:style-name="T31">and</text:span><text:span text:style-name="T30"> </text:span><text:span text:style-name="T32">gtkman</text:span></text:p>
      <text:p text:style-name="P28"><text:span text:style-name="T33"><text:tab/>0.10.2 </text:span><text:span text:style-name="T29">whatis</text:span></text:p>
      <text:p text:style-name="P27"><text:span text:style-name="T34"><text:tab/>0.10.3 </text:span><text:span text:style-name="T35">info</text:span></text:p>
      <text:p text:style-name="P28"><text:span text:style-name="T36"><text:tab/></text:span><text:span text:style-name="T33">0.10.4 </text:span><text:span text:style-name="T29">apropos</text:span></text:p>
      <text:p text:style-name="P27"><text:tab/><text:span text:style-name="T34">0.10.5 </text:span><text:span text:style-name="T37">The </text:span><text:span text:style-name="T38">g</text:span><text:span text:style-name="T39">libc</text:span><text:span text:style-name="T34"> documentation</text:span></text:p>
      <text:p text:style-name="P27">0.<text:span text:style-name="T24">1</text:span><text:span text:style-name="T26">1.</text:span> <text:span text:style-name="T9">The source code</text:span></text:p>
      <text:p text:style-name="P29">0.12. Error handling and exit functions</text:p>
      <text:p text:style-name="P30">0.1<text:span text:style-name="T40">3.</text:span> <text:span text:style-name="T9">The S</text:span>tandards</text:p>
      <text:p text:style-name="P31">0.1<text:span text:style-name="T40">4.</text:span> <text:span text:style-name="T9">The</text:span> <text:span text:style-name="T41">GNU General Public License</text:span></text:p>
      <text:p text:style-name="P28"><text:span text:style-name="T42">0.1</text:span><text:span text:style-name="T43">5.</text:span><text:span text:style-name="T44"> </text:span><text:span text:style-name="T45">T</text:span><text:span text:style-name="T44">heory </text:span><text:span text:style-name="T31">and</text:span><text:span text:style-name="T44"> </text:span><text:span text:style-name="T31">i</text:span><text:span text:style-name="T44">nsights</text:span></text:p>
      <text:p text:style-name="P32"><text:tab/><text:span text:style-name="T46">0.15.1 </text:span><text:span text:style-name="T47">The GNU C </text:span><text:span text:style-name="T48">C</text:span><text:span text:style-name="T47">ompiler: </text:span><text:span text:style-name="T49">gcc</text:span></text:p>
      <text:p text:style-name="P28"><text:span text:style-name="T50"><text:tab/></text:span><text:span text:style-name="T51">0.15.2 </text:span><text:span text:style-name="T52">The GNU Debugger: </text:span><text:span text:style-name="T53">gdb</text:span></text:p>
      <text:p text:style-name="P32"><text:tab/><text:span text:style-name="T46">0.15.3 </text:span><text:span text:style-name="T54">Bytes order</text:span></text:p>
      <text:p text:style-name="P32"><text:tab/><text:span text:style-name="T46">0.15.4 </text:span><text:span text:style-name="T54">Static and dynamic linking</text:span></text:p>
      <text:p text:style-name="P28"><text:span text:style-name="T55">L</text:span><text:span text:style-name="T45">ist of </text:span><text:span text:style-name="T56">tables</text:span></text:p>
      <text:p text:style-name="P28"><text:span text:style-name="T45">List of </text:span><text:span text:style-name="T56">figures</text:span></text:p>
      <text:p text:style-name="P33"/>
      <text:p text:style-name="P34"><text:span text:style-name="T57">Chapter</text:span> <text:span text:style-name="T58">I</text:span> –<text:span text:style-name="T59"> </text:span><text:span text:style-name="T60">File </text:span><text:span text:style-name="T59">I/O</text:span></text:p>
      <text:p text:style-name="P34"/>
      <text:p text:style-name="P35">I.1 <text:span text:style-name="T60">Read</text:span><text:span text:style-name="T61">ing</text:span><text:span text:style-name="T60"> </text:span>files</text:p>
      <text:p text:style-name="P28"><text:span text:style-name="T62"><text:tab/>I.1.1 Open</text:span><text:span text:style-name="T63">ing</text:span><text:span text:style-name="T62"> files: </text:span><text:span text:style-name="T64">open</text:span><text:span text:style-name="T62"> and </text:span><text:span text:style-name="T65">close</text:span></text:p>
      <text:p text:style-name="P28"><text:span text:style-name="T66"><text:tab/></text:span><text:span text:style-name="T67">I.1.2 Read</text:span><text:span text:style-name="T63">ing</text:span><text:span text:style-name="T67"> from file: </text:span><text:span text:style-name="T64">read</text:span></text:p>
      <text:p text:style-name="P28"><text:span text:style-name="T68"><text:tab/>I.1.3 </text:span><text:span text:style-name="T69">Writ</text:span><text:span text:style-name="T63">ing</text:span><text:span text:style-name="T69"> to file: </text:span><text:span text:style-name="T64">write</text:span></text:p>
      <text:p text:style-name="P28"><text:span text:style-name="T66"><text:tab/></text:span><text:span text:style-name="T70">I.1.4 The standard library functions: </text:span><text:span text:style-name="T64">fopen,</text:span><text:span text:style-name="T69"> </text:span><text:span text:style-name="T64">fclose</text:span><text:span text:style-name="T70"> and </text:span><text:span text:style-name="T64">fcloseall</text:span></text:p>
      <text:p text:style-name="P28"><text:span text:style-name="T66"><text:tab/></text:span><text:span text:style-name="T71">I.1.5 Read</text:span><text:span text:style-name="T63">ing</text:span><text:span text:style-name="T71"> one character at a time: </text:span><text:span text:style-name="T64">fgetc</text:span><text:span text:style-name="T72"> and </text:span><text:span text:style-name="T64">fputc</text:span></text:p>
      <text:p text:style-name="P28"><text:span text:style-name="T66"><text:tab/></text:span><text:span text:style-name="T73">I.1.</text:span><text:span text:style-name="T72">6</text:span><text:span text:style-name="T73"> Read</text:span><text:span text:style-name="T63">ing</text:span><text:span text:style-name="T73"> one line at a time: </text:span><text:span text:style-name="T64">fgets</text:span><text:span text:style-name="T72"> and </text:span><text:span text:style-name="T64">fputs</text:span></text:p>
      <text:p text:style-name="P36">I.2 <text:span text:style-name="T60">Open</text:span><text:span text:style-name="T61">ing</text:span> files</text:p>
      <text:p text:style-name="P28"><text:span text:style-name="T74"><text:tab/>I.2.1 The </text:span><text:span text:style-name="T75">fdopen</text:span><text:span text:style-name="T74"> </text:span><text:span text:style-name="T76">and</text:span><text:span text:style-name="T74"> </text:span><text:span text:style-name="T75">fileno</text:span><text:span text:style-name="T74"> functions</text:span></text:p>
      <text:p text:style-name="P28"><text:span text:style-name="T77"><text:tab/></text:span><text:span text:style-name="T74">I.2.2 The </text:span><text:span text:style-name="T75">freopen</text:span><text:span text:style-name="T74"> function </text:span></text:p>
      <text:p text:style-name="P36"><text:soft-page-break/><text:tab/><text:span text:style-name="T78">I.2.</text:span><text:span text:style-name="T79">3</text:span><text:span text:style-name="T78"> The </text:span><text:span text:style-name="T80">open</text:span><text:span text:style-name="T78"> f</text:span><text:span text:style-name="T79">lags</text:span></text:p>
      <text:p text:style-name="P28"><text:span text:style-name="T77">I.3</text:span><text:span text:style-name="T81"> </text:span><text:span text:style-name="T82">Writ</text:span><text:span text:style-name="T63">ing</text:span><text:span text:style-name="T82"> </text:span><text:span text:style-name="T81">files</text:span></text:p>
      <text:p text:style-name="P37">I.<text:span text:style-name="T83">4</text:span> <text:span text:style-name="T84">Set</text:span><text:span text:style-name="T61">ting</text:span><text:span text:style-name="T84"> </text:span><text:span text:style-name="T85">file </text:span><text:span text:style-name="T84">position</text:span></text:p>
      <text:p text:style-name="P28"><text:span text:style-name="T86"><text:tab/>I.4.1 The </text:span><text:span text:style-name="T75">lseek</text:span><text:span text:style-name="T86"> function</text:span></text:p>
      <text:p text:style-name="P28"><text:span text:style-name="T86"><text:tab/>I.4.2 Get</text:span><text:span text:style-name="T63">ting</text:span><text:span text:style-name="T86"> and set</text:span><text:span text:style-name="T63">ting</text:span><text:span text:style-name="T86"> the poistion: </text:span><text:span text:style-name="T87">fgetpos</text:span><text:span text:style-name="T86"> and </text:span><text:span text:style-name="T87">fsetpos</text:span></text:p>
      <text:p text:style-name="P28"><text:span text:style-name="T81"><text:tab/></text:span><text:span text:style-name="T88">I.4.3 The </text:span><text:span text:style-name="T75">fseeko</text:span><text:span text:style-name="T88"> and </text:span><text:span text:style-name="T75">ftello</text:span><text:span text:style-name="T88"> functions</text:span></text:p>
      <text:p text:style-name="P38">I.<text:span text:style-name="T83">5</text:span> <text:span text:style-name="T60">Append</text:span><text:span text:style-name="T61">ing</text:span><text:span text:style-name="T60"> to </text:span><text:span text:style-name="T89">files</text:span></text:p>
      <text:p text:style-name="P37">I.<text:span text:style-name="T83">6</text:span> <text:span text:style-name="T60">Creat</text:span><text:span text:style-name="T61">ing</text:span><text:span text:style-name="T60"> </text:span>files</text:p>
      <text:p text:style-name="P28"><text:span text:style-name="T81"><text:tab/></text:span><text:span text:style-name="T90">I.6.1 The </text:span><text:span text:style-name="T75">open</text:span><text:span text:style-name="T90"> </text:span><text:span text:style-name="T75">O_EXCL</text:span><text:span text:style-name="T90"> flag</text:span></text:p>
      <text:p text:style-name="P28"><text:span text:style-name="T91">I.7 </text:span><text:span text:style-name="T82">Truncat</text:span><text:span text:style-name="T63">ing</text:span><text:span text:style-name="T91"> files</text:span></text:p>
      <text:p text:style-name="P37">I.<text:span text:style-name="T92">8</text:span> <text:span text:style-name="T60">R</text:span>ead<text:span text:style-name="T61">ing</text:span> and writ<text:span text:style-name="T61">ing</text:span> at a given offset</text:p>
      <text:p text:style-name="P37">I.<text:span text:style-name="T93">9</text:span> <text:span text:style-name="T60">Duplicat</text:span><text:span text:style-name="T61">ing</text:span><text:span text:style-name="T60"> a file descriptor</text:span></text:p>
      <text:p text:style-name="P28"><text:span text:style-name="T81"><text:tab/></text:span><text:span text:style-name="T94">I.9.1 The </text:span><text:span text:style-name="T75">dup2</text:span><text:span text:style-name="T94"> function</text:span></text:p>
      <text:p text:style-name="P39"><text:tab/>I.9.<text:span text:style-name="T95">2</text:span> The <text:span text:style-name="T80">dup</text:span><text:span text:style-name="T96">3</text:span> function</text:p>
      <text:p text:style-name="P28"><text:span text:style-name="T94"><text:tab/>I.9.</text:span><text:span text:style-name="T97">3</text:span><text:span text:style-name="T94"> </text:span><text:span text:style-name="T97">Set</text:span><text:span text:style-name="T63">ting</text:span><text:span text:style-name="T97"> the </text:span><text:span text:style-name="T75">O_CLOEXEC</text:span><text:span text:style-name="T97"> flag</text:span></text:p>
      <text:p text:style-name="P39"><text:tab/>I.9.<text:span text:style-name="T95">4</text:span> <text:span text:style-name="T80">dup</text:span> <text:span text:style-name="T95">errors</text:span></text:p>
      <text:p text:style-name="P37">I.<text:span text:style-name="T98">1</text:span><text:span text:style-name="T93">0</text:span> <text:span text:style-name="T60">Synchroniz</text:span><text:span text:style-name="T61">ing</text:span><text:span text:style-name="T99"> the</text:span><text:span text:style-name="T60"> data</text:span></text:p>
      <text:p text:style-name="P28"><text:span text:style-name="T100"><text:tab/>I.10.1 The </text:span><text:span text:style-name="T75">sync</text:span><text:span text:style-name="T100"> function</text:span></text:p>
      <text:p text:style-name="P37"><text:tab/><text:span text:style-name="T101">I.10.2 Synchronization errors</text:span></text:p>
      <text:p text:style-name="P37">I.<text:span text:style-name="T83">1</text:span><text:span text:style-name="T93">1</text:span> <text:span text:style-name="T60">File flags</text:span></text:p>
      <text:p text:style-name="P37"><text:span text:style-name="T102"><text:tab/></text:span><text:span text:style-name="T103">I.11.1 Duplicat</text:span><text:span text:style-name="T61">ing</text:span><text:span text:style-name="T99"> </text:span><text:span text:style-name="T103">a file descriptor</text:span></text:p>
      <text:p text:style-name="P40"><text:span text:style-name="T104"><text:tab/>I.11.2 </text:span><text:span text:style-name="T105">File descritptor f</text:span><text:span text:style-name="T106">lags</text:span></text:p>
      <text:p text:style-name="P40"><text:span text:style-name="T107"><text:tab/>I.11.3 </text:span><text:span text:style-name="T108">File s</text:span><text:span text:style-name="T109">tatus flag</text:span><text:span text:style-name="T110">s</text:span></text:p>
      <text:p text:style-name="P40"><text:span text:style-name="T111"><text:tab/>I.</text:span><text:span text:style-name="T112">11</text:span><text:span text:style-name="T111">.</text:span><text:span text:style-name="T112">4</text:span><text:span text:style-name="T111"> File descriptors and </text:span><text:span text:style-name="T113">o</text:span><text:span text:style-name="T111">pen file description</text:span></text:p>
      <text:p text:style-name="P37">I.1<text:span text:style-name="T93">2</text:span> Multiplexed I/O</text:p>
      <text:p text:style-name="P37"><text:span text:style-name="T114"><text:tab/>I.12.1 The </text:span><text:span text:style-name="T115">poll</text:span><text:span text:style-name="T114"> function</text:span></text:p>
      <text:p text:style-name="P28"><text:span text:style-name="T116"><text:tab/>I.12.2 The </text:span><text:span text:style-name="T117">ppoll</text:span><text:span text:style-name="T116"> function</text:span></text:p>
      <text:p text:style-name="P28"><text:span text:style-name="T81"><text:tab/></text:span><text:span text:style-name="T116">I.12.3 The </text:span><text:span text:style-name="T117">epoll</text:span><text:span text:style-name="T116"> interface</text:span></text:p>
      <text:p text:style-name="P37">I.1<text:span text:style-name="T93">3</text:span> <text:span text:style-name="T60">Binary </text:span>I/O</text:p>
      <text:p text:style-name="P37">I.1<text:span text:style-name="T93">4</text:span> <text:span text:style-name="T60">E</text:span>rror <text:span text:style-name="T60">handling</text:span></text:p>
      <text:p text:style-name="P28"><text:span text:style-name="T118"><text:tab/>I.14.1 </text:span><text:span text:style-name="T119">The </text:span><text:span text:style-name="T120">errno</text:span><text:span text:style-name="T118"> macro</text:span></text:p>
      <text:p text:style-name="P28"><text:span text:style-name="T118"><text:tab/>I.14.2 The </text:span><text:span text:style-name="T120">strerror*</text:span><text:span text:style-name="T118"> functions</text:span></text:p>
      <text:p text:style-name="P37"><text:span text:style-name="T121"><text:tab/>I.14.3 The </text:span><text:span text:style-name="T122">end-of-file</text:span><text:span text:style-name="T121"> and error indicators</text:span></text:p>
      <text:p text:style-name="P28"><text:span text:style-name="T81"><text:tab/></text:span><text:span text:style-name="T118">I.14.4 The </text:span><text:span text:style-name="T120">err</text:span><text:span text:style-name="T118"> and </text:span><text:span text:style-name="T120">warn</text:span><text:span text:style-name="T118"> functions</text:span></text:p>
      <text:p text:style-name="P41"><text:span text:style-name="T123"><text:tab/>I.14.5 The </text:span><text:span text:style-name="T124">glibc</text:span><text:span text:style-name="T123"> error reporting functions</text:span></text:p>
      <text:p text:style-name="P28"><text:span text:style-name="T118"><text:tab/></text:span><text:span text:style-name="T125">I.14.6 The </text:span><text:span text:style-name="T120">program_invocation_name</text:span><text:span text:style-name="T125"> variable</text:span></text:p>
      <text:p text:style-name="P37">I.1<text:span text:style-name="T93">5</text:span> <text:span text:style-name="T60">Buffered </text:span>I/O</text:p>
      <text:p text:style-name="P37"><text:tab/><text:span text:style-name="T126">I.15.1 Buffering types</text:span></text:p>
      <text:p text:style-name="P28"><text:span text:style-name="T81"><text:tab/></text:span><text:span text:style-name="T127">I.15.2 The interface to </text:span><text:span text:style-name="T120">stdio</text:span><text:span text:style-name="T127"> </text:span><text:span text:style-name="T120">FILE</text:span><text:span text:style-name="T127"> structure</text:span></text:p>
      <text:p text:style-name="P28"><text:span text:style-name="T81"><text:tab/></text:span><text:span text:style-name="T127">I.15.3 The </text:span><text:span text:style-name="T120">fwide</text:span><text:span text:style-name="T127"> function</text:span></text:p>
      <text:p text:style-name="P37">I.1<text:span text:style-name="T93">6</text:span> <text:span text:style-name="T60">Memory streams</text:span></text:p>
      <text:p text:style-name="P42">I.1<text:span text:style-name="T93">7</text:span> <text:span text:style-name="T60">Formatted </text:span>I/O</text:p>
      <text:p text:style-name="P28"><text:span text:style-name="T128"><text:tab/>I.17.1 </text:span><text:span text:style-name="T129">printf</text:span><text:span text:style-name="T128"> </text:span><text:span text:style-name="T76">and</text:span><text:span text:style-name="T128"> </text:span><text:span text:style-name="T129">scanf</text:span></text:p>
      <text:p text:style-name="P28"><text:span text:style-name="T128"><text:tab/>I.17.2 Other </text:span><text:span text:style-name="T129">printf</text:span><text:span text:style-name="T128">* functions</text:span></text:p>
      <text:p text:style-name="P43">I.1<text:span text:style-name="T93">8</text:span> <text:span text:style-name="T60">System call</text:span><text:span text:style-name="T130">s</text:span><text:span text:style-name="T60"> and library function</text:span><text:span text:style-name="T130">s</text:span></text:p>
      <text:p text:style-name="P44"><text:soft-page-break/><text:span text:style-name="T131">I.</text:span><text:span text:style-name="T132">19</text:span><text:span text:style-name="T133"> </text:span><text:span text:style-name="T134">Scatter-Gather I/O</text:span></text:p>
      <text:p text:style-name="P28"><text:span text:style-name="T135"><text:tab/>I.19.1 The </text:span><text:span text:style-name="T129">readv</text:span><text:span text:style-name="T135"> </text:span><text:span text:style-name="T136">and</text:span><text:span text:style-name="T135"> </text:span><text:span text:style-name="T129">writev</text:span><text:span text:style-name="T135"> functions</text:span></text:p>
      <text:p text:style-name="P28"><text:span text:style-name="T137"><text:tab/></text:span><text:span text:style-name="T135">I.19.2 The </text:span><text:span text:style-name="T129">preadv</text:span><text:span text:style-name="T135"> </text:span><text:span text:style-name="T136">and</text:span><text:span text:style-name="T135"> </text:span><text:span text:style-name="T129">pwritev</text:span><text:span text:style-name="T135"> functions</text:span></text:p>
      <text:p text:style-name="P45">I.2<text:span text:style-name="T93">0</text:span> Unreading</text:p>
      <text:p text:style-name="P46"><text:span text:style-name="T138">I.2</text:span><text:span text:style-name="T139">1</text:span><text:span text:style-name="T138"> </text:span><text:span text:style-name="T82">Formatted </text:span><text:span text:style-name="T140">I/O</text:span><text:span text:style-name="T138"> </text:span><text:span text:style-name="T82">with variable number of arguments</text:span></text:p>
      <text:p text:style-name="P28"><text:span text:style-name="T141"><text:tab/>I.21.1 </text:span><text:span text:style-name="T129">vprintf</text:span></text:p>
      <text:p text:style-name="P28"><text:span text:style-name="T141"><text:tab/>I.21.2 </text:span><text:span text:style-name="T129">vscanf</text:span></text:p>
      <text:p text:style-name="P28"><text:span text:style-name="T129"><text:tab/></text:span><text:span text:style-name="T141">I.21.</text:span><text:span text:style-name="T142">3</text:span><text:span text:style-name="T141"> </text:span><text:span text:style-name="T129">sscanf</text:span></text:p>
      <text:p text:style-name="P43">I.2<text:span text:style-name="T93">2</text:span> <text:span text:style-name="T60">Temporary files</text:span></text:p>
      <text:p text:style-name="P28"><text:span text:style-name="T143"><text:tab/>I.22.1 The </text:span><text:span text:style-name="T129">mkstemp*</text:span><text:span text:style-name="T143"> family functions</text:span></text:p>
      <text:p text:style-name="P28"><text:span text:style-name="T143"><text:tab/>I.22.2 The </text:span><text:span text:style-name="T129">tmpfile</text:span><text:span text:style-name="T143"> function</text:span></text:p>
      <text:p text:style-name="P28"><text:span text:style-name="T143"><text:tab/>I.22.3 Temporary files with </text:span><text:span text:style-name="T129">open</text:span></text:p>
      <text:p text:style-name="P28"><text:span text:style-name="T143"><text:tab/>I.22.4 Temporary directories: </text:span><text:span text:style-name="T129">mkdtemp</text:span></text:p>
      <text:p text:style-name="P47">I.2<text:span text:style-name="T93">3</text:span> <text:span text:style-name="T144">Advices</text:span></text:p>
      <text:p text:style-name="P48">I.2<text:span text:style-name="T93">4</text:span> <text:span text:style-name="T60">Asynchronous </text:span>I/O</text:p>
      <text:p text:style-name="P48"><text:tab/>I.24.1 POSIX AIO</text:p>
      <text:p text:style-name="P48"><text:tab/>I.24.2 Multiple I/O requests in one call</text:p>
      <text:p text:style-name="P28"><text:span text:style-name="T145"><text:tab/>I.24.3 The </text:span><text:span text:style-name="T129">aio_init</text:span><text:span text:style-name="T145"> function of the </text:span><text:span text:style-name="T129">real-time</text:span><text:span text:style-name="T145"> library</text:span></text:p>
      <text:p text:style-name="P28"><text:span text:style-name="T145"><text:tab/>I.24.</text:span><text:span text:style-name="T146">4</text:span><text:span text:style-name="T145"> </text:span><text:span text:style-name="T146">Linux AIO –</text:span><text:span text:style-name="T145"> </text:span><text:span text:style-name="T129">io_uring</text:span></text:p>
      <text:p text:style-name="P28"><text:span text:style-name="T145"><text:tab/></text:span><text:span text:style-name="T147">I.24.5 The </text:span><text:span text:style-name="T129">liburing</text:span><text:span text:style-name="T147"> library</text:span></text:p>
      <text:p text:style-name="P49"><text:tab/>I.24.<text:span text:style-name="T148">6</text:span> The <text:span text:style-name="T149">io_uring</text:span> <text:span text:style-name="T148">system calls</text:span></text:p>
      <text:p text:style-name="P48">I.2<text:span text:style-name="T150">5</text:span> <text:span text:style-name="T151">F</text:span><text:span text:style-name="T152">ile</text:span><text:span text:style-name="T60"> lock</text:span><text:span text:style-name="T151">ing</text:span></text:p>
      <text:p text:style-name="P40"><text:span text:style-name="T153"><text:tab/>I.</text:span><text:span text:style-name="T150">25</text:span><text:span text:style-name="T153">.</text:span><text:span text:style-name="T150">1</text:span><text:span text:style-name="T153"> </text:span><text:span text:style-name="T154">Advisory r</text:span><text:span text:style-name="T155">ecord l</text:span>ock<text:span text:style-name="T154">ing</text:span></text:p>
      <text:p text:style-name="P50"><text:span text:style-name="T156"><text:tab/>I.</text:span><text:span text:style-name="T157">25</text:span><text:span text:style-name="T156">.</text:span><text:span text:style-name="T158">2</text:span><text:span text:style-name="T156"> </text:span><text:span text:style-name="T159">Open</text:span><text:span text:style-name="T160">ing</text:span><text:span text:style-name="T159"> file description locks</text:span><text:span text:style-name="T161"> </text:span></text:p>
      <text:p text:style-name="P50"><text:span text:style-name="T162"><text:tab/></text:span><text:span text:style-name="T156">I.</text:span><text:span text:style-name="T163">2</text:span><text:span text:style-name="T158">5</text:span><text:span text:style-name="T156">.</text:span><text:span text:style-name="T164">3</text:span><text:span text:style-name="T156"> </text:span><text:span text:style-name="T160">T</text:span><text:span text:style-name="T164">he locks on the system</text:span></text:p>
      <text:p text:style-name="P51"><text:span text:style-name="T165"><text:tab/>I.</text:span><text:span text:style-name="T166">2</text:span><text:span text:style-name="T167">5</text:span><text:span text:style-name="T165">.</text:span><text:span text:style-name="T168">4</text:span><text:span text:style-name="T169"> </text:span><text:span text:style-name="T170">T</text:span><text:span text:style-name="T171">he </text:span><text:span text:style-name="T172">flock</text:span><text:span text:style-name="T171"> function</text:span></text:p>
      <text:p text:style-name="P28"><text:span text:style-name="T173"><text:tab/></text:span><text:span text:style-name="T174">I.</text:span><text:span text:style-name="T175">2</text:span><text:span text:style-name="T176">5</text:span><text:span text:style-name="T174">.</text:span><text:span text:style-name="T177">5</text:span><text:span text:style-name="T178"> </text:span><text:span text:style-name="T179">The </text:span><text:span text:style-name="T180">lockf</text:span><text:span text:style-name="T179"> function</text:span></text:p>
      <text:p text:style-name="P52">I.2<text:span text:style-name="T93">6</text:span> <text:span text:style-name="T181">Stream locking</text:span></text:p>
      <text:p text:style-name="P52"><text:tab/><text:span text:style-name="T182">I.26.</text:span><text:span text:style-name="T183">1</text:span><text:span text:style-name="T182"> Lock</text:span><text:span text:style-name="T61">ing</text:span><text:span text:style-name="T182"> </text:span><text:span text:style-name="T184">FILE</text:span><text:span text:style-name="T182"> for </text:span><text:span text:style-name="T184">stdio</text:span><text:tab/><text:tab/><text:tab/></text:p>
      <text:p text:style-name="P52"><text:span text:style-name="T182"><text:tab/>I.2</text:span><text:span text:style-name="T181">6</text:span><text:span text:style-name="T182">.</text:span><text:span text:style-name="T183">2</text:span><text:span text:style-name="T182"> </text:span><text:span text:style-name="T185">Nonl</text:span><text:span text:style-name="T182">ocking </text:span><text:span text:style-name="T184">stdio</text:span><text:span text:style-name="T182"> </text:span><text:span text:style-name="T185">functions</text:span></text:p>
      <text:p text:style-name="P28"><text:span text:style-name="T174"><text:tab/>I.2</text:span><text:span text:style-name="T186">6</text:span><text:span text:style-name="T174">.</text:span><text:span text:style-name="T187">3</text:span><text:span text:style-name="T174"> </text:span><text:span text:style-name="T188">Nonl</text:span><text:span text:style-name="T174">ocking </text:span><text:span text:style-name="T188">functions </text:span><text:span text:style-name="T187">for </text:span><text:span text:style-name="T189">wide-characters</text:span></text:p>
      <text:p text:style-name="P52">I.2<text:span text:style-name="T190">7</text:span> Pipes <text:span text:style-name="T60">and</text:span> FIFO</text:p>
      <text:p text:style-name="P28"><text:span text:style-name="T191"><text:tab/></text:span><text:span text:style-name="T192">I.27.1 The </text:span><text:span text:style-name="T180">pipe</text:span><text:span text:style-name="T192"> function</text:span></text:p>
      <text:p text:style-name="P28"><text:span text:style-name="T192"><text:tab/>I.27.2 The </text:span><text:span text:style-name="T180">popen</text:span><text:span text:style-name="T192"> function</text:span></text:p>
      <text:p text:style-name="P53"><text:tab/>I.27.3 Two-way communication</text:p>
      <text:p text:style-name="P52"><text:span text:style-name="T193"><text:tab/>I.27.</text:span><text:span text:style-name="T194">4 FIFOs</text:span></text:p>
      <text:p text:style-name="P54"><text:tab/>I.27.6 Pipes tunable values</text:p>
      <text:p text:style-name="P55"><text:tab/>I.27.7 I/O on pipes and FIFOs</text:p>
      <text:p text:style-name="P54"><text:span text:style-name="T195"><text:tab/>I.27.</text:span><text:span text:style-name="T196">8</text:span><text:span text:style-name="T195"> </text:span><text:span text:style-name="T196">P</text:span><text:span text:style-name="T195">ipes and </text:span><text:span text:style-name="T196">formatted I/O</text:span></text:p>
      <text:p text:style-name="P28"><text:span text:style-name="T197"><text:tab/>I.27.</text:span><text:span text:style-name="T198">9. </text:span><text:span text:style-name="T199">The </text:span><text:span text:style-name="T180">splice</text:span><text:span text:style-name="T199"> </text:span><text:span text:style-name="T136">and</text:span><text:span text:style-name="T199"> </text:span><text:span text:style-name="T180">vmsplice</text:span><text:span text:style-name="T199"> functions</text:span></text:p>
      <text:p text:style-name="P54"><text:tab/><text:span text:style-name="T200">I.27.10 Duplicat</text:span><text:span text:style-name="T61">ing</text:span><text:span text:style-name="T200"> pipe </text:span><text:span text:style-name="T201">data</text:span></text:p>
      <text:p text:style-name="P28"><text:span text:style-name="T191">I.2</text:span><text:span text:style-name="T202">8</text:span><text:span text:style-name="T191"> </text:span><text:span text:style-name="T180">fcntl</text:span><text:span text:style-name="T203"> commands</text:span></text:p>
      <text:p text:style-name="P56"><text:tab/>I.28.1 Managing signals</text:p>
      <text:p text:style-name="P56"><text:tab/>I.28.2 Leases</text:p>
      <text:p text:style-name="P56"><text:tab/>I.28.3 File and directory change notification: <text:span text:style-name="T204">dnotify</text:span></text:p>
      <text:p text:style-name="P56"><text:tab/>I.28.4 Chang<text:span text:style-name="T61">ing</text:span> the capacity of a pipe</text:p>
      <text:p text:style-name="P56"><text:soft-page-break/><text:tab/>I.28.5 File Sealing</text:p>
      <text:p text:style-name="P56"><text:tab/>I.28.6 File read/write hints</text:p>
      <text:p text:style-name="P57">I.29 File allocation</text:p>
      <text:p text:style-name="P43"><text:span text:style-name="T205">I.</text:span><text:span text:style-name="T206">30</text:span><text:span text:style-name="T205"> </text:span><text:span text:style-name="T207">T</text:span><text:span text:style-name="T205">heory and </text:span><text:span text:style-name="T208">i</text:span><text:span text:style-name="T205">nsights</text:span></text:p>
      <text:p text:style-name="P43"><text:tab/>I.30.1 I/O</text:p>
      <text:p text:style-name="P43"><text:tab/>I.30.2 File descriptors</text:p>
      <text:p text:style-name="P43"><text:tab/>I.30.<text:span text:style-name="T209">3</text:span> File sizes data types</text:p>
      <text:p text:style-name="P43"><text:tab/>I.30.<text:span text:style-name="T209">4</text:span> Positioning data type<text:span text:style-name="T210">s</text:span></text:p>
      <text:p text:style-name="P43"><text:tab/>I.30.<text:span text:style-name="T209">5</text:span> Multibyte representation conversion</text:p>
      <text:p text:style-name="P43"><text:tab/>I.30.<text:span text:style-name="T209">6</text:span> Functions for <text:span text:style-name="T211">wide characters</text:span></text:p>
      <text:p text:style-name="P43"><text:tab/>I.30.<text:span text:style-name="T209">7</text:span> Read<text:span text:style-name="T61">ing</text:span> with <text:span text:style-name="T212">sscanf</text:span></text:p>
      <text:p text:style-name="P43"><text:tab/>I.30.<text:span text:style-name="T209">8</text:span> Writ<text:span text:style-name="T61">ing</text:span> on memory streams</text:p>
      <text:p text:style-name="P28"><text:span text:style-name="T143"><text:tab/>I.30.</text:span><text:span text:style-name="T213">9</text:span><text:span text:style-name="T143"> The </text:span><text:span text:style-name="T214">getopt</text:span><text:span text:style-name="T143"> function</text:span></text:p>
      <text:p text:style-name="P43"><text:tab/>I.30.1<text:span text:style-name="T209">0</text:span> Synchronous and <text:span text:style-name="T210">A</text:span>synchronous I/O</text:p>
      <text:p text:style-name="P43"><text:tab/><text:span text:style-name="T215">I.30.</text:span><text:span text:style-name="T216">1</text:span><text:span text:style-name="T217">1</text:span><text:span text:style-name="T215"> </text:span><text:span text:style-name="T217">The </text:span><text:span text:style-name="T218">aiomonitor.c</text:span><text:span text:style-name="T217"> program</text:span></text:p>
      <text:p text:style-name="P28"><text:span text:style-name="T143"><text:tab/>I.30.1</text:span><text:span text:style-name="T219">2</text:span><text:span text:style-name="T143"> The </text:span><text:span text:style-name="T214">io_uring_sqe</text:span><text:span text:style-name="T143"> structure</text:span></text:p>
      <text:p text:style-name="P28"><text:span text:style-name="T143"><text:tab/>I.30.1</text:span><text:span text:style-name="T219">3</text:span><text:span text:style-name="T143"> The functions of </text:span><text:span text:style-name="T214">liburing</text:span></text:p>
      <text:p text:style-name="P28"><text:span text:style-name="T143"><text:tab/>I.30.1</text:span><text:span text:style-name="T219">4</text:span><text:span text:style-name="T143"> The program from the </text:span><text:span text:style-name="T214">io_uring</text:span><text:span text:style-name="T143"> manual page</text:span></text:p>
      <text:p text:style-name="P28"><text:span text:style-name="T143"><text:tab/>I.30.1</text:span><text:span text:style-name="T219">5</text:span><text:span text:style-name="T143"> Pipes and </text:span><text:span text:style-name="T214">O_ASYNC</text:span></text:p>
      <text:p text:style-name="P43"><text:tab/>I.30.1<text:span text:style-name="T217">6</text:span> Feature Test Macros</text:p>
      <text:p text:style-name="P28"><text:span text:style-name="T143"><text:tab/>I.30.1</text:span><text:span text:style-name="T219">7</text:span><text:span text:style-name="T143"> Copy</text:span><text:span text:style-name="T220">ing</text:span><text:span text:style-name="T143"> files with </text:span><text:span text:style-name="T214">copy_file_range</text:span></text:p>
      <text:p text:style-name="P28"><text:span text:style-name="T143"><text:tab/>I.30.1</text:span><text:span text:style-name="T219">8</text:span><text:span text:style-name="T143"> Copy</text:span><text:span text:style-name="T220">ing</text:span><text:span text:style-name="T143"> files with </text:span><text:span text:style-name="T214">sendfile</text:span></text:p>
      <text:p text:style-name="P58"><text:span text:style-name="T60">List of </text:span><text:span text:style-name="T221">tables</text:span></text:p>
      <text:p text:style-name="P58"><text:span text:style-name="T60">List of </text:span><text:span text:style-name="T221">figures</text:span></text:p>
      <text:p text:style-name="P58"/>
      <text:p text:style-name="P34"><text:span text:style-name="T222">Chapter</text:span> <text:span text:style-name="T223">II</text:span> – <text:span text:style-name="T224">Files </text:span><text:span text:style-name="T225">and</text:span><text:span text:style-name="T224"> directories</text:span></text:p>
      <text:p text:style-name="P34"/>
      <text:p text:style-name="P28">I<text:span text:style-name="T226">I</text:span>.1 <text:span text:style-name="T227">Files</text:span></text:p>
      <text:p text:style-name="P59"><text:span text:style-name="T66"><text:tab/>II.1.1 Stat of files: </text:span><text:span text:style-name="T228">stat</text:span><text:span text:style-name="T66">, </text:span><text:span text:style-name="T228">fstat</text:span><text:span text:style-name="T66"> and </text:span><text:span text:style-name="T228">lstat</text:span></text:p>
      <text:p text:style-name="P59"><text:span text:style-name="T66"><text:tab/>II.1.2 File permissions: </text:span><text:span text:style-name="T228">umask</text:span></text:p>
      <text:p text:style-name="P59"><text:span text:style-name="T66"><text:tab/>II.1.3 Checking file accessibility: </text:span><text:span text:style-name="T228">access</text:span><text:span text:style-name="T66"> and </text:span><text:span text:style-name="T228">faccessat</text:span></text:p>
      <text:p text:style-name="P59"><text:span text:style-name="T66"><text:tab/>II.1.4 Changing file permissions: </text:span><text:span text:style-name="T228">chmod</text:span><text:span text:style-name="T66"> and </text:span><text:span text:style-name="T228">fchmod</text:span></text:p>
      <text:p text:style-name="P59"><text:span text:style-name="T66"><text:tab/>II.1.</text:span><text:span text:style-name="T229">5</text:span><text:span text:style-name="T66"> Changing file ownership: </text:span><text:span text:style-name="T228">chown</text:span><text:span text:style-name="T66">, </text:span><text:span text:style-name="T228">fchown</text:span><text:span text:style-name="T66"> and </text:span><text:span text:style-name="T228">lchown</text:span></text:p>
      <text:p text:style-name="P59"><text:span text:style-name="T230"><text:tab/>II.1.6 Creating and removing links: </text:span><text:span text:style-name="T228">link</text:span><text:span text:style-name="T230">, </text:span><text:span text:style-name="T228">linkat</text:span><text:span text:style-name="T230"> and </text:span><text:span text:style-name="T228">unlink</text:span></text:p>
      <text:p text:style-name="P59"><text:span text:style-name="T230"><text:tab/>II.1.7 Renaming files and directories: </text:span><text:span text:style-name="T228">rename</text:span><text:span text:style-name="T230"> and </text:span><text:span text:style-name="T228">renameat</text:span></text:p>
      <text:p text:style-name="P59"><text:span text:style-name="T230"><text:tab/>II.1.8 Symbolic links: </text:span><text:span text:style-name="T228">symlink</text:span><text:span text:style-name="T230"> and </text:span><text:span text:style-name="T228">readlink</text:span></text:p>
      <text:p text:style-name="P59"><text:span text:style-name="T230"><text:tab/>II.1.9 File times: </text:span><text:span text:style-name="T228">utimensat</text:span><text:span text:style-name="T230">, </text:span><text:span text:style-name="T228">futimens</text:span><text:span text:style-name="T230">, </text:span><text:span text:style-name="T228">utime</text:span><text:span text:style-name="T230">, </text:span><text:span text:style-name="T228">utimes</text:span><text:span text:style-name="T230">, </text:span><text:span text:style-name="T228">futimes</text:span><text:span text:style-name="T230">, <text:tab/></text:span><text:span text:style-name="T228">lutimes</text:span></text:p>
      <text:p text:style-name="P59"><text:span text:style-name="T230"><text:tab/>II.1.10 I-node flags: </text:span><text:span text:style-name="T228">ioctl</text:span></text:p>
      <text:p text:style-name="P60"><text:tab/>II.1.11 Immutable files</text:p>
      <text:p text:style-name="P59"><text:span text:style-name="T230"><text:tab/>II.1.12 Extended attributes: </text:span><text:span text:style-name="T228">setxattr</text:span><text:span text:style-name="T230">, </text:span><text:span text:style-name="T228">getxattr</text:span><text:span text:style-name="T230">, </text:span><text:span text:style-name="T228">removexattr</text:span><text:span text:style-name="T230">, </text:span><text:span text:style-name="T228">listxattr</text:span></text:p>
      <text:p text:style-name="P28"><text:span text:style-name="T231">II.</text:span><text:span text:style-name="T232">2</text:span><text:span text:style-name="T231"> Directories</text:span></text:p>
      <text:p text:style-name="P28"><text:span text:style-name="T233"><text:tab/>II.2.1 Creating and removing directories: </text:span><text:span text:style-name="T228">mkdir</text:span><text:span text:style-name="T233">, </text:span><text:span text:style-name="T228">mkdirat</text:span><text:span text:style-name="T233"> and </text:span><text:span text:style-name="T228">rmdir</text:span></text:p>
      <text:p text:style-name="P59"><text:span text:style-name="T231"><text:tab/>II.2.2 Open and reading directories: </text:span><text:span text:style-name="T228">opendir</text:span><text:span text:style-name="T231">, </text:span><text:span text:style-name="T228">fdopendir</text:span><text:span text:style-name="T231"> and </text:span><text:span text:style-name="T228">readdir</text:span></text:p>
      <text:p text:style-name="P59"><text:span text:style-name="T231"><text:tab/>II.2.3 Closing directories: </text:span><text:span text:style-name="T228">closedir</text:span></text:p>
      <text:p text:style-name="P59"><text:soft-page-break/><text:span text:style-name="T231"><text:tab/>II.2.4 Scanning a directory: </text:span><text:span text:style-name="T228">scandir</text:span><text:span text:style-name="T231"> and </text:span><text:span text:style-name="T228">scandirat</text:span></text:p>
      <text:p text:style-name="P59"><text:span text:style-name="T231"><text:tab/>II.2.5 Seeking a directory: </text:span><text:span text:style-name="T228">telldir</text:span><text:span text:style-name="T231">, </text:span><text:span text:style-name="T228">seekdir</text:span><text:span text:style-name="T231"> and </text:span><text:span text:style-name="T228">rewinddir</text:span></text:p>
      <text:p text:style-name="P59"><text:span text:style-name="T231"><text:tab/>II.2.6 Directory file descriptor: </text:span><text:span text:style-name="T228">dirfd</text:span></text:p>
      <text:p text:style-name="P59"><text:span text:style-name="T231"><text:tab/>II.2.7 File tree walk: </text:span><text:span text:style-name="T228">nftw</text:span></text:p>
      <text:p text:style-name="P59"><text:span text:style-name="T231"><text:tab/>II.2.8 Current working directory: </text:span><text:span text:style-name="T228">getcwd</text:span><text:span text:style-name="T231">, </text:span><text:span text:style-name="T228">chdir</text:span><text:span text:style-name="T231"> and </text:span><text:span text:style-name="T228">fchdir</text:span></text:p>
      <text:p text:style-name="P59"><text:span text:style-name="T231"><text:tab/>II.2.9 Process root directory: </text:span><text:span text:style-name="T228">chroot</text:span><text:span text:style-name="T231"><text:tab/></text:span></text:p>
      <text:p text:style-name="P61"><text:span text:style-name="T234">II.</text:span><text:span text:style-name="T227">3</text:span><text:span text:style-name="T234"> </text:span><text:span text:style-name="T235">Pathname </text:span><text:span text:style-name="T225">and</text:span><text:span text:style-name="T236"> files configuration</text:span></text:p>
      <text:p text:style-name="P59"><text:span text:style-name="T237"><text:tab/>II.3.1 Resolving paths and links: </text:span><text:span text:style-name="T228">realpath</text:span><text:span text:style-name="T237"> and </text:span><text:span text:style-name="T228">canonicalize_file_name</text:span></text:p>
      <text:p text:style-name="P59"><text:span text:style-name="T237"><text:tab/>II.3.2 Working with pathnames: </text:span><text:span text:style-name="T228">dirname</text:span><text:span text:style-name="T237"> and </text:span><text:span text:style-name="T228">basename</text:span></text:p>
      <text:p text:style-name="P59"><text:span text:style-name="T237"><text:tab/>II.3.3 Pathnames and filenames configuration: </text:span><text:span text:style-name="T228">fpathconf</text:span><text:span text:style-name="T237"> and </text:span><text:span text:style-name="T228">pathconf</text:span></text:p>
      <text:p text:style-name="P59"><text:span text:style-name="T237"><text:tab/>II.3.4 Getting configuration at runtime with </text:span><text:span text:style-name="T228">sysconf</text:span></text:p>
      <text:p text:style-name="P59"><text:span text:style-name="T237"><text:tab/>II.3.5 Getting configuration dependent string variables: </text:span><text:span text:style-name="T228">confstr</text:span></text:p>
      <text:p text:style-name="P59"><text:span text:style-name="T237"><text:tab/>II.3.6 Getting configuration from the CLI with </text:span><text:span text:style-name="T228">getconf</text:span></text:p>
      <text:p text:style-name="P62"><text:tab/><text:span text:style-name="T238">II.</text:span><text:span text:style-name="T227">3</text:span><text:span text:style-name="T238">.</text:span><text:span text:style-name="T239">7</text:span><text:span text:style-name="T238"> </text:span><text:span text:style-name="T240">Summary</text:span></text:p>
      <text:p text:style-name="P63"><text:span text:style-name="T234">II.</text:span><text:span text:style-name="T227">4</text:span><text:span text:style-name="T234"> Device files</text:span></text:p>
      <text:p text:style-name="P59"><text:span text:style-name="T241"><text:tab/></text:span><text:span text:style-name="T242">II.4.1 Major and minor numbers: </text:span><text:span text:style-name="T228">makedev</text:span><text:span text:style-name="T242">, </text:span><text:span text:style-name="T228">major</text:span><text:span text:style-name="T242"> and </text:span><text:span text:style-name="T228">minor</text:span></text:p>
      <text:p text:style-name="P59"><text:span text:style-name="T242"><text:tab/>II.4.2 Creating a device file: </text:span><text:span text:style-name="T228">mknod</text:span><text:span text:style-name="T242"> and </text:span><text:span text:style-name="T228">mknodat</text:span></text:p>
      <text:p text:style-name="P59"><text:span text:style-name="T242"><text:tab/>II.4.3 Creating FIFO: </text:span><text:span text:style-name="T228">mkfifo</text:span><text:span text:style-name="T242"> and </text:span><text:span text:style-name="T228">mkfifoat</text:span></text:p>
      <text:p text:style-name="P59"><text:span text:style-name="T242"><text:tab/>II.4.4 The random number generator: </text:span><text:span text:style-name="T228">getrandom</text:span><text:span text:style-name="T242"> and </text:span><text:span text:style-name="T228">getentropy</text:span></text:p>
      <text:p text:style-name="P64">II.<text:span text:style-name="T227">5</text:span><text:span text:style-name="T243"> </text:span><text:span text:style-name="T244">Access control list</text:span></text:p>
      <text:p text:style-name="P63"><text:span text:style-name="T234">II.</text:span><text:span text:style-name="T227">6</text:span><text:span text:style-name="T234"> </text:span><text:span text:style-name="T245">Monitor</text:span><text:span text:style-name="T246">ing</text:span><text:span text:style-name="T247"> file </text:span><text:span text:style-name="T245">events</text:span></text:p>
      <text:p text:style-name="P63"><text:tab/><text:span text:style-name="T248">II.</text:span><text:span text:style-name="T249">6</text:span><text:span text:style-name="T248">.</text:span><text:span text:style-name="T250">1</text:span><text:span text:style-name="T248"> </text:span><text:span text:style-name="T251">The </text:span><text:span text:style-name="T252">i</text:span><text:span text:style-name="T253">notify</text:span><text:span text:style-name="T254"> interface</text:span></text:p>
      <text:p text:style-name="P63"><text:tab/><text:span text:style-name="T248">II.</text:span><text:span text:style-name="T249">6</text:span><text:span text:style-name="T248">.</text:span><text:span text:style-name="T250">2</text:span><text:span text:style-name="T248"> </text:span><text:span text:style-name="T251">The </text:span><text:span text:style-name="T252">f</text:span><text:span text:style-name="T253">anotify</text:span><text:span text:style-name="T254"> interface</text:span></text:p>
      <text:p text:style-name="P63"><text:span text:style-name="T234">II.</text:span><text:span text:style-name="T227">7</text:span><text:span text:style-name="T234"> </text:span><text:span text:style-name="T255">Capabilitites</text:span></text:p>
      <text:p text:style-name="P63"><text:span text:style-name="T256"><text:tab/>II.</text:span><text:span text:style-name="T227">7</text:span><text:span text:style-name="T256">.</text:span><text:span text:style-name="T257">1</text:span><text:span text:style-name="T256"> </text:span><text:span text:style-name="T258">File capabilitie</text:span><text:span text:style-name="T256">s</text:span></text:p>
      <text:p text:style-name="P65"><text:span text:style-name="T256"><text:tab/>II.</text:span><text:span text:style-name="T227">7</text:span><text:span text:style-name="T256">.</text:span><text:span text:style-name="T257">2</text:span><text:span text:style-name="T256"> The </text:span><text:span text:style-name="T259">Bounding Set</text:span></text:p>
      <text:p text:style-name="P65"><text:span text:style-name="T260"><text:tab/>II.</text:span><text:span text:style-name="T249">7</text:span><text:span text:style-name="T260">.</text:span><text:span text:style-name="T261">3</text:span><text:span text:style-name="T260"> </text:span><text:span text:style-name="T251">The </text:span><text:span text:style-name="T262">Securebits</text:span><text:span text:style-name="T263"> flags</text:span></text:p>
      <text:p text:style-name="P66"><text:tab/>II.<text:span text:style-name="T227">7</text:span>.<text:span text:style-name="T257">4</text:span> <text:span text:style-name="T264">List</text:span><text:span text:style-name="T265">ing</text:span><text:span text:style-name="T264"> the content</text:span><text:span text:style-name="T265">s</text:span><text:span text:style-name="T264"> of the capabilities sets</text:span></text:p>
      <text:p text:style-name="P66"><text:tab/>II.<text:span text:style-name="T227">7</text:span>.<text:span text:style-name="T257">5</text:span> <text:span text:style-name="T266">Capabilities data types</text:span></text:p>
      <text:p text:style-name="P66"><text:span text:style-name="T267"><text:tab/>II.</text:span><text:span text:style-name="T227">7</text:span><text:span text:style-name="T267">.</text:span><text:span text:style-name="T257">6</text:span><text:span text:style-name="T267"> </text:span><text:span text:style-name="T266">Child capabilities</text:span></text:p>
      <text:p text:style-name="P67">I<text:span text:style-name="T268">I</text:span>.<text:span text:style-name="T227">8</text:span><text:span text:style-name="T269"> </text:span><text:span text:style-name="T270">The Linux file system</text:span></text:p>
      <text:p text:style-name="P67"><text:span text:style-name="T271"><text:tab/></text:span><text:span text:style-name="T272">II.8.1 The </text:span><text:span text:style-name="T273">ext4</text:span><text:span text:style-name="T272"> layout</text:span></text:p>
      <text:p text:style-name="P59"><text:span text:style-name="T274"><text:tab/>II.8.2 Mounting a filesystem: </text:span><text:span text:style-name="T275">mount</text:span><text:span text:style-name="T274"> and </text:span><text:span text:style-name="T275">umount</text:span></text:p>
      <text:p text:style-name="P59"><text:span text:style-name="T274"><text:tab/>II.8.3 </text:span><text:span text:style-name="T276">ext4</text:span><text:span text:style-name="T274"> filesystem operations</text:span></text:p>
      <text:p text:style-name="P59"><text:span text:style-name="T274"><text:tab/>II.8.4 The </text:span><text:span text:style-name="T276">swap</text:span><text:span text:style-name="T274"> area: </text:span><text:span text:style-name="T275">swapon</text:span><text:span text:style-name="T274"> and </text:span><text:span text:style-name="T275">swapoff</text:span></text:p>
      <text:p text:style-name="P59"><text:span text:style-name="T274"><text:tab/>II.8.5 The </text:span><text:span text:style-name="T275">proc</text:span><text:span text:style-name="T274"> file system</text:span></text:p>
      <text:p text:style-name="P59"><text:span text:style-name="T274"><text:tab/>II.8.6 The </text:span><text:span text:style-name="T275">tmpfs</text:span><text:span text:style-name="T274"> file system</text:span></text:p>
      <text:p text:style-name="P59"><text:span text:style-name="T274"><text:tab/>II.8.7 The </text:span><text:span text:style-name="T275">sysfs</text:span><text:span text:style-name="T274"> file system</text:span></text:p>
      <text:p text:style-name="P59"><text:span text:style-name="T274"><text:tab/>II.8.8 Getting filesystem statistics : </text:span><text:span text:style-name="T275">statfs</text:span><text:span text:style-name="T274"> and </text:span><text:span text:style-name="T275">statvfs</text:span></text:p>
      <text:p text:style-name="P67">I<text:span text:style-name="T268">I</text:span>.<text:span text:style-name="T227">9</text:span><text:span text:style-name="T269"> </text:span><text:span text:style-name="T277">Quota</text:span><text:span text:style-name="T278">s</text:span><text:span text:style-name="T277"> </text:span><text:span text:style-name="T225">and</text:span><text:span text:style-name="T277"> </text:span><text:span text:style-name="T279">r</text:span><text:span text:style-name="T280">esource limits</text:span></text:p>
      <text:p text:style-name="P67"><text:tab/>II.9.1 Managing quotas</text:p>
      <text:p text:style-name="P59"><text:span text:style-name="T66"><text:tab/>II.9.2 Resource limits: </text:span><text:span text:style-name="T275">getrlimit</text:span><text:span text:style-name="T66">, </text:span><text:span text:style-name="T275">setrlimit</text:span><text:span text:style-name="T66"> and </text:span><text:span text:style-name="T275">prlimit</text:span><text:span text:style-name="T66"><text:tab/></text:span><text:span text:style-name="T281"><text:tab/></text:span></text:p>
      <text:p text:style-name="P67"><text:span text:style-name="T282">I</text:span><text:span text:style-name="T283">I</text:span><text:span text:style-name="T282">.</text:span><text:span text:style-name="T284">1</text:span><text:span text:style-name="T285">0</text:span><text:span text:style-name="T282"> </text:span><text:span text:style-name="T286">T</text:span><text:span text:style-name="T282">heory </text:span><text:span text:style-name="T287">and</text:span><text:span text:style-name="T282"> </text:span><text:span text:style-name="T287">i</text:span><text:span text:style-name="T282">nsights</text:span></text:p>
      <text:p text:style-name="P28"><text:span text:style-name="T143"><text:tab/></text:span><text:span text:style-name="T288">II.</text:span><text:span text:style-name="T289">10</text:span><text:span text:style-name="T288">.1 </text:span><text:span text:style-name="T290">Get</text:span><text:span text:style-name="T291">ting</text:span><text:span text:style-name="T290"> file permissions with </text:span><text:span text:style-name="T292">stat</text:span></text:p>
      <text:p text:style-name="P28"><text:span text:style-name="T293"><text:tab/>II.10.2 </text:span><text:span text:style-name="T294">Set</text:span><text:span text:style-name="T295">ting</text:span><text:span text:style-name="T294"> </text:span><text:span text:style-name="T296">umask</text:span></text:p>
      <text:p text:style-name="P68"><text:soft-page-break/><text:tab/>II.10.3 <text:span text:style-name="T297">Unlink</text:span><text:span text:style-name="T298">ing</text:span><text:span text:style-name="T297"> a file while a process has an open descriptor</text:span></text:p>
      <text:p text:style-name="P68"><text:tab/>II.10.4 <text:span text:style-name="T299">Scan</text:span><text:span text:style-name="T298">ning</text:span><text:span text:style-name="T299"> director</text:span><text:span text:style-name="T300">ies</text:span><text:span text:style-name="T299"> with filter</text:span><text:span text:style-name="T298">s</text:span></text:p>
      <text:p text:style-name="P68"><text:span text:style-name="T301"><text:tab/>II.10.5 </text:span><text:span text:style-name="T302">The </text:span><text:span text:style-name="T303">openat</text:span><text:span text:style-name="T302"> </text:span><text:span text:style-name="T304">and </text:span><text:span text:style-name="T303">openat2</text:span><text:span text:style-name="T304"> </text:span><text:span text:style-name="T302">function</text:span><text:span text:style-name="T304">s</text:span></text:p>
      <text:p text:style-name="P69"><text:span text:style-name="T301"><text:tab/>II.10.6 </text:span><text:span text:style-name="T305">name_to_handle</text:span><text:span text:style-name="T304"> and </text:span><text:span text:style-name="T305">open_by_handle_at</text:span></text:p>
      <text:p text:style-name="P59"><text:span text:style-name="T293"><text:tab/>II.10.7 </text:span><text:span text:style-name="T306">Extended stat of files: </text:span><text:span text:style-name="T307">statx</text:span></text:p>
      <text:p text:style-name="P68"><text:tab/><text:span text:style-name="T301">II.10.8 </text:span><text:span text:style-name="T308">Chang</text:span><text:span text:style-name="T309">ing</text:span><text:span text:style-name="T308"> root directory</text:span></text:p>
      <text:p text:style-name="P68"><text:tab/>II.10.9 <text:span text:style-name="T310">Inotify</text:span></text:p>
      <text:p text:style-name="P68"><text:tab/>II.10.10 <text:span text:style-name="T311">Inotify</text:span><text:span text:style-name="T312"> </text:span><text:span text:style-name="T225">and</text:span><text:span text:style-name="T312"> </text:span><text:span text:style-name="T311">Fanotify</text:span></text:p>
      <text:p text:style-name="P68"><text:tab/>II.10.11 <text:span text:style-name="T313">ext4</text:span><text:span text:style-name="T314"> </text:span><text:span text:style-name="T298">F</text:span><text:span text:style-name="T314">ile attributes</text:span></text:p>
      <text:p text:style-name="P68"><text:span text:style-name="T315"><text:tab/>II.10.12 </text:span><text:span text:style-name="T313">ext4</text:span><text:span text:style-name="T314"> </text:span><text:span text:style-name="T316">Journaling</text:span></text:p>
      <text:p text:style-name="P68"><text:span text:style-name="T315"><text:tab/>II.10.13 </text:span><text:span text:style-name="T317">Mount namespaces</text:span></text:p>
      <text:p text:style-name="P68"><text:tab/><text:span text:style-name="T318">II.10.14 </text:span><text:span text:style-name="T319">The</text:span><text:span text:style-name="T318"> </text:span><text:span text:style-name="T320">unshare</text:span><text:span text:style-name="T321"> function </text:span><text:span text:style-name="T309">and</text:span><text:span text:style-name="T322"> </text:span><text:span text:style-name="T319">the </text:span><text:span text:style-name="T323">namespaces</text:span></text:p>
      <text:p text:style-name="P68"><text:tab/><text:span text:style-name="T318">II.10.15 </text:span><text:span text:style-name="T324">The </text:span><text:span text:style-name="T325">setns</text:span><text:span text:style-name="T324"> function</text:span></text:p>
      <text:p text:style-name="P68"><text:span text:style-name="T315"><text:tab/>II.10.16 </text:span><text:span text:style-name="T326">Chang</text:span><text:span text:style-name="T298">ing</text:span><text:span text:style-name="T326"> </text:span><text:span text:style-name="T327">the</text:span><text:span text:style-name="T326"> properties of a mount</text:span></text:p>
      <text:p text:style-name="P68"><text:span text:style-name="T315"><text:tab/>II.10.1</text:span><text:span text:style-name="T328">7</text:span><text:span text:style-name="T315"> </text:span><text:span text:style-name="T328">ID-mapped</text:span><text:span text:style-name="T326"> mount</text:span><text:span text:style-name="T328">s</text:span></text:p>
      <text:p text:style-name="P68"><text:span text:style-name="T315"><text:tab/>II.10.1</text:span><text:span text:style-name="T328">8</text:span><text:span text:style-name="T315"> </text:span><text:span text:style-name="T329">Mount information</text:span></text:p>
      <text:p text:style-name="P68"><text:tab/><text:span text:style-name="T315">II.10.1</text:span><text:span text:style-name="T330">9</text:span><text:span text:style-name="T315"> </text:span><text:span text:style-name="T331">New mount API</text:span></text:p>
      <text:p text:style-name="P68"><text:tab/><text:span text:style-name="T315">II.10.</text:span><text:span text:style-name="T332">20</text:span><text:span text:style-name="T315"> </text:span><text:span text:style-name="T333">The </text:span><text:span text:style-name="T334">Virtual File System</text:span></text:p>
      <text:p text:style-name="P70"><text:span text:style-name="T60">List of </text:span>tables</text:p>
      <text:p text:style-name="P58"><text:span text:style-name="T60">List of </text:span><text:span text:style-name="T221">figures</text:span></text:p>
      <text:p text:style-name="P58"/>
      <text:p text:style-name="P34"><text:span text:style-name="T222">Chapter</text:span> <text:span text:style-name="T223">II</text:span><text:span text:style-name="T335">I</text:span> – <text:span text:style-name="T336">E</text:span><text:span text:style-name="T335">nvironment </text:span><text:span text:style-name="T337">and</text:span><text:span text:style-name="T336"> system databases</text:span></text:p>
      <text:p text:style-name="P71"/>
      <text:p text:style-name="P72">I<text:span text:style-name="T226">I</text:span><text:span text:style-name="T268">I</text:span>.1 <text:span text:style-name="T335">Time functions</text:span></text:p>
      <text:p text:style-name="P71"><text:span text:style-name="T10"><text:tab/>III.1.1 Getting the time: </text:span><text:span text:style-name="T338">time</text:span><text:span text:style-name="T10">, </text:span><text:span text:style-name="T338">gettimeofday</text:span><text:span text:style-name="T10"> and </text:span><text:span text:style-name="T338">settimeofday</text:span><text:span text:style-name="T10"> </text:span></text:p>
      <text:p text:style-name="P71"><text:span text:style-name="T10"><text:tab/>III.1.2 Setting time with </text:span><text:span text:style-name="T338">clock_gettime</text:span><text:span text:style-name="T10"> and </text:span><text:span text:style-name="T338">clock_settime</text:span><text:span text:style-name="T10"> </text:span></text:p>
      <text:p text:style-name="P72"><text:tab/>III.1.3 Clocks on Linux </text:p>
      <text:p text:style-name="P71"><text:span text:style-name="T10"><text:tab/>III.1.4 Setting a new time: </text:span><text:span text:style-name="T338">tm</text:span></text:p>
      <text:p text:style-name="P72"><text:tab/>III.1.5 Time conversion functions </text:p>
      <text:p text:style-name="P71"><text:span text:style-name="T10"><text:tab/>III.1.6 Formatting date and time: </text:span><text:span text:style-name="T338">strftime</text:span><text:span text:style-name="T10"> and </text:span><text:span text:style-name="T338">strptime</text:span><text:span text:style-name="T10"> </text:span></text:p>
      <text:p text:style-name="P71"><text:span text:style-name="T10"><text:tab/>III.1.7 </text:span><text:span text:style-name="T339">T</text:span><text:span text:style-name="T10">ime conversion: </text:span><text:span text:style-name="T338">getdate</text:span></text:p>
      <text:p text:style-name="P49"><text:span text:style-name="T340">I</text:span><text:span text:style-name="T341">I</text:span><text:span text:style-name="T342">I</text:span><text:span text:style-name="T340">.</text:span><text:span text:style-name="T343">2</text:span><text:span text:style-name="T340"> </text:span><text:span text:style-name="T344">The environment</text:span></text:p>
      <text:p text:style-name="P73"><text:tab/>III.2.1 Working with environment variables: getenv and setenv</text:p>
      <text:p text:style-name="P73"><text:tab/>III.2.2 Environment during an execve</text:p>
      <text:p text:style-name="P35">I<text:span text:style-name="T268">I</text:span><text:span text:style-name="T226">I</text:span>.<text:span text:style-name="T268">3</text:span> <text:span text:style-name="T268">Locale</text:span></text:p>
      <text:p text:style-name="P71"><text:span text:style-name="T66"><text:tab/>III.3.1 Setting locale: </text:span><text:span text:style-name="T338">setlocale</text:span></text:p>
      <text:p text:style-name="P71"><text:span text:style-name="T66"><text:tab/>III.3.2 Working with locale: </text:span><text:span text:style-name="T338">localeconv</text:span><text:span text:style-name="T66">, <text:s/></text:span><text:span text:style-name="T338">newlocale</text:span><text:span text:style-name="T66"> and </text:span><text:span text:style-name="T338">uselocale</text:span></text:p>
      <text:p text:style-name="P71"><text:span text:style-name="T66"><text:tab/>III.3.3 Duplicating a locale object: </text:span><text:span text:style-name="T338">duplocale</text:span></text:p>
      <text:p text:style-name="P67">I<text:span text:style-name="T268">I</text:span><text:span text:style-name="T226">I</text:span>.<text:span text:style-name="T268">4</text:span> <text:span text:style-name="T345">U</text:span><text:span text:style-name="T268">sers databas</text:span><text:span text:style-name="T345">e:</text:span><text:span text:style-name="T268"> </text:span><text:span text:style-name="T346">/</text:span><text:span text:style-name="T347">etc/passwd</text:span></text:p>
      <text:p text:style-name="P67"><text:span text:style-name="T348"><text:tab/></text:span><text:span text:style-name="T349">III.4.1 Users and groups files</text:span></text:p>
      <text:p text:style-name="P59"><text:span text:style-name="T350"><text:tab/>III.4.2 The </text:span><text:span text:style-name="T351">/etc/passwd</text:span><text:span text:style-name="T350"> file</text:span></text:p>
      <text:p text:style-name="P59"><text:span text:style-name="T350"><text:tab/>III.4.3 Working with the users database : </text:span><text:span text:style-name="T351">getpwent</text:span><text:span text:style-name="T350"> and </text:span><text:span text:style-name="T351">setpwent</text:span></text:p>
      <text:p text:style-name="P59"><text:span text:style-name="T350"><text:tab/>III.4.4 Working with records : </text:span><text:span text:style-name="T351">fgetpwent</text:span><text:span text:style-name="T350"> and </text:span><text:span text:style-name="T351">putpwent</text:span></text:p>
      <text:p text:style-name="P74"><text:span text:style-name="T340">I</text:span><text:span text:style-name="T342">I</text:span><text:span text:style-name="T341">I</text:span><text:span text:style-name="T340">.</text:span><text:span text:style-name="T342">5</text:span><text:span text:style-name="T340"> </text:span><text:span text:style-name="T342">Groups </text:span><text:span text:style-name="T352">database: </text:span><text:span text:style-name="T353">/etc/group</text:span></text:p>
      <text:p text:style-name="P59"><text:span text:style-name="T354"><text:tab/></text:span><text:span text:style-name="T355">III.5.1 Reading the groups database: </text:span><text:span text:style-name="T351">getgrnam</text:span><text:span text:style-name="T355"> and </text:span><text:span text:style-name="T351">getgrgid</text:span></text:p>
      <text:p text:style-name="P59"><text:soft-page-break/><text:span text:style-name="T355"><text:tab/>III.5.2 Working wit</text:span><text:span text:style-name="T356">h</text:span><text:span text:style-name="T355"> the database: </text:span><text:span text:style-name="T351">getgrent</text:span><text:span text:style-name="T355"> and </text:span><text:span text:style-name="T351">setgrent</text:span></text:p>
      <text:p text:style-name="P59"><text:span text:style-name="T355"><text:tab/>III.5.3 Getting the groups list: </text:span><text:span text:style-name="T351">getgrouplist</text:span></text:p>
      <text:p text:style-name="P59"><text:span text:style-name="T355"><text:tab/>III.5.4 Supplementary groups: </text:span><text:span text:style-name="T351">getgroups</text:span><text:span text:style-name="T355">, </text:span><text:span text:style-name="T351">setgroups</text:span><text:span text:style-name="T355"> and </text:span><text:span text:style-name="T351">initgroups</text:span></text:p>
      <text:p text:style-name="P59"><text:span text:style-name="T355"><text:tab/>III.5.5 Real and effective group ID: </text:span><text:span text:style-name="T351">getgid</text:span><text:span text:style-name="T355">, </text:span><text:span text:style-name="T351">getegid</text:span><text:span text:style-name="T355">, </text:span><text:span text:style-name="T351">setgid</text:span><text:span text:style-name="T355">, </text:span><text:span text:style-name="T351">setegid</text:span></text:p>
      <text:p text:style-name="P75"><text:tab/>III.5.6 Saved Set-User-Id and Set-Group-Id</text:p>
      <text:p text:style-name="P59"><text:span text:style-name="T355"><text:tab/>III.5.7 Checking if a process is in a group: </text:span><text:span text:style-name="T351">group_member</text:span></text:p>
      <text:p text:style-name="P67">I<text:span text:style-name="T268">I</text:span><text:span text:style-name="T226">I</text:span>.<text:span text:style-name="T268">6</text:span> <text:span text:style-name="T357">U</text:span><text:span text:style-name="T268">sers </text:span><text:span text:style-name="T345">functions</text:span></text:p>
      <text:p text:style-name="P59"><text:span text:style-name="T66"><text:tab/>III.6.1 Setting user ID: </text:span><text:span text:style-name="T351">getuid</text:span><text:span text:style-name="T66">, </text:span><text:span text:style-name="T351">geteuid</text:span><text:span text:style-name="T66">, </text:span><text:span text:style-name="T351">setuid</text:span><text:span text:style-name="T66"> and </text:span><text:span text:style-name="T351">seteuid</text:span></text:p>
      <text:p text:style-name="P59"><text:span text:style-name="T66"><text:tab/>III.6.2 </text:span><text:span text:style-name="T351">getresgid</text:span><text:span text:style-name="T66"> and </text:span><text:span text:style-name="T351">getresuid</text:span></text:p>
      <text:p text:style-name="P74"><text:span text:style-name="T340">I</text:span><text:span text:style-name="T342">I</text:span><text:span text:style-name="T341">I</text:span><text:span text:style-name="T340">.</text:span><text:span text:style-name="T358">7</text:span><text:span text:style-name="T340"> </text:span><text:span text:style-name="T352">Password database: </text:span><text:span text:style-name="T353">/etc/shadow</text:span></text:p>
      <text:p text:style-name="P59"><text:span text:style-name="T359"><text:tab/>III.7.1 Creat</text:span><text:span text:style-name="T360">ing</text:span><text:span text:style-name="T359"> encrypted passphrase: </text:span><text:span text:style-name="T351">crypt</text:span></text:p>
      <text:p text:style-name="P59"><text:span text:style-name="T359"><text:tab/>III.7.2 Generating a salt: </text:span><text:span text:style-name="T351">crypt_gensalt</text:span></text:p>
      <text:p text:style-name="P59"><text:span text:style-name="T359"><text:tab/>III.7.3 Hiding the input with BSD </text:span><text:span text:style-name="T351">readpassphrase</text:span><text:span text:style-name="T361"><text:tab/></text:span></text:p>
      <text:p text:style-name="P67">I<text:span text:style-name="T268">I</text:span><text:span text:style-name="T226">I</text:span>.<text:span text:style-name="T362">8</text:span> <text:span text:style-name="T362">Login</text:span></text:p>
      <text:p text:style-name="P59"><text:span text:style-name="T66"><text:tab/></text:span><text:span text:style-name="T363">III.8.1 Working with the utmp file: </text:span><text:span text:style-name="T351">getutent</text:span><text:span text:style-name="T363">, </text:span><text:span text:style-name="T351">getutid</text:span><text:span text:style-name="T363">, </text:span><text:span text:style-name="T351">setutent</text:span></text:p>
      <text:p text:style-name="P59"><text:span text:style-name="T363"><text:tab/>III.8.2 The login: </text:span><text:span text:style-name="T351">login</text:span><text:span text:style-name="T363"> and </text:span><text:span text:style-name="T351">logout</text:span></text:p>
      <text:p text:style-name="P67">I<text:span text:style-name="T268">I</text:span><text:span text:style-name="T226">I</text:span>.<text:span text:style-name="T364">9</text:span> <text:span text:style-name="T365">Hosts, networks, protocols, services databases</text:span></text:p>
      <text:p text:style-name="P74"><text:span text:style-name="T366"><text:tab/>III.9.1 </text:span><text:span text:style-name="T367">The hosts database: </text:span><text:span text:style-name="T368">/</text:span><text:span text:style-name="T369">etc/hosts</text:span></text:p>
      <text:p text:style-name="P74"><text:span text:style-name="T366"><text:tab/>III.9.2 </text:span><text:span text:style-name="T367">The </text:span><text:span text:style-name="T370">networks database: </text:span><text:span text:style-name="T371">/</text:span><text:span text:style-name="T369">etc/</text:span><text:span text:style-name="T372">networks</text:span></text:p>
      <text:p text:style-name="P74"><text:span text:style-name="T366"><text:tab/>III.9.3 </text:span><text:span text:style-name="T367">The </text:span><text:span text:style-name="T373">protocol</text:span><text:span text:style-name="T370">s database: </text:span><text:span text:style-name="T369">/etc/protocols</text:span></text:p>
      <text:p text:style-name="P74"><text:span text:style-name="T370"><text:tab/></text:span><text:span text:style-name="T374">III.9.4 </text:span><text:span text:style-name="T367">The </text:span><text:span text:style-name="T375">services</text:span><text:span text:style-name="T370"> database: </text:span><text:span text:style-name="T369">/etc/services</text:span></text:p>
      <text:p text:style-name="P67">I<text:span text:style-name="T268">I</text:span><text:span text:style-name="T226">I</text:span>.<text:span text:style-name="T376">1</text:span><text:span text:style-name="T365">0</text:span> <text:span text:style-name="T364">System identification</text:span></text:p>
      <text:p text:style-name="P59"><text:span text:style-name="T66"><text:tab/></text:span><text:span text:style-name="T377">III.10.1 Getting system information: </text:span><text:span text:style-name="T378">uname</text:span></text:p>
      <text:p text:style-name="P59"><text:span text:style-name="T377"><text:tab/>III.10.2 Getting and setting hostname: </text:span><text:span text:style-name="T378">gethostname</text:span><text:span text:style-name="T377"> and </text:span><text:span text:style-name="T378">sethostent</text:span></text:p>
      <text:p text:style-name="P72">I<text:span text:style-name="T268">I</text:span><text:span text:style-name="T226">I</text:span>.<text:span text:style-name="T376">1</text:span><text:span text:style-name="T269">1 Pluggable Authentication Modules</text:span></text:p>
      <text:p text:style-name="P59"><text:span text:style-name="T10"><text:tab/>III.11.1 PAM Authentication: </text:span><text:span text:style-name="T378">pam_authenticate</text:span><text:span text:style-name="T10"> </text:span></text:p>
      <text:p text:style-name="P59"><text:span text:style-name="T10"><text:tab/>III.11.2 PAM Session: </text:span><text:span text:style-name="T378">pam_open_session</text:span><text:span text:style-name="T10"> and </text:span><text:span text:style-name="T378">pam_close_session</text:span></text:p>
      <text:p text:style-name="P59"><text:span text:style-name="T10"><text:tab/>III.11.3 Process environment and PAM environment: </text:span><text:span text:style-name="T378">pam_getenv</text:span><text:span text:style-name="T10">, </text:span><text:span text:style-name="T378">pam_putenv</text:span><text:span text:style-name="T10"> </text:span></text:p>
      <text:p text:style-name="P59"><text:span text:style-name="T10"><text:tab/>III.11.4 PAM items: </text:span><text:span text:style-name="T378">pam_get_item</text:span><text:span text:style-name="T10"> and </text:span><text:span text:style-name="T378">pam_set_item</text:span><text:span text:style-name="T10"> </text:span></text:p>
      <text:p text:style-name="P59"><text:span text:style-name="T10"><text:tab/>III.11.5 Changing password: </text:span><text:span text:style-name="T378">pam_chauthtok</text:span></text:p>
      <text:p text:style-name="P74"><text:span text:style-name="T379">III.1</text:span><text:span text:style-name="T380">2</text:span><text:span text:style-name="T379"> Theory </text:span><text:span text:style-name="T381">and</text:span><text:span text:style-name="T379"> </text:span><text:span text:style-name="T381">i</text:span><text:span text:style-name="T379">nsights</text:span></text:p>
      <text:p text:style-name="P76"><text:tab/>III.1<text:span text:style-name="T382">2</text:span>.1 The Process Execution Environment</text:p>
      <text:p text:style-name="P74"><text:span text:style-name="T379"><text:tab/>III.1</text:span><text:span text:style-name="T380">2</text:span><text:span text:style-name="T379">.2 The </text:span><text:span text:style-name="T369">intmax_t</text:span><text:span text:style-name="T379"> and </text:span><text:span text:style-name="T369">uintmax_t</text:span><text:span text:style-name="T379"> data types</text:span></text:p>
      <text:p text:style-name="P74"><text:span text:style-name="T379"><text:tab/>III.1</text:span><text:span text:style-name="T380">2</text:span><text:span text:style-name="T379">.3 Using </text:span><text:span text:style-name="T369">initgroups</text:span><text:span text:style-name="T379"> to set up the supplementary groups</text:span></text:p>
      <text:p text:style-name="P76"><text:tab/>III.1<text:span text:style-name="T382">2</text:span>.4 Command line tools for the groups</text:p>
      <text:p text:style-name="P76"><text:tab/>III.1<text:span text:style-name="T382">2</text:span>.5 The <text:span text:style-name="T211">Name Service Switch </text:span></text:p>
      <text:p text:style-name="P76"><text:tab/>III.1<text:span text:style-name="T382">2</text:span>.6 Command line tools for the users</text:p>
      <text:p text:style-name="P76"><text:tab/>III.1<text:span text:style-name="T382">2</text:span>.7 The login process</text:p>
      <text:p text:style-name="P76"><text:tab/>III.1<text:span text:style-name="T382">2</text:span>.8 PAM functions summary</text:p>
      <text:p text:style-name="P77">List of tables</text:p>
      <text:p text:style-name="P77">List of <text:span text:style-name="T383">figures</text:span></text:p>
      <text:p text:style-name="P76"/>
      <text:p text:style-name="P34"><text:span text:style-name="T222">Chapter</text:span> <text:span text:style-name="T384">IV</text:span> – <text:span text:style-name="T385">Memory</text:span></text:p>
      <text:p text:style-name="P34"/>
      <text:p text:style-name="P67"><text:span text:style-name="T384">IV</text:span>.1 <text:span text:style-name="T384">Executable files </text:span></text:p>
      <text:p text:style-name="P67"><text:soft-page-break/><text:span text:style-name="T386"><text:tab/>IV.1.1 The </text:span><text:span text:style-name="T387">Executable and Linkable Format</text:span><text:span text:style-name="T386"> (ELF)</text:span></text:p>
      <text:p text:style-name="P59"><text:span text:style-name="T388"><text:tab/></text:span><text:span text:style-name="Strong_20_Emphasis"><text:span text:style-name="T389">IV.1.2 The ELF Header</text:span></text:span></text:p>
      <text:p text:style-name="P59"><text:span text:style-name="Strong_20_Emphasis"><text:span text:style-name="T389"><text:tab/>IV.1.3 Section and Segments</text:span></text:span></text:p>
      <text:p text:style-name="P59"><text:span text:style-name="Strong_20_Emphasis"><text:span text:style-name="T389"><text:tab/>IV.1.4 The symbol table</text:span></text:span></text:p>
      <text:p text:style-name="P59"><text:span text:style-name="Strong_20_Emphasis"><text:span text:style-name="T389"><text:tab/>IV.1.5 The Relocation table</text:span></text:span></text:p>
      <text:p text:style-name="P59"><text:span text:style-name="Strong_20_Emphasis"><text:span text:style-name="T389"><text:tab/>IV.1.6 The Dynamic section</text:span></text:span></text:p>
      <text:p text:style-name="P59"><text:span text:style-name="Strong_20_Emphasis"><text:span text:style-name="T389"><text:tab/>IV.1.7 The Note section</text:span></text:span></text:p>
      <text:p text:style-name="P59"><text:span text:style-name="Strong_20_Emphasis"><text:span text:style-name="T389"><text:tab/>IV.1.8 Read</text:span></text:span><text:span text:style-name="Strong_20_Emphasis"><text:span text:style-name="T390">ing</text:span></text:span><text:span text:style-name="Strong_20_Emphasis"><text:span text:style-name="T389"> ELF</text:span></text:span></text:p>
      <text:p text:style-name="P59"><text:span text:style-name="Strong_20_Emphasis"><text:span text:style-name="T389"><text:tab/>IV.1.9 Load</text:span></text:span><text:span text:style-name="Strong_20_Emphasis"><text:span text:style-name="T390">ing</text:span></text:span><text:span text:style-name="Strong_20_Emphasis"><text:span text:style-name="T389"> ELF into memory</text:span></text:span></text:p>
      <text:p text:style-name="P78">IV.2 Start <text:span text:style-name="T391">and</text:span> end of a program</text:p>
      <text:p text:style-name="P78"><text:tab/>IV.2.1 The <text:span text:style-name="T212">main</text:span> function</text:p>
      <text:p text:style-name="P59"><text:span text:style-name="T392"><text:tab/>IV.2.2 The </text:span><text:span text:style-name="T393">_exit</text:span><text:span text:style-name="T392"> and </text:span><text:span text:style-name="T393">_Exit</text:span><text:span text:style-name="T392"> functions</text:span></text:p>
      <text:p text:style-name="P78"><text:tab/>IV.2.3 Normal process termination</text:p>
      <text:p text:style-name="P59"><text:span text:style-name="T392"><text:tab/>IV.2.4 </text:span><text:span text:style-name="T393">at_exit</text:span><text:span text:style-name="T392"> </text:span><text:span text:style-name="T394">and</text:span><text:span text:style-name="T392"> </text:span><text:span text:style-name="T393">on_exit</text:span></text:p>
      <text:p text:style-name="P78"><text:tab/>IV.2.5 Process termination and exit status</text:p>
      <text:p text:style-name="P59"><text:span text:style-name="T392"><text:tab/></text:span><text:span text:style-name="T395">IV.2.</text:span><text:span text:style-name="T396">6</text:span><text:span text:style-name="T392"> </text:span><text:span text:style-name="T397">Aborting a program: </text:span><text:span text:style-name="T393">abort</text:span></text:p>
      <text:p text:style-name="P78">IV.<text:span text:style-name="T398">3</text:span> <text:span text:style-name="T398">Command line arguments</text:span></text:p>
      <text:p text:style-name="P59"><text:span text:style-name="T399"><text:tab/>IV.</text:span><text:span text:style-name="T400">3.1</text:span><text:span text:style-name="T399"> Parsing options with </text:span><text:span text:style-name="T393">getopt</text:span></text:p>
      <text:p text:style-name="P59"><text:span text:style-name="T392"><text:tab/></text:span><text:span text:style-name="T399">IV.3.2 Parsing options with </text:span><text:span text:style-name="T393">getopt_long</text:span></text:p>
      <text:p text:style-name="P59"><text:span text:style-name="T392"><text:tab/></text:span><text:span text:style-name="T399">IV.3.</text:span><text:span text:style-name="T401">3 The </text:span><text:span text:style-name="T393">getsubopt</text:span><text:span text:style-name="T401"> function</text:span></text:p>
      <text:p text:style-name="P78"><text:tab/><text:span text:style-name="T402">IV.</text:span><text:span text:style-name="T403">3.2</text:span><text:span text:style-name="T402"> </text:span><text:span text:style-name="T404">The a</text:span><text:span text:style-name="T405">rgp </text:span><text:span text:style-name="T406">interface</text:span></text:p>
      <text:p text:style-name="P78">IV.<text:span text:style-name="T398">4</text:span> <text:span text:style-name="T385">M</text:span><text:span text:style-name="T398">emory </text:span><text:span text:style-name="T385">allocation</text:span></text:p>
      <text:p text:style-name="P79"><text:tab/>IV.4.1 Memory allocation <text:span text:style-name="T385">functions</text:span></text:p>
      <text:p text:style-name="P59"><text:span text:style-name="T399"><text:tab/>IV.4.</text:span><text:span text:style-name="T407">2</text:span><text:span text:style-name="T399"> </text:span><text:span text:style-name="T407">Processes and memory</text:span></text:p>
      <text:p text:style-name="P80"><text:tab/><text:span text:style-name="T408">IV.4.3 The GNU Allocator</text:span></text:p>
      <text:p text:style-name="P59"><text:span text:style-name="T409"><text:tab/></text:span><text:span text:style-name="T407">IV.4.</text:span><text:span text:style-name="T410">4</text:span><text:span text:style-name="T407"> The </text:span><text:span text:style-name="T411">malloc_trim</text:span><text:span text:style-name="T407"> function</text:span></text:p>
      <text:p text:style-name="P80"><text:tab/>IV.4.<text:span text:style-name="T408">5</text:span> The <text:span text:style-name="T212">alloc</text:span><text:span text:style-name="T412">a</text:span> function</text:p>
      <text:p text:style-name="P80"><text:span text:style-name="T413"><text:tab/>IV.4.</text:span><text:span text:style-name="T414">6</text:span><text:span text:style-name="T413"> </text:span><text:span text:style-name="T415">Allocating aligned memory</text:span></text:p>
      <text:p text:style-name="P81"><text:tab/><text:span text:style-name="T403">IV.4.</text:span><text:span text:style-name="T416">7</text:span><text:span text:style-name="T403"> </text:span><text:span text:style-name="T416">The </text:span><text:span text:style-name="T417">getpagesize</text:span><text:span text:style-name="T416"> function</text:span></text:p>
      <text:p text:style-name="P81">IV.5 Memory mapped I/O</text:p>
      <text:p text:style-name="P59"><text:span text:style-name="T418"><text:tab/>IV.5.1 The </text:span><text:span text:style-name="T411">mmap</text:span><text:span text:style-name="T418"> function</text:span></text:p>
      <text:p text:style-name="P81"><text:tab/>IV.5.2 Private file mapping</text:p>
      <text:p text:style-name="P81"><text:tab/>IV.5.3 Shared file mapping</text:p>
      <text:p text:style-name="P81"><text:tab/>IV.5.4 Anonymous mapping</text:p>
      <text:p text:style-name="P81"><text:tab/>IV.5.<text:span text:style-name="T419">5</text:span> <text:span text:style-name="T419">Extending a mapped file</text:span></text:p>
      <text:p text:style-name="P81"><text:tab/>IV.5.<text:span text:style-name="T419">6</text:span> Remap<text:span text:style-name="T420">ping</text:span> memory</text:p>
      <text:p text:style-name="P59"><text:span text:style-name="T418">IV.</text:span><text:span text:style-name="T421">6</text:span><text:span text:style-name="T418"> </text:span><text:span text:style-name="T422">M</text:span><text:span text:style-name="T423">emory </text:span><text:span text:style-name="T424">functions</text:span></text:p>
      <text:p text:style-name="P59"><text:span text:style-name="T418"><text:tab/>IV.</text:span><text:span text:style-name="T425">6.</text:span><text:span text:style-name="T423">1</text:span><text:span text:style-name="T418"> </text:span><text:span text:style-name="T423">The </text:span><text:span text:style-name="T411">memcpy</text:span><text:span text:style-name="T423"> function</text:span></text:p>
      <text:p text:style-name="P59"><text:span text:style-name="T426"><text:tab/></text:span><text:span text:style-name="T425">IV.6.</text:span><text:span text:style-name="T427">2</text:span><text:span text:style-name="T426"> </text:span><text:span text:style-name="T423">The</text:span> <text:span text:style-name="T411">memmove</text:span> <text:span text:style-name="T423">function</text:span></text:p>
      <text:p text:style-name="P59"><text:span text:style-name="T418"><text:tab/>IV.</text:span><text:span text:style-name="T425">6.</text:span><text:span text:style-name="T427">3</text:span><text:span text:style-name="T418"> </text:span><text:span text:style-name="T428">Memory initialization: </text:span><text:span text:style-name="T411">memset</text:span></text:p>
      <text:p text:style-name="P59"><text:span text:style-name="T424"><text:tab/>IV.6.4 </text:span><text:span text:style-name="T429">Memory search:</text:span><text:span text:style-name="T424"> </text:span><text:span text:style-name="T411">memchr</text:span><text:span text:style-name="T424"> </text:span><text:span text:style-name="T429">and</text:span><text:span text:style-name="T424"> </text:span><text:span text:style-name="T411">memmem</text:span></text:p>
      <text:p text:style-name="P59"><text:span text:style-name="T424"><text:tab/>IV.6.5 </text:span><text:span text:style-name="T430">Comparing memory: </text:span><text:span text:style-name="T411">memcmp</text:span></text:p>
      <text:p text:style-name="P59"><text:span text:style-name="T424"><text:tab/></text:span><text:span text:style-name="T429">IV.6.6 Obfuscating memory: </text:span><text:span text:style-name="T411">memfrob</text:span></text:p>
      <text:p text:style-name="P82">IV.7 Protect the memory</text:p>
      <text:p text:style-name="P59"><text:span text:style-name="T429"><text:tab/>IV.7.</text:span><text:span text:style-name="T431">1</text:span><text:span text:style-name="T429"> </text:span><text:span text:style-name="T431">The </text:span><text:span text:style-name="T411">mprotect</text:span><text:span text:style-name="T431"> function</text:span></text:p>
      <text:p text:style-name="P83"><text:tab/>IV.7.2 Memory protection keys</text:p>
      <text:p text:style-name="P81"><text:soft-page-break/>IV.<text:span text:style-name="T432">8</text:span> <text:span text:style-name="T432">Lock</text:span><text:span text:style-name="T433">ing</text:span><text:span text:style-name="T434"> memory</text:span></text:p>
      <text:p text:style-name="P59"><text:span text:style-name="T418"><text:tab/>IV.</text:span><text:span text:style-name="T435">8.</text:span><text:span text:style-name="T436">1 The </text:span><text:span text:style-name="T411">mlock</text:span><text:span text:style-name="T436"> function</text:span></text:p>
      <text:p text:style-name="P59"><text:span text:style-name="T418"><text:tab/>IV.</text:span><text:span text:style-name="T435">8.</text:span><text:span text:style-name="T436">2 The </text:span><text:span text:style-name="T411">mincore</text:span><text:span text:style-name="T436"> function</text:span></text:p>
      <text:p text:style-name="P59"><text:span text:style-name="Strong_20_Emphasis"><text:span text:style-name="T437">IV.9 </text:span></text:span><text:span text:style-name="Strong_20_Emphasis"><text:span text:style-name="T421">RAM-Backed Files and Secret Memory</text:span></text:span></text:p>
      <text:p text:style-name="P59"><text:span text:style-name="T438"><text:tab/>IV.</text:span><text:span text:style-name="T439">9.1</text:span><text:span text:style-name="T438"> A</text:span><text:span text:style-name="T436">nonymous RAM-ba</text:span><text:span text:style-name="T440">ck</text:span><text:span text:style-name="T436">ed file: </text:span><text:span text:style-name="T411">memfd_create</text:span></text:p>
      <text:p text:style-name="P59"><text:span text:style-name="T436"><text:tab/></text:span><text:span text:style-name="T441">IV.</text:span><text:span text:style-name="T442">9.2</text:span><text:span text:style-name="T441"> Private anonymous RAM-backed memory: </text:span><text:span text:style-name="T411">memfd_secret</text:span></text:p>
      <text:p text:style-name="P59"><text:span text:style-name="T418">IV.</text:span><text:span text:style-name="T443">10</text:span><text:span text:style-name="T418"> </text:span><text:span text:style-name="T435">Memory advice</text:span></text:p>
      <text:p text:style-name="P84"><text:tab/><text:span text:style-name="T444">IV.</text:span><text:span text:style-name="T445">10</text:span><text:span text:style-name="T444">.</text:span><text:span text:style-name="T446">1</text:span><text:span text:style-name="T444"> The </text:span><text:span text:style-name="T447">madvise</text:span><text:span text:style-name="T444"> function</text:span></text:p>
      <text:p text:style-name="P59"><text:span text:style-name="T448"><text:tab/>IV.</text:span><text:span text:style-name="T449">10</text:span><text:span text:style-name="T448">.</text:span><text:span text:style-name="T450">2</text:span><text:span text:style-name="T448"> The </text:span><text:span text:style-name="T451">posix_madvise</text:span><text:span text:style-name="T448"> function</text:span></text:p>
      <text:p text:style-name="P59"><text:span text:style-name="T452"><text:tab/>IV.</text:span><text:span text:style-name="T453">10</text:span><text:span text:style-name="T452">.3 Remote memory advice: </text:span><text:span text:style-name="T451">process_madvise</text:span></text:p>
      <text:p text:style-name="P59"><text:span text:style-name="T452">IV.1</text:span><text:span text:style-name="T443">1</text:span><text:span text:style-name="T452"> Nonlocal goto</text:span><text:span text:style-name="T454">s</text:span></text:p>
      <text:p text:style-name="P59"><text:span text:style-name="T451"><text:tab/></text:span><text:span text:style-name="T452">IV.1</text:span><text:span text:style-name="T453">1</text:span><text:span text:style-name="T452">.1 The </text:span><text:span text:style-name="T451">setjmp</text:span><text:span text:style-name="T452"> and </text:span><text:span text:style-name="T451">longjmp</text:span><text:span text:style-name="T452"> functions</text:span></text:p>
      <text:p text:style-name="P74"><text:tab/>IV.1<text:span text:style-name="T455">1.</text:span><text:span text:style-name="T456">2</text:span> The <text:span text:style-name="T447">sigsetjmp</text:span> and <text:span text:style-name="T447">siglongjmp</text:span> functions</text:p>
      <text:p text:style-name="P85">IV.1<text:span text:style-name="T457">2</text:span> Core dump <text:span text:style-name="T458">file</text:span></text:p>
      <text:p text:style-name="P86">IV.13 Dynamically loaded objects</text:p>
      <text:p text:style-name="P84"><text:tab/><text:span text:style-name="T459">IV.13.1 Open</text:span><text:span text:style-name="T460">ing</text:span><text:span text:style-name="T459"> a shared object: </text:span><text:span text:style-name="T461">dlopen</text:span></text:p>
      <text:p text:style-name="P81"><text:tab/><text:span text:style-name="T459">IV.13.</text:span><text:span text:style-name="T462">2</text:span><text:span text:style-name="T459"> O</text:span><text:span text:style-name="T462">btain</text:span><text:span text:style-name="T460">ing</text:span><text:span text:style-name="T462"> the address of a symbol</text:span><text:span text:style-name="T459">: </text:span><text:span text:style-name="T461">dl</text:span><text:span text:style-name="T463">sym</text:span></text:p>
      <text:p text:style-name="P87"><text:span text:style-name="T464"><text:tab/></text:span><text:span text:style-name="T465">IV.13.</text:span><text:span text:style-name="T466">4</text:span><text:span text:style-name="T465"> </text:span><text:span text:style-name="T466">O</text:span><text:span text:style-name="T465">btain</text:span><text:span text:style-name="T467">ing</text:span><text:span text:style-name="T465"> information about a loaded object: </text:span><text:span text:style-name="T468">d</text:span><text:span text:style-name="T469">linfo</text:span></text:p>
      <text:p text:style-name="P87"><text:span text:style-name="T469"><text:tab/></text:span><text:span text:style-name="T459">IV.13.</text:span><text:span text:style-name="T470">5</text:span><text:span text:style-name="T459"> </text:span><text:span text:style-name="T470">Translat</text:span><text:span text:style-name="T460">ing</text:span><text:span text:style-name="T470"> address to symbolic information</text:span><text:span text:style-name="T459">: </text:span><text:span text:style-name="T461">d</text:span><text:span text:style-name="T471">laddr</text:span></text:p>
      <text:p text:style-name="P81"><text:tab/><text:span text:style-name="T459">IV.13.</text:span><text:span text:style-name="T472">6</text:span><text:span text:style-name="T459"> </text:span><text:span text:style-name="T473">W</text:span><text:span text:style-name="T459">alk</text:span><text:span text:style-name="T460">ing</text:span><text:span text:style-name="T459"> through </text:span><text:span text:style-name="T460">a </text:span><text:span text:style-name="T459">list of shared objects: </text:span><text:span text:style-name="T461">d</text:span><text:span text:style-name="T471">l</text:span><text:span text:style-name="T474">­</text:span><text:span text:style-name="T475">_</text:span><text:span text:style-name="T474">iterate_phdr</text:span></text:p>
      <text:p text:style-name="P81">IV.<text:span text:style-name="T476">1</text:span><text:span text:style-name="T477">4</text:span> <text:span text:style-name="T476">Theory </text:span><text:span text:style-name="T391">and</text:span><text:span text:style-name="T476"> </text:span><text:span text:style-name="T391">i</text:span><text:span text:style-name="T476">nsights</text:span></text:p>
      <text:p text:style-name="P81"><text:tab/>IV.<text:span text:style-name="T476">1</text:span><text:span text:style-name="T477">4</text:span>.1 The dynamic linker</text:p>
      <text:p text:style-name="P81"><text:tab/>IV.<text:span text:style-name="T476">1</text:span><text:span text:style-name="T477">4</text:span>.2 The C Runtime</text:p>
      <text:p text:style-name="P81"><text:tab/>IV.<text:span text:style-name="T476">1</text:span><text:span text:style-name="T477">4</text:span>.<text:span text:style-name="T478">3</text:span> Memory allocation parameters</text:p>
      <text:p text:style-name="P59"><text:span text:style-name="T418"><text:tab/>IV.</text:span><text:span text:style-name="T479">1</text:span><text:span text:style-name="T443">4</text:span><text:span text:style-name="T418">.</text:span><text:span text:style-name="T480">4</text:span><text:span text:style-name="T418"> </text:span><text:span text:style-name="T411">malloc</text:span><text:span text:style-name="T418"> related functions</text:span></text:p>
      <text:p text:style-name="P59"><text:span text:style-name="T418"><text:tab/>IV.</text:span><text:span text:style-name="T479">1</text:span><text:span text:style-name="T443">4</text:span><text:span text:style-name="T418">.</text:span><text:span text:style-name="T480">5</text:span><text:span text:style-name="T418"> Heap consistency checking</text:span></text:p>
      <text:p text:style-name="P59"><text:span text:style-name="T418"><text:tab/>IV.</text:span><text:span text:style-name="T479">1</text:span><text:span text:style-name="T443">4</text:span><text:span text:style-name="T418">.</text:span><text:span text:style-name="T481">6</text:span><text:span text:style-name="T418"> Mapping to a specific address</text:span></text:p>
      <text:p text:style-name="P81"><text:tab/><text:span text:style-name="T482">IV.1</text:span><text:span text:style-name="T477">4</text:span><text:span text:style-name="T482">.</text:span><text:span text:style-name="T483">7</text:span><text:span text:style-name="T482"> Memory-management terms glossary</text:span></text:p>
      <text:p text:style-name="P59"><text:span text:style-name="T484"><text:tab/>IV.14.8 Get</text:span><text:span text:style-name="T485">ting</text:span><text:span text:style-name="T484"> information about physical pages: </text:span><text:span text:style-name="T411">get_phys_pages</text:span><text:span text:style-name="T484"><text:tab/><text:tab/><text:tab/>IV.14.9 Get</text:span><text:span text:style-name="T485">ting</text:span><text:span text:style-name="T484"> the number of processors: </text:span><text:span text:style-name="T411">get_nprocs</text:span></text:p>
      <text:p text:style-name="P59"><text:span text:style-name="T484"><text:tab/>IV.14.1</text:span><text:span text:style-name="T486">0</text:span><text:span text:style-name="T484"> Query</text:span><text:span text:style-name="T485">ing</text:span><text:span text:style-name="T484"> the cache: </text:span><text:span text:style-name="T411">cachestat</text:span></text:p>
      <text:p text:style-name="P88"><text:tab/>IV.14.1<text:span text:style-name="T487">1</text:span> <text:span text:style-name="T487">Non-Uniform Memory Architecture</text:span>: <text:span text:style-name="T488">numa</text:span></text:p>
      <text:p text:style-name="P77">List of tables</text:p>
      <text:p text:style-name="P77">List of <text:span text:style-name="T383">figures</text:span></text:p>
      <text:p text:style-name="P77"/>
      <text:p text:style-name="P34"><text:span text:style-name="T222">Chapter</text:span> <text:span text:style-name="T384">V</text:span> – <text:span text:style-name="T489">Processes</text:span></text:p>
      <text:p text:style-name="P34"/>
      <text:p text:style-name="P67"><text:span text:style-name="T384">V</text:span>.1 <text:span text:style-name="T489">Process</text:span><text:span text:style-name="T490">es</text:span><text:span text:style-name="T489">..</text:span><text:span text:style-name="T384">…………….……....</text:span>…………….…………………<text:span text:style-name="T491">…..</text:span></text:p>
      <text:p text:style-name="P59"><text:span text:style-name="T492"><text:tab/>V.1.1 </text:span><text:span text:style-name="T493">Get the process identifier: </text:span><text:span text:style-name="T494">getpid</text:span><text:span text:style-name="T493"> and </text:span><text:span text:style-name="T495">getppid</text:span></text:p>
      <text:p text:style-name="P89"><text:span text:style-name="Strong_20_Emphasis"><text:span text:style-name="T496"><text:tab/>V.1.</text:span></text:span><text:span text:style-name="Strong_20_Emphasis"><text:span text:style-name="T497">2</text:span></text:span><text:span text:style-name="Strong_20_Emphasis"><text:span text:style-name="T496"> </text:span></text:span><text:span text:style-name="Strong_20_Emphasis"><text:span text:style-name="T497">Create a process</text:span></text:span><text:span text:style-name="Strong_20_Emphasis"><text:span text:style-name="T496">: </text:span></text:span><text:span text:style-name="Strong_20_Emphasis"><text:span text:style-name="T498">fork</text:span></text:span></text:p>
      <text:p text:style-name="P89"><text:tab/><text:span text:style-name="Strong_20_Emphasis"><text:span text:style-name="T496">V.1.</text:span></text:span><text:span text:style-name="Strong_20_Emphasis"><text:span text:style-name="T499">3</text:span></text:span><text:span text:style-name="Strong_20_Emphasis"><text:span text:style-name="T496"> </text:span></text:span><text:span text:style-name="Strong_20_Emphasis"><text:span text:style-name="T497">Create a </text:span></text:span><text:span text:style-name="Strong_20_Emphasis"><text:span text:style-name="T500">process</text:span></text:span><text:span text:style-name="Strong_20_Emphasis"><text:span text:style-name="T497"> </text:span></text:span><text:span text:style-name="Strong_20_Emphasis"><text:span text:style-name="T499">blocking the parent</text:span></text:span><text:span text:style-name="Strong_20_Emphasis"><text:span text:style-name="T496">: </text:span></text:span><text:span text:style-name="Strong_20_Emphasis"><text:span text:style-name="T498">vfork</text:span></text:span></text:p>
      <text:p text:style-name="P59"><text:span text:style-name="Strong_20_Emphasis"><text:span text:style-name="T501"><text:tab/></text:span></text:span><text:span text:style-name="Strong_20_Emphasis"><text:span text:style-name="T502">V.1.</text:span></text:span><text:span text:style-name="Strong_20_Emphasis"><text:span text:style-name="T503">4</text:span></text:span><text:span text:style-name="Strong_20_Emphasis"><text:span text:style-name="T502"> </text:span></text:span><text:span text:style-name="Strong_20_Emphasis"><text:span text:style-name="T503">Block the execution</text:span></text:span><text:span text:style-name="Strong_20_Emphasis"><text:span text:style-name="T502">: </text:span></text:span><text:span text:style-name="Strong_20_Emphasis"><text:span text:style-name="T504">wait</text:span></text:span><text:span text:style-name="Strong_20_Emphasis"><text:span text:style-name="T503">, </text:span></text:span><text:span text:style-name="Strong_20_Emphasis"><text:span text:style-name="T504">waitpid</text:span></text:span><text:span text:style-name="Strong_20_Emphasis"><text:span text:style-name="T503"> and </text:span></text:span><text:span text:style-name="Strong_20_Emphasis"><text:span text:style-name="T505">waitid</text:span></text:span></text:p>
      <text:p text:style-name="P59"><text:span text:style-name="Strong_20_Emphasis"><text:span text:style-name="T501"><text:tab/></text:span></text:span><text:span text:style-name="Strong_20_Emphasis"><text:span text:style-name="T502">V.1.</text:span></text:span><text:span text:style-name="Strong_20_Emphasis"><text:span text:style-name="T506">5</text:span></text:span><text:span text:style-name="Strong_20_Emphasis"><text:span text:style-name="T502"> </text:span></text:span><text:span text:style-name="Strong_20_Emphasis"><text:span text:style-name="T507">The </text:span></text:span><text:span text:style-name="Strong_20_Emphasis"><text:span text:style-name="T504">wait</text:span></text:span><text:span text:style-name="Strong_20_Emphasis"><text:span text:style-name="T505">3</text:span></text:span><text:span text:style-name="Strong_20_Emphasis"><text:span text:style-name="T503"> and </text:span></text:span><text:span text:style-name="Strong_20_Emphasis"><text:span text:style-name="T505">wait4</text:span></text:span><text:span text:style-name="Strong_20_Emphasis"><text:span text:style-name="T503"> functions</text:span></text:span></text:p>
      <text:p text:style-name="P59"><text:span text:style-name="Strong_20_Emphasis"><text:span text:style-name="T502"><text:tab/>V.1.</text:span></text:span><text:span text:style-name="Strong_20_Emphasis"><text:span text:style-name="T508">6</text:span></text:span><text:span text:style-name="Strong_20_Emphasis"><text:span text:style-name="T502"> </text:span></text:span><text:span text:style-name="Strong_20_Emphasis"><text:span text:style-name="T509">P</text:span></text:span><text:span text:style-name="Strong_20_Emphasis"><text:span text:style-name="T510">rocess </text:span></text:span><text:span text:style-name="Strong_20_Emphasis"><text:span text:style-name="T509">file descriptors</text:span></text:span></text:p>
      <text:p text:style-name="P59"><text:span text:style-name="Strong_20_Emphasis"><text:span text:style-name="T509"><text:tab/></text:span></text:span><text:span text:style-name="Strong_20_Emphasis"><text:span text:style-name="T511">V.1.7 Create child process</text:span></text:span><text:span text:style-name="Strong_20_Emphasis"><text:span text:style-name="T512">es</text:span></text:span><text:span text:style-name="Strong_20_Emphasis"><text:span text:style-name="T511">: </text:span></text:span><text:span text:style-name="Strong_20_Emphasis"><text:span text:style-name="T513">clone</text:span></text:span><text:span text:style-name="Strong_20_Emphasis"><text:span text:style-name="T511"> and </text:span></text:span><text:span text:style-name="Strong_20_Emphasis"><text:span text:style-name="T514">clone3</text:span></text:span></text:p>
      <text:p text:style-name="P59"><text:soft-page-break/><text:span text:style-name="Strong_20_Emphasis"><text:span text:style-name="T502"><text:tab/></text:span></text:span><text:span text:style-name="Strong_20_Emphasis"><text:span text:style-name="T515">V.1.</text:span></text:span><text:span text:style-name="Strong_20_Emphasis"><text:span text:style-name="T516">8</text:span></text:span><text:span text:style-name="Strong_20_Emphasis"><text:span text:style-name="T515"> Compare processes</text:span></text:span><text:span text:style-name="Strong_20_Emphasis"><text:span text:style-name="T502">: </text:span></text:span><text:span text:style-name="Strong_20_Emphasis"><text:span text:style-name="T514">kcmp</text:span></text:span></text:p>
      <text:p text:style-name="P59"><text:span text:style-name="Strong_20_Emphasis"><text:span text:style-name="T502"><text:tab/>V.1.</text:span></text:span><text:span text:style-name="Strong_20_Emphasis"><text:span text:style-name="T511">9</text:span></text:span><text:span text:style-name="Strong_20_Emphasis"><text:span text:style-name="T502"> </text:span></text:span><text:span text:style-name="Strong_20_Emphasis"><text:span text:style-name="T510">Execute a </text:span></text:span><text:span text:style-name="Strong_20_Emphasis"><text:span text:style-name="T517">shell </text:span></text:span><text:span text:style-name="Strong_20_Emphasis"><text:span text:style-name="T515">command</text:span></text:span><text:span text:style-name="Strong_20_Emphasis"><text:span text:style-name="T510">: </text:span></text:span><text:span text:style-name="Strong_20_Emphasis"><text:span text:style-name="T515">s</text:span></text:span><text:span text:style-name="Strong_20_Emphasis"><text:span text:style-name="T518">ystem</text:span></text:span><text:span text:style-name="Strong_20_Emphasis"><text:span text:style-name="T502"><text:tab/></text:span></text:span></text:p>
      <text:p text:style-name="P59"><text:span text:style-name="Strong_20_Emphasis"><text:span text:style-name="T502"><text:tab/>V.1.</text:span></text:span><text:span text:style-name="Strong_20_Emphasis"><text:span text:style-name="T516">10</text:span></text:span><text:span text:style-name="Strong_20_Emphasis"><text:span text:style-name="T502"> </text:span></text:span><text:span text:style-name="Strong_20_Emphasis"><text:span text:style-name="T510">Execute a </text:span></text:span><text:span text:style-name="Strong_20_Emphasis"><text:span text:style-name="T519">progran</text:span></text:span><text:span text:style-name="Strong_20_Emphasis"><text:span text:style-name="T510">: </text:span></text:span><text:span text:style-name="Strong_20_Emphasis"><text:span text:style-name="T513">execv</text:span></text:span><text:span text:style-name="Strong_20_Emphasis"><text:span text:style-name="T520">e</text:span></text:span></text:p>
      <text:p text:style-name="P59"><text:span text:style-name="Strong_20_Emphasis"><text:span text:style-name="T521"><text:tab/></text:span></text:span><text:span text:style-name="Strong_20_Emphasis"><text:span text:style-name="T522">V.1.</text:span></text:span><text:span text:style-name="Strong_20_Emphasis"><text:span text:style-name="T523">1</text:span></text:span><text:span text:style-name="Strong_20_Emphasis"><text:span text:style-name="T524">1</text:span></text:span><text:span text:style-name="Strong_20_Emphasis"><text:span text:style-name="T522"> </text:span></text:span><text:span text:style-name="Strong_20_Emphasis"><text:span text:style-name="T525">Execute a </text:span></text:span><text:span text:style-name="Strong_20_Emphasis"><text:span text:style-name="T526">program </text:span></text:span><text:span text:style-name="Strong_20_Emphasis"><text:span text:style-name="T524">via file descriptor</text:span></text:span><text:span text:style-name="Strong_20_Emphasis"><text:span text:style-name="T525">: </text:span></text:span><text:span text:style-name="Strong_20_Emphasis"><text:span text:style-name="T527">fexecv</text:span></text:span><text:span text:style-name="Strong_20_Emphasis"><text:span text:style-name="T528">e</text:span></text:span></text:p>
      <text:p text:style-name="P59"><text:span text:style-name="Strong_20_Emphasis"><text:span text:style-name="T515"><text:tab/></text:span></text:span><text:span text:style-name="Strong_20_Emphasis"><text:span text:style-name="T522">V.1.</text:span></text:span><text:span text:style-name="Strong_20_Emphasis"><text:span text:style-name="T523">1</text:span></text:span><text:span text:style-name="Strong_20_Emphasis"><text:span text:style-name="T524">2</text:span></text:span><text:span text:style-name="Strong_20_Emphasis"><text:span text:style-name="T522"> </text:span></text:span><text:span text:style-name="Strong_20_Emphasis"><text:span text:style-name="T524">The </text:span></text:span><text:span text:style-name="Strong_20_Emphasis"><text:span text:style-name="T527">exec</text:span></text:span><text:span text:style-name="Strong_20_Emphasis"><text:span text:style-name="T525"> family functions</text:span></text:span></text:p>
      <text:p text:style-name="P59"><text:span text:style-name="Strong_20_Emphasis"><text:span text:style-name="T515"><text:tab/></text:span></text:span><text:span text:style-name="Strong_20_Emphasis"><text:span text:style-name="T529">V.1.1</text:span></text:span><text:span text:style-name="Strong_20_Emphasis"><text:span text:style-name="T530">3</text:span></text:span><text:span text:style-name="Strong_20_Emphasis"><text:span text:style-name="T529"> Control a process: </text:span></text:span><text:span text:style-name="Strong_20_Emphasis"><text:span text:style-name="T527">prctl</text:span></text:span><text:span text:style-name="Strong_20_Emphasis"><text:span text:style-name="T515"><text:tab/><text:tab/><text:tab/><text:tab/></text:span></text:span></text:p>
      <text:p text:style-name="P59"><text:span text:style-name="Strong_20_Emphasis"><text:span text:style-name="T515"><text:tab/>V.1.1</text:span></text:span><text:span text:style-name="Strong_20_Emphasis"><text:span text:style-name="T531">4</text:span></text:span><text:span text:style-name="Strong_20_Emphasis"><text:span text:style-name="T515"> Process </text:span></text:span><text:span text:style-name="Strong_20_Emphasis"><text:span text:style-name="T532">data transfer: </text:span></text:span><text:span text:style-name="Strong_20_Emphasis"><text:span text:style-name="T527">process_vm_read</text:span></text:span></text:p>
      <text:p text:style-name="P59"><text:span text:style-name="Strong_20_Emphasis"><text:span text:style-name="T533"><text:tab/>V.1.1</text:span></text:span><text:span text:style-name="Strong_20_Emphasis"><text:span text:style-name="T534">5</text:span></text:span><text:span text:style-name="Strong_20_Emphasis"><text:span text:style-name="T533"> Secure Computing state of the process: </text:span></text:span><text:span text:style-name="Strong_20_Emphasis"><text:span text:style-name="T527">seccomp</text:span></text:span></text:p>
      <text:p text:style-name="P59"><text:span text:style-name="Strong_20_Emphasis"><text:span text:style-name="T533"><text:tab/></text:span></text:span><text:span text:style-name="Strong_20_Emphasis"><text:span text:style-name="T535">V.1.1</text:span></text:span><text:span text:style-name="Strong_20_Emphasis"><text:span text:style-name="T536">6</text:span></text:span><text:span text:style-name="Strong_20_Emphasis"><text:span text:style-name="T535"> Secure Computing state of the process: </text:span></text:span><text:span text:style-name="Strong_20_Emphasis"><text:span text:style-name="T537">libseccomp</text:span></text:span></text:p>
      <text:p text:style-name="P59"><text:span text:style-name="Strong_20_Emphasis"><text:span text:style-name="T533"><text:tab/>V.1.1</text:span></text:span><text:span text:style-name="Strong_20_Emphasis"><text:span text:style-name="T538">7</text:span></text:span><text:span text:style-name="Strong_20_Emphasis"><text:span text:style-name="T533"> Seccomp user-space notification mechanism: </text:span></text:span><text:span text:style-name="Strong_20_Emphasis"><text:span text:style-name="T527">seccomp_unotify</text:span></text:span></text:p>
      <text:p text:style-name="P59"><text:span text:style-name="Strong_20_Emphasis"><text:span text:style-name="T539"><text:tab/></text:span></text:span><text:span text:style-name="Strong_20_Emphasis"><text:span text:style-name="T533">V.1.1</text:span></text:span><text:span text:style-name="Strong_20_Emphasis"><text:span text:style-name="T538">8</text:span></text:span><text:span text:style-name="Strong_20_Emphasis"><text:span text:style-name="T533"> Seccomp </text:span></text:span><text:span text:style-name="Strong_20_Emphasis"><text:span text:style-name="T538">user-space </text:span></text:span><text:span text:style-name="Strong_20_Emphasis"><text:span text:style-name="T533">notification mechanism </text:span></text:span><text:span text:style-name="Strong_20_Emphasis"><text:span text:style-name="T539">with</text:span></text:span><text:span text:style-name="Strong_20_Emphasis"><text:span text:style-name="T533"> </text:span></text:span><text:span text:style-name="Strong_20_Emphasis"><text:span text:style-name="T527">libseccomp</text:span></text:span></text:p>
      <text:p text:style-name="P59"><text:span text:style-name="Strong_20_Emphasis"><text:span text:style-name="T533"><text:tab/></text:span></text:span><text:span text:style-name="Strong_20_Emphasis"><text:span text:style-name="T540">V.1.19 Process accounting: </text:span></text:span><text:span text:style-name="Strong_20_Emphasis"><text:span text:style-name="T527">acct</text:span></text:span></text:p>
      <text:p text:style-name="P59"><text:span text:style-name="Strong_20_Emphasis"><text:span text:style-name="T533"><text:tab/>V.1.20 Proces scheduling: </text:span></text:span><text:span text:style-name="Strong_20_Emphasis"><text:span text:style-name="T527">nice</text:span></text:span><text:span text:style-name="Strong_20_Emphasis"><text:span text:style-name="T541"> and </text:span></text:span><text:span text:style-name="Strong_20_Emphasis"><text:span text:style-name="T527">setpriority</text:span></text:span><text:span text:style-name="Strong_20_Emphasis"><text:span text:style-name="T533"><text:tab/><text:tab/></text:span></text:span></text:p>
      <text:p text:style-name="P59"><text:span text:style-name="Strong_20_Emphasis"><text:span text:style-name="T542">V.</text:span></text:span><text:span text:style-name="Strong_20_Emphasis"><text:span text:style-name="T543">2</text:span></text:span><text:span text:style-name="Strong_20_Emphasis"><text:span text:style-name="T542"> </text:span></text:span><text:span text:style-name="Strong_20_Emphasis"><text:span text:style-name="T544">Process groups, sessions </text:span></text:span><text:span text:style-name="Strong_20_Emphasis"><text:span text:style-name="T545">and terminal</text:span></text:span></text:p>
      <text:p text:style-name="P59"><text:span text:style-name="Strong_20_Emphasis"><text:span text:style-name="T545"><text:tab/>V.2.1 Process groups: </text:span></text:span><text:span text:style-name="Strong_20_Emphasis"><text:span text:style-name="T527">getpgid</text:span></text:span><text:span text:style-name="Strong_20_Emphasis"><text:span text:style-name="T545"> and </text:span></text:span><text:span text:style-name="Strong_20_Emphasis"><text:span text:style-name="T527">setpgid</text:span></text:span></text:p>
      <text:p text:style-name="P59"><text:span text:style-name="Strong_20_Emphasis"><text:span text:style-name="T545"><text:tab/>V.2.2 Sessions: </text:span></text:span><text:span text:style-name="Strong_20_Emphasis"><text:span text:style-name="T527">setsid</text:span></text:span><text:span text:style-name="Strong_20_Emphasis"><text:span text:style-name="T545"> and </text:span></text:span><text:span text:style-name="Strong_20_Emphasis"><text:span text:style-name="T527">getsid</text:span></text:span></text:p>
      <text:p text:style-name="P59"><text:span text:style-name="Strong_20_Emphasis"><text:span text:style-name="T545"><text:tab/>V.2.3 Controlling terminal: </text:span></text:span><text:span text:style-name="Strong_20_Emphasis"><text:span text:style-name="T527">tcsetpgrp</text:span></text:span><text:span text:style-name="Strong_20_Emphasis"><text:span text:style-name="T545"><text:tab/></text:span></text:span></text:p>
      <text:p text:style-name="P59"><text:span text:style-name="Strong_20_Emphasis"><text:span text:style-name="T545"><text:tab/>V.2.4 Job control</text:span></text:span></text:p>
      <text:p text:style-name="P59"><text:span text:style-name="Strong_20_Emphasis"><text:span text:style-name="T545"><text:tab/>V.2.5 Identifying the controlling terminal: </text:span></text:span><text:span text:style-name="Strong_20_Emphasis"><text:span text:style-name="T527">ctermid</text:span></text:span><text:span text:style-name="Strong_20_Emphasis"><text:span text:style-name="T545"> and </text:span></text:span><text:span text:style-name="Strong_20_Emphasis"><text:span text:style-name="T527">ttyname</text:span></text:span></text:p>
      <text:p text:style-name="P59"><text:span text:style-name="Strong_20_Emphasis"><text:span text:style-name="T546"><text:tab/></text:span></text:span><text:span text:style-name="Strong_20_Emphasis"><text:span text:style-name="T545">V.2.6 Orphaned process groups</text:span></text:span></text:p>
      <text:p text:style-name="P59"><text:span text:style-name="Strong_20_Emphasis"><text:span text:style-name="T533">V.</text:span></text:span><text:span text:style-name="Strong_20_Emphasis"><text:span text:style-name="T547">3</text:span></text:span><text:span text:style-name="Strong_20_Emphasis"><text:span text:style-name="T533"> Signals</text:span></text:span></text:p>
      <text:p text:style-name="P59"><text:span text:style-name="Strong_20_Emphasis"><text:span text:style-name="T533"><text:tab/></text:span></text:span><text:span text:style-name="Strong_20_Emphasis"><text:span text:style-name="T540">V.</text:span></text:span><text:span text:style-name="Strong_20_Emphasis"><text:span text:style-name="T547">3</text:span></text:span><text:span text:style-name="Strong_20_Emphasis"><text:span text:style-name="T540">.1 </text:span></text:span><text:span text:style-name="Strong_20_Emphasis"><text:span text:style-name="T548">Signal overview</text:span></text:span></text:p>
      <text:p text:style-name="P59"><text:span text:style-name="Strong_20_Emphasis"><text:span text:style-name="T548"><text:tab/>V.3.2 Signal details</text:span></text:span></text:p>
      <text:p text:style-name="P59"><text:span text:style-name="Strong_20_Emphasis"><text:span text:style-name="T548"><text:tab/></text:span></text:span><text:span text:style-name="Strong_20_Emphasis"><text:span text:style-name="T549">V.3.</text:span></text:span><text:span text:style-name="Strong_20_Emphasis"><text:span text:style-name="T550">3</text:span></text:span><text:span text:style-name="Strong_20_Emphasis"><text:span text:style-name="T549"> </text:span></text:span><text:span text:style-name="Strong_20_Emphasis"><text:span text:style-name="T550">Describe</text:span></text:span><text:span text:style-name="Strong_20_Emphasis"><text:span text:style-name="T551"> signals: </text:span></text:span><text:span text:style-name="Strong_20_Emphasis"><text:span text:style-name="T552">strsignal</text:span></text:span><text:span text:style-name="Strong_20_Emphasis"><text:span text:style-name="T551"> and </text:span></text:span><text:span text:style-name="Strong_20_Emphasis"><text:span text:style-name="T553">psignal</text:span></text:span></text:p>
      <text:p text:style-name="P89"><text:tab/><text:span text:style-name="T554">V.3.</text:span><text:span text:style-name="T555">4</text:span><text:span text:style-name="T554"> </text:span><text:span text:style-name="T555">S</text:span><text:span text:style-name="T556">ignal </text:span><text:span text:style-name="T555">handling</text:span><text:span text:style-name="T556">: </text:span><text:span text:style-name="T557">sigaction</text:span></text:p>
      <text:p text:style-name="P89"><text:span text:style-name="T558"><text:tab/>V.3.</text:span><text:span text:style-name="T559">5</text:span><text:span text:style-name="T558"> </text:span><text:span text:style-name="T559">Signal set operations</text:span><text:span text:style-name="T560">: </text:span><text:span text:style-name="T561">sigemptyset</text:span><text:span text:style-name="T559"> and </text:span><text:span text:style-name="T561">sigfillset</text:span></text:p>
      <text:p text:style-name="P90"><text:tab/>V.3.6 Signal handlers</text:p>
      <text:p text:style-name="P59"><text:span text:style-name="T562"><text:tab/>V.3.7 </text:span><text:span text:style-name="T563">Send</text:span><text:span text:style-name="T562"> signals </text:span><text:span text:style-name="T563">to the caller</text:span><text:span text:style-name="T562">: </text:span><text:span text:style-name="T564">raise</text:span></text:p>
      <text:p text:style-name="P59"><text:span text:style-name="T564"><text:tab/></text:span><text:span text:style-name="T563">V.3.8 Send signals to another process: </text:span><text:span text:style-name="T565">kill</text:span><text:span text:style-name="T566"> and </text:span><text:span text:style-name="T567">killpg</text:span></text:p>
      <text:p text:style-name="P59"><text:span text:style-name="T562"><text:tab/>V.3.</text:span><text:span text:style-name="T568">9</text:span><text:span text:style-name="T562"> </text:span><text:span text:style-name="T566">Send </text:span><text:span text:style-name="T569">s</text:span><text:span text:style-name="T562">ignal</text:span><text:span text:style-name="T569">s </text:span><text:span text:style-name="T566">to </text:span><text:span text:style-name="T568">a specific thread</text:span><text:span text:style-name="T569">: </text:span><text:span text:style-name="T565">tgkill</text:span><text:span text:style-name="T570"> and</text:span><text:span text:style-name="T569"> </text:span><text:span text:style-name="T565">pthread_kill</text:span></text:p>
      <text:p text:style-name="P59"><text:span text:style-name="T562"><text:tab/>V.3.</text:span><text:span text:style-name="T568">1</text:span><text:span text:style-name="T571">0</text:span><text:span text:style-name="T562"> </text:span><text:span text:style-name="T566">Send </text:span><text:span text:style-name="T568">real-time </text:span><text:span text:style-name="T569">s</text:span><text:span text:style-name="T562">ignal</text:span><text:span text:style-name="T569">s: </text:span><text:span text:style-name="T565">sigqueue</text:span><text:span text:style-name="T568"> and </text:span><text:span text:style-name="T572">pthread</text:span><text:span text:style-name="T573">_sigque</text:span><text:span text:style-name="T572">ue</text:span></text:p>
      <text:p text:style-name="P90"><text:tab/>V.3.<text:span text:style-name="T574">1</text:span><text:span text:style-name="T575">1</text:span> <text:span text:style-name="T576">Set alarm clock</text:span><text:span text:style-name="T577">: </text:span><text:span text:style-name="T578">alarm</text:span></text:p>
      <text:p text:style-name="P59"><text:span text:style-name="T562"><text:tab/>V.3.</text:span><text:span text:style-name="T568">1</text:span><text:span text:style-name="T579">2</text:span><text:span text:style-name="T562"> Block signals: </text:span><text:span text:style-name="T580">sigprocmask</text:span></text:p>
      <text:p text:style-name="P90"><text:tab/>V.3.<text:span text:style-name="T574">1</text:span><text:span text:style-name="T581">3</text:span> <text:span text:style-name="T581">Check for pending signals: </text:span><text:span text:style-name="T582">sig</text:span><text:span text:style-name="T583">pending</text:span></text:p>
      <text:p text:style-name="P90"><text:tab/>V.3.<text:span text:style-name="T574">1</text:span><text:span text:style-name="T584">4</text:span><text:span text:style-name="T585"> </text:span><text:span text:style-name="Strong_20_Emphasis"><text:span text:style-name="T586">Handling </text:span></text:span><text:span text:style-name="Strong_20_Emphasis"><text:span text:style-name="T587">s</text:span></text:span><text:span text:style-name="Strong_20_Emphasis"><text:span text:style-name="T586">ignals with </text:span></text:span><text:span text:style-name="Strong_20_Emphasis"><text:span text:style-name="T587">n</text:span></text:span><text:span text:style-name="Strong_20_Emphasis"><text:span text:style-name="T586">onlocal </text:span></text:span><text:span text:style-name="Strong_20_Emphasis"><text:span text:style-name="T587">j</text:span></text:span><text:span text:style-name="Strong_20_Emphasis"><text:span text:style-name="T586">umps</text:span></text:span></text:p>
      <text:p text:style-name="P59"><text:span text:style-name="T562"><text:tab/>V.3.1</text:span><text:span text:style-name="T588">5</text:span><text:span text:style-name="T562"> Wait for signals: </text:span><text:span text:style-name="T580">pause</text:span><text:span text:style-name="T589"> and</text:span><text:span text:style-name="T562"> </text:span><text:span text:style-name="T580">sigsuspend</text:span></text:p>
      <text:p text:style-name="P90"><text:tab/>V.3.<text:span text:style-name="T574">1</text:span><text:span text:style-name="T590">6</text:span> <text:span text:style-name="T577">Wait for s</text:span>ignal<text:span text:style-name="T577">s: </text:span><text:span text:style-name="T591">s</text:span><text:span text:style-name="T592">igwait</text:span><text:span text:style-name="T577"> and </text:span><text:span text:style-name="T592">sigwaitinfo</text:span></text:p>
      <text:p text:style-name="P59"><text:span text:style-name="T593"><text:tab/></text:span><text:span text:style-name="T594">V</text:span><text:span text:style-name="T593">.3.1</text:span><text:span text:style-name="T594">7</text:span><text:span text:style-name="T593"> Signal file descriptor: </text:span><text:span text:style-name="T595">signalfd</text:span></text:p>
      <text:p text:style-name="P59"><text:span text:style-name="T562"><text:tab/>V.3.1</text:span><text:span text:style-name="T594">8</text:span><text:span text:style-name="T562"> </text:span><text:span text:style-name="T596">Alternate </text:span><text:span text:style-name="T597">signal</text:span><text:span text:style-name="T596"> stack: </text:span><text:span text:style-name="T580">sigaltstack</text:span></text:p>
      <text:p text:style-name="P59"><text:span text:style-name="T562"><text:tab/>V.3.</text:span><text:span text:style-name="T594">19</text:span><text:span text:style-name="T562"> </text:span><text:span text:style-name="T598">Sleep</text:span><text:span text:style-name="T596">ing</text:span><text:span text:style-name="T562">: </text:span><text:span text:style-name="T580">sleep</text:span><text:span text:style-name="T597">, </text:span><text:span text:style-name="T580">nanosleep</text:span><text:span text:style-name="T597">, </text:span><text:span text:style-name="T599">usleep</text:span><text:span text:style-name="T597">, </text:span><text:span text:style-name="T599">clock_nanosleep</text:span></text:p>
      <text:p text:style-name="P91">V.4 Timers</text:p>
      <text:p text:style-name="P59"><text:span text:style-name="T600"><text:tab/>V.4.1 Interval timers: </text:span><text:span text:style-name="T580">getitimer</text:span><text:span text:style-name="T600"> and </text:span><text:span text:style-name="T580">setitimer</text:span></text:p>
      <text:p text:style-name="P59"><text:span text:style-name="T501"><text:tab/></text:span><text:span text:style-name="T600">V.4.2 POSIX timers: </text:span><text:span text:style-name="T580">timer_create</text:span></text:p>
      <text:p text:style-name="P59"><text:span text:style-name="T600"><text:tab/>V.4.3 Arm and disarm timers: </text:span><text:span text:style-name="T580">timer_gettime</text:span><text:span text:style-name="T600"> and </text:span><text:span text:style-name="T580">timer_settime</text:span></text:p>
      <text:p text:style-name="P59"><text:span text:style-name="T600"><text:tab/>V.4.4 </text:span><text:span text:style-name="T601">O</text:span><text:span text:style-name="T600">verrun</text:span><text:span text:style-name="T601">s</text:span><text:span text:style-name="T600"> and deletion: </text:span><text:span text:style-name="T580">timer_getoverrun</text:span><text:span text:style-name="T600"> and </text:span><text:span text:style-name="T580">timer_delete</text:span></text:p>
      <text:p text:style-name="P59"><text:soft-page-break/><text:span text:style-name="T501"><text:tab/></text:span><text:span text:style-name="T601">V.4.</text:span><text:span text:style-name="T602">5</text:span><text:span text:style-name="T601"> </text:span><text:span text:style-name="T602">CPU-time clocks</text:span><text:span text:style-name="T601">: </text:span><text:span text:style-name="T603">clock_getcpuclockid</text:span><text:span text:style-name="T602">, </text:span><text:span text:style-name="T603">pthread_getcpuclockid</text:span></text:p>
      <text:p text:style-name="P89">V.<text:span text:style-name="T604">5</text:span> <text:span text:style-name="T605">Thread</text:span>s</text:p>
      <text:p text:style-name="P89"><text:tab/><text:span text:style-name="T606">V.</text:span><text:span text:style-name="T607">5.</text:span><text:span text:style-name="T606">1 POSIX threads: </text:span><text:span text:style-name="T608">pthread</text:span></text:p>
      <text:p text:style-name="P67"><text:tab/><text:span text:style-name="T606">V.</text:span><text:span text:style-name="T607">5.</text:span><text:span text:style-name="T609">2</text:span><text:span text:style-name="T606"> </text:span><text:span text:style-name="T610">Thread ID: </text:span><text:span text:style-name="T611">gettid</text:span><text:span text:style-name="T610">, </text:span><text:span text:style-name="T612">pthread_self</text:span><text:span text:style-name="T610"> and </text:span><text:span text:style-name="T612">pthread_equal</text:span></text:p>
      <text:p text:style-name="P59"><text:span text:style-name="T66"><text:tab/></text:span><text:span text:style-name="T613">V.</text:span><text:span text:style-name="T614">5.</text:span><text:span text:style-name="T615">3</text:span><text:span text:style-name="T613"> </text:span><text:span text:style-name="T616">Create t</text:span><text:span text:style-name="T617">hread</text:span><text:span text:style-name="T618">s</text:span><text:span text:style-name="T617">: </text:span><text:span text:style-name="T619">pthread_</text:span><text:span text:style-name="T620">create</text:span><text:span text:style-name="T617"> and </text:span><text:span text:style-name="T619">pthread_</text:span><text:span text:style-name="T621">join</text:span></text:p>
      <text:p text:style-name="P59"><text:span text:style-name="T616"><text:tab/></text:span><text:span text:style-name="T622">V</text:span><text:span text:style-name="T616">.</text:span><text:span text:style-name="T614">5.</text:span><text:span text:style-name="T616">4 Thread attributes: </text:span><text:span text:style-name="T619">pthread_attr_init</text:span><text:span text:style-name="T616"> and </text:span><text:span text:style-name="T619">pthread_attr_destroy</text:span></text:p>
      <text:p text:style-name="P59"><text:span text:style-name="T616"><text:tab/>V.</text:span><text:span text:style-name="T614">5.</text:span><text:span text:style-name="T616">5 Termin</text:span><text:span text:style-name="T623">ate</text:span><text:span text:style-name="T616"> t</text:span><text:span text:style-name="T617">hread</text:span><text:span text:style-name="T618">s</text:span><text:span text:style-name="T617">: </text:span><text:span text:style-name="T619">pthread_</text:span><text:span text:style-name="T624">exit</text:span><text:span text:style-name="T623"> and </text:span><text:span text:style-name="T625">pthread_cancel</text:span></text:p>
      <text:p text:style-name="P59"><text:span text:style-name="T547"><text:tab/>V.</text:span><text:span text:style-name="T626">5.</text:span><text:span text:style-name="T547">6 Clean-up handlers: </text:span><text:span text:style-name="T619">pthread_cleanup_push</text:span><text:span text:style-name="T547">, </text:span><text:span text:style-name="T619">pthread_cleanup_pop</text:span></text:p>
      <text:p text:style-name="P92"><text:tab/><text:span text:style-name="T627">V.</text:span><text:span text:style-name="T607">5.</text:span><text:span text:style-name="T628">7</text:span><text:span text:style-name="T627"> </text:span><text:span text:style-name="T628">Send signal to threads</text:span><text:span text:style-name="T627">: </text:span><text:span text:style-name="T629">pthread_</text:span><text:span text:style-name="T630">kill</text:span><text:span text:style-name="T631"> and </text:span><text:span text:style-name="T629">pthread_</text:span><text:span text:style-name="T630">sigmask</text:span></text:p>
      <text:p text:style-name="P59"><text:span text:style-name="T547"><text:tab/></text:span><text:span text:style-name="T623">V.</text:span><text:span text:style-name="T614">5.</text:span><text:span text:style-name="T632">8</text:span><text:span text:style-name="T623"> </text:span><text:span text:style-name="T632">T</text:span><text:span text:style-name="T633">hread-</text:span><text:span text:style-name="T632">specific data</text:span><text:span text:style-name="T623">: </text:span><text:span text:style-name="T634">pthread</text:span><text:span text:style-name="T635">_key_create</text:span></text:p>
      <text:p text:style-name="P93"><text:tab/>V.<text:span text:style-name="T636">5.</text:span><text:span text:style-name="T637">9</text:span> <text:span text:style-name="T637">Mutexes</text:span></text:p>
      <text:p text:style-name="P93"><text:tab/>V.<text:span text:style-name="T636">5.10</text:span> <text:span text:style-name="T637">Mutex </text:span><text:span text:style-name="T636">attributes</text:span></text:p>
      <text:p text:style-name="P59"><text:span text:style-name="T633"><text:tab/></text:span><text:span text:style-name="T638">V.5.11 </text:span><text:span text:style-name="T639">Timed mutex locking:</text:span><text:span text:style-name="T638"> </text:span><text:span text:style-name="T640">pthread_mutex_timedlock</text:span></text:p>
      <text:p text:style-name="P94"><text:span text:style-name="T641"><text:tab/>V.5.1</text:span><text:span text:style-name="T642">2</text:span><text:span text:style-name="T641"> </text:span>Read-Write Locks<text:tab/></text:p>
      <text:p text:style-name="P94"><text:tab/>V.5.1<text:span text:style-name="T642">3</text:span> <text:span text:style-name="T643">Condition variables</text:span></text:p>
      <text:p text:style-name="P59"><text:span text:style-name="T644"><text:tab/>V.5.1</text:span><text:span text:style-name="T645">4</text:span><text:span text:style-name="T644"> </text:span><text:span text:style-name="T646">Spin lock</text:span><text:span text:style-name="T645">s</text:span></text:p>
      <text:p text:style-name="P95"><text:tab/>V.5.15 Barriers</text:p>
      <text:p text:style-name="P59"><text:span text:style-name="T646"><text:tab/>V.5.16 Fork handlers: </text:span><text:span text:style-name="T647">pthread_atfork</text:span></text:p>
      <text:p text:style-name="P94"><text:tab/><text:span text:style-name="T641">V.5.1</text:span><text:span text:style-name="T648">7</text:span><text:span text:style-name="T641"> </text:span><text:span text:style-name="T643">Semaphores</text:span></text:p>
      <text:p text:style-name="P59"><text:span text:style-name="T633"><text:tab/></text:span><text:span text:style-name="T649">V.5.1</text:span><text:span text:style-name="T650">8</text:span><text:span text:style-name="T649"> </text:span><text:span text:style-name="T633">Futexes</text:span></text:p>
      <text:p text:style-name="P59"><text:span text:style-name="T633"><text:tab/>V.5.1</text:span><text:span text:style-name="T650">9</text:span><text:span text:style-name="T633"> </text:span><text:span text:style-name="T649">Thread name: </text:span><text:span text:style-name="T647">pthread_setname_np</text:span></text:p>
      <text:p text:style-name="P92">V.6 Daemon processes <text:span text:style-name="T651">and logging</text:span></text:p>
      <text:p text:style-name="P92"><text:tab/><text:span text:style-name="T652">V.6.1 Daemon overview </text:span></text:p>
      <text:p text:style-name="P74"><text:span text:style-name="T653"><text:tab/>V.6.2 The </text:span><text:span text:style-name="T654">daemon</text:span><text:span text:style-name="T653"> function</text:span></text:p>
      <text:p text:style-name="P59"><text:span text:style-name="Strong_20_Emphasis"><text:span text:style-name="T655"><text:tab/>V.6.</text:span></text:span><text:span text:style-name="Strong_20_Emphasis"><text:span text:style-name="T656">3</text:span></text:span><text:span text:style-name="Strong_20_Emphasis"><text:span text:style-name="T655"> </text:span></text:span><text:span text:style-name="Strong_20_Emphasis"><text:span text:style-name="T657">The </text:span></text:span><text:span text:style-name="Strong_20_Emphasis"><text:span text:style-name="T658">systemd</text:span></text:span><text:span text:style-name="Strong_20_Emphasis"><text:span text:style-name="T659"> </text:span></text:span><text:span text:style-name="Strong_20_Emphasis"><text:span text:style-name="T657">service </text:span></text:span><text:span text:style-name="Strong_20_Emphasis"><text:span text:style-name="T659">API: </text:span></text:span><text:span text:style-name="Strong_20_Emphasis"><text:span text:style-name="T660">sd-daemon.h</text:span></text:span></text:p>
      <text:p text:style-name="P59"><text:span text:style-name="T661"><text:tab/>V.6.</text:span><text:span text:style-name="T662">4</text:span><text:span text:style-name="T661"> </text:span><text:span text:style-name="T663">Logging: </text:span><text:span text:style-name="T664">syslog</text:span></text:p>
      <text:p text:style-name="P59"><text:span text:style-name="T653"><text:tab/></text:span><text:span text:style-name="T661">V.6.</text:span><text:span text:style-name="T662">5</text:span><text:span text:style-name="T661"> </text:span><text:span text:style-name="T663">Logging: </text:span><text:span text:style-name="T664">s</text:span><text:span text:style-name="T665">d-journal</text:span></text:p>
      <text:p text:style-name="P72"><text:span text:style-name="T666">V.</text:span><text:span text:style-name="T667">7</text:span><text:span text:style-name="T666"> </text:span><text:span text:style-name="T668">Theory </text:span><text:span text:style-name="T669">and</text:span><text:span text:style-name="T668"> </text:span><text:span text:style-name="T669">i</text:span><text:span text:style-name="T668">nsights</text:span></text:p>
      <text:p text:style-name="P71"><text:span text:style-name="Strong_20_Emphasis"><text:span text:style-name="T670"><text:tab/></text:span></text:span><text:span text:style-name="Strong_20_Emphasis"><text:span text:style-name="T671">V.</text:span></text:span><text:span text:style-name="Strong_20_Emphasis"><text:span text:style-name="T672">7</text:span></text:span><text:span text:style-name="Strong_20_Emphasis"><text:span text:style-name="T671">.1 Values for </text:span></text:span><text:span text:style-name="Strong_20_Emphasis"><text:span text:style-name="T673">flags</text:span></text:span><text:span text:style-name="Strong_20_Emphasis"><text:span text:style-name="T671"> and </text:span></text:span><text:span text:style-name="Strong_20_Emphasis"><text:span text:style-name="T673">clone_args.flags</text:span></text:span></text:p>
      <text:p text:style-name="P71"><text:span text:style-name="Strong_20_Emphasis"><text:span text:style-name="T673"><text:tab/></text:span></text:span><text:span text:style-name="Strong_20_Emphasis"><text:span text:style-name="T671">V</text:span></text:span><text:span text:style-name="Strong_20_Emphasis"><text:span text:style-name="T674">.</text:span></text:span><text:span text:style-name="Strong_20_Emphasis"><text:span text:style-name="T675">7</text:span></text:span><text:span text:style-name="Strong_20_Emphasis"><text:span text:style-name="T674">.2 </text:span></text:span><text:span text:style-name="Strong_20_Emphasis"><text:span text:style-name="T673">prctl</text:span></text:span><text:span text:style-name="Strong_20_Emphasis"><text:span text:style-name="T674"> operations</text:span></text:span></text:p>
      <text:p text:style-name="P72"><text:tab/><text:span text:style-name="T676">V.</text:span><text:span text:style-name="T677">7</text:span><text:span text:style-name="T676">.3 The </text:span><text:span text:style-name="T678">seccomp_unotify(2)</text:span><text:span text:style-name="T676"> manual page program</text:span></text:p>
      <text:p text:style-name="P72"><text:span text:style-name="T679"><text:tab/></text:span><text:span text:style-name="T680">V.</text:span><text:span text:style-name="T681">7.4</text:span><text:span text:style-name="T680"> CPU sets macros</text:span></text:p>
      <text:p text:style-name="P71"><text:span text:style-name="T682"><text:tab/></text:span><text:span text:style-name="T10">V.</text:span><text:span text:style-name="T683">7.</text:span><text:span text:style-name="T684">5</text:span><text:span text:style-name="T10"> </text:span><text:span text:style-name="T684">Linux control groups: </text:span><text:span text:style-name="T685">cgroup</text:span></text:p>
      <text:p text:style-name="P71"><text:span text:style-name="T686"><text:tab/></text:span><text:span text:style-name="T687">V</text:span><text:span text:style-name="Strong_20_Emphasis"><text:span text:style-name="T688">.</text:span></text:span><text:span text:style-name="Strong_20_Emphasis"><text:span text:style-name="T689">7</text:span></text:span><text:span text:style-name="Strong_20_Emphasis"><text:span text:style-name="T690">.</text:span></text:span><text:span text:style-name="Strong_20_Emphasis"><text:span text:style-name="T691">6</text:span></text:span><text:span text:style-name="Strong_20_Emphasis"><text:span text:style-name="T688"> Trace a process: </text:span></text:span><text:span text:style-name="Strong_20_Emphasis"><text:span text:style-name="T527">ptrace</text:span></text:span></text:p>
      <text:p text:style-name="P71"><text:span text:style-name="Strong_20_Emphasis"><text:span text:style-name="T688"><text:tab/>V.7.</text:span></text:span><text:span text:style-name="Strong_20_Emphasis"><text:span text:style-name="T691">7</text:span></text:span><text:span text:style-name="Strong_20_Emphasis"><text:span text:style-name="T688"> Process self-debugging: </text:span></text:span><text:span text:style-name="Strong_20_Emphasis"><text:span text:style-name="T527">backtrace</text:span></text:span></text:p>
      <text:p text:style-name="P71"><text:span text:style-name="T10"><text:tab/></text:span><text:span text:style-name="Strong_20_Emphasis"><text:span text:style-name="T692">V.7.</text:span></text:span><text:span text:style-name="Strong_20_Emphasis"><text:span text:style-name="T693">8</text:span></text:span><text:span text:style-name="Strong_20_Emphasis"><text:span text:style-name="T692"> Thread attributes functions</text:span></text:span></text:p>
      <text:p text:style-name="P71"><text:span text:style-name="Strong_20_Emphasis"><text:span text:style-name="T692"><text:tab/></text:span></text:span><text:span text:style-name="Strong_20_Emphasis"><text:span text:style-name="T694">V</text:span></text:span><text:span text:style-name="Strong_20_Emphasis"><text:span text:style-name="T695">.7.</text:span></text:span><text:span text:style-name="Strong_20_Emphasis"><text:span text:style-name="T693">9</text:span></text:span><text:span text:style-name="Strong_20_Emphasis"><text:span text:style-name="T695"> Patterns of synchronization mechanisms</text:span></text:span></text:p>
      <text:p text:style-name="P59"><text:span text:style-name="Strong_20_Emphasis"><text:span text:style-name="T696">List of tables</text:span></text:span></text:p>
      <text:p text:style-name="P77">List of <text:span text:style-name="T697">figures</text:span></text:p>
      <text:p text:style-name="P76"/>
      <text:p text:style-name="P34"><text:span text:style-name="T222">Chapter</text:span> <text:span text:style-name="T384">V</text:span><text:span text:style-name="T698">I</text:span> – <text:span text:style-name="T699">Interprocess Communication and </text:span><text:span text:style-name="T698">Terminal</text:span><text:span text:style-name="T699">s</text:span></text:p>
      <text:p text:style-name="P34"/>
      <text:p text:style-name="P74"><text:span text:style-name="T700">V</text:span><text:span text:style-name="T701">I</text:span><text:span text:style-name="T702">.1 </text:span><text:span text:style-name="Strong_20_Emphasis"><text:span text:style-name="T703">Introduction</text:span></text:span></text:p>
      <text:p text:style-name="P59"><text:span text:style-name="Strong_20_Emphasis"><text:span text:style-name="T704">VI.</text:span></text:span><text:span text:style-name="Strong_20_Emphasis"><text:span text:style-name="T705">2</text:span></text:span><text:span text:style-name="Strong_20_Emphasis"><text:span text:style-name="T704"> POSIX </text:span></text:span><text:span text:style-name="Strong_20_Emphasis"><text:span text:style-name="T706">M</text:span></text:span><text:span text:style-name="Strong_20_Emphasis"><text:span text:style-name="T704">essage </text:span></text:span><text:span text:style-name="Strong_20_Emphasis"><text:span text:style-name="T706">Q</text:span></text:span><text:span text:style-name="Strong_20_Emphasis"><text:span text:style-name="T704">ueues</text:span></text:span></text:p>
      <text:p text:style-name="P59"><text:span text:style-name="Strong_20_Emphasis"><text:span text:style-name="T704"><text:tab/></text:span></text:span><text:span text:style-name="Strong_20_Emphasis"><text:span text:style-name="T707">VI.</text:span></text:span><text:span text:style-name="Strong_20_Emphasis"><text:span text:style-name="T708">2</text:span></text:span><text:span text:style-name="Strong_20_Emphasis"><text:span text:style-name="T707">.</text:span></text:span><text:span text:style-name="Strong_20_Emphasis"><text:span text:style-name="T708">1</text:span></text:span><text:span text:style-name="Strong_20_Emphasis"><text:span text:style-name="T707"> </text:span></text:span><text:span text:style-name="Strong_20_Emphasis"><text:span text:style-name="T709">Create a</text:span></text:span><text:span text:style-name="Strong_20_Emphasis"><text:span text:style-name="T710"> m</text:span></text:span><text:span text:style-name="Strong_20_Emphasis"><text:span text:style-name="T711">essage queue: </text:span></text:span><text:span text:style-name="Strong_20_Emphasis"><text:span text:style-name="T712">mq_open</text:span></text:span><text:span text:style-name="Strong_20_Emphasis"><text:span text:style-name="T709">, </text:span></text:span><text:span text:style-name="Strong_20_Emphasis"><text:span text:style-name="T712">mq_close</text:span></text:span><text:span text:style-name="Strong_20_Emphasis"><text:span text:style-name="T709">, </text:span></text:span><text:span text:style-name="Strong_20_Emphasis"><text:span text:style-name="T712">mq_unlink</text:span></text:span></text:p>
      <text:p text:style-name="P59"><text:soft-page-break/><text:span text:style-name="Strong_20_Emphasis"><text:span text:style-name="T704"><text:tab/></text:span></text:span><text:span text:style-name="Strong_20_Emphasis"><text:span text:style-name="T710">VI.</text:span></text:span><text:span text:style-name="Strong_20_Emphasis"><text:span text:style-name="T708">2</text:span></text:span><text:span text:style-name="Strong_20_Emphasis"><text:span text:style-name="T710">.</text:span></text:span><text:span text:style-name="Strong_20_Emphasis"><text:span text:style-name="T708">2</text:span></text:span><text:span text:style-name="Strong_20_Emphasis"><text:span text:style-name="T710"> </text:span></text:span><text:span text:style-name="Strong_20_Emphasis"><text:span text:style-name="T713">Send and receive messages: </text:span></text:span><text:span text:style-name="Strong_20_Emphasis"><text:span text:style-name="T714">mq_send</text:span></text:span><text:span text:style-name="Strong_20_Emphasis"><text:span text:style-name="T713"> and </text:span></text:span><text:span text:style-name="Strong_20_Emphasis"><text:span text:style-name="T714">mq_receive</text:span></text:span></text:p>
      <text:p text:style-name="P59"><text:span text:style-name="Strong_20_Emphasis"><text:span text:style-name="T704"><text:tab/></text:span></text:span><text:span text:style-name="Strong_20_Emphasis"><text:span text:style-name="T715">VI.</text:span></text:span><text:span text:style-name="Strong_20_Emphasis"><text:span text:style-name="T716">2</text:span></text:span><text:span text:style-name="Strong_20_Emphasis"><text:span text:style-name="T715">.</text:span></text:span><text:span text:style-name="Strong_20_Emphasis"><text:span text:style-name="T716">3</text:span></text:span><text:span text:style-name="Strong_20_Emphasis"><text:span text:style-name="T709"> Message queue</text:span></text:span><text:span text:style-name="Strong_20_Emphasis"><text:span text:style-name="T713"> attributes: </text:span></text:span><text:span text:style-name="Strong_20_Emphasis"><text:span text:style-name="T714">mq_getattr</text:span></text:span><text:span text:style-name="Strong_20_Emphasis"><text:span text:style-name="T713"> and </text:span></text:span><text:span text:style-name="Strong_20_Emphasis"><text:span text:style-name="T714">mq_setattr</text:span></text:span></text:p>
      <text:p text:style-name="P59"><text:span text:style-name="Strong_20_Emphasis"><text:span text:style-name="T704"><text:tab/></text:span></text:span><text:span text:style-name="Strong_20_Emphasis"><text:span text:style-name="T709">VI.</text:span></text:span><text:span text:style-name="Strong_20_Emphasis"><text:span text:style-name="T716">2</text:span></text:span><text:span text:style-name="Strong_20_Emphasis"><text:span text:style-name="T709">.</text:span></text:span><text:span text:style-name="Strong_20_Emphasis"><text:span text:style-name="T716">4</text:span></text:span><text:span text:style-name="Strong_20_Emphasis"><text:span text:style-name="T709"> </text:span></text:span><text:span text:style-name="Strong_20_Emphasis"><text:span text:style-name="T717">Message queue notification: </text:span></text:span><text:span text:style-name="Strong_20_Emphasis"><text:span text:style-name="T718">mq_notify</text:span></text:span></text:p>
      <text:p text:style-name="P59"><text:span text:style-name="Strong_20_Emphasis"><text:span text:style-name="T717"><text:tab/>VI.2.5 Notification via thread</text:span></text:span></text:p>
      <text:p text:style-name="P59"><text:span text:style-name="Strong_20_Emphasis"><text:span text:style-name="T717"><text:tab/>VI.2.6 Notification via signal</text:span></text:span></text:p>
      <text:p text:style-name="P59"><text:span text:style-name="Strong_20_Emphasis"><text:span text:style-name="T719">VI.</text:span></text:span><text:span text:style-name="Strong_20_Emphasis"><text:span text:style-name="T705">3</text:span></text:span><text:span text:style-name="Strong_20_Emphasis"><text:span text:style-name="T719"> POSIX </text:span></text:span><text:span text:style-name="Strong_20_Emphasis"><text:span text:style-name="T706">N</text:span></text:span><text:span text:style-name="Strong_20_Emphasis"><text:span text:style-name="T719">amed </text:span></text:span><text:span text:style-name="Strong_20_Emphasis"><text:span text:style-name="T706">S</text:span></text:span><text:span text:style-name="Strong_20_Emphasis"><text:span text:style-name="T719">emaphores</text:span></text:span></text:p>
      <text:p text:style-name="P59"><text:span text:style-name="Strong_20_Emphasis"><text:span text:style-name="T719"><text:tab/></text:span></text:span><text:span text:style-name="Source_20_Text"><text:span text:style-name="T720">VI.</text:span></text:span><text:span text:style-name="Source_20_Text"><text:span text:style-name="T721">3</text:span></text:span><text:span text:style-name="Source_20_Text"><text:span text:style-name="T720">.</text:span></text:span><text:span text:style-name="Source_20_Text"><text:span text:style-name="T721">1</text:span></text:span><text:span text:style-name="Source_20_Text"><text:span text:style-name="T720"> </text:span></text:span><text:span text:style-name="Source_20_Text"><text:span text:style-name="T721">Create and delete semaphores</text:span></text:span><text:span text:style-name="Source_20_Text"><text:span text:style-name="T720">: </text:span></text:span><text:span text:style-name="Source_20_Text"><text:span text:style-name="T722">sem_open</text:span></text:span><text:span text:style-name="Source_20_Text"><text:span text:style-name="T721">, </text:span></text:span><text:span text:style-name="Source_20_Text"><text:span text:style-name="T722">sem_close</text:span></text:span><text:span text:style-name="Source_20_Text"><text:span text:style-name="T721">, </text:span></text:span><text:span text:style-name="Source_20_Text"><text:span text:style-name="T722">sem_unlink</text:span></text:span></text:p>
      <text:p text:style-name="P59"><text:span text:style-name="Strong_20_Emphasis"><text:span text:style-name="T719"><text:tab/></text:span></text:span><text:span text:style-name="Source_20_Text"><text:span text:style-name="T720">VI.</text:span></text:span><text:span text:style-name="Source_20_Text"><text:span text:style-name="T721">3</text:span></text:span><text:span text:style-name="Source_20_Text"><text:span text:style-name="T720">.</text:span></text:span><text:span text:style-name="Source_20_Text"><text:span text:style-name="T721">2</text:span></text:span><text:span text:style-name="Source_20_Text"><text:span text:style-name="T720"> </text:span></text:span><text:span text:style-name="Strong_20_Emphasis"><text:span text:style-name="T723">P</text:span></text:span><text:span text:style-name="Source_20_Text"><text:span text:style-name="T724">rocess-local mutual exclusion</text:span></text:span></text:p>
      <text:p text:style-name="P59"><text:span text:style-name="Strong_20_Emphasis"><text:span text:style-name="T719"><text:tab/>VI.</text:span></text:span><text:span text:style-name="Strong_20_Emphasis"><text:span text:style-name="T705">3</text:span></text:span><text:span text:style-name="Strong_20_Emphasis"><text:span text:style-name="T719">.</text:span></text:span><text:span text:style-name="Strong_20_Emphasis"><text:span text:style-name="T721">3</text:span></text:span><text:span text:style-name="Strong_20_Emphasis"><text:span text:style-name="T719"> </text:span></text:span><text:span text:style-name="Strong_20_Emphasis"><text:span text:style-name="T725">I</text:span></text:span><text:span text:style-name="Strong_20_Emphasis"><text:span text:style-name="T719">nterprocess mutual exclusion</text:span></text:span></text:p>
      <text:p text:style-name="P59"><text:span text:style-name="Strong_20_Emphasis"><text:span text:style-name="T719"><text:tab/>VI.</text:span></text:span><text:span text:style-name="Strong_20_Emphasis"><text:span text:style-name="T705">3</text:span></text:span><text:span text:style-name="Strong_20_Emphasis"><text:span text:style-name="T719">.</text:span></text:span><text:span text:style-name="Strong_20_Emphasis"><text:span text:style-name="T721">4</text:span></text:span><text:span text:style-name="Strong_20_Emphasis"><text:span text:style-name="T719"> </text:span></text:span><text:span text:style-name="Strong_20_Emphasis"><text:span text:style-name="T725">T</text:span></text:span><text:span text:style-name="Strong_20_Emphasis"><text:span text:style-name="T719">wo-way synchronization pattern</text:span></text:span></text:p>
      <text:p text:style-name="P59"><text:span text:style-name="Strong_20_Emphasis"><text:span text:style-name="T719">VI.</text:span></text:span><text:span text:style-name="Strong_20_Emphasis"><text:span text:style-name="T705">4</text:span></text:span><text:span text:style-name="Strong_20_Emphasis"><text:span text:style-name="T719">. </text:span></text:span><text:span text:style-name="Strong_20_Emphasis"><text:span text:style-name="T726">POSIX </text:span></text:span><text:span text:style-name="Strong_20_Emphasis"><text:span text:style-name="T706">S</text:span></text:span><text:span text:style-name="Strong_20_Emphasis"><text:span text:style-name="T719">hared </text:span></text:span><text:span text:style-name="Strong_20_Emphasis"><text:span text:style-name="T706">M</text:span></text:span><text:span text:style-name="Strong_20_Emphasis"><text:span text:style-name="T719">emory</text:span></text:span></text:p>
      <text:p text:style-name="P59"><text:span text:style-name="Strong_20_Emphasis"><text:span text:style-name="T719"><text:tab/></text:span></text:span><text:span text:style-name="Strong_20_Emphasis"><text:span text:style-name="T725">VI.4.1 Overview</text:span></text:span></text:p>
      <text:p text:style-name="P59"><text:span text:style-name="Strong_20_Emphasis"><text:span text:style-name="T719"><text:tab/>VI.</text:span></text:span><text:span text:style-name="Strong_20_Emphasis"><text:span text:style-name="T705">4</text:span></text:span><text:span text:style-name="Strong_20_Emphasis"><text:span text:style-name="T719">.</text:span></text:span><text:span text:style-name="Strong_20_Emphasis"><text:span text:style-name="T725">2</text:span></text:span><text:span text:style-name="Strong_20_Emphasis"><text:span text:style-name="T719"> </text:span></text:span><text:span text:style-name="Strong_20_Emphasis"><text:span text:style-name="T725">P</text:span></text:span><text:span text:style-name="Strong_20_Emphasis"><text:span text:style-name="T727">roducer-consumer</text:span></text:span><text:span text:style-name="Strong_20_Emphasis"><text:span text:style-name="T719"> pattern</text:span></text:span></text:p>
      <text:p text:style-name="P59"><text:span text:style-name="Strong_20_Emphasis"><text:span text:style-name="T719"><text:tab/>VI.</text:span></text:span><text:span text:style-name="Strong_20_Emphasis"><text:span text:style-name="T705">4</text:span></text:span><text:span text:style-name="Strong_20_Emphasis"><text:span text:style-name="T719">.</text:span></text:span><text:span text:style-name="Strong_20_Emphasis"><text:span text:style-name="T725">3</text:span></text:span><text:span text:style-name="Strong_20_Emphasis"><text:span text:style-name="T719"> </text:span></text:span><text:span text:style-name="Strong_20_Emphasis"><text:span text:style-name="T725">C</text:span></text:span><text:span text:style-name="Strong_20_Emphasis"><text:span text:style-name="T719">lient-server pattern</text:span></text:span></text:p>
      <text:p text:style-name="P59"><text:span text:style-name="Strong_20_Emphasis"><text:span text:style-name="T719">VI.</text:span></text:span><text:span text:style-name="Strong_20_Emphasis"><text:span text:style-name="T705">5</text:span></text:span><text:span text:style-name="Strong_20_Emphasis"><text:span text:style-name="T726"> </text:span></text:span><text:span text:style-name="Strong_20_Emphasis"><text:span text:style-name="T728">Sockets</text:span></text:span><text:span text:style-name="Strong_20_Emphasis"><text:span text:style-name="T719"><text:tab/><text:tab/></text:span></text:span></text:p>
      <text:p text:style-name="P59"><text:span text:style-name="Strong_20_Emphasis"><text:span text:style-name="T719"><text:tab/>VI.</text:span></text:span><text:span text:style-name="Strong_20_Emphasis"><text:span text:style-name="T706">5</text:span></text:span><text:span text:style-name="Strong_20_Emphasis"><text:span text:style-name="T719">.</text:span></text:span><text:span text:style-name="Strong_20_Emphasis"><text:span text:style-name="T706">1</text:span></text:span><text:span text:style-name="Strong_20_Emphasis"><text:span text:style-name="T719"> </text:span></text:span><text:span text:style-name="Strong_20_Emphasis"><text:span text:style-name="T706">Overview </text:span></text:span></text:p>
      <text:p text:style-name="P59"><text:span text:style-name="Strong_20_Emphasis"><text:span text:style-name="T719"><text:tab/>VI.</text:span></text:span><text:span text:style-name="Strong_20_Emphasis"><text:span text:style-name="T706">5</text:span></text:span><text:span text:style-name="Strong_20_Emphasis"><text:span text:style-name="T719">.</text:span></text:span><text:span text:style-name="Strong_20_Emphasis"><text:span text:style-name="T706">2 </text:span></text:span><text:span text:style-name="Strong_20_Emphasis"><text:span text:style-name="T729">Creat</text:span></text:span><text:span text:style-name="Strong_20_Emphasis"><text:span text:style-name="T730">ing</text:span></text:span><text:span text:style-name="Strong_20_Emphasis"><text:span text:style-name="T729"> sockets: </text:span></text:span><text:span text:style-name="Source_20_Text"><text:span text:style-name="T722">socket</text:span></text:span><text:span text:style-name="Strong_20_Emphasis"><text:span text:style-name="T729"> and </text:span></text:span><text:span text:style-name="Source_20_Text"><text:span text:style-name="T731">shutdown</text:span></text:span></text:p>
      <text:p text:style-name="P59"><text:span text:style-name="Strong_20_Emphasis"><text:span text:style-name="T732"><text:tab/></text:span></text:span><text:span text:style-name="Strong_20_Emphasis"><text:span text:style-name="T733">VI.5.</text:span></text:span><text:span text:style-name="Strong_20_Emphasis"><text:span text:style-name="T734">3</text:span></text:span><text:span text:style-name="Strong_20_Emphasis"><text:span text:style-name="T733"> Byte order conversion functions</text:span></text:span></text:p>
      <text:p text:style-name="P59"><text:span text:style-name="Strong_20_Emphasis"><text:span text:style-name="T732"><text:tab/>VI.5.</text:span></text:span><text:span text:style-name="Strong_20_Emphasis"><text:span text:style-name="T734">4</text:span></text:span><text:span text:style-name="Strong_20_Emphasis"><text:span text:style-name="T732"> </text:span></text:span><text:span text:style-name="Strong_20_Emphasis"><text:span text:style-name="T733">Addressing</text:span></text:span><text:span text:style-name="Strong_20_Emphasis"><text:span text:style-name="T735">: </text:span></text:span><text:span text:style-name="Source_20_Text"><text:span text:style-name="T722">getaddrinfo</text:span></text:span><text:span text:style-name="Strong_20_Emphasis"><text:span text:style-name="T733"> and </text:span></text:span><text:span text:style-name="Source_20_Text"><text:span text:style-name="T736">getnameinfo</text:span></text:span></text:p>
      <text:p text:style-name="P59"><text:span text:style-name="Source_20_Text"><text:span text:style-name="T737"><text:tab/></text:span></text:span><text:span text:style-name="Strong_20_Emphasis"><text:span text:style-name="T733">VI.5.</text:span></text:span><text:span text:style-name="Strong_20_Emphasis"><text:span text:style-name="T734">5</text:span></text:span><text:span text:style-name="Strong_20_Emphasis"><text:span text:style-name="T733"> Address formats: </text:span></text:span><text:span text:style-name="Source_20_Text"><text:span text:style-name="T722">inet_ntop</text:span></text:span><text:span text:style-name="Strong_20_Emphasis"><text:span text:style-name="T733"> and </text:span></text:span><text:span text:style-name="Source_20_Text"><text:span text:style-name="T722">inet_pton</text:span></text:span></text:p>
      <text:p text:style-name="P59"><text:span text:style-name="Strong_20_Emphasis"><text:span text:style-name="T719"><text:tab/></text:span></text:span><text:span text:style-name="Strong_20_Emphasis"><text:span text:style-name="T733">VI.5.</text:span></text:span><text:span text:style-name="Strong_20_Emphasis"><text:span text:style-name="T734">6</text:span></text:span><text:span text:style-name="Strong_20_Emphasis"><text:span text:style-name="T738"> Set</text:span></text:span><text:span text:style-name="Strong_20_Emphasis"><text:span text:style-name="T739">ting</text:span></text:span><text:span text:style-name="Strong_20_Emphasis"><text:span text:style-name="T738"> the socket address: </text:span></text:span><text:span text:style-name="Source_20_Text"><text:span text:style-name="T722">bind</text:span></text:span></text:p>
      <text:p text:style-name="P59"><text:span text:style-name="Strong_20_Emphasis"><text:span text:style-name="T739"><text:tab/>VI.5.</text:span></text:span><text:span text:style-name="Strong_20_Emphasis"><text:span text:style-name="T734">7</text:span></text:span><text:span text:style-name="Strong_20_Emphasis"><text:span text:style-name="T739"> Receiving connections: </text:span></text:span><text:span text:style-name="Source_20_Text"><text:span text:style-name="T722">listen</text:span></text:span><text:span text:style-name="Strong_20_Emphasis"><text:span text:style-name="T739"> and </text:span></text:span><text:span text:style-name="Source_20_Text"><text:span text:style-name="T722">accept</text:span></text:span></text:p>
      <text:p text:style-name="P59"><text:span text:style-name="Strong_20_Emphasis"><text:span text:style-name="T739"><text:tab/>VI.5.</text:span></text:span><text:span text:style-name="Strong_20_Emphasis"><text:span text:style-name="T734">8</text:span></text:span><text:span text:style-name="Strong_20_Emphasis"><text:span text:style-name="T739"> Connecting to sockets: </text:span></text:span><text:span text:style-name="Source_20_Text"><text:span text:style-name="T722">connect</text:span></text:span></text:p>
      <text:p text:style-name="P59"><text:span text:style-name="Strong_20_Emphasis"><text:span text:style-name="T733"><text:tab/>VI.5.</text:span></text:span><text:span text:style-name="Strong_20_Emphasis"><text:span text:style-name="T734">9</text:span></text:span><text:span text:style-name="Strong_20_Emphasis"><text:span text:style-name="T739"> </text:span></text:span><text:span text:style-name="Strong_20_Emphasis"><text:span text:style-name="T733">Socket information: </text:span></text:span><text:span text:style-name="Source_20_Text"><text:span text:style-name="T722">getsockname</text:span></text:span><text:span text:style-name="Strong_20_Emphasis"><text:span text:style-name="T733">, </text:span></text:span><text:span text:style-name="Source_20_Text"><text:span text:style-name="T722">getpeername</text:span></text:span><text:span text:style-name="Strong_20_Emphasis"><text:span text:style-name="T733">, </text:span></text:span><text:span text:style-name="Source_20_Text"><text:span text:style-name="T722">getsockopt</text:span></text:span></text:p>
      <text:p text:style-name="P59"><text:span text:style-name="Strong_20_Emphasis"><text:span text:style-name="T733"><text:tab/>VI.5.</text:span></text:span><text:span text:style-name="Strong_20_Emphasis"><text:span text:style-name="T734">10</text:span></text:span><text:span text:style-name="Strong_20_Emphasis"><text:span text:style-name="T733"> Data transmission: </text:span></text:span><text:span text:style-name="Source_20_Text"><text:span text:style-name="T722">send</text:span></text:span><text:span text:style-name="Strong_20_Emphasis"><text:span text:style-name="T733"> and </text:span></text:span><text:span text:style-name="Source_20_Text"><text:span text:style-name="T722">recv</text:span></text:span></text:p>
      <text:p text:style-name="P59"><text:span text:style-name="Strong_20_Emphasis"><text:span text:style-name="T733"><text:tab/>VI.5.</text:span></text:span><text:span text:style-name="Strong_20_Emphasis"><text:span text:style-name="T740">1</text:span></text:span><text:span text:style-name="Strong_20_Emphasis"><text:span text:style-name="T741">1</text:span></text:span><text:span text:style-name="Strong_20_Emphasis"><text:span text:style-name="T733"> Conection-oriented client-server </text:span></text:span><text:span text:style-name="Strong_20_Emphasis"><text:span text:style-name="T742">uptime service</text:span></text:span></text:p>
      <text:p text:style-name="P59"><text:span text:style-name="Strong_20_Emphasis"><text:span text:style-name="T733"><text:tab/>VI.5.</text:span></text:span><text:span text:style-name="Strong_20_Emphasis"><text:span text:style-name="T740">1</text:span></text:span><text:span text:style-name="Strong_20_Emphasis"><text:span text:style-name="T741">2</text:span></text:span><text:span text:style-name="Strong_20_Emphasis"><text:span text:style-name="T733"> </text:span></text:span><text:span text:style-name="Strong_20_Emphasis"><text:span text:style-name="T743">N</text:span></text:span><text:span text:style-name="Strong_20_Emphasis"><text:span text:style-name="T744">on-blocking</text:span></text:span><text:span text:style-name="Strong_20_Emphasis"><text:span text:style-name="T745"> sockets </text:span></text:span><text:span text:style-name="Strong_20_Emphasis"><text:span text:style-name="T743">and asynchronous I/O</text:span></text:span></text:p>
      <text:p text:style-name="P59"><text:span text:style-name="Strong_20_Emphasis"><text:span text:style-name="T733"><text:tab/>VI.5.</text:span></text:span><text:span text:style-name="Strong_20_Emphasis"><text:span text:style-name="T740">1</text:span></text:span><text:span text:style-name="Strong_20_Emphasis"><text:span text:style-name="T746">3</text:span></text:span><text:span text:style-name="Strong_20_Emphasis"><text:span text:style-name="T733"> </text:span></text:span><text:span text:style-name="Strong_20_Emphasis"><text:span text:style-name="T746">Out-of-band data: </text:span></text:span><text:span text:style-name="Source_20_Text"><text:span text:style-name="T722">sockatmark</text:span></text:span></text:p>
      <text:p text:style-name="P59"><text:span text:style-name="Strong_20_Emphasis"><text:span text:style-name="T733"><text:tab/>VI.5.</text:span></text:span><text:span text:style-name="Strong_20_Emphasis"><text:span text:style-name="T739">1</text:span></text:span><text:span text:style-name="Strong_20_Emphasis"><text:span text:style-name="T746">4</text:span></text:span><text:span text:style-name="Strong_20_Emphasis"><text:span text:style-name="T733"> Send</text:span></text:span><text:span text:style-name="Strong_20_Emphasis"><text:span text:style-name="T742">ing</text:span></text:span><text:span text:style-name="Strong_20_Emphasis"><text:span text:style-name="T733"> and receiv</text:span></text:span><text:span text:style-name="Strong_20_Emphasis"><text:span text:style-name="T742">ing</text:span></text:span><text:span text:style-name="Strong_20_Emphasis"><text:span text:style-name="T733"> multiple messages: </text:span></text:span><text:span text:style-name="Source_20_Text"><text:span text:style-name="T722">sendmmsg</text:span></text:span><text:span text:style-name="Strong_20_Emphasis"><text:span text:style-name="T733"> and </text:span></text:span><text:span text:style-name="Source_20_Text"><text:span text:style-name="T722">recvmmsg</text:span></text:span></text:p>
      <text:p text:style-name="P59"><text:span text:style-name="Strong_20_Emphasis"><text:span text:style-name="T719">VI.</text:span></text:span><text:span text:style-name="Strong_20_Emphasis"><text:span text:style-name="T726">6</text:span></text:span><text:span text:style-name="Strong_20_Emphasis"><text:span text:style-name="T719"> </text:span></text:span><text:span text:style-name="Strong_20_Emphasis"><text:span text:style-name="T728">UNIX </text:span></text:span><text:span text:style-name="Strong_20_Emphasis"><text:span text:style-name="T747">D</text:span></text:span><text:span text:style-name="Strong_20_Emphasis"><text:span text:style-name="T728">omain </text:span></text:span><text:span text:style-name="Strong_20_Emphasis"><text:span text:style-name="T747">S</text:span></text:span><text:span text:style-name="Strong_20_Emphasis"><text:span text:style-name="T728">ockets</text:span></text:span></text:p>
      <text:p text:style-name="P59"><text:span text:style-name="Strong_20_Emphasis"><text:span text:style-name="T728"><text:tab/></text:span></text:span><text:span text:style-name="Strong_20_Emphasis"><text:span text:style-name="T748">VI.6.1 </text:span></text:span><text:span text:style-name="Strong_20_Emphasis"><text:span text:style-name="T749">Unnamed UNIX domain sockets: </text:span></text:span><text:span text:style-name="Strong_20_Emphasis"><text:span text:style-name="T750">socketpair</text:span></text:span></text:p>
      <text:p text:style-name="P59"><text:span text:style-name="Strong_20_Emphasis"><text:span text:style-name="T728"><text:tab/></text:span></text:span><text:span text:style-name="Strong_20_Emphasis"><text:span text:style-name="T748">VI.6.</text:span></text:span><text:span text:style-name="Strong_20_Emphasis"><text:span text:style-name="T749">2</text:span></text:span><text:span text:style-name="Strong_20_Emphasis"><text:span text:style-name="T748"> </text:span></text:span><text:span text:style-name="Strong_20_Emphasis"><text:span text:style-name="T749">Named UNIX domain sockets: </text:span></text:span><text:span text:style-name="Strong_20_Emphasis"><text:span text:style-name="T750">sockaddr_un</text:span></text:span></text:p>
      <text:p text:style-name="P59"><text:span text:style-name="Strong_20_Emphasis"><text:span text:style-name="T728"><text:tab/></text:span></text:span><text:span text:style-name="Strong_20_Emphasis"><text:span text:style-name="T749">VI.6.3 </text:span></text:span><text:span text:style-name="Strong_20_Emphasis"><text:span text:style-name="T751">Datagram s</text:span></text:span><text:span text:style-name="Strong_20_Emphasis"><text:span text:style-name="T749">ocket</text:span></text:span><text:span text:style-name="Strong_20_Emphasis"><text:span text:style-name="T751">s: </text:span></text:span><text:span text:style-name="Strong_20_Emphasis"><text:span text:style-name="T750">SOCK_DGRAM</text:span></text:span></text:p>
      <text:p text:style-name="P59"><text:span text:style-name="Strong_20_Emphasis"><text:span text:style-name="T749"><text:tab/>VI.6.</text:span></text:span><text:span text:style-name="Strong_20_Emphasis"><text:span text:style-name="T751">4</text:span></text:span><text:span text:style-name="Strong_20_Emphasis"><text:span text:style-name="T749"> </text:span></text:span><text:span text:style-name="Strong_20_Emphasis"><text:span text:style-name="T752">Stream-oriented sockets and message-oriented sockets</text:span></text:span></text:p>
      <text:p text:style-name="P59"><text:span text:style-name="Strong_20_Emphasis"><text:span text:style-name="T749"><text:tab/>VI.6.</text:span></text:span><text:span text:style-name="Strong_20_Emphasis"><text:span text:style-name="T753">5</text:span></text:span><text:span text:style-name="Strong_20_Emphasis"><text:span text:style-name="T749"> </text:span></text:span><text:span text:style-name="Strong_20_Emphasis"><text:span text:style-name="T753">Abstract</text:span></text:span><text:span text:style-name="Strong_20_Emphasis"><text:span text:style-name="T752"> sockets</text:span></text:span></text:p>
      <text:p text:style-name="P59"><text:span text:style-name="Strong_20_Emphasis"><text:span text:style-name="T728"><text:tab/></text:span></text:span><text:span text:style-name="Strong_20_Emphasis"><text:span text:style-name="T749">VI.6.</text:span></text:span><text:span text:style-name="Strong_20_Emphasis"><text:span text:style-name="T753">6</text:span></text:span><text:span text:style-name="Strong_20_Emphasis"><text:span text:style-name="T749"> Socket options and ancillary messages: </text:span></text:span><text:span text:style-name="Strong_20_Emphasis"><text:span text:style-name="T754">cmsg</text:span></text:span></text:p>
      <text:p text:style-name="P59"><text:span text:style-name="Strong_20_Emphasis"><text:span text:style-name="T749"><text:tab/>VI.6.</text:span></text:span><text:span text:style-name="Strong_20_Emphasis"><text:span text:style-name="T753">7</text:span></text:span><text:span text:style-name="Strong_20_Emphasis"><text:span text:style-name="T749"> Passing file descriptors </text:span></text:span><text:span text:style-name="Strong_20_Emphasis"><text:span text:style-name="T755">within a single process</text:span></text:span></text:p>
      <text:p text:style-name="P59"><text:span text:style-name="Strong_20_Emphasis"><text:span text:style-name="T749"><text:tab/>VI.6.</text:span></text:span><text:span text:style-name="Strong_20_Emphasis"><text:span text:style-name="T753">8</text:span></text:span><text:span text:style-name="Strong_20_Emphasis"><text:span text:style-name="T749"> Passing file descriptors </text:span></text:span><text:span text:style-name="Strong_20_Emphasis"><text:span text:style-name="T755">between parent and child processes</text:span></text:span></text:p>
      <text:p text:style-name="P59"><text:span text:style-name="Strong_20_Emphasis"><text:span text:style-name="T749"><text:tab/>VI.6.</text:span></text:span><text:span text:style-name="Strong_20_Emphasis"><text:span text:style-name="T753">9</text:span></text:span><text:span text:style-name="Strong_20_Emphasis"><text:span text:style-name="T749"> Passing file descriptors </text:span></text:span><text:span text:style-name="Strong_20_Emphasis"><text:span text:style-name="T756">and credentials </text:span></text:span><text:span text:style-name="Strong_20_Emphasis"><text:span text:style-name="T755">between unrelated processes</text:span></text:span></text:p>
      <text:p text:style-name="P59"><text:span text:style-name="Strong_20_Emphasis"><text:span text:style-name="T749"><text:tab/>VI.6.</text:span></text:span><text:span text:style-name="Strong_20_Emphasis"><text:span text:style-name="T753">10</text:span></text:span><text:span text:style-name="Strong_20_Emphasis"><text:span text:style-name="T749"> </text:span></text:span><text:span text:style-name="Strong_20_Emphasis"><text:span text:style-name="T751">A </text:span></text:span><text:span text:style-name="Strong_20_Emphasis"><text:span text:style-name="T757">secure file access </text:span></text:span><text:span text:style-name="Strong_20_Emphasis"><text:span text:style-name="T751">ser</text:span></text:span><text:span text:style-name="Strong_20_Emphasis"><text:span text:style-name="T757">vice</text:span></text:span></text:p>
      <text:p text:style-name="P96"><text:span text:style-name="Strong_20_Emphasis"><text:span text:style-name="T758"><text:tab/>V</text:span></text:span><text:span text:style-name="Strong_20_Emphasis"><text:span text:style-name="T759">I</text:span></text:span><text:span text:style-name="Strong_20_Emphasis"><text:span text:style-name="T758">.6.</text:span></text:span><text:span text:style-name="Strong_20_Emphasis"><text:span text:style-name="T760">1</text:span></text:span><text:span text:style-name="Strong_20_Emphasis"><text:span text:style-name="T761">1</text:span></text:span><text:span text:style-name="Strong_20_Emphasis"><text:span text:style-name="T760"> Sequenced-packet sockets: </text:span></text:span><text:span text:style-name="Strong_20_Emphasis"><text:span text:style-name="T762">SOCK_SEQPACKET</text:span></text:span></text:p>
      <text:p text:style-name="P59"><text:span text:style-name="Strong_20_Emphasis"><text:span text:style-name="T719">VI.</text:span></text:span><text:span text:style-name="Strong_20_Emphasis"><text:span text:style-name="T705">7</text:span></text:span><text:span text:style-name="Strong_20_Emphasis"><text:span text:style-name="T719"> Terminal I/O..…………….……....…………….……………………..</text:span></text:span></text:p>
      <text:p text:style-name="P59"><text:span text:style-name="Strong_20_Emphasis"><text:span text:style-name="T719"><text:tab/></text:span></text:span><text:span text:style-name="Strong_20_Emphasis"><text:span text:style-name="T763">V</text:span></text:span><text:span text:style-name="Strong_20_Emphasis"><text:span text:style-name="T764">I.7.1 Identifying </text:span></text:span><text:span text:style-name="Strong_20_Emphasis"><text:span text:style-name="T763">t</text:span></text:span><text:span text:style-name="Strong_20_Emphasis"><text:span text:style-name="T764">erminal </text:span></text:span><text:span text:style-name="Strong_20_Emphasis"><text:span text:style-name="T763">f</text:span></text:span><text:span text:style-name="Strong_20_Emphasis"><text:span text:style-name="T764">ile </text:span></text:span><text:span text:style-name="Strong_20_Emphasis"><text:span text:style-name="T763">d</text:span></text:span><text:span text:style-name="Strong_20_Emphasis"><text:span text:style-name="T764">escriptors: </text:span></text:span><text:span text:style-name="Strong_20_Emphasis"><text:span text:style-name="T765">isatty</text:span></text:span></text:p>
      <text:p text:style-name="P59"><text:span text:style-name="Strong_20_Emphasis"><text:span text:style-name="T719"><text:tab/>VI.</text:span></text:span><text:span text:style-name="Strong_20_Emphasis"><text:span text:style-name="T706">7</text:span></text:span><text:span text:style-name="Strong_20_Emphasis"><text:span text:style-name="T719">.</text:span></text:span><text:span text:style-name="Strong_20_Emphasis"><text:span text:style-name="T766">2</text:span></text:span><text:span text:style-name="Strong_20_Emphasis"><text:span text:style-name="T719"> Terminal properties: </text:span></text:span><text:span text:style-name="Strong_20_Emphasis"><text:span text:style-name="T767">termios</text:span></text:span></text:p>
      <text:p text:style-name="P59"><text:span text:style-name="Strong_20_Emphasis"><text:span text:style-name="T719"><text:tab/></text:span></text:span><text:span text:style-name="Strong_20_Emphasis"><text:span text:style-name="T768">V</text:span></text:span><text:span text:style-name="Strong_20_Emphasis"><text:span text:style-name="T719">I.7.3 Retrieving and changing terminal settings: </text:span></text:span><text:span text:style-name="Strong_20_Emphasis"><text:span text:style-name="T765">tcgetattr</text:span></text:span><text:span text:style-name="Strong_20_Emphasis"><text:span text:style-name="T769"> and </text:span></text:span><text:span text:style-name="Strong_20_Emphasis"><text:span text:style-name="T765">tcsetattr</text:span></text:span></text:p>
      <text:p text:style-name="P59"><text:soft-page-break/><text:span text:style-name="Strong_20_Emphasis"><text:span text:style-name="T719"><text:tab/></text:span></text:span><text:span text:style-name="Strong_20_Emphasis"><text:span text:style-name="T770">V</text:span></text:span><text:span text:style-name="Strong_20_Emphasis"><text:span text:style-name="T771">I</text:span></text:span><text:span text:style-name="Strong_20_Emphasis"><text:span text:style-name="T772">.</text:span></text:span><text:span text:style-name="Strong_20_Emphasis"><text:span text:style-name="T706">7</text:span></text:span><text:span text:style-name="Strong_20_Emphasis"><text:span text:style-name="T772">.</text:span></text:span><text:span text:style-name="Strong_20_Emphasis"><text:span text:style-name="T773">4</text:span></text:span><text:span text:style-name="Strong_20_Emphasis"><text:span text:style-name="T768"> </text:span></text:span><text:span text:style-name="Strong_20_Emphasis"><text:span text:style-name="T773">Canonical, noncanonical </text:span></text:span><text:span text:style-name="Strong_20_Emphasis"><text:span text:style-name="T774">and raw </text:span></text:span><text:span text:style-name="Strong_20_Emphasis"><text:span text:style-name="T773">mode</text:span></text:span></text:p>
      <text:p text:style-name="P59"><text:span text:style-name="Strong_20_Emphasis"><text:span text:style-name="T719"><text:tab/></text:span></text:span><text:span text:style-name="Strong_20_Emphasis"><text:span text:style-name="T770">V</text:span></text:span><text:span text:style-name="Strong_20_Emphasis"><text:span text:style-name="T771">I</text:span></text:span><text:span text:style-name="Strong_20_Emphasis"><text:span text:style-name="T772">.</text:span></text:span><text:span text:style-name="Strong_20_Emphasis"><text:span text:style-name="T706">7</text:span></text:span><text:span text:style-name="Strong_20_Emphasis"><text:span text:style-name="T772">.</text:span></text:span><text:span text:style-name="Strong_20_Emphasis"><text:span text:style-name="T775">5</text:span></text:span><text:span text:style-name="Strong_20_Emphasis"><text:span text:style-name="T768"> </text:span></text:span><text:span text:style-name="Strong_20_Emphasis"><text:span text:style-name="T775">Line control</text:span></text:span></text:p>
      <text:p text:style-name="P59"><text:span text:style-name="Strong_20_Emphasis"><text:span text:style-name="T719"><text:tab/></text:span></text:span><text:span text:style-name="Strong_20_Emphasis"><text:span text:style-name="T770">V</text:span></text:span><text:span text:style-name="Strong_20_Emphasis"><text:span text:style-name="T771">I</text:span></text:span><text:span text:style-name="Strong_20_Emphasis"><text:span text:style-name="T772">.</text:span></text:span><text:span text:style-name="Strong_20_Emphasis"><text:span text:style-name="T706">7</text:span></text:span><text:span text:style-name="Strong_20_Emphasis"><text:span text:style-name="T772">.</text:span></text:span><text:span text:style-name="Strong_20_Emphasis"><text:span text:style-name="T776">6</text:span></text:span><text:span text:style-name="Strong_20_Emphasis"><text:span text:style-name="T768"> </text:span></text:span><text:span text:style-name="Strong_20_Emphasis"><text:span text:style-name="T775">Line </text:span></text:span><text:span text:style-name="Strong_20_Emphasis"><text:span text:style-name="T776">speed</text:span></text:span></text:p>
      <text:p text:style-name="P59"><text:span text:style-name="Strong_20_Emphasis"><text:span text:style-name="T719"><text:tab/></text:span></text:span><text:span text:style-name="Strong_20_Emphasis"><text:span text:style-name="T770">V</text:span></text:span><text:span text:style-name="Strong_20_Emphasis"><text:span text:style-name="T771">I</text:span></text:span><text:span text:style-name="Strong_20_Emphasis"><text:span text:style-name="T772">.</text:span></text:span><text:span text:style-name="Strong_20_Emphasis"><text:span text:style-name="T706">7</text:span></text:span><text:span text:style-name="Strong_20_Emphasis"><text:span text:style-name="T772">.</text:span></text:span><text:span text:style-name="Strong_20_Emphasis"><text:span text:style-name="T777">7</text:span></text:span><text:span text:style-name="Strong_20_Emphasis"><text:span text:style-name="T768"> </text:span></text:span><text:span text:style-name="Strong_20_Emphasis"><text:span text:style-name="T777">Special characters</text:span></text:span></text:p>
      <text:p text:style-name="P59"><text:span text:style-name="Strong_20_Emphasis"><text:span text:style-name="T719"><text:tab/></text:span></text:span><text:span text:style-name="Strong_20_Emphasis"><text:span text:style-name="T770">V</text:span></text:span><text:span text:style-name="Strong_20_Emphasis"><text:span text:style-name="T771">I</text:span></text:span><text:span text:style-name="Strong_20_Emphasis"><text:span text:style-name="T772">.</text:span></text:span><text:span text:style-name="Strong_20_Emphasis"><text:span text:style-name="T706">7</text:span></text:span><text:span text:style-name="Strong_20_Emphasis"><text:span text:style-name="T772">.</text:span></text:span><text:span text:style-name="Strong_20_Emphasis"><text:span text:style-name="T777">8</text:span></text:span><text:span text:style-name="Strong_20_Emphasis"><text:span text:style-name="T768"> </text:span></text:span><text:span text:style-name="Strong_20_Emphasis"><text:span text:style-name="T777">Window terminal size</text:span></text:span></text:p>
      <text:p text:style-name="P59"><text:span text:style-name="Strong_20_Emphasis"><text:span text:style-name="T777"><text:tab/></text:span></text:span><text:span text:style-name="Strong_20_Emphasis"><text:span text:style-name="T778">VI.7.9 Command-line utilities</text:span></text:span></text:p>
      <text:p text:style-name="P59"><text:span text:style-name="Strong_20_Emphasis"><text:span text:style-name="T719"><text:tab/></text:span></text:span><text:span text:style-name="Strong_20_Emphasis"><text:span text:style-name="T770">V</text:span></text:span><text:span text:style-name="Strong_20_Emphasis"><text:span text:style-name="T771">I</text:span></text:span><text:span text:style-name="Strong_20_Emphasis"><text:span text:style-name="T772">.</text:span></text:span><text:span text:style-name="Strong_20_Emphasis"><text:span text:style-name="T706">7</text:span></text:span><text:span text:style-name="Strong_20_Emphasis"><text:span text:style-name="T772">.</text:span></text:span><text:span text:style-name="Strong_20_Emphasis"><text:span text:style-name="T778">10</text:span></text:span><text:span text:style-name="Strong_20_Emphasis"><text:span text:style-name="T768"> </text:span></text:span><text:span text:style-name="Strong_20_Emphasis"><text:span text:style-name="T765">ncurses</text:span></text:span></text:p>
      <text:p text:style-name="P59"><text:span text:style-name="Strong_20_Emphasis"><text:span text:style-name="T719">VI.</text:span></text:span><text:span text:style-name="Strong_20_Emphasis"><text:span text:style-name="T705">8</text:span></text:span><text:span text:style-name="Strong_20_Emphasis"><text:span text:style-name="T719"> Pseudo terminals</text:span></text:span></text:p>
      <text:p text:style-name="P59"><text:span text:style-name="Strong_20_Emphasis"><text:span text:style-name="T771"><text:tab/>VI.8.</text:span></text:span><text:span text:style-name="Strong_20_Emphasis"><text:span text:style-name="T779">1 Overview</text:span></text:span></text:p>
      <text:p text:style-name="P59"><text:span text:style-name="Strong_20_Emphasis"><text:span text:style-name="T771"><text:tab/>VI.8.</text:span></text:span><text:span text:style-name="Strong_20_Emphasis"><text:span text:style-name="T779">2</text:span></text:span><text:span text:style-name="Strong_20_Emphasis"><text:span text:style-name="T771"> UNIX 98 pseudoterminal</text:span></text:span></text:p>
      <text:p text:style-name="P59"><text:span text:style-name="Strong_20_Emphasis"><text:span text:style-name="T771"><text:tab/>VI.8.</text:span></text:span><text:span text:style-name="Strong_20_Emphasis"><text:span text:style-name="T780">3</text:span></text:span><text:span text:style-name="Strong_20_Emphasis"><text:span text:style-name="T771"> </text:span></text:span><text:span text:style-name="Strong_20_Emphasis"><text:span text:style-name="T765">script</text:span></text:span><text:span text:style-name="Strong_20_Emphasis"><text:span text:style-name="T780"> and </text:span></text:span><text:span text:style-name="Strong_20_Emphasis"><text:span text:style-name="T765">expect</text:span></text:span></text:p>
      <text:p text:style-name="P59"><text:span text:style-name="Strong_20_Emphasis"><text:span text:style-name="T771"><text:tab/>VI.8.</text:span></text:span><text:span text:style-name="Strong_20_Emphasis"><text:span text:style-name="T779">3</text:span></text:span><text:span text:style-name="Strong_20_Emphasis"><text:span text:style-name="T771"> </text:span></text:span><text:span text:style-name="Strong_20_Emphasis"><text:span text:style-name="T781">Opening pseudoterminal: </text:span></text:span><text:span text:style-name="Strong_20_Emphasis"><text:span text:style-name="T765">getpt</text:span></text:span><text:span text:style-name="Strong_20_Emphasis"><text:span text:style-name="T779"> and </text:span></text:span><text:span text:style-name="Strong_20_Emphasis"><text:span text:style-name="T765">posix_openpt</text:span></text:span></text:p>
      <text:p text:style-name="P59"><text:span text:style-name="T782"><text:tab/>VI.8.4 Unlocking pseudoterminal: </text:span><text:span text:style-name="Strong_20_Emphasis"><text:span text:style-name="T765">grantpt</text:span></text:span><text:span text:style-name="T782"> and </text:span><text:span text:style-name="Strong_20_Emphasis"><text:span text:style-name="T765">unlockpt</text:span></text:span></text:p>
      <text:p text:style-name="P59"><text:span text:style-name="T782"><text:tab/>VI.8.5 Getting pseudoterminal name: </text:span><text:span text:style-name="Strong_20_Emphasis"><text:span text:style-name="T765">ptsname</text:span></text:span></text:p>
      <text:p text:style-name="P59"><text:span text:style-name="T782"><text:tab/>VI.8.6 Pseudoterminal pair: </text:span><text:span text:style-name="Strong_20_Emphasis"><text:span text:style-name="T765">openpty</text:span></text:span><text:span text:style-name="T782">, </text:span><text:span text:style-name="Strong_20_Emphasis"><text:span text:style-name="T765">forkpty</text:span></text:span><text:span text:style-name="T782"> and </text:span><text:span text:style-name="Strong_20_Emphasis"><text:span text:style-name="T765">loginpty</text:span></text:span></text:p>
      <text:p text:style-name="P97">VI.<text:span text:style-name="T783">9</text:span> Theory and insights </text:p>
      <text:p text:style-name="P97"><text:tab/><text:span text:style-name="T784">VI.</text:span><text:span text:style-name="T785">9</text:span><text:span text:style-name="T784">.1 </text:span><text:span text:style-name="T606">POSIX Message queues limits files</text:span><text:span text:style-name="T786"> </text:span></text:p>
      <text:p text:style-name="P59"><text:span text:style-name="Strong_20_Emphasis"><text:span text:style-name="T728"><text:tab/>VI.9.2 System V interprocess communication</text:span></text:span></text:p>
      <text:p text:style-name="P59"><text:span text:style-name="Strong_20_Emphasis"><text:span text:style-name="T728"><text:tab/>VI.9.</text:span></text:span><text:span text:style-name="Strong_20_Emphasis"><text:span text:style-name="T787">3</text:span></text:span><text:span text:style-name="Strong_20_Emphasis"><text:span text:style-name="T728"> Network interfaces functions</text:span></text:span></text:p>
      <text:p text:style-name="P59"><text:span text:style-name="Strong_20_Emphasis"><text:span text:style-name="T728"><text:tab/>VI.9.</text:span></text:span><text:span text:style-name="Strong_20_Emphasis"><text:span text:style-name="T788">4</text:span></text:span><text:span text:style-name="Strong_20_Emphasis"><text:span text:style-name="T728"> </text:span></text:span><text:span text:style-name="Strong_20_Emphasis"><text:span text:style-name="T788">Virtual console: </text:span></text:span><text:span text:style-name="Strong_20_Emphasis"><text:span text:style-name="T765">vcs</text:span></text:span></text:p>
      <text:p text:style-name="P59"><text:span text:style-name="Strong_20_Emphasis"><text:span text:style-name="T728"><text:tab/>VI.9.</text:span></text:span><text:span text:style-name="Strong_20_Emphasis"><text:span text:style-name="T789">5</text:span></text:span><text:span text:style-name="Strong_20_Emphasis"><text:span text:style-name="T728"> </text:span></text:span><text:span text:style-name="Strong_20_Emphasis"><text:span text:style-name="T789">Serial terminal lines: </text:span></text:span><text:span text:style-name="Strong_20_Emphasis"><text:span text:style-name="T765">ttyS</text:span></text:span></text:p>
      <text:p text:style-name="P97">List of tables</text:p>
      <text:p text:style-name="P98">List of figures</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9"><text:soft-page-break/>Annotated table of contents</text:p>
      <text:p text:style-name="P100"/>
      <text:p text:style-name="P101"><text:span text:style-name="Strong_20_Emphasis"><text:span text:style-name="T10">Chapter </text:span></text:span><text:span text:style-name="Strong_20_Emphasis"><text:span text:style-name="T790">0</text:span></text:span><text:span text:style-name="Strong_20_Emphasis"><text:span text:style-name="T10"> — </text:span></text:span><text:span text:style-name="Strong_20_Emphasis"><text:span text:style-name="T790">Tools</text:span></text:span></text:p>
      <text:p text:style-name="P100">This introductory chapter presents the essential tools commonly used for software development in a Linux environment, along with an overview of the standards that define software behavior and portability. It is intended to provide readers with the necessary background for the topics covered in the rest of the book; those already familiar with these concepts may choose to skip it.</text:p>
      <text:p text:style-name="P100"/>
      <text:p text:style-name="P100">The chapter covers the compilation process and the use of key development tools such as <text:span text:style-name="Emphasis">gcc</text:span>, <text:span text:style-name="Emphasis">make</text:span>, and <text:span text:style-name="Emphasis">autoconf</text:span>, as well as debugging with <text:span text:style-name="Emphasis">gdb</text:span>. It also introduces the source code and how it can be obtained and organized in a Linux system. In addition, it outlines the most widely used software standards at a high level and includes a simple introduction to the GNU General Public License (GPL) and its role in software development and distribution.</text:p>
      <text:p text:style-name="Standard"/>
      <text:p text:style-name="P101"><text:span text:style-name="Strong_20_Emphasis"><text:span text:style-name="T790">Chapter 1 — File I/O</text:span></text:span></text:p>
      <text:p text:style-name="P100">This chapter introduces file input/output operations, starting from fundamental system calls such as <text:span text:style-name="Emphasis">open</text:span>, <text:span text:style-name="Emphasis">read</text:span>, <text:span text:style-name="Emphasis">write</text:span>, and <text:span text:style-name="Emphasis">close</text:span>, and progressing to more advanced mechanisms. Topics include file truncation and appending, file descriptor duplication, I/O multiplexing, buffering strategies, asynchronous I/O (both POSIX and Linux-specific), file locking, and interprocess communication through pipes and FIFOs.</text:p>
      <text:p text:style-name="Standard"><text:span text:style-name="Strong_20_Emphasis"/></text:p>
      <text:p text:style-name="P101"><text:span text:style-name="Strong_20_Emphasis"><text:span text:style-name="T10">Chapter 2 — Files </text:span></text:span><text:span text:style-name="Strong_20_Emphasis"><text:span text:style-name="T790">and Directories</text:span></text:span></text:p>
      <text:p text:style-name="P100">This chapter examines the APIs used to interact with the filesystem. It covers file metadata (<text:span text:style-name="Emphasis">stat</text:span>), links, permissions, and inode structures, as well as operations on directories such as creation, deletion, and renaming. Additional topics include device files, Linux capabilities, filesystem organization, quotas, and resource limits.</text:p>
      <text:p text:style-name="P100"/>
      <text:p text:style-name="P101"><text:span text:style-name="Strong_20_Emphasis"><text:span text:style-name="T790">Chapter 3 — Environment and system Databases</text:span></text:span></text:p>
      <text:p text:style-name="P100">This chapter explores the process environment and its interaction with the operating system. It includes functions for handling time and date, environment variables, and localization (locale). It also provides a detailed overview of system databases, such as user and group information, along with login records and system identification (<text:span text:style-name="Emphasis">uname</text:span>). The chapter concludes with a dedicated section on Pluggable Authentication Modules (PAM).</text:p>
      <text:p text:style-name="P102"><text:span text:style-name="Strong_20_Emphasis"/></text:p>
      <text:p text:style-name="P101"><text:span text:style-name="Strong_20_Emphasis"><text:span text:style-name="T790">Chapter 4 — Memory</text:span></text:span></text:p>
      <text:p text:style-name="P100">This chapter provides an in-depth analysis of memory management in Linux. It covers dynamic memory allocation, memory mapping, memory protection, and locking mechanisms. It also examines dynamically loaded objects and presents a detailed study of the ELF (Executable and Linkable Format), including how programs are loaded into memory and how processes start and terminate.</text:p>
      <text:p text:style-name="P101"/>
      <text:p text:style-name="P101"><text:span text:style-name="Strong_20_Emphasis"><text:span text:style-name="T790">Chapter 5 — Processes</text:span></text:span></text:p>
      <text:p text:style-name="P100">This chapter focuses on process management and multithreading. It covers process creation and control through <text:span text:style-name="Emphasis">fork</text:span>, <text:span text:style-name="Emphasis">clone</text:span>, <text:span text:style-name="Emphasis">execve</text:span>, and <text:span text:style-name="Emphasis">wait</text:span>, as well as security features such as <text:span text:style-name="Emphasis">seccomp</text:span>. Additional topics include process groups, sessions, terminal control, signal handling, timers, thread programming, and daemon processes, all supported by practical examples.</text:p>
      <text:p text:style-name="P102"><text:span text:style-name="Strong_20_Emphasis"/></text:p>
      <text:p text:style-name="P101"><text:span text:style-name="Strong_20_Emphasis"><text:span text:style-name="T790">Chapter 6 — Interprocess Communication and Terminals</text:span></text:span></text:p>
      <text:p text:style-name="P100">This chapter covers the main IPC mechanisms available in Linux, including POSIX message queues, semaphores, shared memory, and sockets. It also explores UNIX domain sockets in detail, <text:soft-page-break/>along with terminal and pseudoterminal interfaces, providing numerous examples to illustrate their use in real-world scenarios.</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3"><text:soft-page-break/>Sample Chapter</text:p>
      <text:p text:style-name="P103"/>
      <text:p text:style-name="P104"><text:span text:style-name="T791">Chapter VI <text:s/>Interprocess Communication and Terminals</text:span></text:p>
      <text:p text:style-name="P13"/>
      <text:p text:style-name="P105"><text:span text:style-name="T301">V</text:span><text:span text:style-name="T792">I.1</text:span><text:span text:style-name="T301"> Int</text:span><text:span text:style-name="T793">roduction</text:span></text:p>
      <text:p text:style-name="P106"><text:span text:style-name="Strong_20_Emphasis"><text:span text:style-name="T794"/></text:span></text:p>
      <text:p text:style-name="P106"><text:span text:style-name="Strong_20_Emphasis"><text:span text:style-name="T795">Inter-Process Communication</text:span></text:span><text:span text:style-name="Strong_20_Emphasis"><text:span text:style-name="T758"> (IPC)</text:span></text:span><text:span text:style-name="T796"> refers to mechanisms that allow processes to communicate and coordinate with each other. Communication includes </text:span><text:span text:style-name="Strong_20_Emphasis"><text:span text:style-name="T758">sending and receiving data, sharing resources, and synchronizing execution</text:span></text:span><text:span text:style-name="T796"> between processes.</text:span></text:p>
      <text:p text:style-name="P106">IPC is essential because processes in modern operating systems are typically isolated for safety and stability, and therefore need controlled methods to exchange information.</text:p>
      <text:p text:style-name="P106"/>
      <text:p text:style-name="P106">In Linux, IPC can be implemented using several mechanisms:</text:p>
      <text:p text:style-name="P106"/>
      <text:list text:style-name="L1">
        <text:list-item>
          <text:p text:style-name="P107"><text:span text:style-name="Strong_20_Emphasis"><text:span text:style-name="T795">Pipes</text:span></text:span><text:span text:style-name="T796"><text:line-break/>Used for unidirectional (half-duplex) communication between related processes (e.g., parent and child). </text:span></text:p>
          <text:list>
            <text:list-item>
              <text:p text:style-name="P107"><text:span text:style-name="Emphasis"><text:span text:style-name="T796">Unnamed pipes</text:span></text:span><text:span text:style-name="T796">: typically created with </text:span><text:span text:style-name="Source_20_Text"><text:span text:style-name="T796">pipe</text:span></text:span></text:p>
            </text:list-item>
            <text:list-item>
              <text:p text:style-name="P107"><text:span text:style-name="Emphasis"><text:span text:style-name="T796">Named pipes (FIFOs)</text:span></text:span><text:span text:style-name="T796">: allow communication between unrelated processes </text:span></text:p>
            </text:list-item>
          </text:list>
        </text:list-item>
      </text:list>
      <text:p text:style-name="P108"/>
      <text:list text:continue-numbering="true" text:style-name="L1">
        <text:list-item>
          <text:p text:style-name="P107"><text:span text:style-name="Strong_20_Emphasis"><text:span text:style-name="T797">Message Queues</text:span></text:span><text:line-break/>Allow processes to exchange messages in a structured and asynchronous way. Messages are stored in a queue and can be retrieved in order or based on priority</text:p>
          <text:p text:style-name="P109"/>
        </text:list-item>
        <text:list-item>
          <text:p text:style-name="P107"><text:span text:style-name="Strong_20_Emphasis"><text:span text:style-name="T795">Semaphores</text:span></text:span><text:span text:style-name="T796"><text:line-break/>Used for process synchronization rather than data exchange. They help control access to shared resources and prevent race conditions</text:span></text:p>
          <text:p text:style-name="P110"/>
        </text:list-item>
        <text:list-item>
          <text:p text:style-name="P107"><text:span text:style-name="Strong_20_Emphasis"><text:span text:style-name="T797">Shared Memory</text:span></text:span><text:line-break/>The fastest IPC mechanism, where multiple processes share a common <text:span text:style-name="T211">memory segment</text:span>. Processes can read and write directly to this memory <text:span text:style-name="T798">with</text:span> synchronization (e.g., using semaphores), <text:span text:style-name="T798">that </text:span>is required to avoid conflicts </text:p>
          <text:p text:style-name="P111"/>
        </text:list-item>
        <text:list-item>
          <text:p text:style-name="P107"><text:span text:style-name="Strong_20_Emphasis"><text:span text:style-name="T795">Sockets</text:span></text:span><text:span text:style-name="T796"><text:line-break/>Provide communication between processes, either on the same machine or over a network. They are commonly used for client-server communication</text:span></text:p>
        </text:list-item>
      </text:list>
      <text:p text:style-name="P112"/>
      <text:p text:style-name="P112">We have already examined some IPC mechanisms. In this section, we will focus on named semaphores, message queues, and shared memory, followed by a<text:span text:style-name="T783">n</text:span> introduction to sockets.</text:p>
      <text:p text:style-name="P113"><text:s/></text:p>
      <text:p text:style-name="P112"><text:span text:style-name="Strong_20_Emphasis"><text:span text:style-name="T131">Message queues, semaphores, and shared memory are part of XSI IPC, a standardized set of IPC mechanisms originally introduced in System V UNIX</text:span></text:span><text:span text:style-name="Strong_20_Emphasis"><text:span text:style-name="T131"><text:note text:id="ftn1" text:note-class="footnote"><text:note-citation>1</text:note-citation><text:note-body><text:p text:style-name="P114">See the <text:span text:style-name="T212">sysvipc(7)</text:span> manual page</text:p></text:note-body></text:note></text:span></text:span><text:span text:style-name="Strong_20_Emphasis"><text:span text:style-name="T131">.</text:span></text:span></text:p>
      <text:p text:style-name="P115"/>
      <text:p text:style-name="P115"/>
      <text:p text:style-name="P115"/>
      <text:p text:style-name="P113"/>
      <text:p text:style-name="P113"/>
      <text:p text:style-name="P113"/>
      <text:p text:style-name="P116"><text:soft-page-break/><text:span text:style-name="Strong_20_Emphasis"><text:span text:style-name="T799">VI.2 POSIX </text:span></text:span><text:span text:style-name="Strong_20_Emphasis"><text:span text:style-name="T800">M</text:span></text:span><text:span text:style-name="Strong_20_Emphasis"><text:span text:style-name="T799">essage </text:span></text:span><text:span text:style-name="Strong_20_Emphasis"><text:span text:style-name="T800">Q</text:span></text:span><text:span text:style-name="Strong_20_Emphasis"><text:span text:style-name="T799">ueues</text:span></text:span></text:p>
      <text:p text:style-name="P117"/>
      <text:p text:style-name="P118"><text:span text:style-name="T131">Message queues are an IPC mechanism that allow processes or threads to communicate by sending and receiving messages through a queue managed by the operating system. </text:span>The first implementation of message queues came from System V, but it had several limitations. POSIX message queues were later introduced to provide a simpler API, support message priorities, and offer better integration with modern system features like asynchronous notification.</text:p>
      <text:p text:style-name="P117"/>
      <text:p text:style-name="P112"><text:span text:style-name="Strong_20_Emphasis"><text:span text:style-name="T131">POSIX message queues are widely used in modern applications. They provide a file-like interface with operations such as </text:span></text:span><text:span text:style-name="Source_20_Text"><text:span text:style-name="T801">open</text:span></text:span><text:span text:style-name="Strong_20_Emphasis"><text:span text:style-name="T131">, </text:span></text:span><text:span text:style-name="Source_20_Text"><text:span text:style-name="T801">close</text:span></text:span><text:span text:style-name="Strong_20_Emphasis"><text:span text:style-name="T131">, and </text:span></text:span><text:span text:style-name="Source_20_Text"><text:span text:style-name="T801">unlink</text:span></text:span><text:span text:style-name="Strong_20_Emphasis"><text:span text:style-name="T131">. Furthermore, they support message priorities directly and integrate seamlessly with I/O multiplexing mechanisms like </text:span></text:span><text:span text:style-name="Source_20_Text"><text:span text:style-name="T801">select</text:span></text:span><text:span text:style-name="Strong_20_Emphasis"><text:span text:style-name="T131"> and </text:span></text:span><text:span text:style-name="Source_20_Text"><text:span text:style-name="T801">poll</text:span></text:span><text:span text:style-name="Strong_20_Emphasis"><text:span text:style-name="T131"> via file descriptors.</text:span></text:span></text:p>
      <text:p text:style-name="P112"><text:span text:style-name="Strong_20_Emphasis"><text:span text:style-name="T131"/></text:span></text:p>
      <text:p text:style-name="P112"><text:span text:style-name="Strong_20_Emphasis"><text:span text:style-name="T131">Message queues are created and opened using </text:span></text:span><text:span text:style-name="Source_20_Text"><text:span text:style-name="T801">mq_open</text:span></text:span><text:span text:style-name="Strong_20_Emphasis"><text:span text:style-name="T131">. This function returns a </text:span></text:span><text:span text:style-name="Strong_20_Emphasis"><text:span text:style-name="T797">message queue descriptor</text:span></text:span><text:span text:style-name="Strong_20_Emphasis"><text:span text:style-name="T131"> (</text:span></text:span><text:span text:style-name="Source_20_Text"><text:span text:style-name="T801">mqd_t</text:span></text:span><text:span text:style-name="Strong_20_Emphasis"><text:span text:style-name="T131">), which is used in subsequent operations to refer to the opened queue.</text:span></text:span></text:p>
      <text:p text:style-name="P112"><text:span text:style-name="Strong_20_Emphasis"><text:span text:style-name="T131">Each message queue is identified by a name of the form </text:span></text:span><text:span text:style-name="Source_20_Text"><text:span text:style-name="T801">/somename</text:span></text:span><text:span text:style-name="Strong_20_Emphasis"><text:span text:style-name="T131">, which is a null-terminated string of up to </text:span></text:span><text:span text:style-name="Source_20_Text"><text:span text:style-name="T801">NAME_MAX</text:span></text:span><text:span text:style-name="Strong_20_Emphasis"><text:span text:style-name="T131"> (typically 255) characters. The name must begin with a forward slash (</text:span></text:span><text:span text:style-name="Source_20_Text"><text:span text:style-name="T801">/</text:span></text:span><text:span text:style-name="Strong_20_Emphasis"><text:span text:style-name="T131">) and must not contain any additional slashes. Two processes can communicate using the same queue by passing the same name to </text:span></text:span><text:span text:style-name="Source_20_Text"><text:span text:style-name="T801">mq_open</text:span></text:span><text:span text:style-name="Strong_20_Emphasis"><text:span text:style-name="T131">.</text:span></text:span></text:p>
      <text:p text:style-name="P112"><text:span text:style-name="Strong_20_Emphasis"><text:span text:style-name="T131"/></text:span></text:p>
      <text:p text:style-name="P112"><text:span text:style-name="Strong_20_Emphasis"><text:span text:style-name="T131">Messages are sent and received using </text:span></text:span><text:span text:style-name="Source_20_Text"><text:span text:style-name="T801">mq_send</text:span></text:span><text:span text:style-name="Strong_20_Emphasis"><text:span text:style-name="T131"> and </text:span></text:span><text:span text:style-name="Source_20_Text"><text:span text:style-name="T801">mq_receive</text:span></text:span><text:span text:style-name="Strong_20_Emphasis"><text:span text:style-name="T131">. When a process no longer needs a queue, it closes it using </text:span></text:span><text:span text:style-name="Source_20_Text"><text:span text:style-name="T801">mq_close</text:span></text:span><text:span text:style-name="Strong_20_Emphasis"><text:span text:style-name="T131">. The queue itself can be removed from the system using </text:span></text:span><text:span text:style-name="Source_20_Text"><text:span text:style-name="T801">mq_unlink</text:span></text:span><text:span text:style-name="Strong_20_Emphasis"><text:span text:style-name="T131">; when it is no longer required. Queue attributes can be retrieved and, in some cases, modified using </text:span></text:span><text:span text:style-name="Source_20_Text"><text:span text:style-name="T801">mq_getattr</text:span></text:span><text:span text:style-name="Strong_20_Emphasis"><text:span text:style-name="T131"> and </text:span></text:span><text:span text:style-name="Source_20_Text"><text:span text:style-name="T801">mq_setattr</text:span></text:span><text:span text:style-name="Strong_20_Emphasis"><text:span text:style-name="T131">. Additionally, a process can request asynchronous notification of message arrival on an empty queue using </text:span></text:span><text:span text:style-name="Source_20_Text"><text:span text:style-name="T801">mq_notify</text:span></text:span><text:span text:style-name="Strong_20_Emphasis"><text:span text:style-name="T131">.</text:span></text:span></text:p>
      <text:p text:style-name="P112"><text:span text:style-name="Strong_20_Emphasis"><text:span text:style-name="T131"/></text:span></text:p>
      <text:p text:style-name="P112"><text:span text:style-name="Strong_20_Emphasis"><text:span text:style-name="T131">A </text:span></text:span><text:span text:style-name="Strong_20_Emphasis"><text:span text:style-name="T797">message queue descriptor</text:span></text:span><text:span text:style-name="Strong_20_Emphasis"><text:span text:style-name="T131"> refers to an </text:span></text:span><text:span text:style-name="Strong_20_Emphasis"><text:span text:style-name="T797">open message queue description</text:span></text:span><text:span text:style-name="Strong_20_Emphasis"><text:span text:style-name="T131">. After a </text:span></text:span><text:span text:style-name="Source_20_Text"><text:span text:style-name="T801">fork</text:span></text:span><text:span text:style-name="Strong_20_Emphasis"><text:span text:style-name="T131">, the child process inherits copies of its parent’s message queue descriptors, and both processes refer to the same underlying open queue. The associated flags (</text:span></text:span><text:span text:style-name="Source_20_Text"><text:span text:style-name="T801">mq_flags</text:span></text:span><text:span text:style-name="Strong_20_Emphasis"><text:span text:style-name="T131">) are shared between corresponding descriptors.</text:span></text:span></text:p>
      <text:p text:style-name="P112"><text:span text:style-name="Strong_20_Emphasis"><text:span text:style-name="T131"/></text:span></text:p>
      <text:p text:style-name="P112"><text:span text:style-name="Strong_20_Emphasis"><text:span text:style-name="T131">Each message has an associated </text:span></text:span><text:span text:style-name="Strong_20_Emphasis"><text:span text:style-name="T797">priority</text:span></text:span><text:span text:style-name="Strong_20_Emphasis"><text:span text:style-name="T131">, and messages are delivered to the receiving process in order of highest priority first. Message priorities range from 0 (lowest) to </text:span></text:span><text:span text:style-name="Source_20_Text"><text:span text:style-name="T801">sysconf(_SC_MQ_PRIO_MAX) - 1</text:span></text:span><text:span text:style-name="Strong_20_Emphasis"><text:span text:style-name="T131"> (highest). </text:span></text:span><text:span text:style-name="Strong_20_Emphasis"><text:span text:style-name="T802">This value is t</text:span></text:span><text:span text:style-name="Strong_20_Emphasis"><text:span text:style-name="T131">ypically </text:span></text:span><text:span text:style-name="Source_20_Text"><text:span text:style-name="T801">32768</text:span></text:span><text:span text:style-name="Source_20_Text"><text:span text:style-name="T801"><text:note text:id="ftn2" text:note-class="footnote"><text:note-citation>2</text:note-citation><text:note-body><text:p text:style-name="P119"><text:span text:style-name="Strong_20_Emphasis"><text:span text:style-name="T803">POSIX only requires support for at least priorities in the range 0 to 31</text:span></text:span></text:p></text:note-body></text:note></text:span></text:span><text:span text:style-name="Strong_20_Emphasis"><text:span text:style-name="T131">.</text:span></text:span></text:p>
      <text:p text:style-name="P112"><text:span text:style-name="Strong_20_Emphasis"><text:span text:style-name="T804"/></text:span></text:p>
      <text:p text:style-name="P112"><text:span text:style-name="Strong_20_Emphasis"><text:span text:style-name="T804">M</text:span></text:span><text:span text:style-name="Strong_20_Emphasis"><text:span text:style-name="T805">essage queues are created in a virtual filesystem </text:span></text:span><text:span text:style-name="Strong_20_Emphasis"><text:span text:style-name="T804">that </text:span></text:span><text:span text:style-name="Strong_20_Emphasis"><text:span text:style-name="T805">can be mounted using <text:s/>the </text:span></text:span><text:span text:style-name="Strong_20_Emphasis"><text:span text:style-name="T804">c</text:span></text:span><text:span text:style-name="Strong_20_Emphasis"><text:span text:style-name="T805">ommands:</text:span></text:span></text:p>
      <text:p text:style-name="P106"><text:span text:style-name="Strong_20_Emphasis"/></text:p>
      <table:table table:name="Table13" table:style-name="Table13">
        <table:table-column table:style-name="Table13.A"/>
        <table:table-row>
          <table:table-cell table:style-name="Table13.A1" office:value-type="string">
            <text:p text:style-name="P120"><text:span text:style-name="T806">[</text:span><text:a xlink:type="simple" xlink:href="mailto:linux@process" text:style-name="Internet_20_link" text:visited-style-name="Visited_20_Internet_20_Link"><text:span text:style-name="T806">linux@</text:span><text:span text:style-name="T807">ipc</text:span><text:span text:style-name="T806">]</text:span></text:a><text:span text:style-name="T808"> </text:span><text:span text:style-name="T809">sudo </text:span><text:span text:style-name="Strong_20_Emphasis"><text:span text:style-name="T805">mkdir /dev/mqueue</text:span></text:span></text:p>
            <text:p text:style-name="P120"><text:span text:style-name="Strong_20_Emphasis"><text:span text:style-name="T805"/></text:span></text:p>
            <text:p text:style-name="P120"><text:span text:style-name="Strong_20_Emphasis"><text:span text:style-name="T810">[</text:span></text:span><text:a xlink:type="simple" xlink:href="mailto:linux@process" text:style-name="Internet_20_link" text:visited-style-name="Visited_20_Internet_20_Link"><text:span text:style-name="Strong_20_Emphasis"><text:span text:style-name="T810">linux@</text:span></text:span><text:span text:style-name="Strong_20_Emphasis"><text:span text:style-name="T811">ipc</text:span></text:span><text:span text:style-name="Strong_20_Emphasis"><text:span text:style-name="T810">]</text:span></text:span></text:a><text:span text:style-name="Strong_20_Emphasis"><text:span text:style-name="T812"> </text:span></text:span><text:span text:style-name="Strong_20_Emphasis"><text:span text:style-name="T813">sudo </text:span></text:span><text:span text:style-name="Strong_20_Emphasis"><text:span text:style-name="T805">mount -t mqueue none /dev/mqueue</text:span></text:span></text:p>
          </table:table-cell>
        </table:table-row>
      </table:table>
      <text:p text:style-name="P106"/>
      <text:p text:style-name="P112"><text:span text:style-name="T814">On the mount directory t</text:span>he <text:span text:style-name="T211">sticky bit</text:span> is automatically enabled. <text:span text:style-name="T814">T</text:span>he message queues on the system can be viewed and manipulated using the commands usually used for files <text:span text:style-name="T814">such as </text:span><text:span text:style-name="Source_20_Text"><text:span text:style-name="T801">ls</text:span></text:span> and <text:span text:style-name="Source_20_Text"><text:span text:style-name="T801">rm</text:span></text:span>. <text:span text:style-name="T809">Each file consists in a single line containing information about the queue </text:span></text:p>
      <text:p text:style-name="P112"><text:span text:style-name="Strong_20_Emphasis"/></text:p>
      <table:table table:name="Table14" table:style-name="Table14">
        <table:table-column table:style-name="Table14.A"/>
        <table:table-row>
          <table:table-cell table:style-name="Table14.A1" office:value-type="string">
            <text:p text:style-name="P120"><text:span text:style-name="T806">[</text:span><text:a xlink:type="simple" xlink:href="mailto:linux@process" text:style-name="Internet_20_link" text:visited-style-name="Visited_20_Internet_20_Link"><text:span text:style-name="T806">linux@</text:span><text:span text:style-name="T807">ipc</text:span><text:span text:style-name="T806">]</text:span></text:a><text:span text:style-name="T808"> </text:span><text:span text:style-name="Strong_20_Emphasis"><text:span text:style-name="T805">cat /dev/mqueue/mymq</text:span></text:span></text:p>
            <text:p text:style-name="P120"><text:span text:style-name="Strong_20_Emphasis"><text:span text:style-name="T805"><text:s text:c="11"/>QSIZE:129 <text:s text:c="4"/>NOTIFY:2 <text:s text:c="3"/>SIGNO:0 <text:s text:c="3"/>NOTIFY_PID:8260</text:span></text:span></text:p>
          </table:table-cell>
        </table:table-row>
      </table:table>
      <text:p text:style-name="P106"><text:soft-page-break/></text:p>
      <text:p text:style-name="P121"><text:span text:style-name="Strong_20_Emphasis"><text:span text:style-name="T815"/></text:span></text:p>
      <text:p text:style-name="P121"><text:span text:style-name="Strong_20_Emphasis"><text:span text:style-name="T815">T</text:span></text:span><text:span text:style-name="Strong_20_Emphasis"><text:span text:style-name="T813">he fields are:</text:span></text:span></text:p>
      <text:p text:style-name="P121"><text:span text:style-name="Strong_20_Emphasis"><text:span text:style-name="T813"/></text:span></text:p>
      <text:p text:style-name="P106"><text:span text:style-name="Source_20_Text"><text:span text:style-name="T801">QSIZE</text:span></text:span></text:p>
      <text:p text:style-name="P121"><text:span text:style-name="Strong_20_Emphasis"><text:span text:style-name="T813"><text:tab/>Number of bytes of data in all messages in the queue</text:span></text:span></text:p>
      <text:p text:style-name="P121"><text:span text:style-name="Strong_20_Emphasis"><text:span text:style-name="T813"/></text:span></text:p>
      <text:p text:style-name="P106"><text:span text:style-name="Source_20_Text"><text:span text:style-name="T801">NOTIFY_PID</text:span></text:span></text:p>
      <text:p text:style-name="P106"><text:span text:style-name="Strong_20_Emphasis"><text:span text:style-name="T813"><text:tab/>If this is nonzero, then the process with this PID has used mq_notify to register for <text:tab/>asynchronous message notification, the remaining fields describe how notification occurs<text:line-break/><text:line-break/></text:span></text:span><text:span text:style-name="Source_20_Text"><text:span text:style-name="T801">NOTIFY</text:span></text:span></text:p>
      <text:p text:style-name="P106"><text:span text:style-name="Strong_20_Emphasis"><text:span text:style-name="T813"><text:tab/>Notification method:</text:span></text:span></text:p>
      <text:p text:style-name="P106"><text:span text:style-name="Strong_20_Emphasis"><text:span text:style-name="T813"><text:tab/>0 → <text:s/></text:span></text:span><text:span text:style-name="Source_20_Text"><text:span text:style-name="T801">SIGEV_SIGNAL</text:span></text:span></text:p>
      <text:p text:style-name="P106"><text:span text:style-name="Strong_20_Emphasis"><text:span text:style-name="T813"><text:tab/>1 → <text:s/></text:span></text:span><text:span text:style-name="Source_20_Text"><text:span text:style-name="T801">SIGEV_NONE</text:span></text:span></text:p>
      <text:p text:style-name="P106"><text:span text:style-name="Strong_20_Emphasis"><text:span text:style-name="T813"><text:tab/>2 → <text:s/></text:span></text:span><text:span text:style-name="Source_20_Text"><text:span text:style-name="T801">SIGEV_THREAD</text:span></text:span></text:p>
      <text:p text:style-name="P106"><text:span text:style-name="Strong_20_Emphasis"><text:span text:style-name="T816"/></text:span></text:p>
      <text:p text:style-name="P106"><text:span text:style-name="Source_20_Text"><text:span text:style-name="T801">SIGNO</text:span></text:span></text:p>
      <text:p text:style-name="P106"><text:span text:style-name="Strong_20_Emphasis"><text:span text:style-name="T813"><text:tab/>Signal number to be used for </text:span></text:span><text:span text:style-name="Source_20_Text"><text:span text:style-name="T801">SIGEV_SIGNAL</text:span></text:span></text:p>
      <text:p text:style-name="P121"><text:span text:style-name="Strong_20_Emphasis"><text:span text:style-name="T813"/></text:span></text:p>
      <text:p text:style-name="P106"/>
      <text:p text:style-name="P117"/>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text:soft-page-break/></text:p>
      <text:p text:style-name="P106"/>
      <text:p text:style-name="P106"/>
      <text:p text:style-name="P106"/>
      <text:p text:style-name="P116"><text:span text:style-name="Strong_20_Emphasis"><text:span text:style-name="T817">VI.</text:span></text:span><text:span text:style-name="Strong_20_Emphasis"><text:span text:style-name="T818">2</text:span></text:span><text:span text:style-name="Strong_20_Emphasis"><text:span text:style-name="T817">.</text:span></text:span><text:span text:style-name="Strong_20_Emphasis"><text:span text:style-name="T818">1</text:span></text:span><text:span text:style-name="Strong_20_Emphasis"><text:span text:style-name="T817"> </text:span></text:span><text:span text:style-name="Strong_20_Emphasis"><text:span text:style-name="T819">Create a</text:span></text:span><text:span text:style-name="Strong_20_Emphasis"><text:span text:style-name="T820"> m</text:span></text:span><text:span text:style-name="Strong_20_Emphasis"><text:span text:style-name="T821">essage queue: </text:span></text:span><text:span text:style-name="Strong_20_Emphasis"><text:span text:style-name="T822">mq_open</text:span></text:span><text:span text:style-name="Strong_20_Emphasis"><text:span text:style-name="T819">, </text:span></text:span><text:span text:style-name="Strong_20_Emphasis"><text:span text:style-name="T823">mq_close</text:span></text:span><text:span text:style-name="Strong_20_Emphasis"><text:span text:style-name="T819">, </text:span></text:span><text:span text:style-name="Strong_20_Emphasis"><text:span text:style-name="T823">mq_unlink</text:span></text:span></text:p>
      <text:p text:style-name="P113"/>
      <text:p text:style-name="P122">The library functions are implemented on top of underlying system calls as listed in the following table.<text:note text:id="ftn3" text:note-class="footnote"><text:note-citation>3</text:note-citation><text:note-body><text:p text:style-name="P123"><text:span text:style-name="T824">See the </text:span><text:span text:style-name="T825">mq_overview(7)</text:span><text:span text:style-name="T824"> </text:span><text:span text:style-name="T826">and </text:span><text:span text:style-name="T825">mqueue.h(7POSIX)</text:span><text:span text:style-name="T826"> manual pages</text:span></text:p></text:note-body></text:note></text:p>
      <text:p text:style-name="P122"/>
      <table:table table:name="Table21" table:style-name="Table21">
        <table:table-column table:style-name="Table21.A"/>
        <table:table-column table:style-name="Table21.B"/>
        <table:table-row>
          <table:table-cell table:style-name="Table21.A1" office:value-type="string">
            <text:p text:style-name="P124">Library interface <text:s text:c="3"/></text:p>
          </table:table-cell>
          <table:table-cell table:style-name="Table21.B1" office:value-type="string">
            <text:p text:style-name="P124">System call </text:p>
          </table:table-cell>
        </table:table-row>
        <table:table-row>
          <table:table-cell table:style-name="Table21.A2" office:value-type="string">
            <text:p text:style-name="P125"><text:span text:style-name="T827">mq_close</text:span>(3)</text:p>
          </table:table-cell>
          <table:table-cell table:style-name="Table21.B2" office:value-type="string">
            <text:p text:style-name="P121"><text:span text:style-name="T828">close</text:span><text:span text:style-name="T212">(2) </text:span></text:p>
          </table:table-cell>
        </table:table-row>
        <table:table-row>
          <table:table-cell table:style-name="Table21.A2" office:value-type="string">
            <text:p text:style-name="P121"><text:span text:style-name="T828">mq_getattr</text:span><text:span text:style-name="T212">(3) </text:span></text:p>
          </table:table-cell>
          <table:table-cell table:style-name="Table21.B2" office:value-type="string">
            <text:p text:style-name="P121"><text:span text:style-name="T828">mq_getsetattr</text:span><text:span text:style-name="T212">(2)</text:span></text:p>
          </table:table-cell>
        </table:table-row>
        <table:table-row>
          <table:table-cell table:style-name="Table21.A2" office:value-type="string">
            <text:p text:style-name="P121"><text:span text:style-name="T828">mq_notify</text:span><text:span text:style-name="T212">(3)</text:span></text:p>
          </table:table-cell>
          <table:table-cell table:style-name="Table21.B2" office:value-type="string">
            <text:p text:style-name="P121"><text:span text:style-name="T828">mq_notify</text:span><text:span text:style-name="T212">(2)</text:span></text:p>
          </table:table-cell>
        </table:table-row>
        <table:table-row>
          <table:table-cell table:style-name="Table21.A2" office:value-type="string">
            <text:p text:style-name="P121"><text:span text:style-name="T828">mq_open</text:span><text:span text:style-name="T212">(3)</text:span></text:p>
          </table:table-cell>
          <table:table-cell table:style-name="Table21.B2" office:value-type="string">
            <text:p text:style-name="P121"><text:span text:style-name="T828">mq_open</text:span><text:span text:style-name="T212">(2)</text:span></text:p>
          </table:table-cell>
        </table:table-row>
        <table:table-row>
          <table:table-cell table:style-name="Table21.A2" office:value-type="string">
            <text:p text:style-name="P121"><text:span text:style-name="T828">mq_receive</text:span><text:span text:style-name="T212">(3) </text:span></text:p>
          </table:table-cell>
          <table:table-cell table:style-name="Table21.B2" office:value-type="string">
            <text:p text:style-name="P121"><text:span text:style-name="T828">mq_timedreceive</text:span><text:span text:style-name="T212">(2)</text:span></text:p>
          </table:table-cell>
        </table:table-row>
        <table:table-row>
          <table:table-cell table:style-name="Table21.A2" office:value-type="string">
            <text:p text:style-name="P121"><text:span text:style-name="T828">mq_send</text:span><text:span text:style-name="T212">(3) <text:s/></text:span></text:p>
          </table:table-cell>
          <table:table-cell table:style-name="Table21.B2" office:value-type="string">
            <text:p text:style-name="P121"><text:span text:style-name="T828">mq_timedsend</text:span><text:span text:style-name="T212">(2)</text:span></text:p>
          </table:table-cell>
        </table:table-row>
        <table:table-row>
          <table:table-cell table:style-name="Table21.A2" office:value-type="string">
            <text:p text:style-name="P121"><text:span text:style-name="T828">mq_setattr</text:span><text:span text:style-name="T212">(3) </text:span></text:p>
          </table:table-cell>
          <table:table-cell table:style-name="Table21.B2" office:value-type="string">
            <text:p text:style-name="P121"><text:span text:style-name="T828">mq_getsetattr</text:span><text:span text:style-name="T212">(2)</text:span></text:p>
          </table:table-cell>
        </table:table-row>
        <table:table-row>
          <table:table-cell table:style-name="Table21.A2" office:value-type="string">
            <text:p text:style-name="P121"><text:span text:style-name="T828">mq_timedreceive</text:span><text:span text:style-name="T212">(3)</text:span></text:p>
          </table:table-cell>
          <table:table-cell table:style-name="Table21.B2" office:value-type="string">
            <text:p text:style-name="P121"><text:span text:style-name="T828">mq_timedreceive</text:span><text:span text:style-name="T212">(2)</text:span></text:p>
          </table:table-cell>
        </table:table-row>
        <table:table-row>
          <table:table-cell table:style-name="Table21.A2" office:value-type="string">
            <text:p text:style-name="P121"><text:span text:style-name="T828">mq_timedsend</text:span><text:span text:style-name="T212">(3)</text:span> </text:p>
          </table:table-cell>
          <table:table-cell table:style-name="Table21.B2" office:value-type="string">
            <text:p text:style-name="P121"><text:span text:style-name="T828">mq_timedsend</text:span><text:span text:style-name="T212">(2) </text:span></text:p>
          </table:table-cell>
        </table:table-row>
        <table:table-row table:style-name="Table21.11">
          <table:table-cell table:style-name="Table21.A2" office:value-type="string">
            <text:p text:style-name="P121"><text:span text:style-name="T828">mq_unlink</text:span><text:span text:style-name="T212">(3)</text:span></text:p>
          </table:table-cell>
          <table:table-cell table:style-name="Table21.B2" office:value-type="string">
            <text:p text:style-name="P121"><text:span text:style-name="T828">mq_unlink</text:span><text:span text:style-name="T212">(2)</text:span></text:p>
          </table:table-cell>
        </table:table-row>
      </table:table>
      <text:p text:style-name="P106"><text:span text:style-name="Source_20_Text"/></text:p>
      <text:p text:style-name="P116"><text:span text:style-name="Source_20_Text"><text:span text:style-name="T829">Tab </text:span></text:span><text:span text:style-name="Source_20_Text"><text:span text:style-name="T830">3</text:span></text:span><text:span text:style-name="Source_20_Text"><text:span text:style-name="T829">.</text:span></text:span><text:span text:style-name="Source_20_Text"><text:span text:style-name="T831"> </text:span></text:span><text:span text:style-name="Source_20_Text"><text:span text:style-name="T832">POSIX </text:span></text:span><text:span text:style-name="Source_20_Text"><text:span text:style-name="T831">Message queues </text:span></text:span><text:span text:style-name="Source_20_Text"><text:span text:style-name="T832">library functions</text:span></text:span></text:p>
      <text:p text:style-name="P106"/>
      <text:p text:style-name="P106"/>
      <text:p text:style-name="P106"><text:span text:style-name="T802">To create/open a message queue we can use the </text:span><text:span text:style-name="Source_20_Text"><text:span text:style-name="T801">mq_open</text:span></text:span><text:span text:style-name="Source_20_Text"><text:span text:style-name="T801"><text:note text:id="ftn4" text:note-class="footnote"><text:note-citation>4</text:note-citation><text:note-body><text:p text:style-name="P126">See the <text:span text:style-name="T212">mq_open(</text:span><text:span text:style-name="T833">3</text:span><text:span text:style-name="T212">)</text:span> manual page</text:p></text:note-body></text:note></text:span></text:span><text:span text:style-name="T802"> function.</text:span></text:p>
      <text:p text:style-name="P127"/>
      <table:table table:name="Table15" table:style-name="Table15">
        <table:table-column table:style-name="Table15.A"/>
        <table:table-row>
          <table:table-cell table:style-name="Table15.A1" office:value-type="string">
            <text:p text:style-name="P128"><text:span text:style-name="T834">#include </text:span><text:span text:style-name="T835">&lt;fcntl.h&gt;</text:span><text:span text:style-name="T834"> </text:span></text:p>
            <text:p text:style-name="P129"><text:span text:style-name="T834">#include </text:span><text:span text:style-name="T835">&lt;sys/stat.h&gt;</text:span><text:span text:style-name="T834"> </text:span></text:p>
            <text:p text:style-name="P129"><text:span text:style-name="T834">#include </text:span><text:span text:style-name="T835">&lt;mqueue.h&gt;</text:span></text:p>
            <text:p text:style-name="P130"/>
            <text:p text:style-name="P131"><text:span text:style-name="T836">mqd_t</text:span><text:span text:style-name="T837"> </text:span><text:span text:style-name="T838">mq_open</text:span><text:span text:style-name="T837">(</text:span><text:span text:style-name="T836">const</text:span><text:span text:style-name="T837"> </text:span><text:span text:style-name="T836">char</text:span><text:span text:style-name="T837"> </text:span><text:span text:style-name="T839">*name</text:span><text:span text:style-name="T837">, </text:span><text:span text:style-name="T836">int</text:span><text:span text:style-name="T837"> </text:span><text:span text:style-name="T839">oflag</text:span><text:span text:style-name="T837">);</text:span></text:p>
            <text:p text:style-name="P129"/>
            <text:p text:style-name="P131"><text:span text:style-name="T836">mqd_t</text:span><text:span text:style-name="T837"> </text:span><text:span text:style-name="T838">mq_open</text:span><text:span text:style-name="T837">(</text:span><text:span text:style-name="T836">const</text:span><text:span text:style-name="T837"> </text:span><text:span text:style-name="T836">char</text:span><text:span text:style-name="T837"> </text:span><text:span text:style-name="T839">*name</text:span><text:span text:style-name="T837">, </text:span><text:span text:style-name="T836">int</text:span><text:span text:style-name="T837"> </text:span><text:span text:style-name="T839">oflag</text:span><text:span text:style-name="T837">, </text:span><text:span text:style-name="T836">mode_t</text:span><text:span text:style-name="T837"> </text:span><text:span text:style-name="T839">mode</text:span><text:span text:style-name="T837">, </text:span><text:span text:style-name="T836">struct</text:span><text:span text:style-name="T837"> </text:span><text:span text:style-name="T836">mq_attr</text:span></text:p>
            <text:p text:style-name="P132"><text:span text:style-name="T840"><text:s text:c="14"/>*attr</text:span><text:span text:style-name="T841">);</text:span></text:p>
            <text:p text:style-name="P129"/>
            <text:p text:style-name="P133">Return: a message queue descriptor, on error (mqd_t) –1 and errno is set</text:p>
          </table:table-cell>
        </table:table-row>
      </table:table>
      <text:p text:style-name="P127"/>
      <text:p text:style-name="P106"><text:span text:style-name="T802">The </text:span><text:span text:style-name="Source_20_Text"><text:span text:style-name="T801">mq_open</text:span></text:span><text:span text:style-name="T131"> </text:span><text:span text:style-name="T802">function</text:span><text:span text:style-name="T131"> creates a new </text:span><text:span text:style-name="T802">m</text:span><text:span text:style-name="T131">essage queue or opens an existing queue. The queue is identified by </text:span><text:span text:style-name="Source_20_Text"><text:span text:style-name="T801">name</text:span></text:span><text:span text:style-name="T131">. <text:tab/></text:span></text:p>
      <text:p text:style-name="P113"/>
      <text:p text:style-name="P106"><text:span text:style-name="T842">The </text:span><text:span text:style-name="Source_20_Text"><text:span text:style-name="T801">oflag</text:span></text:span><text:span text:style-name="T842"> argument specifies the flags that control the operation as in </text:span><text:span text:style-name="Source_20_Text"><text:span text:style-name="T801">open</text:span></text:span><text:span text:style-name="T842">, and exactly only one flag must be specified.</text:span></text:p>
      <text:p text:style-name="P106"><text:soft-page-break/><text:span text:style-name="T842">The </text:span><text:span text:style-name="Source_20_Text"><text:span text:style-name="T801">mode</text:span></text:span><text:span text:style-name="T842"> argument, in the case of </text:span><text:span text:style-name="Source_20_Text"><text:span text:style-name="T801">O_CREAT</text:span></text:span><text:span text:style-name="T842">, specifies the permissions for the new queue.</text:span></text:p>
      <text:p text:style-name="P134"/>
      <text:p text:style-name="P106"><text:span text:style-name="T842">The </text:span><text:span text:style-name="Source_20_Text"><text:span text:style-name="T801">attr</text:span></text:span><text:span text:style-name="T842"> argument is a structure defined as follows</text:span></text:p>
      <text:p text:style-name="P134"/>
      <text:p text:style-name="P134"/>
      <table:table table:name="Table16" table:style-name="Table16">
        <table:table-column table:style-name="Table16.A"/>
        <table:table-row>
          <table:table-cell table:style-name="Table16.A1" office:value-type="string">
            <text:p text:style-name="P128"><text:span text:style-name="T834">struct</text:span> mq_attr {</text:p>
            <text:p text:style-name="P129"><text:span text:style-name="T834"><text:s text:c="3"/>long</text:span> mq_flags;<text:span text:style-name="T843"> <text:s text:c="4"/>/* Flags (ignored for mq_open()) */</text:span></text:p>
            <text:p text:style-name="P129"><text:span text:style-name="T834"><text:s text:c="3"/>long</text:span> mq_maxmsg;<text:span text:style-name="T843"> <text:s text:c="3"/>/* Max. # of messages on queue */</text:span></text:p>
            <text:p text:style-name="P129"><text:span text:style-name="T834"><text:s text:c="3"/>long</text:span> mq_msgsize;<text:span text:style-name="T843"> <text:s text:c="2"/>/* Max. message size (bytes) */</text:span></text:p>
            <text:p text:style-name="P129"><text:span text:style-name="T834"><text:s text:c="3"/>long</text:span> mq_curmsgs;<text:span text:style-name="T843"> <text:s text:c="2"/>/* # of messages currently in queue ignored for</text:span></text:p>
            <text:p text:style-name="P135"><text:s text:c="25"/>mq_open() */</text:p>
            <text:p text:style-name="P129">};</text:p>
          </table:table-cell>
        </table:table-row>
      </table:table>
      <text:p text:style-name="P134"/>
      <text:p text:style-name="P106"><text:span text:style-name="T842">When calling </text:span><text:span text:style-name="Source_20_Text"><text:span text:style-name="T801">mq_open</text:span></text:span><text:span text:style-name="T842">, only </text:span><text:span text:style-name="Source_20_Text"><text:span text:style-name="T801">mq_maxmsg</text:span></text:span><text:span text:style-name="T842"> and </text:span><text:span text:style-name="Source_20_Text"><text:span text:style-name="T801">mq_msgsize</text:span></text:span><text:span text:style-name="T842"> are employed, the other fields are ignored. If </text:span><text:span text:style-name="Source_20_Text"><text:span text:style-name="T801">attr</text:span></text:span><text:span text:style-name="T842"> is </text:span><text:span text:style-name="Source_20_Text"><text:span text:style-name="T801">NULL</text:span></text:span><text:span text:style-name="T842">, then the queue is created with implementation-defined default attributes.</text:span></text:p>
      <text:p text:style-name="P106"/>
      <text:p text:style-name="P106"><text:span text:style-name="T844">A descriptor returned by </text:span><text:span text:style-name="Source_20_Text"><text:span text:style-name="T212">mq_open</text:span></text:span><text:span text:style-name="T844"> has the </text:span><text:span text:style-name="T845">close-on-exec</text:span><text:span text:style-name="T844"> flag automatically set.</text:span></text:p>
      <text:p text:style-name="P134"/>
      <text:p text:style-name="P136">To close a message queue we can use <text:span text:style-name="T212">mq_close</text:span><text:span text:style-name="T212"><text:note text:id="ftn5" text:note-class="footnote"><text:note-citation>5</text:note-citation><text:note-body><text:p text:style-name="P137">See the <text:span text:style-name="T212">mq_close(</text:span><text:span text:style-name="T833">3</text:span><text:span text:style-name="T212">)</text:span> manual page</text:p></text:note-body></text:note></text:span>.</text:p>
      <text:p text:style-name="P136"/>
      <table:table table:name="Table17" table:style-name="Table17">
        <table:table-column table:style-name="Table17.A"/>
        <table:table-row>
          <table:table-cell table:style-name="Table17.A1" office:value-type="string">
            <text:p text:style-name="P138"><text:span text:style-name="T846">#include </text:span><text:span text:style-name="T847">&lt;mqueue.h&gt;</text:span></text:p>
            <text:p text:style-name="P138"/>
            <text:p text:style-name="P106"><text:span text:style-name="T848">int</text:span><text:span text:style-name="T849"> </text:span><text:span text:style-name="T850">mq_close</text:span><text:span text:style-name="T849">(</text:span><text:span text:style-name="T848">mqd_t</text:span><text:span text:style-name="T849"> </text:span><text:span text:style-name="T851">mqdes</text:span><text:span text:style-name="T849">);</text:span></text:p>
            <text:p text:style-name="P138"/>
            <text:p text:style-name="P139">Returns: 0 on success, -1 on error and errno is set</text:p>
          </table:table-cell>
        </table:table-row>
      </table:table>
      <text:p text:style-name="P136"/>
      <text:p text:style-name="P106"><text:span text:style-name="T852">The</text:span><text:span text:style-name="T842"> </text:span><text:span text:style-name="T853">mq_close</text:span><text:span text:style-name="T842"> </text:span><text:span text:style-name="T852">function</text:span><text:span text:style-name="T842"> closes the message queue descriptor </text:span><text:span text:style-name="T853">mqdes</text:span><text:span text:style-name="T842">. If the calling process has attached a notification request (</text:span><text:span text:style-name="T853">mq_notify</text:span><text:span text:style-name="T842">) to this message queue via </text:span><text:span text:style-name="T853">mqdes</text:span><text:span text:style-name="T842">, then this request is removed.</text:span></text:p>
      <text:p text:style-name="P134"/>
      <text:p text:style-name="P106"><text:span text:style-name="T854">To remove a message queue we can use </text:span><text:span text:style-name="T853">mq_unlink</text:span><text:span text:style-name="T853"><text:note text:id="ftn6" text:note-class="footnote"><text:note-citation>6</text:note-citation><text:note-body><text:p text:style-name="P140"><text:span text:style-name="T855">See the </text:span><text:span text:style-name="T856">mq_unlink(</text:span><text:span text:style-name="T857">3</text:span><text:span text:style-name="T856">)</text:span><text:span text:style-name="T855"> manul page</text:span></text:p></text:note-body></text:note></text:span><text:span text:style-name="T854">.</text:span></text:p>
      <text:p text:style-name="P136"/>
      <table:table table:name="Table18" table:style-name="Table18">
        <table:table-column table:style-name="Table18.A"/>
        <table:table-row>
          <table:table-cell table:style-name="Table18.A1" office:value-type="string">
            <text:p text:style-name="P138"><text:span text:style-name="T846">#include </text:span><text:span text:style-name="T847">&lt;mqueue.h&gt;</text:span></text:p>
            <text:p text:style-name="P138"/>
            <text:p text:style-name="P106"><text:span text:style-name="T836">int</text:span><text:span text:style-name="T837"> </text:span><text:span text:style-name="T850">mq_unlink</text:span><text:span text:style-name="T837">(</text:span><text:span text:style-name="T836">const</text:span><text:span text:style-name="T837"> </text:span><text:span text:style-name="T836">char</text:span><text:span text:style-name="T837"> </text:span><text:span text:style-name="T839">*name</text:span><text:span text:style-name="T837">);</text:span></text:p>
            <text:p text:style-name="P138"/>
            <text:p text:style-name="P139">Returns: 0 on success, -1 on error and errno is set</text:p>
          </table:table-cell>
        </table:table-row>
      </table:table>
      <text:p text:style-name="P141"/>
      <text:p text:style-name="P106"><text:span text:style-name="T858">The </text:span><text:span text:style-name="T853">mq_unlink</text:span><text:span text:style-name="T854"> </text:span><text:span text:style-name="T858">function</text:span><text:span text:style-name="T854"> removes the specified message queue name. The message queue name is removed immediately. <text:s/>The queue itself is destroyed once any other processes that have the queue open close their descriptors referring to the queue.</text:span></text:p>
      <text:p text:style-name="P141"/>
      <text:p text:style-name="P141"/>
      <text:p text:style-name="P141"/>
      <text:p text:style-name="P141"/>
      <text:p text:style-name="P141"/>
      <text:p text:style-name="P141"/>
      <text:p text:style-name="P141"><text:soft-page-break/></text:p>
      <text:p text:style-name="P141"/>
      <text:p text:style-name="P141"/>
      <text:p text:style-name="P141"/>
      <text:p text:style-name="P141"/>
      <text:p text:style-name="P141"/>
      <text:p text:style-name="P141"/>
      <text:p text:style-name="P116"><text:span text:style-name="Strong_20_Emphasis"><text:span text:style-name="T817">VI.</text:span></text:span><text:span text:style-name="Strong_20_Emphasis"><text:span text:style-name="T818">2</text:span></text:span><text:span text:style-name="Strong_20_Emphasis"><text:span text:style-name="T817">.</text:span></text:span><text:span text:style-name="Strong_20_Emphasis"><text:span text:style-name="T818">2</text:span></text:span><text:span text:style-name="Strong_20_Emphasis"><text:span text:style-name="T817"> </text:span></text:span><text:span text:style-name="T859">Send and receive messages: </text:span><text:span text:style-name="T860">mq_send</text:span><text:span text:style-name="T859"> and </text:span><text:span text:style-name="T860">mq_receive</text:span></text:p>
      <text:p text:style-name="P141"/>
      <text:p text:style-name="P142">To send a message to a message queue we can use the <text:span text:style-name="T212">mq_send</text:span><text:span text:style-name="T212"><text:note text:id="ftn7" text:note-class="footnote"><text:note-citation>7</text:note-citation><text:note-body><text:p text:style-name="P143"><text:span text:style-name="T861">See the </text:span><text:span text:style-name="T856">mq_send(</text:span><text:span text:style-name="T857">3</text:span><text:span text:style-name="T856">)</text:span><text:span text:style-name="T861"> manual page </text:span></text:p></text:note-body></text:note></text:span> function, defined as follows. </text:p>
      <text:p text:style-name="P142"/>
      <table:table table:name="Table19" table:style-name="Table19">
        <table:table-column table:style-name="Table19.A"/>
        <table:table-row>
          <table:table-cell table:style-name="Table19.A1" office:value-type="string">
            <text:p text:style-name="P129"><text:span text:style-name="T834">#include </text:span><text:span text:style-name="T835">&lt;mqueue.h&gt;</text:span></text:p>
            <text:p text:style-name="P129"><text:span text:style-name="T834">#include </text:span><text:span text:style-name="T835">&lt;time.h&gt;</text:span></text:p>
            <text:p text:style-name="P130"/>
            <text:p text:style-name="P131"><text:span text:style-name="T836">int</text:span><text:span text:style-name="T837"> </text:span><text:span text:style-name="T838">mq_send</text:span><text:span text:style-name="T837">(</text:span><text:span text:style-name="T836">mqd_t</text:span><text:span text:style-name="T837"> </text:span><text:span text:style-name="T839">mqdes</text:span><text:span text:style-name="T837">, </text:span><text:span text:style-name="T836">const</text:span><text:span text:style-name="T837"> </text:span><text:span text:style-name="T836">char</text:span><text:span text:style-name="T837"> </text:span><text:span text:style-name="T839">msg_ptr[msg_len]</text:span><text:span text:style-name="T837">, </text:span><text:span text:style-name="T836">size_t</text:span><text:span text:style-name="T837"> </text:span><text:span text:style-name="T839">msg_len</text:span><text:span text:style-name="T837">,</text:span></text:p>
            <text:p text:style-name="P129"><text:span text:style-name="T834"><text:s text:c="12"/>unsigned</text:span> <text:span text:style-name="T834">int </text:span><text:span text:style-name="T211">msg_prio</text:span>);</text:p>
            <text:p text:style-name="P130"/>
            <text:p text:style-name="P131"><text:span text:style-name="T836">int</text:span><text:span text:style-name="T837"> </text:span><text:span text:style-name="T838">mq_timedsend</text:span><text:span text:style-name="T837">(</text:span><text:span text:style-name="T836">mqd_t</text:span><text:span text:style-name="T837"> </text:span><text:span text:style-name="T839">mqdes</text:span><text:span text:style-name="T837">, </text:span><text:span text:style-name="T836">const</text:span><text:span text:style-name="T837"> </text:span><text:span text:style-name="T836">char</text:span><text:span text:style-name="T837"> </text:span><text:span text:style-name="T839">msg_ptr[msg_len]</text:span><text:span text:style-name="T837">, </text:span><text:span text:style-name="T836">size_t</text:span></text:p>
            <text:p text:style-name="P131"><text:span text:style-name="T837"><text:s text:c="17"/></text:span><text:span text:style-name="T839">msg_len</text:span><text:span text:style-name="T837">, </text:span><text:span text:style-name="T836">unsigned</text:span><text:span text:style-name="T837"> </text:span><text:span text:style-name="T836">int </text:span><text:span text:style-name="T839">msg_prio</text:span><text:span text:style-name="T837">, </text:span><text:span text:style-name="T836">const</text:span><text:span text:style-name="T837"> </text:span><text:span text:style-name="T836">struct</text:span><text:span text:style-name="T837"> </text:span><text:span text:style-name="T836">timespec</text:span></text:p>
            <text:p text:style-name="P129"><text:s text:c="17"/><text:span text:style-name="T211">*abs_timeout</text:span>);</text:p>
            <text:p text:style-name="P144"/>
            <text:p text:style-name="P145">Return: on success 0, on error -1 and errno is set</text:p>
          </table:table-cell>
        </table:table-row>
      </table:table>
      <text:p text:style-name="P142"/>
      <text:p text:style-name="P112"><text:span text:style-name="T862">The </text:span><text:span text:style-name="Source_20_Text"><text:span text:style-name="T863">mq_send</text:span></text:span><text:span text:style-name="T862"> function inserts the message pointed to by </text:span><text:span text:style-name="Source_20_Text"><text:span text:style-name="T863">msg_ptr</text:span></text:span><text:span text:style-name="T862"> into the message queue identified by the descriptor </text:span><text:span text:style-name="Source_20_Text"><text:span text:style-name="T863">mqdes</text:span></text:span><text:span text:style-name="T862">. The </text:span><text:span text:style-name="Source_20_Text"><text:span text:style-name="T863">msg_len</text:span></text:span><text:span text:style-name="T862"> argument specifies the size of the message and must be less than or equal to the queue’s </text:span><text:span text:style-name="Source_20_Text"><text:span text:style-name="T863">mq_msgsize</text:span></text:span><text:span text:style-name="T862"> attribute. Messages of zero length are permitted.</text:span></text:p>
      <text:p text:style-name="P112"><text:span text:style-name="T862">The </text:span><text:span text:style-name="Source_20_Text"><text:span text:style-name="T863">msg_prio</text:span></text:span><text:span text:style-name="T862"> argument specifies the message priority as a nonnegative integer. Messages are ordered in the queue by decreasing priority; messages with the same priority are delivered in FIFO order, with newer messages placed after older ones.</text:span></text:p>
      <text:p text:style-name="P112"><text:span text:style-name="T862">If the queue is full (i.e., the number of messages equals the </text:span><text:span text:style-name="Source_20_Text"><text:span text:style-name="T863">mq_maxmsg</text:span></text:span><text:span text:style-name="T862"> limit), the default behavior of </text:span><text:span text:style-name="Source_20_Text"><text:span text:style-name="T863">mq_send</text:span></text:span><text:span text:style-name="T862"> is to block until space becomes available or the call is interrupted by a signal. If the </text:span><text:span text:style-name="Source_20_Text"><text:span text:style-name="T863">O_NONBLOCK</text:span></text:span><text:span text:style-name="T862"> flag is set for the queue, the call does not block and instead fails immediately with the error </text:span><text:span text:style-name="Source_20_Text"><text:span text:style-name="T863">EAGAIN</text:span></text:span><text:span text:style-name="T862">.</text:span></text:p>
      <text:p text:style-name="P112"><text:span text:style-name="T862">The </text:span><text:span text:style-name="Source_20_Text"><text:span text:style-name="T863">mq_timedsend</text:span></text:span><text:span text:style-name="T862"> function behaves similarly to </text:span><text:span text:style-name="Source_20_Text"><text:span text:style-name="T863">mq_send</text:span></text:span><text:span text:style-name="T862">, but allows a timeout to be specified. If the queue is full and </text:span><text:span text:style-name="Source_20_Text"><text:span text:style-name="T863">O_NONBLOCK</text:span></text:span><text:span text:style-name="T862"> is not set, the call blocks only until the absolute timeout specified by </text:span><text:span text:style-name="Source_20_Text"><text:span text:style-name="T863">abs_timeout</text:span></text:span><text:span text:style-name="T862"> is reached. </text:span></text:p>
      <text:p text:style-name="P112"><text:span text:style-name="T862">If the timeout has already expired at the time of the call, </text:span><text:span text:style-name="Source_20_Text"><text:span text:style-name="T863">mq_timedsend</text:span></text:span><text:span text:style-name="T862"> returns immediately without sending the message.</text:span></text:p>
      <text:p text:style-name="P146"/>
      <text:p text:style-name="P112"><text:span text:style-name="T864">To receive a message from the message queue we can use the </text:span><text:span text:style-name="Source_20_Text"><text:span text:style-name="T863">mq_receive</text:span></text:span><text:span text:style-name="Source_20_Text"><text:span text:style-name="T863"><text:note text:id="ftn8" text:note-class="footnote"><text:note-citation>8</text:note-citation><text:note-body><text:p text:style-name="P147">See the <text:span text:style-name="T212">mq_receive(</text:span><text:span text:style-name="T833">3</text:span><text:span text:style-name="T212">)</text:span> manual page</text:p></text:note-body></text:note></text:span></text:span><text:span text:style-name="T864"> function, defined as follows</text:span></text:p>
      <text:p text:style-name="P148"/>
      <table:table table:name="Table20" table:style-name="Table20">
        <table:table-column table:style-name="Table20.A"/>
        <table:table-row>
          <table:table-cell table:style-name="Table20.A1" office:value-type="string">
            <text:p text:style-name="P128"><text:span text:style-name="T834">#include </text:span><text:span text:style-name="T835">&lt;mqueue.h&gt;</text:span></text:p>
            <text:p text:style-name="P129"><text:span text:style-name="T834">#include </text:span><text:span text:style-name="T835">&lt;time.h&gt;</text:span></text:p>
            <text:p text:style-name="P130"/>
            <text:p text:style-name="P131"><text:soft-page-break/><text:span text:style-name="T836">ssize_t</text:span><text:span text:style-name="T837"> </text:span><text:span text:style-name="T838">mq_receive</text:span><text:span text:style-name="T837">(</text:span><text:span text:style-name="T836">mqd_t</text:span><text:span text:style-name="T837"> </text:span><text:span text:style-name="T839">mqdes</text:span><text:span text:style-name="T837">, </text:span><text:span text:style-name="T836">char</text:span><text:span text:style-name="T837"> </text:span><text:span text:style-name="T839">msg_ptr[msg_len]</text:span><text:span text:style-name="T837">, </text:span><text:span text:style-name="T836">size_t</text:span><text:span text:style-name="T837"> </text:span><text:span text:style-name="T839">msg_len</text:span><text:span text:style-name="T837">,</text:span></text:p>
            <text:p text:style-name="P131"><text:span text:style-name="T837"><text:s text:c="19"/></text:span><text:span text:style-name="T836">unsigned</text:span><text:span text:style-name="T837"> </text:span><text:span text:style-name="T836">int</text:span><text:span text:style-name="T837"> </text:span><text:span text:style-name="T839">*msg_prio</text:span><text:span text:style-name="T837">);</text:span></text:p>
            <text:p text:style-name="P130"/>
            <text:p text:style-name="P131"><text:span text:style-name="T836">ssize_t</text:span><text:span text:style-name="T837"> </text:span><text:span text:style-name="T838">mq_timedreceive</text:span><text:span text:style-name="T837">(</text:span><text:span text:style-name="T836">mqd_t</text:span><text:span text:style-name="T837"> </text:span><text:span text:style-name="T839">mqdes</text:span><text:span text:style-name="T837">, </text:span><text:span text:style-name="T836">char</text:span><text:span text:style-name="T837"> *</text:span><text:span text:style-name="T836">restrict</text:span><text:span text:style-name="T837"> </text:span><text:span text:style-name="T839">msg_ptr[msg_len]</text:span><text:span text:style-name="T837">,</text:span></text:p>
            <text:p text:style-name="P131"><text:span text:style-name="T837"><text:s text:c="24"/></text:span><text:span text:style-name="T836">size_t</text:span><text:span text:style-name="T837"> </text:span><text:span text:style-name="T839">msg_len</text:span><text:span text:style-name="T837">, </text:span><text:span text:style-name="T836">unsigned</text:span><text:span text:style-name="T837"> </text:span><text:span text:style-name="T836">int</text:span><text:span text:style-name="T837"> *</text:span><text:span text:style-name="T836">restrict</text:span><text:span text:style-name="T837"> </text:span><text:span text:style-name="T839">msg_prio</text:span><text:span text:style-name="T837">,</text:span></text:p>
            <text:p text:style-name="P131"><text:span text:style-name="T836"><text:s text:c="24"/>const</text:span><text:span text:style-name="T837"> </text:span><text:span text:style-name="T836">struct</text:span><text:span text:style-name="T837"> </text:span><text:span text:style-name="T836">timespec</text:span><text:span text:style-name="T837"> *</text:span><text:span text:style-name="T836">restrict</text:span><text:span text:style-name="T837"> </text:span><text:span text:style-name="T839">abs_timeout</text:span><text:span text:style-name="T837">);</text:span></text:p>
            <text:p text:style-name="P145"/>
            <text:p text:style-name="P145">Return: the number of bytes in the received message, on error -1 and errno</text:p>
          </table:table-cell>
        </table:table-row>
      </table:table>
      <text:p text:style-name="P148"/>
      <text:p text:style-name="P112"><text:span text:style-name="T864">The </text:span><text:span text:style-name="Source_20_Text"><text:span text:style-name="T863">mq_receive</text:span></text:span><text:span text:style-name="T864"> function retrieves and removes the </text:span><text:span text:style-name="Strong_20_Emphasis"><text:span text:style-name="T864">oldest message with the highest priority</text:span></text:span><text:span text:style-name="T864"> from the message queue identified by the descriptor </text:span><text:span text:style-name="Source_20_Text"><text:span text:style-name="T863">mqdes</text:span></text:span><text:span text:style-name="T864">, and stores it in the buffer pointed to by </text:span><text:span text:style-name="Source_20_Text"><text:span text:style-name="T863">msg_ptr</text:span></text:span><text:span text:style-name="T864">. The </text:span><text:span text:style-name="Source_20_Text"><text:span text:style-name="T863">msg_len</text:span></text:span><text:span text:style-name="T864"> argument specifies the size of this buffer and must be greater than or equal to the queue’s </text:span><text:span text:style-name="Source_20_Text"><text:span text:style-name="T863">mq_msgsize</text:span></text:span><text:span text:style-name="T864"> attribute.</text:span></text:p>
      <text:p text:style-name="P112"><text:span text:style-name="T864">If </text:span><text:span text:style-name="Source_20_Text"><text:span text:style-name="T863">msg_prio</text:span></text:span><text:span text:style-name="T864"> is not </text:span><text:span text:style-name="Source_20_Text"><text:span text:style-name="T863">NULL</text:span></text:span><text:span text:style-name="T864">, it is used to return the priority of the received message.</text:span></text:p>
      <text:p text:style-name="P112"><text:span text:style-name="T864">If the queue is empty, the default behavior of </text:span><text:span text:style-name="Source_20_Text"><text:span text:style-name="T863">mq_receive</text:span></text:span><text:span text:style-name="T864"> is to block until a message becomes available or the call is interrupted by a signal. If the </text:span><text:span text:style-name="Source_20_Text"><text:span text:style-name="T863">O_NONBLOCK</text:span></text:span><text:span text:style-name="T864"> flag is set, the function does not block and instead fails immediately with the error </text:span><text:span text:style-name="Source_20_Text"><text:span text:style-name="T863">EAGAIN</text:span></text:span><text:span text:style-name="T864">.</text:span></text:p>
      <text:p text:style-name="P148"/>
      <text:p text:style-name="P112"><text:span text:style-name="T864">The </text:span><text:span text:style-name="Source_20_Text"><text:span text:style-name="T863">mq_timedreceive</text:span></text:span><text:span text:style-name="T864"> function behaves similarly to </text:span><text:span text:style-name="Source_20_Text"><text:span text:style-name="T863">mq_receive</text:span></text:span><text:span text:style-name="T864">, but allows a timeout to be specified. If the queue is empty and </text:span><text:span text:style-name="Source_20_Text"><text:span text:style-name="T863">O_NONBLOCK</text:span></text:span><text:span text:style-name="T864"> is not set, the call blocks only until the absolute timeout specified by </text:span><text:span text:style-name="Source_20_Text"><text:span text:style-name="T863">abs_timeout</text:span></text:span><text:span text:style-name="T864">. </text:span></text:p>
      <text:p text:style-name="P112"><text:span text:style-name="T864">If no message is available and the timeout has already expired at the time of the call, </text:span><text:span text:style-name="Source_20_Text"><text:span text:style-name="T863">mq_timedreceive</text:span></text:span><text:span text:style-name="T864"> returns immediately.</text:span></text:p>
      <text:p text:style-name="P142"/>
      <text:p text:style-name="P112"><text:span text:style-name="T865">The </text:span><text:span text:style-name="T866">mq_send.c</text:span><text:span text:style-name="T865"> and </text:span><text:span text:style-name="T866">mq_recv.c</text:span><text:span text:style-name="T865"> programs uses a POSIX message queue. </text:span><text:span text:style-name="T866">mq_recv.c</text:span><text:span text:style-name="T865"> waits for a message to be received, </text:span><text:span text:style-name="T866">mq_send.c</text:span><text:span text:style-name="T865"> sends the message inserted by the user.</text:span></text:p>
      <text:p text:style-name="P149"><text:span text:style-name="T867"/></text:p>
      <text:p text:style-name="P150"/>
      <text:p text:style-name="P121"><text:span text:style-name="Strong_20_Emphasis"><text:span text:style-name="T868">1 </text:span></text:span><text:span text:style-name="Strong_20_Emphasis"><text:span text:style-name="T869">#include </text:span></text:span><text:span text:style-name="Strong_20_Emphasis"><text:span text:style-name="T870">&lt;stdio.h&gt;</text:span></text:span></text:p>
      <text:p text:style-name="P129"><text:span text:style-name="Strong_20_Emphasis"><text:span text:style-name="T871">2 </text:span></text:span><text:span text:style-name="T834">#include </text:span><text:span text:style-name="T835">&lt;stdlib.h&gt;</text:span></text:p>
      <text:p text:style-name="P129"><text:span text:style-name="Strong_20_Emphasis"><text:span text:style-name="T871">3 </text:span></text:span><text:span text:style-name="T834">#include </text:span><text:span text:style-name="T835">&lt;mqueue.h&gt;</text:span></text:p>
      <text:p text:style-name="P129"><text:span text:style-name="Strong_20_Emphasis"><text:span text:style-name="T871">4 </text:span></text:span><text:span text:style-name="T834">#include </text:span><text:span text:style-name="T835">&lt;fcntl.h&gt;</text:span></text:p>
      <text:p text:style-name="P129"><text:span text:style-name="Strong_20_Emphasis"><text:span text:style-name="T871">5 </text:span></text:span><text:span text:style-name="T834">#include </text:span><text:span text:style-name="T835">&lt;sys/stat.h&gt;</text:span></text:p>
      <text:p text:style-name="P130"/>
      <text:p text:style-name="P129"><text:span text:style-name="Strong_20_Emphasis"><text:span text:style-name="T871">6 </text:span></text:span><text:span text:style-name="T834">#define QUEUE_NAME </text:span><text:span text:style-name="T835">"/myqueue"</text:span></text:p>
      <text:p text:style-name="P129"><text:span text:style-name="Strong_20_Emphasis"><text:span text:style-name="T871">7 </text:span></text:span><text:span text:style-name="T834">#define MAX_SIZE </text:span><text:span text:style-name="T872">128</text:span></text:p>
      <text:p text:style-name="P130"/>
      <text:p text:style-name="P129"><text:span text:style-name="Strong_20_Emphasis"><text:span text:style-name="T871">8 </text:span></text:span><text:span text:style-name="T834">int</text:span> main() {</text:p>
      <text:p text:style-name="P131"><text:span text:style-name="Strong_20_Emphasis"><text:span text:style-name="T868">9 <text:tab/></text:span></text:span><text:span text:style-name="T836">mqd_t</text:span><text:span text:style-name="T837"> mq;</text:span></text:p>
      <text:p text:style-name="P129"><text:span text:style-name="Strong_20_Emphasis"><text:span text:style-name="T871">10 <text:tab/></text:span></text:span><text:span text:style-name="T834">char</text:span> buffer[<text:span text:style-name="T834">MAX_SIZE</text:span>];</text:p>
      <text:p text:style-name="P129"><text:span text:style-name="Strong_20_Emphasis"><text:span text:style-name="T871">11 <text:tab/></text:span></text:span><text:span text:style-name="T834">unsigned</text:span> <text:span text:style-name="T834">int</text:span> priority;</text:p>
      <text:p text:style-name="P131"><text:span text:style-name="Strong_20_Emphasis"><text:span text:style-name="T868">12 <text:tab/></text:span></text:span><text:span text:style-name="T836">struct</text:span><text:span text:style-name="T837"> </text:span><text:span text:style-name="T836">mq_attr</text:span><text:span text:style-name="T837"> attr;</text:span></text:p>
      <text:p text:style-name="P130"/>
      <text:p text:style-name="P129"><text:span text:style-name="Strong_20_Emphasis"><text:span text:style-name="T871">13 <text:tab/></text:span></text:span>attr.mq_flags = <text:span text:style-name="T872">0</text:span>;</text:p>
      <text:p text:style-name="P129"><text:span text:style-name="Strong_20_Emphasis"><text:span text:style-name="T871">14<text:tab/></text:span></text:span>attr.mq_maxmsg = <text:span text:style-name="T872">10</text:span>;</text:p>
      <text:p text:style-name="P129"><text:span text:style-name="Strong_20_Emphasis"><text:span text:style-name="T871">15 <text:tab/></text:span></text:span>attr.mq_msgsize = <text:span text:style-name="T834">MAX_SIZE</text:span>;</text:p>
      <text:p text:style-name="P129"><text:span text:style-name="Strong_20_Emphasis"><text:span text:style-name="T871">16 <text:tab/></text:span></text:span>attr.mq_curmsgs = <text:span text:style-name="T872">0</text:span>;</text:p>
      <text:p text:style-name="P130"/>
      <text:p text:style-name="P129"><text:soft-page-break/><text:span text:style-name="Strong_20_Emphasis"><text:span text:style-name="T871">17 <text:tab/></text:span></text:span>mq = <text:span text:style-name="T827">mq_open</text:span>(<text:span text:style-name="T834">QUEUE_NAME</text:span>, <text:span text:style-name="T834">O_CREAT</text:span> | <text:span text:style-name="T834">O_RDONLY</text:span>, <text:span text:style-name="T872">0644</text:span>, &amp;attr);</text:p>
      <text:p text:style-name="P129"><text:span text:style-name="Strong_20_Emphasis"><text:span text:style-name="T871">18 <text:tab/></text:span></text:span><text:span text:style-name="T834">if</text:span> (mq == (mqd_t) -<text:span text:style-name="T872">1</text:span>) {</text:p>
      <text:p text:style-name="P129"><text:span text:style-name="Strong_20_Emphasis"><text:span text:style-name="T871">19 <text:tab/><text:tab/></text:span></text:span>perror(<text:span text:style-name="T835">"mq_open"</text:span>);</text:p>
      <text:p text:style-name="P129"><text:span text:style-name="Strong_20_Emphasis"><text:span text:style-name="T871">20 <text:tab/><text:tab/></text:span></text:span>exit(<text:span text:style-name="T872">1</text:span>);</text:p>
      <text:p text:style-name="P132"><text:span text:style-name="Strong_20_Emphasis"><text:span text:style-name="T873">21 <text:tab/></text:span></text:span><text:span text:style-name="T841">}</text:span></text:p>
      <text:p text:style-name="P129"><text:span text:style-name="Strong_20_Emphasis"><text:span text:style-name="T871">22 <text:tab/></text:span></text:span><text:span text:style-name="T834">if</text:span> (<text:span text:style-name="T827">mq_receive</text:span>(mq, buffer, <text:span text:style-name="T834">MAX_SIZE</text:span>, &amp;priority) == -<text:span text:style-name="T872">1</text:span>) {</text:p>
      <text:p text:style-name="P129"><text:span text:style-name="Strong_20_Emphasis"><text:span text:style-name="T871">23 <text:tab/><text:tab/></text:span></text:span>perror(<text:span text:style-name="T835">"mq_receive"</text:span>);</text:p>
      <text:p text:style-name="P129"><text:span text:style-name="Strong_20_Emphasis"><text:span text:style-name="T871">24 <text:tab/><text:tab/></text:span></text:span>exit(<text:span text:style-name="T872">1</text:span>);</text:p>
      <text:p text:style-name="P129"><text:span text:style-name="Strong_20_Emphasis"><text:span text:style-name="T871">25 <text:tab/></text:span></text:span>}</text:p>
      <text:p text:style-name="P130"/>
      <text:p text:style-name="P129"><text:span text:style-name="Strong_20_Emphasis"><text:span text:style-name="T871">26 <text:tab/></text:span></text:span>printf(<text:span text:style-name="T835">"Received message: %s"</text:span>, buffer);</text:p>
      <text:p text:style-name="P132"><text:span text:style-name="Strong_20_Emphasis"><text:span text:style-name="T873">27 <text:tab/></text:span></text:span><text:span text:style-name="T841">printf(</text:span><text:span text:style-name="T847">"Priority: %u\n"</text:span><text:span text:style-name="T841">, priority);</text:span></text:p>
      <text:p text:style-name="P129"><text:span text:style-name="Strong_20_Emphasis"><text:span text:style-name="T871">28 <text:tab/></text:span></text:span><text:span text:style-name="T827">mq_close</text:span>(mq);</text:p>
      <text:p text:style-name="P132"><text:span text:style-name="Strong_20_Emphasis"><text:span text:style-name="T873">29 <text:tab/></text:span></text:span><text:span text:style-name="T874">mq_unlink</text:span><text:span text:style-name="T841">(</text:span><text:span text:style-name="T846">QUEUE_NAME</text:span><text:span text:style-name="T841">);</text:span></text:p>
      <text:p text:style-name="P129"><text:span text:style-name="Strong_20_Emphasis"><text:span text:style-name="T871">30 <text:tab/></text:span></text:span><text:span text:style-name="T834">return</text:span> <text:span text:style-name="T872">0</text:span>;</text:p>
      <text:p text:style-name="P131"><text:span text:style-name="Strong_20_Emphasis"><text:span text:style-name="T868">31 </text:span></text:span><text:span text:style-name="T837">}</text:span></text:p>
      <text:p text:style-name="P150"/>
      <text:p text:style-name="P116"><text:span text:style-name="Strong_20_Emphasis"><text:span text:style-name="T875">mq_recv.c </text:span></text:span><text:span text:style-name="Strong_20_Emphasis"><text:span text:style-name="T876">Retrieves a message from the queue</text:span></text:span></text:p>
      <text:p text:style-name="P151"/>
      <text:p text:style-name="P106"><text:span text:style-name="T877">At line 6, the name of the message queue is defined. On Linux systems, this queue will appear as an entry under </text:span><text:span text:style-name="Source_20_Text"><text:span text:style-name="T878">/dev/mqueue</text:span></text:span><text:span text:style-name="T877">.</text:span></text:p>
      <text:p text:style-name="P106"/>
      <text:p text:style-name="P106"><text:span text:style-name="T877">At line 12, a </text:span><text:span text:style-name="Source_20_Text"><text:span text:style-name="T878">struct</text:span></text:span><text:span text:style-name="Source_20_Text"><text:span text:style-name="T877"> </text:span></text:span><text:span text:style-name="Source_20_Text"><text:span text:style-name="T878">mq_attr</text:span></text:span><text:span text:style-name="T877"> variable is declared to specify the attributes of the message queue.</text:span></text:p>
      <text:p text:style-name="P151">In lines 13–16, the queue attributes are initialized:</text:p>
      <text:p text:style-name="P151"/>
      <text:list text:style-name="L2">
        <text:list-item>
          <text:p text:style-name="P152"><text:span text:style-name="Source_20_Text"><text:span text:style-name="T212">mq_maxmsg</text:span></text:span> is set to 10, defining the maximum number of messages the queue can hold</text:p>
        </text:list-item>
        <text:list-item>
          <text:p text:style-name="P152"><text:span text:style-name="Source_20_Text"><text:span text:style-name="T212">mq_msgsize</text:span></text:span><text:span text:style-name="T877"> is set to 128 bytes, defining the maximum size of each message</text:span></text:p>
        </text:list-item>
        <text:list-item>
          <text:p text:style-name="P152"><text:span text:style-name="Source_20_Text"><text:span text:style-name="T212">mq_flags</text:span></text:span><text:span text:style-name="T877"> is set to 0, meaning blocking mode is used by default</text:span></text:p>
        </text:list-item>
        <text:list-item>
          <text:p text:style-name="P152"><text:span text:style-name="Source_20_Text"><text:span text:style-name="T212">mq_curmsgs</text:span></text:span><text:span text:style-name="T877"> is initialized to 0 (this field is ignored when creating the queue)</text:span></text:p>
        </text:list-item>
      </text:list>
      <text:list text:style-name="L3">
        <text:list-header>
          <text:p text:style-name="P153"><text:s/></text:p>
        </text:list-header>
      </text:list>
      <text:p text:style-name="P151">The queue is then created (or opened) with the call</text:p>
      <text:p text:style-name="P151"/>
      <text:p text:style-name="P129"><text:span text:style-name="Strong_20_Emphasis"><text:span text:style-name="T871">17 <text:tab/></text:span></text:span>mq = <text:span text:style-name="T827">mq_open</text:span>(<text:span text:style-name="T834">QUEUE_NAME</text:span>, <text:span text:style-name="T834">O_CREAT</text:span> | <text:span text:style-name="T834">O_RDONLY</text:span>, <text:span text:style-name="T872">0644</text:span>, &amp;attr);</text:p>
      <text:p text:style-name="P151"/>
      <text:p text:style-name="P106"><text:span text:style-name="T877">This call creates the queue </text:span><text:span text:style-name="Source_20_Text"><text:span text:style-name="T878">/myqueue</text:span></text:span><text:span text:style-name="T877"> (visible as </text:span><text:span text:style-name="Source_20_Text"><text:span text:style-name="T878">/dev/mqueue/myqueue</text:span></text:span><text:span text:style-name="T877">) if it does not already exist, using the specified permissions and attributes. If the queue already exists, it is simply opened, and the </text:span><text:span text:style-name="Source_20_Text"><text:span text:style-name="T878">attr</text:span></text:span><text:span text:style-name="T877"> structure is ignored.</text:span></text:p>
      <text:p text:style-name="P151"/>
      <text:p text:style-name="P151">Next, the program attempts to receive a message using</text:p>
      <text:p text:style-name="P151"/>
      <text:p text:style-name="P129"><text:span text:style-name="Strong_20_Emphasis"><text:span text:style-name="T871">22 <text:tab/></text:span></text:span><text:span text:style-name="T834">if</text:span> (<text:span text:style-name="T827">mq_receive</text:span>(mq, buffer, <text:span text:style-name="T834">MAX_SIZE</text:span>, &amp;priority) == -<text:span text:style-name="T872">1</text:span>) {</text:p>
      <text:p text:style-name="P151"/>
      <text:p text:style-name="P151">The arguments are</text:p>
      <text:p text:style-name="P106"><text:span text:style-name="Source_20_Text"/></text:p>
      <text:p text:style-name="P106"><text:span text:style-name="Source_20_Text"><text:span text:style-name="T878">mq</text:span></text:span><text:span text:style-name="Source_20_Text"><text:span text:style-name="T877"><text:tab/><text:tab/></text:span></text:span><text:span text:style-name="T877">the message queue descriptor </text:span></text:p>
      <text:p text:style-name="P106"><text:span text:style-name="Source_20_Text"><text:span text:style-name="T878">buffer</text:span></text:span><text:span text:style-name="Source_20_Text"><text:span text:style-name="T877"><text:tab/></text:span></text:span><text:span text:style-name="T877">the buffer where the received message will be stored </text:span></text:p>
      <text:p text:style-name="P106"><text:span text:style-name="Source_20_Text"><text:span text:style-name="T878">MAX_SIZE</text:span></text:span><text:span text:style-name="Source_20_Text"><text:span text:style-name="T877"><text:tab/></text:span></text:span><text:span text:style-name="T877">the size of the buffer (which must be at least the queue’s </text:span><text:span text:style-name="Source_20_Text"><text:span text:style-name="T878">mq_msgsize</text:span></text:span><text:span text:style-name="T877">) </text:span></text:p>
      <text:p text:style-name="P106"><text:soft-page-break/><text:span text:style-name="Source_20_Text"><text:span text:style-name="T878">priority</text:span></text:span><text:span text:style-name="Source_20_Text"><text:span text:style-name="T877"><text:tab/></text:span></text:span><text:span text:style-name="T877">a variable used to retrieve the message priority</text:span></text:p>
      <text:p text:style-name="P106"/>
      <text:p text:style-name="P106"><text:span text:style-name="T877">Since the queue is opened in blocking mode and no </text:span><text:span text:style-name="Source_20_Text"><text:span text:style-name="T878">O_NONBLOCK</text:span></text:span><text:span text:style-name="T877"> flag is specified, this call blocks until a message becomes available. After successfully receiving the message, the program prints its contents and priority.</text:span></text:p>
      <text:p text:style-name="P106"/>
      <text:p text:style-name="P106"><text:span text:style-name="T877">At line 28, the queue descriptor is closed using </text:span><text:span text:style-name="Source_20_Text"><text:span text:style-name="T878">mq_close</text:span></text:span></text:p>
      <text:p text:style-name="P106"><text:span text:style-name="T877">At line 29, the queue is removed from the system using </text:span><text:span text:style-name="Source_20_Text"><text:span text:style-name="T878">mq_unlink</text:span></text:span><text:span text:style-name="T877">. This deletes the queue name, and the queue itself is destroyed once no processes are using it.</text:span></text:p>
      <text:p text:style-name="P128"/>
      <text:p text:style-name="P150"/>
      <text:p text:style-name="P121"><text:span text:style-name="Strong_20_Emphasis"><text:span text:style-name="T879">1 </text:span></text:span><text:span text:style-name="Strong_20_Emphasis"><text:span text:style-name="T869">#include </text:span></text:span><text:span text:style-name="Strong_20_Emphasis"><text:span text:style-name="T870">&lt;stdio.h&gt;</text:span></text:span></text:p>
      <text:p text:style-name="P129"><text:span text:style-name="Strong_20_Emphasis"><text:span text:style-name="T880">2 </text:span></text:span><text:span text:style-name="T834">#include </text:span><text:span text:style-name="T835">&lt;stdlib.h&gt;</text:span></text:p>
      <text:p text:style-name="P129"><text:span text:style-name="Strong_20_Emphasis"><text:span text:style-name="T880">3 </text:span></text:span><text:span text:style-name="T834">#include </text:span><text:span text:style-name="T835">&lt;string.h&gt;</text:span></text:p>
      <text:p text:style-name="P129"><text:span text:style-name="Strong_20_Emphasis"><text:span text:style-name="T880">4 </text:span></text:span><text:span text:style-name="T834">#include </text:span><text:span text:style-name="T835">&lt;mqueue.h&gt;</text:span></text:p>
      <text:p text:style-name="P129"><text:span text:style-name="Strong_20_Emphasis"><text:span text:style-name="T880">5 </text:span></text:span><text:span text:style-name="T834">#include </text:span><text:span text:style-name="T835">&lt;fcntl.h&gt;</text:span></text:p>
      <text:p text:style-name="P130"/>
      <text:p text:style-name="P129"><text:span text:style-name="Strong_20_Emphasis"><text:span text:style-name="T880">6 </text:span></text:span><text:span text:style-name="T834">#define QUEUE_NAME </text:span><text:span text:style-name="T835">"/myqueue"</text:span></text:p>
      <text:p text:style-name="P129"><text:span text:style-name="Strong_20_Emphasis"><text:span text:style-name="T880">7 </text:span></text:span><text:span text:style-name="T834">#define MAX_SIZE </text:span><text:span text:style-name="T872">128</text:span></text:p>
      <text:p text:style-name="P130"/>
      <text:p text:style-name="P129"><text:span text:style-name="Strong_20_Emphasis"><text:span text:style-name="T880">8 </text:span></text:span><text:span text:style-name="T834">int</text:span> main() {</text:p>
      <text:p text:style-name="P131"><text:span text:style-name="Strong_20_Emphasis"><text:span text:style-name="T879">9 <text:tab/></text:span></text:span><text:span text:style-name="T836">mqd_t</text:span><text:span text:style-name="T837"> mq;</text:span></text:p>
      <text:p text:style-name="P131"><text:span text:style-name="Strong_20_Emphasis"><text:span text:style-name="T879">10 <text:tab/></text:span></text:span><text:span text:style-name="T836">struct</text:span><text:span text:style-name="T837"> </text:span><text:span text:style-name="T836">mq_attr</text:span><text:span text:style-name="T837"> attr;</text:span></text:p>
      <text:p text:style-name="P130"/>
      <text:p text:style-name="P129"><text:span text:style-name="Strong_20_Emphasis"><text:span text:style-name="T880">11 <text:tab/></text:span></text:span>mq = <text:span text:style-name="T827">mq_open</text:span>(<text:span text:style-name="T834">QUEUE_NAME</text:span>, <text:span text:style-name="T834">O_WRONLY</text:span>, <text:span text:style-name="T872">0644</text:span>, &amp;attr);</text:p>
      <text:p text:style-name="P129"><text:span text:style-name="Strong_20_Emphasis"><text:span text:style-name="T880">12<text:tab/></text:span></text:span><text:span text:style-name="T834">if</text:span> (mq == (mqd_t) -<text:span text:style-name="T872">1</text:span>) {</text:p>
      <text:p text:style-name="P129"><text:span text:style-name="Strong_20_Emphasis"><text:span text:style-name="T880">13 <text:tab/><text:tab/></text:span></text:span>perror(<text:span text:style-name="T835">"mq_open"</text:span>);</text:p>
      <text:p text:style-name="P129"><text:span text:style-name="Strong_20_Emphasis"><text:span text:style-name="T880">14 <text:tab/><text:tab/></text:span></text:span>exit(<text:span text:style-name="T872">1</text:span>);</text:p>
      <text:p text:style-name="P129"><text:span text:style-name="Strong_20_Emphasis"><text:span text:style-name="T880">15 <text:tab/></text:span></text:span>}</text:p>
      <text:p text:style-name="P130"/>
      <text:p text:style-name="P132"><text:span text:style-name="Strong_20_Emphasis"><text:span text:style-name="T881">16 <text:tab/></text:span></text:span><text:span text:style-name="T846">char</text:span><text:span text:style-name="T841"> message[</text:span><text:span text:style-name="T846">MAX_SIZE</text:span><text:span text:style-name="T841">];</text:span></text:p>
      <text:p text:style-name="P129"><text:span text:style-name="Strong_20_Emphasis"><text:span text:style-name="T880">17 <text:tab/></text:span></text:span>printf(<text:span text:style-name="T835">"Enter message: "</text:span>);</text:p>
      <text:p text:style-name="P129"><text:span text:style-name="Strong_20_Emphasis"><text:span text:style-name="T880">18 <text:tab/></text:span></text:span>fgets(message, <text:span text:style-name="T834">MAX_SIZE</text:span>, <text:span text:style-name="T834">stdin</text:span>);</text:p>
      <text:p text:style-name="P132"><text:span text:style-name="Strong_20_Emphasis"><text:span text:style-name="T881">19 <text:tab/></text:span></text:span><text:span text:style-name="T846">if</text:span><text:span text:style-name="T841"> (</text:span><text:span text:style-name="T874">mq_send</text:span><text:span text:style-name="T841">(mq, message, strlen(message) + </text:span><text:span text:style-name="T882">1</text:span><text:span text:style-name="T841">, </text:span><text:span text:style-name="T882">1</text:span><text:span text:style-name="T841">) == -</text:span><text:span text:style-name="T882">1</text:span><text:span text:style-name="T841">) {</text:span></text:p>
      <text:p text:style-name="P129"><text:span text:style-name="Strong_20_Emphasis"><text:span text:style-name="T880">20 <text:tab/><text:tab/></text:span></text:span>perror(<text:span text:style-name="T835">"mq_send"</text:span>);</text:p>
      <text:p text:style-name="P129"><text:span text:style-name="Strong_20_Emphasis"><text:span text:style-name="T880">21 <text:tab/><text:tab/></text:span></text:span>exit(<text:span text:style-name="T872">1</text:span>);</text:p>
      <text:p text:style-name="P132"><text:span text:style-name="Strong_20_Emphasis"><text:span text:style-name="T881">22 <text:tab/></text:span></text:span><text:span text:style-name="T841">}</text:span></text:p>
      <text:p text:style-name="P132"><text:span text:style-name="Strong_20_Emphasis"><text:span text:style-name="T881">23 <text:tab/></text:span></text:span><text:span text:style-name="T841">printf(</text:span><text:span text:style-name="T847">"Message sent: %s\n"</text:span><text:span text:style-name="T841">, message);</text:span></text:p>
      <text:p text:style-name="P129"><text:span text:style-name="Strong_20_Emphasis"><text:span text:style-name="T880">24 <text:tab/></text:span></text:span><text:span text:style-name="T827">mq_close</text:span>(mq);</text:p>
      <text:p text:style-name="P129"><text:span text:style-name="Strong_20_Emphasis"><text:span text:style-name="T880">25 <text:tab/></text:span></text:span><text:span text:style-name="T834">return</text:span> <text:span text:style-name="T872">0</text:span>;</text:p>
      <text:p text:style-name="P132"><text:span text:style-name="Strong_20_Emphasis"><text:span text:style-name="T881">26 </text:span></text:span><text:span text:style-name="T841">}</text:span></text:p>
      <text:p text:style-name="P150"/>
      <text:p text:style-name="P116"><text:span text:style-name="Strong_20_Emphasis"><text:span text:style-name="T875">mq_send.c</text:span></text:span><text:span text:style-name="Strong_20_Emphasis"><text:span text:style-name="T883"> </text:span></text:span><text:span text:style-name="Strong_20_Emphasis"><text:span text:style-name="T876">Sends a message to the queue</text:span></text:span></text:p>
      <text:p text:style-name="P154"/>
      <text:p text:style-name="P154">At line 6, the name of the message queue is defined. This must match the name used by the receiver so that both processes operate on the same queue.</text:p>
      <text:p text:style-name="P106"/>
      <text:p text:style-name="P106"><text:soft-page-break/><text:span text:style-name="T884">At line 10, a </text:span><text:span text:style-name="Source_20_Text"><text:span text:style-name="T885">struct mq_attr</text:span></text:span><text:span text:style-name="T884"> variable is declared. However, in this program it is not actually used, since the queue is opened without the </text:span><text:span text:style-name="Source_20_Text"><text:span text:style-name="T885">O_CREAT</text:span></text:span><text:span text:style-name="T884"> flag. Therefore, the </text:span><text:span text:style-name="Source_20_Text"><text:span text:style-name="T885">attr</text:span></text:span><text:span text:style-name="T884"> argument passed to </text:span><text:span text:style-name="Source_20_Text"><text:span text:style-name="T885">mq_open</text:span></text:span><text:span text:style-name="T884"> is ignored and could be replaced with </text:span><text:span text:style-name="Source_20_Text"><text:span text:style-name="T885">NULL</text:span></text:span><text:span text:style-name="T884">.</text:span></text:p>
      <text:p text:style-name="P154"/>
      <text:p text:style-name="P154">The queue is then opened using:</text:p>
      <text:p text:style-name="P154"/>
      <text:p text:style-name="P129"><text:span text:style-name="Strong_20_Emphasis"><text:span text:style-name="T880">11 <text:tab/></text:span></text:span>mq = <text:span text:style-name="T827">mq_open</text:span>(<text:span text:style-name="T834">QUEUE_NAME</text:span>, <text:span text:style-name="T834">O_WRONLY</text:span>, <text:span text:style-name="T872">0644</text:span>, &amp;attr);</text:p>
      <text:p text:style-name="P154"/>
      <text:p text:style-name="P155">This call opens an existing message queue in write-only mode. It assumes that the queue has already been created (for example, by the receiver). If the queue does not exist, the call fails. </text:p>
      <text:p text:style-name="P112"/>
      <text:p text:style-name="P112"><text:span text:style-name="T884">In lines 16–18, the program reads a message from standard input using </text:span><text:span text:style-name="Source_20_Text"><text:span text:style-name="T885">fgets</text:span></text:span><text:span text:style-name="T884"> and stores it in the </text:span><text:span text:style-name="Source_20_Text"><text:span text:style-name="T885">message</text:span></text:span><text:span text:style-name="T884"> buffer.</text:span></text:p>
      <text:p text:style-name="P155"/>
      <text:p text:style-name="P155">The message is then sent to the queue using:</text:p>
      <text:p text:style-name="P154"/>
      <text:p text:style-name="P132"><text:span text:style-name="Strong_20_Emphasis"><text:span text:style-name="T881">19 <text:tab/></text:span></text:span><text:span text:style-name="T846">if</text:span><text:span text:style-name="T841"> (</text:span><text:span text:style-name="T874">mq_send</text:span><text:span text:style-name="T841">(mq, message, strlen(message) + </text:span><text:span text:style-name="T882">1</text:span><text:span text:style-name="T841">, </text:span><text:span text:style-name="T882">1</text:span><text:span text:style-name="T841">) == -</text:span><text:span text:style-name="T882">1</text:span><text:span text:style-name="T841">) {</text:span></text:p>
      <text:p text:style-name="P155">The arguments are</text:p>
      <text:p text:style-name="P155"/>
      <text:list text:style-name="L4">
        <text:list-item>
          <text:p text:style-name="P156"><text:span text:style-name="Source_20_Text"><text:span text:style-name="T212">mq</text:span></text:span> the message queue descriptor</text:p>
        </text:list-item>
        <text:list-item>
          <text:p text:style-name="P156"><text:span text:style-name="Source_20_Text"><text:span text:style-name="T212">message</text:span></text:span><text:span text:style-name="T884">: the buffer containing the message</text:span></text:p>
        </text:list-item>
        <text:list-item>
          <text:p text:style-name="P156"><text:span text:style-name="Source_20_Text"><text:span text:style-name="T212">strlen(message) + 1</text:span></text:span><text:span text:style-name="T884"> the size of the message (including the null terminator) </text:span></text:p>
        </text:list-item>
        <text:list-item>
          <text:p text:style-name="P156"><text:span text:style-name="Source_20_Text"><text:span text:style-name="T212">1</text:span></text:span><text:span text:style-name="T884"> the priority assigned to the message</text:span></text:p>
        </text:list-item>
      </text:list>
      <text:p text:style-name="P112"/>
      <text:p text:style-name="P155">The message is inserted into the queue and will be delivered according to its priority.</text:p>
      <text:p text:style-name="P112"><text:span text:style-name="T884">Finally, at line 24, the queue descriptor is closed using </text:span><text:span text:style-name="Source_20_Text"><text:span text:style-name="T885">mq_close</text:span></text:span><text:span text:style-name="T884">.</text:span></text:p>
      <text:p text:style-name="P154"/>
      <text:p text:style-name="P157">Let’s execute the programs</text:p>
      <text:p text:style-name="P157"/>
      <text:p text:style-name="P158">Shell 1</text:p>
      <table:table table:name="Table23" table:style-name="Table23">
        <table:table-column table:style-name="Table23.A"/>
        <table:table-row>
          <table:table-cell table:style-name="Table23.A1" office:value-type="string">
            <text:p text:style-name="P120"><text:span text:style-name="T806">[</text:span><text:a xlink:type="simple" xlink:href="mailto:linux@process" text:style-name="Internet_20_link" text:visited-style-name="Visited_20_Internet_20_Link"><text:span text:style-name="T806">linux@</text:span><text:span text:style-name="T807">ipc</text:span><text:span text:style-name="T806">]</text:span></text:a><text:span text:style-name="T808"> </text:span><text:span text:style-name="Strong_20_Emphasis"><text:span text:style-name="T805">./</text:span></text:span><text:span text:style-name="Strong_20_Emphasis"><text:span text:style-name="T886">mq_recv </text:span></text:span></text:p>
            <text:p text:style-name="P120"><text:span text:style-name="Strong_20_Emphasis"><text:span text:style-name="T886"/></text:span></text:p>
          </table:table-cell>
        </table:table-row>
      </table:table>
      <text:p text:style-name="P157"/>
      <text:p text:style-name="P158">Shell 2</text:p>
      <table:table table:name="Table24" table:style-name="Table24">
        <table:table-column table:style-name="Table24.A"/>
        <table:table-row>
          <table:table-cell table:style-name="Table24.A1" office:value-type="string">
            <text:p text:style-name="P120"><text:span text:style-name="T806">[</text:span><text:a xlink:type="simple" xlink:href="mailto:linux@process" text:style-name="Internet_20_link" text:visited-style-name="Visited_20_Internet_20_Link"><text:span text:style-name="T806">linux@</text:span><text:span text:style-name="T807">ipc</text:span><text:span text:style-name="T806">]</text:span></text:a><text:span text:style-name="T808"> </text:span><text:span text:style-name="Strong_20_Emphasis"><text:span text:style-name="T805">./</text:span></text:span><text:span text:style-name="Strong_20_Emphasis"><text:span text:style-name="T886">mq_send</text:span></text:span></text:p>
            <text:p text:style-name="P159">Enter message: hello receiver!</text:p>
            <text:p text:style-name="P159">Message sent: hello receiver!</text:p>
          </table:table-cell>
        </table:table-row>
      </table:table>
      <text:p text:style-name="P157"/>
      <text:p text:style-name="P158">Shell 1</text:p>
      <table:table table:name="Table25" table:style-name="Table25">
        <table:table-column table:style-name="Table25.A"/>
        <table:table-row>
          <table:table-cell table:style-name="Table25.A1" office:value-type="string">
            <text:p text:style-name="P159">Received message: hello receiver!</text:p>
            <text:p text:style-name="P159">Priority: 1</text:p>
          </table:table-cell>
        </table:table-row>
      </table:table>
      <text:p text:style-name="P112"/>
      <text:p text:style-name="P112">After the sender sends the message, the receiver reads it from the queue and prints its contents.</text:p>
      <text:p text:style-name="P112"/>
      <text:p text:style-name="P112"><text:span text:style-name="T887">If we comment out the </text:span><text:span text:style-name="T888">mq_unlink</text:span><text:span text:style-name="T887"> call, we can see the </text:span><text:span text:style-name="T888">myqueue</text:span><text:span text:style-name="T887"> file under </text:span><text:span text:style-name="T888">/dev/mqueue</text:span><text:span text:style-name="T887">.</text:span></text:p>
      <text:p text:style-name="P160"/>
      <table:table table:name="Table26" table:style-name="Table26">
        <table:table-column table:style-name="Table26.A"/>
        <table:table-row>
          <table:table-cell table:style-name="Table26.A1" office:value-type="string">
            <text:p text:style-name="P120"><text:span text:style-name="T806">[</text:span><text:a xlink:type="simple" xlink:href="mailto:linux@process" text:style-name="Internet_20_link" text:visited-style-name="Visited_20_Internet_20_Link"><text:span text:style-name="T806">linux@</text:span><text:span text:style-name="T807">ipc</text:span><text:span text:style-name="T806">]</text:span></text:a><text:span text:style-name="T808"> </text:span><text:span text:style-name="Strong_20_Emphasis"><text:span text:style-name="T886">cat /dev/mqueue/myqueue</text:span></text:span></text:p>
            <text:p text:style-name="P120"><text:span text:style-name="Strong_20_Emphasis"><text:span text:style-name="T886">QSIZE:0 <text:s text:c="9"/>NOTIFY:0 <text:s text:c="4"/>SIGNO:0 <text:s text:c="4"/>NOTIFY_PID:0 <text:s text:c="4"/></text:span></text:span></text:p>
            <text:p text:style-name="P120"><text:soft-page-break/><text:span text:style-name="Strong_20_Emphasis"><text:span text:style-name="T886"/></text:span></text:p>
          </table:table-cell>
        </table:table-row>
      </table:table>
      <text:p text:style-name="P157"/>
      <text:p text:style-name="P112">In this example, the message queue is created by the receiver, while the sender simply uses the existing queue. This is a design choice made for illustrative purposes. In practice, the specific process responsible for creating the queue is less important than ensuring that all participating components can access and use it correctly.</text:p>
      <text:p text:style-name="P112">For instance, the queue could instead be created by the sender, which might even send messages before the receiver starts executing. Alternatively, both the sender and the receiver could attempt to create the queue using the <text:span text:style-name="Source_20_Text"><text:span text:style-name="T212">O_CREAT</text:span></text:span> flag; since the queue is only created if it does not already exist, this approach improves robustness by removing dependencies on process startup order.</text:p>
      <text:p text:style-name="P112">In this example, however, creating the queue in the receiver allows us to demonstrate that <text:span text:style-name="Source_20_Text"><text:span text:style-name="T212">mq_receive</text:span></text:span> blocks when no messages are available, waiting until a message is delivered.</text:p>
      <text:p text:style-name="P112">The process that creates the queue defines its attributes, while other processes can retrieve these attributes as needed.</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61"><text:s/></text:p>
      <text:p text:style-name="P112"/>
      <text:p text:style-name="P116"><text:soft-page-break/><text:span text:style-name="Strong_20_Emphasis"><text:span text:style-name="T817">VI.</text:span></text:span><text:span text:style-name="Strong_20_Emphasis"><text:span text:style-name="T889">2</text:span></text:span><text:span text:style-name="Strong_20_Emphasis"><text:span text:style-name="T817">.</text:span></text:span><text:span text:style-name="Strong_20_Emphasis"><text:span text:style-name="T889">3</text:span></text:span><text:span text:style-name="Strong_20_Emphasis"><text:span text:style-name="T819"> Message queue</text:span></text:span><text:span text:style-name="T859"> attributes: </text:span><text:span text:style-name="T860">mq_getattr</text:span><text:span text:style-name="T859"> and </text:span><text:span text:style-name="T860">mq_setattr</text:span></text:p>
      <text:p text:style-name="P106"/>
      <text:p text:style-name="P106">The <text:span text:style-name="T212">mq_getattr</text:span> and <text:span text:style-name="T212">mq_setattr</text:span> <text:span text:style-name="T890">functions</text:span><text:span text:style-name="T890"><text:note text:id="ftn9" text:note-class="footnote"><text:note-citation>9</text:note-citation><text:note-body><text:p text:style-name="P162">See the <text:span text:style-name="T212">mq_getattr(3)</text:span> manual page</text:p></text:note-body></text:note></text:span> respectively retrieve and modify attributes of the message queue referred to by the message queue descriptor <text:span text:style-name="T212">mqdes</text:span>.</text:p>
      <text:p text:style-name="P106"/>
      <table:table table:name="Table22" table:style-name="Table22">
        <table:table-column table:style-name="Table22.A"/>
        <table:table-row>
          <table:table-cell table:style-name="Table22.A1" office:value-type="string">
            <text:p text:style-name="P132"><text:span text:style-name="T846">#include </text:span><text:span text:style-name="T847">&lt;mqueue.h&gt;</text:span></text:p>
            <text:p text:style-name="P130"/>
            <text:p text:style-name="P131"><text:span text:style-name="T836">int</text:span><text:span text:style-name="T837"> </text:span><text:span text:style-name="T838">mq_getattr</text:span><text:span text:style-name="T837">(</text:span><text:span text:style-name="T836">mqd_t</text:span><text:span text:style-name="T837"> </text:span><text:span text:style-name="T839">mqdes</text:span><text:span text:style-name="T837">, </text:span><text:span text:style-name="T836">struct</text:span><text:span text:style-name="T837"> </text:span><text:span text:style-name="T836">mq_attr</text:span><text:span text:style-name="T837"> </text:span><text:span text:style-name="T839">*attr</text:span><text:span text:style-name="T837">);</text:span></text:p>
            <text:p text:style-name="P129"/>
            <text:p text:style-name="P131"><text:span text:style-name="T836">int</text:span><text:span text:style-name="T837"> </text:span><text:span text:style-name="T838">mq_setattr</text:span><text:span text:style-name="T837">(</text:span><text:span text:style-name="T836">mqd_t</text:span><text:span text:style-name="T837"> </text:span><text:span text:style-name="T839">mqdes</text:span><text:span text:style-name="T837">, </text:span><text:span text:style-name="T836">const</text:span><text:span text:style-name="T837"> </text:span><text:span text:style-name="T836">struct</text:span><text:span text:style-name="T837"> </text:span><text:span text:style-name="T839">mq_attr</text:span><text:span text:style-name="T837"> *</text:span><text:span text:style-name="T836">restrict</text:span><text:span text:style-name="T837"> </text:span><text:span text:style-name="T839">newattr</text:span><text:span text:style-name="T837">,</text:span></text:p>
            <text:p text:style-name="P131"><text:span text:style-name="T836"><text:s text:c="15"/>struct</text:span><text:span text:style-name="T837"> </text:span><text:span text:style-name="T836">mq_attr</text:span><text:span text:style-name="T837"> *</text:span><text:span text:style-name="T836">restrict</text:span><text:span text:style-name="T837"> </text:span><text:span text:style-name="T839">oldattr</text:span><text:span text:style-name="T837">);</text:span></text:p>
            <text:p text:style-name="P106"/>
            <text:p text:style-name="P145">Return: on success 0, on error -1 and errno is set</text:p>
          </table:table-cell>
        </table:table-row>
      </table:table>
      <text:p text:style-name="P106"/>
      <text:p text:style-name="P106"><text:span text:style-name="T891">The</text:span> <text:span text:style-name="T212">mq_getattr</text:span> and <text:span text:style-name="T212">mq_setattr</text:span> <text:span text:style-name="T891">functions,</text:span> respectively retrieve and modify attributes of the <text:span text:style-name="T891">message queue referred to by the message queue descriptor </text:span><text:span text:style-name="T212">mqdes</text:span><text:span text:style-name="T891">.</text:span></text:p>
      <text:p text:style-name="P163"/>
      <text:p text:style-name="P112"><text:span text:style-name="T212">mq_getattr</text:span><text:span text:style-name="T891"> returns an </text:span><text:span text:style-name="T212">mq_attr</text:span><text:span text:style-name="T891"> structure in the buffer pointed by </text:span><text:span text:style-name="T212">attr</text:span><text:span text:style-name="T891">. </text:span><text:span text:style-name="T892">In the </text:span><text:span text:style-name="T212">mq_attr</text:span><text:span text:style-name="T892"> structure, t</text:span><text:span text:style-name="T891">he </text:span><text:span text:style-name="T212">mq_flags</text:span><text:span text:style-name="T891"> field contains flags associated with the open message queue description. This field is initialized when the queue is created by </text:span><text:span text:style-name="T212">mq_open</text:span><text:span text:style-name="T891">. The only flag </text:span><text:span text:style-name="T892">this field can have is </text:span><text:span text:style-name="T212">O_NONBLOCK</text:span><text:span text:style-name="T891">.<text:line-break/></text:span><text:span text:style-name="T892">Also </text:span><text:span text:style-name="T212">mq_maxmsg</text:span><text:span text:style-name="T891"> and </text:span><text:span text:style-name="T212">mq_msgsize</text:span><text:span text:style-name="T891"> </text:span><text:span text:style-name="T892">a</text:span><text:span text:style-name="T891">re set when the message queue is created. </text:span><text:span text:style-name="T212">mq_maxmsg</text:span><text:span text:style-name="T891"> is <text:s/></text:span><text:span text:style-name="T892">the </text:span><text:span text:style-name="T891">upper limit on the number of messages that may be placed on the queue using </text:span><text:span text:style-name="T212">mq_send</text:span><text:span text:style-name="T891">. </text:span><text:span text:style-name="T212">mq_msgsize</text:span><text:span text:style-name="T891"> is </text:span><text:span text:style-name="T892">the</text:span><text:span text:style-name="T891"> upper limit on the size of messages that may be placed on the queue. Both of these fields must have a value greater than zero.</text:span></text:p>
      <text:p text:style-name="P112"><text:span text:style-name="T893">The </text:span><text:span text:style-name="T212">mq_curmsgs</text:span><text:span text:style-name="T891"> </text:span><text:span text:style-name="T893">field </text:span><text:span text:style-name="T891">returns the number of messages currently held in the queue.</text:span></text:p>
      <text:p text:style-name="P164"/>
      <text:p text:style-name="P112"><text:span text:style-name="T892">The </text:span><text:span text:style-name="T212">mq_setattr</text:span><text:span text:style-name="T891"> </text:span><text:span text:style-name="T892">function</text:span><text:span text:style-name="T891"> sets message queue attributes using information supplied in the </text:span><text:span text:style-name="T212">mq_attr</text:span><text:span text:style-name="T891"> structure pointed to by </text:span><text:span text:style-name="T212">newattr</text:span><text:span text:style-name="T891">. <text:s/>The only attribute that can be modified is the setting of the </text:span><text:span text:style-name="T212">O_NONBLOCK</text:span><text:span text:style-name="T891"> flag in </text:span><text:span text:style-name="T212">mq_flags</text:span><text:span text:style-name="T891">, </text:span><text:span text:style-name="T892">t</text:span><text:span text:style-name="T891">he other fields in </text:span><text:span text:style-name="T212">newattr</text:span><text:span text:style-name="T891"> are ignored. <text:s/>If the </text:span><text:span text:style-name="T212">oldattr</text:span><text:span text:style-name="T891"> field is not </text:span><text:span text:style-name="T212">NULL</text:span><text:span text:style-name="T891">, then the buffer that it points to is used to return an </text:span><text:span text:style-name="T212">mq_attr</text:span><text:span text:style-name="T891"> structure that contains the same information that is returned by </text:span><text:span text:style-name="T212">mq_getattr</text:span><text:span text:style-name="T891">.</text:span></text:p>
      <text:p text:style-name="P112"/>
      <text:p text:style-name="P112"><text:span text:style-name="T894">The </text:span><text:span text:style-name="T212">mqgetattr.c</text:span><text:span text:style-name="T895"> program is taken from the </text:span><text:span text:style-name="T212">mq_getattr(2)</text:span><text:span text:style-name="T895"> manual page. It shows how to retrieve the attributes associated to a message queue created by passing the </text:span><text:span text:style-name="T212">attr</text:span><text:span text:style-name="T895"> argument as </text:span><text:span text:style-name="T212">NULL</text:span><text:span text:style-name="T895">.</text:span></text:p>
      <text:p text:style-name="P132"/>
      <text:p text:style-name="P150"/>
      <text:p text:style-name="P165"><text:span text:style-name="T896">1 </text:span><text:span text:style-name="T897">#include </text:span><text:span text:style-name="T898">&lt;err.h&gt;</text:span></text:p>
      <text:p text:style-name="P129"><text:span text:style-name="T899">2</text:span><text:span text:style-name="T900"> </text:span><text:span text:style-name="T834">#include </text:span><text:span text:style-name="T835">&lt;fcntl.h&gt;</text:span></text:p>
      <text:p text:style-name="P129"><text:span text:style-name="T899">3</text:span><text:span text:style-name="T900"> </text:span><text:span text:style-name="T834">#include </text:span><text:span text:style-name="T835">&lt;mqueue.h&gt;</text:span></text:p>
      <text:p text:style-name="P129"><text:span text:style-name="T899">4</text:span><text:span text:style-name="T900"> </text:span><text:span text:style-name="T834">#include </text:span><text:span text:style-name="T835">&lt;stdio.h&gt;</text:span></text:p>
      <text:p text:style-name="P129"><text:span text:style-name="T899">5</text:span><text:span text:style-name="T900"> </text:span><text:span text:style-name="T834">#include </text:span><text:span text:style-name="T835">&lt;stdlib.h&gt;</text:span></text:p>
      <text:p text:style-name="P129"><text:span text:style-name="T899">6</text:span><text:span text:style-name="T900"> </text:span><text:span text:style-name="T834">#include </text:span><text:span text:style-name="T835">&lt;unistd.h&gt;</text:span></text:p>
      <text:p text:style-name="P130"/>
      <text:p text:style-name="P129"><text:span text:style-name="T899">7</text:span><text:span text:style-name="T900"> </text:span><text:span text:style-name="T834">int</text:span> main(<text:span text:style-name="T834">int</text:span> argc, <text:span text:style-name="T834">char</text:span> *argv<text:span text:style-name="T834">[]</text:span>)</text:p>
      <text:p text:style-name="P129"><text:soft-page-break/><text:span text:style-name="T899">8</text:span><text:span text:style-name="T900"> </text:span>{</text:p>
      <text:p text:style-name="P131"><text:span text:style-name="T901">9</text:span><text:span text:style-name="T902"> <text:tab/></text:span><text:span text:style-name="T836">mqd_t</text:span><text:span text:style-name="T837"> mqd;</text:span></text:p>
      <text:p text:style-name="P131"><text:span text:style-name="T902">1</text:span><text:span text:style-name="T901">0</text:span><text:span text:style-name="T902"> <text:tab/></text:span><text:span text:style-name="T836">struct</text:span><text:span text:style-name="T837"> </text:span><text:span text:style-name="T836">mq_attr</text:span><text:span text:style-name="T837"> attr;</text:span></text:p>
      <text:p text:style-name="P130"/>
      <text:p text:style-name="P129"><text:span text:style-name="T900">1</text:span><text:span text:style-name="T899">1</text:span><text:span text:style-name="T900"> <text:tab/></text:span><text:span text:style-name="T834">if</text:span> (argc != <text:span text:style-name="T872">2</text:span>) { </text:p>
      <text:p text:style-name="P129"><text:span text:style-name="T900">1</text:span><text:span text:style-name="T899">2</text:span><text:span text:style-name="T900"> <text:tab/><text:tab/></text:span>fprintf(<text:span text:style-name="T834">stderr</text:span>, <text:span text:style-name="T835">"Usage: %s mq-name\n"</text:span>, argv[<text:span text:style-name="T872">0</text:span>]);</text:p>
      <text:p text:style-name="P129"><text:span text:style-name="T900">1</text:span><text:span text:style-name="T899">3</text:span><text:span text:style-name="T900"> <text:tab/><text:tab/></text:span>exit(<text:span text:style-name="T834">EXIT_FAILURE</text:span>);</text:p>
      <text:p text:style-name="P129"><text:span text:style-name="T900">1</text:span><text:span text:style-name="T899">4</text:span><text:span text:style-name="T900"> <text:tab/></text:span>}</text:p>
      <text:p text:style-name="P130"/>
      <text:p text:style-name="P129"><text:span text:style-name="T900">1</text:span><text:span text:style-name="T899">5</text:span><text:span text:style-name="T900"> <text:tab/></text:span>mqd = <text:span text:style-name="T827">mq_open</text:span>(argv[<text:span text:style-name="T872">1</text:span>], <text:span text:style-name="T834">O_CREAT</text:span> | <text:span text:style-name="T834">O_EXCL</text:span>, <text:span text:style-name="T872">0600</text:span>, <text:span text:style-name="T834">NULL</text:span>);</text:p>
      <text:p text:style-name="P129"><text:span text:style-name="T900">1</text:span><text:span text:style-name="T899">6</text:span><text:span text:style-name="T900"> <text:tab/></text:span><text:span text:style-name="T834">if</text:span> (mqd == (mqd_t) -<text:span text:style-name="T872">1</text:span>)</text:p>
      <text:p text:style-name="P129"><text:span text:style-name="T900">1</text:span><text:span text:style-name="T899">7</text:span><text:span text:style-name="T900"> <text:tab/><text:tab/></text:span>err(<text:span text:style-name="T834">EXIT_FAILURE</text:span>, <text:span text:style-name="T835">"mq_open"</text:span>);</text:p>
      <text:p text:style-name="P130"/>
      <text:p text:style-name="P129"><text:span text:style-name="T900">1</text:span><text:span text:style-name="T899">8</text:span><text:span text:style-name="T900"> <text:tab/></text:span><text:span text:style-name="T834">if</text:span> (<text:span text:style-name="T827">mq_getattr</text:span>(mqd, &amp;attr) == -<text:span text:style-name="T872">1</text:span>)</text:p>
      <text:p text:style-name="P129"><text:span text:style-name="T900">1</text:span><text:span text:style-name="T899">9</text:span><text:span text:style-name="T900"> <text:tab/><text:tab/></text:span>err(<text:span text:style-name="T834">EXIT_FAILURE</text:span>, <text:span text:style-name="T835">"mq_getattr"</text:span>);</text:p>
      <text:p text:style-name="P130"/>
      <text:p text:style-name="P129"><text:span text:style-name="T899">20</text:span><text:span text:style-name="T900"> <text:tab/></text:span>printf(<text:span text:style-name="T835">"Maximum # of messages on queue: %ld\n"</text:span>, attr.mq_maxmsg);</text:p>
      <text:p text:style-name="P132"><text:span text:style-name="T903">2</text:span><text:span text:style-name="T896">1 <text:tab/></text:span><text:span text:style-name="T841">printf(</text:span><text:span text:style-name="T847">"Maximum message size: %ld\n"</text:span><text:span text:style-name="T841">, attr.mq_msgsize);</text:span></text:p>
      <text:p text:style-name="P129"><text:span text:style-name="T899">22</text:span><text:span text:style-name="T900"> <text:tab/></text:span><text:span text:style-name="T834">if</text:span> (<text:span text:style-name="T827">mq_unlink</text:span>(argv[<text:span text:style-name="T872">1</text:span>]) == -<text:span text:style-name="T872">1</text:span>)</text:p>
      <text:p text:style-name="P132"><text:span text:style-name="T903">23</text:span><text:span text:style-name="T896"> <text:tab/><text:tab/></text:span><text:span text:style-name="T841">err(</text:span><text:span text:style-name="T846">EXIT_FAILURE</text:span><text:span text:style-name="T841">, </text:span><text:span text:style-name="T847">"mq_unlink"</text:span><text:span text:style-name="T841">);</text:span></text:p>
      <text:p text:style-name="P129"><text:span text:style-name="T899">24</text:span><text:span text:style-name="T900"> <text:tab/></text:span>exit(<text:span text:style-name="T834">EXIT_SUCCESS</text:span>);</text:p>
      <text:p text:style-name="P132"><text:span text:style-name="T903">25</text:span><text:span text:style-name="T896"> </text:span><text:span text:style-name="T841">}</text:span></text:p>
      <text:p text:style-name="P150"/>
      <text:p text:style-name="P116"><text:span text:style-name="Strong_20_Emphasis"><text:span text:style-name="T904">mqgetattr.</text:span></text:span><text:span text:style-name="Strong_20_Emphasis"><text:span text:style-name="T905">c</text:span></text:span><text:span text:style-name="Strong_20_Emphasis"><text:span text:style-name="T904"> </text:span></text:span></text:p>
      <text:p text:style-name="P106"/>
      <text:p text:style-name="P112">The program creates a message queue with the name specified on the command line. When <text:span text:style-name="Source_20_Text"><text:span text:style-name="T212">NULL</text:span></text:span> is passed as the <text:span text:style-name="Source_20_Text"><text:span text:style-name="T212">attr</text:span></text:span> argument, the queue is initialized with default attributes. These attributes are subsequently retrieved and printed by the program.</text:p>
      <text:p text:style-name="P112"/>
      <text:p text:style-name="P166">The call</text:p>
      <text:p text:style-name="P166"/>
      <text:p text:style-name="P129"><text:span text:style-name="T900">1</text:span><text:span text:style-name="T899">8</text:span><text:span text:style-name="T900"> <text:tab/></text:span><text:span text:style-name="T834">if</text:span> (<text:span text:style-name="T827">mq_getattr</text:span>(mqd, &amp;attr) == -<text:span text:style-name="T872">1</text:span>)</text:p>
      <text:p text:style-name="P106"/>
      <text:p text:style-name="P112"><text:span text:style-name="T906">retrieves the attributes associated with the queue </text:span><text:span text:style-name="Source_20_Text"><text:span text:style-name="T212">mqd</text:span></text:span><text:span text:style-name="T906">.</text:span></text:p>
      <text:p text:style-name="P112"><text:span text:style-name="T906">Before removing the queue, the program prints the values of the </text:span><text:span text:style-name="Source_20_Text"><text:span text:style-name="T212">mq_maxmsg</text:span></text:span><text:span text:style-name="T906"> and </text:span><text:span text:style-name="Source_20_Text"><text:span text:style-name="T212">mq_msgsize</text:span></text:span><text:span text:style-name="T906"> attributes. </text:span></text:p>
      <text:p text:style-name="P113"/>
      <text:p text:style-name="P167">Let’s execute</text:p>
      <text:p text:style-name="P168"/>
      <table:table table:name="Table27" table:style-name="Table27">
        <table:table-column table:style-name="Table27.A"/>
        <table:table-row>
          <table:table-cell table:style-name="Table27.A1" office:value-type="string">
            <text:p text:style-name="P120"><text:span text:style-name="T806">[</text:span><text:a xlink:type="simple" xlink:href="mailto:linux@process" text:style-name="Internet_20_link" text:visited-style-name="Visited_20_Internet_20_Link"><text:span text:style-name="T806">linux@</text:span><text:span text:style-name="T807">ipc</text:span><text:span text:style-name="T806">]</text:span></text:a><text:span text:style-name="T808"> </text:span><text:span text:style-name="Strong_20_Emphasis"><text:span text:style-name="T805">./</text:span></text:span><text:span text:style-name="Strong_20_Emphasis"><text:span text:style-name="T886">mq</text:span></text:span><text:span text:style-name="Strong_20_Emphasis"><text:span text:style-name="T907">getattr /mynewq </text:span></text:span></text:p>
            <text:p text:style-name="P120"><text:span text:style-name="Strong_20_Emphasis"><text:span text:style-name="T907">Maximum # of messages on queue: <text:s text:c="2"/>10</text:span></text:span></text:p>
            <text:p text:style-name="P120"><text:span text:style-name="Strong_20_Emphasis"><text:span text:style-name="T907">Maximum message size: <text:s text:c="16"/>8192</text:span></text:span></text:p>
            <text:p text:style-name="P120"><text:span text:style-name="Strong_20_Emphasis"><text:span text:style-name="T886"/></text:span></text:p>
          </table:table-cell>
        </table:table-row>
      </table:table>
      <text:p text:style-name="P157"/>
      <text:p text:style-name="P112"><text:span text:style-name="T907">We can check these two values in the </text:span><text:span text:style-name="Source_20_Text"><text:span text:style-name="T212">/proc/sys/fs/mqueue/msg_default</text:span></text:span><text:span text:style-name="T907"> and </text:span><text:span text:style-name="Source_20_Text"><text:span text:style-name="T212">/proc/sys/fs/mqueue/msgsize_max</text:span></text:span><text:span text:style-name="T907"> files. </text:span></text:p>
      <text:p text:style-name="P113"/>
      <text:p text:style-name="P112"><text:soft-page-break/><text:span text:style-name="T908">Both </text:span><text:span text:style-name="Source_20_Text"><text:span text:style-name="T212">mq_getattr</text:span></text:span><text:span text:style-name="T908"> and </text:span><text:span text:style-name="Source_20_Text"><text:span text:style-name="T212">mq_setattr</text:span></text:span><text:span text:style-name="T908"> are implemented on the top of the </text:span><text:span text:style-name="Source_20_Text"><text:span text:style-name="T212">mq_getsetattr</text:span></text:span><text:span text:style-name="T908"> system call. For further information about this system call the reader is encouraged to read the </text:span><text:span text:style-name="Source_20_Text"><text:span text:style-name="T212">mq_getsetattr(2)</text:span></text:span><text:span text:style-name="T908"> manual page. </text:span></text:p>
      <text:p text:style-name="P113"/>
      <text:p text:style-name="P113"/>
      <text:p text:style-name="P112">As previously noted, message priority determines the order in which messages are retrieved from the queue. Messages with higher priority values are delivered before those with lower priorities. POSIX message queues operate as priority-based queues rather than simple FIFO queues.</text:p>
      <text:p text:style-name="P113"/>
      <text:p text:style-name="P112"><text:span text:style-name="T909">The </text:span><text:span text:style-name="T910">mqsndmsg.c</text:span><text:span text:style-name="T909"> and </text:span><text:span text:style-name="T910">mqrcvmsg.c</text:span><text:span text:style-name="T909"> programs allows the user to send messages with different priorities. </text:span><text:span text:style-name="T910">mqsndmsg.c</text:span><text:span text:style-name="T909"> takes from the command-line the name of the queue, the message and the priority.</text:span></text:p>
      <text:p text:style-name="P150"/>
      <text:p text:style-name="P129"><text:span text:style-name="T911">1 </text:span><text:span text:style-name="T834">#include </text:span><text:span text:style-name="T835">&lt;stdio.h&gt;</text:span></text:p>
      <text:p text:style-name="P129"><text:span text:style-name="T912">2</text:span><text:span text:style-name="T911"> </text:span><text:span text:style-name="T834">#include </text:span><text:span text:style-name="T835">&lt;stdlib.h&gt;</text:span></text:p>
      <text:p text:style-name="P129"><text:span text:style-name="T912">3</text:span><text:span text:style-name="T911"> </text:span><text:span text:style-name="T834">#include </text:span><text:span text:style-name="T835">&lt;string.h&gt;</text:span></text:p>
      <text:p text:style-name="P129"><text:span text:style-name="T912">4</text:span><text:span text:style-name="T911"> </text:span><text:span text:style-name="T834">#include </text:span><text:span text:style-name="T835">&lt;mqueue.h&gt;</text:span></text:p>
      <text:p text:style-name="P129"><text:span text:style-name="T912">5</text:span><text:span text:style-name="T911"> </text:span><text:span text:style-name="T834">#include </text:span><text:span text:style-name="T835">&lt;fcntl.h&gt;</text:span></text:p>
      <text:p text:style-name="P129"><text:span text:style-name="T912">6</text:span><text:span text:style-name="T911"> </text:span><text:span text:style-name="T834">#include </text:span><text:span text:style-name="T835">&lt;err.h&gt;</text:span></text:p>
      <text:p text:style-name="P130"/>
      <text:p text:style-name="P129"><text:span text:style-name="T912">7</text:span><text:span text:style-name="T911"> </text:span><text:span text:style-name="T834">#define MAX_SIZE </text:span><text:span text:style-name="T872">128</text:span></text:p>
      <text:p text:style-name="P130"/>
      <text:p text:style-name="P129"><text:span text:style-name="T912">8</text:span><text:span text:style-name="T911"> </text:span><text:span text:style-name="T834">int</text:span> main(<text:span text:style-name="T834">int</text:span> argc, <text:span text:style-name="T834">char</text:span> *argv<text:span text:style-name="T834">[]</text:span>) {</text:p>
      <text:p text:style-name="P131"><text:span text:style-name="T913">9</text:span><text:span text:style-name="T914"> <text:tab/></text:span><text:span text:style-name="T836">mqd_t</text:span><text:span text:style-name="T837"> mq;</text:span></text:p>
      <text:p text:style-name="P131"><text:span text:style-name="T914">1</text:span><text:span text:style-name="T913">0</text:span><text:span text:style-name="T914"> <text:tab/></text:span><text:span text:style-name="T836">struct</text:span><text:span text:style-name="T837"> </text:span><text:span text:style-name="T836">mq_attr</text:span><text:span text:style-name="T837"> attr;</text:span></text:p>
      <text:p text:style-name="P129"><text:span text:style-name="T911">1</text:span><text:span text:style-name="T912">1<text:tab/></text:span><text:span text:style-name="T834">char</text:span> *message;</text:p>
      <text:p text:style-name="P130"/>
      <text:p text:style-name="P129"><text:span text:style-name="T911">1</text:span><text:span text:style-name="T912">2</text:span><text:span text:style-name="T911"> <text:tab/></text:span><text:span text:style-name="T834">if</text:span> (argc != <text:span text:style-name="T872">4</text:span>) {</text:p>
      <text:p text:style-name="P129"><text:span text:style-name="T911">1</text:span><text:span text:style-name="T912">3</text:span><text:span text:style-name="T911"> <text:tab/><text:tab/></text:span>fprintf(<text:span text:style-name="T834">stderr</text:span>, <text:span text:style-name="T835">"Usage: %s &lt;mq-name&gt; &lt;msg&gt; &lt;pri&gt; \n"</text:span>, <text:tab/><text:tab/><text:tab/><text:tab/> <text:s text:c="2"/>argv[<text:span text:style-name="T872">0</text:span>]);</text:p>
      <text:p text:style-name="P129"><text:span text:style-name="T911">1</text:span><text:span text:style-name="T912">4</text:span><text:span text:style-name="T911"> <text:tab/><text:tab/></text:span>exit(<text:span text:style-name="T834">EXIT_FAILURE</text:span>);</text:p>
      <text:p text:style-name="P129"><text:span text:style-name="T911">1</text:span><text:span text:style-name="T912">5</text:span><text:span text:style-name="T911"> <text:tab/></text:span>}</text:p>
      <text:p text:style-name="P130"/>
      <text:p text:style-name="P129"><text:span text:style-name="T911">1</text:span><text:span text:style-name="T912">6</text:span><text:span text:style-name="T911"> <text:tab/></text:span>attr.mq_flags = <text:span text:style-name="T872">0</text:span>;</text:p>
      <text:p text:style-name="P129"><text:span text:style-name="T911">1</text:span><text:span text:style-name="T912">7</text:span><text:span text:style-name="T911"> <text:tab/></text:span>attr.mq_maxmsg = <text:span text:style-name="T872">10</text:span>;</text:p>
      <text:p text:style-name="P129"><text:span text:style-name="T911">1</text:span><text:span text:style-name="T912">8</text:span><text:span text:style-name="T911"> <text:tab/></text:span>attr.mq_msgsize = <text:span text:style-name="T834">MAX_SIZE</text:span>;</text:p>
      <text:p text:style-name="P132"><text:span text:style-name="T915">1</text:span><text:span text:style-name="T916">9<text:tab/></text:span><text:span text:style-name="T841">attr.mq_curmsgs = </text:span><text:span text:style-name="T882">0</text:span><text:span text:style-name="T841">;</text:span></text:p>
      <text:p text:style-name="P169"/>
      <text:p text:style-name="P129"><text:span text:style-name="T912">20</text:span><text:span text:style-name="T911"> <text:tab/></text:span>message = argv[<text:span text:style-name="T872">2</text:span>];</text:p>
      <text:p text:style-name="P129"><text:span text:style-name="T912">2</text:span><text:span text:style-name="T911">1 <text:tab/></text:span>printf(<text:span text:style-name="T835">"%s %d"</text:span>, message, strlen(message));</text:p>
      <text:p text:style-name="P130"/>
      <text:p text:style-name="P129"><text:span text:style-name="T912">22</text:span><text:span text:style-name="T911"> <text:tab/></text:span>mq = <text:span text:style-name="T827">mq_open</text:span>(argv[<text:span text:style-name="T872">1</text:span>], <text:span text:style-name="T834">O_CREAT</text:span> | <text:span text:style-name="T834">O_WRONLY</text:span>, <text:span text:style-name="T872">0644</text:span>, <text:span text:style-name="T834">NULL</text:span>);</text:p>
      <text:p text:style-name="P129"><text:span text:style-name="T912">23</text:span><text:span text:style-name="T911"> <text:tab/></text:span><text:span text:style-name="T834">if</text:span> (mq == (mqd_t) -<text:span text:style-name="T872">1</text:span>) {</text:p>
      <text:p text:style-name="P129"><text:span text:style-name="T912">24</text:span><text:span text:style-name="T911"> <text:tab/><text:tab/></text:span>perror(<text:span text:style-name="T835">"mq_open"</text:span>);</text:p>
      <text:p text:style-name="P129"><text:span text:style-name="T912">25</text:span><text:span text:style-name="T911"> <text:tab/><text:tab/></text:span>exit(<text:span text:style-name="T872">1</text:span>);</text:p>
      <text:p text:style-name="P132"><text:span text:style-name="T916">26</text:span><text:span text:style-name="T915"> <text:tab/></text:span><text:span text:style-name="T841">}</text:span></text:p>
      <text:p text:style-name="P129"><text:span text:style-name="T912">27</text:span><text:span text:style-name="T911"> <text:tab/></text:span><text:span text:style-name="T834">if</text:span> (<text:span text:style-name="T827">mq_send</text:span>(mq,message,strlen(message) + <text:span text:style-name="T872">1</text:span>, atoi(argv[<text:span text:style-name="T872">3</text:span>])) == -<text:span text:style-name="T872">1</text:span>) {</text:p>
      <text:p text:style-name="P129"><text:span text:style-name="T912">28</text:span><text:span text:style-name="T911"> <text:tab/><text:tab/></text:span>perror(<text:span text:style-name="T835">"mq_send"</text:span>);</text:p>
      <text:p text:style-name="P129"><text:soft-page-break/><text:span text:style-name="T912">29</text:span><text:span text:style-name="T911"> <text:tab/><text:tab/></text:span>exit(<text:span text:style-name="T872">1</text:span>);</text:p>
      <text:p text:style-name="P132"><text:span text:style-name="T916">30</text:span><text:span text:style-name="T915"> <text:tab/></text:span><text:span text:style-name="T841">}</text:span></text:p>
      <text:p text:style-name="P129"><text:span text:style-name="T912">3</text:span><text:span text:style-name="T911">1 <text:tab/></text:span><text:span text:style-name="T827">mq_close</text:span>(mq);</text:p>
      <text:p text:style-name="P129"><text:span text:style-name="T912">32</text:span><text:span text:style-name="T911"> <text:tab/></text:span><text:span text:style-name="T834">return</text:span> <text:span text:style-name="T872">0</text:span>;</text:p>
      <text:p text:style-name="P132"><text:span text:style-name="T916">33</text:span><text:span text:style-name="T915"> </text:span><text:span text:style-name="T841">}</text:span></text:p>
      <text:p text:style-name="P150"/>
      <text:p text:style-name="P116"><text:span text:style-name="Strong_20_Emphasis"><text:span text:style-name="T917">mqsndmsg.c</text:span></text:span><text:span text:style-name="Strong_20_Emphasis"><text:span text:style-name="T918"> Sender</text:span></text:span></text:p>
      <text:p text:style-name="P170">After setting the attributes, the program creates/opens the queue, sends the message and closes the queue.</text:p>
      <text:p text:style-name="P170"/>
      <text:p text:style-name="P150"/>
      <text:p text:style-name="P129"><text:span text:style-name="T919">1 </text:span><text:span text:style-name="T834">#include </text:span><text:span text:style-name="T835">&lt;stdio.h&gt;</text:span></text:p>
      <text:p text:style-name="P129"><text:span text:style-name="T919">2 </text:span><text:span text:style-name="T834">#include </text:span><text:span text:style-name="T835">&lt;stdlib.h&gt;</text:span></text:p>
      <text:p text:style-name="P129"><text:span text:style-name="T919">3 </text:span><text:span text:style-name="T834">#include </text:span><text:span text:style-name="T835">&lt;mqueue.h&gt;</text:span></text:p>
      <text:p text:style-name="P129"><text:span text:style-name="T919">4 </text:span><text:span text:style-name="T834">#include </text:span><text:span text:style-name="T835">&lt;fcntl.h&gt;</text:span></text:p>
      <text:p text:style-name="P129"><text:span text:style-name="T919">5 </text:span><text:span text:style-name="T834">#include </text:span><text:span text:style-name="T835">&lt;sys/stat.h&gt;</text:span></text:p>
      <text:p text:style-name="P130"/>
      <text:p text:style-name="P129"><text:span text:style-name="T919">6 </text:span><text:span text:style-name="T834">int</text:span> main(<text:span text:style-name="T834">int</text:span> argc, <text:span text:style-name="T834">char</text:span> *argv<text:span text:style-name="T834">[]</text:span>) {</text:p>
      <text:p text:style-name="P131"><text:span text:style-name="T920">7 <text:tab/></text:span><text:span text:style-name="T836">mqd_t</text:span><text:span text:style-name="T837"> mq;</text:span></text:p>
      <text:p text:style-name="P129"><text:span text:style-name="T919">8 <text:tab/></text:span><text:span text:style-name="T834">void</text:span> *buffer;</text:p>
      <text:p text:style-name="P129"><text:span text:style-name="T919">9 <text:tab/></text:span><text:span text:style-name="T834">unsigned</text:span> <text:span text:style-name="T834">int</text:span> priority;</text:p>
      <text:p text:style-name="P131"><text:span text:style-name="T920">10<text:tab/></text:span><text:span text:style-name="T836">struct</text:span><text:span text:style-name="T837"> </text:span><text:span text:style-name="T836">mq_attr</text:span><text:span text:style-name="T837"> attr;</text:span></text:p>
      <text:p text:style-name="P130"/>
      <text:p text:style-name="P129"><text:span text:style-name="T919">11 <text:tab/></text:span><text:span text:style-name="T834">if</text:span> (argc != <text:span text:style-name="T872">2</text:span>) {</text:p>
      <text:p text:style-name="P129"><text:span text:style-name="T919">12 <text:tab/><text:tab/></text:span>fprintf(<text:span text:style-name="T834">stderr</text:span>, <text:span text:style-name="T835">"\nUsage: %s &lt;mq-name&gt;"</text:span>, argv[<text:span text:style-name="T872">0</text:span>]);</text:p>
      <text:p text:style-name="P129"><text:span text:style-name="T919">13 <text:tab/><text:tab/></text:span>exit(<text:span text:style-name="T834">EXIT_FAILURE</text:span>);</text:p>
      <text:p text:style-name="P129"><text:span text:style-name="T919">14 <text:tab/></text:span>}</text:p>
      <text:p text:style-name="P130"/>
      <text:p text:style-name="P129"><text:span text:style-name="T919">15 <text:tab/></text:span>mq = <text:span text:style-name="T827">mq_open</text:span>(argv[<text:span text:style-name="T872">1</text:span>], <text:span text:style-name="T834">O_RDONLY</text:span>, <text:span text:style-name="T872">0644</text:span>, &amp;attr);</text:p>
      <text:p text:style-name="P129"><text:span text:style-name="T919">16 <text:tab/></text:span><text:span text:style-name="T834">if</text:span> (mq == (mqd_t) -<text:span text:style-name="T872">1</text:span>) {</text:p>
      <text:p text:style-name="P129"><text:span text:style-name="T919">17 <text:tab/><text:tab/></text:span>perror(<text:span text:style-name="T835">"mq_open"</text:span>);</text:p>
      <text:p text:style-name="P129"><text:span text:style-name="T919">18 <text:tab/><text:tab/></text:span>exit(<text:span text:style-name="T872">1</text:span>);</text:p>
      <text:p text:style-name="P129"><text:span text:style-name="T919">19 <text:tab/></text:span>}</text:p>
      <text:p text:style-name="P130"/>
      <text:p text:style-name="P129"><text:span text:style-name="T919">20 <text:tab/></text:span><text:span text:style-name="T834">if</text:span> (<text:span text:style-name="T827">mq_getattr</text:span>(mq, &amp;attr) == -<text:span text:style-name="T872">1</text:span>) {</text:p>
      <text:p text:style-name="P129"><text:span text:style-name="T919">21 <text:tab/><text:tab/></text:span>perror(<text:span text:style-name="T835">"mq_getattr"</text:span>);</text:p>
      <text:p text:style-name="P129"><text:span text:style-name="T919">22 <text:tab/><text:tab/></text:span>exit(<text:span text:style-name="T834">EXIT_FAILURE</text:span>);</text:p>
      <text:p text:style-name="P129"><text:span text:style-name="T919">23 <text:tab/></text:span>}</text:p>
      <text:p text:style-name="P130"/>
      <text:p text:style-name="P129"><text:span text:style-name="T919">24 <text:tab/></text:span>buffer = <text:span text:style-name="T827">malloc</text:span>(attr.mq_msgsize);</text:p>
      <text:p text:style-name="P129"><text:span text:style-name="T919">25 <text:tab/></text:span><text:span text:style-name="T834">if</text:span> (buffer == <text:span text:style-name="T834">NULL</text:span>) {</text:p>
      <text:p text:style-name="P129"><text:span text:style-name="T919">26 <text:tab/><text:tab/></text:span>perror(<text:span text:style-name="T835">"malloc"</text:span>);</text:p>
      <text:p text:style-name="P129"><text:span text:style-name="T919">27 <text:tab/><text:tab/></text:span>exit(<text:span text:style-name="T834">EXIT_FAILURE</text:span>);</text:p>
      <text:p text:style-name="P129"><text:span text:style-name="T919">28 <text:tab/></text:span>}<text:tab/> </text:p>
      <text:p text:style-name="P129"><text:span text:style-name="T919">29 <text:tab/></text:span><text:span text:style-name="T834">if</text:span> (<text:span text:style-name="T827">mq_receive</text:span>(mq, buffer, attr.mq_msgsize, &amp;priority) == -<text:span text:style-name="T872">1</text:span>) {</text:p>
      <text:p text:style-name="P129"><text:span text:style-name="T919">30 <text:tab/><text:tab/></text:span>perror(<text:span text:style-name="T835">"mq_receive"</text:span>);</text:p>
      <text:p text:style-name="P129"><text:span text:style-name="T919">31 <text:tab/><text:tab/></text:span>exit(<text:span text:style-name="T872">1</text:span>);</text:p>
      <text:p text:style-name="P129"><text:span text:style-name="T919">32 <text:tab/></text:span>}</text:p>
      <text:p text:style-name="P130"><text:soft-page-break/></text:p>
      <text:p text:style-name="P129"><text:span text:style-name="T919">33 <text:tab/></text:span>printf(<text:span text:style-name="T835">"Received message: %s "</text:span>, buffer);</text:p>
      <text:p text:style-name="P132"><text:span text:style-name="T921">34<text:tab/></text:span><text:span text:style-name="T841">printf(</text:span><text:span text:style-name="T847">"Priority: %u\n"</text:span><text:span text:style-name="T841">, priority);</text:span></text:p>
      <text:p text:style-name="P129"><text:span text:style-name="T919">35 <text:tab/></text:span><text:span text:style-name="T827">mq_close</text:span>(mq);</text:p>
      <text:p text:style-name="P129"><text:span text:style-name="T919">36 <text:tab/></text:span><text:span text:style-name="T827">free</text:span>(buffer);</text:p>
      <text:p text:style-name="P129"><text:span text:style-name="T919">37 <text:tab/></text:span><text:span text:style-name="T834">return</text:span> <text:span text:style-name="T872">0</text:span>;</text:p>
      <text:p text:style-name="P132"><text:span text:style-name="T921">38 </text:span><text:span text:style-name="T841">}</text:span></text:p>
      <text:p text:style-name="P150"/>
      <text:p text:style-name="P116"><text:span text:style-name="Strong_20_Emphasis"><text:span text:style-name="T917">mqrcvmsg.c</text:span></text:span><text:span text:style-name="Strong_20_Emphasis"><text:span text:style-name="T918"> Receiver</text:span></text:span></text:p>
      <text:p text:style-name="P171">The receiver opens the queue at line 15, and retrieves the attributes at line 20 using <text:span text:style-name="T212">mq_getattr</text:span>.</text:p>
      <text:p text:style-name="P112"><text:span text:style-name="T922">Next, at line 24, it allocates memory for the buffer using the </text:span><text:span text:style-name="T923">mq_msgsiz</text:span><text:span text:style-name="T922">e field of the </text:span><text:span text:style-name="T924">attr</text:span><text:span text:style-name="T922"> structure. <text:s/></text:span></text:p>
      <text:p text:style-name="P112"><text:span text:style-name="T922">At line 29, it reads the message from the queue using </text:span><text:span text:style-name="T924">mq_receive</text:span><text:span text:style-name="T922">.</text:span></text:p>
      <text:p text:style-name="P171">In lines 35-36, the program closes the queue and frees the memory. </text:p>
      <text:p text:style-name="P113"/>
      <text:p text:style-name="P171">Let’s execute. </text:p>
      <text:p text:style-name="P171"/>
      <table:table table:name="Table36" table:style-name="Table36">
        <table:table-column table:style-name="Table36.A"/>
        <table:table-row>
          <table:table-cell table:style-name="Table36.A1" office:value-type="string">
            <text:p text:style-name="P120"><text:span text:style-name="T806">[</text:span><text:a xlink:type="simple" xlink:href="mailto:linux@process" text:style-name="Internet_20_link" text:visited-style-name="Visited_20_Internet_20_Link"><text:span text:style-name="T806">linux@</text:span><text:span text:style-name="T807">ipc</text:span><text:span text:style-name="T806">]</text:span></text:a><text:span text:style-name="T808"> </text:span><text:span text:style-name="Strong_20_Emphasis"><text:span text:style-name="T805">./mqsndmsg /newqu "msg-a" 5</text:span></text:span></text:p>
            <text:p text:style-name="P120"><text:span text:style-name="Strong_20_Emphasis"><text:span text:style-name="T805">msg-a 5 <text:s text:c="16"/></text:span></text:span></text:p>
            <text:p text:style-name="P120"><text:span text:style-name="Strong_20_Emphasis"><text:span text:style-name="T805"/></text:span></text:p>
            <text:p text:style-name="P120"><text:span text:style-name="T806">[</text:span><text:a xlink:type="simple" xlink:href="mailto:linux@process" text:style-name="Internet_20_link" text:visited-style-name="Visited_20_Internet_20_Link"><text:span text:style-name="T806">linux@</text:span><text:span text:style-name="T807">ipc</text:span><text:span text:style-name="T806">]</text:span></text:a><text:span text:style-name="T808"> </text:span><text:span text:style-name="Strong_20_Emphasis"><text:span text:style-name="T805">./mqsndmsg /newqu <text:s/>"msg-b" 1</text:span></text:span></text:p>
            <text:p text:style-name="P120"><text:span text:style-name="Strong_20_Emphasis"><text:span text:style-name="T805">msg-b 5 <text:s text:c="20"/></text:span></text:span></text:p>
            <text:p text:style-name="P120"><text:span text:style-name="Strong_20_Emphasis"><text:span text:style-name="T805"/></text:span></text:p>
            <text:p text:style-name="P120"><text:span text:style-name="T806">[</text:span><text:a xlink:type="simple" xlink:href="mailto:linux@process" text:style-name="Internet_20_link" text:visited-style-name="Visited_20_Internet_20_Link"><text:span text:style-name="T806">linux@</text:span><text:span text:style-name="T807">ipc</text:span><text:span text:style-name="T806">]</text:span></text:a><text:span text:style-name="T808"> </text:span><text:span text:style-name="Strong_20_Emphasis"><text:span text:style-name="T805">./mqsndmsg /newqu "msg-c" 10</text:span></text:span></text:p>
            <text:p text:style-name="P120"><text:span text:style-name="Strong_20_Emphasis"><text:span text:style-name="T805">msg-c 5 <text:s text:c="19"/></text:span></text:span></text:p>
            <text:p text:style-name="P120"><text:span text:style-name="Strong_20_Emphasis"><text:span text:style-name="T805"/></text:span></text:p>
            <text:p text:style-name="P120"><text:span text:style-name="Strong_20_Emphasis"><text:span text:style-name="T810">[</text:span></text:span><text:a xlink:type="simple" xlink:href="mailto:linux@process" text:style-name="Internet_20_link" text:visited-style-name="Visited_20_Internet_20_Link"><text:span text:style-name="Strong_20_Emphasis"><text:span text:style-name="T810">linux@</text:span></text:span><text:span text:style-name="Strong_20_Emphasis"><text:span text:style-name="T811">ipc</text:span></text:span><text:span text:style-name="Strong_20_Emphasis"><text:span text:style-name="T810">]</text:span></text:span></text:a><text:span text:style-name="Strong_20_Emphasis"><text:span text:style-name="T812"> </text:span></text:span><text:span text:style-name="Strong_20_Emphasis"><text:span text:style-name="T805">./mqsndmsg /newqu "msg-d" 3 </text:span></text:span></text:p>
            <text:p text:style-name="P120"><text:span text:style-name="Strong_20_Emphasis"><text:span text:style-name="T805">msg-d 5 <text:s text:c="22"/></text:span></text:span></text:p>
            <text:p text:style-name="P120"><text:span text:style-name="Strong_20_Emphasis"><text:span text:style-name="T805"/></text:span></text:p>
            <text:p text:style-name="P120"><text:span text:style-name="Strong_20_Emphasis"><text:span text:style-name="T810">[</text:span></text:span><text:a xlink:type="simple" xlink:href="mailto:linux@process" text:style-name="Internet_20_link" text:visited-style-name="Visited_20_Internet_20_Link"><text:span text:style-name="Strong_20_Emphasis"><text:span text:style-name="T810">linux@</text:span></text:span><text:span text:style-name="Strong_20_Emphasis"><text:span text:style-name="T811">ipc</text:span></text:span><text:span text:style-name="Strong_20_Emphasis"><text:span text:style-name="T810">]</text:span></text:span></text:a><text:span text:style-name="Strong_20_Emphasis"><text:span text:style-name="T812"> </text:span></text:span><text:span text:style-name="Strong_20_Emphasis"><text:span text:style-name="T805"><text:s/>./mqrcvmsg /newqu <text:s text:c="9"/></text:span></text:span></text:p>
            <text:p text:style-name="P120"><text:span text:style-name="Strong_20_Emphasis"><text:span text:style-name="T805">Received message: msg-c Priority: 10</text:span></text:span></text:p>
            <text:p text:style-name="P120"><text:span text:style-name="Strong_20_Emphasis"><text:span text:style-name="T805"/></text:span></text:p>
            <text:p text:style-name="P120"><text:span text:style-name="Strong_20_Emphasis"><text:span text:style-name="T810">[</text:span></text:span><text:a xlink:type="simple" xlink:href="mailto:linux@process" text:style-name="Internet_20_link" text:visited-style-name="Visited_20_Internet_20_Link"><text:span text:style-name="Strong_20_Emphasis"><text:span text:style-name="T810">linux@</text:span></text:span><text:span text:style-name="Strong_20_Emphasis"><text:span text:style-name="T811">ipc</text:span></text:span><text:span text:style-name="Strong_20_Emphasis"><text:span text:style-name="T810">]</text:span></text:span></text:a><text:span text:style-name="Strong_20_Emphasis"><text:span text:style-name="T812"> </text:span></text:span><text:span text:style-name="Strong_20_Emphasis"><text:span text:style-name="T805"><text:s/>./mqrcvmsg /newqu <text:s text:c="9"/></text:span></text:span></text:p>
            <text:p text:style-name="P120"><text:span text:style-name="Strong_20_Emphasis"><text:span text:style-name="T805">Received message: msg-a Priority: 5</text:span></text:span></text:p>
            <text:p text:style-name="P120"><text:span text:style-name="Strong_20_Emphasis"><text:span text:style-name="T805"/></text:span></text:p>
            <text:p text:style-name="P120"><text:span text:style-name="Strong_20_Emphasis"><text:span text:style-name="T810">[</text:span></text:span><text:a xlink:type="simple" xlink:href="mailto:linux@process" text:style-name="Internet_20_link" text:visited-style-name="Visited_20_Internet_20_Link"><text:span text:style-name="Strong_20_Emphasis"><text:span text:style-name="T810">linux@</text:span></text:span><text:span text:style-name="Strong_20_Emphasis"><text:span text:style-name="T811">ipc</text:span></text:span><text:span text:style-name="Strong_20_Emphasis"><text:span text:style-name="T810">]</text:span></text:span></text:a><text:span text:style-name="Strong_20_Emphasis"><text:span text:style-name="T812"> </text:span></text:span><text:span text:style-name="Strong_20_Emphasis"><text:span text:style-name="T805"><text:s/>./mqrcvmsg /newqu <text:s text:c="9"/></text:span></text:span></text:p>
            <text:p text:style-name="P120"><text:span text:style-name="Strong_20_Emphasis"><text:span text:style-name="T805">Received message: msg-d Priority: 3</text:span></text:span></text:p>
            <text:p text:style-name="P120"><text:span text:style-name="Strong_20_Emphasis"><text:span text:style-name="T805"/></text:span></text:p>
            <text:p text:style-name="P120"><text:span text:style-name="Strong_20_Emphasis"><text:span text:style-name="T810">[</text:span></text:span><text:a xlink:type="simple" xlink:href="mailto:linux@process" text:style-name="Internet_20_link" text:visited-style-name="Visited_20_Internet_20_Link"><text:span text:style-name="Strong_20_Emphasis"><text:span text:style-name="T810">linux@</text:span></text:span><text:span text:style-name="Strong_20_Emphasis"><text:span text:style-name="T811">ipc</text:span></text:span><text:span text:style-name="Strong_20_Emphasis"><text:span text:style-name="T810">]</text:span></text:span></text:a><text:span text:style-name="Strong_20_Emphasis"><text:span text:style-name="T812"> </text:span></text:span><text:span text:style-name="Strong_20_Emphasis"><text:span text:style-name="T805"><text:s/>./mqrcvmsg /newqu <text:s text:c="5"/></text:span></text:span></text:p>
            <text:p text:style-name="P120"><text:span text:style-name="Strong_20_Emphasis"><text:span text:style-name="T805">Received message: msg-b Priority: 1</text:span></text:span></text:p>
            <text:p text:style-name="P120"><text:span text:style-name="Strong_20_Emphasis"><text:span text:style-name="T805"><text:s text:c="4"/></text:span></text:span></text:p>
          </table:table-cell>
        </table:table-row>
      </table:table>
      <text:p text:style-name="P171"/>
      <text:p text:style-name="P172">Messages are read from the queue based on their priority. </text:p>
      <text:p text:style-name="P113"/>
      <text:p text:style-name="P113"/>
      <text:p text:style-name="P113"/>
      <text:p text:style-name="P113"/>
      <text:p text:style-name="P113"/>
      <text:p text:style-name="P113"/>
      <text:p text:style-name="P124"><text:soft-page-break/><text:span text:style-name="Strong_20_Emphasis"><text:span text:style-name="T819">VI.</text:span></text:span><text:span text:style-name="Strong_20_Emphasis"><text:span text:style-name="T889">2</text:span></text:span><text:span text:style-name="Strong_20_Emphasis"><text:span text:style-name="T819">.</text:span></text:span><text:span text:style-name="Strong_20_Emphasis"><text:span text:style-name="T889">4</text:span></text:span><text:span text:style-name="Strong_20_Emphasis"><text:span text:style-name="T819"> </text:span></text:span><text:span text:style-name="T925">Message queue notification: </text:span><text:span text:style-name="T926">mq_notify</text:span></text:p>
      <text:p text:style-name="P106"/>
      <text:p text:style-name="P106">A process can register to receive asynchronous notifications when a message arrives in the message queue. <text:span text:style-name="T927">The </text:span><text:span text:style-name="T928">mq_notify</text:span><text:span text:style-name="T928"><text:note text:id="ftn10" text:note-class="footnote"><text:note-citation>10</text:note-citation><text:note-body><text:p text:style-name="P173">See the <text:span text:style-name="T212">mq_notify(3)</text:span> manual page</text:p></text:note-body></text:note></text:span><text:span text:style-name="T927"> function alllows the calling process to register or unregister for delivery of an asynchronous notification. </text:span></text:p>
      <text:p text:style-name="P113"/>
      <table:table table:name="Table28" table:style-name="Table28">
        <table:table-column table:style-name="Table28.A"/>
        <table:table-row>
          <table:table-cell table:style-name="Table28.A1" office:value-type="string">
            <text:p text:style-name="P128"><text:span text:style-name="T834">#include </text:span><text:span text:style-name="T835">&lt;mqueue.h&gt;</text:span></text:p>
            <text:p text:style-name="P129"><text:span text:style-name="T834">#include </text:span><text:span text:style-name="T835">&lt;signal.h&gt;</text:span><text:span text:style-name="T834"> </text:span></text:p>
            <text:p text:style-name="P130"/>
            <text:p text:style-name="P131"><text:span text:style-name="T836">int</text:span><text:span text:style-name="T837"> </text:span><text:span text:style-name="T838">mq_notify</text:span><text:span text:style-name="T837">(</text:span><text:span text:style-name="T836">mqd_t</text:span><text:span text:style-name="T837"> </text:span><text:span text:style-name="T839">mqdes</text:span><text:span text:style-name="T837">, </text:span><text:span text:style-name="T836">const</text:span><text:span text:style-name="T837"> </text:span><text:span text:style-name="T836">struct</text:span><text:span text:style-name="T837"> </text:span><text:span text:style-name="T836">sigevent</text:span><text:span text:style-name="T837"> </text:span><text:span text:style-name="T839">*sevp</text:span><text:span text:style-name="T837">);</text:span></text:p>
            <text:p text:style-name="P174"/>
            <text:p text:style-name="P175">Returns: on success 0, on error -1 and errno</text:p>
          </table:table-cell>
        </table:table-row>
      </table:table>
      <text:p text:style-name="P113"/>
      <text:p text:style-name="P106"><text:span text:style-name="T928">mqdes</text:span><text:span text:style-name="T929"> is the message queue descriptor.</text:span></text:p>
      <text:p text:style-name="P112"><text:span text:style-name="T929">The </text:span><text:span text:style-name="T928">sevp</text:span><text:span text:style-name="T929"> argument is a pointer to a </text:span><text:span text:style-name="T928">sigevent</text:span><text:span text:style-name="T929"> structure. If this parameter is a non-null pointer, </text:span><text:span text:style-name="T928">mq_notify</text:span><text:span text:style-name="T929"> registers the process to receive notifications. The </text:span><text:span text:style-name="T928">sigev_notify</text:span><text:span text:style-name="T929"> of </text:span><text:span text:style-name="T928">sevp</text:span><text:span text:style-name="T929"> specifies how notification is performed. It can have one of the following value:</text:span></text:p>
      <text:p text:style-name="P176"/>
      <text:p text:style-name="P106"><text:span text:style-name="T928">SIGEV_NONE</text:span> </text:p>
      <text:p text:style-name="P112"><text:tab/>A "null" notification: the calling process is registered as the target for notification, but when <text:tab/>a message arrives, no notification is sent</text:p>
      <text:p text:style-name="P121"/>
      <text:p text:style-name="P106"><text:span text:style-name="T928">SIGEV_SIGNAL</text:span><text:line-break/><text:tab/>Notify the process by sending the signal specified in <text:span text:style-name="T928">sigev_signo</text:span>. The <text:span text:style-name="T928">si_code</text:span> field <text:tab/>of the <text:tab/><text:span text:style-name="T928">siginfo_t</text:span> structure will be set to <text:span text:style-name="T928">SI_MESGQ</text:span>. In addition, <text:span text:style-name="T928">si_pid</text:span> will be set to <text:tab/>the PID <text:span text:style-name="T930">t</text:span>he process that sent the message, and <text:span text:style-name="T928">si_uid</text:span> will be set to the real user ID of the <text:tab/>sending proces<text:span text:style-name="T931">s<text:tab/></text:span></text:p>
      <text:p text:style-name="P121"/>
      <text:p text:style-name="P106"><text:span text:style-name="T928">SIGEV_THREAD</text:span><text:line-break/><text:tab/>Upon message delivery, invoke <text:span text:style-name="T928">sigev_notify_function</text:span> as if it were the start <text:tab/>function of a <text:span text:style-name="T930">n</text:span>ew thread</text:p>
      <text:p text:style-name="P106"/>
      <text:p text:style-name="P106">Only one process can be registered to receive notification from a message queue.</text:p>
      <text:p text:style-name="P112">If <text:span text:style-name="Source_20_Text"><text:span text:style-name="T928">sevp</text:span></text:span> is <text:span text:style-name="Source_20_Text"><text:span text:style-name="T928">NULL</text:span></text:span> and the calling process is currently registered to receive notifications for the message queue, the registration is removed. This allows another process to register for message notifications on the same queue.</text:p>
      <text:p text:style-name="P112">A notification is generated only when a <text:span text:style-name="Strong_20_Emphasis"><text:span text:style-name="T131">new message arrives in an empty queue</text:span></text:span>. If the queue is not empty at the time <text:span text:style-name="Source_20_Text"><text:span text:style-name="T928">mq_notify</text:span></text:span> is called, a notification will be triggered only after the queue has been emptied and a new message arrives.</text:p>
      <text:p text:style-name="P112"/>
      <text:p text:style-name="P112">If another process or thread is already blocked in <text:span text:style-name="Source_20_Text"><text:span text:style-name="T928">mq_receive</text:span></text:span> waiting for a message from an empty queue, the notification mechanism is bypassed. In this case, the message is delivered directly to the waiting process or thread, and the notification registration remains active.</text:p>
      <text:p text:style-name="P112">Notifications are delivered <text:span text:style-name="Strong_20_Emphasis"><text:span text:style-name="T131">only once</text:span></text:span>. After a notification is triggered, the registration is automatically removed, allowing another process to register. If the same process wishes to receive further notifications, it must call <text:span text:style-name="Source_20_Text"><text:span text:style-name="T928">mq_notify</text:span></text:span> again. This re-registration should typically occur before all pending messages are consumed. Using nonblocking mode can help empty the queue without blocking when no messages remain.</text:p>
      <text:p text:style-name="P116"><text:soft-page-break/><text:span text:style-name="Strong_20_Emphasis"><text:span text:style-name="T932">VI.2.5 </text:span></text:span><text:span text:style-name="T932">Notification via thread</text:span></text:p>
      <text:p text:style-name="P112"/>
      <text:p text:style-name="P112">The <text:span text:style-name="T933">mqnotify.c</text:span> program <text:span text:style-name="T934">is taken from the </text:span><text:span text:style-name="T933">mq_notify(</text:span><text:span text:style-name="T935">3</text:span><text:span text:style-name="T933">)</text:span><text:span text:style-name="T934"> manual page, it </text:span>registers a notification request for the message queue specified as a command-line argument. Notification is implemented by creating a thread, which executes a handler function that reads one message from the queue and then terminates the process.</text:p>
      <text:p text:style-name="P132"/>
      <text:p text:style-name="P150"/>
      <text:p text:style-name="P165"><text:span text:style-name="T936">1 </text:span><text:span text:style-name="T846">#include </text:span><text:span text:style-name="T847">&lt;err.h&gt;</text:span></text:p>
      <text:p text:style-name="P129"><text:span text:style-name="T937">2 </text:span><text:span text:style-name="T834">#include </text:span><text:span text:style-name="T835">&lt;mqueue.h&gt;</text:span></text:p>
      <text:p text:style-name="P129"><text:span text:style-name="T937">3 </text:span><text:span text:style-name="T834">#include </text:span><text:span text:style-name="T835">&lt;pthread.h&gt;</text:span></text:p>
      <text:p text:style-name="P129"><text:span text:style-name="T937">4 </text:span><text:span text:style-name="T834">#include </text:span><text:span text:style-name="T835">&lt;signal.h&gt;</text:span></text:p>
      <text:p text:style-name="P129"><text:span text:style-name="T937">5 </text:span><text:span text:style-name="T834">#include </text:span><text:span text:style-name="T835">&lt;stdio.h&gt;</text:span><text:span text:style-name="T937"> </text:span></text:p>
      <text:p text:style-name="P129"><text:span text:style-name="T937">6 </text:span><text:span text:style-name="T834">#include </text:span><text:span text:style-name="T835">&lt;stdlib.h&gt;</text:span></text:p>
      <text:p text:style-name="P129"><text:span text:style-name="T937">7 </text:span><text:span text:style-name="T834">#include </text:span><text:span text:style-name="T835">&lt;unistd.h&gt;</text:span></text:p>
      <text:p text:style-name="P130"/>
      <text:p text:style-name="P131"><text:span text:style-name="T938">8 </text:span><text:span text:style-name="T836">static</text:span><text:span text:style-name="T837"> </text:span><text:span text:style-name="T836">void</text:span><text:span text:style-name="T837"> tfunc(</text:span><text:span text:style-name="T836">union</text:span><text:span text:style-name="T837"> </text:span><text:span text:style-name="T836">sigval</text:span><text:span text:style-name="T837"> sv)</text:span><text:span text:style-name="T939"> </text:span></text:p>
      <text:p text:style-name="P129"><text:span text:style-name="T937">9 </text:span>{</text:p>
      <text:p text:style-name="P131"><text:span text:style-name="T938">10 <text:tab/></text:span><text:span text:style-name="T836">struct</text:span><text:span text:style-name="T837"> </text:span><text:span text:style-name="T836">mq_attr</text:span><text:span text:style-name="T837"> attr;</text:span></text:p>
      <text:p text:style-name="P129"><text:span text:style-name="T937">11 <text:tab/></text:span><text:span text:style-name="T834">ssize_t</text:span> nr;</text:p>
      <text:p text:style-name="P129"><text:span text:style-name="T937">12 <text:tab/></text:span><text:span text:style-name="T834">void</text:span> *buf;</text:p>
      <text:p text:style-name="P131"><text:span text:style-name="T938">13 <text:tab/></text:span><text:span text:style-name="T836">mqd_t</text:span><text:span text:style-name="T837"> mqdes = *((mqd_t *) sv.sival_ptr);</text:span></text:p>
      <text:p text:style-name="P130"/>
      <text:p text:style-name="P132"><text:span text:style-name="T936">14 <text:tab/></text:span><text:span text:style-name="T846">if</text:span><text:span text:style-name="T841"> (</text:span><text:span text:style-name="T874">mq_getattr</text:span><text:span text:style-name="T841">(mqdes, &amp;attr) == -</text:span><text:span text:style-name="T882">1</text:span><text:span text:style-name="T841">)</text:span></text:p>
      <text:p text:style-name="P129"><text:span text:style-name="T937">15 <text:tab/><text:tab/></text:span>err(<text:span text:style-name="T834">EXIT_FAILURE</text:span>, <text:span text:style-name="T835">"mq_getattr"</text:span>);</text:p>
      <text:p text:style-name="P129"><text:span text:style-name="T937">16 <text:tab/></text:span>buf = <text:span text:style-name="T827">malloc</text:span>(attr.mq_msgsize);</text:p>
      <text:p text:style-name="P129"><text:span text:style-name="T937">17 <text:tab/></text:span><text:span text:style-name="T834">if</text:span> (buf == <text:span text:style-name="T834">NULL</text:span>)</text:p>
      <text:p text:style-name="P129"><text:span text:style-name="T937">18 <text:tab/><text:tab/></text:span>err(<text:span text:style-name="T834">EXIT_FAILURE</text:span>, <text:span text:style-name="T835">"malloc"</text:span>);</text:p>
      <text:p text:style-name="P130"/>
      <text:p text:style-name="P131"><text:span text:style-name="T938">19 <text:tab/></text:span><text:span text:style-name="T837">nr = </text:span><text:span text:style-name="T838">mq_receive</text:span><text:span text:style-name="T837">(mqdes, buf, attr.mq_msgsize, </text:span><text:span text:style-name="T836">NULL</text:span><text:span text:style-name="T837">);</text:span></text:p>
      <text:p text:style-name="P129"><text:span text:style-name="T937">20 <text:tab/></text:span><text:span text:style-name="T834">if</text:span> (nr == -<text:span text:style-name="T872">1</text:span>)</text:p>
      <text:p text:style-name="P129"><text:span text:style-name="T937">21 <text:tab/><text:tab/></text:span>err(<text:span text:style-name="T834">EXIT_FAILURE</text:span>, <text:span text:style-name="T835">"mq_receive"</text:span>);</text:p>
      <text:p text:style-name="P130"/>
      <text:p text:style-name="P129"><text:span text:style-name="T937">22 <text:tab/></text:span>printf(<text:span text:style-name="T835">"Read %zd bytes from MQ\n"</text:span>, nr);</text:p>
      <text:p text:style-name="P129"><text:span text:style-name="T937">23<text:tab/></text:span><text:span text:style-name="T827">free</text:span>(buf);</text:p>
      <text:p text:style-name="P131"><text:span text:style-name="T938">24 <text:tab/></text:span><text:span text:style-name="T838">exit</text:span><text:span text:style-name="T837">(</text:span><text:span text:style-name="T836">EXIT_SUCCESS</text:span><text:span text:style-name="T837">);</text:span><text:span text:style-name="T939"> </text:span></text:p>
      <text:p text:style-name="P129"><text:span text:style-name="T937">25 </text:span>}</text:p>
      <text:p text:style-name="P130"/>
      <text:p text:style-name="P129"><text:span text:style-name="T937">26 </text:span><text:span text:style-name="T834">int</text:span> main(<text:span text:style-name="T834">int</text:span> argc, <text:span text:style-name="T834">char</text:span> *argv<text:span text:style-name="T834">[]</text:span>)</text:p>
      <text:p text:style-name="P129"><text:span text:style-name="T937">27 </text:span>{</text:p>
      <text:p text:style-name="P131"><text:span text:style-name="T938">28 <text:tab/></text:span><text:span text:style-name="T836">mqd_t</text:span><text:span text:style-name="T837"> mqdes;</text:span></text:p>
      <text:p text:style-name="P131"><text:span text:style-name="T938">29 <text:tab/></text:span><text:span text:style-name="T836">struct</text:span><text:span text:style-name="T837"> </text:span><text:span text:style-name="T836">sigevent</text:span><text:span text:style-name="T837"> sev;</text:span></text:p>
      <text:p text:style-name="P130"/>
      <text:p text:style-name="P129"><text:span text:style-name="T937">30 <text:tab/></text:span><text:span text:style-name="T834">if</text:span> (argc != <text:span text:style-name="T872">2</text:span>) {</text:p>
      <text:p text:style-name="P129"><text:span text:style-name="T937">31 <text:tab/><text:tab/></text:span>fprintf(<text:span text:style-name="T834">stderr</text:span>, <text:span text:style-name="T835">"Usage: %s &lt;mq-name&gt;\n"</text:span>, argv[<text:span text:style-name="T872">0</text:span>]);</text:p>
      <text:p text:style-name="P129"><text:span text:style-name="T937">32 <text:tab/><text:tab/></text:span>exit(<text:span text:style-name="T834">EXIT_FAILURE</text:span>);</text:p>
      <text:p text:style-name="P129"><text:span text:style-name="T937">33 <text:tab/></text:span>}</text:p>
      <text:p text:style-name="P130"/>
      <text:p text:style-name="P129"><text:soft-page-break/><text:span text:style-name="T937">34 <text:tab/></text:span>mqdes = <text:span text:style-name="T827">mq_open</text:span>(argv[<text:span text:style-name="T872">1</text:span>], <text:span text:style-name="T834">O_RDONLY</text:span>);</text:p>
      <text:p text:style-name="P129"><text:span text:style-name="T937">35 <text:tab/></text:span><text:span text:style-name="T834">if</text:span> (mqdes == (mqd_t) -<text:span text:style-name="T872">1</text:span>)</text:p>
      <text:p text:style-name="P129"><text:span text:style-name="T937">36 <text:tab/><text:tab/></text:span>err(<text:span text:style-name="T834">EXIT_FAILURE</text:span>, <text:span text:style-name="T835">"mq_open"</text:span>);</text:p>
      <text:p text:style-name="P131"><text:span text:style-name="T938">37 <text:tab/></text:span><text:span text:style-name="T837">sev.sigev_notify = </text:span><text:span text:style-name="T836">SIGEV_THREAD</text:span><text:span text:style-name="T837">;</text:span></text:p>
      <text:p text:style-name="P131"><text:span text:style-name="T938">38<text:tab/></text:span><text:span text:style-name="T837">sev.sigev_notify_function = tfunc;</text:span></text:p>
      <text:p text:style-name="P131"><text:span text:style-name="T938">39 <text:tab/></text:span><text:span text:style-name="T837">sev.sigev_notify_attributes = </text:span><text:span text:style-name="T836">NULL</text:span><text:span text:style-name="T837">;</text:span></text:p>
      <text:p text:style-name="P129"><text:span text:style-name="T937">40 <text:tab/></text:span>sev.sigev_value.sival_ptr = &amp;mqdes;<text:span text:style-name="T843"> </text:span></text:p>
      <text:p text:style-name="P129"><text:span text:style-name="T937">41 <text:tab/></text:span><text:span text:style-name="T834">if</text:span> (<text:span text:style-name="T827">mq_notify</text:span>(mqdes, &amp;sev) == -<text:span text:style-name="T872">1</text:span>)</text:p>
      <text:p text:style-name="P129"><text:span text:style-name="T937">42 <text:tab/><text:tab/></text:span>err(<text:span text:style-name="T834">EXIT_FAILURE</text:span>, <text:span text:style-name="T835">"mq_notify"</text:span>);</text:p>
      <text:p text:style-name="P130"/>
      <text:p text:style-name="P129"><text:span text:style-name="T937">43 <text:tab/></text:span><text:span text:style-name="T827">pause</text:span>();<text:span text:style-name="T843"> </text:span></text:p>
      <text:p text:style-name="P132"><text:span text:style-name="T936">44 </text:span><text:span text:style-name="T841">}</text:span></text:p>
      <text:p text:style-name="P150"/>
      <text:p text:style-name="P116"><text:span text:style-name="Strong_20_Emphasis"><text:span text:style-name="T940">mqnotify.c</text:span></text:span><text:span text:style-name="Strong_20_Emphasis"><text:span text:style-name="T941"> Notification</text:span></text:span></text:p>
      <text:p text:style-name="P106"/>
      <text:p text:style-name="P106">At line 29, a <text:span text:style-name="Source_20_Text"><text:span text:style-name="T212">struct sigevent</text:span></text:span> variable is declared. This structure is used to specify how the process will be notified when a message arrives in the queue.</text:p>
      <text:p text:style-name="P106">Next, the program opens the message queue using:</text:p>
      <text:p text:style-name="P106"/>
      <text:p text:style-name="P129"><text:span text:style-name="T937">34 <text:tab/></text:span>mqdes = <text:span text:style-name="T827">mq_open</text:span>(argv[<text:span text:style-name="T872">1</text:span>], <text:span text:style-name="T834">O_RDONLY</text:span>);</text:p>
      <text:p text:style-name="P106"/>
      <text:p text:style-name="P106">This call opens an existing message queue in read-only mode. It assumes that the queue has already been created; otherwise, the call fails.</text:p>
      <text:p text:style-name="P106"/>
      <text:p text:style-name="P106">In lines 37–40, the <text:span text:style-name="Source_20_Text"><text:span text:style-name="T212">sigevent</text:span></text:span> structure is initialized:</text:p>
      <text:p text:style-name="P106"/>
      <text:list text:style-name="L5">
        <text:list-item>
          <text:p text:style-name="P177"><text:span text:style-name="Source_20_Text"><text:span text:style-name="T212">sigev_notify</text:span></text:span> is set to <text:span text:style-name="Source_20_Text"><text:span text:style-name="T212">SIGEV_THREAD</text:span></text:span>, indicating that notification will be delivered by creating a new thread</text:p>
        </text:list-item>
        <text:list-item>
          <text:p text:style-name="P177"><text:span text:style-name="Source_20_Text"><text:span text:style-name="T212">sigev_notify_function</text:span></text:span> is set to <text:span text:style-name="Source_20_Text"><text:span text:style-name="T212">tfunc</text:span></text:span>, which will be executed when a message arrives</text:p>
        </text:list-item>
        <text:list-item>
          <text:p text:style-name="P177"><text:span text:style-name="Source_20_Text"><text:span text:style-name="T212">sigev_notify_attributes</text:span></text:span> is set to <text:span text:style-name="Source_20_Text"><text:span text:style-name="T212">NULL</text:span></text:span>, meaning default thread attributes are used</text:p>
        </text:list-item>
        <text:list-item>
          <text:p text:style-name="P177"><text:span text:style-name="Source_20_Text"><text:span text:style-name="T212">sigev_value.sival_ptr</text:span></text:span> is set to the address of <text:span text:style-name="Source_20_Text"><text:span text:style-name="T212">mqdes</text:span></text:span>, allowing the thread function to access the queue descriptor</text:p>
        </text:list-item>
      </text:list>
      <text:p text:style-name="P106"/>
      <text:p text:style-name="P106">The program then registers for notification using:</text:p>
      <text:p text:style-name="P106"/>
      <text:p text:style-name="P129"><text:span text:style-name="T937">41 <text:tab/></text:span><text:span text:style-name="T834">if</text:span> (<text:span text:style-name="T827">mq_notify</text:span>(mqdes, &amp;sev) == -<text:span text:style-name="T872">1</text:span>)</text:p>
      <text:p text:style-name="P106"/>
      <text:p text:style-name="P106">This call associates the notification request with the queue. When a message arrives on an empty queue, the kernel will create a new thread and invoke <text:span text:style-name="Source_20_Text"><text:span text:style-name="T212">tfunc</text:span></text:span>.</text:p>
      <text:p text:style-name="P106">The call to <text:span text:style-name="Source_20_Text"><text:span text:style-name="T212">pause</text:span></text:span> at line 43 suspends the main thread indefinitely, waiting for a signal. In practice, the process will terminate when the notification thread calls <text:span text:style-name="Source_20_Text"><text:span text:style-name="T212">exit</text:span></text:span>.</text:p>
      <text:p text:style-name="P106"/>
      <text:p text:style-name="P106">The function <text:span text:style-name="Source_20_Text"><text:span text:style-name="T212">tfunc</text:span></text:span> is executed in a new thread when a notification is triggered.</text:p>
      <text:p text:style-name="P106">At line 13, the queue descriptor is retrieved from the <text:span text:style-name="Source_20_Text"><text:span text:style-name="T212">sigevent</text:span></text:span> structure:</text:p>
      <text:p text:style-name="P106"/>
      <text:p text:style-name="P131"><text:span text:style-name="T942">13 <text:tab/></text:span><text:span text:style-name="T943">mqd_t</text:span><text:span text:style-name="T944"> mqdes = *((mqd_t *) sv.sival_ptr);</text:span></text:p>
      <text:p text:style-name="P106"/>
      <text:p text:style-name="P106"><text:soft-page-break/>The <text:span text:style-name="Source_20_Text"><text:span text:style-name="T212">sival_ptr</text:span></text:span> field is cast to a pointer to <text:span text:style-name="Source_20_Text"><text:span text:style-name="T212">mqd_t</text:span></text:span>, and its value is dereferenced to obtain the queue descriptor.</text:p>
      <text:p text:style-name="P106">Next, the function retrieves the queue attributes:</text:p>
      <text:p text:style-name="P106"/>
      <text:p text:style-name="P132"><text:span text:style-name="T945">14 <text:tab/></text:span><text:span text:style-name="T946">if</text:span><text:span text:style-name="T947"> (</text:span><text:span text:style-name="T948">mq_getattr</text:span><text:span text:style-name="T947">(mqdes, &amp;attr) == -</text:span><text:span text:style-name="T949">1</text:span><text:span text:style-name="T947">)</text:span></text:p>
      <text:p text:style-name="P106">This is necessary to determine the maximum message size (<text:span text:style-name="Source_20_Text"><text:span text:style-name="T212">mq_msgsize</text:span></text:span>), which is used to allocate a suitable buffer.</text:p>
      <text:p text:style-name="P106">At line 16, memory is allocated dynamically <text:span text:style-name="T950">with </text:span><text:span text:style-name="Source_20_Text"><text:span text:style-name="T212">malloc</text:span></text:span></text:p>
      <text:p text:style-name="P106"/>
      <text:p text:style-name="P129"><text:span text:style-name="T937">16 <text:tab/></text:span>buf = <text:span text:style-name="T827">malloc</text:span>(attr.mq_msgsize);</text:p>
      <text:p text:style-name="P106"/>
      <text:p text:style-name="P106">This ensures the buffer is large enough to hold any message from the queue.</text:p>
      <text:p text:style-name="P106">The function then calls:</text:p>
      <text:p text:style-name="P106"/>
      <text:p text:style-name="P129"><text:span text:style-name="T937">19 <text:tab/></text:span>nr = <text:span text:style-name="T827">mq_receive</text:span>(mqdes, buf, attr.mq_msgsize, <text:span text:style-name="T834">NULL</text:span>);</text:p>
      <text:p text:style-name="P106"/>
      <text:p text:style-name="P106">This retrieves a message from the queue. In this context, the call should not block because the notification is only triggered when a message is available.</text:p>
      <text:p text:style-name="P106"/>
      <text:p text:style-name="P106"><text:span text:style-name="T951">A</text:span>t line 22, the number of bytes read is printed.</text:p>
      <text:p text:style-name="P106"><text:span text:style-name="T951">A</text:span>t line 23, the allocated buffer is freed.</text:p>
      <text:p text:style-name="P106">At line 24, <text:span text:style-name="Source_20_Text"><text:span text:style-name="T212">exit(EXIT_SUCCESS)</text:span></text:span> is called <text:span text:style-name="T951">to</text:span> terminate the entire process including the main thread.</text:p>
      <text:p text:style-name="P106"/>
      <text:p text:style-name="P106">To send a message to this program, <text:span text:style-name="T952">we</text:span> can use the <text:span text:style-name="Source_20_Text"><text:span text:style-name="T212">mq</text:span></text:span><text:span text:style-name="Source_20_Text"><text:span text:style-name="T953">_</text:span></text:span><text:span text:style-name="Source_20_Text"><text:span text:style-name="T212">s</text:span></text:span><text:span text:style-name="Source_20_Text"><text:span text:style-name="T953">e</text:span></text:span><text:span text:style-name="Source_20_Text"><text:span text:style-name="T212">nd.c</text:span></text:span> <text:span text:style-name="T952">program. </text:span><text:span text:style-name="T954">We add the </text:span><text:span text:style-name="Source_20_Text"><text:span text:style-name="T953">O_CREAT</text:span></text:span><text:span text:style-name="T954"> flag to the </text:span><text:span text:style-name="Source_20_Text"><text:span text:style-name="T953">mq_open</text:span></text:span><text:span text:style-name="T954"> call of </text:span><text:span text:style-name="Source_20_Text"><text:span text:style-name="T953">mq_send.c</text:span></text:span><text:span text:style-name="T954"> as follows</text:span></text:p>
      <text:p text:style-name="P106"/>
      <text:p text:style-name="P131"><text:span text:style-name="Strong_20_Emphasis"><text:span text:style-name="T879">11 <text:tab/></text:span></text:span><text:span text:style-name="T837">mq = </text:span><text:span text:style-name="T838">mq_open</text:span><text:span text:style-name="T837">(</text:span><text:span text:style-name="T836">QUEUE_NAME</text:span><text:span text:style-name="T837">, </text:span><text:span text:style-name="T836">O_CREAT</text:span><text:span text:style-name="T955"> | </text:span><text:span text:style-name="T836">O_WRONLY</text:span><text:span text:style-name="T837">, </text:span><text:span text:style-name="T956">0644</text:span><text:span text:style-name="T837">, &amp;attr);</text:span></text:p>
      <text:p text:style-name="P106"/>
      <text:p text:style-name="P178">Let’s execute</text:p>
      <text:p text:style-name="P178"/>
      <text:p text:style-name="P179">Shell 1 </text:p>
      <table:table table:name="Table29" table:style-name="Table29">
        <table:table-column table:style-name="Table29.A"/>
        <table:table-row>
          <table:table-cell table:style-name="Table29.A1" office:value-type="string">
            <text:p text:style-name="P120"><text:span text:style-name="T806">[</text:span><text:a xlink:type="simple" xlink:href="mailto:linux@process" text:style-name="Internet_20_link" text:visited-style-name="Visited_20_Internet_20_Link"><text:span text:style-name="T806">linux@</text:span><text:span text:style-name="T807">ipc</text:span><text:span text:style-name="T806">]</text:span></text:a><text:span text:style-name="T808"> </text:span><text:span text:style-name="Strong_20_Emphasis"><text:span text:style-name="T957">./mq</text:span></text:span><text:span text:style-name="Strong_20_Emphasis"><text:span text:style-name="T909">_</text:span></text:span><text:span text:style-name="Strong_20_Emphasis"><text:span text:style-name="T957">sen</text:span></text:span><text:span text:style-name="Strong_20_Emphasis"><text:span text:style-name="T909">d</text:span></text:span><text:span text:style-name="Strong_20_Emphasis"><text:span text:style-name="T957"> /my</text:span></text:span><text:span text:style-name="Strong_20_Emphasis"><text:span text:style-name="T909">queue</text:span></text:span></text:p>
            <text:p text:style-name="P120"><text:span text:style-name="Strong_20_Emphasis"><text:span text:style-name="T957">Enter message: </text:span></text:span></text:p>
            <text:p text:style-name="P120"><text:span text:style-name="Strong_20_Emphasis"><text:span text:style-name="T957"/></text:span></text:p>
          </table:table-cell>
        </table:table-row>
      </table:table>
      <text:p text:style-name="P106"/>
      <text:p text:style-name="P179">Shell 2</text:p>
      <table:table table:name="Table30" table:style-name="Table30">
        <table:table-column table:style-name="Table30.A"/>
        <table:table-row>
          <table:table-cell table:style-name="Table30.A1" office:value-type="string">
            <text:p text:style-name="P159"><text:span text:style-name="T806">[</text:span><text:a xlink:type="simple" xlink:href="mailto:linux@process" text:style-name="Internet_20_link" text:visited-style-name="Visited_20_Internet_20_Link"><text:span text:style-name="T806">linux@</text:span><text:span text:style-name="T807">ipc</text:span><text:span text:style-name="T806">]</text:span></text:a><text:span text:style-name="T808"> </text:span>./mqnotify /my<text:span text:style-name="T954">queue</text:span></text:p>
            <text:p text:style-name="P159"/>
          </table:table-cell>
        </table:table-row>
      </table:table>
      <text:p text:style-name="P106"/>
      <text:p text:style-name="P179">Shell 1</text:p>
      <table:table table:name="Table31" table:style-name="Table31">
        <table:table-column table:style-name="Table31.A"/>
        <table:table-row>
          <table:table-cell table:style-name="Table31.A1" office:value-type="string">
            <text:p text:style-name="P120"><text:span text:style-name="Strong_20_Emphasis"><text:span text:style-name="T957">Enter message: hello notification program!! </text:span></text:span></text:p>
            <text:p text:style-name="P120"><text:span text:style-name="Strong_20_Emphasis"><text:span text:style-name="T957"/></text:span></text:p>
          </table:table-cell>
        </table:table-row>
      </table:table>
      <text:p text:style-name="P106"/>
      <text:p text:style-name="P179">Shell 2</text:p>
      <table:table table:name="Table32" table:style-name="Table32">
        <table:table-column table:style-name="Table32.A"/>
        <table:table-row>
          <table:table-cell table:style-name="Table32.A1" office:value-type="string">
            <text:p text:style-name="P159">Read 30 bytes from MQ</text:p>
            <text:p text:style-name="P159"/>
          </table:table-cell>
        </table:table-row>
      </table:table>
      <text:p text:style-name="P113"/>
      <text:p text:style-name="P113"><text:soft-page-break/>The execution shows that when a message is sent to an empty queue, the registered notification is triggered, causing the thread function to execute and read the message.</text:p>
      <text:p text:style-name="P113"/>
      <text:p text:style-name="P112"><text:span text:style-name="T131">The </text:span>program demonstrates <text:span text:style-name="Strong_20_Emphasis"><text:span text:style-name="T797">asynchronous notification</text:span></text:span><text:span text:style-name="Strong_20_Emphasis"><text:span text:style-name="T131"> using </text:span></text:span><text:span text:style-name="Source_20_Text"><text:span text:style-name="T212">mq_notify</text:span></text:span><text:span text:style-name="Strong_20_Emphasis"><text:span text:style-name="T131"> with </text:span></text:span><text:span text:style-name="Source_20_Text"><text:span text:style-name="T212">SIGEV_THREAD</text:span></text:span><text:span text:style-name="T131">, where message arrival triggers the execution of a handler function in a new thread. Notification occurs only when a message arrives in an </text:span><text:span text:style-name="Strong_20_Emphasis"><text:span text:style-name="T131">empty queue</text:span></text:span><text:span text:style-name="T131">, ensuring that the handler is invoked exactly once per registration.</text:span></text:p>
      <text:p text:style-name="P180"><text:span text:style-name="Strong_20_Emphasis"><text:span text:style-name="T819">VI.</text:span></text:span><text:span text:style-name="Strong_20_Emphasis"><text:span text:style-name="T889">2</text:span></text:span><text:span text:style-name="Strong_20_Emphasis"><text:span text:style-name="T819">.</text:span></text:span><text:span text:style-name="Strong_20_Emphasis"><text:span text:style-name="T958">6</text:span></text:span><text:span text:style-name="Strong_20_Emphasis"><text:span text:style-name="T819"> </text:span></text:span><text:span text:style-name="T959">Notification via signal</text:span></text:p>
      <text:p text:style-name="P181"/>
      <text:p text:style-name="P112"><text:span text:style-name="T960">The </text:span><text:span text:style-name="Source_20_Text"><text:span text:style-name="T961">mqsig.c</text:span></text:span><text:span text:style-name="T960"> program </text:span><text:span text:style-name="T962">demonstrates </text:span><text:span text:style-name="T963">asynchronous notification</text:span><text:span text:style-name="T962"> using </text:span><text:span text:style-name="Source_20_Text"><text:span text:style-name="T961">mq_notify</text:span></text:span><text:span text:style-name="T962"> with </text:span><text:span text:style-name="Source_20_Text"><text:span text:style-name="T961">SIGEV_SIGNAL</text:span></text:span><text:span text:style-name="T962">, where message arrival triggers the delivery of a signal. The </text:span><text:span text:style-name="T963">signal handler</text:span><text:span text:style-name="T962"> is responsible for reading the message from the queue and terminating the process. As with all </text:span><text:span text:style-name="Source_20_Text"><text:span text:style-name="T961">mq_notify</text:span></text:span><text:span text:style-name="T962"> usage, the notification is delivered only once and only when a message arrives in an empty queue.</text:span></text:p>
      <text:p text:style-name="P112"/>
      <text:p text:style-name="P150"/>
      <text:p text:style-name="P165"><text:span text:style-name="T964">1 </text:span><text:span text:style-name="T965">#include </text:span><text:span text:style-name="T966">&lt;stdio.h&gt;</text:span></text:p>
      <text:p text:style-name="P129"><text:span text:style-name="T967">2 </text:span><text:span text:style-name="T834">#include </text:span><text:span text:style-name="T835">&lt;stdlib.h&gt;</text:span></text:p>
      <text:p text:style-name="P129"><text:span text:style-name="T967">3 </text:span><text:span text:style-name="T834">#include </text:span><text:span text:style-name="T835">&lt;mqueue.h&gt;</text:span></text:p>
      <text:p text:style-name="P129"><text:span text:style-name="T967">4 </text:span><text:span text:style-name="T834">#include </text:span><text:span text:style-name="T835">&lt;signal.h&gt;</text:span></text:p>
      <text:p text:style-name="P129"><text:span text:style-name="T967">5 </text:span><text:span text:style-name="T834">#include </text:span><text:span text:style-name="T835">&lt;fcntl.h&gt;</text:span></text:p>
      <text:p text:style-name="P129"><text:span text:style-name="T967">6 </text:span><text:span text:style-name="T834">#include </text:span><text:span text:style-name="T835">&lt;unistd.h&gt;</text:span></text:p>
      <text:p text:style-name="P130"/>
      <text:p text:style-name="P129"><text:span text:style-name="T967">7 </text:span><text:span text:style-name="T834">#define QUEUE_NAME </text:span><text:span text:style-name="T835">"/myqueue"</text:span></text:p>
      <text:p text:style-name="P131"><text:span text:style-name="T968">8 </text:span><text:span text:style-name="T836">mqd_t</text:span><text:span text:style-name="T837"> mqdes;</text:span></text:p>
      <text:p text:style-name="P130"/>
      <text:p text:style-name="P129"><text:span text:style-name="T967">9 </text:span><text:span text:style-name="T834">void</text:span> handler(<text:span text:style-name="T834">int</text:span> sig) {</text:p>
      <text:p text:style-name="P131"><text:span text:style-name="T968">10 <text:tab/></text:span><text:span text:style-name="T836">struct</text:span><text:span text:style-name="T837"> </text:span><text:span text:style-name="T836">mq_attr</text:span><text:span text:style-name="T837"> attr;</text:span></text:p>
      <text:p text:style-name="P129"><text:span text:style-name="T967">11 <text:tab/></text:span><text:span text:style-name="T834">char</text:span> *buf;</text:p>
      <text:p text:style-name="P129"><text:span text:style-name="T967">12 <text:tab/></text:span><text:span text:style-name="T834">ssize_t</text:span> nr;</text:p>
      <text:p text:style-name="P130"/>
      <text:p text:style-name="P132"><text:span text:style-name="T964">13 <text:tab/></text:span><text:span text:style-name="T841">printf(</text:span><text:span text:style-name="T847">"Signal received: message available\n"</text:span><text:span text:style-name="T841">);</text:span></text:p>
      <text:p text:style-name="P129"><text:span text:style-name="T967">14 <text:tab/></text:span><text:span text:style-name="T834">if</text:span> (<text:span text:style-name="T827">mq_getattr</text:span>(mqdes, &amp;attr) == -<text:span text:style-name="T872">1</text:span>) {</text:p>
      <text:p text:style-name="P129"><text:span text:style-name="T967">15 <text:tab/><text:tab/></text:span>perror(<text:span text:style-name="T835">"mq_getattr"</text:span>);</text:p>
      <text:p text:style-name="P129"><text:span text:style-name="T967">16 <text:tab/><text:tab/></text:span>exit(<text:span text:style-name="T872">1</text:span>);</text:p>
      <text:p text:style-name="P129"><text:span text:style-name="T967">17 <text:tab/></text:span>}</text:p>
      <text:p text:style-name="P130"/>
      <text:p text:style-name="P129"><text:span text:style-name="T967">18 <text:tab/></text:span>buf = <text:span text:style-name="T827">malloc</text:span>(attr.mq_msgsize);</text:p>
      <text:p text:style-name="P129"><text:span text:style-name="T967">19 <text:tab/></text:span><text:span text:style-name="T834">if</text:span> (buf == <text:span text:style-name="T834">NULL</text:span>) {</text:p>
      <text:p text:style-name="P129"><text:span text:style-name="T967">20 <text:tab/><text:tab/></text:span>perror(<text:span text:style-name="T835">"malloc"</text:span>);</text:p>
      <text:p text:style-name="P129"><text:span text:style-name="T967">21 <text:tab/><text:tab/></text:span>exit(<text:span text:style-name="T872">1</text:span>);</text:p>
      <text:p text:style-name="P129"><text:span text:style-name="T967">22 <text:tab/></text:span>}</text:p>
      <text:p text:style-name="P130"/>
      <text:p text:style-name="P129"><text:span text:style-name="T967">23 <text:tab/></text:span>nr = <text:span text:style-name="T827">mq_receive</text:span>(mqdes, buf, attr.mq_msgsize, <text:span text:style-name="T834">NULL</text:span>);</text:p>
      <text:p text:style-name="P129"><text:span text:style-name="T967">24 <text:tab/></text:span><text:span text:style-name="T834">if</text:span> (nr == -<text:span text:style-name="T872">1</text:span>) {</text:p>
      <text:p text:style-name="P129"><text:span text:style-name="T967">25 <text:tab/><text:tab/></text:span>perror(<text:span text:style-name="T835">"mq_receive"</text:span>);</text:p>
      <text:p text:style-name="P129"><text:span text:style-name="T967">26 <text:tab/><text:tab/></text:span>exit(<text:span text:style-name="T872">1</text:span>);</text:p>
      <text:p text:style-name="P129"><text:span text:style-name="T967">27 <text:tab/></text:span>}</text:p>
      <text:p text:style-name="P130"><text:soft-page-break/></text:p>
      <text:p text:style-name="P132"><text:span text:style-name="T964">28 <text:tab/></text:span><text:span text:style-name="T841">printf(</text:span><text:span text:style-name="T847">"Received message (%zd bytes): %s\n"</text:span><text:span text:style-name="T841">, nr, buf);</text:span></text:p>
      <text:p text:style-name="P129"><text:span text:style-name="T967">29 <text:tab/></text:span><text:span text:style-name="T827">free</text:span>(buf);</text:p>
      <text:p text:style-name="P129"><text:span text:style-name="T967">30 <text:tab/></text:span>exit(<text:span text:style-name="T872">0</text:span>);<text:span text:style-name="T843"> </text:span></text:p>
      <text:p text:style-name="P129"><text:span text:style-name="T967">31 </text:span>}</text:p>
      <text:p text:style-name="P130"/>
      <text:p text:style-name="P129"><text:span text:style-name="T967">32 </text:span><text:span text:style-name="T834">int</text:span> main() {</text:p>
      <text:p text:style-name="P131"><text:span text:style-name="T968">33 <text:tab/></text:span><text:span text:style-name="T836">struct</text:span><text:span text:style-name="T837"> </text:span><text:span text:style-name="T836">sigevent</text:span><text:span text:style-name="T837"> sev;</text:span></text:p>
      <text:p text:style-name="P131"><text:span text:style-name="T968">34 <text:tab/></text:span><text:span text:style-name="T836">struct</text:span><text:span text:style-name="T837"> </text:span><text:span text:style-name="T836">sigaction</text:span><text:span text:style-name="T837"> sa;</text:span></text:p>
      <text:p text:style-name="P132"><text:span text:style-name="T964">35 <text:tab/></text:span><text:span text:style-name="T841">mqdes = </text:span><text:span text:style-name="T874">mq_open</text:span><text:span text:style-name="T841">(</text:span><text:span text:style-name="T846">QUEUE_NAME</text:span><text:span text:style-name="T841">, </text:span><text:span text:style-name="T846">O_RDONLY</text:span><text:span text:style-name="T841">);</text:span></text:p>
      <text:p text:style-name="P129"><text:span text:style-name="T967">36 <text:tab/></text:span><text:span text:style-name="T834">if</text:span> (mqdes == (mqd_t)-<text:span text:style-name="T872">1</text:span>) {</text:p>
      <text:p text:style-name="P129"><text:span text:style-name="T967">37 <text:tab/><text:tab/></text:span>perror(<text:span text:style-name="T835">"mq_open"</text:span>);</text:p>
      <text:p text:style-name="P129"><text:span text:style-name="T967">38 <text:tab/><text:tab/></text:span>exit(<text:span text:style-name="T872">1</text:span>);</text:p>
      <text:p text:style-name="P129"><text:span text:style-name="T967">39 <text:tab/></text:span>}</text:p>
      <text:p text:style-name="P130"/>
      <text:p text:style-name="P129"><text:span text:style-name="T967">40 <text:tab/></text:span>sa.sa_handler = handler;</text:p>
      <text:p text:style-name="P129"><text:span text:style-name="T967">41 <text:tab/></text:span><text:span text:style-name="T827">sigemptyset</text:span>(&amp;sa.sa_mask);</text:p>
      <text:p text:style-name="P132"><text:span text:style-name="T964">42 <text:tab/></text:span><text:span text:style-name="T841">sa.sa_flags = </text:span><text:span text:style-name="T882">0</text:span><text:span text:style-name="T841">;</text:span></text:p>
      <text:p text:style-name="P129"><text:span text:style-name="T967">43 <text:tab/></text:span><text:span text:style-name="T834">if</text:span> (<text:span text:style-name="T827">sigaction</text:span>(<text:span text:style-name="T834">SIGUSR1</text:span>, &amp;sa, <text:span text:style-name="T834">NULL</text:span>) == -<text:span text:style-name="T872">1</text:span>) {</text:p>
      <text:p text:style-name="P129"><text:span text:style-name="T967">44 <text:tab/><text:tab/></text:span>perror(<text:span text:style-name="T835">"sigaction"</text:span>);</text:p>
      <text:p text:style-name="P129"><text:span text:style-name="T967">45 <text:tab/><text:tab/></text:span>exit(<text:span text:style-name="T872">1</text:span>);</text:p>
      <text:p text:style-name="P129"><text:span text:style-name="T967">46 <text:tab/></text:span>}</text:p>
      <text:p text:style-name="P130"/>
      <text:p text:style-name="P131"><text:span text:style-name="T968">47 <text:tab/></text:span><text:span text:style-name="T837">sev.sigev_notify = </text:span><text:span text:style-name="T836">SIGEV_SIGNAL</text:span><text:span text:style-name="T837">;</text:span></text:p>
      <text:p text:style-name="P132"><text:span text:style-name="T964">48 <text:tab/></text:span><text:span text:style-name="T841">sev.sigev_signo = </text:span><text:span text:style-name="T846">SIGUSR1</text:span><text:span text:style-name="T841">;</text:span></text:p>
      <text:p text:style-name="P129"><text:span text:style-name="T967">49 <text:tab/></text:span><text:span text:style-name="T834">if</text:span> (<text:span text:style-name="T827">mq_notify</text:span>(mqdes, &amp;sev) == -<text:span text:style-name="T872">1</text:span>) {</text:p>
      <text:p text:style-name="P129"><text:span text:style-name="T967">50 <text:tab/><text:tab/></text:span>perror(<text:span text:style-name="T835">"mq_notify"</text:span>);</text:p>
      <text:p text:style-name="P129"><text:span text:style-name="T967">51 <text:tab/><text:tab/></text:span>exit(<text:span text:style-name="T872">1</text:span>);</text:p>
      <text:p text:style-name="P132"><text:span text:style-name="T964">52 <text:tab/></text:span><text:span text:style-name="T841">}</text:span></text:p>
      <text:p text:style-name="P132"><text:span text:style-name="T964">53 <text:tab/></text:span><text:span text:style-name="T841">printf(</text:span><text:span text:style-name="T847">"Waiting for message...\n"</text:span><text:span text:style-name="T841">);</text:span></text:p>
      <text:p text:style-name="P132"><text:span text:style-name="T964">54 <text:tab/></text:span><text:span text:style-name="T874">pause</text:span><text:span text:style-name="T841">();</text:span><text:span text:style-name="T969"> </text:span></text:p>
      <text:p text:style-name="P129"><text:span text:style-name="T967">55 <text:tab/></text:span><text:span text:style-name="T834">return</text:span> <text:span text:style-name="T872">0</text:span>;</text:p>
      <text:p text:style-name="P132"><text:span text:style-name="T964">56 </text:span><text:span text:style-name="T841">}</text:span></text:p>
      <text:p text:style-name="P150"/>
      <text:p text:style-name="P116"><text:span text:style-name="Strong_20_Emphasis"><text:span text:style-name="T970">mqsig.c </text:span></text:span><text:span text:style-name="Strong_20_Emphasis"><text:span text:style-name="T971">N</text:span></text:span><text:span text:style-name="Strong_20_Emphasis"><text:span text:style-name="T972">otification </text:span></text:span><text:span text:style-name="Strong_20_Emphasis"><text:span text:style-name="T973">via signal</text:span></text:span></text:p>
      <text:p text:style-name="P181"/>
      <text:p text:style-name="P112"><text:span text:style-name="T960">The function </text:span><text:span text:style-name="Source_20_Text"><text:span text:style-name="T974">handler</text:span></text:span><text:span text:style-name="T960"> is a signal handler that is invoked when a notification signal is delivered.</text:span></text:p>
      <text:p text:style-name="P181"/>
      <text:p text:style-name="P112"><text:span text:style-name="T960">At line 14, the handler retrieves the attributes of the message queue using </text:span><text:span text:style-name="Source_20_Text"><text:span text:style-name="T974">mq_getattr</text:span></text:span><text:span text:style-name="T960">. This is necessary to determine the maximum message size.</text:span></text:p>
      <text:p text:style-name="P181"/>
      <text:p text:style-name="P112"><text:span text:style-name="T960">At line 18, memory is dynamically allocated for the message buffer using </text:span><text:span text:style-name="Source_20_Text"><text:span text:style-name="T974">malloc</text:span></text:span><text:span text:style-name="T960">, with a size</text:span></text:p>
      <text:p text:style-name="P112"><text:span text:style-name="T960">equal to </text:span><text:span text:style-name="Source_20_Text"><text:span text:style-name="T974">mq_msgsize</text:span></text:span><text:span text:style-name="T960">.</text:span></text:p>
      <text:p text:style-name="P181"/>
      <text:p text:style-name="P181">The message is then read from the queue using</text:p>
      <text:p text:style-name="P182"/>
      <text:p text:style-name="P129"><text:span text:style-name="T975">23 <text:tab/></text:span>nr = <text:span text:style-name="T827">mq_receive</text:span>(mqdes, buf, attr.mq_msgsize, <text:span text:style-name="T834">NULL</text:span>);</text:p>
      <text:p text:style-name="P181"/>
      <text:p text:style-name="P181"><text:soft-page-break/>This call retrieves one message from the queue. In this context, it should not block, since the signal is delivered only when a message is available.</text:p>
      <text:p text:style-name="P181"/>
      <text:p text:style-name="P112"><text:span text:style-name="T960">At lines 29–30, the allocated memory is freed, and the process is terminated using </text:span><text:span text:style-name="Source_20_Text"><text:span text:style-name="T974">exit</text:span></text:span><text:span text:style-name="T960">. As a result, the program handles a single message and then exits.</text:span></text:p>
      <text:p text:style-name="P181"/>
      <text:p text:style-name="P112"><text:span text:style-name="T960">In </text:span><text:span text:style-name="Source_20_Text"><text:span text:style-name="T974">main</text:span></text:span><text:span text:style-name="T960">, at lines 33–34, two structures are declared:</text:span></text:p>
      <text:p text:style-name="P181"/>
      <text:list text:style-name="L6">
        <text:list-item>
          <text:p text:style-name="P183"><text:span text:style-name="Source_20_Text"><text:span text:style-name="T212">struct sigevent sev</text:span></text:span>, used to specify the notification mechanism </text:p>
        </text:list-item>
        <text:list-item>
          <text:p text:style-name="P183"><text:span text:style-name="Source_20_Text"><text:span text:style-name="T212">struct sigaction sa</text:span></text:span><text:span text:style-name="T960">, used to define the signal handler </text:span></text:p>
        </text:list-item>
      </text:list>
      <text:p text:style-name="P112"><text:span text:style-name="T960"/></text:p>
      <text:p text:style-name="P181"/>
      <text:p text:style-name="P181">At line 35, the program opens an existing message queue <text:span text:style-name="T976">using </text:span></text:p>
      <text:p text:style-name="P184"/>
      <text:p text:style-name="P185"><text:span text:style-name="T977">35 <text:tab/></text:span><text:span text:style-name="T978">mqdes = </text:span><text:span text:style-name="T979">mq_open</text:span><text:span text:style-name="T978">(</text:span><text:span text:style-name="T980">QUEUE_NAME</text:span><text:span text:style-name="T978">, </text:span><text:span text:style-name="T980">O_RDONLY</text:span><text:span text:style-name="T978">);</text:span></text:p>
      <text:p text:style-name="P181"/>
      <text:p text:style-name="P181">This assumes that the queue has already been created by another process.</text:p>
      <text:p text:style-name="P181"/>
      <text:p text:style-name="P112"><text:span text:style-name="T960">At lines 40–43, the signal handler is installed using </text:span><text:span text:style-name="Source_20_Text"><text:span text:style-name="T974">sigaction</text:span></text:span><text:span text:style-name="T960">. The handler function </text:span><text:span text:style-name="Source_20_Text"><text:span text:style-name="T974">handler</text:span></text:span><text:span text:style-name="T960"> is associated with the signal </text:span><text:span text:style-name="Source_20_Text"><text:span text:style-name="T974">SIGUSR1</text:span></text:span><text:span text:style-name="T960">.</text:span></text:p>
      <text:p text:style-name="P181"/>
      <text:p text:style-name="P181">At lines 47–48, the notification mechanism is configured:</text:p>
      <text:p text:style-name="P112"><text:span text:style-name="Source_20_Text"><text:span text:style-name="T974"/></text:span></text:p>
      <text:list text:style-name="L7">
        <text:list-item>
          <text:p text:style-name="P186"><text:span text:style-name="Source_20_Text"><text:span text:style-name="T974">sigev_notify</text:span></text:span><text:span text:style-name="T960"> is set to </text:span><text:span text:style-name="Source_20_Text"><text:span text:style-name="T974">SIGEV_SIGNAL</text:span></text:span><text:span text:style-name="T960">, meaning that a signal will be sent when a message arrives</text:span></text:p>
        </text:list-item>
        <text:list-item>
          <text:p text:style-name="P186"><text:span text:style-name="Source_20_Text"><text:span text:style-name="T974">sigev_signo</text:span></text:span><text:span text:style-name="T960"> is set to </text:span><text:span text:style-name="Source_20_Text"><text:span text:style-name="T974">SIGUSR1</text:span></text:span><text:span text:style-name="T960">, the signal that will trigger the handler</text:span></text:p>
        </text:list-item>
      </text:list>
      <text:p text:style-name="P181"/>
      <text:p text:style-name="P181">The program then registers for notification <text:span text:style-name="T976">using</text:span></text:p>
      <text:p text:style-name="P182"/>
      <text:p text:style-name="P129"><text:span text:style-name="T975">49 <text:tab/></text:span><text:span text:style-name="T834">if</text:span> (<text:span text:style-name="T827">mq_notify</text:span>(mqdes, &amp;sev) == -<text:span text:style-name="T872">1</text:span>) {</text:p>
      <text:p text:style-name="P181"/>
      <text:p text:style-name="P181">This call requests that the process be notified when a message arrives on an empty queue.</text:p>
      <text:p text:style-name="P181"/>
      <text:p text:style-name="P112"><text:span text:style-name="T960">Finally, at line 54, the call to </text:span><text:span text:style-name="Source_20_Text"><text:span text:style-name="T974">pause</text:span></text:span><text:span text:style-name="T960"> suspends the process until a signal is received. When a message arrives, the signal is delivered, the handler is executed, and the process terminates.</text:span></text:p>
      <text:p text:style-name="P187"/>
      <text:p text:style-name="P112"><text:span text:style-name="T981">This program is intended for demonstration purposes. It is important to note that functions such as </text:span><text:span text:style-name="Source_20_Text"><text:span text:style-name="T982">printf</text:span></text:span><text:span text:style-name="T981">, </text:span><text:span text:style-name="Source_20_Text"><text:span text:style-name="T982">malloc</text:span></text:span><text:span text:style-name="T981">, and </text:span><text:span text:style-name="Source_20_Text"><text:span text:style-name="T982">mq_receive</text:span></text:span><text:span text:style-name="T981"> are not guaranteed to be async-signal-safe, and therefore should not be used inside a signal handler in production code.</text:span></text:p>
      <text:p text:style-name="P181"/>
      <text:p text:style-name="P112"><text:span text:style-name="T983">To send a message we can use the </text:span><text:span text:style-name="Source_20_Text"><text:span text:style-name="T974">mq_send.c</text:span></text:span><text:span text:style-name="T983"> program.</text:span></text:p>
      <text:p text:style-name="P187"/>
      <text:p text:style-name="P187">Let’s execute</text:p>
      <text:p text:style-name="P187"/>
      <text:p text:style-name="P188">Shell 1</text:p>
      <table:table table:name="Table38" table:style-name="Table38">
        <table:table-column table:style-name="Table38.A"/>
        <table:table-row>
          <table:table-cell table:style-name="Table38.A1" office:value-type="string">
            <text:p text:style-name="P159"><text:span text:style-name="T806">[</text:span><text:a xlink:type="simple" xlink:href="mailto:linux@process" text:style-name="Internet_20_link" text:visited-style-name="Visited_20_Internet_20_Link"><text:span text:style-name="T806">linux@</text:span><text:span text:style-name="T807">ipc</text:span><text:span text:style-name="T806">]</text:span></text:a><text:span text:style-name="T808"> </text:span>./<text:span text:style-name="T984">mq_send </text:span></text:p>
            <text:p text:style-name="P159">Enter message: </text:p>
            <text:p text:style-name="P159"/>
          </table:table-cell>
        </table:table-row>
      </table:table>
      <text:p text:style-name="P187"/>
      <text:p text:style-name="P188"><text:soft-page-break/>Shell 2</text:p>
      <table:table table:name="Table37" table:style-name="Table37">
        <table:table-column table:style-name="Table37.A"/>
        <table:table-row>
          <table:table-cell table:style-name="Table37.A1" office:value-type="string">
            <text:p text:style-name="P159"><text:span text:style-name="T806">[</text:span><text:a xlink:type="simple" xlink:href="mailto:linux@process" text:style-name="Internet_20_link" text:visited-style-name="Visited_20_Internet_20_Link"><text:span text:style-name="T806">linux@</text:span><text:span text:style-name="T807">ipc</text:span><text:span text:style-name="T806">]</text:span></text:a><text:span text:style-name="T808"> </text:span>./<text:span text:style-name="T984">mqsig</text:span></text:p>
            <text:p text:style-name="P159">Waiting for message…</text:p>
            <text:p text:style-name="P159"/>
          </table:table-cell>
        </table:table-row>
      </table:table>
      <text:p text:style-name="P187"/>
      <text:p text:style-name="P188">Shell 1</text:p>
      <table:table table:name="Table39" table:style-name="Table39">
        <table:table-column table:style-name="Table39.A"/>
        <table:table-row>
          <table:table-cell table:style-name="Table39.A1" office:value-type="string">
            <text:p text:style-name="P159">Enter message: <text:span text:style-name="T984">Hello notification by signal</text:span></text:p>
            <text:p text:style-name="P159">Message sent: Hello notification via signal</text:p>
          </table:table-cell>
        </table:table-row>
      </table:table>
      <text:p text:style-name="P187"/>
      <text:p text:style-name="P188">Shell 2</text:p>
      <table:table table:name="Table40" table:style-name="Table40">
        <table:table-column table:style-name="Table40.A"/>
        <table:table-row>
          <table:table-cell table:style-name="Table40.A1" office:value-type="string">
            <text:p text:style-name="P159">Waiting for message…</text:p>
            <text:p text:style-name="P159">Signal received: message available</text:p>
            <text:p text:style-name="P159">Received message (31 bytes): Hello notification via signal</text:p>
          </table:table-cell>
        </table:table-row>
      </table:table>
      <text:p text:style-name="P189"><text:span text:style-name="T985">The execution demonstrates that, since </text:span><text:span text:style-name="T986">sev.sigev_notify</text:span><text:span text:style-name="T985"> is set to </text:span><text:span text:style-name="T986">SIGEV_SIGNAL</text:span><text:span text:style-name="T985">, when the messge is received, </text:span><text:span text:style-name="T986">SIGUSR1</text:span><text:span text:style-name="T985"> is delivered and the handler invokes </text:span><text:span text:style-name="T986">mq_receive</text:span><text:span text:style-name="T985">. </text:span></text:p>
      <text:p text:style-name="P190"/>
      <text:p text:style-name="P112"><text:span text:style-name="T987">A safer alternative is to use </text:span><text:span text:style-name="Source_20_Text"><text:span text:style-name="T988">sigwait</text:span></text:span><text:span text:style-name="T987"> which allows signals to be handled synchronously and avoids the limitations of signal handlers. </text:span><text:span text:style-name="T989">The </text:span><text:span text:style-name="T988">mqsigwait.c</text:span><text:span text:style-name="T989"> program demonstrates a </text:span><text:span text:style-name="Strong_20_Emphasis"><text:span text:style-name="T989">safe pattern for </text:span></text:span><text:span text:style-name="Strong_20_Emphasis"><text:span text:style-name="T990">asynchronous notification</text:span></text:span><text:span text:style-name="T989"> using </text:span><text:span text:style-name="Source_20_Text"><text:span text:style-name="T988">mq_notify</text:span></text:span><text:span text:style-name="T989"> with </text:span><text:span text:style-name="Source_20_Text"><text:span text:style-name="T988">SIGEV_SIGNAL</text:span></text:span><text:span text:style-name="T989"> combined with </text:span><text:span text:style-name="Source_20_Text"><text:span text:style-name="T988">sigwait</text:span></text:span><text:span text:style-name="T989">. By blocking the signal and handling it synchronously, the program avoids the limitations of traditional signal handlers and can safely use </text:span><text:span text:style-name="T990">standard library functions</text:span><text:span text:style-name="T989"> such as </text:span><text:span text:style-name="Source_20_Text"><text:span text:style-name="T988">malloc</text:span></text:span><text:span text:style-name="T989"> and </text:span><text:span text:style-name="Source_20_Text"><text:span text:style-name="T988">printf</text:span></text:span><text:span text:style-name="T989">.</text:span></text:p>
      <text:p text:style-name="P191"/>
      <text:p text:style-name="P150"/>
      <text:p text:style-name="P165"><text:span text:style-name="T991">1 </text:span><text:span text:style-name="T992">#include </text:span><text:span text:style-name="T993">&lt;stdio.h&gt;</text:span></text:p>
      <text:p text:style-name="P129"><text:span text:style-name="T994">2 </text:span><text:span text:style-name="T834">#include </text:span><text:span text:style-name="T835">&lt;stdlib.h&gt;</text:span></text:p>
      <text:p text:style-name="P129"><text:span text:style-name="T994">3 </text:span><text:span text:style-name="T834">#include </text:span><text:span text:style-name="T835">&lt;mqueue.h&gt;</text:span></text:p>
      <text:p text:style-name="P129"><text:span text:style-name="T994">4 </text:span><text:span text:style-name="T834">#include </text:span><text:span text:style-name="T835">&lt;signal.h&gt;</text:span></text:p>
      <text:p text:style-name="P129"><text:span text:style-name="T994">5 </text:span><text:span text:style-name="T834">#include </text:span><text:span text:style-name="T835">&lt;fcntl.h&gt;</text:span></text:p>
      <text:p text:style-name="P129"><text:span text:style-name="T994">6 </text:span><text:span text:style-name="T834">#include </text:span><text:span text:style-name="T835">&lt;unistd.h&gt;</text:span></text:p>
      <text:p text:style-name="P130"/>
      <text:p text:style-name="P129"><text:span text:style-name="T994">7 </text:span><text:span text:style-name="T834">#define QUEUE_NAME </text:span><text:span text:style-name="T835">"/myqueue"</text:span></text:p>
      <text:p text:style-name="P130"/>
      <text:p text:style-name="P129"><text:span text:style-name="T994">8 </text:span><text:span text:style-name="T834">int</text:span> main() {</text:p>
      <text:p text:style-name="P131"><text:span text:style-name="T995">9 <text:tab/></text:span><text:span text:style-name="T836">mqd_t</text:span><text:span text:style-name="T837"> mqdes;</text:span></text:p>
      <text:p text:style-name="P131"><text:span text:style-name="T995">10 <text:tab/></text:span><text:span text:style-name="T836">struct</text:span><text:span text:style-name="T837"> </text:span><text:span text:style-name="T836">sigevent</text:span><text:span text:style-name="T837"> sev;</text:span></text:p>
      <text:p text:style-name="P131"><text:span text:style-name="T995">11 <text:tab/></text:span><text:span text:style-name="T836">struct</text:span><text:span text:style-name="T837"> </text:span><text:span text:style-name="T836">mq_attr</text:span><text:span text:style-name="T837"> attr;</text:span></text:p>
      <text:p text:style-name="P131"><text:span text:style-name="T995">12 <text:tab/></text:span><text:span text:style-name="T836">sigset_t</text:span><text:span text:style-name="T837"> mask;</text:span></text:p>
      <text:p text:style-name="P129"><text:span text:style-name="T994">13 <text:tab/></text:span><text:span text:style-name="T834">int</text:span> sig;</text:p>
      <text:p text:style-name="P130"/>
      <text:p text:style-name="P129"><text:span text:style-name="T994">14 <text:tab/></text:span><text:span text:style-name="T827">sigemptyset</text:span>(&amp;mask);</text:p>
      <text:p text:style-name="P129"><text:span text:style-name="T994">15 <text:tab/></text:span><text:span text:style-name="T827">sigaddset</text:span>(&amp;mask, <text:span text:style-name="T834">SIGUSR1</text:span>);</text:p>
      <text:p text:style-name="P131"><text:span text:style-name="T995">16 <text:tab/></text:span><text:span text:style-name="T836">if</text:span><text:span text:style-name="T837"> (</text:span><text:span text:style-name="T838">sigprocmask</text:span><text:span text:style-name="T837">(</text:span><text:span text:style-name="T836">SIG_BLOCK</text:span><text:span text:style-name="T837">, &amp;mask, </text:span><text:span text:style-name="T836">NULL</text:span><text:span text:style-name="T837">) == -</text:span><text:span text:style-name="T956">1</text:span><text:span text:style-name="T837">) {</text:span></text:p>
      <text:p text:style-name="P129"><text:span text:style-name="T994">17 <text:tab/><text:tab/></text:span>perror(<text:span text:style-name="T835">"sigprocmask"</text:span>);</text:p>
      <text:p text:style-name="P129"><text:span text:style-name="T994">18 <text:tab/><text:tab/></text:span>exit(<text:span text:style-name="T872">1</text:span>);</text:p>
      <text:p text:style-name="P129"><text:span text:style-name="T994">19 <text:tab/></text:span>}</text:p>
      <text:p text:style-name="P130"/>
      <text:p text:style-name="P129"><text:soft-page-break/><text:span text:style-name="T994">20 <text:tab/></text:span>mqdes = <text:span text:style-name="T827">mq_open</text:span>(<text:span text:style-name="T834">QUEUE_NAME</text:span>, <text:span text:style-name="T834">O_RDONLY</text:span>);</text:p>
      <text:p text:style-name="P129"><text:span text:style-name="T994">21 <text:tab/></text:span><text:span text:style-name="T834">if</text:span> (mqdes == (mqd_t)-<text:span text:style-name="T872">1</text:span>) {</text:p>
      <text:p text:style-name="P129"><text:span text:style-name="T994">22 <text:tab/><text:tab/></text:span>perror(<text:span text:style-name="T835">"mq_open"</text:span>);</text:p>
      <text:p text:style-name="P129"><text:span text:style-name="T994">23 <text:tab/><text:tab/></text:span>exit(<text:span text:style-name="T872">1</text:span>);</text:p>
      <text:p text:style-name="P129"><text:span text:style-name="T994">24 <text:tab/></text:span>}</text:p>
      <text:p text:style-name="P130"/>
      <text:p text:style-name="P131"><text:span text:style-name="T995">25 <text:tab/></text:span><text:span text:style-name="T837">sev.sigev_notify = </text:span><text:span text:style-name="T836">SIGEV_SIGNAL</text:span><text:span text:style-name="T837">;</text:span></text:p>
      <text:p text:style-name="P132"><text:span text:style-name="T991">26 <text:tab/></text:span><text:span text:style-name="T841">sev.sigev_signo = </text:span><text:span text:style-name="T846">SIGUSR1</text:span><text:span text:style-name="T841">;</text:span></text:p>
      <text:p text:style-name="P129"><text:span text:style-name="T994">27 <text:tab/></text:span><text:span text:style-name="T834">if</text:span> (<text:span text:style-name="T827">mq_notify</text:span>(mqdes, &amp;sev) == -<text:span text:style-name="T872">1</text:span>) {</text:p>
      <text:p text:style-name="P129"><text:span text:style-name="T994">28 <text:tab/><text:tab/></text:span>perror(<text:span text:style-name="T835">"mq_notify"</text:span>);</text:p>
      <text:p text:style-name="P129"><text:span text:style-name="T994">29 <text:tab/><text:tab/></text:span>exit(<text:span text:style-name="T872">1</text:span>);</text:p>
      <text:p text:style-name="P129"><text:span text:style-name="T994">30<text:tab/></text:span>}</text:p>
      <text:p text:style-name="P130"/>
      <text:p text:style-name="P132"><text:span text:style-name="T991">31 <text:tab/></text:span><text:span text:style-name="T841">printf(</text:span><text:span text:style-name="T847">"Waiting for message...\n"</text:span><text:span text:style-name="T841">);</text:span></text:p>
      <text:p text:style-name="P129"><text:span text:style-name="T994">32 <text:tab/></text:span><text:span text:style-name="T834">if</text:span> (<text:span text:style-name="T827">sigwait</text:span>(&amp;mask, &amp;sig) != <text:span text:style-name="T872">0</text:span>) {</text:p>
      <text:p text:style-name="P129"><text:span text:style-name="T994">33 <text:tab/><text:tab/></text:span>perror(<text:span text:style-name="T835">"sigwait"</text:span>);</text:p>
      <text:p text:style-name="P129"><text:span text:style-name="T994">34 <text:tab/><text:tab/></text:span>exit(<text:span text:style-name="T872">1</text:span>);</text:p>
      <text:p text:style-name="P129"><text:span text:style-name="T994">35 <text:tab/></text:span>}</text:p>
      <text:p text:style-name="P130"/>
      <text:p text:style-name="P129"><text:span text:style-name="T994">36 <text:tab/></text:span>printf(<text:span text:style-name="T835">"Signal received: message available\n"</text:span>);</text:p>
      <text:p text:style-name="P132"><text:span text:style-name="T991">37 <text:tab/></text:span><text:span text:style-name="T846">if</text:span><text:span text:style-name="T841"> (</text:span><text:span text:style-name="T874">mq_getattr</text:span><text:span text:style-name="T841">(mqdes, &amp;attr) == -</text:span><text:span text:style-name="T882">1</text:span><text:span text:style-name="T841">) {</text:span></text:p>
      <text:p text:style-name="P129"><text:span text:style-name="T994">38 <text:tab/><text:tab/></text:span>perror(<text:span text:style-name="T835">"mq_getattr"</text:span>);</text:p>
      <text:p text:style-name="P129"><text:span text:style-name="T994">39 <text:tab/><text:tab/></text:span>exit(<text:span text:style-name="T872">1</text:span>);</text:p>
      <text:p text:style-name="P129"><text:span text:style-name="T994">40 <text:tab/></text:span>}</text:p>
      <text:p text:style-name="P130"/>
      <text:p text:style-name="P129"><text:span text:style-name="T994">41 <text:tab/></text:span><text:span text:style-name="T834">char</text:span> *buf = <text:span text:style-name="T827">malloc</text:span>(attr.mq_msgsize);</text:p>
      <text:p text:style-name="P129"><text:span text:style-name="T994">42 <text:tab/></text:span><text:span text:style-name="T834">if</text:span> (buf == <text:span text:style-name="T834">NULL</text:span>) {</text:p>
      <text:p text:style-name="P129"><text:span text:style-name="T994">43 <text:tab/><text:tab/></text:span>perror(<text:span text:style-name="T835">"malloc"</text:span>);</text:p>
      <text:p text:style-name="P129"><text:span text:style-name="T994">44 <text:tab/><text:tab/></text:span>exit(<text:span text:style-name="T872">1</text:span>);</text:p>
      <text:p text:style-name="P129"><text:span text:style-name="T994">45 <text:tab/></text:span>}</text:p>
      <text:p text:style-name="P130"/>
      <text:p text:style-name="P129"><text:span text:style-name="T994">46 <text:tab/></text:span><text:span text:style-name="T834">ssize_t</text:span> nr = <text:span text:style-name="T827">mq_receive</text:span>(mqdes, buf, attr.mq_msgsize, <text:span text:style-name="T834">NULL</text:span>);</text:p>
      <text:p text:style-name="P129"><text:span text:style-name="T994">47 <text:tab/></text:span><text:span text:style-name="T834">if</text:span> (nr == -<text:span text:style-name="T872">1</text:span>) {</text:p>
      <text:p text:style-name="P129"><text:span text:style-name="T994">48<text:tab/><text:tab/></text:span>perror(<text:span text:style-name="T835">"mq_receive"</text:span>);</text:p>
      <text:p text:style-name="P129"><text:span text:style-name="T994">49 <text:tab/><text:tab/></text:span>exit(<text:span text:style-name="T872">1</text:span>);</text:p>
      <text:p text:style-name="P129"><text:span text:style-name="T994">50 <text:tab/></text:span>}</text:p>
      <text:p text:style-name="P130"/>
      <text:p text:style-name="P132"><text:span text:style-name="T991">51 <text:tab/></text:span><text:span text:style-name="T841">printf(</text:span><text:span text:style-name="T847">"Received message (%zd bytes): %s\n"</text:span><text:span text:style-name="T841">, nr, buf);</text:span></text:p>
      <text:p text:style-name="P129"><text:span text:style-name="T994">52<text:tab/></text:span><text:span text:style-name="T827">free</text:span>(buf);</text:p>
      <text:p text:style-name="P129"><text:span text:style-name="T994">53 <text:tab/></text:span><text:span text:style-name="T827">mq_close</text:span>(mqdes);</text:p>
      <text:p text:style-name="P129"><text:span text:style-name="T994">54 <text:tab/></text:span><text:span text:style-name="T834">return</text:span> <text:span text:style-name="T872">0</text:span>;</text:p>
      <text:p text:style-name="P132"><text:span text:style-name="T991">55 </text:span><text:span text:style-name="T841">}</text:span></text:p>
      <text:p text:style-name="P150"/>
      <text:p text:style-name="P116"><text:span text:style-name="Strong_20_Emphasis"><text:span text:style-name="T996">mqsigwait.c </text:span></text:span><text:span text:style-name="Strong_20_Emphasis"><text:span text:style-name="T997">Safer notification via signal</text:span></text:span></text:p>
      <text:p text:style-name="P192"/>
      <text:p text:style-name="P112"><text:span text:style-name="T998">At line 14, the program initializes an empty signal set using </text:span><text:span text:style-name="Source_20_Text"><text:span text:style-name="T999">sigemptyset</text:span></text:span><text:span text:style-name="T998">.</text:span></text:p>
      <text:p text:style-name="P112"><text:span text:style-name="T998">At line 15, the signal </text:span><text:span text:style-name="Source_20_Text"><text:span text:style-name="T999">SIGUSR1</text:span></text:span><text:span text:style-name="T998"> is added to this set using </text:span><text:span text:style-name="Source_20_Text"><text:span text:style-name="T999">sigaddset</text:span></text:span><text:span text:style-name="T998">.</text:span></text:p>
      <text:p text:style-name="P192"/>
      <text:p text:style-name="P112"><text:soft-page-break/><text:span text:style-name="T998">In lines 16–19, the program blocks </text:span><text:span text:style-name="Source_20_Text"><text:span text:style-name="T999">SIGUSR1</text:span></text:span><text:span text:style-name="T998"> using </text:span><text:span text:style-name="Source_20_Text"><text:span text:style-name="T999">sigprocmask</text:span></text:span><text:span text:style-name="T998">. This is essential because it ensures that the signal will not be delivered asynchronously, but instead can be handled synchronously via </text:span><text:span text:style-name="Source_20_Text"><text:span text:style-name="T999">sigwait</text:span></text:span><text:span text:style-name="T998">.</text:span></text:p>
      <text:p text:style-name="P192"/>
      <text:p text:style-name="P192">At line 20, the program opens an existing message queue</text:p>
      <text:p text:style-name="P192"/>
      <text:p text:style-name="P129"><text:span text:style-name="T1000">20 <text:tab/></text:span>mqdes = <text:span text:style-name="T827">mq_open</text:span>(<text:span text:style-name="T834">QUEUE_NAME</text:span>, <text:span text:style-name="T834">O_RDONLY</text:span>);</text:p>
      <text:p text:style-name="P192"/>
      <text:p text:style-name="P192">This assumes that the queue has already been created by another process.</text:p>
      <text:p text:style-name="P192"/>
      <text:p text:style-name="P112"><text:span text:style-name="T998">In lines 25–26, the </text:span><text:span text:style-name="Source_20_Text"><text:span text:style-name="T999">sigevent</text:span></text:span><text:span text:style-name="T998"> structure is configured </text:span><text:span text:style-name="T1001">by setting </text:span><text:span text:style-name="Source_20_Text"><text:span text:style-name="T212">sigev_notify</text:span></text:span> to <text:span text:style-name="Source_20_Text"><text:span text:style-name="T212">SIGEV_SIGNAL</text:span></text:span>, <text:span text:style-name="T1002">and </text:span><text:span text:style-name="Source_20_Text"><text:span text:style-name="T212">sigev_signo</text:span></text:span><text:span text:style-name="T998"> to </text:span><text:span text:style-name="Source_20_Text"><text:span text:style-name="T212">SIGUSR1</text:span></text:span><text:span text:style-name="T998">.</text:span></text:p>
      <text:p text:style-name="P112"><text:span text:style-name="T998"/></text:p>
      <text:p text:style-name="P192">The program then registers for notification using</text:p>
      <text:p text:style-name="P192"/>
      <text:p text:style-name="P129"><text:span text:style-name="T1000">27 <text:tab/></text:span><text:span text:style-name="T834">if</text:span> (<text:span text:style-name="T827">mq_notify</text:span>(mqdes, &amp;sev) == -<text:span text:style-name="T872">1</text:span>) {</text:p>
      <text:p text:style-name="P192"/>
      <text:p text:style-name="P192">At line 31, the program prints a message indicating that it is waiting for input.</text:p>
      <text:p text:style-name="P192"/>
      <text:p text:style-name="P192">At line 32, the program calls</text:p>
      <text:p text:style-name="P193"/>
      <text:p text:style-name="P194"><text:span text:style-name="T1003">32 <text:tab/></text:span><text:span text:style-name="T943">if</text:span><text:span text:style-name="T944"> (</text:span><text:span text:style-name="T1004">sigwait</text:span><text:span text:style-name="T944">(&amp;mask, &amp;sig) != </text:span><text:span text:style-name="T1005">0</text:span><text:span text:style-name="T944">) {</text:span></text:p>
      <text:p text:style-name="P192"/>
      <text:p text:style-name="P112"><text:span text:style-name="T1001">This call</text:span><text:span text:style-name="T998"> suspends execution until one of the signals in </text:span><text:span text:style-name="Source_20_Text"><text:span text:style-name="T999">mask</text:span></text:span><text:span text:style-name="T998">, in this case </text:span><text:span text:style-name="Source_20_Text"><text:span text:style-name="T999">SIGUSR1</text:span></text:span><text:span text:style-name="T998">, is delivered. Since the signal is blocked, it is not handled asynchronously but instead causes </text:span><text:span text:style-name="Source_20_Text"><text:span text:style-name="T999">sigwait</text:span></text:span><text:span text:style-name="T998"> to return.</text:span></text:p>
      <text:p text:style-name="P112"><text:span text:style-name="T998">Once </text:span><text:span text:style-name="Source_20_Text"><text:span text:style-name="T999">sigwait</text:span></text:span><text:span text:style-name="T998"> returns, the program continues execution in a safe context.</text:span></text:p>
      <text:p text:style-name="P192"/>
      <text:p text:style-name="P112"><text:span text:style-name="T998">At line 37, the program retrieves the queue attributes using </text:span><text:span text:style-name="Source_20_Text"><text:span text:style-name="T999">mq_getattr</text:span></text:span><text:span text:style-name="T998">. This is necessary to determine the maximum message size.</text:span></text:p>
      <text:p text:style-name="P112"><text:span text:style-name="T998">At line 41, memory is dynamically allocated for the message buffer using </text:span><text:span text:style-name="Source_20_Text"><text:span text:style-name="T999">malloc</text:span></text:span><text:span text:style-name="T998">, with a size equal to </text:span><text:span text:style-name="Source_20_Text"><text:span text:style-name="T999">mq_msgsize</text:span></text:span><text:span text:style-name="T998">.</text:span></text:p>
      <text:p text:style-name="P192">At line 46, the program reads a message from the queue using</text:p>
      <text:p text:style-name="P192"/>
      <text:p text:style-name="P194"><text:span text:style-name="T1003">46 <text:tab/></text:span><text:span text:style-name="T943">ssize_t</text:span><text:span text:style-name="T944"> nr = </text:span><text:span text:style-name="T1004">mq_receive</text:span><text:span text:style-name="T944">(mqdes, buf, attr.mq_msgsize, </text:span><text:span text:style-name="T943">NULL</text:span><text:span text:style-name="T944">);</text:span></text:p>
      <text:p text:style-name="P192"/>
      <text:p text:style-name="P192">This call retrieves one message from the queue. Since the signal was triggered by message arrival, the call is expected to succeed without blocking.</text:p>
      <text:p text:style-name="P192"/>
      <text:p text:style-name="P112"><text:span text:style-name="T998">Finally </text:span><text:span text:style-name="T1001">a</text:span><text:span text:style-name="T998">t line 52, the allocated memory is freed </text:span><text:span text:style-name="T1001">and a</text:span><text:span text:style-name="T998">t line 53, the queue descriptor is closed using </text:span><text:span text:style-name="Source_20_Text"><text:span text:style-name="T999">mq_close</text:span></text:span><text:span text:style-name="T998">.</text:span></text:p>
      <text:p text:style-name="P192"/>
      <text:p text:style-name="P112"><text:span text:style-name="T1006">The combination of </text:span><text:span text:style-name="Source_20_Text"><text:span text:style-name="T1007">SIGEV_SIGNAL</text:span></text:span><text:span text:style-name="T1006"> and </text:span><text:span text:style-name="Source_20_Text"><text:span text:style-name="T1007">sigwait</text:span></text:span><text:span text:style-name="T1006"> is the recommended safe pattern for signal-based notification. The signal must be blocked before calling </text:span><text:span text:style-name="Source_20_Text"><text:span text:style-name="T1007">mq_notify</text:span></text:span><text:span text:style-name="T1006">, otherwise it may be delivered before </text:span><text:span text:style-name="Source_20_Text"><text:span text:style-name="T1007">sigwait</text:span></text:span><text:span text:style-name="T1006"> is ready to receive it.</text:span></text:p>
      <text:p text:style-name="P192"/>
      <text:p text:style-name="P195"><text:span text:style-name="T998">L</text:span><text:span text:style-name="T131">et’ execute</text:span></text:p>
      <text:p text:style-name="P187"/>
      <text:p text:style-name="P188">Shell 1</text:p>
      <table:table table:name="Table41" table:style-name="Table41">
        <table:table-column table:style-name="Table41.A"/>
        <table:table-row>
          <table:table-cell table:style-name="Table41.A1" office:value-type="string">
            <text:p text:style-name="P159"><text:span text:style-name="T806">[</text:span><text:a xlink:type="simple" xlink:href="mailto:linux@process" text:style-name="Internet_20_link" text:visited-style-name="Visited_20_Internet_20_Link"><text:span text:style-name="T806">linux@</text:span><text:span text:style-name="T807">ipc</text:span><text:span text:style-name="T806">]</text:span></text:a><text:span text:style-name="T808"> </text:span>./<text:span text:style-name="T984">mq_send </text:span></text:p>
            <text:p text:style-name="P159"><text:soft-page-break/>Enter message: </text:p>
            <text:p text:style-name="P159"/>
          </table:table-cell>
        </table:table-row>
      </table:table>
      <text:p text:style-name="P187"/>
      <text:p text:style-name="P188">Shell 2</text:p>
      <table:table table:name="Table42" table:style-name="Table42">
        <table:table-column table:style-name="Table42.A"/>
        <table:table-row>
          <table:table-cell table:style-name="Table42.A1" office:value-type="string">
            <text:p text:style-name="P159"><text:span text:style-name="T806">[</text:span><text:a xlink:type="simple" xlink:href="mailto:linux@process" text:style-name="Internet_20_link" text:visited-style-name="Visited_20_Internet_20_Link"><text:span text:style-name="T806">linux@</text:span><text:span text:style-name="T807">ipc</text:span><text:span text:style-name="T806">]</text:span></text:a><text:span text:style-name="T808"> </text:span>./<text:span text:style-name="T984">mqsig</text:span><text:span text:style-name="T1008">wait</text:span></text:p>
            <text:p text:style-name="P159">Waiting for message…</text:p>
            <text:p text:style-name="P159"/>
          </table:table-cell>
        </table:table-row>
      </table:table>
      <text:p text:style-name="P187"/>
      <text:p text:style-name="P188">Shell 1</text:p>
      <table:table table:name="Table43" table:style-name="Table43">
        <table:table-column table:style-name="Table43.A"/>
        <table:table-row>
          <table:table-cell table:style-name="Table43.A1" office:value-type="string">
            <text:p text:style-name="P159">Enter message: hello from sender <text:s text:c="2"/></text:p>
            <text:p text:style-name="P159">Message sent: hello from sender</text:p>
            <text:p text:style-name="P159"/>
          </table:table-cell>
        </table:table-row>
      </table:table>
      <text:p text:style-name="P187"/>
      <text:p text:style-name="P188">Shell 2</text:p>
      <table:table table:name="Table44" table:style-name="Table44">
        <table:table-column table:style-name="Table44.A"/>
        <table:table-row>
          <table:table-cell table:style-name="Table44.A1" office:value-type="string">
            <text:p text:style-name="P159">Waiting for message…</text:p>
            <text:p text:style-name="P159">Signal received: message available</text:p>
            <text:p text:style-name="P159">Received message (19 bytes): hello from sender</text:p>
          </table:table-cell>
        </table:table-row>
      </table:table>
      <text:p text:style-name="P192"/>
      <text:p text:style-name="P112"><text:span text:style-name="T1009">When the message is received, </text:span><text:span text:style-name="T1008">the </text:span><text:span text:style-name="T1009">signal is generated, </text:span><text:span text:style-name="T1008">and this </text:span><text:span text:style-name="T1009">causes </text:span><text:span text:style-name="Source_20_Text"><text:span text:style-name="T1010">sigwait</text:span></text:span><text:span text:style-name="T1009"> to return. The program then retrieves the message from the queue and prints its contents.</text:span></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96"><text:soft-page-break/>The competition</text:p>
      <text:p text:style-name="P13"/>
      <text:p text:style-name="P197">Other books that cover this subject are listed <text:span text:style-name="T1011">w</text:span>ith a brief description.</text:p>
      <text:p text:style-name="P197"/>
      <text:p text:style-name="P198"><text:span text:style-name="T1012">Advanced Programming in the UNIX Environment, W. </text:span>by Richard <text:span text:style-name="T1012">Stevens &amp; Stephen A. Rago 3ed, Addison-Wesely, </text:span><text:span text:style-name="T1013">2013</text:span> </text:p>
      <text:p text:style-name="P199"><text:span text:style-name="Emphasis"><text:span text:style-name="T1014">Advanced Programming in the UNIX Environment</text:span></text:span><text:span text:style-name="T1014"> by Richard W. Stevens is a classic reference on UNIX system programming in C. It provides a detailed and practical exploration of POSIX and UNIX system interfaces, focusing on how operating systems expose low-level functionality to applications.</text:span></text:p>
      <text:p text:style-name="P200">The book covers core topics such as file I/O, processes, signals, interprocess communication, and terminal control, supported by clear explanations and extensive code examples. It is widely regarded as a foundational text for understanding and working with UNIX and UNIX-like systems at the system level.</text:p>
      <text:p text:style-name="P201"/>
      <text:p text:style-name="P202">The Linux Programming Interface, by <text:span text:style-name="T1015">Michael Kerrisk, No Starch Press, </text:span><text:span text:style-name="T1016">2010</text:span></text:p>
      <text:p text:style-name="P203"><text:span text:style-name="Emphasis"><text:span text:style-name="T1017">The Linux Programming Interface</text:span></text:span><text:span text:style-name="T1018"> by Michael Kerrisk is a comprehensive and authoritative guide to </text:span><text:span text:style-name="T1019">system programming on Linux. It provides an extensive and detailed explanation of Linux system calls and library interfaces, closely aligned with POSIX standards and real kernel behavior.</text:span></text:p>
      <text:p text:style-name="P200">The book covers a wide range of topics, including file I/O, process and thread management, signals, interprocess communication, memory allocation, and networking interfaces. Each concept is supported by clear explanations, practical examples, and well-structured sample programs.</text:p>
      <text:p text:style-name="P200">Widely regarded as one of the most complete references for Linux system programming, it is both a learning resource and a definitive guide for developers working close to the operating system.</text:p>
      <text:p text:style-name="P200"/>
      <text:p text:style-name="P202">Linux System Programming, by Robert Love, O’Reilly, <text:span text:style-name="T1020">2013</text:span></text:p>
      <text:p text:style-name="P203"><text:span text:style-name="Emphasis"><text:span text:style-name="T1019">Linux System Programming</text:span></text:span><text:span text:style-name="T1019"> by Robert Love is a practical introduction to system-level programming on Linux. It focuses on how applications interact with the Linux kernel through system calls and core APIs, emphasizing real-world usage rather than theoretical detail.</text:span></text:p>
      <text:p text:style-name="P200">The book covers essential topics such as file I/O, process management, signals, timers, and basic interprocess communication. It also provides insight into how Linux handles processes, memory, and system resources.</text:p>
      <text:p text:style-name="P203"><text:span text:style-name="T1019">Designed as an accessible guide for developers, </text:span><text:span text:style-name="T1021">it is</text:span><text:span text:style-name="T1019"> a solid starting point for understanding Linux system programming</text:span><text:span text:style-name="T1014">.</text:span></text:p>
      <text:p text:style-name="P204"/>
      <text:p text:style-name="P204"><text:span text:style-name="T1022">Linux System Programming Techniques, </text:span><text:span text:style-name="T1023">by Jack-Bennny Persson, </text:span><text:span text:style-name="T1022">Packt Publishing, </text:span><text:span text:style-name="T1024">2021</text:span></text:p>
      <text:p text:style-name="P203"><text:span text:style-name="Emphasis"><text:span text:style-name="T1017">Linux System Programming Techniques</text:span></text:span><text:span text:style-name="T1018"> by Jack-Benny Persson is a practical guide focused on </text:span><text:span text:style-name="T1019">advanced techniques for developing system-level software on Linux. It emphasizes a hands-on approach to understanding how applications interact with the Linux kernel through system calls and core interfaces.</text:span></text:p>
      <text:p text:style-name="P200">The book covers key areas such as process management, file I/O, interprocess communication, signals, and threading, with an emphasis on practical implementation and real-world usage patterns. </text:p>
      <text:p text:style-name="P200"/>
      <text:p text:style-name="P200"/>
      <text:p text:style-name="P200"/>
      <text:p text:style-name="P200"/>
      <text:p text:style-name="P200"/>
      <text:p text:style-name="P200"/>
      <text:p text:style-name="P200"/>
      <text:p text:style-name="P200"/>
      <text:p text:style-name="P205"><text:soft-page-break/><text:span text:style-name="T1025">Contact Information</text:span></text:p>
      <text:p text:style-name="P206"/>
      <text:p text:style-name="P207">Full name: Marco Bruno</text:p>
      <text:p text:style-name="P207">Address: Viale Giustiniano Imperatore 274, 00145, Rome, Italy</text:p>
      <text:p text:style-name="P207">Email: <text:a xlink:type="simple" xlink:href="mailto:mr.marco.bruno.2022@gmail.com" text:style-name="Internet_20_link" text:visited-style-name="Visited_20_Internet_20_Link">mr.marco.bruno.2022@gmail.com</text:a> </text:p>
      <text:p text:style-name="P207">Tel: +855 96374172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20"/><text:page-number text:select-page="current">48</text:page-number><text:bookmark-end text:name="PageNumWizard_FOOTER_Default Page Style20"/></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2T11:22:48.694255098</meta:creation-date>
    <dc:date>2026-04-22T13:23:34.307948133</dc:date>
    <meta:editing-duration>PT45M43S</meta:editing-duration>
    <meta:editing-cycles>9</meta:editing-cycles>
    <meta:generator>LibreOffice/26.2.1.2$Linux_X86_64 LibreOffice_project/620$Build-2</meta:generator>
    <meta:document-statistic meta:table-count="29" meta:image-count="0" meta:object-count="0" meta:page-count="48" meta:paragraph-count="1316" meta:word-count="10358" meta:character-count="70303" meta:non-whitespace-character-count="60018"/>
  </office:meta>
</office:document-meta>
</file>