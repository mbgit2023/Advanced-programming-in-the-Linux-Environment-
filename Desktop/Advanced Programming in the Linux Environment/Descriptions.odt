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Horizontal_20_Line">
      <style:text-properties officeooo:paragraph-rsid="001eb680"/>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olume I — File I/O</text:h>
      <text:p text:style-name="Text_20_body">Modern software begins with input and output.</text:p>
      <text:p text:style-name="Text_20_body">This volume explores how Linux programs read, write, synchronize, and manipulate data through the filesystem and low-level system interfaces. Starting with fundamental operations such as <text:span text:style-name="Source_20_Text">open</text:span>, <text:span text:style-name="Source_20_Text">read</text:span>, and <text:span text:style-name="Source_20_Text">write</text:span>, it progressively introduces advanced topics including buffered and binary I/O, file positioning, multiplexed I/O with <text:span text:style-name="Source_20_Text">poll</text:span> and <text:span text:style-name="Source_20_Text">epoll</text:span>, asynchronous I/O, pipes and FIFOs, file locking, scatter-gather operations, and modern Linux interfaces such as <text:span text:style-name="Source_20_Text">io_uring</text:span>.</text:p>
      <text:p text:style-name="Text_20_body">Designed for novice programmers, systems developers, and hackers who want to understand what truly happens beneath high-level abstractions, the book combines clear explanations with practical runnable examples, debugging techniques, and runtime analysis tools. Alongside the APIs themselves, it examines the theory behind file descriptors, buffering, synchronization, wide-character handling, and kernel I/O behavior.</text:p>
      <text:p text:style-name="Text_20_body">Topics covered include:</text:p>
      <text:list text:style-name="L1">
        <text:list-item>
          <text:p text:style-name="P1">Reading and writing files </text:p>
        </text:list-item>
        <text:list-item>
          <text:p text:style-name="P1">File descriptors and stream interfaces </text:p>
        </text:list-item>
        <text:list-item>
          <text:p text:style-name="P1">File positioning and offsets </text:p>
        </text:list-item>
        <text:list-item>
          <text:p text:style-name="P1">File creation, truncation, and appending </text:p>
        </text:list-item>
        <text:list-item>
          <text:p text:style-name="P1">Synchronization and durability guarantees </text:p>
        </text:list-item>
        <text:list-item>
          <text:p text:style-name="P1">File and descriptor flags </text:p>
        </text:list-item>
        <text:list-item>
          <text:p text:style-name="P1">Multiplexed I/O (<text:span text:style-name="Source_20_Text">poll</text:span>, <text:span text:style-name="Source_20_Text">ppoll</text:span>, <text:span text:style-name="Source_20_Text">epoll</text:span>) </text:p>
        </text:list-item>
        <text:list-item>
          <text:p text:style-name="P1">Buffered, binary, and formatted I/O </text:p>
        </text:list-item>
        <text:list-item>
          <text:p text:style-name="P1">Error handling and diagnostics </text:p>
        </text:list-item>
        <text:list-item>
          <text:p text:style-name="P1">Scatter-gather I/O (<text:span text:style-name="Source_20_Text">readv</text:span>, <text:span text:style-name="Source_20_Text">writev</text:span>) </text:p>
        </text:list-item>
        <text:list-item>
          <text:p text:style-name="P1">Temporary files and memory streams </text:p>
        </text:list-item>
        <text:list-item>
          <text:p text:style-name="P1">POSIX AIO and Linux <text:span text:style-name="Source_20_Text">io_uring</text:span> </text:p>
        </text:list-item>
        <text:list-item>
          <text:p text:style-name="P1">Advisory and stream locking </text:p>
        </text:list-item>
        <text:list-item>
          <text:p text:style-name="P1">Pipes, FIFOs, and interprocess communication </text:p>
        </text:list-item>
        <text:list-item>
          <text:p text:style-name="P1">Advanced <text:span text:style-name="Source_20_Text">fcntl</text:span> operations </text:p>
        </text:list-item>
        <text:list-item>
          <text:p text:style-name="P1">File allocation and copy optimization </text:p>
        </text:list-item>
        <text:list-item>
          <text:p text:style-name="P1">Wide characters and multibyte conversions </text:p>
        </text:list-item>
        <text:list-item>
          <text:p text:style-name="P2">Runtime insights into Linux I/O internals </text:p>
        </text:list-item>
      </text:list>
      <text:p text:style-name="Text_20_body">Learn not only how to write code, but how Linux executes it.</text:p>
      <text:p text:style-name="Text_20_body"/>
      <text:p text:style-name="Horizontal_20_Line"/>
      <text:h text:style-name="Heading_20_2" text:outline-level="2">Volume II — Files and Directories</text:h>
      <text:p text:style-name="Text_20_body">Everything in Linux is a file — but understanding how filesystems truly work requires going deeper.</text:p>
      <text:p text:style-name="Text_20_body">This volume explores how Linux manages files, directories, permissions, metadata, devices, mounts, and filesystem namespaces at the system level. Beginning with file metadata and <text:soft-page-break/>permissions, it progresses through links, directories, device files, access control lists, filesystem monitoring, capabilities, quotas, and modern Linux filesystem APIs.</text:p>
      <text:p text:style-name="Text_20_body">Through practical examples and detailed system-level explanations, readers learn how Linux organizes storage, resolves paths, enforces security, and exposes kernel functionality through virtual filesystems such as <text:span text:style-name="Source_20_Text">/proc</text:span>, <text:span text:style-name="Source_20_Text">sysfs</text:span>, and <text:span text:style-name="Source_20_Text">tmpfs</text:span>. The volume also examines advanced interfaces including <text:span text:style-name="Source_20_Text">openat2</text:span>, <text:span text:style-name="Source_20_Text">statx</text:span>, mount namespaces, ID-mapped mounts, and the modern Linux mount API.</text:p>
      <text:p text:style-name="Text_20_body">Written for curious programmers, systems developers, students, and hackers who want to move beyond surface-level development, this book transforms filesystem internals into practical knowledge that can be applied immediately in real-world Linux environments.</text:p>
      <text:p text:style-name="Text_20_body">Topics covered include:</text:p>
      <text:list text:style-name="L2">
        <text:list-item>
          <text:p text:style-name="P3">File metadata and permissions </text:p>
        </text:list-item>
        <text:list-item>
          <text:p text:style-name="P3">Process credentials and privilege management </text:p>
        </text:list-item>
        <text:list-item>
          <text:p text:style-name="P3">Ownership, links, and symbolic links </text:p>
        </text:list-item>
        <text:list-item>
          <text:p text:style-name="P3">File timestamps and extended attributes </text:p>
        </text:list-item>
        <text:list-item>
          <text:p text:style-name="P3">Immutable files and inode flags </text:p>
        </text:list-item>
        <text:list-item>
          <text:p text:style-name="P3">Directory handling and traversal </text:p>
        </text:list-item>
        <text:list-item>
          <text:p text:style-name="P3">Working directories and <text:span text:style-name="Source_20_Text">chroot</text:span> </text:p>
        </text:list-item>
        <text:list-item>
          <text:p text:style-name="P3">Pathname resolution and runtime configuration </text:p>
        </text:list-item>
        <text:list-item>
          <text:p text:style-name="P3">Device files and major/minor device numbers </text:p>
        </text:list-item>
        <text:list-item>
          <text:p text:style-name="P3">FIFOs and random number interfaces </text:p>
        </text:list-item>
        <text:list-item>
          <text:p text:style-name="P3">Access Control Lists (ACLs) </text:p>
        </text:list-item>
        <text:list-item>
          <text:p text:style-name="P3">File event monitoring with <text:span text:style-name="Source_20_Text">inotify</text:span> and <text:span text:style-name="Source_20_Text">fanotify</text:span> </text:p>
        </text:list-item>
        <text:list-item>
          <text:p text:style-name="P3">Linux capabilities and secure execution </text:p>
        </text:list-item>
        <text:list-item>
          <text:p text:style-name="P3">The ext4 filesystem layout and operations </text:p>
        </text:list-item>
        <text:list-item>
          <text:p text:style-name="P3">Mounting, unmounting, and mount namespaces </text:p>
        </text:list-item>
        <text:list-item>
          <text:p text:style-name="P3">Virtual filesystems: <text:span text:style-name="Source_20_Text">/proc</text:span>, <text:span text:style-name="Source_20_Text">sysfs</text:span>, and <text:span text:style-name="Source_20_Text">tmpfs</text:span> </text:p>
        </text:list-item>
        <text:list-item>
          <text:p text:style-name="P3">Swap management and filesystem statistics </text:p>
        </text:list-item>
        <text:list-item>
          <text:p text:style-name="P3">Linux namespaces and container-related isolation </text:p>
        </text:list-item>
        <text:list-item>
          <text:p text:style-name="P3">Disk quotas and resource limits </text:p>
        </text:list-item>
        <text:list-item>
          <text:p text:style-name="P3">Modern filesystem interfaces such as <text:span text:style-name="Source_20_Text">openat2</text:span> and <text:span text:style-name="Source_20_Text">statx</text:span> </text:p>
        </text:list-item>
        <text:list-item>
          <text:p text:style-name="P4">The Virtual File System (VFS) architecture </text:p>
        </text:list-item>
      </text:list>
      <text:p text:style-name="Text_20_body">Learn not only how Linux stores data, but how the kernel structures, secures, and exposes the entire filesystem hierarchy.</text:p>
      <text:p text:style-name="Text_20_body"/>
      <text:p text:style-name="Horizontal_20_Line"/>
      <text:h text:style-name="Heading_20_2" text:outline-level="2">Volume III — Environment and System Databases</text:h>
      <text:p text:style-name="Text_20_body">Programs do not run in isolation. They execute inside an environment shaped by users, permissions, localization, authentication, system configuration, and time itself.</text:p>
      <text:p text:style-name="Text_20_body"><text:soft-page-break/>This volume explores the Linux execution environment through time management, environment variables, locale handling, user and group databases, password systems, login management, and Pluggable Authentication Modules (PAM). Using practical runnable examples and system-level analysis, readers learn how Linux identifies users, authenticates sessions, manages privileges, and configures process execution.</text:p>
      <text:p text:style-name="Text_20_body">Beginning with time and clock interfaces, the volume progresses through environment handling, locale-aware programming, user and group management, password databases, login records, network configuration databases, and PAM-based authentication. Alongside the APIs themselves, the book explains how Linux systems organize identity, security, and process context beneath user-space abstractions.</text:p>
      <text:p text:style-name="Text_20_body">Designed for novice developers, systems programmers, and hackers who want to understand how Linux manages users, authentication, and execution environments, the book combines low-level programming techniques with practical insights into real system behavior.</text:p>
      <text:p text:style-name="Text_20_body">Topics covered include:</text:p>
      <text:list text:style-name="L3">
        <text:list-item>
          <text:p text:style-name="P5">Time and clock management </text:p>
        </text:list-item>
        <text:list-item>
          <text:p text:style-name="P5">High-resolution and realtime clocks </text:p>
        </text:list-item>
        <text:list-item>
          <text:p text:style-name="P5">Date and time conversion and formatting </text:p>
        </text:list-item>
        <text:list-item>
          <text:p text:style-name="P5">Environment variables and process environments </text:p>
        </text:list-item>
        <text:list-item>
          <text:p text:style-name="P5">Locale and internationalization support </text:p>
        </text:list-item>
        <text:list-item>
          <text:p text:style-name="P5">User and group databases </text:p>
        </text:list-item>
        <text:list-item>
          <text:p text:style-name="P5">User and group identifiers </text:p>
        </text:list-item>
        <text:list-item>
          <text:p text:style-name="P5">Supplementary groups and privilege handling </text:p>
        </text:list-item>
        <text:list-item>
          <text:p text:style-name="P5">Password databases and shadow passwords </text:p>
        </text:list-item>
        <text:list-item>
          <text:p text:style-name="P5">Password hashing and salt generation </text:p>
        </text:list-item>
        <text:list-item>
          <text:p text:style-name="P5">Secure password input handling </text:p>
        </text:list-item>
        <text:list-item>
          <text:p text:style-name="P5">Login records and session management </text:p>
        </text:list-item>
        <text:list-item>
          <text:p text:style-name="P5">Host, network, protocol, and service databases </text:p>
        </text:list-item>
        <text:list-item>
          <text:p text:style-name="P5">System identification and hostname management </text:p>
        </text:list-item>
        <text:list-item>
          <text:p text:style-name="P5">Pluggable Authentication Modules (PAM) </text:p>
        </text:list-item>
        <text:list-item>
          <text:p text:style-name="P5">PAM sessions, items, and environment handling </text:p>
        </text:list-item>
        <text:list-item>
          <text:p text:style-name="P5">Authentication and password management </text:p>
        </text:list-item>
        <text:list-item>
          <text:p text:style-name="P5">Name Service Switch (NSS) </text:p>
        </text:list-item>
        <text:list-item>
          <text:p text:style-name="P6">Process execution environment internals </text:p>
        </text:list-item>
      </text:list>
      <text:p text:style-name="Text_20_body">Learn not only how Linux programs interact with users and the operating system, but how the system itself manages identity, authentication, localization, and execution context.</text:p>
      <text:p text:style-name="Text_20_body"/>
      <text:p text:style-name="Horizontal_20_Line"/>
      <text:h text:style-name="Heading_20_2" text:outline-level="2">Volume IV — Memory</text:h>
      <text:p text:style-name="Text_20_body">Memory is where programs come alive.</text:p>
      <text:p text:style-name="Text_20_body"><text:soft-page-break/>This volume provides a deep exploration of Linux memory management, from executable loading and dynamic allocation to memory mapping, protection mechanisms, shared objects, and process memory layout. It also includes a detailed study of the ELF format and the complete lifecycle of a Linux process in memory.</text:p>
      <text:p text:style-name="Text_20_body">Beginning with executable files and the Executable and Linkable Format (ELF), the book explains how Linux loads programs, resolves symbols, performs relocations, and initializes runtime environments. It then progresses through memory allocation, memory-mapped files, memory protection, locking, dynamically loaded objects, and advanced kernel memory interfaces.</text:p>
      <text:p text:style-name="Text_20_body">Combining theory, debugging techniques, and practical runnable examples, the volume helps programmers, systems developers, and hackers understand how software is loaded, organized, protected, and executed by the operating system. Alongside low-level APIs, it examines the behavior of allocators, the dynamic linker, process termination, cache behavior, and modern memory-management mechanisms used by Linux.</text:p>
      <text:p text:style-name="Text_20_body">Topics covered include:</text:p>
      <text:list text:style-name="L4">
        <text:list-item>
          <text:p text:style-name="P7">The ELF executable format </text:p>
        </text:list-item>
        <text:list-item>
          <text:p text:style-name="P7">ELF headers, sections, segments, and symbol tables </text:p>
        </text:list-item>
        <text:list-item>
          <text:p text:style-name="P7">Relocations and dynamic linking </text:p>
        </text:list-item>
        <text:list-item>
          <text:p text:style-name="P7">Loading executables into memory </text:p>
        </text:list-item>
        <text:list-item>
          <text:p text:style-name="P7">Process startup and termination </text:p>
        </text:list-item>
        <text:list-item>
          <text:p text:style-name="P7">Command-line argument parsing </text:p>
        </text:list-item>
        <text:list-item>
          <text:p text:style-name="P7">Dynamic memory allocation </text:p>
        </text:list-item>
        <text:list-item>
          <text:p text:style-name="P7">Heap management and GNU allocator internals </text:p>
        </text:list-item>
        <text:list-item>
          <text:p text:style-name="P7">Stack allocation and aligned allocation </text:p>
        </text:list-item>
        <text:list-item>
          <text:p text:style-name="P7">Memory-mapped files with <text:span text:style-name="Source_20_Text">mmap</text:span> </text:p>
        </text:list-item>
        <text:list-item>
          <text:p text:style-name="P7">Shared and private mappings </text:p>
        </text:list-item>
        <text:list-item>
          <text:p text:style-name="P7">Anonymous memory mappings </text:p>
        </text:list-item>
        <text:list-item>
          <text:p text:style-name="P7">Memory remapping and mapped file resizing </text:p>
        </text:list-item>
        <text:list-item>
          <text:p text:style-name="P7">Memory copying and manipulation functions </text:p>
        </text:list-item>
        <text:list-item>
          <text:p text:style-name="P7">Memory protection with <text:span text:style-name="Source_20_Text">mprotect</text:span> </text:p>
        </text:list-item>
        <text:list-item>
          <text:p text:style-name="P7">Protection keys and secure memory regions </text:p>
        </text:list-item>
        <text:list-item>
          <text:p text:style-name="P7">Memory locking and residency inspection </text:p>
        </text:list-item>
        <text:list-item>
          <text:p text:style-name="P7">RAM-backed files and secret memory </text:p>
        </text:list-item>
        <text:list-item>
          <text:p text:style-name="P7">Memory usage advice interfaces </text:p>
        </text:list-item>
        <text:list-item>
          <text:p text:style-name="P7">Nonlocal jumps with <text:span text:style-name="Source_20_Text">setjmp</text:span> and <text:span text:style-name="Source_20_Text">longjmp</text:span> </text:p>
        </text:list-item>
        <text:list-item>
          <text:p text:style-name="P7">Core dumps and crash analysis </text:p>
        </text:list-item>
        <text:list-item>
          <text:p text:style-name="P7">Dynamically loaded shared objects </text:p>
        </text:list-item>
        <text:list-item>
          <text:p text:style-name="P7">Symbol resolution and runtime linking </text:p>
        </text:list-item>
        <text:list-item>
          <text:p text:style-name="P7">The dynamic linker and C runtime </text:p>
        </text:list-item>
        <text:list-item>
          <text:p text:style-name="P7">NUMA and processor-aware memory management </text:p>
        </text:list-item>
        <text:list-item>
          <text:p text:style-name="P8">Linux memory-management internals and terminology </text:p>
        </text:list-item>
      </text:list>
      <text:p text:style-name="Text_20_body">Learn not only how programs allocate and use memory, but how Linux itself loads, maps, protects, and executes software at runtime.</text:p>
      <text:p text:style-name="Text_20_body"/>
      <text:p text:style-name="Horizontal_20_Line"><text:soft-page-break/></text:p>
      <text:h text:style-name="Heading_20_2" text:outline-level="2">Volume V — Processes</text:h>
      <text:p text:style-name="Text_20_body">Processes, threads, signals, timers, synchronization, security, and scheduling form the foundation of modern Linux software.</text:p>
      <text:p text:style-name="Text_20_body">This volume explores how Linux creates, controls, isolates, and coordinates execution at the process and thread level. Beginning with process creation and program execution, it progresses through signals, timers, POSIX threads, synchronization primitives, daemon processes, and Linux security mechanisms such as <text:span text:style-name="Source_20_Text">seccomp</text:span>.</text:p>
      <text:p text:style-name="Text_20_body">Through practical runnable examples and detailed runtime analysis, readers learn how complex applications interact with the kernel, coordinate concurrent execution, manage resources, and respond to asynchronous events. The book examines not only the APIs themselves, but also the underlying behavior of scheduling, process hierarchies, job control, synchronization, and process isolation inside Linux systems.</text:p>
      <text:p text:style-name="Text_20_body">Designed for both newcomers and advanced programmers, the volume combines low-level programming techniques with real-world debugging methods and systems programming patterns used in modern Linux software.</text:p>
      <text:p text:style-name="Text_20_body">Topics covered include:</text:p>
      <text:list text:style-name="L5">
        <text:list-item>
          <text:p text:style-name="P9">Process creation and management </text:p>
        </text:list-item>
        <text:list-item>
          <text:p text:style-name="P9"><text:span text:style-name="Source_20_Text">fork</text:span>, <text:span text:style-name="Source_20_Text">vfork</text:span>, <text:span text:style-name="Source_20_Text">clone</text:span>, and <text:span text:style-name="Source_20_Text">clone3</text:span> </text:p>
        </text:list-item>
        <text:list-item>
          <text:p text:style-name="P9">Process execution with <text:span text:style-name="Source_20_Text">execve</text:span> and related interfaces </text:p>
        </text:list-item>
        <text:list-item>
          <text:p text:style-name="P9">Waiting for child processes and process lifecycle management </text:p>
        </text:list-item>
        <text:list-item>
          <text:p text:style-name="P9">Process priorities and scheduling </text:p>
        </text:list-item>
        <text:list-item>
          <text:p text:style-name="P9">Process control with <text:span text:style-name="Source_20_Text">prctl</text:span> </text:p>
        </text:list-item>
        <text:list-item>
          <text:p text:style-name="P9">Secure Computing (<text:span text:style-name="Source_20_Text">seccomp</text:span>) and <text:span text:style-name="Source_20_Text">libseccomp</text:span> </text:p>
        </text:list-item>
        <text:list-item>
          <text:p text:style-name="P9">Process accounting and resource isolation </text:p>
        </text:list-item>
        <text:list-item>
          <text:p text:style-name="P9">Process groups, sessions, and job control </text:p>
        </text:list-item>
        <text:list-item>
          <text:p text:style-name="P9">Controlling terminals and shell process management </text:p>
        </text:list-item>
        <text:list-item>
          <text:p text:style-name="P9">Signal handling and signal delivery </text:p>
        </text:list-item>
        <text:list-item>
          <text:p text:style-name="P9">Real-time signals and signal queues </text:p>
        </text:list-item>
        <text:list-item>
          <text:p text:style-name="P9">Signal masking, waiting, and alternate signal stacks </text:p>
        </text:list-item>
        <text:list-item>
          <text:p text:style-name="P9">Sleeping and timing functions </text:p>
        </text:list-item>
        <text:list-item>
          <text:p text:style-name="P9">POSIX and interval timers </text:p>
        </text:list-item>
        <text:list-item>
          <text:p text:style-name="P9">CPU-time clocks and timing interfaces </text:p>
        </text:list-item>
        <text:list-item>
          <text:p text:style-name="P9">POSIX threads (<text:span text:style-name="Source_20_Text">pthread</text:span>) </text:p>
        </text:list-item>
        <text:list-item>
          <text:p text:style-name="P9">Thread lifecycle and thread attributes </text:p>
        </text:list-item>
        <text:list-item>
          <text:p text:style-name="P9">Mutexes, condition variables, read-write locks, and spin locks </text:p>
        </text:list-item>
        <text:list-item>
          <text:p text:style-name="P9">Barriers, semaphores, and futexes </text:p>
        </text:list-item>
        <text:list-item>
          <text:p text:style-name="P9">Thread-local storage and synchronization patterns </text:p>
        </text:list-item>
        <text:list-item>
          <text:p text:style-name="P9">Daemon processes and background services </text:p>
        </text:list-item>
        <text:list-item>
          <text:p text:style-name="P9">Logging with <text:span text:style-name="Source_20_Text">syslog</text:span> and <text:span text:style-name="Source_20_Text">systemd</text:span> journal APIs </text:p>
        </text:list-item>
        <text:list-item>
          <text:p text:style-name="P9">Linux control groups (<text:span text:style-name="Source_20_Text">cgroups</text:span>) </text:p>
        </text:list-item>
        <text:list-item>
          <text:p text:style-name="P9"><text:soft-page-break/>Process tracing with <text:span text:style-name="Source_20_Text">ptrace</text:span> </text:p>
        </text:list-item>
        <text:list-item>
          <text:p text:style-name="P10">Runtime debugging and stack tracing </text:p>
        </text:list-item>
      </text:list>
      <text:p text:style-name="Text_20_body">Learn not only how Linux programs execute concurrently, but how the kernel manages processes, threads, synchronization, security boundaries, and asynchronous execution beneath the surface.</text:p>
      <text:p text:style-name="Text_20_body"/>
      <text:p text:style-name="Horizontal_20_Line"/>
      <text:h text:style-name="Heading_20_2" text:outline-level="2">Volume VI — Interprocess Communication and Terminals</text:h>
      <text:p text:style-name="Text_20_body">Modern systems are built on communication.</text:p>
      <text:p text:style-name="Text_20_body">This volume explores the mechanisms Linux provides for processes to exchange data, synchronize execution, and interact with users and networks. Beginning with POSIX message queues, semaphores, and shared memory, it progresses toward advanced communication interfaces including sockets, UNIX domain sockets, terminal control, and pseudoterminals.</text:p>
      <text:p text:style-name="Text_20_body">Through practical runnable examples and system-level analysis, readers learn how shells, servers, terminals, daemons, and distributed applications communicate internally. The book explains not only how to use Linux IPC interfaces, but also how synchronization, signaling, buffering, addressing, and terminal subsystems operate beneath user-space abstractions.</text:p>
      <text:p text:style-name="Text_20_body">Designed for programmers, students, systems developers, and hackers who want to understand how real Linux systems interact, the volume combines low-level API explanations with practical patterns such as producer-consumer synchronization, client-server communication, descriptor passing, and asynchronous socket I/O.</text:p>
      <text:p text:style-name="Text_20_body">Topics covered include:</text:p>
      <text:list text:style-name="L6">
        <text:list-item>
          <text:p text:style-name="P11">POSIX message queues </text:p>
        </text:list-item>
        <text:list-item>
          <text:p text:style-name="P11">Named semaphores and synchronization patterns </text:p>
        </text:list-item>
        <text:list-item>
          <text:p text:style-name="P11">Shared memory and process coordination </text:p>
        </text:list-item>
        <text:list-item>
          <text:p text:style-name="P11">Socket programming and network communication </text:p>
        </text:list-item>
        <text:list-item>
          <text:p text:style-name="P11">IPv4 and IPv6 addressing interfaces </text:p>
        </text:list-item>
        <text:list-item>
          <text:p text:style-name="P11">Client-server architecture </text:p>
        </text:list-item>
        <text:list-item>
          <text:p text:style-name="P11">Non-blocking and asynchronous sockets </text:p>
        </text:list-item>
        <text:list-item>
          <text:p text:style-name="P11">UNIX domain sockets and local IPC </text:p>
        </text:list-item>
        <text:list-item>
          <text:p text:style-name="P11">Ancillary messages and file descriptor passing </text:p>
        </text:list-item>
        <text:list-item>
          <text:p text:style-name="P11">Datagram, stream, and sequenced-packet sockets </text:p>
        </text:list-item>
        <text:list-item>
          <text:p text:style-name="P11">Terminal I/O and the <text:span text:style-name="Source_20_Text">termios</text:span> interface </text:p>
        </text:list-item>
        <text:list-item>
          <text:p text:style-name="P11">Canonical, raw, and noncanonical terminal modes </text:p>
        </text:list-item>
        <text:list-item>
          <text:p text:style-name="P11">Terminal line control and special characters </text:p>
        </text:list-item>
        <text:list-item>
          <text:p text:style-name="P11">Window sizing and terminal utilities </text:p>
        </text:list-item>
        <text:list-item>
          <text:p text:style-name="P11"><text:span text:style-name="Source_20_Text">ncurses</text:span> programming </text:p>
        </text:list-item>
        <text:list-item>
          <text:p text:style-name="P11">UNIX 98 pseudoterminals </text:p>
        </text:list-item>
        <text:list-item>
          <text:p text:style-name="P11">Terminal emulation and automation tools </text:p>
        </text:list-item>
        <text:list-item>
          <text:p text:style-name="P12">System V IPC and Linux terminal internals </text:p>
        </text:list-item>
      </text:list>
      <text:p text:style-name="Text_20_body"><text:soft-page-break/>Learn not only how processes communicate, but how Linux itself coordinates interaction between programs, terminals, and networks.</text:p>
      <text:p text:style-name="Text_20_body"/>
      <text:p text:style-name="Horizontal_20_Line"/>
      <text:h text:style-name="Heading_20_2" text:outline-level="2">Volume 0 — Tools</text:h>
      <text:p text:style-name="Text_20_body">Before mastering Linux system programming, you must first understand the tools used to build, debug, analyze, and study software.</text:p>
      <text:p text:style-name="Text_20_body">This introductory volume presents the Linux development environment through practical exploration of compilation, linking, debugging, build systems, documentation tools, and software standards. Beginning with the fundamentals of compiling programs using GCC, the book progresses through Makefiles, Autoconf, executable generation, debugging with GDB, library usage, and the structure of Linux software development.</text:p>
      <text:p text:style-name="Text_20_body">Through practical examples and hands-on workflows, readers learn how source code becomes an executable program, how libraries are linked, how binaries are analyzed, and how developers investigate runtime behavior and system-level bugs. Alongside tool usage, the volume introduces the standards, conventions, and documentation systems that define modern Linux and GNU software development.</text:p>
      <text:p text:style-name="Text_20_body">Written for beginners, students, and aspiring low-level programmers, this book provides the essential foundation needed to read, build, debug, and truly understand Linux system software.</text:p>
      <text:p text:style-name="Text_20_body">Topics covered include:</text:p>
      <text:list text:style-name="L7">
        <text:list-item>
          <text:p text:style-name="P13">The Linux compilation process </text:p>
        </text:list-item>
        <text:list-item>
          <text:p text:style-name="P13">The GNU C Compiler (GCC) </text:p>
        </text:list-item>
        <text:list-item>
          <text:p text:style-name="P13">Compiler warnings and optimization levels </text:p>
        </text:list-item>
        <text:list-item>
          <text:p text:style-name="P13">Linking and the GNU linker (<text:span text:style-name="Source_20_Text">ld</text:span>) </text:p>
        </text:list-item>
        <text:list-item>
          <text:p text:style-name="P13">Executable file generation </text:p>
        </text:list-item>
        <text:list-item>
          <text:p text:style-name="P13">Cross-compilation </text:p>
        </text:list-item>
        <text:list-item>
          <text:p text:style-name="P13">The C standard library and header files </text:p>
        </text:list-item>
        <text:list-item>
          <text:p text:style-name="P13">Build automation with GNU Make </text:p>
        </text:list-item>
        <text:list-item>
          <text:p text:style-name="P13">Configuration systems with GNU Autoconf </text:p>
        </text:list-item>
        <text:list-item>
          <text:p text:style-name="P13">Debugging with GDB </text:p>
        </text:list-item>
        <text:list-item>
          <text:p text:style-name="P13">The Linux filesystem structure </text:p>
        </text:list-item>
        <text:list-item>
          <text:p text:style-name="P13">Linux documentation systems </text:p>
        </text:list-item>
        <text:list-item>
          <text:p text:style-name="P13">Manual pages, <text:span text:style-name="Source_20_Text">info</text:span>, <text:span text:style-name="Source_20_Text">whatis</text:span>, and <text:span text:style-name="Source_20_Text">apropos</text:span> </text:p>
        </text:list-item>
        <text:list-item>
          <text:p text:style-name="P13">The GNU C Library (<text:span text:style-name="Source_20_Text">glibc</text:span>) documentation </text:p>
        </text:list-item>
        <text:list-item>
          <text:p text:style-name="P13">Reading and navigating source code </text:p>
        </text:list-item>
        <text:list-item>
          <text:p text:style-name="P13">POSIX and GNU standards </text:p>
        </text:list-item>
        <text:list-item>
          <text:p text:style-name="P13">The GNU General Public License (GPL) </text:p>
        </text:list-item>
        <text:list-item>
          <text:p text:style-name="P13">Byte order and endianness </text:p>
        </text:list-item>
        <text:list-item>
          <text:p text:style-name="P14">Static and dynamic linking </text:p>
        </text:list-item>
      </text:list>
      <text:p text:style-name="Text_20_body"><text:soft-page-break/>Learn not only how to compile and debug programs, but how Linux software is built, linked, documented, and understood at the system level.</text:p>
      <text:p text:style-name="Text_20_body"/>
      <text:p text:style-name="P15"/>
      <text:list text:style-name="L8">
        <text:list-item>
          <text:p text:style-name="P16"><text:span text:style-name="Strong_20_Emphasis">Learn how Linux software really works — from source code to system calls.</text:span> </text:p>
        </text:list-item>
        <text:list-item>
          <text:p text:style-name="P16"><text:span text:style-name="Strong_20_Emphasis">A practical journey into Linux system programming for developers, hackers, and curious minds.</text:span> </text:p>
        </text:list-item>
        <text:list-item>
          <text:p text:style-name="P16"><text:span text:style-name="Strong_20_Emphasis">Write code, trace execution, and understand the Linux system from the inside out.</text:span> </text:p>
        </text:list-item>
        <text:list-item>
          <text:p text:style-name="P16"><text:span text:style-name="Strong_20_Emphasis">From beginner to low-level programmer: learn how real Linux software is built.</text:span> </text:p>
        </text:list-item>
        <text:list-item>
          <text:p text:style-name="P16"><text:span text:style-name="Strong_20_Emphasis">Master Linux programming through real code, system analysis, and hands-on exploration.</text:span> </text:p>
        </text:list-item>
        <text:list-item>
          <text:p text:style-name="P16"><text:span text:style-name="Strong_20_Emphasis">Beyond coding: understand how programs interact with the Linux operating system.</text:span> </text:p>
        </text:list-item>
        <text:list-item>
          <text:p text:style-name="P16"><text:span text:style-name="Strong_20_Emphasis">A modern guide to Linux system programming through practical code and runtime analysis.</text:span> </text:p>
        </text:list-item>
        <text:list-item>
          <text:p text:style-name="P16"><text:span text:style-name="Strong_20_Emphasis">Designed for programmers who want to understand what happens behind the abstractions.</text:span> </text:p>
        </text:list-item>
        <text:list-item>
          <text:p text:style-name="P16"><text:span text:style-name="Strong_20_Emphasis">Build real understanding of Linux through code, debugging, and system internals.</text:span> </text:p>
        </text:list-item>
        <text:list-item>
          <text:p text:style-name="P17"><text:span text:style-name="Strong_20_Emphasis">Where programming meets the Linux kernel.</text:span>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1T12:19:08.866002849</meta:creation-date>
    <dc:date>2026-05-22T20:03:56.929484016</dc:date>
    <meta:editing-duration>PT47M12S</meta:editing-duration>
    <meta:editing-cycles>4</meta:editing-cycles>
    <meta:generator>LibreOffice/26.2.1.2$Linux_X86_64 LibreOffice_project/620$Build-2</meta:generator>
    <meta:document-statistic meta:table-count="0" meta:image-count="0" meta:object-count="0" meta:page-count="8" meta:paragraph-count="205" meta:word-count="2149" meta:character-count="15247" meta:non-whitespace-character-count="13294"/>
  </office:meta>
</office:document-meta>
</file>