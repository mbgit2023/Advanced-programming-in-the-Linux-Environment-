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0.25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5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cm" fo:min-width="0.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Courier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Courier" fo:font-size="16pt" style:font-size-asian="16pt" style:font-size-complex="16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style:font-name="Courier"/>
    </style:style>
    <style:style style:name="P14" style:family="paragraph">
      <loext:graphic-properties draw:fill="none" draw:fill-color="#ffffff"/>
      <style:text-properties style:font-name="Courier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style:font-name="Courier"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5cm" svg:height="1.25cm" svg:x="7.15cm" svg:y="5.8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7.95cm" svg:y="5.8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8.75cm" svg:y="5.8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9.55cm" svg:y="5.85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0.35cm" svg:y="5.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15cm" svg:y="5.85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95cm" svg:y="5.85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3.85cm" svg:y="7.85cm">
          <text:p text:style-name="P1">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cm" svg:y1="7.15cm" svg:x2="4.6cm" svg:y2="8.65cm">
          <text:p/>
        </draw:line>
        <draw:frame draw:style-name="gr3" draw:text-style-name="P4" draw:layer="layout" svg:width="3.05cm" svg:height="1.673cm" svg:x="8.85cm" svg:y="4.577cm">
          <draw:text-box>
            <text:p>stream</text:p>
          </draw:text-box>
        </draw:frame>
        <draw:custom-shape draw:style-name="gr1" draw:text-style-name="P2" draw:layer="layout" svg:width="0.75cm" svg:height="1.25cm" svg:x="3.85cm" svg:y="3.5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6cm" svg:y1="4.15cm" svg:x2="7.65cm" svg:y2="5.9cm">
          <text:p/>
        </draw:line>
        <draw:frame draw:style-name="gr5" draw:text-style-name="P6" draw:layer="layout" svg:width="2.05cm" svg:height="1.25cm" svg:x="3.7cm" svg:y="5.75cm">
          <draw:text-box>
            <text:p text:style-name="P5"><text:span text:style-name="T1">getc</text:span></text:p>
          </draw:text-box>
        </draw:frame>
        <draw:custom-shape draw:style-name="gr1" draw:text-style-name="P2" draw:layer="layout" svg:width="0.75cm" svg:height="1.25cm" svg:x="7.95cm" svg:y="7.6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8.75cm" svg:y="7.6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9.55cm" svg:y="7.65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0.35cm" svg:y="7.6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15cm" svg:y="7.65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95cm" svg:y="7.65cm">
          <text:p text:style-name="P1">.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cm" svg:height="1.75cm" svg:x="5.6cm" svg:y="18.9cm">
          <draw:text-box>
            <text:p text:style-name="P7"><text:span text:style-name="T2">does not remove the char from the stream and pushes it back</text:span></text:p>
          </draw:text-box>
        </draw:frame>
        <draw:custom-shape draw:style-name="gr1" draw:text-style-name="P2" draw:layer="layout" svg:width="0.75cm" svg:height="1.25cm" svg:x="7.25cm" svg:y="15.7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8.05cm" svg:y="15.7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8.85cm" svg:y="15.7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9.65cm" svg:y="15.75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0.45cm" svg:y="15.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25cm" svg:y="1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2.05cm" svg:y="1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3.95cm" svg:y="13.4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7cm" svg:y1="14.05cm" svg:x2="7.75cm" svg:y2="15.8cm">
          <text:p/>
        </draw:line>
        <draw:frame draw:style-name="gr3" draw:text-style-name="P6" draw:layer="layout" svg:width="2.9cm" svg:height="1.673cm" svg:x="3.5cm" svg:y="15.827cm">
          <draw:text-box>
            <text:p text:style-name="P5"><text:span text:style-name="T1">ungetc</text:span></text:p>
          </draw:text-box>
        </draw:frame>
        <draw:custom-shape draw:style-name="gr1" draw:text-style-name="P2" draw:layer="layout" svg:width="0.75cm" svg:height="1.25cm" svg:x="8.05cm" svg:y="17.55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8.85cm" svg:y="17.5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9.65cm" svg:y="17.5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0.45cm" svg:y="17.55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25cm" svg:y="17.5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2.05cm" svg:y="17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2.85cm" svg:y="17.5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cm" svg:y1="17.05cm" svg:x2="7.7cm" svg:y2="17.55cm">
          <text:p/>
        </draw:line>
        <draw:custom-shape draw:style-name="gr1" draw:text-style-name="P2" draw:layer="layout" svg:width="0.75cm" svg:height="1.25cm" svg:x="3.95cm" svg:y="24.5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cm" svg:y1="24.15cm" svg:x2="4.85cm" svg:y2="25.15cm">
          <text:p/>
        </draw:line>
        <draw:frame draw:style-name="gr5" draw:text-style-name="P6" draw:layer="layout" svg:width="2.05cm" svg:height="1.25cm" svg:x="3.95cm" svg:y="22.75cm">
          <draw:text-box>
            <text:p text:style-name="P5"><text:span text:style-name="T1">getc</text:span></text:p>
          </draw:text-box>
        </draw:frame>
        <draw:custom-shape draw:style-name="gr1" draw:text-style-name="P2" draw:layer="layout" svg:width="0.75cm" svg:height="1.25cm" svg:x="7.95cm" svg:y="22.75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8.75cm" svg:y="22.7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9.55cm" svg:y="22.7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0.35cm" svg:y="22.75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15cm" svg:y="22.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9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2.7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7.25cm" svg:y="17.5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.95cm" svg:height="1.25cm" svg:x="7.05cm" svg:y="9.15cm">
          <draw:text-box>
            <text:p><text:span text:style-name="T2">removes the first character from the stream</text:span></text:p>
          </draw:text-box>
        </draw:frame>
        <draw:custom-shape draw:style-name="gr1" draw:text-style-name="P2" draw:layer="layout" svg:width="0.75cm" svg:height="1.25cm" svg:x="7.2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3.95cm" svg:y="20.3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7cm" svg:y1="20.95cm" svg:x2="7.75cm" svg:y2="22.7cm">
          <text:p/>
        </draw:line>
        <draw:custom-shape draw:style-name="gr8" draw:text-style-name="P11" draw:layer="layout" svg:width="0.75cm" svg:height="1.25cm" svg:x="7.95cm" svg:y="24.35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8.75cm" svg:y="24.3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9.55cm" svg:y="24.3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0.35cm" svg:y="24.35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15cm" svg:y="24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1.95cm" svg:y="24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1.25cm" svg:x="12.75cm" svg:y="24.3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4.25cm" svg:height="0.75cm" svg:x="13cm" svg:y="6.05cm">
          <draw:text-box>
            <text:p><text:span text:style-name="T3">before</text:span></text:p>
          </draw:text-box>
        </draw:frame>
        <draw:frame draw:style-name="gr9" draw:text-style-name="P12" draw:layer="layout" svg:width="4.25cm" svg:height="0.75cm" svg:x="13cm" svg:y="7.95cm">
          <draw:text-box>
            <text:p><text:span text:style-name="T3">later</text:span></text:p>
          </draw:text-box>
        </draw:frame>
        <draw:frame draw:style-name="gr5" draw:text-style-name="P14" draw:layer="layout" svg:width="4.85cm" svg:height="1.25cm" svg:x="14.5cm" svg:y="5cm">
          <draw:text-box>
            <text:p text:style-name="P13"><text:span text:style-name="T4">c=getc(stream)</text:span></text:p>
          </draw:text-box>
        </draw:frame>
        <draw:frame draw:style-name="gr10" draw:text-style-name="P4" draw:layer="layout" svg:width="1.25cm" svg:height="1cm" svg:x="3.7cm" svg:y="2.6cm">
          <draw:text-box>
            <text:p>c</text:p>
          </draw:text-box>
        </draw:frame>
        <draw:frame draw:style-name="gr11" draw:text-style-name="P16" draw:layer="layout" svg:width="6cm" svg:height="2cm" svg:x="13.5cm" svg:y="14.5cm">
          <draw:text-box>
            <text:p text:style-name="P15"><text:span text:style-name="T4">c=ungetc(c,stream)</text:span></text:p>
          </draw:text-box>
        </draw:frame>
        <draw:frame draw:style-name="gr12" draw:text-style-name="P14" draw:layer="layout" svg:width="6cm" svg:height="2.03cm" svg:x="13.75cm" svg:y="21.15cm">
          <draw:text-box>
            <text:p text:style-name="P13"><text:span text:style-name="T4">c = getc(stream) </text:span></text:p>
          </draw:text-box>
        </draw:frame>
        <draw:frame draw:style-name="gr10" draw:text-style-name="P4" draw:layer="layout" svg:width="1.25cm" svg:height="1cm" svg:x="3.7cm" svg:y="12.5cm">
          <draw:text-box>
            <text:p>c</text:p>
          </draw:text-box>
        </draw:frame>
        <draw:frame draw:style-name="gr10" draw:text-style-name="P4" draw:layer="layout" svg:width="1.25cm" svg:height="1cm" svg:x="3.7cm" svg:y="19.4cm">
          <draw:text-box>
            <text:p>c</text:p>
          </draw:text-box>
        </draw:frame>
        <draw:frame draw:style-name="gr5" draw:text-style-name="P10" draw:layer="layout" svg:width="7.95cm" svg:height="1.25cm" svg:x="6.8cm" svg:y="25.65cm">
          <draw:text-box>
            <text:p><text:span text:style-name="T2">removes the first character from the str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3-21T18:17:33.849640113</meta:creation-date>
    <dc:date>2025-09-06T17:50:30.520912183</dc:date>
    <meta:editing-duration>PT1H57M54S</meta:editing-duration>
    <meta:editing-cycles>16</meta:editing-cycles>
    <meta:generator>LibreOffice/25.8.0.4$Linux_X86_64 LibreOffice_project/580$Build-4</meta:generator>
    <meta:print-date>2025-09-06T17:46:01.323756463</meta:print-date>
    <meta:printed-by>PDF files</meta:printed-by>
    <meta:document-statistic meta:object-count="69"/>
  </office:meta>
</office:document-meta>
</file>