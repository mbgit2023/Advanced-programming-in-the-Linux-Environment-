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.2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.25cm"/>
    </style:style>
    <style:style style:name="gr3" style:family="graphic" style:parent-style-name="objectwithoutfill">
      <style:graphic-properties svg:stroke-color="#000000" draw:marker-end="Arrowheads_20_2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5cm" svg:height="1.5cm" svg:x="2cm" svg:y="13.75cm">
          <text:p text:style-name="P1"><text:span text:style-name="T1">terminale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5cm" svg:height="1.5cm" svg:x="8.2cm" svg:y="15.85cm">
          <text:p text:style-name="P1"><text:span text:style-name="T1">file.tx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75cm" svg:height="1.5cm" svg:x="13.9cm" svg:y="13.75cm">
          <text:p text:style-name="P3"><text:span text:style-name="T1">terminale 2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5.25cm" svg:y1="15.25cm" svg:x2="12cm" svg:y2="16.5cm">
          <text:p/>
        </draw:line>
        <draw:line draw:style-name="gr3" draw:text-style-name="P5" draw:layer="layout" svg:x1="8.25cm" svg:y1="16.5cm" svg:x2="4.25cm" svg:y2="15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6T14:31:08.973015971</meta:creation-date>
    <dc:date>2022-03-16T14:34:29.043457905</dc:date>
    <meta:editing-duration>PT3M20S</meta:editing-duration>
    <meta:editing-cycles>1</meta:editing-cycles>
    <meta:document-statistic meta:object-count="5"/>
    <meta:generator>LibreOffice/7.3.1.1$Linux_X86_64 LibreOffice_project/30$Build-1</meta:generator>
  </office:meta>
</office:document-meta>
</file>