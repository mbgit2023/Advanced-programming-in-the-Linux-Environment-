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2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Courier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Courier" fo:font-size="14pt" style:font-size-asian="14pt" style:font-size-complex="14pt"/>
    </style:style>
    <style:style style:name="P3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font-name="Courier" fo:font-size="14pt" style:font-size-asian="14pt" style:font-size-complex="14pt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5cm" svg:height="1.25cm" svg:x="2.75cm" svg:y="10.75cm">
          <text:p text:style-name="P1"><text:span text:style-name="T1">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5cm" svg:height="1.25cm" svg:x="7.25cm" svg:y="10.75cm">
          <text:p text:style-name="P1"><text:span text:style-name="T1">gre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5cm" svg:height="1.25cm" svg:x="11.75cm" svg:y="10.75cm">
          <text:p text:style-name="P1"><text:span text:style-name="T1">te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.5cm" svg:x="11.25cm" svg:y="7.7cm">
          <text:p text:style-name="P3"><text:span text:style-name="T2">FI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5cm" svg:height="1.25cm" svg:x="2.75cm" svg:y="7.9cm">
          <text:p text:style-name="P1"><text:span text:style-name="T1">wc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5cm" svg:y1="11.5cm" svg:x2="7.25cm" svg:y2="11.5cm">
          <text:p/>
        </draw:line>
        <draw:line draw:style-name="gr3" draw:text-style-name="P5" draw:layer="layout" svg:x1="10cm" svg:y1="11.5cm" svg:x2="11.75cm" svg:y2="11.5cm">
          <text:p/>
        </draw:line>
        <draw:line draw:style-name="gr4" draw:text-style-name="P5" draw:layer="layout" svg:x1="11.25cm" svg:y1="8.5cm" svg:x2="5.5cm" svg:y2="8.5cm">
          <text:p/>
        </draw:line>
        <draw:frame draw:style-name="gr5" draw:text-style-name="P7" draw:layer="layout" svg:width="2.75cm" svg:height="0.763cm" svg:x="6.75cm" svg:y="7.75cm">
          <draw:text-box>
            <text:p text:style-name="P6"><text:span text:style-name="T3">read</text:span></text:p>
          </draw:text-box>
        </draw:frame>
        <draw:frame draw:style-name="gr5" draw:text-style-name="P7" draw:layer="layout" svg:width="2.75cm" svg:height="0.763cm" svg:x="13.2cm" svg:y="9.751cm">
          <draw:text-box>
            <text:p text:style-name="P6"><text:span text:style-name="T3">write</text:span></text:p>
          </draw:text-box>
        </draw:frame>
        <draw:line draw:style-name="gr6" draw:text-style-name="P5" draw:layer="layout" svg:x1="13cm" svg:y1="10.75cm" svg:x2="13cm" svg:y2="9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26T08:46:47.881919122</meta:creation-date>
    <dc:date>2025-09-21T17:36:31.705804073</dc:date>
    <meta:editing-duration>PT5M23S</meta:editing-duration>
    <meta:editing-cycles>2</meta:editing-cycles>
    <meta:generator>LibreOffice/25.8.0.4$Linux_X86_64 LibreOffice_project/580$Build-4</meta:generator>
    <meta:document-statistic meta:object-count="11"/>
  </office:meta>
</office:document-meta>
</file>