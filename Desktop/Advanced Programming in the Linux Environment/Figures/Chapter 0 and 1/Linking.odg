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2.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9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8" style:family="graphic" style:parent-style-name="objectwithoutfill">
      <style:graphic-properties draw:stroke="dash" draw:stroke-dash="Double_20_Dash_20__28_Rounded_29_" svg:stroke-color="#000000" draw:marker-start="" draw:marker-end="" draw:marker-end-width="0.3cm" svg:stroke-linecap="round" draw:fill="none" draw:textarea-vertical-align="middle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2.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2.45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cm" svg:height="1.15cm" svg:x="2.9cm" svg:y="3.85cm">
          <text:p text:style-name="P1"><text:span text:style-name="T1">hello.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15cm" svg:x="6.7cm" svg:y="3.85cm">
          <text:p text:style-name="P1"><text:span text:style-name="T1">libnew.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cm" svg:height="1.361cm" svg:x="5.5cm" svg:y="5.801cm">
          <draw:text-box>
            <text:p><text:span text:style-name="T2">gcc</text:span><text:span text:style-name="T3"> / </text:span><text:span text:style-name="T2">ld</text:span></text:p>
          </draw:text-box>
        </draw:frame>
        <draw:line draw:style-name="gr4" draw:text-style-name="P5" draw:layer="layout" svg:x1="6.25cm" svg:y1="6cm" svg:x2="5cm" svg:y2="5.25cm">
          <text:p/>
        </draw:line>
        <draw:line draw:style-name="gr5" draw:text-style-name="P5" draw:layer="layout" svg:x1="6.25cm" svg:y1="6cm" svg:x2="7.25cm" svg:y2="5.25cm">
          <text:p/>
        </draw:line>
        <draw:line draw:style-name="gr4" draw:text-style-name="P5" draw:layer="layout" svg:x1="15.35cm" svg:y1="6cm" svg:x2="14.1cm" svg:y2="5.25cm">
          <text:p/>
        </draw:line>
        <draw:line draw:style-name="gr5" draw:text-style-name="P5" draw:layer="layout" svg:x1="15.35cm" svg:y1="6cm" svg:x2="16.35cm" svg:y2="5.25cm">
          <text:p/>
        </draw:line>
        <draw:frame draw:style-name="gr3" draw:text-style-name="P4" draw:layer="layout" svg:width="2.5cm" svg:height="1.361cm" svg:x="14.5cm" svg:y="5.802cm">
          <draw:text-box>
            <text:p><text:span text:style-name="T2">gcc</text:span><text:span text:style-name="T3"> / </text:span><text:span text:style-name="T2">ld</text:span></text:p>
          </draw:text-box>
        </draw:frame>
        <draw:line draw:style-name="gr6" draw:text-style-name="P5" draw:layer="layout" svg:x1="6.25cm" svg:y1="6.75cm" svg:x2="6.25cm" svg:y2="8cm">
          <text:p/>
        </draw:line>
        <draw:frame draw:style-name="gr3" draw:text-style-name="P7" draw:layer="layout" svg:width="3.75cm" svg:height="1.361cm" svg:x="9cm" svg:y="7.703cm">
          <draw:text-box>
            <text:p text:style-name="P6"><text:span text:style-name="T4">compile time</text:span></text:p>
          </draw:text-box>
        </draw:frame>
        <draw:frame draw:style-name="gr3" draw:text-style-name="P7" draw:layer="layout" svg:width="3.75cm" svg:height="1.361cm" svg:x="9.1cm" svg:y="11.503cm">
          <draw:text-box>
            <text:p text:style-name="P6"><text:span text:style-name="T4">run time</text:span></text:p>
          </draw:text-box>
        </draw:frame>
        <draw:line draw:style-name="gr7" draw:text-style-name="P5" draw:layer="layout" svg:x1="12.35cm" svg:y1="12.9cm" svg:x2="14.1cm" svg:y2="14.65cm">
          <text:p/>
        </draw:line>
        <draw:line draw:style-name="gr7" draw:text-style-name="P5" draw:layer="layout" svg:x1="16.1cm" svg:y1="12.9cm" svg:x2="14.1cm" svg:y2="14.65cm">
          <text:p/>
        </draw:line>
        <draw:line draw:style-name="gr7" draw:text-style-name="P5" draw:layer="layout" svg:x1="15.45cm" svg:y1="12.9cm" svg:x2="17.2cm" svg:y2="14.65cm">
          <text:p/>
        </draw:line>
        <draw:line draw:style-name="gr7" draw:text-style-name="P5" draw:layer="layout" svg:x1="19.2cm" svg:y1="12.9cm" svg:x2="17.2cm" svg:y2="14.65cm">
          <text:p/>
        </draw:line>
        <draw:line draw:style-name="gr6" draw:text-style-name="P5" draw:layer="layout" svg:x1="15.45cm" svg:y1="6.75cm" svg:x2="15.45cm" svg:y2="8cm">
          <text:p/>
        </draw:line>
        <draw:line draw:style-name="gr8" draw:text-style-name="P5" draw:layer="layout" svg:x1="1.25cm" svg:y1="11.05cm" svg:x2="19.75cm" svg:y2="11.05cm">
          <text:p/>
        </draw:line>
        <draw:line draw:style-name="gr7" draw:text-style-name="P5" draw:layer="layout" svg:x1="17.1cm" svg:y1="15.85cm" svg:x2="19.4cm" svg:y2="17.15cm">
          <text:p/>
        </draw:line>
        <draw:line draw:style-name="gr7" draw:text-style-name="P5" draw:layer="layout" svg:x1="14cm" svg:y1="15.85cm" svg:x2="16.3cm" svg:y2="17.15cm">
          <text:p/>
        </draw:line>
        <draw:line draw:style-name="gr7" draw:text-style-name="P5" draw:layer="layout" svg:x1="17.1cm" svg:y1="15.85cm" svg:x2="15.6cm" svg:y2="17.1cm">
          <text:p/>
        </draw:line>
        <draw:line draw:style-name="gr7" draw:text-style-name="P5" draw:layer="layout" svg:x1="14cm" svg:y1="15.85cm" svg:x2="12.6cm" svg:y2="17.1cm">
          <text:p/>
        </draw:line>
        <draw:custom-shape draw:style-name="gr1" draw:text-style-name="P2" draw:layer="layout" svg:width="3.25cm" svg:height="1.15cm" svg:x="12cm" svg:y="3.85cm">
          <text:p text:style-name="P1"><text:span text:style-name="T1">hello.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15cm" svg:x="15.7cm" svg:y="3.85cm">
          <text:p text:style-name="P1"><text:span text:style-name="T1">libnew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1.15cm" svg:x="4.7cm" svg:y="8.0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15cm" svg:x="4.7cm" svg:y="9.15cm">
          <text:p text:style-name="P1"><text:span text:style-name="T1">libnew.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1.15cm" svg:x="13.9cm" svg:y="8.0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1.15cm" svg:x="4.7cm" svg:y="11.6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15cm" svg:x="4.7cm" svg:y="12.75cm">
          <text:p text:style-name="P1"><text:span text:style-name="T1">libnew.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1.15cm" svg:x="12.3cm" svg:y="11.6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1.15cm" svg:x="16.1cm" svg:y="11.65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cm" svg:height="1.15cm" svg:x="16.35cm" svg:y="17.15cm">
          <text:p text:style-name="P1"><text:span text:style-name="T1">c.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95cm" svg:height="1.15cm" svg:x="12.6cm" svg:y="17.15cm">
          <text:p text:style-name="P1"><text:span text:style-name="T1">b.o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15cm" svg:x="14cm" svg:y="14.65cm">
          <text:p text:style-name="P1"><text:span text:style-name="T1">libnew.s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23T22:18:14.260787463</meta:creation-date>
    <dc:date>2025-10-01T22:15:06.731198777</dc:date>
    <meta:editing-duration>PT40M19S</meta:editing-duration>
    <meta:editing-cycles>10</meta:editing-cycles>
    <meta:generator>LibreOffice/25.8.0.4$Linux_X86_64 LibreOffice_project/580$Build-4</meta:generator>
    <meta:print-date>2025-10-01T22:12:31.142716992</meta:print-date>
    <meta:printed-by>PDF files</meta:printed-by>
    <meta:document-statistic meta:object-count="33"/>
  </office:meta>
</office:document-meta>
</file>