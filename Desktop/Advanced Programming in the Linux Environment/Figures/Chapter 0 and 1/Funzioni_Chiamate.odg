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8cm" fo:min-width="8.516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fill="none" draw:textarea-vertical-align="middle"/>
    </style:style>
    <style:style style:name="gr4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1.75cm" svg:x="4.85cm" svg:y="5.25cm">
          <text:p text:style-name="P1">print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75cm" svg:x="4.85cm" svg:y="8.65cm">
          <text:p text:style-name="P1">wri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5cm" svg:height="4cm" svg:x="3.4cm" svg:y="11.5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cm" svg:height="1.75cm" svg:x="10.55cm" svg:y="5.25cm">
          <text:p text:style-name="P1">scan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75cm" svg:x="10.45cm" svg:y="8.65cm">
          <text:p text:style-name="P1">read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7cm" svg:x2="7cm" svg:y2="8.75cm">
          <text:p/>
        </draw:line>
        <draw:line draw:style-name="gr3" draw:text-style-name="P3" draw:layer="layout" svg:x1="12.5cm" svg:y1="7cm" svg:x2="12.5cm" svg:y2="8.75cm">
          <text:p/>
        </draw:line>
        <draw:line draw:style-name="gr3" draw:text-style-name="P3" draw:layer="layout" svg:x1="7cm" svg:y1="10.5cm" svg:x2="7cm" svg:y2="11.75cm">
          <text:p/>
        </draw:line>
        <draw:line draw:style-name="gr3" draw:text-style-name="P3" draw:layer="layout" svg:x1="12.6cm" svg:y1="10.5cm" svg:x2="12.6cm" svg:y2="11.75cm">
          <text:p/>
        </draw:line>
        <draw:line draw:style-name="gr4" draw:text-style-name="P3" draw:layer="layout" svg:x1="1.75cm" svg:y1="7.75cm" svg:x2="18cm" svg:y2="7.75cm">
          <text:p/>
        </draw:line>
        <draw:frame draw:style-name="gr5" draw:text-style-name="P4" draw:layer="layout" svg:width="2.75cm" svg:height="1.673cm" svg:x="1.5cm" svg:y="5.5cm">
          <draw:text-box>
            <text:p>user space</text:p>
          </draw:text-box>
        </draw:frame>
        <draw:frame draw:style-name="gr5" draw:text-style-name="P4" draw:layer="layout" svg:width="2.75cm" svg:height="1.673cm" svg:x="1.5cm" svg:y="8.401cm">
          <draw:text-box>
            <text:p>kernel spa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0T13:40:27.334417803</meta:creation-date>
    <dc:date>2022-03-20T13:46:21.800582497</dc:date>
    <meta:editing-duration>PT5M55S</meta:editing-duration>
    <meta:editing-cycles>1</meta:editing-cycles>
    <meta:generator>LibreOffice/7.3.1.1$Linux_X86_64 LibreOffice_project/30$Build-1</meta:generator>
    <meta:document-statistic meta:object-count="12"/>
  </office:meta>
</office:document-meta>
</file>