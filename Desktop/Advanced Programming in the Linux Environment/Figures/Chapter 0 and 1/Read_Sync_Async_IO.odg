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cm" fo:min-width="13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4.5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4.5cm"/>
      <style:paragraph-properties style:writing-mode="lr-tb"/>
    </style:style>
    <style:style style:name="gr4" style:family="graphic" style:parent-style-name="objectwithoutfill">
      <style:graphic-properties svg:stroke-color="#000000" draw:marker-start="Arrowheads_20_6" draw:marker-end="Arrowheads_20_2" draw:fill="none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cm" fo:min-width="14.5cm"/>
      <style:paragraph-properties style:writing-mode="lr-tb"/>
    </style:style>
    <style:style style:name="gr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5cm" fo:min-width="3.5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4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3.5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1cm"/>
      <style:paragraph-properties style:writing-mode="lr-tb"/>
    </style:style>
    <style:style style:name="gr10" style:family="graphic" style:parent-style-name="objectwithoutfill">
      <style:graphic-properties svg:stroke-color="#000000" draw:marker-end="Arrowheads_20_2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2.75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2.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6" style:family="graphic" style:parent-style-name="objectwithoutfill">
      <style:graphic-properties svg:stroke-color="#000000" draw:marker-end="Arrowheads_20_4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8" style:family="graphic" style:parent-style-name="objectwithoutfill">
      <style:graphic-properties draw:stroke="dash" draw:stroke-dash="Long_20_Dash" svg:stroke-color="#000000" svg:stroke-linecap="butt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20" style:family="graphic" style:parent-style-name="objectwithoutfill">
      <style:graphic-properties svg:stroke-color="#000000" draw:marker-end="Arrowheads_20_5" draw:fill="none" draw:textarea-vertical-align="middle"/>
    </style:style>
    <style:style style:name="P1" style:family="paragraph">
      <style:paragraph-properties fo:text-align="center" style:writing-mode="lr-tb"/>
      <style:text-properties fo:font-size="16pt" style:font-size-asian="16pt" style:font-size-complex="16pt"/>
    </style:style>
    <style:style style:name="P2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iberation Sans1" fo:font-size="16pt" style:font-size-asian="16pt" style:font-size-complex="16pt"/>
    </style:style>
    <style:style style:name="P7" style:family="paragraph">
      <loext:graphic-properties draw:fill-color="#ffffff"/>
      <style:paragraph-properties fo:text-align="center" style:writing-mode="lr-tb"/>
      <style:text-properties style:font-name="Liberation Sans1" fo:font-size="16pt" style:font-size-asian="16pt" style:font-size-complex="16pt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Liberation Sans1"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5cm" svg:height="2.25cm" svg:x="3.6cm" svg:y="8.15cm">
          <text:p text:style-name="P1"><text:span text:style-name="T1">disc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.25cm" svg:x="7.9cm" svg:y="5.95cm">
          <text:p text:style-name="P1"><text:span text:style-name="T1">buff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0.75cm" svg:x="7.9cm" svg:y="3.65cm">
          <text:p text:style-name="P1"><text:span text:style-name="T1">read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.25cm" svg:y1="7.25cm" svg:x2="10.25cm" svg:y2="8.15cm">
          <text:p/>
        </draw:line>
        <draw:custom-shape draw:style-name="gr5" draw:text-style-name="P2" draw:layer="layout" svg:width="15cm" svg:height="2.25cm" svg:x="3cm" svg:y="25.35cm">
          <text:p text:style-name="P1"><text:span text:style-name="T1">disco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cm" svg:height="0.75cm" svg:x="3cm" svg:y="19.85cm">
          <text:p text:style-name="P4"><text:span text:style-name="T1">read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5cm" svg:height="0.75cm" svg:x="7cm" svg:y="19.85cm">
          <text:p text:style-name="P1"><text:span text:style-name="T1">read2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5cm" svg:height="0.75cm" svg:x="12cm" svg:y="19.85cm">
          <text:p text:style-name="P1"><text:span text:style-name="T1">read3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cm" svg:height="0.75cm" svg:x="3cm" svg:y="17.6cm">
          <text:p text:style-name="P1"><text:span text:style-name="T1">read3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cm" svg:height="0.75cm" svg:x="3cm" svg:y="16.85cm">
          <text:p text:style-name="P1"><text:span text:style-name="T1">read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4cm" svg:height="0.75cm" svg:x="3cm" svg:y="16.1cm">
          <text:p text:style-name="P6"><text:span text:style-name="T2">read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.5cm" svg:height="0.75cm" svg:x="16.5cm" svg:y="19.85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4.75cm" svg:y1="18.35cm" svg:x2="4.75cm" svg:y2="19.85cm">
          <text:p/>
        </draw:line>
        <draw:frame draw:style-name="gr11" draw:text-style-name="P8" draw:layer="layout" svg:width="6.25cm" svg:height="1.199cm" svg:x="5cm" svg:y="18.8cm">
          <draw:text-box>
            <text:p><text:span text:style-name="T3">accoda, termina <text:s/>e ritorna</text:span></text:p>
          </draw:text-box>
        </draw:frame>
        <draw:frame draw:style-name="gr12" draw:text-style-name="P8" draw:layer="layout" svg:width="2.5cm" svg:height="0.725cm" svg:x="1.75cm" svg:y="20.875cm">
          <draw:text-box>
            <text:p><text:span text:style-name="T3">esegue</text:span></text:p>
          </draw:text-box>
        </draw:frame>
        <draw:custom-shape draw:style-name="gr13" draw:text-style-name="P2" draw:layer="layout" svg:width="3.25cm" svg:height="1.25cm" svg:x="3cm" svg:y="22.75cm">
          <text:p text:style-name="P1"><text:span text:style-name="T1">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3cm" svg:height="1.25cm" svg:x="12.368cm" svg:y="22.714cm">
          <text:p text:style-name="P1"><text:span text:style-name="T1">buffer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4.25cm" svg:y1="20.6cm" svg:x2="4.25cm" svg:y2="22.75cm">
          <text:p/>
        </draw:line>
        <draw:line draw:style-name="gr10" draw:text-style-name="P3" draw:layer="layout" svg:x1="13cm" svg:y1="20.6cm" svg:x2="13cm" svg:y2="22.75cm">
          <text:p/>
        </draw:line>
        <draw:line draw:style-name="gr10" draw:text-style-name="P3" draw:layer="layout" svg:x1="4.25cm" svg:y1="24cm" svg:x2="4.25cm" svg:y2="25.35cm">
          <text:p/>
        </draw:line>
        <draw:frame draw:style-name="gr15" draw:text-style-name="P9" draw:layer="layout" svg:width="5.75cm" svg:height="0.962cm" svg:x="8cm" svg:y="1.25cm">
          <draw:text-box>
            <text:p><text:span text:style-name="T4">I/O Sincrono</text:span></text:p>
          </draw:text-box>
        </draw:frame>
        <draw:frame draw:style-name="gr15" draw:text-style-name="P9" draw:layer="layout" svg:width="5.75cm" svg:height="0.962cm" svg:x="8cm" svg:y="14.6cm">
          <draw:text-box>
            <text:p><text:span text:style-name="T4">I/O Asincrono</text:span></text:p>
          </draw:text-box>
        </draw:frame>
        <draw:line draw:style-name="gr16" draw:text-style-name="P3" draw:layer="layout" svg:x1="9.25cm" svg:y1="20.6cm" svg:x2="9.25cm" svg:y2="25.35cm">
          <text:p/>
        </draw:line>
        <draw:frame draw:style-name="gr17" draw:text-style-name="P11" draw:layer="layout" svg:width="1.75cm" svg:height="0.75cm" svg:x="11.2cm" svg:y="4.4cm">
          <draw:text-box>
            <text:p text:style-name="P10"><text:span text:style-name="T3">ritorna</text:span></text:p>
          </draw:text-box>
        </draw:frame>
        <draw:line draw:style-name="gr10" draw:text-style-name="P3" draw:layer="layout" svg:x1="12.95cm" svg:y1="24cm" svg:x2="12.95cm" svg:y2="25.35cm">
          <text:p/>
        </draw:line>
        <draw:line draw:style-name="gr18" draw:text-style-name="P3" draw:layer="layout" svg:x1="2cm" svg:y1="22.25cm" svg:x2="19cm" svg:y2="22.25cm">
          <text:p/>
        </draw:line>
        <draw:frame draw:style-name="gr19" draw:text-style-name="P12" draw:layer="layout" svg:width="2.5cm" svg:height="1.25cm" svg:x="17.55cm" svg:y="22.6cm">
          <draw:text-box>
            <text:p>kernel</text:p>
          </draw:text-box>
        </draw:frame>
        <draw:frame draw:style-name="gr19" draw:text-style-name="P12" draw:layer="layout" svg:width="2.5cm" svg:height="1.25cm" svg:x="17.55cm" svg:y="21cm">
          <draw:text-box>
            <text:p>user</text:p>
          </draw:text-box>
        </draw:frame>
        <draw:line draw:style-name="gr18" draw:text-style-name="P3" draw:layer="layout" svg:x1="2cm" svg:y1="5.35cm" svg:x2="19cm" svg:y2="5.35cm">
          <text:p/>
        </draw:line>
        <draw:frame draw:style-name="gr19" draw:text-style-name="P12" draw:layer="layout" svg:width="2.5cm" svg:height="1.25cm" svg:x="17.55cm" svg:y="3.8cm">
          <draw:text-box>
            <text:p>user</text:p>
          </draw:text-box>
        </draw:frame>
        <draw:frame draw:style-name="gr19" draw:text-style-name="P12" draw:layer="layout" svg:width="2.5cm" svg:height="1.25cm" svg:x="17.55cm" svg:y="5.9cm">
          <draw:text-box>
            <text:p>kernel</text:p>
          </draw:text-box>
        </draw:frame>
        <draw:line draw:style-name="gr20" draw:text-style-name="P3" draw:layer="layout" svg:x1="9.25cm" svg:y1="4.4cm" svg:x2="9.25cm" svg:y2="5.9cm">
          <text:p/>
        </draw:line>
        <draw:line draw:style-name="gr20" draw:text-style-name="P3" draw:layer="layout" svg:x1="11.25cm" svg:y1="5.9cm" svg:x2="11.25cm" svg:y2="4.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4" draw:display-name="Arrowheads 4" svg:viewBox="0 0 1013 1130" svg:d="M1009 1050l-449-1008-22-30-29-12-34 12-21 26-449 1012-5 13v8l5 21 12 21 17 13 21 4h903l21-4 21-13 9-21 4-21v-8z"/>
    <draw:marker draw:name="Arrowheads_20_5" draw:display-name="Arrowheads 5" svg:viewBox="0 7 20 13" svg:d="M0 20l10-13 10 13z"/>
    <draw:marker draw:name="Arrowheads_20_6" draw:display-name="Arrowheads 6" svg:viewBox="0 0 1131 1580" svg:d="M1013 1491l118 89-567-1580-564 1580 114-85 136-68 148-46 161-17 161 13 153 46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01T05:09:24.826504902</meta:creation-date>
    <dc:date>2022-03-29T19:28:02.440835382</dc:date>
    <meta:editing-duration>PT1H24M50S</meta:editing-duration>
    <meta:editing-cycles>23</meta:editing-cycles>
    <meta:generator>LibreOffice/7.3.1.1$Linux_X86_64 LibreOffice_project/30$Build-1</meta:generator>
    <meta:document-statistic meta:object-count="33"/>
  </office:meta>
</office:document-meta>
</file>