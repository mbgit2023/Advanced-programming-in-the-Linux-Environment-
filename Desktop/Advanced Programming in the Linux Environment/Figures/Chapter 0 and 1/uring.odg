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7.438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82cm" fo:min-width="7.438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4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5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6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62cm" loext:decorative="false"/>
      <style:paragraph-properties style:writing-mode="lr-tb"/>
    </style:style>
    <style:style style:name="gr8" style:family="graphic" style:parent-style-name="standard">
      <style:graphic-properties draw:stroke="dash" draw:stroke-dash="Double_20_Dash" svg:stroke-width="0cm" svg:stroke-color="#000000" svg:stroke-linecap="butt" draw:fill="solid" draw:fill-color="#000000" draw:opacity="0%" draw:textarea-horizontal-align="justify" draw:textarea-vertical-align="middle" draw:auto-grow-height="false" fo:min-height="6.735cm" fo:min-width="16.645cm" loext:decorative="false"/>
    </style:style>
    <style:style style:name="P1" style:family="paragraph">
      <style:paragraph-properties fo:text-align="center"/>
      <style:text-properties style:font-name="Courier" fo:font-size="13pt" style:font-size-asian="13pt" style:font-size-complex="13pt"/>
    </style:style>
    <style:style style:name="P2" style:family="paragraph">
      <loext:graphic-properties draw:fill="solid" draw:fill-color="#ffffff"/>
      <style:paragraph-properties fo:text-align="center" style:writing-mode="lr-tb"/>
      <style:text-properties style:font-name="Courier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1pt" style:font-size-asian="11pt" style:font-size-complex="11pt"/>
    </style:style>
    <style:style style:name="P5" style:family="paragraph">
      <loext:graphic-properties draw:fill="solid" draw:fill-color="#000000" draw:opacity="0%"/>
      <style:paragraph-properties fo:text-align="center"/>
    </style:style>
    <style:style style:name="T1" style:family="text">
      <style:text-properties style:font-name="Courier" fo:font-size="13pt" style:font-size-asian="13pt" style:font-size-complex="13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938cm" svg:height="1.27cm" svg:x="6.397cm" svg:y="2.605cm">
          <text:p text:style-name="P1"><text:span text:style-name="T1">io_uring_queue_in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938cm" svg:height="1.27cm" svg:x="6.397cm" svg:y="4.705cm">
          <text:p text:style-name="P1"><text:span text:style-name="T1">io_uring_get_sq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938cm" svg:height="1.932cm" svg:x="6.397cm" svg:y="6.905cm">
          <text:p text:style-name="P1"><text:span text:style-name="T1">io_uring_prep_read</text:span><text:span text:style-name="T1"><text:line-break/></text:span><text:span text:style-name="T1">io_uring_prep_wri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938cm" svg:height="1.27cm" svg:x="6.397cm" svg:y="9.805cm">
          <text:p text:style-name="P1"><text:span text:style-name="T1">io_uring_sqe_set_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938cm" svg:height="1.27cm" svg:x="6.397cm" svg:y="12.005cm">
          <text:p text:style-name="P1"><text:span text:style-name="T1">io_uring_sub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938cm" svg:height="1.27cm" svg:x="10.797cm" svg:y="14.305cm">
          <text:p text:style-name="P1"><text:span text:style-name="T1">io_uring_peek_cq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938cm" svg:height="1.27cm" svg:x="6.397cm" svg:y="16.505cm">
          <text:p text:style-name="P1"><text:span text:style-name="T1">io_uring_cqe_get_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938cm" svg:height="1.27cm" svg:x="6.397cm" svg:y="18.805cm">
          <text:p text:style-name="P1"><text:span text:style-name="T1">io_uring_cqe_se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938cm" svg:height="1.27cm" svg:x="6.397cm" svg:y="21.605cm">
          <text:p text:style-name="P1"><text:span text:style-name="T1">io_uring_queue_ex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938cm" svg:height="1.27cm" svg:x="2.297cm" svg:y="14.305cm">
          <text:p text:style-name="P1"><text:span text:style-name="T1">io_uring_wait_cqe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207cm" svg:y1="3.857cm" svg:x2="10.207cm" svg:y2="4.727cm">
          <text:p/>
        </draw:line>
        <draw:line draw:style-name="gr3" draw:text-style-name="P3" draw:layer="layout" svg:x1="10.207cm" svg:y1="5.975cm" svg:x2="10.207cm" svg:y2="6.927cm">
          <text:p/>
        </draw:line>
        <draw:line draw:style-name="gr3" draw:text-style-name="P3" draw:layer="layout" svg:x1="10.207cm" svg:y1="8.875cm" svg:x2="10.207cm" svg:y2="9.827cm">
          <text:p/>
        </draw:line>
        <draw:line draw:style-name="gr3" draw:text-style-name="P3" draw:layer="layout" svg:x1="10.207cm" svg:y1="11.075cm" svg:x2="10.207cm" svg:y2="12.027cm">
          <text:p/>
        </draw:line>
        <draw:line draw:style-name="gr3" draw:text-style-name="P3" draw:layer="layout" svg:x1="10.207cm" svg:y1="17.875cm" svg:x2="10.207cm" svg:y2="18.827cm">
          <text:p/>
        </draw:line>
        <draw:line draw:style-name="gr3" draw:text-style-name="P3" draw:layer="layout" svg:x1="10.207cm" svg:y1="20.075cm" svg:x2="10.207cm" svg:y2="21.637cm">
          <text:p/>
        </draw:line>
        <draw:line draw:style-name="gr4" draw:text-style-name="P3" draw:layer="layout" svg:x1="9.89cm" svg:y1="13.382cm" svg:x2="8.237cm" svg:y2="14.335cm">
          <text:p/>
        </draw:line>
        <draw:line draw:style-name="gr5" draw:text-style-name="P3" draw:layer="layout" svg:x1="10.525cm" svg:y1="13.382cm" svg:x2="11.877cm" svg:y2="14.335cm">
          <text:p/>
        </draw:line>
        <draw:line draw:style-name="gr6" draw:text-style-name="P3" draw:layer="layout" svg:x1="8.937cm" svg:y1="15.605cm" svg:x2="8.937cm" svg:y2="16.557cm">
          <text:p/>
        </draw:line>
        <draw:line draw:style-name="gr6" draw:text-style-name="P3" draw:layer="layout" svg:x1="11.737cm" svg:y1="15.605cm" svg:x2="11.737cm" svg:y2="16.557cm">
          <text:p/>
        </draw:line>
        <draw:frame draw:style-name="gr7" draw:text-style-name="P4" draw:layer="layout" svg:width="4.445cm" svg:height="0.87cm" svg:x="14.652cm" svg:y="2.805cm">
          <draw:text-box>
            <text:p><text:span text:style-name="T2">Initializes the queues</text:span></text:p>
          </draw:text-box>
        </draw:frame>
        <draw:frame draw:style-name="gr7" draw:text-style-name="P4" draw:layer="layout" svg:width="4.445cm" svg:height="0.87cm" svg:x="14.653cm" svg:y="5.005cm">
          <draw:text-box>
            <text:p><text:span text:style-name="T2">get the SQE</text:span></text:p>
          </draw:text-box>
        </draw:frame>
        <draw:frame draw:style-name="gr7" draw:text-style-name="P4" draw:layer="layout" svg:width="4.445cm" svg:height="0.87cm" svg:x="14.654cm" svg:y="7.505cm">
          <draw:text-box>
            <text:p><text:span text:style-name="T2">prepare the operation</text:span></text:p>
          </draw:text-box>
        </draw:frame>
        <draw:frame draw:style-name="gr7" draw:text-style-name="P4" draw:layer="layout" svg:width="4.445cm" svg:height="0.87cm" svg:x="14.655cm" svg:y="10.105cm">
          <draw:text-box>
            <text:p><text:span text:style-name="T2">set the user data</text:span></text:p>
          </draw:text-box>
        </draw:frame>
        <draw:frame draw:style-name="gr7" draw:text-style-name="P4" draw:layer="layout" svg:width="4.445cm" svg:height="0.87cm" svg:x="14.656cm" svg:y="12.305cm">
          <draw:text-box>
            <text:p><text:span text:style-name="T2">submit the requests</text:span></text:p>
          </draw:text-box>
        </draw:frame>
        <draw:frame draw:style-name="gr7" draw:text-style-name="P4" draw:layer="layout" svg:width="4.445cm" svg:height="0.87cm" svg:x="15.057cm" svg:y="15.805cm">
          <draw:text-box>
            <text:p><text:span text:style-name="T2">non-blocking</text:span></text:p>
          </draw:text-box>
        </draw:frame>
        <draw:frame draw:style-name="gr7" draw:text-style-name="P4" draw:layer="layout" svg:width="4.445cm" svg:height="0.87cm" svg:x="2.958cm" svg:y="15.705cm">
          <draw:text-box>
            <text:p><text:span text:style-name="T2">blocking</text:span></text:p>
          </draw:text-box>
        </draw:frame>
        <draw:frame draw:style-name="gr7" draw:text-style-name="P4" draw:layer="layout" svg:width="4.445cm" svg:height="0.87cm" svg:x="14.657cm" svg:y="16.805cm">
          <draw:text-box>
            <text:p><text:span text:style-name="T2">get the user data</text:span></text:p>
          </draw:text-box>
        </draw:frame>
        <draw:frame draw:style-name="gr7" draw:text-style-name="P4" draw:layer="layout" svg:width="4.445cm" svg:height="0.87cm" svg:x="14.658cm" svg:y="19.005cm">
          <draw:text-box>
            <text:p><text:span text:style-name="T2">mark as consumed</text:span></text:p>
          </draw:text-box>
        </draw:frame>
        <draw:frame draw:style-name="gr7" draw:text-style-name="P4" draw:layer="layout" svg:width="4.445cm" svg:height="0.87cm" svg:x="14.659cm" svg:y="21.905cm">
          <draw:text-box>
            <text:p><text:span text:style-name="T2">free the resources</text:span></text:p>
          </draw:text-box>
        </draw:frame>
        <draw:custom-shape draw:style-name="gr8" draw:text-style-name="P5" draw:layer="layout" svg:width="17.145cm" svg:height="6.985cm" svg:x="1.952cm" svg:y="13.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5T14:43:31.650320017</meta:creation-date>
    <dc:date>2026-05-16T03:29:00.128913228</dc:date>
    <meta:editing-duration>PT13M34S</meta:editing-duration>
    <meta:editing-cycles>3</meta:editing-cycles>
    <meta:generator>LibreOffice/26.2.1.2$Linux_X86_64 LibreOffice_project/620$Build-2</meta:generator>
    <meta:document-statistic meta:object-count="31"/>
  </office:meta>
</office:document-meta>
</file>