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co1" style:family="table-column">
      <style:table-column-properties style:column-width="2.129cm" style:use-optimal-column-width="false"/>
    </style:style>
    <style:style style:name="co2" style:family="table-column">
      <style:table-column-properties style:column-width="3.401cm" style:use-optimal-column-width="false"/>
    </style:style>
    <style:style style:name="co3" style:family="table-column">
      <style:table-column-properties style:column-width="3.468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-color="#ffffff" draw:textarea-vertical-align="middle"/>
      <style:paragraph-properties fo:text-align="center" fo:border="0.43pt solid #000000"/>
    </style:style>
    <style:style style:name="ce2" style:family="table-cell">
      <loext:graphic-properties draw:fill-color="#ffffff" draw:textarea-vertical-align="middle"/>
      <style:paragraph-properties fo:text-align="center" fo:border-left="none" fo:border-right="0.43pt solid #000000" fo:border-top="0.43pt solid #000000" fo:border-bottom="0.4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257cm" svg:height="1.998cm" svg:x="6.442cm" svg:y="14.02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">0x23</text:p>
              </table:table-cell>
              <table:table-cell table:style-name="ce2">
                <text:p text:style-name="P1">0x0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257cm" svg:height="1.998cm" svg:x="11.943cm" svg:y="14.02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">0x01</text:p>
              </table:table-cell>
              <table:table-cell table:style-name="ce2">
                <text:p text:style-name="P1">0x2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14.5cm" svg:height="1cm" svg:x="1.75cm" svg:y="16.082cm">
          <draw:text-box>
            <text:p>byte: <text:s text:c="22"/>0 <text:s text:c="9"/>1 <text:s text:c="15"/>0 <text:s text:c="9"/>1</text:p>
          </draw:text-box>
        </draw:frame>
        <draw:frame draw:style-name="gr2" draw:text-style-name="P2" draw:layer="layout" svg:width="11cm" svg:height="1.25cm" svg:x="6.35cm" svg:y="12.75cm">
          <draw:text-box>
            <text:p><text:s/>Little Endian<text:tab/><text:tab/> <text:s text:c="2"/>Big Endian</text:p>
          </draw:text-box>
        </draw:frame>
        <draw:frame draw:style-name="standard" draw:layer="layout" svg:width="6.868cm" svg:height="1.998cm" svg:x="3.95cm" svg:y="18.62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1">
                <text:p text:style-name="P1">00010111</text:p>
              </table:table-cell>
              <table:table-cell table:style-name="ce2">
                <text:p text:style-name="P1">0000000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868cm" svg:height="1.998cm" svg:x="11.951cm" svg:y="18.62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1">
                <text:p text:style-name="P1">00000001</text:p>
              </table:table-cell>
              <table:table-cell table:style-name="ce2">
                <text:p text:style-name="P1">0001011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17cm" svg:height="1.673cm" svg:x="1.75cm" svg:y="20.827cm">
          <draw:text-box>
            <text:p>byte: <text:s text:c="11"/>0 <text:s text:c="16"/>1 <text:s text:c="23"/>0 <text:s text:c="15"/>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03:21:13.316504971</meta:creation-date>
    <dc:date>2022-04-23T04:02:00.480053077</dc:date>
    <meta:editing-duration>PT20M16S</meta:editing-duration>
    <meta:editing-cycles>7</meta:editing-cycles>
    <meta:generator>LibreOffice/7.3.1.3$Linux_X86_64 LibreOffice_project/30$Build-3</meta:generator>
    <meta:document-statistic meta:object-count="7"/>
  </office:meta>
</office:document-meta>
</file>