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3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fill="none" draw:textarea-vertical-align="middle"/>
    </style:style>
    <style:style style:name="gr4" style:family="graphic" style:parent-style-name="objectwithoutfill">
      <style:graphic-properties svg:stroke-color="#000000" draw:marker-end="Arrowheads_20_2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25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25cm" svg:x="7.6cm" svg:y="6.5cm">
          <text:p text:style-name="P2"><text:span text:style-name="T1">Memori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25cm" svg:x="12.6cm" svg:y="6.5cm">
          <text:p text:style-name="P4"><text:span text:style-name="T1">Scherm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25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25cm" svg:x="2.5cm" svg:y="6.5cm">
          <text:p text:style-name="P2"><text:span text:style-name="T1">Disc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25cm" svg:x="7.6cm" svg:y="9.3cm">
          <text:p text:style-name="P2"><text:span text:style-name="T1">Processore/SO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4.75cm" svg:y1="8cm" svg:x2="7.25cm" svg:y2="9.75cm">
          <text:p/>
        </draw:line>
        <draw:line draw:style-name="gr3" draw:text-style-name="P5" draw:layer="layout" svg:x1="11.65cm" svg:y1="9.75cm" svg:x2="14cm" svg:y2="8cm">
          <text:p/>
        </draw:line>
        <draw:line draw:style-name="gr4" draw:text-style-name="P5" draw:layer="layout" svg:x1="9.7cm" svg:y1="8cm" svg:x2="9.7cm" svg:y2="9cm">
          <text:p/>
        </draw:line>
        <draw:line draw:style-name="gr3" draw:text-style-name="P5" draw:layer="layout" svg:x1="8.7cm" svg:y1="9cm" svg:x2="8.7cm" svg:y2="8cm">
          <text:p/>
        </draw:line>
        <draw:frame draw:style-name="gr5" draw:text-style-name="P7" draw:layer="layout" svg:width="0.75cm" svg:height="0.806cm" svg:x="4cm" svg:y="7.95cm">
          <draw:text-box>
            <text:p text:style-name="P6"><text:span text:style-name="T2">1</text:span></text:p>
          </draw:text-box>
        </draw:frame>
        <draw:frame draw:style-name="gr5" draw:text-style-name="P7" draw:layer="layout" svg:width="0.75cm" svg:height="0.806cm" svg:x="7.5cm" svg:y="7.95cm">
          <draw:text-box>
            <text:p text:style-name="P6"><text:span text:style-name="T2">2</text:span></text:p>
          </draw:text-box>
        </draw:frame>
        <draw:frame draw:style-name="gr5" draw:text-style-name="P7" draw:layer="layout" svg:width="0.75cm" svg:height="0.806cm" svg:x="10.1cm" svg:y="7.95cm">
          <draw:text-box>
            <text:p text:style-name="P6"><text:span text:style-name="T2">3</text:span></text:p>
          </draw:text-box>
        </draw:frame>
        <draw:frame draw:style-name="gr5" draw:text-style-name="P7" draw:layer="layout" svg:width="0.75cm" svg:height="0.806cm" svg:x="12.3cm" svg:y="7.95cm">
          <draw:text-box>
            <text:p text:style-name="P6"><text:span text:style-name="T2">4</text:span></text:p>
          </draw:text-box>
        </draw:frame>
        <draw:frame draw:style-name="gr6" draw:text-style-name="P9" draw:layer="layout" svg:width="1.6cm" svg:height="0.8cm" svg:x="4.65cm" svg:y="8.95cm">
          <draw:text-box>
            <text:p text:style-name="P8"><text:span text:style-name="T1">legge</text:span></text:p>
          </draw:text-box>
        </draw:frame>
        <draw:frame draw:style-name="gr6" draw:text-style-name="P9" draw:layer="layout" svg:width="1.6cm" svg:height="0.8cm" svg:x="10.15cm" svg:y="8.55cm">
          <draw:text-box>
            <text:p text:style-name="P8"><text:span text:style-name="T1">legge</text:span></text:p>
          </draw:text-box>
        </draw:frame>
        <draw:frame draw:style-name="gr7" draw:text-style-name="P9" draw:layer="layout" svg:width="2cm" svg:height="0.725cm" svg:x="7.1cm" svg:y="8.55cm">
          <draw:text-box>
            <text:p text:style-name="P8"><text:span text:style-name="T1">s</text:span><text:span text:style-name="T1">c</text:span><text:span text:style-name="T1">ri</text:span><text:span text:style-name="T1">v</text:span><text:span text:style-name="T1">e</text:span></text:p>
          </draw:text-box>
        </draw:frame>
        <draw:frame draw:style-name="gr7" draw:text-style-name="P9" draw:layer="layout" svg:width="2cm" svg:height="0.725cm" svg:x="12.9cm" svg:y="8.851cm">
          <draw:text-box>
            <text:p text:style-name="P8"><text:span text:style-name="T1">scrive</text:span></text:p>
          </draw:text-box>
        </draw:frame>
        <draw:custom-shape draw:style-name="gr1" draw:text-style-name="P1" draw:layer="layout" svg:width="3.5cm" svg:height="1.25cm" svg:x="2.5cm" svg:y="1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25cm" svg:x="7.6cm" svg:y="12.2cm">
          <text:p text:style-name="P2"><text:span text:style-name="T1">Memori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25cm" svg:x="12.6cm" svg:y="12.2cm">
          <text:p text:style-name="P4"><text:span text:style-name="T1">Disc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25cm" svg:x="2.5cm" svg:y="1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25cm" svg:x="2.5cm" svg:y="12.2cm">
          <text:p text:style-name="P2"><text:span text:style-name="T1">Tastier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25cm" svg:x="7.6cm" svg:y="15cm">
          <text:p text:style-name="P2"><text:span text:style-name="T1">Processore/SO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4.75cm" svg:y1="13.7cm" svg:x2="7.25cm" svg:y2="15.45cm">
          <text:p/>
        </draw:line>
        <draw:line draw:style-name="gr3" draw:text-style-name="P5" draw:layer="layout" svg:x1="11.65cm" svg:y1="15.45cm" svg:x2="14cm" svg:y2="13.7cm">
          <text:p/>
        </draw:line>
        <draw:line draw:style-name="gr4" draw:text-style-name="P5" draw:layer="layout" svg:x1="9.7cm" svg:y1="13.7cm" svg:x2="9.7cm" svg:y2="14.7cm">
          <text:p/>
        </draw:line>
        <draw:line draw:style-name="gr3" draw:text-style-name="P5" draw:layer="layout" svg:x1="8.7cm" svg:y1="14.7cm" svg:x2="8.7cm" svg:y2="13.7cm">
          <text:p/>
        </draw:line>
        <draw:frame draw:style-name="gr5" draw:text-style-name="P7" draw:layer="layout" svg:width="0.75cm" svg:height="0.806cm" svg:x="4cm" svg:y="13.65cm">
          <draw:text-box>
            <text:p text:style-name="P6"><text:span text:style-name="T2">1</text:span></text:p>
          </draw:text-box>
        </draw:frame>
        <draw:frame draw:style-name="gr5" draw:text-style-name="P7" draw:layer="layout" svg:width="0.75cm" svg:height="0.806cm" svg:x="7.5cm" svg:y="13.65cm">
          <draw:text-box>
            <text:p text:style-name="P6"><text:span text:style-name="T2">2</text:span></text:p>
          </draw:text-box>
        </draw:frame>
        <draw:frame draw:style-name="gr5" draw:text-style-name="P7" draw:layer="layout" svg:width="0.75cm" svg:height="0.806cm" svg:x="10.1cm" svg:y="13.65cm">
          <draw:text-box>
            <text:p text:style-name="P6"><text:span text:style-name="T2">3</text:span></text:p>
          </draw:text-box>
        </draw:frame>
        <draw:frame draw:style-name="gr5" draw:text-style-name="P7" draw:layer="layout" svg:width="0.75cm" svg:height="0.806cm" svg:x="12.3cm" svg:y="13.65cm">
          <draw:text-box>
            <text:p text:style-name="P6"><text:span text:style-name="T2">4</text:span></text:p>
          </draw:text-box>
        </draw:frame>
        <draw:frame draw:style-name="gr6" draw:text-style-name="P9" draw:layer="layout" svg:width="1.6cm" svg:height="0.8cm" svg:x="4.65cm" svg:y="14.65cm">
          <draw:text-box>
            <text:p text:style-name="P8"><text:span text:style-name="T1">legge</text:span></text:p>
          </draw:text-box>
        </draw:frame>
        <draw:frame draw:style-name="gr6" draw:text-style-name="P9" draw:layer="layout" svg:width="1.6cm" svg:height="0.8cm" svg:x="10.15cm" svg:y="14.25cm">
          <draw:text-box>
            <text:p text:style-name="P8"><text:span text:style-name="T1">legge</text:span></text:p>
          </draw:text-box>
        </draw:frame>
        <draw:frame draw:style-name="gr7" draw:text-style-name="P9" draw:layer="layout" svg:width="2cm" svg:height="0.725cm" svg:x="7.1cm" svg:y="14.25cm">
          <draw:text-box>
            <text:p text:style-name="P8"><text:span text:style-name="T1">scrive</text:span></text:p>
          </draw:text-box>
        </draw:frame>
        <draw:frame draw:style-name="gr7" draw:text-style-name="P9" draw:layer="layout" svg:width="2cm" svg:height="0.725cm" svg:x="12.9cm" svg:y="14.551cm">
          <draw:text-box>
            <text:p text:style-name="P8"><text:span text:style-name="T1">scriv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6T14:38:00.972358454</meta:creation-date>
    <dc:date>2022-03-16T14:54:30.025531625</dc:date>
    <meta:editing-duration>PT5M58S</meta:editing-duration>
    <meta:editing-cycles>1</meta:editing-cycles>
    <meta:document-statistic meta:object-count="36"/>
    <meta:generator>LibreOffice/7.3.1.1$Linux_X86_64 LibreOffice_project/30$Build-1</meta:generator>
  </office:meta>
</office:document-meta>
</file>