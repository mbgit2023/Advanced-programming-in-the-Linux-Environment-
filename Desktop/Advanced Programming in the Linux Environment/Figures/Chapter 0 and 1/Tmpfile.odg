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1.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0.5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color="#808080" draw:marker-end="Arrowheads_20_1" draw:marker-end-width="0.3cm" svg:stroke-linecap="butt" draw:fill="none" draw:textarea-vertical-align="middle"/>
    </style:style>
    <style:style style:name="gr5" style:family="graphic" style:parent-style-name="objectwithoutfill">
      <style:graphic-properties draw:stroke="solid" draw:stroke-dash="Long_20_Dash" svg:stroke-color="#808080" draw:marker-end="Arrowheads_20_1" draw:marker-end-width="0.3cm" svg:stroke-linecap="butt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8" style:family="graphic" style:parent-style-name="objectwithoutfill">
      <style:graphic-properties svg:stroke-color="#808080"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color="#808080" draw:marker-end="Arrowheads_20_7" draw:marker-end-width="0.3cm" svg:stroke-linecap="butt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objectwithoutfill">
      <style:graphic-properties draw:stroke="dash" draw:stroke-dash="Long_20_Dash" svg:stroke-color="#808080" draw:marker-end="Arrowheads_20_8" draw:marker-end-width="0.3cm" svg:stroke-linecap="butt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75cm" svg:height="1.5cm" svg:x="4.25cm" svg:y="13.25cm">
          <text:p text:style-name="P1">file sys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05cm" svg:height="1.25cm" svg:x="4.2cm" svg:y="6.25cm">
          <text:p text:style-name="P1">process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1.25cm" svg:x="4.25cm" svg:y="9.25cm">
          <text:p text:style-name="P3"><text:span text:style-name="T1">/tmp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25cm" svg:y1="7.5cm" svg:x2="5.25cm" svg:y2="9.25cm">
          <text:p/>
        </draw:line>
        <draw:line draw:style-name="gr5" draw:text-style-name="P5" draw:layer="layout" svg:x1="5.25cm" svg:y1="10.5cm" svg:x2="5.25cm" svg:y2="13.25cm">
          <text:p/>
        </draw:line>
        <draw:frame draw:style-name="gr6" draw:text-style-name="P7" draw:layer="layout" svg:width="3.5cm" svg:height="1cm" svg:x="4.6cm" svg:y="6.6cm">
          <draw:text-box>
            <text:p text:style-name="P6"><text:span text:style-name="T1"><text:s text:c="2"/></text:span><text:span text:style-name="T1">tmpfile()</text:span></text:p>
          </draw:text-box>
        </draw:frame>
        <draw:custom-shape draw:style-name="gr7" draw:text-style-name="P4" draw:layer="layout" svg:width="3cm" svg:height="1cm" svg:x="5cm" svg:y="13.5cm">
          <text:p text:style-name="P1"><text:span text:style-name="T1">Inode no_name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3.35cm" svg:y1="7.5cm" svg:x2="13.35cm" svg:y2="13.25cm">
          <text:p/>
        </draw:line>
        <draw:frame draw:style-name="gr9" draw:text-style-name="P7" draw:layer="layout" svg:width="1.8cm" svg:height="0.725cm" svg:x="12.4cm" svg:y="6.6cm">
          <draw:text-box draw:corner-radius="0.05cm">
            <text:p text:style-name="P6"><text:span text:style-name="T1">linkat()</text:span></text:p>
          </draw:text-box>
        </draw:frame>
        <draw:custom-shape draw:style-name="gr7" draw:text-style-name="P4" draw:layer="layout" svg:width="3cm" svg:height="1cm" svg:x="12cm" svg:y="13.5cm">
          <text:p text:style-name="P1"><text:span text:style-name="T1">/tmp/file.txt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.6cm" svg:y1="9.151cm" svg:x2="6.6cm" svg:y2="7.5cm">
          <text:p/>
        </draw:line>
        <draw:frame draw:style-name="gr11" draw:text-style-name="P7" draw:layer="layout" svg:width="1.25cm" svg:height="0.75cm" svg:x="7.75cm" svg:y="9.05cm">
          <draw:text-box>
            <text:p text:style-name="P6"><text:span text:style-name="T1">fd</text:span></text:p>
          </draw:text-box>
        </draw:frame>
        <draw:frame draw:style-name="gr11" draw:text-style-name="P7" draw:layer="layout" svg:width="1.25cm" svg:height="0.75cm" svg:x="12.05cm" svg:y="12.35cm">
          <draw:text-box>
            <text:p text:style-name="P6"><text:span text:style-name="T1">fd</text:span></text:p>
          </draw:text-box>
        </draw:frame>
        <draw:line draw:style-name="gr12" draw:text-style-name="P5" draw:layer="layout" svg:x1="3.75cm" svg:y1="11.75cm" svg:x2="16.5cm" svg:y2="11.75cm">
          <text:p/>
        </draw:line>
        <draw:frame draw:style-name="gr6" draw:text-style-name="P8" draw:layer="layout" svg:width="3.5cm" svg:height="1cm" svg:x="16.05cm" svg:y="10cm">
          <draw:text-box>
            <text:p>memoria</text:p>
          </draw:text-box>
        </draw:frame>
        <draw:frame draw:style-name="gr13" draw:text-style-name="P9" draw:layer="layout" svg:width="2.966cm" svg:height="0.963cm" svg:x="16.13cm" svg:y="12.135cm">
          <draw:text-box>
            <text:p>disco</text:p>
          </draw:text-box>
        </draw:frame>
        <draw:frame draw:style-name="gr11" draw:text-style-name="P7" draw:layer="layout" svg:width="1.25cm" svg:height="0.75cm" svg:x="5.45cm" svg:y="8.2cm">
          <draw:text-box>
            <text:p text:style-name="P6"><text:span text:style-name="T1">I/O</text:span></text:p>
          </draw:text-box>
        </draw:frame>
        <draw:line draw:style-name="gr14" draw:text-style-name="P5" draw:layer="layout" svg:x1="7.5cm" svg:y1="10cm" svg:x2="13.25cm" svg:y2="7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9T12:51:05.632705827</meta:creation-date>
    <dc:date>2022-03-29T13:16:40.742331417</dc:date>
    <meta:editing-duration>PT14M43S</meta:editing-duration>
    <meta:editing-cycles>4</meta:editing-cycles>
    <meta:generator>LibreOffice/7.3.1.1$Linux_X86_64 LibreOffice_project/30$Build-1</meta:generator>
    <meta:document-statistic meta:object-count="18"/>
  </office:meta>
</office:document-meta>
</file>