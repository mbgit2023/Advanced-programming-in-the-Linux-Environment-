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5cm" fo:min-width="7.2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5cm" fo:min-width="3.75cm"/>
    </style:style>
    <style:style style:name="gr4" style:family="graphic" style:parent-style-name="standard">
      <style:graphic-properties svg:stroke-color="#000000" draw:fill-color="#eeeeee" draw:textarea-horizontal-align="justify" draw:textarea-vertical-align="middle" draw:auto-grow-height="false" fo:min-height="0.5cm" fo:min-width="1.5cm"/>
      <style:paragraph-properties style:writing-mode="lr-tb"/>
    </style:style>
    <style:style style:name="gr5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6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eeeeee"/>
      <style:paragraph-properties fo:text-align="center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7.75cm" svg:height="1.75cm" svg:x="6.25cm" svg:y="12cm">
          <text:p text:style-name="P1">fd[0] <text:s text:c="20"/>fd[1]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5cm" svg:height="1.25cm" svg:x="8.6cm" svg:y="10.6cm">
          <draw:text-box>
            <text:p>processo</text:p>
          </draw:text-box>
        </draw:frame>
        <draw:custom-shape draw:style-name="gr3" draw:text-style-name="P2" draw:layer="layout" svg:width="4.25cm" svg:height="1.75cm" svg:x="8.25cm" svg:y="15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2" draw:id="id2" draw:layer="layout" svg:width="2cm" svg:height="0.75cm" svg:x="9.3cm" svg:y="16.25cm">
          <text:p text:style-name="P1">pipe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14cm" svg:y1="12.875cm" svg:x2="11.3cm" svg:y2="16.625cm" draw:start-shape="id1" draw:end-shape="id2" draw:end-glue-point="1" svg:d="M14000 12875h501v3750h-3201" svg:viewBox="0 0 3202 3751">
          <text:p/>
        </draw:connector>
        <draw:connector draw:style-name="gr6" draw:text-style-name="P5" draw:layer="layout" svg:x1="9.3cm" svg:y1="16.625cm" svg:x2="6.25cm" svg:y2="12.875cm" draw:start-shape="id2" draw:start-glue-point="3" draw:end-shape="id1" svg:d="M9300 16625h-3551v-3750h501" svg:viewBox="0 0 3552 3751">
          <text:p/>
        </draw:connector>
        <draw:frame draw:style-name="gr2" draw:text-style-name="P3" draw:layer="layout" svg:width="5cm" svg:height="1.25cm" svg:x="9.2cm" svg:y="17.7cm">
          <draw:text-box>
            <text:p>kernel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24T18:06:45.124921754</meta:creation-date>
    <dc:date>2022-04-24T18:11:38.215000057</dc:date>
    <meta:editing-duration>PT4M53S</meta:editing-duration>
    <meta:editing-cycles>1</meta:editing-cycles>
    <meta:generator>LibreOffice/7.3.1.3$Linux_X86_64 LibreOffice_project/30$Build-3</meta:generator>
    <meta:document-statistic meta:object-count="7"/>
  </office:meta>
</office:document-meta>
</file>