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5.692cm" loext:decorative="false"/>
      <style:paragraph-properties style:writing-mode="lr-tb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37cm" fo:min-width="4.898cm" loext:decorative="false"/>
      <style:paragraph-properties style:writing-mode="lr-tb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5.533cm" loext:decorative="false"/>
      <style:paragraph-properties style:writing-mode="lr-tb"/>
    </style:style>
    <style:style style:name="gr4" style:family="graphic" style:parent-style-name="standard">
      <style:graphic-properties draw:stroke="dash" draw:stroke-dash="Double_20_Dash" svg:stroke-color="#000000" svg:stroke-linecap="butt" draw:fill="solid" draw:fill-color="#ffffff" draw:opacity="0%" draw:textarea-horizontal-align="justify" draw:textarea-vertical-align="middle" draw:auto-grow-height="false" fo:min-height="5.94cm" fo:min-width="17.915cm" loext:decorative="false"/>
      <style:paragraph-properties style:writing-mode="lr-tb"/>
    </style:style>
    <style:style style:name="gr5" style:family="graphic" style:parent-style-name="standard">
      <style:graphic-properties draw:stroke="dash" draw:stroke-dash="Double_20_Dash_20__28_Rounded_29_" svg:stroke-color="#000000" svg:stroke-opacity="100%" svg:stroke-linecap="round" draw:fill="solid" draw:fill-color="#ffffff" draw:opacity="0%" draw:textarea-horizontal-align="justify" draw:textarea-vertical-align="top" draw:auto-grow-height="false" fo:min-height="7.688cm" fo:min-width="18.183cm" loext:decorative="false"/>
      <style:paragraph-properties style:writing-mode="lr-tb"/>
    </style:style>
    <style:style style:name="gr6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7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8" style:family="graphic" style:parent-style-name="objectwithoutfill">
      <style:graphic-properties svg:stroke-color="#000000" draw:marker-end="Arrowheads_20_3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fo:font-size="21pt" style:font-size-asian="21pt" style:font-size-complex="21pt"/>
    </style:style>
    <style:style style:name="P2" style:family="paragraph">
      <loext:graphic-properties draw:fill="solid" draw:fill-color="#ffffff"/>
      <style:paragraph-properties fo:text-align="center"/>
      <style:text-properties fo:font-size="21pt" style:font-size-asian="21pt" style:font-size-complex="21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style:paragraph-properties fo:text-align="center"/>
      <style:text-properties style:font-name="Courier"/>
    </style:style>
    <style:style style:name="P6" style:family="paragraph">
      <loext:graphic-properties draw:fill="solid" draw:fill-color="#ffffff"/>
      <style:paragraph-properties fo:text-align="center"/>
      <style:text-properties style:font-name="Courier"/>
    </style:style>
    <style:style style:name="P7" style:family="paragraph">
      <style:paragraph-properties fo:text-align="center" loext:tab-stop-distance="0cm">
        <style:tab-stops>
          <style:tab-stop style:position="14.93cm"/>
        </style:tab-stops>
      </style:paragraph-properties>
    </style:style>
    <style:style style:name="P8" style:family="paragraph">
      <loext:graphic-properties draw:fill="solid" draw:fill-color="#ffffff" draw:opacity="0%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style:font-name="Couri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6.192cm" svg:height="3.81cm" svg:x="2.27cm" svg:y="21.32cm">
          <text:p text:style-name="P1"><text:span text:style-name="T1">disk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398cm" svg:height="1.587cm" svg:x="3.222cm" svg:y="22.273cm">
          <text:p text:style-name="P3">file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6.033cm" svg:height="1.27cm" svg:x="2.269cm" svg:y="18.78cm">
          <text:p text:style-name="P5"><text:span text:style-name="T2">sys_write()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8.415cm" svg:height="6.19cm" svg:x="1.317cm" svg:y="10.842cm">
          <text:p text:style-name="P3"/>
          <text:p text:style-name="P3"/>
          <text:p text:style-name="P3"/>
          <text:p text:style-name="P7"><text:span text:style-name="T1">glibc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6.033cm" svg:height="1.27cm" svg:x="2.269cm" svg:y="12.747cm">
          <text:p text:style-name="P5"><text:span text:style-name="T2">write()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8.683cm" svg:height="7.938cm" svg:x="1.317cm" svg:y="17.827cm">
          <text:p text:style-name="P3"/>
          <text:p text:style-name="P3"/>
          <text:p text:style-name="P3"><text:span text:style-name="T1"><text:s text:c="40"/>kernel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6.033cm" svg:height="1.27cm" svg:x="11.795cm" svg:y="12.747cm">
          <text:p text:style-name="P5"><text:span text:style-name="T2">printf()</text:span>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11.795cm" svg:y1="13.382cm" svg:x2="8.302cm" svg:y2="13.382cm">
          <text:p/>
        </draw:line>
        <draw:line draw:style-name="gr7" draw:text-style-name="P9" draw:layer="layout" svg:x1="5.127cm" svg:y1="14.017cm" svg:x2="5.127cm" svg:y2="18.78cm">
          <text:p/>
        </draw:line>
        <draw:line draw:style-name="gr8" draw:text-style-name="P9" draw:layer="layout" svg:x1="5.127cm" svg:y1="20.05cm" svg:x2="5.127cm" svg:y2="22.27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8T01:09:11.297336162</meta:creation-date>
    <dc:date>2025-08-18T01:39:06.552587964</dc:date>
    <meta:editing-duration>PT19M36S</meta:editing-duration>
    <meta:editing-cycles>2</meta:editing-cycles>
    <meta:generator>LibreOffice/25.2.3.2$Linux_X86_64 LibreOffice_project/520$Build-2</meta:generator>
    <meta:print-date>2025-08-18T01:25:10.451536592</meta:print-date>
    <meta:printed-by>PDF files</meta:printed-by>
    <meta:document-statistic meta:object-count="10"/>
  </office:meta>
</office:document-meta>
</file>