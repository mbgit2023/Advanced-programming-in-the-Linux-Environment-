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9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7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1.997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7" style:family="graphic" style:parent-style-name="objectwithoutfill">
      <style:graphic-properties svg:stroke-color="#000000" draw:marker-end="Arrowheads_20_1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2cm" svg:x="3.5cm" svg:y="3.5cm">
          <text:p text:style-name="P1"><text:span text:style-name="T1"><text:s text:c="8"/></text:span><text:span text:style-name="T1">process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5cm" svg:height="1cm" svg:x="10.4cm" svg:y="4cm">
          <text:p text:style-name="P3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75cm" svg:height="1cm" svg:x="3.5cm" svg:y="7.253cm">
          <text:p text:style-name="P5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25cm" svg:height="1cm" svg:x="3.5cm" svg:y="9.25cm">
          <text:p text:style-name="P5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497cm" svg:height="2.5cm" svg:x="3.253cm" svg:y="11.279cm">
          <text:p text:style-name="P5"><text:span text:style-name="T1">disco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.75cm" svg:y1="6.351cm" svg:x2="16.25cm" svg:y2="6.35cm">
          <text:p/>
        </draw:line>
        <draw:custom-shape draw:style-name="gr2" draw:text-style-name="P4" draw:layer="layout" svg:width="2.25cm" svg:height="1cm" svg:x="7.6cm" svg:y="4cm">
          <text:p text:style-name="P3"><text:span text:style-name="T2">fprintf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25cm" svg:height="1cm" svg:x="4cm" svg:y="11.8cm">
          <text:p text:style-name="P5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5.5cm" svg:x2="4.5cm" svg:y2="7.25cm">
          <text:p/>
        </draw:line>
        <draw:line draw:style-name="gr7" draw:text-style-name="P7" draw:layer="layout" svg:x1="4.5cm" svg:y1="8.2cm" svg:x2="4.5cm" svg:y2="9.25cm">
          <text:p/>
        </draw:line>
        <draw:line draw:style-name="gr7" draw:text-style-name="P7" draw:layer="layout" svg:x1="4.5cm" svg:y1="10.3cm" svg:x2="4.5cm" svg:y2="11.35cm">
          <text:p/>
        </draw:line>
        <draw:line draw:style-name="gr7" draw:text-style-name="P7" draw:layer="layout" svg:x1="6.75cm" svg:y1="7.25cm" svg:x2="6.75cm" svg:y2="5.5cm">
          <text:p/>
        </draw:line>
        <draw:frame draw:style-name="gr8" draw:text-style-name="P9" draw:layer="layout" svg:width="4.75cm" svg:height="0.75cm" svg:x="13.85cm" svg:y="6.7cm">
          <draw:text-box>
            <text:p text:style-name="P8"><text:span text:style-name="T3">kernel space </text:span><text:span text:style-name="T1">memory</text:span></text:p>
          </draw:text-box>
        </draw:frame>
        <draw:frame draw:style-name="gr8" draw:text-style-name="P9" draw:layer="layout" svg:width="4.75cm" svg:height="0.75cm" svg:x="13.85cm" svg:y="5.3cm">
          <draw:text-box>
            <text:p><text:span text:style-name="T1">user space memor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29:31.304178199</meta:creation-date>
    <dc:date>2022-03-07T12:08:47.623422192</dc:date>
    <meta:editing-duration>PT19M58S</meta:editing-duration>
    <meta:editing-cycles>3</meta:editing-cycles>
    <meta:generator>LibreOffice/7.3.1.1$Linux_X86_64 LibreOffice_project/30$Build-1</meta:generator>
    <meta:document-statistic meta:object-count="14"/>
  </office:meta>
</office:document-meta>
</file>