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5cm" style:writing-mode="lr-tb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76cm" fo:min-width="2.126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1.25cm" style:writing-mode="lr-tb"/>
      <style:paragraph-properties style:writing-mode="lr-tb"/>
    </style:style>
    <style:style style:name="gr4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8" style:family="graphic" style:parent-style-name="standard">
      <style:graphic-properties draw:stroke="dash" draw:stroke-dash="Double_20_Dash_20__28_Rounded_29_" svg:stroke-color="#000000" svg:stroke-linecap="round" draw:fill-color="#ffffff" draw:opacity="100%" draw:opacity-name="Transparency_20_4" draw:textarea-horizontal-align="justify" draw:textarea-vertical-align="middle" draw:auto-grow-height="false" fo:min-height="4.5cm" fo:min-width="11.7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100%" draw:opacity-name="Transparency_20_4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1.25cm" svg:x="1.5cm" svg:y="9.5cm">
          <text:p text:style-name="P1"><text:span text:style-name="T1">hello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.25cm" svg:x="10.5cm" svg:y="9.5cm">
          <text:p text:style-name="P1"><text:span text:style-name="T1">hello.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.25cm" svg:x="17.5cm" svg:y="9.5cm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25cm" svg:height="2.25cm" svg:x="4.5cm" svg:y="9cm">
          <text:p text:style-name="P3"><text:span text:style-name="T2">compil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3.5cm" svg:height="1.75cm" svg:x="13.25cm" svg:y="9.25cm">
          <text:p text:style-name="P1"><text:span text:style-name="T1">link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cm" svg:y1="10.125cm" svg:x2="4.5cm" svg:y2="10.125cm" draw:start-shape="id1" draw:start-glue-point="1" draw:end-shape="id2" draw:end-glue-point="5" svg:d="M3500 10125h1000" svg:viewBox="0 0 1001 1">
          <text:p/>
        </draw:connector>
        <draw:connector draw:style-name="gr5" draw:text-style-name="P5" draw:layer="layout" svg:x1="9.75cm" svg:y1="10.125cm" svg:x2="10.5cm" svg:y2="10.125cm" draw:start-shape="id2" draw:start-glue-point="7" draw:end-shape="id3" draw:end-glue-point="3" svg:d="M9750 10125h750" svg:viewBox="0 0 751 1">
          <text:p/>
        </draw:connector>
        <draw:connector draw:style-name="gr6" draw:text-style-name="P5" draw:layer="layout" svg:x1="12.5cm" svg:y1="10.125cm" svg:x2="13.25cm" svg:y2="10.125cm" draw:start-shape="id3" draw:start-glue-point="1" draw:end-shape="id4" draw:end-glue-point="5" svg:d="M12500 10125h750" svg:viewBox="0 0 751 1">
          <text:p/>
        </draw:connector>
        <draw:connector draw:style-name="gr7" draw:text-style-name="P5" draw:layer="layout" svg:x1="16.75cm" svg:y1="10.125cm" svg:x2="17.5cm" svg:y2="10.125cm" draw:start-shape="id4" draw:start-glue-point="7" draw:end-shape="id5" draw:end-glue-point="3" svg:d="M16750 10125h750" svg:viewBox="0 0 751 1">
          <text:p/>
        </draw:connector>
        <draw:custom-shape draw:style-name="gr8" draw:text-style-name="P6" draw:layer="layout" svg:width="12.25cm" svg:height="4.75cm" svg:x="4.5cm" svg:y="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cm" svg:x="10.05cm" svg:y="6.75cm">
          <draw:text-box>
            <text:p><text:span text:style-name="T3">gcc</text:span></text:p>
          </draw:text-box>
        </draw:frame>
        <draw:frame draw:style-name="gr9" draw:text-style-name="P7" draw:layer="layout" svg:width="3cm" svg:height="1cm" svg:x="14.45cm" svg:y="8.45cm">
          <draw:text-box>
            <text:p><text:span text:style-name="T3">l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" draw:display-name="Transparency 4" draw:style="ellipsoid" draw:cx="50%" draw:cy="50%" draw:start="100%" draw:end="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00:14:30.082657746</meta:creation-date>
    <dc:date>2023-08-16T10:58:36.311665446</dc:date>
    <meta:editing-duration>PT3M20S</meta:editing-duration>
    <meta:editing-cycles>3</meta:editing-cycles>
    <meta:generator>LibreOffice/7.5.5.2$Linux_X86_64 LibreOffice_project/50$Build-2</meta:generator>
    <meta:document-statistic meta:object-count="12"/>
  </office:meta>
</office:document-meta>
</file>