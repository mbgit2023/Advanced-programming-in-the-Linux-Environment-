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3.5cm" loext:decorative="fals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25cm" loext:decorative="false"/>
    </style:style>
    <style:style style:name="gr7" style:family="graphic" style:parent-style-name="objectwithoutfill">
      <style:graphic-properties draw:stroke="dash" draw:stroke-dash="Long_20_Dash" svg:stroke-color="#808080" svg:stroke-linecap="butt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fo:min-height="0.9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dddddd"/>
      <style:paragraph-properties fo:text-align="center" style:writing-mode="lr-tb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cm" svg:x="2.25cm" svg:y="13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.25cm" svg:y="12cm">
          <text:p text:style-name="P1">bs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.25cm" svg:y="11cm">
          <text:p text:style-name="P1">hea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2.2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.25cm" svg:y="6cm">
          <text:p text:style-name="P1">stack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cm" svg:x="2.25cm" svg:y="8.5cm">
          <text:p text:style-name="P1">mappin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cm" svg:x="11.5cm" svg:y="13cm">
          <text:p text:style-name="P5"><text:span text:style-name="T1">file mapped reg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cm" svg:height="1cm" svg:x="9.25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5cm" svg:height="1cm" svg:x="15.5cm" svg:y="13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5cm" svg:y1="9.5cm" svg:x2="11.5cm" svg:y2="13cm">
          <text:p/>
        </draw:line>
        <draw:line draw:style-name="gr7" draw:text-style-name="P7" draw:layer="layout" svg:x1="6.25cm" svg:y1="8.5cm" svg:x2="15.5cm" svg:y2="13cm">
          <text:p/>
        </draw:line>
        <draw:frame draw:style-name="gr8" draw:text-style-name="P9" draw:layer="layout" svg:width="7.5cm" svg:height="1.199cm" svg:x="1.932cm" svg:y="14.5cm">
          <draw:text-box>
            <text:p text:style-name="P8"><text:span text:style-name="T2">process virtual address space</text:span></text:p>
          </draw:text-box>
        </draw:frame>
        <draw:frame draw:style-name="gr9" draw:text-style-name="P9" draw:layer="layout" svg:width="3cm" svg:height="0.75cm" svg:x="12.5cm" svg:y="14.5cm">
          <draw:text-box>
            <text:p text:style-name="P8"><text:span text:style-name="T2">fi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2-23T22:39:12.435497587</meta:creation-date>
    <dc:date>2025-12-06T13:02:50.930976902</dc:date>
    <meta:editing-duration>PT10M29S</meta:editing-duration>
    <meta:editing-cycles>2</meta:editing-cycles>
    <meta:generator>LibreOffice/25.8.3.2$Linux_X86_64 LibreOffice_project/580$Build-2</meta:generator>
    <meta:document-statistic meta:object-count="13"/>
  </office:meta>
</office:document-meta>
</file>