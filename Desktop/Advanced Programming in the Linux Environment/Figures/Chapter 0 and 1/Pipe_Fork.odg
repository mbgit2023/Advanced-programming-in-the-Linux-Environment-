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3.7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9.25cm" loext:decorative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75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25cm" svg:height="2.25cm" svg:x="2.3cm" svg:y="6.1cm">
          <text:p text:style-name="P1">fd[0] <text:s text:c="4"/>fd[1]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25cm" svg:height="2.25cm" svg:x="14.5cm" svg:y="6.1cm">
          <text:p text:style-name="P1">fd[0] <text:s text:c="4"/>fd[1]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1cm" svg:x="3.25cm" svg:y="5.15cm">
          <draw:text-box>
            <text:p>parent</text:p>
          </draw:text-box>
        </draw:frame>
        <draw:frame draw:style-name="gr2" draw:text-style-name="P3" draw:layer="layout" svg:width="4cm" svg:height="1cm" svg:x="15.65cm" svg:y="5.15cm">
          <draw:text-box>
            <text:p>child</text:p>
          </draw:text-box>
        </draw:frame>
        <draw:custom-shape draw:style-name="gr3" draw:text-style-name="P4" draw:layer="layout" svg:width="9.75cm" svg:height="2.75cm" svg:x="5.1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25cm" svg:height="1cm" svg:x="8.4cm" svg:y="11.3cm">
          <text:p text:style-name="P1">pipe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8.75cm" svg:y1="7.225cm" svg:x2="11.65cm" svg:y2="11.8cm" draw:start-shape="id1" draw:start-glue-point="1" draw:end-shape="id2" draw:end-glue-point="1" svg:d="M18750 7225c751 0 4301 4575-7100 4575" svg:viewBox="0 0 8214 4576">
          <text:p/>
        </draw:connector>
        <draw:connector draw:style-name="gr6" draw:text-style-name="P5" draw:layer="layout" draw:type="curve" draw:line-skew="0.776cm" svg:x1="8.4cm" svg:y1="11.8cm" svg:x2="14.5cm" svg:y2="7.225cm" draw:start-shape="id2" draw:start-glue-point="3" draw:end-shape="id1" draw:end-glue-point="3" svg:d="M8400 11800c412 0-2637-4575 6100-4575" svg:viewBox="0 0 6294 4576">
          <text:p/>
        </draw:connector>
        <draw:connector draw:style-name="gr7" draw:text-style-name="P5" draw:layer="layout" draw:type="curve" draw:line-skew="-0.576cm" svg:x1="6.55cm" svg:y1="7.225cm" svg:x2="11.65cm" svg:y2="11.8cm" draw:start-shape="id3" draw:start-glue-point="1" draw:end-shape="id2" draw:end-glue-point="1" svg:d="M6550 7225c7537 0 4988 4575 5100 4575" svg:viewBox="0 0 5428 4576">
          <text:p/>
        </draw:connector>
        <draw:connector draw:style-name="gr8" draw:text-style-name="P5" draw:layer="layout" draw:type="curve" svg:x1="8.4cm" svg:y1="11.8cm" svg:x2="2.3cm" svg:y2="7.225cm" draw:start-shape="id2" draw:start-glue-point="3" draw:end-shape="id3" draw:end-glue-point="3" svg:d="M8400 11800c-9901 0-6851-4575-6100-4575" svg:viewBox="0 0 7134 4576">
          <text:p/>
        </draw:connector>
        <draw:frame draw:style-name="gr2" draw:text-style-name="P6" draw:layer="layout" svg:width="4cm" svg:height="1cm" svg:x="9.65cm" svg:y="5.45cm">
          <draw:text-box>
            <text:p><text:span text:style-name="T1">fork</text:span></text:p>
          </draw:text-box>
        </draw:frame>
        <draw:frame draw:style-name="gr2" draw:text-style-name="P6" draw:layer="layout" svg:width="4cm" svg:height="1cm" svg:x="17.55cm" svg:y="9.35cm">
          <draw:text-box>
            <text:p><text:span text:style-name="T1">write</text:span></text:p>
          </draw:text-box>
        </draw:frame>
        <draw:frame draw:style-name="gr2" draw:text-style-name="P6" draw:layer="layout" svg:width="4cm" svg:height="1cm" svg:x="6.75cm" svg:y="7.35cm">
          <draw:text-box>
            <text:p><text:span text:style-name="T1">write</text:span></text:p>
          </draw:text-box>
        </draw:frame>
        <draw:line draw:style-name="gr9" draw:text-style-name="P5" draw:layer="layout" svg:x1="6.75cm" svg:y1="6.5cm" svg:x2="14.25cm" svg:y2="6.5cm">
          <text:p/>
        </draw:line>
        <draw:frame draw:style-name="gr2" draw:text-style-name="P6" draw:layer="layout" svg:width="4cm" svg:height="1cm" svg:x="1.75cm" svg:y="9.55cm">
          <draw:text-box>
            <text:p><text:span text:style-name="T1">read</text:span></text:p>
          </draw:text-box>
        </draw:frame>
        <draw:frame draw:style-name="gr2" draw:text-style-name="P6" draw:layer="layout" svg:width="4cm" svg:height="1cm" svg:x="12.75cm" svg:y="7.35cm">
          <draw:text-box>
            <text:p><text:span text:style-name="T1">read</text:span></text:p>
          </draw:text-box>
        </draw:frame>
        <draw:frame draw:style-name="gr2" draw:text-style-name="P6" draw:layer="layout" svg:width="4cm" svg:height="1cm" svg:x="16.95cm" svg:y="7.45cm">
          <draw:text-box>
            <text:p><text:span text:style-name="T1">close</text:span></text:p>
          </draw:text-box>
        </draw:frame>
        <draw:frame draw:style-name="gr2" draw:text-style-name="P6" draw:layer="layout" svg:width="4cm" svg:height="1cm" svg:x="2.55cm" svg:y="7.45cm">
          <draw:text-box>
            <text:p><text:span text:style-name="T1">clo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4-24T20:53:23.565145047</meta:creation-date>
    <dc:date>2025-09-20T18:24:08.154535193</dc:date>
    <meta:editing-duration>PT19M26S</meta:editing-duration>
    <meta:editing-cycles>8</meta:editing-cycles>
    <meta:generator>LibreOffice/25.8.0.4$Linux_X86_64 LibreOffice_project/580$Build-4</meta:generator>
    <meta:document-statistic meta:object-count="18"/>
  </office:meta>
</office:document-meta>
</file>