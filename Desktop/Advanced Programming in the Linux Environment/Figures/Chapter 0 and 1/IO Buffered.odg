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3.7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2.25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fill="none" draw:textarea-vertical-align="middle"/>
    </style:style>
    <style:style style:name="gr4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5cm" svg:height="1.25cm" svg:x="7.75cm" svg:y="7.5cm">
          <text:p text:style-name="P1"><text:span text:style-name="T1">funzioni di librer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5cm" svg:height="1.25cm" svg:x="7.75cm" svg:y="10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5cm" svg:height="1.25cm" svg:x="7.75cm" svg:y="12.5cm">
          <text:p text:style-name="P1"><text:span text:style-name="T1">chiamate di sistem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5cm" svg:height="1.25cm" svg:x="7.75cm" svg:y="14.95cm">
          <text:p text:style-name="P1"><text:span text:style-name="T1">buffer del kern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75cm" svg:height="2cm" svg:x="4cm" svg:y="17.5cm">
          <text:p text:style-name="P1">disco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75cm" svg:y1="8.75cm" svg:x2="9.75cm" svg:y2="10cm">
          <text:p/>
        </draw:line>
        <draw:line draw:style-name="gr3" draw:text-style-name="P4" draw:layer="layout" svg:x1="9.75cm" svg:y1="11.25cm" svg:x2="9.75cm" svg:y2="12.5cm">
          <text:p/>
        </draw:line>
        <draw:line draw:style-name="gr3" draw:text-style-name="P4" draw:layer="layout" svg:x1="9.75cm" svg:y1="13.75cm" svg:x2="9.75cm" svg:y2="15cm">
          <text:p/>
        </draw:line>
        <draw:line draw:style-name="gr3" draw:text-style-name="P4" draw:layer="layout" svg:x1="9.75cm" svg:y1="16.25cm" svg:x2="9.75cm" svg:y2="17.5cm">
          <text:p/>
        </draw:line>
        <draw:line draw:style-name="gr4" draw:text-style-name="P4" draw:layer="layout" svg:x1="3cm" svg:y1="12cm" svg:x2="18.25cm" svg:y2="12cm">
          <text:p/>
        </draw:line>
        <draw:frame draw:style-name="gr5" draw:text-style-name="P5" draw:layer="layout" svg:width="4.5cm" svg:height="1cm" svg:x="1.75cm" svg:y="9.05cm">
          <draw:text-box>
            <text:p>user space</text:p>
          </draw:text-box>
        </draw:frame>
        <draw:frame draw:style-name="gr5" draw:text-style-name="P5" draw:layer="layout" svg:width="4.5cm" svg:height="1cm" svg:x="1.75cm" svg:y="13.85cm">
          <draw:text-box>
            <text:p>kernel space</text:p>
          </draw:text-box>
        </draw:frame>
        <draw:frame draw:style-name="gr5" draw:text-style-name="P7" draw:layer="layout" svg:width="4.5cm" svg:height="1cm" svg:x="12.75cm" svg:y="7.75cm">
          <draw:text-box>
            <text:p text:style-name="P6"><text:span text:style-name="T1">printf(), fputs(), etc.</text:span></text:p>
          </draw:text-box>
        </draw:frame>
        <draw:frame draw:style-name="gr5" draw:text-style-name="P7" draw:layer="layout" svg:width="4.5cm" svg:height="1cm" svg:x="12.75cm" svg:y="12.65cm">
          <draw:text-box>
            <text:p text:style-name="P6"><text:span text:style-name="T1">read(), write(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8T17:35:26.971506168</meta:creation-date>
    <dc:date>2022-03-18T17:45:10.366018816</dc:date>
    <meta:editing-duration>PT9M42S</meta:editing-duration>
    <meta:editing-cycles>3</meta:editing-cycles>
    <meta:generator>LibreOffice/7.3.1.1$Linux_X86_64 LibreOffice_project/30$Build-1</meta:generator>
    <meta:document-statistic meta:object-count="14"/>
  </office:meta>
</office:document-meta>
</file>