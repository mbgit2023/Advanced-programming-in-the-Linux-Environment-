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5cm" style:writing-mode="lr-tb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normal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75cm" svg:x="7.5cm" svg:y="8cm">
          <text:p text:style-name="P1"><text:span text:style-name="T1">hello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75cm" svg:x="7.5cm" svg:y="11.5cm">
          <text:p text:style-name="P1"><text:span text:style-name="T1">hello.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9.75cm" svg:x2="9.5cm" svg:y2="11.5cm">
          <text:p/>
        </draw:line>
        <draw:frame draw:style-name="gr3" draw:text-style-name="P4" draw:layer="layout" svg:width="6.65cm" svg:height="0.9cm" svg:x="10.05cm" svg:y="10.2cm">
          <draw:text-box>
            <text:p><text:span text:style-name="T1">gcc -S hello.c</text:span></text:p>
          </draw:text-box>
        </draw:frame>
        <draw:custom-shape draw:style-name="gr1" draw:text-style-name="P2" draw:layer="layout" svg:width="4cm" svg:height="1.75cm" svg:x="7.5cm" svg:y="15cm">
          <text:p text:style-name="P1"><text:span text:style-name="T1">hello.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13.25cm" svg:x2="9.5cm" svg:y2="15cm">
          <text:p/>
        </draw:line>
        <draw:frame draw:style-name="gr3" draw:text-style-name="P4" draw:layer="layout" svg:width="6.65cm" svg:height="0.9cm" svg:x="10.05cm" svg:y="13.6cm">
          <draw:text-box>
            <text:p><text:span text:style-name="T1">gcc -c hello.s -o hello.o</text:span></text:p>
          </draw:text-box>
        </draw:frame>
        <draw:custom-shape draw:style-name="gr1" draw:text-style-name="P2" draw:layer="layout" svg:width="4cm" svg:height="1.75cm" svg:x="7.5cm" svg:y="18.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16.75cm" svg:x2="9.5cm" svg:y2="18.5cm">
          <text:p/>
        </draw:line>
        <draw:frame draw:style-name="gr3" draw:text-style-name="P4" draw:layer="layout" svg:width="6.65cm" svg:height="0.9cm" svg:x="10.05cm" svg:y="17.1cm">
          <draw:text-box>
            <text:p><text:span text:style-name="T1">gcc hello.o -o hello</text:span></text:p>
          </draw:text-box>
        </draw:frame>
        <draw:frame draw:style-name="gr3" draw:text-style-name="P4" draw:layer="layout" svg:width="6.65cm" svg:height="0.9cm" svg:x="3.85cm" svg:y="12cm">
          <draw:text-box>
            <text:p><text:span text:style-name="T1">assembly file</text:span></text:p>
          </draw:text-box>
        </draw:frame>
        <draw:frame draw:style-name="gr3" draw:text-style-name="P4" draw:layer="layout" svg:width="6.65cm" svg:height="0.9cm" svg:x="4.25cm" svg:y="15.5cm">
          <draw:text-box>
            <text:p><text:span text:style-name="T1">object file </text:span></text:p>
          </draw:text-box>
        </draw:frame>
        <draw:frame draw:style-name="gr3" draw:text-style-name="P5" draw:layer="layout" svg:width="6.65cm" svg:height="0.9cm" svg:x="3.75cm" svg:y="18.9cm">
          <draw:text-box>
            <text:p><text:span text:style-name="T2">executable fil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6:10:19.884075450</meta:creation-date>
    <dc:date>2023-08-16T11:40:20.979053937</dc:date>
    <meta:editing-duration>PT1H17M9S</meta:editing-duration>
    <meta:editing-cycles>7</meta:editing-cycles>
    <meta:generator>LibreOffice/7.5.5.2$Linux_X86_64 LibreOffice_project/50$Build-2</meta:generator>
    <meta:document-statistic meta:object-count="13"/>
  </office:meta>
</office:document-meta>
</file>