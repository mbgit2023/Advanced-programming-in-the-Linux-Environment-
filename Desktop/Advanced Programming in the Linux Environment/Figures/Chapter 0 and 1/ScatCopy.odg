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5.7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4cm" fo:min-width="4.8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9cm"/>
      <style:paragraph-properties style:writing-mode="lr-tb"/>
    </style:style>
    <style:style style:name="gr4" style:family="graphic" style:parent-style-name="objectwithoutfill">
      <style:graphic-properties svg:stroke-color="#000000" draw:marker-start="Arrowheads_20_1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top" fo:min-height="0.25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17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5cm" svg:height="1.5cm" svg:x="2.95cm" svg:y="16cm">
          <text:p text:style-name="P1"><text:span text:style-name="T1">file sr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cm" svg:height="4.25cm" svg:x="7.6cm" svg:y="9.25cm">
          <text:p text:style-name="P1"><text:span text:style-name="T1">iov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4cm" svg:height="1cm" svg:x="9.15cm" svg:y="11.9cm">
          <text:p text:style-name="P1"><text:span text:style-name="T1">iov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2.4cm" svg:height="1cm" svg:x="9.15cm" svg:y="10.3cm">
          <text:p text:style-name="P1"><text:span text:style-name="T1">iov[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25cm" svg:height="1.5cm" svg:x="11.15cm" svg:y="16cm">
          <text:p text:style-name="P1"><text:span text:style-name="T1">file dst</text:span></text:p>
          <draw:enhanced-geometry svg:viewBox="0 0 21600 21600" draw:type="rectangle" draw:enhanced-path="M 0 0 L 21600 0 21600 21600 0 21600 0 0 Z N"/>
        </draw:custom-shape>
        <draw:line draw:style-name="gr4" draw:text-style-name="P3" xml:id="id1" draw:id="id1" draw:layer="layout" svg:x1="8.5cm" svg:y1="13.5cm" svg:x2="8.5cm" svg:y2="16cm">
          <text:p/>
        </draw:line>
        <draw:frame draw:style-name="gr5" draw:text-style-name="P5" draw:layer="layout" svg:width="2.25cm" svg:height="0.75cm" svg:x="6.5cm" svg:y="14.25cm">
          <draw:text-box>
            <text:p text:style-name="P4"><text:span text:style-name="T1">preadv2</text:span></text:p>
          </draw:text-box>
        </draw:frame>
        <draw:frame draw:style-name="gr5" draw:text-style-name="P5" draw:layer="layout" svg:width="2.25cm" svg:height="0.75cm" svg:x="11.95cm" svg:y="14.25cm">
          <draw:text-box>
            <text:p text:style-name="P4"><text:span text:style-name="T1">pwritev2</text:span></text:p>
          </draw:text-box>
        </draw:frame>
        <draw:frame draw:style-name="gr6" draw:text-style-name="P7" draw:layer="layout" svg:width="1.75cm" svg:height="0.645cm" svg:x="9.6cm" svg:y="11.25cm">
          <draw:text-box>
            <text:p text:style-name="P6"><text:span text:style-name="T2">1024</text:span></text:p>
          </draw:text-box>
        </draw:frame>
        <draw:frame draw:style-name="gr6" draw:text-style-name="P7" draw:layer="layout" svg:width="1.75cm" svg:height="0.645cm" svg:x="9.6cm" svg:y="12.851cm">
          <draw:text-box>
            <text:p text:style-name="P6"><text:span text:style-name="T2">1024</text:span></text:p>
          </draw:text-box>
        </draw:frame>
        <draw:frame draw:style-name="gr6" draw:text-style-name="P7" draw:layer="layout" svg:width="1.75cm" svg:height="0.645cm" svg:x="7.2cm" svg:y="14.751cm">
          <draw:text-box>
            <text:p text:style-name="P6"><text:span text:style-name="T2">2048</text:span></text:p>
          </draw:text-box>
        </draw:frame>
        <draw:frame draw:style-name="gr6" draw:text-style-name="P7" draw:layer="layout" svg:width="1.75cm" svg:height="0.645cm" svg:x="12cm" svg:y="14.752cm">
          <draw:text-box>
            <text:p text:style-name="P6"><text:span text:style-name="T2">2048</text:span></text:p>
          </draw:text-box>
        </draw:frame>
        <draw:connector draw:style-name="gr7" draw:text-style-name="P3" draw:layer="layout" svg:x1="8.5cm" svg:y1="13.5cm" svg:x2="9.15cm" svg:y2="12.4cm" draw:start-shape="id1" draw:start-glue-point="0" draw:end-shape="id2" draw:end-glue-point="3" svg:d="M8500 13500v-1100h650" svg:viewBox="0 0 651 1101">
          <text:p/>
        </draw:connector>
        <draw:connector draw:style-name="gr8" draw:text-style-name="P3" draw:layer="layout" svg:x1="8.5cm" svg:y1="13.5cm" svg:x2="9.15cm" svg:y2="10.8cm" draw:start-shape="id1" draw:start-glue-point="0" draw:end-shape="id3" draw:end-glue-point="3" svg:d="M8500 13500v-2700h650" svg:viewBox="0 0 651 2701">
          <text:p/>
        </draw:connector>
        <draw:line draw:style-name="gr9" draw:text-style-name="P3" xml:id="id4" draw:id="id4" draw:layer="layout" svg:x1="12cm" svg:y1="13.5cm" svg:x2="12cm" svg:y2="16cm">
          <text:p/>
        </draw:line>
        <draw:connector draw:style-name="gr10" draw:text-style-name="P3" draw:layer="layout" draw:line-skew="-0.65cm" svg:x1="11.55cm" svg:y1="12.4cm" svg:x2="12cm" svg:y2="13.5cm" draw:start-shape="id2" draw:start-glue-point="1" draw:end-shape="id4" draw:end-glue-point="0" svg:d="M11550 12400h450v1100" svg:viewBox="0 0 451 1101">
          <text:p/>
        </draw:connector>
        <draw:connector draw:style-name="gr11" draw:text-style-name="P3" draw:layer="layout" draw:line-skew="-0.65cm" svg:x1="11.55cm" svg:y1="10.8cm" svg:x2="12cm" svg:y2="13.5cm" draw:start-shape="id3" draw:start-glue-point="1" draw:end-shape="id4" draw:end-glue-point="0" svg:d="M11550 10800h450v2700" svg:viewBox="0 0 451 27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1013 1130" svg:d="M1009 1050l-449-1008-22-30-29-12-34 12-21 26-449 1012-5 13v8l5 21 12 21 17 13 21 4h903l21-4 21-13 9-21 4-21v-8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1T17:06:08.952266949</meta:creation-date>
    <dc:date>2022-03-21T17:34:06.984451267</dc:date>
    <meta:editing-duration>PT27M56S</meta:editing-duration>
    <meta:editing-cycles>6</meta:editing-cycles>
    <meta:generator>LibreOffice/7.3.1.1$Linux_X86_64 LibreOffice_project/30$Build-1</meta:generator>
    <meta:document-statistic meta:object-count="17"/>
  </office:meta>
</office:document-meta>
</file>