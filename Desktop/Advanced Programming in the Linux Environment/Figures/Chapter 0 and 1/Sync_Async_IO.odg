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14.75cm"/>
      <style:paragraph-properties style:writing-mode="lr-tb"/>
    </style:style>
    <style:style style:name="gr2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3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14.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4" draw:fill="none" draw:textarea-vertical-align="middl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6pt" style:font-size-asian="16pt" style:font-size-complex="16pt"/>
    </style:style>
    <style:style style:name="P9" style:family="paragraph">
      <loext:graphic-properties draw:fill-color="#ffffff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5cm" svg:height="2.25cm" svg:x="3cm" svg:y="9.35cm">
          <text:p text:style-name="P1"><text:span text:style-name="T1">Disc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5cm" svg:y1="3.1cm" svg:x2="10.3cm" svg:y2="9.35cm">
          <text:p/>
        </draw:line>
        <draw:custom-shape draw:style-name="gr3" draw:text-style-name="P2" draw:layer="layout" svg:width="5cm" svg:height="1.25cm" svg:x="13cm" svg:y="6.85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5cm" svg:height="0.75cm" svg:x="3cm" svg:y="4.75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75cm" svg:x="13cm" svg:y="4.85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25cm" svg:height="0.878cm" svg:x="3cm" svg:y="3.1cm">
          <draw:text-box>
            <text:p><text:span text:style-name="T1">Sincronizzato</text:span></text:p>
          </draw:text-box>
        </draw:frame>
        <draw:frame draw:style-name="gr7" draw:text-style-name="P4" draw:layer="layout" svg:width="5.75cm" svg:height="1.673cm" svg:x="13cm" svg:y="3.05cm">
          <draw:text-box>
            <text:p><text:span text:style-name="T1">Non sincronizzato</text:span></text:p>
          </draw:text-box>
        </draw:frame>
        <draw:line draw:style-name="gr8" draw:text-style-name="P3" draw:layer="layout" svg:x1="15.35cm" svg:y1="5.6cm" svg:x2="15.35cm" svg:y2="6.85cm">
          <text:p/>
        </draw:line>
        <draw:frame draw:style-name="gr9" draw:text-style-name="P5" draw:layer="layout" svg:width="2.611cm" svg:height="1.385cm" svg:x="3.039cm" svg:y="7.75cm">
          <draw:text-box>
            <text:p><text:span text:style-name="T2">O_SYNC</text:span></text:p>
            <text:p><text:span text:style-name="T2">O_DSYNC</text:span></text:p>
          </draw:text-box>
        </draw:frame>
        <draw:line draw:style-name="gr8" draw:text-style-name="P3" draw:layer="layout" svg:x1="15.35cm" svg:y1="8.1cm" svg:x2="15.35cm" svg:y2="9.35cm">
          <text:p/>
        </draw:line>
        <draw:custom-shape draw:style-name="gr10" draw:text-style-name="P2" draw:layer="layout" svg:width="15cm" svg:height="2.25cm" svg:x="3cm" svg:y="25.35cm">
          <text:p text:style-name="P1"><text:span text:style-name="T1">Disco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0.75cm" svg:x="3cm" svg:y="19.85cm">
          <text:p text:style-name="P6"><text:span text:style-name="T1">writ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cm" svg:height="0.75cm" svg:x="7cm" svg:y="19.85cm">
          <text:p text:style-name="P1"><text:span text:style-name="T1">write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cm" svg:height="0.75cm" svg:x="12cm" svg:y="19.85cm">
          <text:p text:style-name="P1"><text:span text:style-name="T1">write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75cm" svg:x="3cm" svg:y="17.6cm">
          <text:p text:style-name="P1"><text:span text:style-name="T1">write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75cm" svg:x="3cm" svg:y="16.85cm">
          <text:p text:style-name="P1"><text:span text:style-name="T1">writ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cm" svg:height="0.75cm" svg:x="3cm" svg:y="16.1cm">
          <text:p text:style-name="P8"><text:span text:style-name="T3">writ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5cm" svg:height="0.75cm" svg:x="16.5cm" svg:y="19.8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75cm" svg:y1="18.35cm" svg:x2="4.75cm" svg:y2="19.85cm">
          <text:p/>
        </draw:line>
        <draw:frame draw:style-name="gr15" draw:text-style-name="P5" draw:layer="layout" svg:width="3.75cm" svg:height="0.824cm" svg:x="5cm" svg:y="18.8cm">
          <draw:text-box>
            <text:p><text:span text:style-name="T2">accoda e ritorna</text:span></text:p>
          </draw:text-box>
        </draw:frame>
        <draw:frame draw:style-name="gr16" draw:text-style-name="P5" draw:layer="layout" svg:width="2.5cm" svg:height="0.725cm" svg:x="1.75cm" svg:y="20.875cm">
          <draw:text-box>
            <text:p><text:span text:style-name="T2">esegue</text:span></text:p>
          </draw:text-box>
        </draw:frame>
        <draw:custom-shape draw:style-name="gr17" draw:text-style-name="P2" draw:layer="layout" svg:width="3.25cm" svg:height="1.25cm" svg:x="3cm" svg:y="21.85cm">
          <text:p text:style-name="P1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3cm" svg:height="1.25cm" svg:x="12.368cm" svg:y="21.814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25cm" svg:y1="20.6cm" svg:x2="4.25cm" svg:y2="21.85cm">
          <text:p/>
        </draw:line>
        <draw:line draw:style-name="gr8" draw:text-style-name="P3" draw:layer="layout" svg:x1="13cm" svg:y1="20.6cm" svg:x2="13cm" svg:y2="21.85cm">
          <text:p/>
        </draw:line>
        <draw:line draw:style-name="gr8" draw:text-style-name="P3" draw:layer="layout" svg:x1="4.25cm" svg:y1="23.1cm" svg:x2="4.25cm" svg:y2="25.35cm">
          <text:p/>
        </draw:line>
        <draw:line draw:style-name="gr8" draw:text-style-name="P3" draw:layer="layout" svg:x1="13cm" svg:y1="23.1cm" svg:x2="13cm" svg:y2="25.35cm">
          <text:p/>
        </draw:line>
        <draw:line draw:style-name="gr19" draw:text-style-name="P3" draw:layer="layout" svg:x1="3cm" svg:y1="24cm" svg:x2="18.25cm" svg:y2="24cm">
          <text:p/>
        </draw:line>
        <draw:frame draw:style-name="gr16" draw:text-style-name="P5" draw:layer="layout" svg:width="4.5cm" svg:height="0.725cm" svg:x="16.4cm" svg:y="24.25cm">
          <draw:text-box>
            <text:p><text:span text:style-name="T2">sincronizzato</text:span></text:p>
          </draw:text-box>
        </draw:frame>
        <draw:frame draw:style-name="gr16" draw:text-style-name="P5" draw:layer="layout" svg:width="4.5cm" svg:height="0.725cm" svg:x="16.4cm" svg:y="22.9cm">
          <draw:text-box>
            <text:p><text:span text:style-name="T2">non sincronizzato</text:span></text:p>
          </draw:text-box>
        </draw:frame>
        <draw:frame draw:style-name="gr20" draw:text-style-name="P10" draw:layer="layout" svg:width="5.75cm" svg:height="0.962cm" svg:x="8cm" svg:y="1.25cm">
          <draw:text-box>
            <text:p><text:span text:style-name="T4">I/O Sincrono</text:span></text:p>
          </draw:text-box>
        </draw:frame>
        <draw:frame draw:style-name="gr20" draw:text-style-name="P10" draw:layer="layout" svg:width="5.75cm" svg:height="0.962cm" svg:x="8cm" svg:y="14.6cm">
          <draw:text-box>
            <text:p><text:span text:style-name="T4">I/O Asincrono</text:span></text:p>
          </draw:text-box>
        </draw:frame>
        <draw:line draw:style-name="gr21" draw:text-style-name="P3" draw:layer="layout" svg:x1="5.6cm" svg:y1="5.5cm" svg:x2="5.6cm" svg:y2="9.4cm">
          <text:p/>
        </draw:line>
        <draw:line draw:style-name="gr22" draw:text-style-name="P3" draw:layer="layout" svg:x1="9.25cm" svg:y1="20.6cm" svg:x2="9.25cm" svg:y2="25.35cm">
          <text:p/>
        </draw:line>
        <draw:frame draw:style-name="gr9" draw:text-style-name="P5" draw:layer="layout" svg:width="2.611cm" svg:height="1.385cm" svg:x="6.64cm" svg:y="24.051cm">
          <draw:text-box>
            <text:p><text:span text:style-name="T2">O_SYNC</text:span></text:p>
            <text:p><text:span text:style-name="T2">O_DSYN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1T05:09:24.826504902</meta:creation-date>
    <dc:date>2022-03-08T08:59:42.159978526</dc:date>
    <meta:editing-duration>PT59M29S</meta:editing-duration>
    <meta:editing-cycles>15</meta:editing-cycles>
    <meta:generator>LibreOffice/7.3.1.1$Linux_X86_64 LibreOffice_project/30$Build-1</meta:generator>
    <meta:document-statistic meta:object-count="35"/>
  </office:meta>
</office:document-meta>
</file>