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left" draw:textarea-vertical-align="middle" draw:auto-grow-height="false" fo:min-height="3.56cm" fo:min-width="5.397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284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3.627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138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P1" style:family="paragraph">
      <style:paragraph-properties fo:text-align="left"/>
      <style:text-properties style:font-name="Liberation Serif" fo:font-size="13pt" style:font-size-asian="13pt" style:font-size-complex="13pt"/>
    </style:style>
    <style:style style:name="P2" style:family="paragraph">
      <loext:graphic-properties draw:fill="solid" draw:fill-color="#ffffff"/>
      <style:paragraph-properties fo:text-align="left" style:writing-mode="lr-tb"/>
      <style:text-properties style:font-name="Liberation Serif" fo:font-size="13pt" style:font-size-asian="13pt" style:font-size-complex="13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paragraph-properties fo:text-align="center"/>
      <style:text-properties style:font-name="Liberation Serif" fo:font-size="13pt" style:font-size-asian="13pt" style:font-size-complex="13pt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Liberation Serif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97cm" svg:height="3.81cm" svg:x="2.405cm" svg:y="3.222cm">
          <text:p text:style-name="P1"><text:span text:style-name="T1"><text:s text:c="4"/>pro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784cm" svg:height="1.27cm" svg:x="6.106cm" svg:y="3.657cm">
          <text:p text:style-name="P3"><text:span text:style-name="T1">FD 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784cm" svg:height="1.27cm" svg:x="6.106cm" svg:y="5.357cm">
          <text:p text:style-name="P3"><text:span text:style-name="T1">FD 4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27cm" svg:height="1.27cm" svg:x="9.26cm" svg:y="4.492cm">
          <text:p text:style-name="P5"><text:span text:style-name="T1">open file descrip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638cm" svg:height="1.27cm" svg:x="14.74cm" svg:y="4.492cm">
          <text:p text:style-name="P5"><text:span text:style-name="T1">inode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7.985cm" svg:y1="4.727cm" svg:x2="9.255cm" svg:y2="4.727cm">
          <text:p/>
        </draw:line>
        <draw:line draw:style-name="gr5" draw:text-style-name="P7" draw:layer="layout" svg:x1="7.985cm" svg:y1="5.527cm" svg:x2="9.255cm" svg:y2="5.527cm">
          <text:p/>
        </draw:line>
        <draw:line draw:style-name="gr5" draw:text-style-name="P7" draw:layer="layout" svg:x1="13.485cm" svg:y1="5.127cm" svg:x2="14.755cm" svg:y2="5.1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7T20:07:07.776050536</meta:creation-date>
    <dc:date>2026-05-07T20:16:16.809193050</dc:date>
    <meta:editing-duration>PT7M53S</meta:editing-duration>
    <meta:editing-cycles>2</meta:editing-cycles>
    <meta:generator>LibreOffice/26.2.1.2$Linux_X86_64 LibreOffice_project/620$Build-2</meta:generator>
    <meta:print-date>2026-05-07T20:15:21.691053547</meta:print-date>
    <meta:printed-by>PDF files</meta:printed-by>
    <meta:document-statistic meta:object-count="8"/>
  </office:meta>
</office:document-meta>
</file>