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8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7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589cm" loext:decorative="false"/>
      <style:paragraph-properties style:writing-mode="lr-tb"/>
    </style:style>
    <style:style style:name="gr8" style:family="graphic" style:parent-style-name="standard">
      <style:graphic-properties svg:stroke-color="#808080" draw:fill-color="#dddddd" draw:textarea-horizontal-align="center" draw:textarea-vertical-align="middle" draw:auto-grow-height="false" fo:min-height="2.25cm" fo:min-width="3.10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8.7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fo:min-height="1.26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fo:min-height="1.178cm" loext:decorative="false"/>
      <style:paragraph-properties style:writing-mode="lr-tb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start"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P9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text-properties style:font-name="Liberation Seri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75cm" svg:height="2.5cm" svg:x="2.391cm" svg:y="12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891cm" svg:y1="12.5cm" svg:x2="11.891cm" svg:y2="15cm">
          <text:p/>
        </draw:line>
        <draw:line draw:style-name="gr3" draw:text-style-name="P3" draw:layer="layout" svg:x1="2.391cm" svg:y1="15.5cm" svg:x2="2.391cm" svg:y2="16.25cm">
          <text:p/>
        </draw:line>
        <draw:line draw:style-name="gr3" draw:text-style-name="P3" draw:layer="layout" svg:x1="2.391cm" svg:y1="16cm" svg:x2="16.141cm" svg:y2="16cm">
          <text:p/>
        </draw:line>
        <draw:line draw:style-name="gr3" draw:text-style-name="P3" draw:layer="layout" svg:x1="16.141cm" svg:y1="15.5cm" svg:x2="16.141cm" svg:y2="16.25cm">
          <text:p/>
        </draw:line>
        <draw:frame draw:style-name="gr4" draw:text-style-name="P5" draw:layer="layout" svg:width="10.141cm" svg:height="1cm" svg:x="4cm" svg:y="16.25cm">
          <draw:text-box>
            <text:p text:style-name="P4"><text:span text:style-name="T2">Total accessible mapping</text:span></text:p>
          </draw:text-box>
        </draw:frame>
        <draw:frame draw:style-name="gr5" draw:text-style-name="P6" draw:layer="layout" svg:width="1.25cm" svg:height="0.839cm" svg:x="2cm" svg:y="16.359cm">
          <draw:text-box>
            <text:p><text:span text:style-name="T2">0</text:span></text:p>
          </draw:text-box>
        </draw:frame>
        <draw:frame draw:style-name="gr6" draw:text-style-name="P6" draw:layer="layout" svg:width="1.75cm" svg:height="1.427cm" svg:x="14.891cm" svg:y="16.323cm">
          <draw:text-box>
            <text:p><text:span text:style-name="T2">8191</text:span></text:p>
          </draw:text-box>
        </draw:frame>
        <draw:frame draw:style-name="gr5" draw:text-style-name="P6" draw:layer="layout" svg:width="0.75cm" svg:height="0.839cm" svg:x="2.141cm" svg:y="11.75cm">
          <draw:text-box>
            <text:p><text:span text:style-name="T2">0</text:span></text:p>
          </draw:text-box>
        </draw:frame>
        <draw:frame draw:style-name="gr7" draw:text-style-name="P7" draw:layer="layout" svg:width="1.687cm" svg:height="0.839cm" svg:x="10.419cm" svg:y="11.75cm">
          <draw:text-box>
            <text:p><text:span text:style-name="T2">6999</text:span></text:p>
          </draw:text-box>
        </draw:frame>
        <draw:frame draw:style-name="gr7" draw:text-style-name="P8" draw:layer="layout" svg:width="1.687cm" svg:height="0.839cm" svg:x="11.891cm" svg:y="11.75cm">
          <draw:text-box>
            <text:p><text:span text:style-name="T2">7000</text:span></text:p>
          </draw:text-box>
        </draw:frame>
        <draw:frame draw:style-name="gr6" draw:text-style-name="P6" draw:layer="layout" svg:width="1.75cm" svg:height="1.427cm" svg:x="14.676cm" svg:y="11.75cm">
          <draw:text-box>
            <text:p><text:span text:style-name="T2">8191</text:span></text:p>
          </draw:text-box>
        </draw:frame>
        <draw:custom-shape draw:style-name="gr8" draw:text-style-name="P9" draw:layer="layout" svg:width="3.609cm" svg:height="2.5cm" svg:x="16.141cm" svg:y="12.5cm">
          <text:p text:style-name="P4"><text:span text:style-name="T3">Not mapped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9.25cm" svg:height="2cm" svg:x="2.5cm" svg:y="17.75cm">
          <text:p text:style-name="P10"><text:span text:style-name="T3">File on dis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2cm" svg:x="12cm" svg:y="17.75cm">
          <text:p text:style-name="P10"><text:span text:style-name="T3">zero-initialized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56cm" svg:height="3.041cm" svg:x="12.19cm" svg:y="12.75cm">
          <draw:text-box>
            <text:p text:style-name="P4"><text:span text:style-name="T3">Remaining accessible, not mapped to file, zero-initialized</text:span></text:p>
            <text:p text:style-name="P12"><text:span text:style-name="T3"/></text:p>
          </draw:text-box>
        </draw:frame>
        <draw:frame draw:style-name="gr12" draw:text-style-name="P14" draw:layer="layout" svg:width="8.054cm" svg:height="1.428cm" svg:x="3.446cm" svg:y="13.4cm">
          <draw:text-box>
            <text:p text:style-name="P4"><text:span text:style-name="T3">Accessible memory mapped to fi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2-20T03:08:29.416346320</meta:creation-date>
    <dc:date>2025-12-07T12:51:21.165524158</dc:date>
    <meta:editing-duration>PT14M56S</meta:editing-duration>
    <meta:editing-cycles>2</meta:editing-cycles>
    <meta:generator>LibreOffice/25.8.3.2$Linux_X86_64 LibreOffice_project/580$Build-2</meta:generator>
    <meta:document-statistic meta:object-count="17"/>
  </office:meta>
</office:document-meta>
</file>