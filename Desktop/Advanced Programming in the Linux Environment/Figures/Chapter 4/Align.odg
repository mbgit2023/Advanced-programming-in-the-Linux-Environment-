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 style:font-family-generic="modern" style:font-pitch="fixed"/>
    <style:font-face style:name="Courier1" svg:font-family="Courier, 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center" draw:textarea-vertical-align="middle" draw:auto-grow-height="false" fo:min-height="4.195cm" fo:min-width="2.04cm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195cm" fo:min-width="2.0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195cm" fo:min-width="2.04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ouble_20_Dash" svg:stroke-width="0.053cm" svg:stroke-color="#80808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352cm" fo:min-width="3.148cm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69cm" fo:min-width="3.148cm" loext:decorative="false"/>
    </style:style>
    <style:style style:name="gr9" style:family="graphic" style:parent-style-name="objectwithoutfill">
      <style:graphic-properties svg:stroke-color="#808080" draw:marker-end="Arrowheads_20_1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808080" draw:marker-end="Arrowheads_20_2" draw:marker-end-width="0.3cm" draw:fill="none" draw:textarea-vertical-align="middle" loext:decorative="false"/>
    </style:style>
    <style:style style:name="P1" style:family="paragraph">
      <style:paragraph-properties fo:margin-left="0cm" fo:margin-right="0cm" style:line-height-at-least="0.503cm" fo:text-align="center" fo:text-indent="0cm"/>
      <style:text-properties fo:color="#a31515" loext:opacity="100%" style:font-name="Courier1" fo:font-size="11pt" style:font-name-complex="Courier1" style:font-size-complex="11pt"/>
    </style:style>
    <style:style style:name="P2" style:family="paragraph">
      <loext:graphic-properties draw:fill="solid" draw:fill-color="#ffffff"/>
      <style:paragraph-properties fo:text-align="center"/>
      <style:text-properties fo:color="#000000" loext:opacity="100%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text-properties style:font-name="Courier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Courier" fo:font-size="12pt" style:font-size-asian="12pt" style:font-size-complex="12pt"/>
    </style:style>
    <style:style style:name="P8" style:family="paragraph">
      <loext:graphic-properties draw:fill="solid" draw:fill-color="#ffffff"/>
      <style:paragraph-properties fo:margin-left="0cm" fo:margin-right="0cm" style:line-height-at-least="0.503cm" fo:text-align="center" fo:text-indent="0cm"/>
      <style:text-properties fo:color="#a31515" loext:opacity="100%" style:font-name="Courier1" fo:font-size="11pt" style:font-name-complex="Courier1" style:font-size-complex="11pt"/>
    </style:style>
    <style:style style:name="P9" style:family="paragraph">
      <style:paragraph-properties fo:margin-left="0cm" fo:margin-right="0cm" fo:margin-top="0cm" fo:margin-bottom="0cm" style:line-height-at-least="0.503cm" fo:text-align="center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style:line-height-at-least="0.503cm" fo:text-align="center" fo:text-indent="0cm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color="#808080" loext:opacity="100%"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color="#808080" loext:opacity="100%" fo:font-size="12pt" style:font-size-asian="12pt" style:font-size-complex="12pt"/>
    </style:style>
    <style:style style:name="P18" style:family="paragraph">
      <style:paragraph-properties fo:text-align="center"/>
      <style:text-properties fo:color="#666666" loext:opacity="100%"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fo:color="#666666" loext:opacity="100%"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ourier1" fo:font-size="11pt" fo:font-style="normal" fo:text-shadow="none" style:text-underline-style="none" fo:font-weight="normal" style:letter-kerning="true" style:font-name-asian="Noto Sans2" style:font-size-asian="18pt" style:font-style-asian="normal" style:font-weight-asian="normal" style:font-name-complex="Courier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"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808080" loext:opacity="100%" fo:font-size="12pt" style:font-size-asian="12pt" style:font-size-complex="12pt"/>
    </style:style>
    <style:style style:name="T6" style:family="text">
      <style:text-properties fo:color="#666666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4.445cm" svg:x="5.762cm" svg:y="5.127cm">
          <text:p text:style-name="P1"><text:span text:style-name="T1">Hello from a page-aligned buff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4.445cm" svg:x="12.207cm" svg:y="5.12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715cm" svg:height="1.27cm" svg:x="1cm" svg:y="6.915cm">
          <draw:text-box>
            <text:p text:style-name="P4"><text:span text:style-name="T2">page-aligned </text:span><text:span text:style-name="T2"><text:line-break/></text:span><text:span text:style-name="T2">memory block </text:span></text:p>
          </draw:text-box>
        </draw:frame>
        <draw:frame draw:style-name="gr3" draw:text-style-name="P5" draw:layer="layout" svg:width="5.715cm" svg:height="1.27cm" svg:x="13.801cm" svg:y="6.715cm">
          <draw:text-box>
            <text:p text:style-name="P4"><text:span text:style-name="T2">memory </text:span><text:span text:style-name="T2"><text:line-break/></text:span><text:span text:style-name="T2">mapped file</text:span></text:p>
          </draw:text-box>
        </draw:frame>
        <draw:frame draw:style-name="gr4" draw:text-style-name="P7" draw:layer="layout" svg:width="5.715cm" svg:height="1.27cm" svg:x="5.101cm" svg:y="4.015cm">
          <draw:text-box>
            <text:p text:style-name="P6"><text:span text:style-name="T3">posix_memalign</text:span></text:p>
          </draw:text-box>
        </draw:frame>
        <draw:frame draw:style-name="gr4" draw:text-style-name="P7" draw:layer="layout" svg:width="5.715cm" svg:height="1.27cm" svg:x="12.602cm" svg:y="4.015cm">
          <draw:text-box>
            <text:p text:style-name="P6"><text:span text:style-name="T3">mmap</text:span></text:p>
          </draw:text-box>
        </draw:frame>
        <draw:custom-shape draw:style-name="gr1" draw:text-style-name="P8" draw:layer="layout" svg:width="2.54cm" svg:height="4.445cm" svg:x="5.762cm" svg:y="15.128cm">
          <text:p text:style-name="P1"><text:span text:style-name="T1">Hello from a page-aligned buff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4.445cm" svg:x="12.207cm" svg:y="15.128cm">
          <text:p text:style-name="P9"><text:span text:style-name="T1">Hello from a page-aligned buffer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715cm" svg:height="1.27cm" svg:x="9.201cm" svg:y="16.716cm">
          <draw:text-box>
            <text:p text:style-name="P6"><text:span text:style-name="T3">memcpy</text:span></text:p>
          </draw:text-box>
        </draw:frame>
        <draw:line draw:style-name="gr6" draw:text-style-name="P10" draw:layer="layout" svg:x1="1.317cm" svg:y1="10.557cm" svg:x2="19.097cm" svg:y2="10.557cm">
          <text:p/>
        </draw:line>
        <draw:custom-shape draw:style-name="gr7" draw:text-style-name="P11" draw:layer="layout" svg:width="3.648cm" svg:height="1.602cm" svg:x="11.707cm" svg:y="21.428cm">
          <text:p text:style-name="P9"><text:span text:style-name="T1">Hello from a page-aligned buffer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.317cm" svg:y1="20.357cm" svg:x2="19.097cm" svg:y2="20.357cm">
          <text:p/>
        </draw:line>
        <draw:custom-shape draw:style-name="gr8" draw:text-style-name="P3" draw:layer="layout" svg:width="3.648cm" svg:height="1.319cm" svg:x="11.707cm" svg:y="11.428cm">
          <text:p/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3.382cm" svg:y1="19.537cm" svg:x2="13.382cm" svg:y2="21.442cm">
          <text:p/>
        </draw:line>
        <draw:line draw:style-name="gr10" draw:text-style-name="P10" draw:layer="layout" svg:x1="8.62cm" svg:y1="17.632cm" svg:x2="11.795cm" svg:y2="17.632cm">
          <text:p/>
        </draw:line>
        <draw:frame draw:style-name="gr3" draw:text-style-name="P13" draw:layer="layout" svg:width="5.715cm" svg:height="1.27cm" svg:x="0.102cm" svg:y="9.415cm">
          <draw:text-box>
            <text:p text:style-name="P12"><text:span text:style-name="T4">memory</text:span></text:p>
          </draw:text-box>
        </draw:frame>
        <draw:frame draw:style-name="gr3" draw:text-style-name="P13" draw:layer="layout" svg:width="5.715cm" svg:height="1.27cm" svg:x="-0.297cm" svg:y="10.915cm">
          <draw:text-box>
            <text:p text:style-name="P12"><text:span text:style-name="T4">disk</text:span></text:p>
          </draw:text-box>
        </draw:frame>
        <draw:frame draw:style-name="gr3" draw:text-style-name="P13" draw:layer="layout" svg:width="5.715cm" svg:height="1.27cm" svg:x="0.103cm" svg:y="19.315cm">
          <draw:text-box>
            <text:p text:style-name="P12"><text:span text:style-name="T4">memory</text:span></text:p>
          </draw:text-box>
        </draw:frame>
        <draw:frame draw:style-name="gr4" draw:text-style-name="P15" draw:layer="layout" svg:width="5.715cm" svg:height="1.27cm" svg:x="13.002cm" svg:y="23.315cm">
          <draw:text-box>
            <text:p text:style-name="P14"><text:span text:style-name="T2">file</text:span></text:p>
          </draw:text-box>
        </draw:frame>
        <draw:frame draw:style-name="gr3" draw:text-style-name="P13" draw:layer="layout" svg:width="5.715cm" svg:height="1.27cm" svg:x="-0.296cm" svg:y="20.615cm">
          <draw:text-box>
            <text:p text:style-name="P12"><text:span text:style-name="T4">disk</text:span></text:p>
          </draw:text-box>
        </draw:frame>
        <draw:frame draw:style-name="gr4" draw:text-style-name="P7" draw:layer="layout" svg:width="5.715cm" svg:height="1.27cm" svg:x="13.602cm" svg:y="20.516cm">
          <draw:text-box>
            <text:p text:style-name="P6"><text:span text:style-name="T3">msync</text:span></text:p>
          </draw:text-box>
        </draw:frame>
        <draw:frame draw:style-name="gr4" draw:text-style-name="P15" draw:layer="layout" svg:width="5.715cm" svg:height="1.27cm" svg:x="13.003cm" svg:y="13.015cm">
          <draw:text-box>
            <text:p text:style-name="P14"><text:span text:style-name="T2">file</text:span></text:p>
          </draw:text-box>
        </draw:frame>
        <draw:frame draw:style-name="gr3" draw:text-style-name="P17" draw:layer="layout" svg:width="5.715cm" svg:height="1.27cm" svg:x="5.801cm" svg:y="9.115cm">
          <draw:text-box>
            <text:p text:style-name="P16"><text:span text:style-name="T5">0</text:span></text:p>
          </draw:text-box>
        </draw:frame>
        <draw:frame draw:style-name="gr3" draw:text-style-name="P19" draw:layer="layout" svg:width="5.715cm" svg:height="1.27cm" svg:x="6.102cm" svg:y="5.015cm">
          <draw:text-box>
            <text:p text:style-name="P18"><text:span text:style-name="T6">4096</text:span></text:p>
          </draw:text-box>
        </draw:frame>
        <draw:frame draw:style-name="gr3" draw:text-style-name="P19" draw:layer="layout" svg:width="5.715cm" svg:height="1.27cm" svg:x="12.503cm" svg:y="5.015cm">
          <draw:text-box>
            <text:p text:style-name="P18"><text:span text:style-name="T6">4096</text:span></text:p>
          </draw:text-box>
        </draw:frame>
        <draw:frame draw:style-name="gr3" draw:text-style-name="P17" draw:layer="layout" svg:width="5.715cm" svg:height="1.27cm" svg:x="12.202cm" svg:y="9.115cm">
          <draw:text-box>
            <text:p text:style-name="P16"><text:span text:style-name="T5">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 style:font-family-generic="modern" style:font-pitch="fixed"/>
    <style:font-face style:name="Courier1" svg:font-family="Courier, 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ans1" style:font-family-asian="'Noto Sans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1" style:font-family-asian="'Noto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Noto Sans1" style:font-family-asian="'Noto Sans'" style:font-pitch-asian="variable" style:font-name-complex="Liberation Serif" style:font-family-complex="'Liberation Serif', 'Times New Roman'" style:font-family-generic-complex="roman" style:font-pitch-complex="variable" style:font-size-complex="10pt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erif" fo:font-family="'Liberation Serif', 'Times New Roman'" style:font-family-generic="roman" style:font-pitch="variable" fo:font-size="7pt" fo:font-weight="bold" style:font-name-asian="Noto Sans1" style:font-family-asian="'Noto Sans'" style:font-pitch-asian="variable" style:font-name-complex="Liberation Serif" style:font-family-complex="'Liberation Serif', 'Times New Roman'" style:font-family-generic-complex="roman" style:font-pitch-complex="variable" style:font-size-complex="7pt" style:font-weight-complex="bold"/>
    </style:style>
    <style:style style:name="User_20_Entry" style:display-name="User Entry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Block_20_Quotation" style:display-name="Block Quotation" style:family="graphic">
      <style:paragraph-properties fo:margin-left="1.764cm" fo:margin-right="1.764cm" fo:margin-top="0cm" fo:margin-bottom="0.88cm" fo:text-indent="0cm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_20_text" style:display-name="footnote text" style:family="graphic">
      <style:paragraph-properties fo:margin-left="1.058cm" fo:margin-right="0cm" fo:text-indent="-16.532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15:40:41.042066271</meta:creation-date>
    <dc:date>2025-12-05T16:04:01.950224327</dc:date>
    <meta:editing-duration>PT11M42S</meta:editing-duration>
    <meta:editing-cycles>2</meta:editing-cycles>
    <meta:generator>LibreOffice/25.8.0.4$Linux_X86_64 LibreOffice_project/580$Build-4</meta:generator>
    <meta:document-statistic meta:object-count="26"/>
  </office:meta>
</office:document-meta>
</file>