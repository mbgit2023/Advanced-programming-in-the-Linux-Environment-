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3.5cm" loext:decorative="false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75cm" loext:decorative="fals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25cm" loext:decorative="false"/>
    </style:style>
    <style:style style:name="gr7" style:family="graphic" style:parent-style-name="objectwithoutfill">
      <style:graphic-properties draw:stroke="dash" draw:stroke-dash="Long_20_Dash" svg:stroke-color="#808080" svg:stroke-linecap="butt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fo:min-height="0.94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cm" loext:decorative="false"/>
      <style:paragraph-properties style:writing-mode="lr-tb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4.75cm" loext:decorative="false"/>
      <style:paragraph-properties style:writing-mode="lr-tb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3.05cm" loext:decorative="false"/>
      <style:paragraph-properties style:writing-mode="lr-tb"/>
    </style:style>
    <style:style style:name="gr12" style:family="graphic" style:parent-style-name="objectwithoutfill">
      <style:graphic-properties svg:stroke-color="#808080" draw:marker-end="Arrowheads_20_1" draw:marker-end-width="0.3cm" draw:fill="none" draw:textarea-vertical-align="middle" loext:decorative="false"/>
    </style:style>
    <style:style style:name="gr13" style:family="graphic" style:parent-style-name="standard">
      <style:graphic-properties svg:stroke-color="#808080" draw:marker-start="Arrow" draw:marker-start-width="0.3cm" draw:marker-end="Arrow" draw:marker-end-width="0.3cm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dddddd"/>
      <style:paragraph-properties fo:text-align="center" style:writing-mode="lr-tb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dddddd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cm" svg:height="1cm" svg:x="2.25cm" svg:y="9.9cm">
          <text:p text:style-name="P1">tex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2.25cm" svg:y="8.9cm">
          <text:p text:style-name="P1">bs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2.25cm" svg:y="7.9cm">
          <text:p text:style-name="P1">heap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4cm" svg:x="2.25cm" svg:y="3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2.25cm" svg:y="2.9cm">
          <text:p text:style-name="P1">stack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cm" svg:height="1cm" svg:x="2.25cm" svg:y="5.4cm">
          <text:p text:style-name="P1">mapping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cm" svg:height="1cm" svg:x="11.5cm" svg:y="9.9cm">
          <text:p text:style-name="P5"><text:span text:style-name="T1">file mapped region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25cm" svg:height="1cm" svg:x="9.25cm" svg:y="9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75cm" svg:height="1cm" svg:x="15.5cm" svg:y="9.9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6.25cm" svg:y1="6.4cm" svg:x2="11.5cm" svg:y2="9.9cm">
          <text:p/>
        </draw:line>
        <draw:line draw:style-name="gr7" draw:text-style-name="P7" draw:layer="layout" svg:x1="6.25cm" svg:y1="5.4cm" svg:x2="15.5cm" svg:y2="9.9cm">
          <text:p/>
        </draw:line>
        <draw:frame draw:style-name="gr8" draw:text-style-name="P9" draw:layer="layout" svg:width="7.5cm" svg:height="1.199cm" svg:x="1.932cm" svg:y="11.4cm">
          <draw:text-box>
            <text:p text:style-name="P8"><text:span text:style-name="T2">process virtual address space</text:span></text:p>
          </draw:text-box>
        </draw:frame>
        <draw:frame draw:style-name="gr9" draw:text-style-name="P9" draw:layer="layout" svg:width="3cm" svg:height="0.75cm" svg:x="12.5cm" svg:y="11.4cm">
          <draw:text-box>
            <text:p text:style-name="P8"><text:span text:style-name="T2">file</text:span></text:p>
          </draw:text-box>
        </draw:frame>
        <draw:custom-shape draw:style-name="gr10" draw:text-style-name="P10" draw:layer="layout" svg:width="5.25cm" svg:height="1cm" svg:x="6.75cm" svg:y="14.85cm">
          <text:p text:style-name="P5"><text:span text:style-name="T1">file on disk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5.25cm" svg:height="1cm" svg:x="6.75cm" svg:y="17.35cm">
          <text:p text:style-name="P5"><text:span text:style-name="T1">mpped pages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55cm" svg:height="1cm" svg:x="5.15cm" svg:y="19.5cm">
          <text:p text:style-name="P1"><text:span text:style-name="T1">process 1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55cm" svg:height="1cm" svg:x="9.75cm" svg:y="19.5cm">
          <text:p text:style-name="P11"><text:span text:style-name="T1">process 2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85cm" svg:y1="19.5cm" svg:x2="8.25cm" svg:y2="18.5cm">
          <text:p/>
        </draw:line>
        <draw:line draw:style-name="gr12" draw:text-style-name="P7" draw:layer="layout" svg:x1="11.55cm" svg:y1="19.5cm" svg:x2="10.5cm" svg:y2="18.5cm">
          <text:p/>
        </draw:line>
        <draw:line draw:style-name="gr13" draw:text-style-name="P1" draw:layer="layout" svg:x1="9.5cm" svg:y1="15.95cm" svg:x2="9.5cm" svg:y2="17.2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2-23T22:39:12.435497587</meta:creation-date>
    <dc:date>2025-12-06T14:22:54.450787375</dc:date>
    <meta:editing-duration>PT1H30M32S</meta:editing-duration>
    <meta:editing-cycles>3</meta:editing-cycles>
    <meta:generator>LibreOffice/25.8.3.2$Linux_X86_64 LibreOffice_project/580$Build-2</meta:generator>
    <meta:print-date>2025-12-06T13:03:13.446852799</meta:print-date>
    <meta:printed-by>PDF files</meta:printed-by>
    <meta:document-statistic meta:object-count="20"/>
  </office:meta>
</office:document-meta>
</file>