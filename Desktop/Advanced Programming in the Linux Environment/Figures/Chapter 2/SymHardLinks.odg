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1.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5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>
      <loext:graphic-properties draw:fill-color="#ffffff"/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cm" svg:x="11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5cm" svg:height="3cm" svg:x="11.5cm" svg:y="8.75cm">
          <text:p text:style-name="P2">file.tx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5cm" svg:height="3cm" svg:x="14.5cm" svg:y="8.75cm">
          <text:p text:style-name="P2">hfile3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cm" svg:x="3.25cm" svg:y="9.75cm">
          <text:p text:style-name="P4"><text:span text:style-name="T1">23364884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25cm" svg:height="1cm" svg:x="11.5cm" svg:y="6cm">
          <text:p text:style-name="P6"><text:span text:style-name="T2"><text:s/>23364606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2.5cm" svg:y1="8.75cm" svg:x2="14cm" svg:y2="7cm">
          <text:p/>
        </draw:line>
        <draw:line draw:style-name="gr5" draw:text-style-name="P8" draw:layer="layout" svg:x1="15.6cm" svg:y1="8.751cm" svg:x2="14.5cm" svg:y2="7cm">
          <text:p/>
        </draw:line>
        <draw:line draw:style-name="gr6" draw:text-style-name="P8" draw:layer="layout" svg:x1="8.25cm" svg:y1="10.25cm" svg:x2="11.5cm" svg:y2="10.25cm">
          <text:p/>
        </draw:line>
        <draw:frame draw:style-name="gr7" draw:text-style-name="P10" draw:layer="layout" svg:width="3.75cm" svg:height="1cm" svg:x="3.95cm" svg:y="8.85cm">
          <draw:text-box>
            <text:p text:style-name="P9"><text:span text:style-name="T3">symbolic link</text:span></text:p>
          </draw:text-box>
        </draw:frame>
        <draw:frame draw:style-name="gr7" draw:text-style-name="P10" draw:layer="layout" svg:width="3.75cm" svg:height="1cm" svg:x="11.45cm" svg:y="11.9cm">
          <draw:text-box>
            <text:p text:style-name="P9"><text:span text:style-name="T3">hard link</text:span></text:p>
          </draw:text-box>
        </draw:frame>
        <draw:frame draw:style-name="gr7" draw:text-style-name="P10" draw:layer="layout" svg:width="3.75cm" svg:height="1cm" svg:x="14.55cm" svg:y="11.9cm">
          <draw:text-box>
            <text:p text:style-name="P9"><text:span text:style-name="T3">hard link</text:span></text:p>
          </draw:text-box>
        </draw:frame>
        <draw:custom-shape draw:style-name="gr2" draw:text-style-name="P3" draw:layer="layout" svg:width="2.25cm" svg:height="3cm" svg:x="3.4cm" svg:y="12.55cm">
          <text:p text:style-name="P2">file2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5cm" svg:y1="12.5cm" svg:x2="4.5cm" svg:y2="10.75cm">
          <text:p/>
        </draw:line>
        <draw:frame draw:style-name="gr7" draw:text-style-name="P10" draw:layer="layout" svg:width="3.75cm" svg:height="1cm" svg:x="3.35cm" svg:y="15.8cm">
          <draw:text-box>
            <text:p text:style-name="P9"><text:span text:style-name="T3">hard link</text:span></text:p>
          </draw:text-box>
        </draw:frame>
        <draw:custom-shape draw:style-name="gr2" draw:text-style-name="P3" draw:layer="layout" svg:width="2.25cm" svg:height="3cm" svg:x="6cm" svg:y="12.55cm">
          <text:p text:style-name="P2">sfile4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75cm" svg:height="1cm" svg:x="5.95cm" svg:y="15.8cm">
          <draw:text-box>
            <text:p text:style-name="P9"><text:span text:style-name="T3">hard link</text:span></text:p>
          </draw:text-box>
        </draw:frame>
        <draw:line draw:style-name="gr8" draw:text-style-name="P8" draw:layer="layout" svg:x1="7.1cm" svg:y1="12.501cm" svg:x2="7.1cm" svg:y2="10.75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2" style:font-family-complex="FreeSans" style:font-family-generic-complex="swiss" style:language-complex="zxx" style:country-complex="none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it" fo:country="IT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3T20:26:43.601283670</meta:creation-date>
    <dc:date>2026-05-08T18:25:11.638012015</dc:date>
    <meta:editing-duration>PT39M5S</meta:editing-duration>
    <meta:editing-cycles>7</meta:editing-cycles>
    <meta:generator>LibreOffice/26.2.1.2$Linux_X86_64 LibreOffice_project/620$Build-2</meta:generator>
    <meta:print-date>2026-05-08T18:22:06.959686138</meta:print-date>
    <meta:printed-by>PDF files</meta:printed-by>
    <meta:document-statistic meta:object-count="17"/>
  </office:meta>
</office:document-meta>
</file>