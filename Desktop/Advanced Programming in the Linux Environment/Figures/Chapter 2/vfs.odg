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" svg:font-family="Courier" style:font-family-generic="modern" style:font-pitch="fixed"/>
    <style:font-face style:name="Courier1" svg:font-family="Courier, 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OpenSymbol" svg:font-family="OpenSymbol, 'Arial Unicode MS'" style:font-charset="x-symbol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6.803cm" loext:decorative="false"/>
      <style:paragraph-properties style:writing-mode="lr-tb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11.565cm" loext:decorative="false"/>
      <style:paragraph-properties style:writing-mode="lr-tb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.04cm" loext:decorative="false"/>
      <style:paragraph-properties style:writing-mode="lr-tb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.542cm" loext:decorative="false"/>
      <style:paragraph-properties style:writing-mode="lr-tb"/>
    </style:style>
    <style:style style:name="gr5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6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8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14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2.201cm" loext:decorative="false"/>
      <style:paragraph-properties style:writing-mode="lr-tb"/>
    </style:style>
    <style:style style:name="gr13" style:family="graphic" style:parent-style-name="standard">
      <style:graphic-properties svg:stroke-color="#000000" draw:fill="solid" draw:fill-color="#ffffff" draw:textarea-horizontal-align="center" draw:textarea-vertical-align="middle" draw:auto-grow-height="false" fo:min-height="1.02cm" fo:min-width="7.1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972cm" loext:decorative="false"/>
      <style:paragraph-properties style:writing-mode="lr-tb"/>
    </style:style>
    <style:style style:name="gr15" style:family="graphic" style:parent-style-name="standard">
      <style:graphic-properties draw:stroke="dash" draw:stroke-dash="Double_20_Dash" svg:stroke-width="0cm" svg:stroke-color="#000000" svg:stroke-opacity="100%" svg:stroke-linecap="butt" draw:fill="none" draw:fill-color="#ffffff" loext:fill-use-slide-background="false" draw:opacity="100%" draw:textarea-horizontal-align="justify" draw:textarea-vertical-align="middle" draw:auto-grow-height="false" fo:min-height="4.83cm" fo:min-width="15.375cm" loext:decorative="false"/>
    </style:style>
    <style:style style:name="gr16" style:family="graphic" style:parent-style-name="standard">
      <style:graphic-properties draw:stroke="dash" draw:stroke-dash="Double_20_Dash" svg:stroke-width="0cm" svg:stroke-color="#000000" svg:stroke-opacity="100%" svg:stroke-linecap="butt" draw:fill="none" draw:fill-color="#ffffff" loext:fill-use-slide-background="false" draw:opacity="100%" draw:textarea-horizontal-align="justify" draw:textarea-vertical-align="middle" draw:auto-grow-height="false" fo:min-height="7.472cm" fo:min-width="15.375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Courier" fo:font-size="12pt" fo:font-weight="normal" style:font-size-asian="12pt" style:font-weight-asian="normal" style:font-size-complex="12pt" style:font-weight-complex="normal"/>
    </style:style>
    <style:style style:name="P5" style:family="paragraph">
      <loext:graphic-properties draw:fill="none" draw:fill-color="#ffffff"/>
      <style:text-properties style:font-name="Courier" fo:font-size="12pt" fo:font-weight="normal" style:font-size-asian="12pt" style:font-weight-asian="normal" style:font-size-complex="12pt" style:font-weight-complex="normal"/>
    </style:style>
    <style:style style:name="P6" style:family="paragraph">
      <style:text-properties style:font-name="Courier" fo:font-size="13pt" style:font-size-asian="13pt" style:font-size-complex="13pt"/>
    </style:style>
    <style:style style:name="P7" style:family="paragraph">
      <loext:graphic-properties draw:fill="none" draw:fill-color="#ffffff"/>
      <style:text-properties style:font-name="Courier" fo:font-size="13pt" style:font-size-asian="13pt" style:font-size-complex="13pt"/>
    </style:style>
    <style:style style:name="P8" style:family="paragraph">
      <style:paragraph-properties fo:text-align="center"/>
      <style:text-properties style:font-name="Courier1" fo:font-size="13pt" style:font-size-asian="13pt" style:font-name-complex="Courier1" style:font-size-complex="13pt"/>
    </style:style>
    <style:style style:name="P9" style:family="paragraph">
      <loext:graphic-properties draw:fill="solid" draw:fill-color="#ffffff"/>
      <style:paragraph-properties fo:text-align="center"/>
      <style:text-properties style:font-name="Courier1" fo:font-size="13pt" style:font-size-asian="13pt" style:font-name-complex="Courier1" style:font-size-complex="13pt"/>
    </style:style>
    <style:style style:name="P10" style:family="paragraph">
      <style:paragraph-properties fo:text-align="center"/>
      <style:text-properties style:font-name="Liberation Serif" fo:font-size="13pt" style:font-size-asian="13pt" style:font-name-complex="Courier1" style:font-size-complex="13pt"/>
    </style:style>
    <style:style style:name="P11" style:family="paragraph">
      <loext:graphic-properties draw:fill="solid" draw:fill-color="#ffffff"/>
      <style:paragraph-properties fo:text-align="center"/>
      <style:text-properties style:font-name="Liberation Serif" fo:font-size="13pt" style:font-size-asian="13pt" style:font-name-complex="Courier1" style:font-size-complex="13pt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style:font-name="Courier1" style:font-name-complex="Courier1"/>
    </style:style>
    <style:style style:name="P14" style:family="paragraph">
      <loext:graphic-properties draw:fill="solid" draw:fill-color="#ffffff"/>
      <style:paragraph-properties fo:text-align="justify"/>
      <style:text-properties style:font-name="Courier1" fo:font-size="13pt" style:font-size-asian="13pt" style:font-name-complex="Courier1" style:font-size-complex="13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 draw:opacity="100%"/>
      <style:paragraph-properties fo:text-align="center"/>
    </style:style>
    <style:style style:name="T1" style:family="text">
      <style:text-properties style:font-name="Courier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Courier" fo:font-size="13pt" style:font-size-asian="13pt" style:font-size-complex="13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1" fo:font-size="13pt" fo:font-style="normal" fo:text-shadow="none" style:text-underline-style="none" fo:font-weight="normal" style:letter-kerning="true" style:font-name-asian="Noto Sans2" style:font-size-asian="13pt" style:font-style-asian="normal" style:font-weight-asian="normal" style:font-name-complex="Courier1" style:font-size-complex="1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3pt" fo:font-style="normal" fo:text-shadow="none" style:text-underline-style="none" fo:font-weight="normal" style:letter-kerning="true" style:font-name-asian="Noto Sans2" style:font-size-asian="13pt" style:font-style-asian="normal" style:font-weight-asian="normal" style:font-name-complex="Courier1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303cm" svg:height="1.27cm" svg:x="7.35cm" svg:y="2.392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065cm" svg:height="1.27cm" svg:x="5.127cm" svg:y="5.567cm">
          <text:p text:style-name="P1">Virtual File Syste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27cm" svg:x="2.905cm" svg:y="8.742cm">
          <text:p text:style-name="P1">ext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27cm" svg:x="6.305cm" svg:y="8.742cm">
          <text:p text:style-name="P1">ext4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042cm" svg:height="1.27cm" svg:x="9.705cm" svg:y="8.742cm">
          <text:p text:style-name="P1">iso966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27cm" svg:x="13.305cm" svg:y="8.742cm">
          <text:p text:style-name="P1">vfa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27cm" svg:x="17.005cm" svg:y="8.742cm">
          <text:p text:style-name="P1">nfs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0.842cm" svg:y1="3.662cm" svg:x2="10.842cm" svg:y2="5.567cm">
          <text:p/>
        </draw:line>
        <draw:line draw:style-name="gr6" draw:text-style-name="P3" draw:layer="layout" svg:x1="7.032cm" svg:y1="6.837cm" svg:x2="4.175cm" svg:y2="8.742cm">
          <text:p/>
        </draw:line>
        <draw:line draw:style-name="gr7" draw:text-style-name="P3" draw:layer="layout" svg:x1="8.937cm" svg:y1="6.837cm" svg:x2="7.667cm" svg:y2="8.742cm">
          <text:p/>
        </draw:line>
        <draw:line draw:style-name="gr8" draw:text-style-name="P3" draw:layer="layout" svg:x1="10.842cm" svg:y1="6.837cm" svg:x2="10.842cm" svg:y2="8.742cm">
          <text:p/>
        </draw:line>
        <draw:line draw:style-name="gr9" draw:text-style-name="P3" draw:layer="layout" svg:x1="13.382cm" svg:y1="6.837cm" svg:x2="14.652cm" svg:y2="8.742cm">
          <text:p/>
        </draw:line>
        <draw:line draw:style-name="gr10" draw:text-style-name="P3" draw:layer="layout" svg:x1="15.922cm" svg:y1="6.837cm" svg:x2="18.462cm" svg:y2="8.742cm">
          <text:p/>
        </draw:line>
        <draw:frame draw:style-name="gr11" draw:text-style-name="P5" draw:layer="layout" svg:width="3.14cm" svg:height="1.395cm" svg:x="7.35cm" svg:y="4.08cm">
          <draw:text-box>
            <text:p text:style-name="P4"><text:span text:style-name="T1">open read</text:span></text:p>
            <text:p text:style-name="P4"><text:span text:style-name="T1">chmod stat</text:span></text:p>
          </draw:text-box>
        </draw:frame>
        <draw:frame draw:style-name="gr12" draw:text-style-name="P7" draw:layer="layout" svg:width="4.762cm" svg:height="2.451cm" svg:x="11.16cm" svg:y="4.086cm">
          <draw:text-box>
            <text:p text:style-name="P6"><text:span text:style-name="T2">write unlink </text:span></text:p>
            <text:p text:style-name="P6"><text:span text:style-name="T2">chwon create</text:span></text:p>
          </draw:text-box>
        </draw:frame>
        <draw:custom-shape draw:style-name="gr13" draw:text-style-name="P9" draw:layer="layout" svg:width="7.62cm" svg:height="1.27cm" svg:x="3.65cm" svg:y="11.717cm">
          <text:p text:style-name="P8"><text:span text:style-name="T3">write(fd, buf, count)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7.142cm" svg:y1="12.937cm" svg:x2="7.142cm" svg:y2="14.157cm">
          <text:p/>
        </draw:line>
        <draw:custom-shape draw:style-name="gr13" draw:text-style-name="P11" draw:layer="layout" svg:width="7.62cm" svg:height="1.27cm" svg:x="3.65cm" svg:y="14.117cm">
          <text:p text:style-name="P10"><text:span text:style-name="T4">glibc wrapper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7.142cm" svg:y1="15.437cm" svg:x2="7.142cm" svg:y2="16.657cm">
          <text:p/>
        </draw:line>
        <draw:custom-shape draw:style-name="gr13" draw:text-style-name="P9" draw:layer="layout" svg:width="7.62cm" svg:height="1.27cm" svg:x="3.65cm" svg:y="16.617cm">
          <text:p text:style-name="P12"><text:span text:style-name="T3">sys_write</text:span><text:span text:style-name="T4"> (arch-specific)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7.142cm" svg:y1="17.937cm" svg:x2="7.142cm" svg:y2="19.157cm">
          <text:p/>
        </draw:line>
        <draw:custom-shape draw:style-name="gr13" draw:text-style-name="P9" draw:layer="layout" svg:width="7.62cm" svg:height="1.27cm" svg:x="3.65cm" svg:y="19.117cm">
          <text:p text:style-name="P13"><text:span text:style-name="T3">ksys_write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7.142cm" svg:y1="20.437cm" svg:x2="7.142cm" svg:y2="21.657cm">
          <text:p/>
        </draw:line>
        <draw:custom-shape draw:style-name="gr13" draw:text-style-name="P14" draw:layer="layout" svg:width="7.62cm" svg:height="1.27cm" svg:x="3.65cm" svg:y="21.617cm">
          <text:p text:style-name="P13"><text:span text:style-name="T3">vfs_write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7.62cm" svg:height="1.27cm" svg:x="3.65cm" svg:y="24.017cm">
          <text:p text:style-name="P13"><text:span text:style-name="T3">ext4_file_write_iter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7.142cm" svg:y1="22.837cm" svg:x2="7.142cm" svg:y2="24.057cm">
          <text:p/>
        </draw:line>
        <draw:frame draw:style-name="gr14" draw:text-style-name="P15" draw:layer="layout" svg:width="4.445cm" svg:height="2.222cm" svg:x="12.43cm" svg:y="12.43cm">
          <draw:text-box>
            <text:p/>
            <text:p>User space</text:p>
          </draw:text-box>
        </draw:frame>
        <draw:frame draw:style-name="gr14" draw:text-style-name="P15" draw:layer="layout" svg:width="4.445cm" svg:height="2.222cm" svg:x="12.43cm" svg:y="16.03cm">
          <draw:text-box>
            <text:p/>
            <text:p>System call</text:p>
          </draw:text-box>
        </draw:frame>
        <draw:frame draw:style-name="gr14" draw:text-style-name="P15" draw:layer="layout" svg:width="5.08cm" svg:height="2.222cm" svg:x="12.43cm" svg:y="18.63cm">
          <draw:text-box>
            <text:p/>
            <text:p>Kernel function</text:p>
          </draw:text-box>
        </draw:frame>
        <draw:frame draw:style-name="gr14" draw:text-style-name="P15" draw:layer="layout" svg:width="4.762cm" svg:height="2.222cm" svg:x="12.43cm" svg:y="21.03cm">
          <draw:text-box>
            <text:p/>
            <text:p>VFS function</text:p>
          </draw:text-box>
        </draw:frame>
        <draw:frame draw:style-name="gr14" draw:text-style-name="P15" draw:layer="layout" svg:width="4.762cm" svg:height="2.222cm" svg:x="12.43cm" svg:y="23.53cm">
          <draw:text-box>
            <text:p/>
            <text:p>ext4 operation</text:p>
          </draw:text-box>
        </draw:frame>
        <draw:custom-shape draw:style-name="gr15" draw:text-style-name="P16" draw:layer="layout" svg:width="15.875cm" svg:height="5.08cm" svg:x="2.587cm" svg:y="11.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5.875cm" svg:height="7.722cm" svg:x="2.587cm" svg:y="18.3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" svg:font-family="Courier" style:font-family-generic="modern" style:font-pitch="fixed"/>
    <style:font-face style:name="Courier1" svg:font-family="Courier, 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2" style:font-family-asian="'Noto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Noto Sans1" style:font-family-asian="'Noto Sans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/>
    </style:style>
    <style:style style:name="footnote_20_reference" style:display-name="footnote reference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  <style:text-properties fo:font-style="normal" style:font-style-complex="normal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Endnote_20_Characters" style:display-name="Endnote Characters" style:family="graphic">
      <style:paragraph-properties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footer" style:family="graphic">
      <style:paragraph-properties style:text-autospace="none" loext:tab-stop-distance="0cm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 loext:tab-stop-distance="0cm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footnote_20_text" style:display-name="footnote text" style:family="graphic">
      <style:paragraph-properties fo:margin-left="1.058cm" fo:margin-right="0cm" fo:text-indent="-16.532cm" style:text-autospace="none"/>
      <style:text-properties fo:font-size="10pt" style:font-size-asian="10pt" style:font-size-complex="10pt"/>
    </style:style>
    <style:style style:name="Index" style:family="graphic">
      <style:paragraph-properties style:text-autospace="none"/>
      <style:text-properties style:font-name-complex="FreeSans1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graphic">
      <style:paragraph-properties style:text-autospace="none"/>
      <style:text-properties style:font-name-complex="FreeSans1" style:font-family-complex="FreeSans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1" style:font-family-asian="'Noto Sans'" style:font-pitch-asian="variable" style:font-name-complex="Liberation Sans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4T15:59:55.896694986</meta:creation-date>
    <dc:date>2025-08-14T17:51:34.844314809</dc:date>
    <meta:editing-duration>PT1H41M3S</meta:editing-duration>
    <meta:editing-cycles>3</meta:editing-cycles>
    <meta:generator>LibreOffice/25.2.3.2$Linux_X86_64 LibreOffice_project/520$Build-2</meta:generator>
    <meta:print-date>2025-08-14T17:44:11.642195883</meta:print-date>
    <meta:printed-by>PDF files</meta:printed-by>
    <meta:document-statistic meta:object-count="33"/>
  </office:meta>
</office:document-meta>
</file>