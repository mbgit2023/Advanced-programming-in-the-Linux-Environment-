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8cm" fo:min-width="6.168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45cm" fo:min-width="6.16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2cm" fo:min-width="6.168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168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Courier" fo:font-size="12pt" style:font-size-asian="12pt" style:font-size-complex="12pt"/>
    </style:style>
    <style:style style:name="T2" style:family="text">
      <style:text-properties style:font-name="Liberation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68cm" svg:height="1.788cm" svg:x="7.032cm" svg:y="3.857cm">
          <text:p text:style-name="P1"><text:span text:style-name="T1">fsopen</text:span></text:p>
          <text:p text:style-name="P1"><text:span text:style-name="T1"/></text:p>
          <text:p text:style-name="P1"><text:span text:style-name="T2">open a file system con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668cm" svg:height="1.895cm" svg:x="7.032cm" svg:y="7.042cm">
          <text:p text:style-name="P3"><text:span text:style-name="T1">fsconfig</text:span></text:p>
          <text:p text:style-name="P3"><text:span text:style-name="T1"/></text:p>
          <text:p text:style-name="P3"><text:span text:style-name="T2"><text:s/>configure the f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668cm" svg:height="1.782cm" svg:x="7.032cm" svg:y="13.505cm">
          <text:p text:style-name="P3"><text:span text:style-name="T1">move_mount</text:span></text:p>
          <text:p text:style-name="P3"><text:span text:style-name="T1"/></text:p>
          <text:p text:style-name="P3"><text:span text:style-name="T2">attach the mount objec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668cm" svg:height="1.905cm" svg:x="7.032cm" svg:y="10.295cm">
          <text:p text:style-name="P3"><text:span text:style-name="T1">fsmount</text:span></text:p>
          <text:p text:style-name="P3"><text:span text:style-name="T1"/></text:p>
          <text:p text:style-name="P3"><text:span text:style-name="T2">create a mount objec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668cm" svg:height="1.905cm" svg:x="7.032cm" svg:y="16.55cm">
          <text:p text:style-name="P3"><text:span text:style-name="T1">fspick</text:span></text:p>
          <text:p text:style-name="P3"><text:span text:style-name="T1"/></text:p>
          <text:p text:style-name="P3"><text:span text:style-name="T2">reconfigure the fs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207cm" svg:y1="5.745cm" svg:x2="10.207cm" svg:y2="7.015cm">
          <text:p/>
        </draw:line>
        <draw:line draw:style-name="gr5" draw:text-style-name="P5" draw:layer="layout" svg:x1="10.207cm" svg:y1="9.062cm" svg:x2="10.207cm" svg:y2="10.332cm">
          <text:p/>
        </draw:line>
        <draw:line draw:style-name="gr5" draw:text-style-name="P5" draw:layer="layout" svg:x1="10.207cm" svg:y1="12.262cm" svg:x2="10.207cm" svg:y2="13.532cm">
          <text:p/>
        </draw:line>
        <draw:line draw:style-name="gr5" draw:text-style-name="P5" draw:layer="layout" svg:x1="10.207cm" svg:y1="15.262cm" svg:x2="10.207cm" svg:y2="16.53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3T20:17:06.373517742</meta:creation-date>
    <dc:date>2025-08-13T20:33:13.004312377</dc:date>
    <meta:editing-duration>PT11M14S</meta:editing-duration>
    <meta:editing-cycles>4</meta:editing-cycles>
    <meta:generator>LibreOffice/25.2.3.2$Linux_X86_64 LibreOffice_project/520$Build-2</meta:generator>
    <meta:document-statistic meta:object-count="9"/>
  </office:meta>
</office:document-meta>
</file>