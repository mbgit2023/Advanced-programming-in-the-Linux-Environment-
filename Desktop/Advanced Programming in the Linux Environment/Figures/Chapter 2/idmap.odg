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center" draw:textarea-vertical-align="top" draw:auto-grow-height="false" fo:min-height="3.243cm" fo:min-width="9.34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center" draw:textarea-vertical-align="middle" draw:auto-grow-height="false" fo:min-height="1.337cm" fo:min-width="7.437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center" draw:textarea-vertical-align="middle" draw:auto-grow-height="false" fo:min-height="2.925cm" fo:min-width="9.343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1.337cm" fo:min-width="12.835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center" draw:textarea-vertical-align="top" draw:auto-grow-height="false" fo:min-height="2.29cm" fo:min-width="11.248cm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center" draw:textarea-vertical-align="top" draw:auto-grow-height="false" fo:min-height="2.308cm" fo:min-width="12.2cm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color="#000000" draw:marker-end="Arrowheads_20_6" draw:marker-end-width="0.3cm" svg:stroke-linecap="butt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style:font-name="Liberation Serif"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  <style:text-properties style:font-name="Liberation Serif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3pt" fo:font-style="normal" fo:text-shadow="none" style:text-underline-style="none" fo:font-weight="normal" style:letter-kerning="true" style:font-name-asian="Noto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3pt" fo:font-style="normal" fo:text-shadow="none" style:text-underline-style="none" fo:font-weight="normal" style:letter-kerning="true" style:font-name-asian="Noto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3pt" style:font-size-asian="13pt" style:font-size-complex="13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Courier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" fo:font-size="13pt" style:font-size-asian="13pt" style:font-size-complex="13pt"/>
    </style:style>
    <style:style style:name="T9" style:family="text">
      <style:text-properties style:font-name="Liberation Serif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Noto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Noto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84cm" svg:height="3.493cm" draw:transform="skewX (-0.0106465084371654) translate (6.38cm 2.587cm)">
          <text:p text:style-name="P1"><text:span text:style-name="T1">1. Create a new user namespace</text:span></text:p>
          <text:p text:style-name="P1"><text:span text:style-name="T2">unshare(CLONE_NEWUSER)</text:span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937cm" svg:height="1.587cm" svg:x="7.35cm" svg:y="4.175cm">
          <text:p text:style-name="P4"><text:span text:style-name="T1"><text:s text:c="7"/>Namespace: User, Mount, PID…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843cm" svg:height="3.175cm" svg:x="6.397cm" svg:y="7.032cm">
          <text:p text:style-name="P1"><text:span text:style-name="T4">2. Modify namespace UID/GID maps <text:s text:c="6"/></text:span></text:p>
          <text:p text:style-name="P1"><text:tab/><text:tab/> <text:s text:c="2"/></text:p>
          <text:p text:style-name="P6"><text:span text:style-name="T5">- Write "deny" to </text:span><text:span text:style-name="T6">/proc/&lt;pid&gt;/setgroups </text:span></text:p>
          <text:p text:style-name="P6"><text:span text:style-name="T5">- Write UID map to </text:span><text:span text:style-name="T6">/proc/&lt;pid&gt;/uid_map</text:span></text:p>
          <text:p text:style-name="P6"><text:span text:style-name="T5">- Write GID map to </text:span><text:span text:style-name="T6">/proc/&lt;pid&gt;/gid_map </text:span><text:span text:style-name="T7"><text:s text:c="2"/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335cm" svg:height="1.587cm" svg:x="4.81cm" svg:y="11.16cm">
          <text:p text:style-name="P1"><text:span text:style-name="T4">3. </text:span><text:span text:style-name="T8">open_tree</text:span></text:p>
          <text:p text:style-name="P6"><text:span text:style-name="T9">- </text:span><text:span text:style-name="T5">Open a clone of the source mount tree with </text:span><text:span text:style-name="T6">OPEN_TREE_CLONE </text:span><text:span text:style-name="T5">fla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1.748cm" svg:height="2.54cm" svg:x="5.762cm" svg:y="13.7cm">
          <text:p text:style-name="P7"><text:span text:style-name="T1">4. </text:span><text:span text:style-name="T2">mount_setattr</text:span></text:p>
          <text:p text:style-name="P7"><text:span text:style-name="T10"/></text:p>
          <text:p text:style-name="P6"><text:span text:style-name="T11">- Apply mount attributes (e.g., ID-mapping)</text:span></text:p>
          <text:p text:style-name="P6"><text:span text:style-name="T11">- Using </text:span><text:span text:style-name="T12">mount_setattr</text:span><text:span text:style-name="T11"> syscall with </text:span><text:span text:style-name="T12">MOUNT_ATTR_IDMAP</text:span><text:span text:style-name="T13"> 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7cm" svg:height="2.558cm" svg:x="5.445cm" svg:y="17.174cm">
          <text:p text:style-name="P1"><text:span text:style-name="T1">5. </text:span><text:span text:style-name="T2">move_mount</text:span></text:p>
          <text:p text:style-name="P6"><text:span text:style-name="T2"><text:s/></text:span></text:p>
          <text:p text:style-name="P6"><text:span text:style-name="T11">- Move the new mount tree to the target path</text:span></text:p>
          <text:p text:style-name="P6"><text:span text:style-name="T11">- Using </text:span><text:span text:style-name="T12">move_mount</text:span><text:span text:style-name="T11"> syscall with </text:span><text:span text:style-name="T12">MOVE_MOUNT_F_EMPTY_PATH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16cm" svg:y1="10.207cm" svg:x2="11.16cm" svg:y2="11.16cm">
          <text:p/>
        </draw:line>
        <draw:line draw:style-name="gr7" draw:text-style-name="P9" draw:layer="layout" svg:x1="11.16cm" svg:y1="12.807cm" svg:x2="11.16cm" svg:y2="13.76cm">
          <text:p/>
        </draw:line>
        <draw:line draw:style-name="gr7" draw:text-style-name="P9" draw:layer="layout" svg:x1="11.16cm" svg:y1="16.207cm" svg:x2="11.16cm" svg:y2="17.16cm">
          <text:p/>
        </draw:line>
        <draw:line draw:style-name="gr7" draw:text-style-name="P9" draw:layer="layout" svg:x1="11.16cm" svg:y1="6.107cm" svg:x2="11.16cm" svg:y2="7.0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fo:font-style="normal" style:font-style-complex="norma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ndnote_20_Characters" style:display-name="End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footer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note_20_text" style:display-name="footnote text" style:family="graphic">
      <style:paragraph-properties fo:margin-left="1.058cm" fo:margin-right="0cm" fo:text-indent="-16.532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1" style:font-family-asian="'Noto Sans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02:27:21.312409855</meta:creation-date>
    <dc:date>2025-08-13T02:50:02.955563809</dc:date>
    <meta:editing-duration>PT12M15S</meta:editing-duration>
    <meta:editing-cycles>1</meta:editing-cycles>
    <meta:document-statistic meta:object-count="10"/>
    <meta:generator>LibreOffice/25.2.3.2$Linux_X86_64 LibreOffice_project/520$Build-2</meta:generator>
  </office:meta>
</office:document-meta>
</file>