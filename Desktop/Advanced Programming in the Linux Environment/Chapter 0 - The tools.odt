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050000070EC8D41D54.png" manifest:media-type="image/png"/>
  <manifest:file-entry manifest:full-path="Pictures/10000001000002D800000183EC466DE5.png" manifest:media-type="image/png"/>
  <manifest:file-entry manifest:full-path="Pictures/10000001000003980000032BC3ADE2CE.png" manifest:media-type="image/png"/>
  <manifest:file-entry manifest:full-path="Pictures/10000001000004CF00000360252AC878.png" manifest:media-type="image/png"/>
  <manifest:file-entry manifest:full-path="Pictures/10000001000002E800000107AF2181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office:font-face-decls>
  <office:automatic-styles>
    <style:style style:name="Table44" style:family="table">
      <style:table-properties style:width="6.6931in" table:align="margins"/>
    </style:style>
    <style:style style:name="Table44.A" style:family="table-column">
      <style:table-column-properties style:column-width="6.6931in" style:rel-column-width="65535*"/>
    </style:style>
    <style:style style:name="Table44.A1" style:family="table-cell">
      <style:table-cell-properties fo:padding="0.0382in" fo:border="0.5pt solid #000000"/>
    </style:style>
    <style:style style:name="Table113" style:family="table">
      <style:table-properties style:width="6.6931in" table:align="margins"/>
    </style:style>
    <style:style style:name="Table113.A" style:family="table-column">
      <style:table-column-properties style:column-width="6.6931in" style:rel-column-width="65535*"/>
    </style:style>
    <style:style style:name="Table113.A1" style:family="table-cell">
      <style:table-cell-properties fo:padding="0.0382in" fo:border="0.5pt solid #000000"/>
    </style:style>
    <style:style style:name="Table99" style:family="table">
      <style:table-properties style:width="6.6931in" table:align="margins"/>
    </style:style>
    <style:style style:name="Table99.A" style:family="table-column">
      <style:table-column-properties style:column-width="6.6931in" style:rel-column-width="65535*"/>
    </style:style>
    <style:style style:name="Table99.A1" style:family="table-cell">
      <style:table-cell-properties fo:padding="0.0382in" fo:border="0.5pt solid #000000"/>
    </style:style>
    <style:style style:name="Table71" style:family="table">
      <style:table-properties style:width="6.6931in" table:align="margins"/>
    </style:style>
    <style:style style:name="Table71.A" style:family="table-column">
      <style:table-column-properties style:column-width="6.6931in" style:rel-column-width="65535*"/>
    </style:style>
    <style:style style:name="Table71.A1" style:family="table-cell">
      <style:table-cell-properties fo:padding="0.0382in" fo:border="0.5pt solid #000000"/>
    </style:style>
    <style:style style:name="Table114" style:family="table">
      <style:table-properties style:width="6.6931in" table:align="margins"/>
    </style:style>
    <style:style style:name="Table114.A" style:family="table-column">
      <style:table-column-properties style:column-width="6.6931in" style:rel-column-width="65535*"/>
    </style:style>
    <style:style style:name="Table114.A1" style:family="table-cell">
      <style:table-cell-properties fo:padding="0.0382in" fo:border="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45" style:family="table">
      <style:table-properties style:width="6.6931in" table:align="margins"/>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5pt solid #000000"/>
    </style:style>
    <style:style style:name="Table76" style:family="table">
      <style:table-properties style:width="3.7014in" fo:margin-left="1.3028in" table:align="left"/>
    </style:style>
    <style:style style:name="Table76.A" style:family="table-column">
      <style:table-column-properties style:column-width="1.4583in"/>
    </style:style>
    <style:style style:name="Table76.B" style:family="table-column">
      <style:table-column-properties style:column-width="2.2431in"/>
    </style:style>
    <style:style style:name="Table76.1" style:family="table-row">
      <style:table-row-properties style:min-row-height="0.2778in"/>
    </style:style>
    <style:style style:name="Table76.A1" style:family="table-cell">
      <style:table-cell-properties fo:padding="0.0382in" fo:border-left="0.5pt solid #000000" fo:border-right="none" fo:border-top="0.5pt solid #000000" fo:border-bottom="0.5pt solid #000000"/>
    </style:style>
    <style:style style:name="Table76.B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05pt solid #000000"/>
    </style:style>
    <style:style style:name="Table61" style:family="table">
      <style:table-properties style:width="6.6931in" table:align="margins"/>
    </style:style>
    <style:style style:name="Table61.A" style:family="table-column">
      <style:table-column-properties style:column-width="6.6931in" style:rel-column-width="65535*"/>
    </style:style>
    <style:style style:name="Table61.A1" style:family="table-cell">
      <style:table-cell-properties fo:padding="0.0382in" fo:border="0.5pt solid #000000"/>
    </style:style>
    <style:style style:name="Table42" style:family="table">
      <style:table-properties style:width="6.6979in" fo:margin-left="0in"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2.9896in"/>
    </style:style>
    <style:style style:name="Table42.B" style:family="table-column">
      <style:table-column-properties style:column-width="3.7083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13" style:family="table-row">
      <style:table-row-properties fo:background-color="transparent" fo:keep-together="auto">
        <style:background-image/>
      </style:table-row-properties>
    </style:style>
    <style:style style:name="Table42.A1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1.7528in"/>
    </style:style>
    <style:style style:name="Table4.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1" style:family="table-row">
      <style:table-row-properties style:min-row-height="1.409in"/>
    </style:style>
    <style:style style:name="Table8.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85" style:family="table">
      <style:table-properties style:width="6.6931in" table:align="margins"/>
    </style:style>
    <style:style style:name="Table85.A" style:family="table-column">
      <style:table-column-properties style:column-width="6.6931in" style:rel-column-width="65535*"/>
    </style:style>
    <style:style style:name="Table85.A1" style:family="table-cell">
      <style:table-cell-properties fo:padding="0.0382in" fo:border="0.5pt solid #000000"/>
    </style:style>
    <style:style style:name="Table87" style:family="table">
      <style:table-properties style:width="6.6931in" table:align="margins"/>
    </style:style>
    <style:style style:name="Table87.A" style:family="table-column">
      <style:table-column-properties style:column-width="6.6931in" style:rel-column-width="65535*"/>
    </style:style>
    <style:style style:name="Table87.A1" style:family="table-cell">
      <style:table-cell-properties fo:padding="0.0382in" fo:border="0.5pt solid #000000"/>
    </style:style>
    <style:style style:name="Table88" style:family="table">
      <style:table-properties style:width="6.6931in" table:align="margins"/>
    </style:style>
    <style:style style:name="Table88.A" style:family="table-column">
      <style:table-column-properties style:column-width="6.6931in" style:rel-column-width="65535*"/>
    </style:style>
    <style:style style:name="Table88.A1" style:family="table-cell">
      <style:table-cell-properties fo:padding="0.0382in" fo:border="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89" style:family="table">
      <style:table-properties style:width="6.6931in" table:align="margins"/>
    </style:style>
    <style:style style:name="Table89.A" style:family="table-column">
      <style:table-column-properties style:column-width="6.6931in" style:rel-column-width="65535*"/>
    </style:style>
    <style:style style:name="Table89.A1" style:family="table-cell">
      <style:table-cell-properties fo:padding="0.0382in" fo:border="0.05pt solid #000000"/>
    </style:style>
    <style:style style:name="Table90" style:family="table">
      <style:table-properties style:width="6.6931in" table:align="margins"/>
    </style:style>
    <style:style style:name="Table90.A" style:family="table-column">
      <style:table-column-properties style:column-width="6.6931in" style:rel-column-width="65535*"/>
    </style:style>
    <style:style style:name="Table90.A1" style:family="table-cell">
      <style:table-cell-properties fo:padding="0.0382in" fo:border="0.05pt solid #000000"/>
    </style:style>
    <style:style style:name="Table91" style:family="table">
      <style:table-properties style:width="6.6931in" table:align="margins"/>
    </style:style>
    <style:style style:name="Table91.A" style:family="table-column">
      <style:table-column-properties style:column-width="6.6931in" style:rel-column-width="65535*"/>
    </style:style>
    <style:style style:name="Table91.A1" style:family="table-cell">
      <style:table-cell-properties fo:padding="0.0382in" fo:border="0.05pt solid #000000"/>
    </style:style>
    <style:style style:name="Table92" style:family="table">
      <style:table-properties style:width="6.6931in" table:align="margins"/>
    </style:style>
    <style:style style:name="Table92.A" style:family="table-column">
      <style:table-column-properties style:column-width="6.6931in" style:rel-column-width="65535*"/>
    </style:style>
    <style:style style:name="Table92.A1" style:family="table-cell">
      <style:table-cell-properties fo:padding="0.0382in" fo:border="0.05pt solid #000000"/>
    </style:style>
    <style:style style:name="Table93" style:family="table">
      <style:table-properties style:width="6.6931in" table:align="margins"/>
    </style:style>
    <style:style style:name="Table93.A" style:family="table-column">
      <style:table-column-properties style:column-width="6.6931in" style:rel-column-width="65535*"/>
    </style:style>
    <style:style style:name="Table93.A1" style:family="table-cell">
      <style:table-cell-properties fo:padding="0.0382in" fo:border="0.5pt solid #000000"/>
    </style:style>
    <style:style style:name="Table94" style:family="table">
      <style:table-properties style:width="6.6931in" table:align="margins"/>
    </style:style>
    <style:style style:name="Table94.A" style:family="table-column">
      <style:table-column-properties style:column-width="6.6931in" style:rel-column-width="65535*"/>
    </style:style>
    <style:style style:name="Table94.A1" style:family="table-cell">
      <style:table-cell-properties fo:padding="0.0382in" fo:border="0.5pt solid #000000"/>
    </style:style>
    <style:style style:name="Table95" style:family="table">
      <style:table-properties style:width="6.6931in" table:align="margins"/>
    </style:style>
    <style:style style:name="Table95.A" style:family="table-column">
      <style:table-column-properties style:column-width="6.6931in" style:rel-column-width="65535*"/>
    </style:style>
    <style:style style:name="Table95.A1" style:family="table-cell">
      <style:table-cell-properties fo:padding="0.0382in" fo:border="0.5pt solid #000000"/>
    </style:style>
    <style:style style:name="Table96" style:family="table">
      <style:table-properties style:width="6.6931in" table:align="margins"/>
    </style:style>
    <style:style style:name="Table96.A" style:family="table-column">
      <style:table-column-properties style:column-width="6.6931in" style:rel-column-width="65535*"/>
    </style:style>
    <style:style style:name="Table96.A1" style:family="table-cell">
      <style:table-cell-properties fo:padding="0.0382in" fo:border="0.5pt solid #000000"/>
    </style:style>
    <style:style style:name="Table97" style:family="table">
      <style:table-properties style:width="6.6931in" table:align="margins"/>
    </style:style>
    <style:style style:name="Table97.A" style:family="table-column">
      <style:table-column-properties style:column-width="6.6931in" style:rel-column-width="65535*"/>
    </style:style>
    <style:style style:name="Table97.A1" style:family="table-cell">
      <style:table-cell-properties fo:padding="0.0382in" fo:border="0.5pt solid #000000"/>
    </style:style>
    <style:style style:name="Table98" style:family="table">
      <style:table-properties style:width="6.6931in" table:align="margins"/>
    </style:style>
    <style:style style:name="Table98.A" style:family="table-column">
      <style:table-column-properties style:column-width="6.6931in" style:rel-column-width="65535*"/>
    </style:style>
    <style:style style:name="Table98.A1" style:family="table-cell">
      <style:table-cell-properties fo:padding="0.0382in" fo:border="0.5pt solid #000000"/>
    </style:style>
    <style:style style:name="Table100" style:family="table">
      <style:table-properties style:width="6.6931in" table:align="margins"/>
    </style:style>
    <style:style style:name="Table100.A" style:family="table-column">
      <style:table-column-properties style:column-width="6.6931in" style:rel-column-width="65535*"/>
    </style:style>
    <style:style style:name="Table100.A1" style:family="table-cell">
      <style:table-cell-properties fo:padding="0.0382in" fo:border="0.5pt solid #000000"/>
    </style:style>
    <style:style style:name="Table101" style:family="table">
      <style:table-properties style:width="6.6931in" table:align="margins"/>
    </style:style>
    <style:style style:name="Table101.A" style:family="table-column">
      <style:table-column-properties style:column-width="6.6931in" style:rel-column-width="65535*"/>
    </style:style>
    <style:style style:name="Table101.A1" style:family="table-cell">
      <style:table-cell-properties fo:padding="0.0382in" fo:border="0.5pt solid #000000"/>
    </style:style>
    <style:style style:name="Table102" style:family="table">
      <style:table-properties style:width="6.6931in" table:align="margins"/>
    </style:style>
    <style:style style:name="Table102.A" style:family="table-column">
      <style:table-column-properties style:column-width="6.6931in" style:rel-column-width="65535*"/>
    </style:style>
    <style:style style:name="Table102.A1" style:family="table-cell">
      <style:table-cell-properties fo:padding="0.0382in" fo:border="0.5pt solid #000000"/>
    </style:style>
    <style:style style:name="Table103" style:family="table">
      <style:table-properties style:width="6.6931in" table:align="margins"/>
    </style:style>
    <style:style style:name="Table103.A" style:family="table-column">
      <style:table-column-properties style:column-width="6.6931in" style:rel-column-width="65535*"/>
    </style:style>
    <style:style style:name="Table103.A1" style:family="table-cell">
      <style:table-cell-properties fo:padding="0.0382in" fo:border="0.5pt solid #000000"/>
    </style:style>
    <style:style style:name="Table104" style:family="table">
      <style:table-properties style:width="6.6931in" table:align="margins"/>
    </style:style>
    <style:style style:name="Table104.A" style:family="table-column">
      <style:table-column-properties style:column-width="6.6931in" style:rel-column-width="65535*"/>
    </style:style>
    <style:style style:name="Table104.A1" style:family="table-cell">
      <style:table-cell-properties fo:padding="0.0382in" fo:border="0.5pt solid #000000"/>
    </style:style>
    <style:style style:name="Table105" style:family="table">
      <style:table-properties style:width="6.6931in" table:align="margins"/>
    </style:style>
    <style:style style:name="Table105.A" style:family="table-column">
      <style:table-column-properties style:column-width="6.6931in" style:rel-column-width="65535*"/>
    </style:style>
    <style:style style:name="Table105.A1" style:family="table-cell">
      <style:table-cell-properties fo:padding="0.0382in" fo:border="0.5pt solid #000000"/>
    </style:style>
    <style:style style:name="Table106" style:family="table">
      <style:table-properties style:width="6.6931in" table:align="margins"/>
    </style:style>
    <style:style style:name="Table106.A" style:family="table-column">
      <style:table-column-properties style:column-width="6.6931in" style:rel-column-width="65535*"/>
    </style:style>
    <style:style style:name="Table106.A1" style:family="table-cell">
      <style:table-cell-properties fo:padding="0.0382in" fo:border="0.5pt solid #000000"/>
    </style:style>
    <style:style style:name="Table107" style:family="table">
      <style:table-properties style:width="6.6931in" table:align="margins"/>
    </style:style>
    <style:style style:name="Table107.A" style:family="table-column">
      <style:table-column-properties style:column-width="6.6931in" style:rel-column-width="65535*"/>
    </style:style>
    <style:style style:name="Table107.A1" style:family="table-cell">
      <style:table-cell-properties fo:padding="0.0382in" fo:border="0.5pt solid #000000"/>
    </style:style>
    <style:style style:name="Table108" style:family="table">
      <style:table-properties style:width="6.6931in" table:align="margins"/>
    </style:style>
    <style:style style:name="Table108.A" style:family="table-column">
      <style:table-column-properties style:column-width="6.6931in" style:rel-column-width="65535*"/>
    </style:style>
    <style:style style:name="Table108.A1" style:family="table-cell">
      <style:table-cell-properties fo:padding="0.0382in" fo:border="0.05pt solid #000000"/>
    </style:style>
    <style:style style:name="Table109" style:family="table">
      <style:table-properties style:width="6.6931in" table:align="margins"/>
    </style:style>
    <style:style style:name="Table109.A" style:family="table-column">
      <style:table-column-properties style:column-width="6.6931in" style:rel-column-width="65535*"/>
    </style:style>
    <style:style style:name="Table109.A1" style:family="table-cell">
      <style:table-cell-properties fo:padding="0.0382in" fo:border="0.5pt solid #000000"/>
    </style:style>
    <style:style style:name="Table110" style:family="table">
      <style:table-properties style:width="6.6979in" fo:margin-left="0.0042in" table:align="left"/>
    </style:style>
    <style:style style:name="Table110.A" style:family="table-column">
      <style:table-column-properties style:column-width="6.6979in"/>
    </style:style>
    <style:style style:name="Table110.A1" style:family="table-cell">
      <style:table-cell-properties fo:padding="0.0382in" fo:border="0.5pt solid #000000"/>
    </style:style>
    <style:style style:name="Table15" style:family="table">
      <style:table-properties style:width="6.6979in" fo:margin-left="0in" table:align="left"/>
    </style:style>
    <style:style style:name="Table15.A" style:family="table-column">
      <style:table-column-properties style:column-width="1.9271in"/>
    </style:style>
    <style:style style:name="Table15.B" style:family="table-column">
      <style:table-column-properties style:column-width="4.770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11" style:family="table">
      <style:table-properties style:width="6.6931in" table:align="margins"/>
    </style:style>
    <style:style style:name="Table111.A" style:family="table-column">
      <style:table-column-properties style:column-width="6.6931in" style:rel-column-width="65535*"/>
    </style:style>
    <style:style style:name="Table111.A1" style:family="table-cell">
      <style:table-cell-properties fo:padding="0.0382in" fo:border="0.5pt solid #000000"/>
    </style:style>
    <style:style style:name="Table112" style:family="table">
      <style:table-properties style:width="6.6931in" table:align="margins"/>
    </style:style>
    <style:style style:name="Table112.A" style:family="table-column">
      <style:table-column-properties style:column-width="6.6931in" style:rel-column-width="65535*"/>
    </style:style>
    <style:style style:name="Table112.A1" style:family="table-cell">
      <style:table-cell-properties fo:padding="0.0382in" fo:border="0.5pt solid #000000"/>
    </style:style>
    <style:style style:name="Table126" style:family="table">
      <style:table-properties style:width="6.6931in" table:align="margins"/>
    </style:style>
    <style:style style:name="Table126.A" style:family="table-column">
      <style:table-column-properties style:column-width="6.6931in" style:rel-column-width="65535*"/>
    </style:style>
    <style:style style:name="Table126.A1" style:family="table-cell">
      <style:table-cell-properties fo:padding="0.0382in" fo:border="0.5pt solid #000000"/>
    </style:style>
    <style:style style:name="Table129" style:family="table">
      <style:table-properties style:width="6.6931in" table:align="margins"/>
    </style:style>
    <style:style style:name="Table129.A" style:family="table-column">
      <style:table-column-properties style:column-width="6.6931in" style:rel-column-width="65535*"/>
    </style:style>
    <style:style style:name="Table129.A1" style:family="table-cell">
      <style:table-cell-properties fo:padding="0.0382in" fo:border="0.5pt solid #000000"/>
    </style:style>
    <style:style style:name="Table131" style:family="table">
      <style:table-properties style:width="6.6931in" table:align="margins"/>
    </style:style>
    <style:style style:name="Table131.A" style:family="table-column">
      <style:table-column-properties style:column-width="6.6931in" style:rel-column-width="65535*"/>
    </style:style>
    <style:style style:name="Table131.A1" style:family="table-cell">
      <style:table-cell-properties fo:padding="0.0382in" fo:border="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1" style:family="table-row">
      <style:table-row-properties style:min-row-height="0.5014in"/>
    </style:style>
    <style:style style:name="Table17.A1" style:family="table-cell">
      <style:table-cell-properties fo:padding="0.0382in" fo:border="0.5pt solid #000000"/>
    </style:style>
    <style:style style:name="Table73" style:family="table">
      <style:table-properties style:width="6.6931in" table:align="margins"/>
    </style:style>
    <style:style style:name="Table73.A" style:family="table-column">
      <style:table-column-properties style:column-width="6.6931in" style:rel-column-width="65535*"/>
    </style:style>
    <style:style style:name="Table73.A1" style:family="table-cell">
      <style:table-cell-properties fo:padding="0.0382in" fo:border="0.5pt solid #000000"/>
    </style:style>
    <style:style style:name="Table74" style:family="table">
      <style:table-properties style:width="6.6931in" table:align="margins"/>
    </style:style>
    <style:style style:name="Table74.A" style:family="table-column">
      <style:table-column-properties style:column-width="6.6931in" style:rel-column-width="65535*"/>
    </style:style>
    <style:style style:name="Table74.A1" style:family="table-cell">
      <style:table-cell-properties fo:padding="0.0382in" fo:border="0.5pt solid #000000"/>
    </style:style>
    <style:style style:name="Table75" style:family="table">
      <style:table-properties style:width="6.6931in" table:align="margins"/>
    </style:style>
    <style:style style:name="Table75.A" style:family="table-column">
      <style:table-column-properties style:column-width="6.6931in" style:rel-column-width="65535*"/>
    </style:style>
    <style:style style:name="Table75.A1" style:family="table-cell">
      <style:table-cell-properties fo:padding="0.0382in" fo:border="0.5pt solid #000000"/>
    </style:style>
    <style:style style:name="Table78" style:family="table">
      <style:table-properties style:width="6.6931in" table:align="margins"/>
    </style:style>
    <style:style style:name="Table78.A" style:family="table-column">
      <style:table-column-properties style:column-width="6.6931in" style:rel-column-width="65535*"/>
    </style:style>
    <style:style style:name="Table78.A1" style:family="table-cell">
      <style:table-cell-properties fo:padding="0.0382in" fo:border="0.5pt solid #000000"/>
    </style:style>
    <style:style style:name="Table79" style:family="table">
      <style:table-properties style:width="6.6931in" table:align="margins"/>
    </style:style>
    <style:style style:name="Table79.A" style:family="table-column">
      <style:table-column-properties style:column-width="6.6931in" style:rel-column-width="65535*"/>
    </style:style>
    <style:style style:name="Table79.A1" style:family="table-cell">
      <style:table-cell-properties fo:padding="0.0382in" fo:border="0.5pt solid #000000"/>
    </style:style>
    <style:style style:name="Table80" style:family="table">
      <style:table-properties style:width="6.6931in" table:align="margins"/>
    </style:style>
    <style:style style:name="Table80.A" style:family="table-column">
      <style:table-column-properties style:column-width="6.6931in" style:rel-column-width="65535*"/>
    </style:style>
    <style:style style:name="Table80.A1" style:family="table-cell">
      <style:table-cell-properties fo:padding="0.0382in" fo:border="0.5pt solid #000000"/>
    </style:style>
    <style:style style:name="Table81" style:family="table">
      <style:table-properties style:width="6.6931in" table:align="margins"/>
    </style:style>
    <style:style style:name="Table81.A" style:family="table-column">
      <style:table-column-properties style:column-width="6.6931in" style:rel-column-width="65535*"/>
    </style:style>
    <style:style style:name="Table81.A1" style:family="table-cell">
      <style:table-cell-properties fo:padding="0.0382in" fo:border="0.5pt solid #000000"/>
    </style:style>
    <style:style style:name="Table82" style:family="table">
      <style:table-properties style:width="6.6931in" table:align="margins"/>
    </style:style>
    <style:style style:name="Table82.A" style:family="table-column">
      <style:table-column-properties style:column-width="6.6931in" style:rel-column-width="65535*"/>
    </style:style>
    <style:style style:name="Table82.A1" style:family="table-cell">
      <style:table-cell-properties fo:padding="0.0382in" fo:border="0.5pt solid #000000"/>
    </style:style>
    <style:style style:name="Table83" style:family="table">
      <style:table-properties style:width="6.6931in" table:align="margins"/>
    </style:style>
    <style:style style:name="Table83.A" style:family="table-column">
      <style:table-column-properties style:column-width="6.6931in" style:rel-column-width="65535*"/>
    </style:style>
    <style:style style:name="Table83.A1" style:family="table-cell">
      <style:table-cell-properties fo:padding="0.0382in" fo:border="0.5pt solid #000000"/>
    </style:style>
    <style:style style:name="Table84" style:family="table">
      <style:table-properties style:width="6.6931in" table:align="margins"/>
    </style:style>
    <style:style style:name="Table84.A" style:family="table-column">
      <style:table-column-properties style:column-width="6.6931in" style:rel-column-width="65535*"/>
    </style:style>
    <style:style style:name="Table84.A1" style:family="table-cell">
      <style:table-cell-properties fo:padding="0.0382in" fo:border="0.5pt solid #000000"/>
    </style:style>
    <style:style style:name="Table43" style:family="table">
      <style:table-properties style:width="6.6931in" table:align="margins"/>
    </style:style>
    <style:style style:name="Table43.A" style:family="table-column">
      <style:table-column-properties style:column-width="6.6931in" style:rel-column-width="65535*"/>
    </style:style>
    <style:style style:name="Table43.A1" style:family="table-cell">
      <style:table-cell-properties fo:padding="0.0382in" fo:border="0.5pt solid #000000"/>
    </style:style>
    <style:style style:name="Table135" style:family="table">
      <style:table-properties style:width="6.6931in" table:align="margins"/>
    </style:style>
    <style:style style:name="Table135.A" style:family="table-column">
      <style:table-column-properties style:column-width="6.6931in" style:rel-column-width="65535*"/>
    </style:style>
    <style:style style:name="Table135.A1" style:family="table-cell">
      <style:table-cell-properties fo:padding="0.0382in" fo:border="0.05pt solid #000000"/>
    </style:style>
    <style:style style:name="Table136" style:family="table">
      <style:table-properties style:width="6.6931in" table:align="margins"/>
    </style:style>
    <style:style style:name="Table136.A" style:family="table-column">
      <style:table-column-properties style:column-width="6.6931in" style:rel-column-width="65535*"/>
    </style:style>
    <style:style style:name="Table136.A1" style:family="table-cell">
      <style:table-cell-properties fo:padding="0.0382in" fo:border="0.05pt solid #000000"/>
    </style:style>
    <style:style style:name="Table137" style:family="table">
      <style:table-properties style:width="6.6931in" table:align="margins"/>
    </style:style>
    <style:style style:name="Table137.A" style:family="table-column">
      <style:table-column-properties style:column-width="6.6931in" style:rel-column-width="65535*"/>
    </style:style>
    <style:style style:name="Table137.A1" style:family="table-cell">
      <style:table-cell-properties fo:padding="0.0382in" fo:border="0.05pt solid #000000"/>
    </style:style>
    <style:style style:name="Table138" style:family="table">
      <style:table-properties style:width="6.6931in" table:align="margins"/>
    </style:style>
    <style:style style:name="Table138.A" style:family="table-column">
      <style:table-column-properties style:column-width="6.6931in" style:rel-column-width="65535*"/>
    </style:style>
    <style:style style:name="Table138.A1" style:family="table-cell">
      <style:table-cell-properties fo:padding="0.0382in" fo:border="0.5pt solid #000000"/>
    </style:style>
    <style:style style:name="Table139" style:family="table">
      <style:table-properties style:width="6.6931in" table:align="margins"/>
    </style:style>
    <style:style style:name="Table139.A" style:family="table-column">
      <style:table-column-properties style:column-width="6.6931in" style:rel-column-width="65535*"/>
    </style:style>
    <style:style style:name="Table139.A1" style:family="table-cell">
      <style:table-cell-properties fo:padding="0.0382in" fo:border="0.5pt solid #000000"/>
    </style:style>
    <style:style style:name="Table140" style:family="table">
      <style:table-properties style:width="6.6931in" table:align="margins"/>
    </style:style>
    <style:style style:name="Table140.A" style:family="table-column">
      <style:table-column-properties style:column-width="6.6931in" style:rel-column-width="65535*"/>
    </style:style>
    <style:style style:name="Table140.A1" style:family="table-cell">
      <style:table-cell-properties fo:padding="0.0382in" fo:border="0.05pt solid #000000"/>
    </style:style>
    <style:style style:name="Table141" style:family="table">
      <style:table-properties style:width="6.6931in" table:align="margins"/>
    </style:style>
    <style:style style:name="Table141.A" style:family="table-column">
      <style:table-column-properties style:column-width="6.6931in" style:rel-column-width="65535*"/>
    </style:style>
    <style:style style:name="Table141.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143" style:family="table">
      <style:table-properties style:width="6.6931in" table:align="margins"/>
    </style:style>
    <style:style style:name="Table143.A" style:family="table-column">
      <style:table-column-properties style:column-width="6.6931in" style:rel-column-width="65535*"/>
    </style:style>
    <style:style style:name="Table143.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144" style:family="table">
      <style:table-properties style:width="6.6931in" table:align="margins"/>
    </style:style>
    <style:style style:name="Table144.A" style:family="table-column">
      <style:table-column-properties style:column-width="6.6931in" style:rel-column-width="65535*"/>
    </style:style>
    <style:style style:name="Table144.A1" style:family="table-cell">
      <style:table-cell-properties fo:padding="0.0382in" fo:border="0.5pt solid #000000"/>
    </style:style>
    <style:style style:name="Table146" style:family="table">
      <style:table-properties style:width="6.6931in" table:align="margins"/>
    </style:style>
    <style:style style:name="Table146.A" style:family="table-column">
      <style:table-column-properties style:column-width="6.6931in" style:rel-column-width="65535*"/>
    </style:style>
    <style:style style:name="Table146.A1" style:family="table-cell">
      <style:table-cell-properties fo:padding="0.0382in" fo:border="0.5pt solid #000000"/>
    </style:style>
    <style:style style:name="Table166" style:family="table">
      <style:table-properties style:width="6.6931in" table:align="margins"/>
    </style:style>
    <style:style style:name="Table166.A" style:family="table-column">
      <style:table-column-properties style:column-width="6.6931in" style:rel-column-width="65535*"/>
    </style:style>
    <style:style style:name="Table166.A1" style:family="table-cell">
      <style:table-cell-properties fo:padding="0.0382in" fo:border="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5pt solid #000000"/>
    </style:style>
    <style:style style:name="Table52" style:family="table">
      <style:table-properties style:width="6.6931in" table:align="margins"/>
    </style:style>
    <style:style style:name="Table52.A" style:family="table-column">
      <style:table-column-properties style:column-width="6.6931in" style:rel-column-width="65535*"/>
    </style:style>
    <style:style style:name="Table52.A1" style:family="table-cell">
      <style:table-cell-properties fo:padding="0.0382in" fo:border="0.5pt solid #000000"/>
    </style:style>
    <style:style style:name="Table53" style:family="table">
      <style:table-properties style:width="6.6931in" table:align="margins"/>
    </style:style>
    <style:style style:name="Table53.A" style:family="table-column">
      <style:table-column-properties style:column-width="6.6931in" style:rel-column-width="65535*"/>
    </style:style>
    <style:style style:name="Table53.A1" style:family="table-cell">
      <style:table-cell-properties fo:padding="0.0382in" fo:border="0.5pt solid #000000"/>
    </style:style>
    <style:style style:name="Table54" style:family="table">
      <style:table-properties style:width="6.6931in" table:align="margins"/>
    </style:style>
    <style:style style:name="Table54.A" style:family="table-column">
      <style:table-column-properties style:column-width="6.6931in" style:rel-column-width="65535*"/>
    </style:style>
    <style:style style:name="Table54.A1" style:family="table-cell">
      <style:table-cell-properties fo:padding="0.0382in" fo:border="0.5pt solid #000000"/>
    </style:style>
    <style:style style:name="Table55" style:family="table">
      <style:table-properties style:width="6.6931in" table:align="margins"/>
    </style:style>
    <style:style style:name="Table55.A" style:family="table-column">
      <style:table-column-properties style:column-width="6.6931in" style:rel-column-width="65535*"/>
    </style:style>
    <style:style style:name="Table55.A1" style:family="table-cell">
      <style:table-cell-properties fo:padding="0.0382in" fo:border="0.5pt solid #000000"/>
    </style:style>
    <style:style style:name="Table56" style:family="table">
      <style:table-properties style:width="6.6931in" table:align="margins"/>
    </style:style>
    <style:style style:name="Table56.A" style:family="table-column">
      <style:table-column-properties style:column-width="6.6931in" style:rel-column-width="65535*"/>
    </style:style>
    <style:style style:name="Table56.A1" style:family="table-cell">
      <style:table-cell-properties fo:padding="0.0382in" fo:border="0.5pt solid #000000"/>
    </style:style>
    <style:style style:name="Table57" style:family="table">
      <style:table-properties style:width="6.6931in" table:align="margins"/>
    </style:style>
    <style:style style:name="Table57.A" style:family="table-column">
      <style:table-column-properties style:column-width="6.6931in" style:rel-column-width="65535*"/>
    </style:style>
    <style:style style:name="Table57.A1" style:family="table-cell">
      <style:table-cell-properties fo:padding="0.0382in" fo:border="0.5pt solid #000000"/>
    </style:style>
    <style:style style:name="Table58" style:family="table">
      <style:table-properties style:width="6.6931in" table:align="margins"/>
    </style:style>
    <style:style style:name="Table58.A" style:family="table-column">
      <style:table-column-properties style:column-width="6.6931in" style:rel-column-width="65535*"/>
    </style:style>
    <style:style style:name="Table58.A1" style:family="table-cell">
      <style:table-cell-properties fo:padding="0.0382in" fo:border="0.5pt solid #000000"/>
    </style:style>
    <style:style style:name="Table60" style:family="table">
      <style:table-properties style:width="6.6931in" table:align="margins"/>
    </style:style>
    <style:style style:name="Table60.A" style:family="table-column">
      <style:table-column-properties style:column-width="6.6931in" style:rel-column-width="65535*"/>
    </style:style>
    <style:style style:name="Table60.A1" style:family="table-cell">
      <style:table-cell-properties fo:padding="0.0382in" fo:border="0.5pt solid #000000"/>
    </style:style>
    <style:style style:name="P1" style:family="paragraph" style:parent-style-name="Standard">
      <style:paragraph-properties fo:text-align="center" style:justify-single-word="false"/>
      <style:text-properties fo:font-size="14pt" fo:font-weight="bold" officeooo:rsid="08142063" officeooo:paragraph-rsid="06656c02"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8pt" fo:font-weight="bold" officeooo:rsid="264d65d8" officeooo:paragraph-rsid="06656c02"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6pt" fo:font-weight="bold" officeooo:rsid="381f241e" officeooo:paragraph-rsid="06656c02"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font-weight="bold" officeooo:rsid="001b29bf" officeooo:paragraph-rsid="06656c02"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4pt" fo:font-weight="bold" officeooo:rsid="001b29bf" officeooo:paragraph-rsid="06656c02"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fo:font-weight="bold" officeooo:rsid="06656c02" officeooo:paragraph-rsid="06656c02" style:font-size-asian="24pt" style:font-weight-asian="bold" style:font-size-complex="24pt" style:font-weight-complex="bold"/>
    </style:style>
    <style:style style:name="P7" style:family="paragraph" style:parent-style-name="Standard">
      <style:paragraph-properties fo:text-align="left" style:justify-single-word="false"/>
      <style:text-properties fo:font-size="14pt" fo:font-weight="bold" officeooo:rsid="08142063" officeooo:paragraph-rsid="06656c02" style:font-size-asian="14pt" style:font-weight-asian="bold" style:font-size-complex="14pt" style:font-weight-complex="bold"/>
    </style:style>
    <style:style style:name="P8" style:family="paragraph" style:parent-style-name="Standard">
      <style:paragraph-properties fo:text-align="right" style:justify-single-word="false"/>
      <style:text-properties fo:font-size="14pt" fo:font-weight="bold" officeooo:rsid="381fa95b" officeooo:paragraph-rsid="06656c0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6pt" officeooo:paragraph-rsid="06656c02" style:font-size-asian="16pt" style:font-size-complex="16pt"/>
    </style:style>
    <style:style style:name="P10" style:family="paragraph" style:parent-style-name="Standard">
      <style:paragraph-properties fo:text-align="justify" style:justify-single-word="false"/>
      <style:text-properties fo:font-size="14pt" fo:font-weight="bold" officeooo:rsid="0020e2f6" officeooo:paragraph-rsid="06656c02"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3pt" fo:font-style="italic" fo:font-weight="bold" officeooo:rsid="0020e2f6" officeooo:paragraph-rsid="06656c02" style:font-size-asian="11.3500003814697pt" style:font-style-asian="italic" style:font-weight-asian="bold" style:font-size-complex="13pt" style:font-style-complex="italic" style:font-weight-complex="bold"/>
    </style:style>
    <style:style style:name="P12" style:family="paragraph" style:parent-style-name="Standard">
      <style:paragraph-properties fo:text-align="justify" style:justify-single-word="false"/>
      <style:text-properties officeooo:paragraph-rsid="06656c02"/>
    </style:style>
    <style:style style:name="P13" style:family="paragraph" style:parent-style-name="Standard">
      <style:paragraph-properties fo:text-align="justify" style:justify-single-word="false"/>
      <style:text-properties fo:font-size="14pt" fo:font-weight="normal" officeooo:rsid="001b29bf" officeooo:paragraph-rsid="06656c02" style:font-size-asian="14pt" style:font-weight-asian="normal" style:font-size-complex="14pt" style:font-weight-complex="normal"/>
    </style:style>
    <style:style style:name="P14" style:family="paragraph" style:parent-style-name="Standard">
      <style:text-properties officeooo:paragraph-rsid="06656c02"/>
    </style:style>
    <style:style style:name="P15" style:family="paragraph" style:parent-style-name="Standard">
      <style:paragraph-properties fo:text-align="justify" style:justify-single-word="false"/>
      <style:text-properties style:font-name="Liberation Serif" fo:font-size="12pt" fo:font-weight="normal" officeooo:rsid="00225b0b" officeooo:paragraph-rsid="06656c02"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4pt" fo:font-weight="bold" officeooo:rsid="08142063" officeooo:paragraph-rsid="05684629"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28pt" fo:font-weight="bold" officeooo:rsid="003a7ac6" officeooo:paragraph-rsid="05684629" style:font-size-asian="28pt" style:font-weight-asian="bold" style:font-size-complex="28pt" style:font-weight-complex="bold"/>
    </style:style>
    <style:style style:name="P18" style:family="paragraph" style:parent-style-name="Standard">
      <style:paragraph-properties fo:text-align="center" style:justify-single-word="false"/>
      <style:text-properties fo:font-size="14pt" fo:font-weight="bold" officeooo:rsid="001b29bf" officeooo:paragraph-rsid="05684629"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26pt" fo:font-weight="bold" officeooo:rsid="001b29bf" officeooo:paragraph-rsid="05684629" style:font-size-asian="26pt" style:font-weight-asian="bold" style:font-size-complex="26pt" style:font-weight-complex="bold"/>
    </style:style>
    <style:style style:name="P20" style:family="paragraph" style:parent-style-name="Standard">
      <style:paragraph-properties fo:text-align="center" style:justify-single-word="false"/>
      <style:text-properties fo:font-size="24pt" fo:font-weight="bold" officeooo:rsid="05684629" officeooo:paragraph-rsid="05684629" style:font-size-asian="24pt" style:font-weight-asian="bold" style:font-size-complex="24pt" style:font-weight-complex="bold"/>
    </style:style>
    <style:style style:name="P21" style:family="paragraph" style:parent-style-name="Standard">
      <style:paragraph-properties fo:text-align="left" style:justify-single-word="false"/>
      <style:text-properties fo:font-size="14pt" fo:font-weight="bold" officeooo:rsid="08142063" officeooo:paragraph-rsid="04524ee8" style:font-size-asian="14pt" style:font-weight-asian="bold" style:font-size-complex="14pt" style:font-weight-complex="bold"/>
    </style:style>
    <style:style style:name="P22" style:family="paragraph" style:parent-style-name="Standard">
      <style:paragraph-properties fo:text-align="left" style:justify-single-word="false"/>
      <style:text-properties style:font-name="Liberation Serif" fo:font-size="16pt" fo:font-weight="bold" officeooo:rsid="00073d60" officeooo:paragraph-rsid="06656c02" style:font-size-asian="16pt" style:font-weight-asian="bold" style:font-size-complex="16pt" style:font-weight-complex="bold"/>
    </style:style>
    <style:style style:name="P23" style:family="paragraph" style:parent-style-name="Standard">
      <style:paragraph-properties fo:text-align="left" style:justify-single-word="false"/>
      <style:text-properties style:font-name="Liberation Serif" fo:font-size="12pt" fo:font-weight="bold" officeooo:rsid="00225b0b" officeooo:paragraph-rsid="06656c02"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font-style="normal" fo:font-weight="normal" officeooo:rsid="06424484" officeooo:paragraph-rsid="06656c0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weight="normal" officeooo:rsid="0614557e" officeooo:paragraph-rsid="06656c0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bold" officeooo:rsid="00073d60" officeooo:paragraph-rsid="06656c02"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3pt" fo:font-weight="bold" officeooo:rsid="0614557e" officeooo:paragraph-rsid="06656c02" style:font-size-asian="13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normal" officeooo:rsid="0614557e" officeooo:paragraph-rsid="06656c02" style:font-size-asian="13pt" style:font-weight-asian="normal" style:font-size-complex="13pt" style:font-weight-complex="normal"/>
    </style:style>
    <style:style style:name="P29" style:family="paragraph" style:parent-style-name="Horizontal_20_Line">
      <style:text-properties officeooo:paragraph-rsid="06656c02"/>
    </style:style>
    <style:style style:name="P30" style:family="paragraph" style:parent-style-name="Standard">
      <style:paragraph-properties fo:margin-left="0in" fo:margin-right="0in" style:line-height-at-least="0.198in" fo:text-indent="0in" style:auto-text-indent="false"/>
      <style:text-properties officeooo:paragraph-rsid="06656c02"/>
    </style:style>
    <style:style style:name="P31" style:family="paragraph" style:parent-style-name="Standard">
      <style:paragraph-properties style:line-height-at-least="0.198in"/>
      <style:text-properties style:font-name="Courier" fo:font-size="11pt" officeooo:paragraph-rsid="06656c02" style:font-size-asian="11pt" style:font-size-complex="11pt"/>
    </style:style>
    <style:style style:name="P32" style:family="paragraph" style:parent-style-name="Horizontal_20_Line">
      <style:text-properties style:font-name="Courier" fo:font-size="11pt" officeooo:paragraph-rsid="06656c02" style:font-size-asian="11pt" style:font-size-complex="11pt"/>
    </style:style>
    <style:style style:name="P33" style:family="paragraph" style:parent-style-name="Standard">
      <style:paragraph-properties fo:text-align="center" style:justify-single-word="false"/>
      <style:text-properties fo:font-size="12pt" fo:font-weight="bold" officeooo:rsid="0021001b" officeooo:paragraph-rsid="06656c02"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Liberation Serif" fo:font-size="12pt" fo:font-style="normal" style:text-underline-style="none" fo:font-weight="bold" officeooo:rsid="00073d60" officeooo:paragraph-rsid="06656c02"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iberation Serif" fo:font-size="12pt" fo:font-style="normal" style:text-underline-style="none" fo:font-weight="normal" officeooo:rsid="0614557e" officeooo:paragraph-rsid="06656c02" style:font-size-asian="12pt" style:font-style-asian="normal" style:font-weight-asian="normal" style:font-size-complex="12pt" style:font-style-complex="normal" style:font-weight-complex="normal"/>
    </style:style>
    <style:style style:name="P36" style:family="paragraph" style:parent-style-name="Footnote">
      <style:text-properties officeooo:paragraph-rsid="009f34b3"/>
    </style:style>
    <style:style style:name="P37" style:family="paragraph" style:parent-style-name="Standard">
      <style:paragraph-properties fo:text-align="justify" style:justify-single-word="false"/>
      <style:text-properties fo:font-size="13pt" fo:font-weight="normal" officeooo:rsid="00245f7f" officeooo:paragraph-rsid="06656c02"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000000" loext:opacity="100%" style:font-name="Courier" fo:font-size="11pt" fo:font-weight="normal" officeooo:paragraph-rsid="06656c02" fo:background-color="#ffffff" style:font-size-asian="11pt" style:font-size-complex="11pt"/>
    </style:style>
    <style:style style:name="P3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6656c02" fo:background-color="#ffffff" style:font-size-asian="11pt" style:font-size-complex="11pt"/>
    </style:style>
    <style:style style:name="P40" style:family="paragraph" style:parent-style-name="Table_20_Contents">
      <style:paragraph-properties fo:text-align="justify" style:justify-single-word="false"/>
      <style:text-properties style:font-name="Courier" fo:font-size="11pt" officeooo:paragraph-rsid="06656c02" style:font-size-asian="11pt" style:font-size-complex="11pt"/>
    </style:style>
    <style:style style:name="P41" style:family="paragraph" style:parent-style-name="Table_20_Contents">
      <style:paragraph-properties fo:text-align="right" style:justify-single-word="false"/>
      <style:text-properties style:font-name="Courier" fo:font-size="11pt" fo:font-style="italic" officeooo:rsid="06aaaa04" officeooo:paragraph-rsid="06656c02" style:font-size-asian="11pt" style:font-style-asian="italic" style:font-size-complex="11pt" style:font-style-complex="italic"/>
    </style:style>
    <style:style style:name="P42" style:family="paragraph" style:parent-style-name="Standard">
      <style:paragraph-properties fo:text-align="justify" style:justify-single-word="false"/>
      <style:text-properties fo:font-size="14pt" fo:font-weight="bold" officeooo:rsid="0024c6a2" officeooo:paragraph-rsid="06656c02"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2pt" fo:font-weight="normal" officeooo:rsid="03bf5286" officeooo:paragraph-rsid="06656c02" style:font-size-asian="12pt" style:font-weight-asian="normal" style:font-size-complex="12pt" style:font-weight-complex="normal"/>
    </style:style>
    <style:style style:name="P44" style:family="paragraph" style:parent-style-name="Table_20_Contents">
      <style:paragraph-properties fo:text-align="justify" style:justify-single-word="false"/>
      <style:text-properties fo:font-size="12pt" officeooo:rsid="03bf5286" officeooo:paragraph-rsid="06656c02" style:font-size-asian="12pt" style:font-size-complex="12pt"/>
    </style:style>
    <style:style style:name="P45" style:family="paragraph" style:parent-style-name="Standard">
      <style:paragraph-properties fo:text-align="center" style:justify-single-word="false"/>
      <style:text-properties fo:font-size="12pt" fo:font-weight="normal" officeooo:rsid="03bf5286" officeooo:paragraph-rsid="06656c02"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12pt" fo:font-weight="bold" officeooo:rsid="0024c6a2" officeooo:paragraph-rsid="06656c02"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normal" officeooo:rsid="06127a9f" officeooo:paragraph-rsid="06656c02"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style="normal" fo:font-weight="bold" officeooo:rsid="00073d60" officeooo:paragraph-rsid="06656c02" style:font-size-asian="10.5pt" style:font-style-asian="normal" style:font-weight-asian="bold" style:font-size-complex="12pt" style:font-style-complex="normal" style:font-weight-complex="bold"/>
    </style:style>
    <style:style style:name="P49" style:family="paragraph" style:parent-style-name="Standard">
      <style:paragraph-properties fo:text-align="left" style:justify-single-word="false"/>
      <style:text-properties fo:font-size="12pt" fo:font-style="normal" fo:font-weight="normal" officeooo:rsid="063ced5f" officeooo:paragraph-rsid="06656c0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left" style:justify-single-word="false"/>
      <style:text-properties officeooo:paragraph-rsid="06656c02"/>
    </style:style>
    <style:style style:name="P51" style:family="paragraph" style:parent-style-name="Standard">
      <style:paragraph-properties fo:margin-left="0in" fo:margin-right="0in" style:line-height-at-least="0.198in" fo:text-indent="0in" style:auto-text-indent="false"/>
      <style:text-properties fo:font-size="11pt" officeooo:paragraph-rsid="06656c02" style:font-size-asian="11pt" style:font-size-complex="11pt"/>
    </style:style>
    <style:style style:name="P52" style:family="paragraph" style:parent-style-name="Standard">
      <style:paragraph-properties fo:text-align="center" style:justify-single-word="false"/>
      <style:text-properties fo:font-size="14pt" fo:font-weight="bold" officeooo:rsid="001b29bf" officeooo:paragraph-rsid="04524ee8" style:font-size-asian="14pt" style:font-weight-asian="bold" style:font-size-complex="14pt" style:font-weight-complex="bold"/>
    </style:style>
    <style:style style:name="P53" style:family="paragraph" style:parent-style-name="Standard">
      <style:paragraph-properties fo:text-align="center" style:justify-single-word="false"/>
      <style:text-properties fo:font-size="18pt" fo:font-weight="bold" officeooo:rsid="0459d7a3" officeooo:paragraph-rsid="04524ee8" style:font-size-asian="18pt" style:font-weight-asian="bold" style:font-size-complex="18pt" style:font-weight-complex="bold"/>
    </style:style>
    <style:style style:name="P54" style:family="paragraph" style:parent-style-name="Standard">
      <style:paragraph-properties fo:text-align="center" style:justify-single-word="false"/>
      <style:text-properties fo:font-size="18pt" fo:font-weight="bold" officeooo:rsid="054700eb" officeooo:paragraph-rsid="054700eb" style:font-size-asian="18pt" style:font-weight-asian="bold" style:font-size-complex="18pt" style:font-weight-complex="bold"/>
    </style:style>
    <style:style style:name="P55" style:family="paragraph" style:parent-style-name="Standard">
      <style:paragraph-properties fo:text-align="left" style:justify-single-word="false"/>
      <style:text-properties fo:font-size="14pt" fo:font-weight="normal" officeooo:rsid="0069734c" officeooo:paragraph-rsid="04524ee8"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font-size="13pt" fo:font-weight="normal" officeooo:rsid="0024c6a2" officeooo:paragraph-rsid="04524ee8" style:font-size-asian="13pt" style:font-weight-asian="normal" style:font-size-complex="13pt" style:font-weight-complex="normal"/>
    </style:style>
    <style:style style:name="P57" style:family="paragraph" style:parent-style-name="Standard">
      <style:paragraph-properties fo:text-align="justify" style:justify-single-word="false"/>
      <style:text-properties fo:font-size="13pt" fo:font-weight="normal" officeooo:rsid="041ca23c" officeooo:paragraph-rsid="04524ee8" style:font-size-asian="13pt" style:font-weight-asian="normal" style:font-size-complex="13pt" style:font-weight-complex="normal"/>
    </style:style>
    <style:style style:name="P58" style:family="paragraph" style:parent-style-name="Standard">
      <style:paragraph-properties fo:text-align="justify" style:justify-single-word="false"/>
      <style:text-properties fo:font-size="13pt" fo:font-weight="normal" officeooo:rsid="0459d7a3" officeooo:paragraph-rsid="04524ee8" style:font-size-asian="13pt" style:font-weight-asian="normal" style:font-size-complex="13pt" style:font-weight-complex="normal"/>
    </style:style>
    <style:style style:name="P59" style:family="paragraph" style:parent-style-name="Standard">
      <style:paragraph-properties fo:text-align="justify" style:justify-single-word="false"/>
      <style:text-properties officeooo:paragraph-rsid="04524ee8"/>
    </style:style>
    <style:style style:name="P60" style:family="paragraph" style:parent-style-name="Standard">
      <style:paragraph-properties fo:text-align="justify" style:justify-single-word="false"/>
      <style:text-properties fo:font-size="13pt" fo:font-weight="normal" officeooo:rsid="041ca23c" officeooo:paragraph-rsid="06614372"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size="13pt" fo:font-weight="normal" officeooo:rsid="027fd63e" officeooo:paragraph-rsid="06614372" style:font-size-asian="13pt" style:font-weight-asian="normal" style:font-size-complex="13pt" style:font-weight-complex="normal"/>
    </style:style>
    <style:style style:name="P62" style:family="paragraph" style:parent-style-name="Standard">
      <style:paragraph-properties fo:text-align="justify" style:justify-single-word="false"/>
      <style:text-properties fo:font-size="13pt" fo:font-weight="normal" officeooo:rsid="022f6448" officeooo:paragraph-rsid="04524ee8" style:font-size-asian="13pt" style:font-weight-asian="normal" style:font-size-complex="13pt" style:font-weight-complex="normal"/>
    </style:style>
    <style:style style:name="P63" style:family="paragraph" style:parent-style-name="Standard">
      <style:paragraph-properties fo:text-align="justify" style:justify-single-word="false"/>
      <style:text-properties fo:font-size="13pt" fo:font-weight="normal" officeooo:rsid="0028f9b0" officeooo:paragraph-rsid="04524ee8"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weight="normal" officeooo:rsid="066cfbbe" officeooo:paragraph-rsid="0459d7a3"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font-size="13pt" fo:font-weight="normal" officeooo:rsid="023abbef" officeooo:paragraph-rsid="04524ee8" style:font-size-asian="13pt" style:font-weight-asian="normal" style:font-size-complex="13pt" style:font-weight-complex="normal"/>
    </style:style>
    <style:style style:name="P66" style:family="paragraph" style:parent-style-name="Standard">
      <style:paragraph-properties fo:text-align="justify" style:justify-single-word="false"/>
      <style:text-properties officeooo:paragraph-rsid="05c7c60d"/>
    </style:style>
    <style:style style:name="P67" style:family="paragraph" style:parent-style-name="Standard">
      <style:paragraph-properties fo:text-align="justify" style:justify-single-word="false"/>
      <style:text-properties fo:font-size="13pt" fo:font-weight="normal" officeooo:rsid="002b451b" officeooo:paragraph-rsid="04524ee8"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font-size="13pt" fo:font-weight="normal" officeooo:rsid="07abb34e" officeooo:paragraph-rsid="04524ee8"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officeooo:paragraph-rsid="0459d7a3"/>
    </style:style>
    <style:style style:name="P70" style:family="paragraph" style:parent-style-name="Standard">
      <style:paragraph-properties fo:text-align="justify" style:justify-single-word="false"/>
      <style:text-properties fo:font-size="13pt" fo:font-weight="normal" officeooo:rsid="05d29cca" officeooo:paragraph-rsid="0459d7a3" style:font-size-asian="13pt" style:font-weight-asian="normal" style:font-size-complex="13pt" style:font-weight-complex="normal"/>
    </style:style>
    <style:style style:name="P71" style:family="paragraph" style:parent-style-name="Standard">
      <style:paragraph-properties fo:text-align="justify" style:justify-single-word="false"/>
      <style:text-properties fo:font-size="13pt" fo:font-weight="normal" officeooo:rsid="06656c02" officeooo:paragraph-rsid="06656c02" style:font-size-asian="13pt" style:font-weight-asian="normal" style:font-size-complex="13pt" style:font-weight-complex="normal"/>
    </style:style>
    <style:style style:name="P72" style:family="paragraph" style:parent-style-name="Standard">
      <style:paragraph-properties fo:text-align="justify" style:justify-single-word="false"/>
      <style:text-properties fo:font-size="20pt" fo:font-weight="normal" officeooo:rsid="001e00ed" officeooo:paragraph-rsid="04524ee8" style:font-size-asian="20pt" style:font-weight-asian="normal" style:font-size-complex="20pt" style:font-weight-complex="normal"/>
    </style:style>
    <style:style style:name="P73" style:family="paragraph" style:parent-style-name="Standard">
      <style:paragraph-properties fo:text-align="center" style:justify-single-word="false"/>
      <style:text-properties fo:font-size="20pt" fo:font-weight="bold" officeooo:rsid="001e00ed" officeooo:paragraph-rsid="001e271c" style:font-size-asian="20pt" style:font-weight-asian="bold" style:font-size-complex="20pt" style:font-weight-complex="bold"/>
    </style:style>
    <style:style style:name="P74" style:family="paragraph" style:parent-style-name="Standard">
      <style:paragraph-properties fo:text-align="center" style:justify-single-word="false"/>
      <style:text-properties officeooo:paragraph-rsid="001e271c"/>
    </style:style>
    <style:style style:name="P75" style:family="paragraph" style:parent-style-name="Standard">
      <style:paragraph-properties fo:text-align="justify" style:justify-single-word="false"/>
      <style:text-properties fo:font-size="12pt" fo:font-weight="bold" officeooo:rsid="0024c6a2" officeooo:paragraph-rsid="001e271c" style:font-size-asian="12pt" style:font-weight-asian="bold" style:font-size-complex="12pt" style:font-weight-complex="bold"/>
    </style:style>
    <style:style style:name="P76" style:family="paragraph" style:parent-style-name="Standard">
      <style:paragraph-properties fo:text-align="justify" style:justify-single-word="false"/>
      <style:text-properties officeooo:paragraph-rsid="01cb9972"/>
    </style:style>
    <style:style style:name="P77" style:family="paragraph" style:parent-style-name="Footnote">
      <style:text-properties officeooo:rsid="01d39965" officeooo:paragraph-rsid="0644e637"/>
    </style:style>
    <style:style style:name="P78" style:family="paragraph" style:parent-style-name="Standard">
      <style:paragraph-properties fo:text-align="justify" style:justify-single-word="false"/>
      <style:text-properties fo:font-size="12pt" fo:font-weight="normal" officeooo:rsid="00262852" officeooo:paragraph-rsid="001e271c"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3pt" fo:font-weight="normal" officeooo:rsid="00262852" officeooo:paragraph-rsid="001e271c" style:font-size-asian="13pt" style:font-weight-asian="normal" style:font-size-complex="13pt" style:font-weight-complex="normal"/>
    </style:style>
    <style:style style:name="P80" style:family="paragraph" style:parent-style-name="Standard">
      <style:paragraph-properties fo:text-align="justify" style:justify-single-word="false"/>
      <style:text-properties fo:color="#808080" loext:opacity="100%" fo:font-size="13pt" fo:font-weight="normal" officeooo:rsid="00262852" officeooo:paragraph-rsid="001e271c" style:font-size-asian="13pt" style:font-weight-asian="normal" style:font-size-complex="13pt" style:font-weight-complex="normal"/>
    </style:style>
    <style:style style:name="P81" style:family="paragraph" style:parent-style-name="Standard">
      <style:paragraph-properties fo:text-align="justify" style:justify-single-word="false"/>
      <style:text-properties fo:font-size="12pt" fo:font-weight="normal" officeooo:rsid="00262852" officeooo:paragraph-rsid="01cb9972"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27fc66" officeooo:paragraph-rsid="001e271c"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3pt" fo:font-weight="normal" officeooo:rsid="0027fc66" officeooo:paragraph-rsid="01cfa5a3" style:font-size-asian="13pt" style:font-weight-asian="normal" style:font-size-complex="13pt" style:font-weight-complex="normal"/>
    </style:style>
    <style:style style:name="P84" style:family="paragraph" style:parent-style-name="Standard">
      <style:paragraph-properties fo:text-align="justify" style:justify-single-word="false"/>
      <style:text-properties fo:font-size="13pt" fo:font-weight="normal" officeooo:rsid="01cfa5a3" officeooo:paragraph-rsid="01cfa5a3" style:font-size-asian="13pt" style:font-weight-asian="normal" style:font-size-complex="13pt" style:font-weight-complex="normal"/>
    </style:style>
    <style:style style:name="P85" style:family="paragraph" style:parent-style-name="Standard">
      <style:paragraph-properties fo:text-align="justify" style:justify-single-word="false"/>
      <style:text-properties officeooo:paragraph-rsid="01cfa5a3"/>
    </style:style>
    <style:style style:name="P86" style:family="paragraph" style:parent-style-name="Standard">
      <style:paragraph-properties fo:text-align="justify" style:justify-single-word="false"/>
      <style:text-properties fo:font-size="13pt" fo:font-weight="normal" officeooo:rsid="0027fc66" officeooo:paragraph-rsid="001e271c" style:font-size-asian="13pt" style:font-weight-asian="normal" style:font-size-complex="13pt" style:font-weight-complex="normal"/>
    </style:style>
    <style:style style:name="P87" style:family="paragraph" style:parent-style-name="Standard">
      <style:paragraph-properties fo:text-align="justify" style:justify-single-word="false"/>
      <style:text-properties officeooo:paragraph-rsid="0644e637"/>
    </style:style>
    <style:style style:name="P88" style:family="paragraph" style:parent-style-name="Standard">
      <style:paragraph-properties fo:text-align="justify" style:justify-single-word="false"/>
      <style:text-properties fo:font-size="12pt" fo:font-weight="normal" officeooo:rsid="01d178c6" officeooo:paragraph-rsid="01cfa5a3"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3pt" fo:font-weight="normal" officeooo:rsid="0028f9b0" officeooo:paragraph-rsid="001e271c" style:font-size-asian="13pt" style:font-weight-asian="normal" style:font-size-complex="13pt" style:font-weight-complex="normal"/>
    </style:style>
    <style:style style:name="P90" style:family="paragraph" style:parent-style-name="Standard">
      <style:paragraph-properties fo:text-align="justify" style:justify-single-word="false"/>
      <style:text-properties fo:font-size="12pt" fo:font-weight="normal" officeooo:rsid="0028f9b0" officeooo:paragraph-rsid="001e271c"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28f9b0" officeooo:paragraph-rsid="01d431cf"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bold" officeooo:rsid="002b79c2" officeooo:paragraph-rsid="001e271c" style:font-size-asian="12pt" style:font-weight-asian="bold" style:font-size-complex="12pt" style:font-weight-complex="bold"/>
    </style:style>
    <style:style style:name="P93" style:family="paragraph" style:parent-style-name="Table_20_Contents">
      <style:paragraph-properties fo:text-align="justify" style:justify-single-word="false"/>
      <style:text-properties fo:font-size="14pt" officeooo:rsid="009671fe" officeooo:paragraph-rsid="009671fe" style:font-size-asian="14pt" style:font-size-complex="14pt"/>
    </style:style>
    <style:style style:name="P94" style:family="paragraph" style:parent-style-name="Table_20_Contents">
      <style:paragraph-properties fo:text-align="justify" style:justify-single-word="false"/>
      <style:text-properties fo:font-size="12pt" officeooo:rsid="009671fe" officeooo:paragraph-rsid="009671fe" style:font-size-asian="12pt" style:font-size-complex="12pt"/>
    </style:style>
    <style:style style:name="P95" style:family="paragraph" style:parent-style-name="Table_20_Contents">
      <style:paragraph-properties fo:text-align="justify" style:justify-single-word="false"/>
      <style:text-properties fo:font-size="14pt" officeooo:rsid="0097f13d" officeooo:paragraph-rsid="0097f13d" style:font-size-asian="14pt" style:font-size-complex="14pt"/>
    </style:style>
    <style:style style:name="P96" style:family="paragraph" style:parent-style-name="Table_20_Contents">
      <style:paragraph-properties fo:text-align="justify" style:justify-single-word="false"/>
      <style:text-properties fo:font-size="12pt" officeooo:rsid="0097f13d" officeooo:paragraph-rsid="0097f13d" style:font-size-asian="12pt" style:font-size-complex="12pt"/>
    </style:style>
    <style:style style:name="P97" style:family="paragraph" style:parent-style-name="Standard">
      <style:paragraph-properties fo:text-align="justify" style:justify-single-word="false"/>
      <style:text-properties fo:font-size="12pt" fo:font-weight="normal" officeooo:rsid="01e146bd" officeooo:paragraph-rsid="01e09e7b"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style="italic" fo:font-weight="normal" officeooo:rsid="01e146bd" officeooo:paragraph-rsid="06464cc8"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font-size="12pt" fo:font-weight="normal" officeooo:rsid="01e146bd" officeooo:paragraph-rsid="06464cc8" style:font-size-asian="12pt" style:font-weight-asian="normal" style:font-size-complex="12pt" style:font-weight-complex="normal"/>
    </style:style>
    <style:style style:name="P100" style:family="paragraph" style:parent-style-name="Standard">
      <style:paragraph-properties fo:text-align="left" style:justify-single-word="false"/>
      <style:text-properties fo:font-size="12pt" fo:font-weight="normal" officeooo:rsid="002b79c2" officeooo:paragraph-rsid="001e271c"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02b79c2" officeooo:paragraph-rsid="001e271c" style:font-size-asian="12pt" style:font-weight-asian="normal" style:font-size-complex="12pt" style:font-weight-complex="normal"/>
    </style:style>
    <style:style style:name="P102" style:family="paragraph" style:parent-style-name="Standard">
      <style:paragraph-properties fo:text-align="left" style:justify-single-word="false"/>
      <style:text-properties officeooo:paragraph-rsid="01617bec"/>
    </style:style>
    <style:style style:name="P103" style:family="paragraph" style:parent-style-name="Standard">
      <style:paragraph-properties fo:text-align="justify" style:justify-single-word="false"/>
    </style:style>
    <style:style style:name="P104" style:family="paragraph" style:parent-style-name="Standard">
      <style:paragraph-properties fo:text-align="justify" style:justify-single-word="false"/>
      <style:text-properties officeooo:paragraph-rsid="01617bec"/>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fo:font-weight="normal" officeooo:rsid="017a331a" officeooo:paragraph-rsid="017a331a"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fo:font-size="12pt" fo:font-weight="bold" officeooo:rsid="015da7fd" officeooo:paragraph-rsid="015da7fd" style:font-size-asian="12pt" style:font-weight-asian="bold" style:font-size-complex="12pt" style:font-weight-complex="bold"/>
    </style:style>
    <style:style style:name="P107" style:family="paragraph" style:parent-style-name="Standard">
      <style:paragraph-properties fo:text-align="center" style:justify-single-word="false"/>
      <style:text-properties fo:font-size="12pt" fo:font-weight="normal" officeooo:rsid="015da7fd" officeooo:paragraph-rsid="015da7fd"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officeooo:paragraph-rsid="016338bb"/>
    </style:style>
    <style:style style:name="P109" style:family="paragraph" style:parent-style-name="Standard">
      <style:paragraph-properties fo:text-align="justify" style:justify-single-word="false"/>
      <style:text-properties fo:font-size="12pt" fo:font-weight="normal" officeooo:rsid="01ec8907" officeooo:paragraph-rsid="016338bb"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font-size="12pt" fo:font-weight="bold" officeooo:rsid="022f6448" officeooo:paragraph-rsid="001e271c" style:font-size-asian="12pt" style:font-weight-asian="bold" style:font-size-complex="12pt" style:font-weight-complex="bold"/>
    </style:style>
    <style:style style:name="P111" style:family="paragraph" style:parent-style-name="Standard">
      <style:paragraph-properties fo:text-align="center" style:justify-single-word="false"/>
      <style:text-properties fo:font-size="18pt" fo:font-weight="bold" officeooo:rsid="041ca23c" officeooo:paragraph-rsid="01f160ea" style:font-size-asian="18pt" style:font-weight-asian="bold" style:font-size-complex="18pt" style:font-weight-complex="bold"/>
    </style:style>
    <style:style style:name="P112" style:family="paragraph" style:parent-style-name="Standard">
      <style:paragraph-properties fo:text-align="justify" style:justify-single-word="false"/>
      <style:text-properties fo:font-size="12pt" fo:font-weight="bold" officeooo:rsid="041ca23c" officeooo:paragraph-rsid="01f160ea" style:font-size-asian="12pt" style:font-weight-asian="bold" style:font-size-complex="12pt" style:font-weight-complex="bold"/>
    </style:style>
    <style:style style:name="P113" style:family="paragraph" style:parent-style-name="Standard">
      <style:paragraph-properties fo:text-align="justify" style:justify-single-word="false"/>
      <style:text-properties officeooo:paragraph-rsid="06609515"/>
    </style:style>
    <style:style style:name="P114" style:family="paragraph" style:parent-style-name="Footnote">
      <style:text-properties officeooo:rsid="026aee91" officeooo:paragraph-rsid="06392919"/>
    </style:style>
    <style:style style:name="P115" style:family="paragraph" style:parent-style-name="Standard">
      <style:paragraph-properties fo:text-align="justify" style:justify-single-word="false"/>
      <style:text-properties fo:font-size="12pt" fo:font-weight="normal" officeooo:rsid="026aee91" officeooo:paragraph-rsid="06609515" style:font-size-asian="12pt" style:font-weight-asian="normal" style:font-size-complex="12pt" style:font-weight-complex="normal"/>
    </style:style>
    <style:style style:name="P116" style:family="paragraph" style:parent-style-name="Standard">
      <style:paragraph-properties fo:text-align="center" style:justify-single-word="false"/>
      <style:text-properties fo:font-size="13pt" fo:font-weight="bold" officeooo:rsid="06609515" officeooo:paragraph-rsid="06609515" style:font-size-asian="13pt" style:font-weight-asian="bold" style:font-size-complex="13pt" style:font-weight-complex="bold"/>
    </style:style>
    <style:style style:name="P117" style:family="paragraph" style:parent-style-name="Standard">
      <style:paragraph-properties fo:text-align="justify" style:justify-single-word="false"/>
      <style:text-properties fo:font-size="12pt" fo:font-weight="normal" officeooo:rsid="024611b0" officeooo:paragraph-rsid="01f160ea"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font-size="13pt" fo:font-weight="normal" officeooo:rsid="0027fc66" officeooo:paragraph-rsid="02480863" style:font-size-asian="13pt" style:font-weight-asian="normal" style:font-size-complex="13pt" style:font-weight-complex="normal"/>
    </style:style>
    <style:style style:name="P119" style:family="paragraph" style:parent-style-name="Standard">
      <style:paragraph-properties fo:text-align="justify" style:justify-single-word="false"/>
      <style:text-properties fo:font-size="12pt" fo:font-weight="normal" officeooo:rsid="042fea63" officeooo:paragraph-rsid="02480863"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font-size="13pt" fo:font-weight="normal" officeooo:rsid="0251c389" officeooo:paragraph-rsid="0251c389" style:font-size-asian="13pt" style:font-weight-asian="normal" style:font-size-complex="13pt" style:font-weight-complex="normal"/>
    </style:style>
    <style:style style:name="P121" style:family="paragraph" style:parent-style-name="Standard">
      <style:paragraph-properties fo:text-align="justify" style:justify-single-word="false"/>
      <style:text-properties fo:font-size="12pt" fo:font-weight="normal" officeooo:rsid="0251c389" officeooo:paragraph-rsid="0251c389" style:font-size-asian="12pt" style:font-weight-asian="normal" style:font-size-complex="12pt" style:font-weight-complex="normal"/>
    </style:style>
    <style:style style:name="P122" style:family="paragraph" style:parent-style-name="Preformatted_20_Text">
      <style:text-properties fo:color="#00a933" loext:opacity="100%" fo:font-size="12pt" fo:font-weight="bold" fo:background-color="#ffffff" style:font-size-asian="12pt" style:font-size-complex="12pt"/>
    </style:style>
    <style:style style:name="P123" style:family="paragraph" style:parent-style-name="Standard">
      <style:paragraph-properties fo:text-align="justify" style:justify-single-word="false"/>
      <style:text-properties fo:font-size="12pt" fo:font-weight="normal" officeooo:rsid="042b18dc" officeooo:paragraph-rsid="02480863"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officeooo:paragraph-rsid="024872c9"/>
    </style:style>
    <style:style style:name="P125" style:family="paragraph" style:parent-style-name="Standard">
      <style:paragraph-properties fo:text-align="justify" style:justify-single-word="false"/>
      <style:text-properties fo:font-size="12pt" fo:font-weight="normal" officeooo:rsid="024872c9" officeooo:paragraph-rsid="024872c9"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fo:font-size="13pt" fo:font-weight="normal" officeooo:rsid="0027fc66" officeooo:paragraph-rsid="024f8da2" style:font-size-asian="13pt" style:font-weight-asian="normal" style:font-size-complex="13pt" style:font-weight-complex="normal"/>
    </style:style>
    <style:style style:name="P127" style:family="paragraph" style:parent-style-name="Standard">
      <style:paragraph-properties fo:text-align="justify" style:justify-single-word="false"/>
      <style:text-properties fo:font-size="12pt" fo:font-weight="normal" officeooo:rsid="0427f7bd" officeooo:paragraph-rsid="024f8da2"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font-size="13pt" fo:font-weight="normal" officeooo:rsid="024f8da2" officeooo:paragraph-rsid="024f8da2" style:font-size-asian="13pt" style:font-weight-asian="normal" style:font-size-complex="13pt" style:font-weight-complex="normal"/>
    </style:style>
    <style:style style:name="P129" style:family="paragraph" style:parent-style-name="Standard">
      <style:paragraph-properties fo:text-align="justify" style:justify-single-word="false"/>
      <style:text-properties fo:font-size="12pt" fo:font-weight="normal" officeooo:rsid="0d0f4908" officeooo:paragraph-rsid="024f8da2"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fo:font-size="12pt" fo:font-weight="normal" officeooo:rsid="042b18dc" officeooo:paragraph-rsid="04676e64"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fo:font-size="12pt" fo:font-weight="normal" officeooo:rsid="042b18dc" officeooo:paragraph-rsid="01f160ea"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fo:font-size="13pt" fo:font-weight="normal" officeooo:rsid="0027fc66" officeooo:paragraph-rsid="01f160ea" style:font-size-asian="13pt" style:font-weight-asian="normal" style:font-size-complex="13pt" style:font-weight-complex="normal"/>
    </style:style>
    <style:style style:name="P133" style:family="paragraph" style:parent-style-name="Standard">
      <style:paragraph-properties fo:text-align="justify" style:justify-single-word="false"/>
      <style:text-properties officeooo:paragraph-rsid="01f160ea"/>
    </style:style>
    <style:style style:name="P134" style:family="paragraph" style:parent-style-name="Standard">
      <style:paragraph-properties fo:text-align="justify" style:justify-single-word="false"/>
      <style:text-properties fo:font-size="12pt" fo:font-weight="normal" officeooo:rsid="0468850b" officeooo:paragraph-rsid="01f160ea"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officeooo:paragraph-rsid="01fe0ad9"/>
    </style:style>
    <style:style style:name="P136" style:family="paragraph" style:parent-style-name="Standard">
      <style:paragraph-properties fo:text-align="justify" style:justify-single-word="false"/>
      <style:text-properties officeooo:paragraph-rsid="02269d95"/>
    </style:style>
    <style:style style:name="P137" style:family="paragraph" style:parent-style-name="Standard">
      <style:paragraph-properties fo:text-align="justify" style:justify-single-word="false"/>
      <style:text-properties fo:font-size="12pt" fo:font-weight="normal" officeooo:rsid="0d0f4908" officeooo:paragraph-rsid="01f160ea"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fo:font-size="12pt" fo:font-weight="normal" officeooo:rsid="022eb614" officeooo:paragraph-rsid="0468850b"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fo:font-size="12pt" fo:font-weight="normal" officeooo:rsid="022eb614" officeooo:paragraph-rsid="022eb614" style:font-size-asian="12pt" style:font-weight-asian="normal" style:font-size-complex="12pt" style:font-weight-complex="normal"/>
    </style:style>
    <style:style style:name="P140" style:family="paragraph" style:parent-style-name="Table_20_Contents">
      <style:paragraph-properties fo:text-align="justify" style:justify-single-word="false"/>
      <style:text-properties fo:font-size="12pt" officeooo:rsid="022ef13b" officeooo:paragraph-rsid="022ef13b" style:font-size-asian="12pt" style:font-size-complex="12pt"/>
    </style:style>
    <style:style style:name="P141" style:family="paragraph" style:parent-style-name="Table_20_Contents">
      <style:paragraph-properties fo:text-align="justify" style:justify-single-word="false"/>
      <style:text-properties fo:font-size="12pt" officeooo:rsid="022f80d2" officeooo:paragraph-rsid="022f80d2" style:font-size-asian="12pt" style:font-size-complex="12pt"/>
    </style:style>
    <style:style style:name="P142" style:family="paragraph" style:parent-style-name="Table_20_Contents">
      <style:text-properties officeooo:paragraph-rsid="0611f0d5"/>
    </style:style>
    <style:style style:name="P143" style:family="paragraph" style:parent-style-name="Standard">
      <style:paragraph-properties fo:text-align="left" style:justify-single-word="false"/>
      <style:text-properties fo:font-size="12pt" fo:font-weight="normal" officeooo:rsid="0236e767" officeooo:paragraph-rsid="0468db21" style:font-size-asian="12pt" style:font-weight-asian="normal" style:font-size-complex="12pt" style:font-weight-complex="normal"/>
    </style:style>
    <style:style style:name="P144" style:family="paragraph" style:parent-style-name="Standard">
      <style:paragraph-properties fo:text-align="left" style:justify-single-word="false"/>
      <style:text-properties fo:font-size="12pt" fo:font-weight="normal" officeooo:rsid="0236e767" officeooo:paragraph-rsid="0236e767" style:font-size-asian="12pt" style:font-weight-asian="normal" style:font-size-complex="12pt" style:font-weight-complex="normal"/>
    </style:style>
    <style:style style:name="P145" style:family="paragraph" style:parent-style-name="Standard">
      <style:paragraph-properties fo:text-align="left" style:justify-single-word="false"/>
      <style:text-properties officeooo:paragraph-rsid="044c52d9"/>
    </style:style>
    <style:style style:name="P146" style:family="paragraph" style:parent-style-name="Standard">
      <style:paragraph-properties fo:text-align="left" style:justify-single-word="false"/>
      <style:text-properties fo:font-size="12pt" fo:font-weight="normal" officeooo:rsid="0233c5d5" officeooo:paragraph-rsid="0468db21" style:font-size-asian="12pt" style:font-weight-asian="normal" style:font-size-complex="12pt" style:font-weight-complex="normal"/>
    </style:style>
    <style:style style:name="P147" style:family="paragraph" style:parent-style-name="Table_20_Contents">
      <style:paragraph-properties fo:text-align="left" style:justify-single-word="false"/>
      <style:text-properties style:font-name="Courier" fo:font-size="12pt" fo:font-weight="normal" officeooo:rsid="0236e767" style:font-size-asian="12pt" style:font-weight-asian="normal" style:font-size-complex="12pt" style:font-weight-complex="normal"/>
    </style:style>
    <style:style style:name="P148" style:family="paragraph" style:parent-style-name="Standard">
      <style:paragraph-properties fo:text-align="left" style:justify-single-word="false"/>
      <style:text-properties fo:font-size="12pt" fo:font-weight="normal" officeooo:rsid="0233c5d5" officeooo:paragraph-rsid="044c52d9" style:font-size-asian="12pt" style:font-weight-asian="normal" style:font-size-complex="12pt" style:font-weight-complex="normal"/>
    </style:style>
    <style:style style:name="P149" style:family="paragraph" style:parent-style-name="Standard">
      <style:paragraph-properties fo:text-align="left" style:justify-single-word="false"/>
      <style:text-properties fo:font-size="12pt" fo:font-weight="normal" officeooo:rsid="0235498b" officeooo:paragraph-rsid="044c52d9"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fo:font-size="12pt" fo:font-weight="bold" officeooo:rsid="044c52d9" officeooo:paragraph-rsid="044c52d9" style:font-size-asian="12pt" style:font-weight-asian="bold" style:font-size-complex="12pt" style:font-weight-complex="bold"/>
    </style:style>
    <style:style style:name="P151" style:family="paragraph" style:parent-style-name="Standard">
      <style:paragraph-properties fo:text-align="center" style:justify-single-word="false"/>
      <style:text-properties fo:font-size="12pt" fo:font-weight="normal" officeooo:rsid="044c52d9" officeooo:paragraph-rsid="05bbcade" style:font-size-asian="12pt" style:font-weight-asian="normal" style:font-size-complex="12pt" style:font-weight-complex="normal"/>
    </style:style>
    <style:style style:name="P152" style:family="paragraph" style:parent-style-name="Standard">
      <style:paragraph-properties fo:text-align="left" style:justify-single-word="false"/>
      <style:text-properties fo:font-size="12pt" fo:font-weight="normal" officeooo:rsid="0238faf5" officeooo:paragraph-rsid="01f160ea"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officeooo:paragraph-rsid="0238faf5"/>
    </style:style>
    <style:style style:name="P154" style:family="paragraph" style:parent-style-name="Standard">
      <style:paragraph-properties fo:text-align="justify" style:justify-single-word="false"/>
      <style:text-properties fo:font-size="12pt" fo:font-weight="normal" officeooo:rsid="0238faf5" officeooo:paragraph-rsid="0238faf5" style:font-size-asian="12pt" style:font-weight-asian="normal" style:font-size-complex="12pt" style:font-weight-complex="normal"/>
    </style:style>
    <style:style style:name="P155" style:family="paragraph" style:parent-style-name="Table_20_Contents">
      <style:paragraph-properties fo:text-align="justify" style:justify-single-word="false"/>
      <style:text-properties fo:font-size="12pt" officeooo:rsid="023af2b2" officeooo:paragraph-rsid="023af2b2" style:font-size-asian="12pt" style:font-size-complex="12pt"/>
    </style:style>
    <style:style style:name="P156" style:family="paragraph" style:parent-style-name="Standard">
      <style:paragraph-properties fo:text-align="justify" style:justify-single-word="false"/>
      <style:text-properties officeooo:paragraph-rsid="023af2b2"/>
    </style:style>
    <style:style style:name="P157" style:family="paragraph" style:parent-style-name="Standard">
      <style:paragraph-properties fo:text-align="justify" style:justify-single-word="false"/>
      <style:text-properties fo:font-size="12pt" fo:font-weight="normal" officeooo:rsid="023ce99f" officeooo:paragraph-rsid="023ce99f" style:font-size-asian="12pt" style:font-weight-asian="normal" style:font-size-complex="12pt" style:font-weight-complex="normal"/>
    </style:style>
    <style:style style:name="P158" style:family="paragraph" style:parent-style-name="Table_20_Contents">
      <style:paragraph-properties fo:text-align="justify" style:justify-single-word="false"/>
      <style:text-properties fo:font-size="12pt" officeooo:rsid="023dec1a" officeooo:paragraph-rsid="023dec1a" style:font-size-asian="12pt" style:font-size-complex="12pt"/>
    </style:style>
    <style:style style:name="P159" style:family="paragraph" style:parent-style-name="Standard">
      <style:paragraph-properties fo:text-align="justify" style:justify-single-word="false"/>
      <style:text-properties officeooo:paragraph-rsid="0259f8f0"/>
    </style:style>
    <style:style style:name="P160" style:family="paragraph" style:parent-style-name="Standard">
      <style:paragraph-properties fo:text-align="justify" style:justify-single-word="false"/>
      <style:text-properties fo:font-size="12pt" fo:font-weight="normal" officeooo:rsid="0259f8f0" officeooo:paragraph-rsid="0259f8f0"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fo:font-size="13pt" fo:font-weight="normal" officeooo:rsid="0027fc66" officeooo:paragraph-rsid="025b7323" style:font-size-asian="13pt" style:font-weight-asian="normal" style:font-size-complex="13pt" style:font-weight-complex="normal"/>
    </style:style>
    <style:style style:name="P162" style:family="paragraph" style:parent-style-name="Standard">
      <style:paragraph-properties fo:text-align="justify" style:justify-single-word="false"/>
      <style:text-properties fo:font-size="12pt" fo:font-weight="normal" officeooo:rsid="0468db21" officeooo:paragraph-rsid="0468db21"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officeooo:paragraph-rsid="06482556"/>
    </style:style>
    <style:style style:name="P164" style:family="paragraph" style:parent-style-name="Footnote">
      <style:text-properties officeooo:paragraph-rsid="01e02301"/>
    </style:style>
    <style:style style:name="P165" style:family="paragraph" style:parent-style-name="Standard">
      <style:paragraph-properties fo:text-align="justify" style:justify-single-word="false"/>
      <style:text-properties fo:font-size="12pt" fo:font-weight="normal" officeooo:rsid="0468db21" officeooo:paragraph-rsid="06482556"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fo:font-size="12pt" fo:font-weight="normal" officeooo:rsid="06482556" officeooo:paragraph-rsid="06482556"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fo:font-size="12pt" fo:font-weight="normal" officeooo:rsid="04282ff9" officeooo:paragraph-rsid="0468db21" style:font-size-asian="12pt" style:font-weight-asian="normal" style:font-size-complex="12pt" style:font-weight-complex="normal"/>
    </style:style>
    <style:style style:name="P168" style:family="paragraph" style:parent-style-name="Table_20_Contents">
      <style:paragraph-properties fo:text-align="justify" style:justify-single-word="false"/>
      <style:text-properties fo:font-size="12pt" officeooo:rsid="025c23b3" officeooo:paragraph-rsid="025c23b3" style:font-size-asian="12pt" style:font-size-complex="12pt"/>
    </style:style>
    <style:style style:name="P169" style:family="paragraph" style:parent-style-name="Standard">
      <style:paragraph-properties fo:text-align="justify" style:justify-single-word="false"/>
      <style:text-properties fo:font-size="12pt" fo:font-weight="normal" officeooo:rsid="04282ff9" officeooo:paragraph-rsid="025b7323"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officeooo:paragraph-rsid="025dc0cf"/>
    </style:style>
    <style:style style:name="P171" style:family="paragraph" style:parent-style-name="Footnote">
      <style:text-properties officeooo:paragraph-rsid="025f2d29"/>
    </style:style>
    <style:style style:name="P172" style:family="paragraph" style:parent-style-name="Standard">
      <style:paragraph-properties fo:text-align="justify" style:justify-single-word="false"/>
      <style:text-properties fo:font-size="12pt" fo:font-weight="normal" officeooo:rsid="0203359b" officeooo:paragraph-rsid="01f160ea"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fo:font-size="12pt" fo:font-weight="normal" officeooo:rsid="04375f4b" officeooo:paragraph-rsid="01f160ea"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fo:font-size="12pt" fo:font-weight="normal" officeooo:rsid="044de9b0" officeooo:paragraph-rsid="02808313"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officeooo:paragraph-rsid="02808313"/>
    </style:style>
    <style:style style:name="P176" style:family="paragraph" style:parent-style-name="Footnote">
      <style:text-properties officeooo:paragraph-rsid="0207f521"/>
    </style:style>
    <style:style style:name="P177" style:family="paragraph" style:parent-style-name="Standard">
      <style:text-properties fo:color="#000000" loext:opacity="100%" style:font-name="Courier" fo:font-size="11pt" fo:font-weight="normal" fo:background-color="#ffffff" style:font-size-asian="11pt" style:font-size-complex="11pt"/>
    </style:style>
    <style:style style:name="P178"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fo:background-color="#ffffff" style:font-size-asian="11pt" style:font-size-complex="11pt"/>
    </style:style>
    <style:style style:name="P179" style:family="paragraph" style:parent-style-name="Standard">
      <style:paragraph-properties style:line-height-at-least="0.198in"/>
      <style:text-properties style:font-name="Courier" fo:font-size="11pt" style:font-size-asian="11pt" style:font-size-complex="11pt"/>
    </style:style>
    <style:style style:name="P180" style:family="paragraph" style:parent-style-name="Text_20_body">
      <style:paragraph-properties fo:text-align="center" style:justify-single-word="false"/>
      <style:text-properties fo:font-weight="bold" officeooo:rsid="030614bc" officeooo:paragraph-rsid="03069a2e" style:font-weight-asian="bold" style:font-weight-complex="bold"/>
    </style:style>
    <style:style style:name="P181" style:family="paragraph" style:parent-style-name="Standard">
      <style:text-properties style:font-name="Courier" fo:font-size="11pt" style:font-size-asian="11pt" style:font-size-complex="11pt"/>
    </style:style>
    <style:style style:name="P182" style:family="paragraph" style:parent-style-name="Text_20_body">
      <style:paragraph-properties fo:text-align="center" style:justify-single-word="false"/>
      <style:text-properties fo:font-weight="bold" officeooo:rsid="03069a2e" officeooo:paragraph-rsid="03069a2e" style:font-weight-asian="bold" style:font-weight-complex="bold"/>
    </style:style>
    <style:style style:name="P183" style:family="paragraph" style:parent-style-name="Table_20_Contents">
      <style:paragraph-properties fo:text-align="justify" style:justify-single-word="false"/>
      <style:text-properties fo:font-size="12pt" officeooo:rsid="0309b58c" officeooo:paragraph-rsid="0309b58c" style:font-size-asian="12pt" style:font-size-complex="12pt"/>
    </style:style>
    <style:style style:name="P184" style:family="paragraph" style:parent-style-name="Table_20_Contents">
      <style:paragraph-properties fo:text-align="justify" style:justify-single-word="false"/>
      <style:text-properties fo:font-size="12pt" officeooo:rsid="030c4280" officeooo:paragraph-rsid="030c4280" style:font-size-asian="12pt" style:font-size-complex="12pt"/>
    </style:style>
    <style:style style:name="P185" style:family="paragraph" style:parent-style-name="Standard">
      <style:paragraph-properties fo:text-align="justify" style:justify-single-word="false"/>
      <style:text-properties officeooo:paragraph-rsid="030d2a29"/>
    </style:style>
    <style:style style:name="P186" style:family="paragraph" style:parent-style-name="Standard">
      <style:paragraph-properties fo:text-align="justify" style:justify-single-word="false"/>
      <style:text-properties fo:font-size="12pt" fo:font-weight="normal" officeooo:rsid="030d2a29" officeooo:paragraph-rsid="030d2a29"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fo:font-size="12pt" fo:font-weight="normal" officeooo:rsid="020b8f3e" officeooo:paragraph-rsid="02808313" style:font-size-asian="12pt" style:font-weight-asian="normal" style:font-size-complex="12pt" style:font-weight-complex="normal"/>
    </style:style>
    <style:style style:name="P188" style:family="paragraph" style:parent-style-name="Footnote">
      <style:text-properties officeooo:rsid="02048792" officeooo:paragraph-rsid="02048792"/>
    </style:style>
    <style:style style:name="P189" style:family="paragraph" style:parent-style-name="Table_20_Contents">
      <style:paragraph-properties fo:text-align="justify" style:justify-single-word="false"/>
      <style:text-properties style:font-name="Courier" fo:font-size="12pt" fo:font-style="normal" fo:font-weight="normal" officeooo:rsid="0021ebf9" officeooo:paragraph-rsid="01f160ea" style:font-size-asian="12pt" style:font-style-asian="normal" style:font-weight-asian="normal" style:font-size-complex="12pt" style:font-style-complex="normal" style:font-weight-complex="normal"/>
    </style:style>
    <style:style style:name="P190" style:family="paragraph" style:parent-style-name="Table_20_Contents">
      <style:paragraph-properties fo:text-align="justify" style:justify-single-word="false"/>
      <style:text-properties fo:font-size="12pt" officeooo:rsid="043ae903" officeooo:paragraph-rsid="01f160ea" style:font-size-asian="12pt" style:font-size-complex="12pt"/>
    </style:style>
    <style:style style:name="P191" style:family="paragraph" style:parent-style-name="Table_20_Contents">
      <style:paragraph-properties fo:text-align="left" style:justify-single-word="false"/>
      <style:text-properties officeooo:paragraph-rsid="046b29a5"/>
    </style:style>
    <style:style style:name="P192" style:family="paragraph" style:parent-style-name="Table_20_Contents">
      <style:paragraph-properties fo:text-align="justify" style:justify-single-word="false"/>
      <style:text-properties officeooo:paragraph-rsid="01f160ea"/>
    </style:style>
    <style:style style:name="P193" style:family="paragraph" style:parent-style-name="Table_20_Contents">
      <style:paragraph-properties fo:text-align="justify" style:justify-single-word="false"/>
      <style:text-properties fo:font-size="12pt" officeooo:rsid="04406450" officeooo:paragraph-rsid="01f160ea" style:font-size-asian="12pt" style:font-size-complex="12pt"/>
    </style:style>
    <style:style style:name="P194" style:family="paragraph" style:parent-style-name="Table_20_Contents">
      <style:paragraph-properties fo:text-align="justify" style:justify-single-word="false"/>
      <style:text-properties fo:font-size="12pt" officeooo:rsid="044331e6" officeooo:paragraph-rsid="01f160ea" style:font-size-asian="12pt" style:font-size-complex="12pt"/>
    </style:style>
    <style:style style:name="P195" style:family="paragraph" style:parent-style-name="Table_20_Contents">
      <style:paragraph-properties fo:text-align="justify" style:justify-single-word="false"/>
      <style:text-properties officeooo:paragraph-rsid="046b29a5"/>
    </style:style>
    <style:style style:name="P196" style:family="paragraph" style:parent-style-name="Table_20_Contents">
      <style:paragraph-properties fo:text-align="justify" style:justify-single-word="false"/>
      <style:text-properties fo:font-size="12pt" officeooo:rsid="046b29a5" officeooo:paragraph-rsid="046b29a5" style:font-size-asian="12pt" style:font-size-complex="12pt"/>
    </style:style>
    <style:style style:name="P197" style:family="paragraph" style:parent-style-name="Table_20_Contents">
      <style:paragraph-properties fo:text-align="justify" style:justify-single-word="false"/>
      <style:text-properties fo:font-size="12pt" officeooo:rsid="0445d853" officeooo:paragraph-rsid="01f160ea" style:font-size-asian="12pt" style:font-size-complex="12pt"/>
    </style:style>
    <style:style style:name="P198" style:family="paragraph" style:parent-style-name="Table_20_Contents">
      <style:paragraph-properties fo:text-align="left" style:justify-single-word="false"/>
      <style:text-properties fo:font-size="12pt" officeooo:rsid="0445d853" officeooo:paragraph-rsid="01f160ea" style:font-size-asian="12pt" style:font-size-complex="12pt"/>
    </style:style>
    <style:style style:name="P199" style:family="paragraph" style:parent-style-name="Table_20_Contents">
      <style:paragraph-properties fo:text-align="left" style:justify-single-word="false"/>
      <style:text-properties fo:font-size="12pt" officeooo:rsid="0446a86c" officeooo:paragraph-rsid="01f160ea" style:font-size-asian="12pt" style:font-size-complex="12pt"/>
    </style:style>
    <style:style style:name="P200" style:family="paragraph" style:parent-style-name="Table_20_Contents">
      <style:paragraph-properties fo:text-align="left" style:justify-single-word="false"/>
      <style:text-properties officeooo:paragraph-rsid="01f160ea"/>
    </style:style>
    <style:style style:name="P201" style:family="paragraph" style:parent-style-name="Table_20_Contents">
      <style:paragraph-properties fo:text-align="justify" style:justify-single-word="false"/>
      <style:text-properties fo:font-size="12pt" officeooo:rsid="046c783c" officeooo:paragraph-rsid="046c783c" style:font-size-asian="12pt" style:font-size-complex="12pt"/>
    </style:style>
    <style:style style:name="P202" style:family="paragraph" style:parent-style-name="Table_20_Contents">
      <style:paragraph-properties fo:text-align="justify" style:justify-single-word="false"/>
      <style:text-properties fo:font-size="12pt" officeooo:rsid="044ac00a" officeooo:paragraph-rsid="01f160ea" style:font-size-asian="12pt" style:font-size-complex="12pt"/>
    </style:style>
    <style:style style:name="P203" style:family="paragraph" style:parent-style-name="Standard">
      <style:paragraph-properties fo:text-align="justify" style:justify-single-word="false"/>
      <style:text-properties fo:font-size="12pt" fo:font-weight="normal" officeooo:rsid="044de9b0" officeooo:paragraph-rsid="01f160e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fo:font-size="12pt" fo:font-weight="normal" officeooo:rsid="01222f1c" officeooo:paragraph-rsid="01f160ea" style:font-size-asian="12pt" style:font-weight-asian="normal" style:font-size-complex="12pt" style:font-weight-complex="normal"/>
    </style:style>
    <style:style style:name="P205" style:family="paragraph" style:parent-style-name="Standard">
      <style:paragraph-properties fo:text-align="justify" style:justify-single-word="false"/>
      <style:text-properties officeooo:paragraph-rsid="02691c13"/>
    </style:style>
    <style:style style:name="P206" style:family="paragraph" style:parent-style-name="Standard">
      <style:paragraph-properties fo:text-align="justify" style:justify-single-word="false"/>
      <style:text-properties fo:font-size="12pt" officeooo:rsid="044ac00a" officeooo:paragraph-rsid="02691c13" style:font-size-asian="12pt" style:font-size-complex="12pt"/>
    </style:style>
    <style:style style:name="P207" style:family="paragraph" style:parent-style-name="Standard">
      <style:paragraph-properties fo:text-align="justify" style:justify-single-word="false"/>
      <style:text-properties style:font-name="Courier" fo:font-size="12pt" fo:font-weight="normal" officeooo:rsid="026aee91" officeooo:paragraph-rsid="02691c13" style:font-size-asian="12pt" style:font-weight-asian="normal" style:font-size-complex="12pt" style:font-weight-complex="normal"/>
    </style:style>
    <style:style style:name="P20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normal" style:letter-kerning="true" style:font-family-asian="'Bitstream Vera Sans'" style:font-family-generic-asian="system" style:font-pitch-asian="variable"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0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normal" style:letter-kerning="true" style:font-family-asian="'Bitstream Vera Sans'" style:font-family-generic-asian="system" style:font-pitch-asian="variable"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1" style:family="paragraph">
      <style:paragraph-properties fo:margin-left="0in" fo:margin-right="0in" fo:margin-top="0in" fo:margin-bottom="0in" fo:line-height="100%" fo:text-indent="0in"/>
    </style:style>
    <style:style style:name="P21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normal" style:letter-kerning="true" style:font-family-asian="'Bitstream Vera Sans'" style:font-family-generic-asian="system" style:font-pitch-asian="variable"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13" style:family="paragraph" style:parent-style-name="Standard">
      <style:paragraph-properties fo:text-align="justify" style:justify-single-word="false"/>
      <style:text-properties fo:font-size="12pt" fo:font-weight="normal" officeooo:rsid="02691c13" officeooo:paragraph-rsid="02691c13"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fo:font-size="12pt" fo:font-weight="bold" officeooo:rsid="026aee91" officeooo:paragraph-rsid="026aee91" style:font-size-asian="12pt" style:font-weight-asian="bold" style:font-size-complex="12pt" style:font-weight-complex="bold"/>
    </style:style>
    <style:style style:name="P215" style:family="paragraph" style:parent-style-name="Standard">
      <style:paragraph-properties fo:text-align="center" style:justify-single-word="false"/>
      <style:text-properties fo:font-size="12pt" fo:font-weight="normal" officeooo:rsid="026aee91" officeooo:paragraph-rsid="026aee91"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Courier" fo:font-size="12pt" fo:font-weight="normal" officeooo:rsid="026aee91" officeooo:paragraph-rsid="026aee91"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fo:font-size="12pt" fo:font-weight="bold" officeooo:paragraph-rsid="06609515" style:font-size-asian="12pt" style:font-weight-asian="bold" style:font-size-complex="12pt" style:font-weight-complex="bold"/>
    </style:style>
    <style:style style:name="P218" style:family="paragraph" style:parent-style-name="Standard">
      <style:text-properties fo:font-size="12pt" officeooo:paragraph-rsid="06609515" style:font-size-asian="12pt" style:font-size-complex="12pt"/>
    </style:style>
    <style:style style:name="P219" style:family="paragraph" style:parent-style-name="Standard">
      <style:text-properties officeooo:paragraph-rsid="06609515"/>
    </style:style>
    <style:style style:name="P220" style:family="paragraph" style:parent-style-name="Standard">
      <style:text-properties fo:color="#808080" loext:opacity="100%" fo:font-size="12pt" officeooo:paragraph-rsid="06609515" style:font-size-asian="12pt" style:font-size-complex="12pt"/>
    </style:style>
    <style:style style:name="P221" style:family="paragraph" style:parent-style-name="Footnote">
      <style:text-properties officeooo:rsid="00cd9daf" officeooo:paragraph-rsid="00cd9daf"/>
    </style:style>
    <style:style style:name="P222" style:family="paragraph" style:parent-style-name="Standard">
      <style:paragraph-properties fo:text-align="justify" style:justify-single-word="false"/>
      <style:text-properties fo:font-size="12pt" officeooo:paragraph-rsid="06609515" style:font-size-asian="12pt" style:font-size-complex="12pt"/>
    </style:style>
    <style:style style:name="P223" style:family="paragraph" style:parent-style-name="Horizontal_20_Line">
      <style:text-properties fo:font-size="12pt" officeooo:paragraph-rsid="06609515" style:font-size-asian="12pt" style:font-size-complex="12pt"/>
    </style:style>
    <style:style style:name="P224" style:family="paragraph" style:parent-style-name="Standard">
      <style:text-properties fo:color="#000000" loext:opacity="100%" style:font-name="Courier" fo:font-size="11pt" fo:font-weight="normal" officeooo:paragraph-rsid="06609515" fo:background-color="#ffffff" style:font-size-asian="11pt" style:font-size-complex="11pt"/>
    </style:style>
    <style:style style:name="P225" style:family="paragraph" style:parent-style-name="Standard">
      <style:paragraph-properties style:line-height-at-least="0.198in"/>
      <style:text-properties style:font-name="Courier" fo:font-size="11pt" officeooo:paragraph-rsid="06609515" style:font-size-asian="11pt" style:font-size-complex="11pt"/>
    </style:style>
    <style:style style:name="P226"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6609515" fo:background-color="#ffffff" style:font-size-asian="11pt" style:font-size-complex="11pt"/>
    </style:style>
    <style:style style:name="P227" style:family="paragraph" style:parent-style-name="Standard">
      <style:paragraph-properties fo:text-align="center" style:justify-single-word="false"/>
      <style:text-properties officeooo:paragraph-rsid="06609515"/>
    </style:style>
    <style:style style:name="P228" style:family="paragraph" style:parent-style-name="Standard">
      <style:text-properties fo:font-size="12pt" officeooo:rsid="05023da7" officeooo:paragraph-rsid="06609515" style:font-size-asian="12pt" style:font-size-complex="12pt"/>
    </style:style>
    <style:style style:name="P229" style:family="paragraph" style:parent-style-name="Standard">
      <style:text-properties fo:font-size="12pt" officeooo:rsid="05ff61c8" officeooo:paragraph-rsid="06609515" style:font-size-asian="12pt" style:font-size-complex="12pt"/>
    </style:style>
    <style:style style:name="P230" style:family="paragraph" style:parent-style-name="Preformatted_20_Text">
      <style:text-properties fo:color="#000000" loext:opacity="100%" fo:font-size="10pt" officeooo:paragraph-rsid="06609515" fo:background-color="#ffffff" style:font-size-asian="10pt" style:font-size-complex="10pt"/>
    </style:style>
    <style:style style:name="P231" style:family="paragraph" style:parent-style-name="Preformatted_20_Text">
      <style:paragraph-properties fo:margin-left="0in" fo:margin-right="0in" fo:text-indent="0in" style:auto-text-indent="false"/>
      <style:text-properties fo:color="#000000" loext:opacity="100%" fo:font-size="10pt" officeooo:paragraph-rsid="06609515" fo:background-color="#ffffff" style:font-size-asian="10pt" style:font-size-complex="10pt"/>
    </style:style>
    <style:style style:name="P232" style:family="paragraph" style:parent-style-name="Preformatted_20_Text">
      <style:paragraph-properties fo:margin-left="0in" fo:margin-right="0in" fo:margin-top="0in" fo:margin-bottom="0.1965in" style:contextual-spacing="false" fo:text-indent="0in" style:auto-text-indent="false"/>
      <style:text-properties fo:font-size="10pt" officeooo:paragraph-rsid="06609515" style:font-size-asian="10pt" style:font-size-complex="10pt"/>
    </style:style>
    <style:style style:name="P233" style:family="paragraph" style:parent-style-name="Standard">
      <style:paragraph-properties fo:margin-left="0in" fo:margin-right="0in" fo:margin-top="0in" fo:margin-bottom="0.1965in" style:contextual-spacing="false" fo:text-indent="0in" style:auto-text-indent="false"/>
      <style:text-properties fo:color="#000000" loext:opacity="100%" fo:font-size="10pt" officeooo:paragraph-rsid="06609515" fo:background-color="#ffffff" style:font-size-asian="10pt" style:font-size-complex="10pt"/>
    </style:style>
    <style:style style:name="P234" style:family="paragraph" style:parent-style-name="Standard">
      <style:text-properties style:font-name="Liberation Serif" fo:font-size="12pt" officeooo:rsid="06012abb" officeooo:paragraph-rsid="06609515" style:font-size-asian="12pt" style:font-size-complex="12pt"/>
    </style:style>
    <style:style style:name="P235" style:family="paragraph" style:parent-style-name="Standard" style:list-style-name="L1">
      <style:text-properties officeooo:paragraph-rsid="06609515"/>
    </style:style>
    <style:style style:name="P236" style:family="paragraph" style:parent-style-name="Standard" style:list-style-name="L1">
      <style:text-properties style:font-name="Liberation Serif" fo:font-size="12pt" officeooo:rsid="06012abb" officeooo:paragraph-rsid="06609515" style:font-size-asian="12pt" style:font-size-complex="12pt"/>
    </style:style>
    <style:style style:name="P237" style:family="paragraph" style:parent-style-name="Footnote">
      <style:text-properties officeooo:rsid="00d22f84" officeooo:paragraph-rsid="00d22f84"/>
    </style:style>
    <style:style style:name="P238" style:family="paragraph" style:parent-style-name="Standard">
      <style:text-properties style:font-name="Liberation Serif" fo:font-size="12pt" officeooo:rsid="00d32152" officeooo:paragraph-rsid="06609515" style:font-size-asian="12pt" style:font-size-complex="12pt"/>
    </style:style>
    <style:style style:name="P239" style:family="paragraph" style:parent-style-name="Standard">
      <style:paragraph-properties fo:text-align="justify" style:justify-single-word="false"/>
      <style:text-properties style:font-name="Liberation Serif" fo:font-size="12pt" officeooo:rsid="00d32152" officeooo:paragraph-rsid="06609515" style:font-size-asian="12pt" style:font-size-complex="12pt"/>
    </style:style>
    <style:style style:name="P240" style:family="paragraph" style:parent-style-name="Standard">
      <style:paragraph-properties fo:text-align="center" style:justify-single-word="false"/>
      <style:text-properties fo:font-size="12pt" officeooo:paragraph-rsid="06609515" style:font-size-asian="12pt" style:font-size-complex="12pt"/>
    </style:style>
    <style:style style:name="P241" style:family="paragraph" style:parent-style-name="Standard">
      <style:text-properties style:font-name="Liberation Serif" fo:font-size="12pt" officeooo:paragraph-rsid="06609515" style:font-size-asian="12pt" style:font-size-complex="12pt"/>
    </style:style>
    <style:style style:name="P242" style:family="paragraph" style:parent-style-name="Preformatted_20_Text">
      <style:paragraph-properties fo:margin-left="0in" fo:margin-right="0in" fo:text-indent="0in" style:auto-text-indent="false"/>
      <style:text-properties fo:color="#000000" loext:opacity="100%" officeooo:paragraph-rsid="06609515" fo:background-color="#ffffff"/>
    </style:style>
    <style:style style:name="P243" style:family="paragraph" style:parent-style-name="Preformatted_20_Text">
      <style:paragraph-properties fo:margin-top="0in" fo:margin-bottom="0.1965in" style:contextual-spacing="false"/>
      <style:text-properties fo:color="#000000" loext:opacity="100%" officeooo:paragraph-rsid="06609515" fo:background-color="#ffffff"/>
    </style:style>
    <style:style style:name="P244" style:family="paragraph" style:parent-style-name="Standard">
      <style:paragraph-properties fo:margin-top="0in" fo:margin-bottom="0.1965in" style:contextual-spacing="false"/>
      <style:text-properties fo:color="#000000" loext:opacity="100%" fo:font-size="10pt" officeooo:paragraph-rsid="06609515" fo:background-color="#ffffff" style:font-size-asian="10pt" style:font-size-complex="10pt"/>
    </style:style>
    <style:style style:name="P245" style:family="paragraph" style:parent-style-name="Standard">
      <style:paragraph-properties fo:text-align="justify" style:justify-single-word="false"/>
      <style:text-properties style:font-name="Liberation Serif" fo:font-size="12pt" officeooo:rsid="00e1c70c" officeooo:paragraph-rsid="06609515" style:font-size-asian="12pt" style:font-size-complex="12pt"/>
    </style:style>
    <style:style style:name="P246" style:family="paragraph" style:parent-style-name="Standard">
      <style:paragraph-properties fo:text-align="justify" style:justify-single-word="false"/>
      <style:text-properties fo:font-size="12pt" officeooo:rsid="00e0b0b3" officeooo:paragraph-rsid="06609515" style:font-size-asian="12pt" style:font-size-complex="12pt"/>
    </style:style>
    <style:style style:name="P247" style:family="paragraph" style:parent-style-name="Table_20_Contents">
      <style:paragraph-properties fo:text-align="justify" style:justify-single-word="false"/>
      <style:text-properties officeooo:rsid="00e0b0b3" officeooo:paragraph-rsid="06609515"/>
    </style:style>
    <style:style style:name="P248" style:family="paragraph" style:parent-style-name="Table_20_Contents">
      <style:paragraph-properties fo:text-align="justify" style:justify-single-word="false"/>
      <style:text-properties fo:font-size="12pt" officeooo:rsid="00e0b0b3" officeooo:paragraph-rsid="06609515" style:font-size-asian="12pt" style:font-size-complex="12pt"/>
    </style:style>
    <style:style style:name="P249" style:family="paragraph" style:parent-style-name="Table_20_Contents">
      <style:paragraph-properties fo:text-align="justify" style:justify-single-word="false"/>
      <style:text-properties fo:font-size="12pt" officeooo:rsid="0607ff8b" officeooo:paragraph-rsid="06609515" style:font-size-asian="12pt" style:font-size-complex="12pt"/>
    </style:style>
    <style:style style:name="P250" style:family="paragraph" style:parent-style-name="Preformatted_20_Text">
      <style:paragraph-properties fo:text-align="justify" style:justify-single-word="false"/>
      <style:text-properties fo:color="#000000" loext:opacity="100%" fo:font-size="10pt" officeooo:rsid="00e0b0b3" officeooo:paragraph-rsid="06609515" fo:background-color="#ffffff" style:font-size-asian="10pt" style:font-size-complex="10pt"/>
    </style:style>
    <style:style style:name="P251" style:family="paragraph" style:parent-style-name="Preformatted_20_Text">
      <style:paragraph-properties fo:text-align="justify" style:justify-single-word="false" fo:orphans="0" fo:widows="0"/>
      <style:text-properties fo:color="#000000" loext:opacity="100%" fo:font-size="10pt" officeooo:rsid="00e0b0b3" officeooo:paragraph-rsid="06609515" fo:background-color="#ffffff" style:font-size-asian="10pt" style:font-size-complex="10pt"/>
    </style:style>
    <style:style style:name="P252" style:family="paragraph" style:parent-style-name="Preformatted_20_Text">
      <style:paragraph-properties fo:margin-left="0in" fo:margin-right="0in" fo:text-align="justify" style:justify-single-word="false" fo:orphans="0" fo:widows="0" fo:text-indent="0in" style:auto-text-indent="false"/>
      <style:text-properties fo:color="#000000" loext:opacity="100%" fo:font-size="10pt" officeooo:rsid="00e0b0b3" officeooo:paragraph-rsid="06609515" fo:background-color="#ffffff" style:font-size-asian="10pt" style:font-size-complex="10pt"/>
    </style:style>
    <style:style style:name="P253" style:family="paragraph" style:parent-style-name="Preformatted_20_Text">
      <style:paragraph-properties fo:margin-left="0in" fo:margin-right="0in" fo:text-align="justify" style:justify-single-word="false" fo:orphans="0" fo:widows="0" fo:text-indent="0in" style:auto-text-indent="false"/>
      <style:text-properties officeooo:paragraph-rsid="06609515"/>
    </style:style>
    <style:style style:name="P254" style:family="paragraph" style:parent-style-name="Preformatted_20_Text">
      <style:paragraph-properties fo:margin-top="0in" fo:margin-bottom="0.1965in" style:contextual-spacing="false" fo:text-align="justify" style:justify-single-word="false" fo:orphans="0" fo:widows="0"/>
      <style:text-properties fo:color="#000000" loext:opacity="100%" fo:font-size="10pt" officeooo:rsid="00e0b0b3" officeooo:paragraph-rsid="06609515" fo:background-color="#ffffff" style:font-size-asian="10pt" style:font-size-complex="10pt"/>
    </style:style>
    <style:style style:name="P255" style:family="paragraph" style:parent-style-name="Standard">
      <style:paragraph-properties fo:text-align="justify" style:justify-single-word="false"/>
      <style:text-properties fo:font-size="12pt" officeooo:rsid="00e1c70c" officeooo:paragraph-rsid="06609515" style:font-size-asian="12pt" style:font-size-complex="12pt"/>
    </style:style>
    <style:style style:name="P256" style:family="paragraph" style:parent-style-name="Footnote">
      <style:text-properties officeooo:paragraph-rsid="00ec36fc"/>
    </style:style>
    <style:style style:name="P257" style:family="paragraph" style:parent-style-name="Standard">
      <style:paragraph-properties fo:text-align="justify" style:justify-single-word="false"/>
      <style:text-properties fo:font-size="12pt" officeooo:rsid="00eee4c5" officeooo:paragraph-rsid="06609515" style:font-size-asian="12pt" style:font-size-complex="12pt"/>
    </style:style>
    <style:style style:name="P258" style:family="paragraph" style:parent-style-name="Table_20_Contents">
      <style:paragraph-properties fo:text-align="justify" style:justify-single-word="false"/>
      <style:text-properties officeooo:rsid="00f049b2" officeooo:paragraph-rsid="06609515"/>
    </style:style>
    <style:style style:name="P259" style:family="paragraph" style:parent-style-name="Table_20_Contents">
      <style:paragraph-properties fo:text-align="justify" style:justify-single-word="false"/>
      <style:text-properties fo:font-size="12pt" officeooo:rsid="00f049b2" officeooo:paragraph-rsid="06609515" style:font-size-asian="12pt" style:font-size-complex="12pt"/>
    </style:style>
    <style:style style:name="P260" style:family="paragraph" style:parent-style-name="Standard">
      <style:paragraph-properties fo:text-align="justify" style:justify-single-word="false"/>
      <style:text-properties fo:font-size="12pt" officeooo:rsid="00ed3bb8" officeooo:paragraph-rsid="06609515" style:font-size-asian="12pt" style:font-size-complex="12pt"/>
    </style:style>
    <style:style style:name="P261" style:family="paragraph" style:parent-style-name="Table_20_Contents">
      <style:text-properties style:font-name="Courier" fo:font-size="11pt" officeooo:paragraph-rsid="06609515" style:font-size-asian="11pt" style:font-size-complex="11pt"/>
    </style:style>
    <style:style style:name="P262" style:family="paragraph" style:parent-style-name="Horizontal_20_Line">
      <style:text-properties officeooo:paragraph-rsid="06609515"/>
    </style:style>
    <style:style style:name="P263" style:family="paragraph" style:parent-style-name="Footnote">
      <style:text-properties officeooo:rsid="01043eae" officeooo:paragraph-rsid="01043eae"/>
    </style:style>
    <style:style style:name="P264" style:family="paragraph" style:parent-style-name="Standard">
      <style:text-properties fo:font-size="12pt" officeooo:rsid="00e1c70c" officeooo:paragraph-rsid="06609515" style:font-size-asian="12pt" style:font-size-complex="12pt"/>
    </style:style>
    <style:style style:name="P265" style:family="paragraph" style:parent-style-name="Table_20_Contents">
      <style:paragraph-properties fo:text-align="justify" style:justify-single-word="false"/>
      <style:text-properties officeooo:rsid="00fa9e73" officeooo:paragraph-rsid="06609515"/>
    </style:style>
    <style:style style:name="P266" style:family="paragraph" style:parent-style-name="Table_20_Contents">
      <style:paragraph-properties fo:text-align="justify" style:justify-single-word="false"/>
      <style:text-properties fo:font-size="12pt" officeooo:rsid="00fa9e73" officeooo:paragraph-rsid="06609515" style:font-size-asian="12pt" style:font-size-complex="12pt"/>
    </style:style>
    <style:style style:name="P267" style:family="paragraph" style:parent-style-name="Standard">
      <style:paragraph-properties fo:text-align="justify" style:justify-single-word="false"/>
      <style:text-properties fo:font-size="12pt" officeooo:rsid="00fa9e73" officeooo:paragraph-rsid="06609515" style:font-size-asian="12pt" style:font-size-complex="12pt"/>
    </style:style>
    <style:style style:name="P268" style:family="paragraph" style:parent-style-name="Table_20_Contents">
      <style:paragraph-properties fo:text-align="justify" style:justify-single-word="false"/>
      <style:text-properties officeooo:rsid="00fb66b2" officeooo:paragraph-rsid="06609515"/>
    </style:style>
    <style:style style:name="P269" style:family="paragraph" style:parent-style-name="Table_20_Contents">
      <style:paragraph-properties fo:text-align="justify" style:justify-single-word="false"/>
      <style:text-properties fo:font-size="12pt" officeooo:rsid="00fb66b2" officeooo:paragraph-rsid="06609515" style:font-size-asian="12pt" style:font-size-complex="12pt"/>
    </style:style>
    <style:style style:name="P270" style:family="paragraph" style:parent-style-name="Table_20_Contents">
      <style:paragraph-properties fo:text-align="justify" style:justify-single-word="false"/>
      <style:text-properties officeooo:rsid="00fbc8a9" officeooo:paragraph-rsid="06609515"/>
    </style:style>
    <style:style style:name="P271" style:family="paragraph" style:parent-style-name="Table_20_Contents">
      <style:paragraph-properties fo:text-align="justify" style:justify-single-word="false"/>
      <style:text-properties fo:font-size="12pt" officeooo:rsid="00fbc8a9" officeooo:paragraph-rsid="06609515" style:font-size-asian="12pt" style:font-size-complex="12pt"/>
    </style:style>
    <style:style style:name="P272" style:family="paragraph" style:parent-style-name="Standard">
      <style:text-properties fo:font-size="12pt" officeooo:rsid="050a0912" officeooo:paragraph-rsid="06609515" style:font-size-asian="12pt" style:font-size-complex="12pt"/>
    </style:style>
    <style:style style:name="P273" style:family="paragraph" style:parent-style-name="Standard">
      <style:paragraph-properties fo:text-align="center" style:justify-single-word="false"/>
      <style:text-properties fo:font-size="13pt" fo:font-weight="bold" officeooo:rsid="05aa6abe" officeooo:paragraph-rsid="05aa6abe" style:font-size-asian="13pt" style:font-weight-asian="bold" style:font-size-complex="13pt" style:font-weight-complex="bold"/>
    </style:style>
    <style:style style:name="P274" style:family="paragraph" style:parent-style-name="Standard">
      <style:paragraph-properties fo:text-align="justify" style:justify-single-word="false"/>
      <style:text-properties officeooo:rsid="05b344c4" officeooo:paragraph-rsid="05b344c4"/>
    </style:style>
    <style:style style:name="P275" style:family="paragraph" style:parent-style-name="Standard">
      <style:paragraph-properties fo:text-align="justify" style:justify-single-word="false"/>
      <style:text-properties officeooo:paragraph-rsid="05b344c4"/>
    </style:style>
    <style:style style:name="P276" style:family="paragraph" style:parent-style-name="Table_20_Contents">
      <style:paragraph-properties fo:text-align="justify" style:justify-single-word="false"/>
      <style:text-properties fo:font-size="12pt" officeooo:rsid="0309b58c" officeooo:paragraph-rsid="05b344c4" style:font-size-asian="12pt" style:font-size-complex="12pt"/>
    </style:style>
    <style:style style:name="P277" style:family="paragraph" style:parent-style-name="Footnote">
      <style:text-properties officeooo:paragraph-rsid="05b344c4"/>
    </style:style>
    <style:style style:name="P278" style:family="paragraph" style:parent-style-name="Standard">
      <style:paragraph-properties fo:text-align="justify" style:justify-single-word="false"/>
      <style:text-properties officeooo:paragraph-rsid="064b9e61"/>
    </style:style>
    <style:style style:name="P279" style:family="paragraph" style:parent-style-name="Standard">
      <style:paragraph-properties fo:text-align="left" style:justify-single-word="false"/>
      <style:text-properties officeooo:paragraph-rsid="064b9e61"/>
    </style:style>
    <style:style style:name="P280" style:family="paragraph" style:parent-style-name="Table_20_Contents">
      <style:paragraph-properties fo:text-align="left" style:justify-single-word="false"/>
      <style:text-properties fo:font-size="12pt" officeooo:rsid="0309b58c" officeooo:paragraph-rsid="05b344c4" style:font-size-asian="12pt" style:font-size-complex="12pt"/>
    </style:style>
    <style:style style:name="P281" style:family="paragraph" style:parent-style-name="Standard">
      <style:paragraph-properties fo:text-align="justify" style:justify-single-word="false"/>
      <style:text-properties officeooo:rsid="05b79ba5" officeooo:paragraph-rsid="05b79ba5"/>
    </style:style>
    <style:style style:name="P282" style:family="paragraph" style:parent-style-name="Standard">
      <style:paragraph-properties fo:text-align="justify" style:justify-single-word="false"/>
      <style:text-properties officeooo:rsid="05b344c4" officeooo:paragraph-rsid="05b79ba5"/>
    </style:style>
    <style:style style:name="P283" style:family="paragraph" style:parent-style-name="Table_20_Contents">
      <style:paragraph-properties fo:text-align="left" style:justify-single-word="false"/>
      <style:text-properties fo:font-size="12pt" officeooo:rsid="0309b58c" officeooo:paragraph-rsid="05b79ba5" style:font-size-asian="12pt" style:font-size-complex="12pt"/>
    </style:style>
    <style:style style:name="P284" style:family="paragraph" style:parent-style-name="Standard">
      <style:paragraph-properties fo:text-align="justify" style:justify-single-word="false"/>
      <style:text-properties fo:font-size="14pt" fo:font-weight="bold" officeooo:rsid="027fd63e" officeooo:paragraph-rsid="05ab2ffe" style:font-size-asian="14pt" style:font-weight-asian="bold" style:font-size-complex="14pt" style:font-weight-complex="bold"/>
    </style:style>
    <style:style style:name="P285" style:family="paragraph" style:parent-style-name="Standard">
      <style:paragraph-properties fo:text-align="center" style:justify-single-word="false"/>
      <style:text-properties fo:font-size="13pt" fo:font-weight="bold" officeooo:rsid="027fd63e" officeooo:paragraph-rsid="027fd63e" style:font-size-asian="13pt" style:font-weight-asian="bold" style:font-size-complex="13pt" style:font-weight-complex="bold"/>
    </style:style>
    <style:style style:name="P286" style:family="paragraph" style:parent-style-name="Standard">
      <style:paragraph-properties fo:text-align="justify" style:justify-single-word="false"/>
      <style:text-properties fo:font-size="12pt" fo:font-weight="normal" officeooo:rsid="016338bb" officeooo:paragraph-rsid="027fd63e" style:font-size-asian="12pt" style:font-weight-asian="normal" style:font-size-complex="12pt" style:font-weight-complex="normal"/>
    </style:style>
    <style:style style:name="P287" style:family="paragraph" style:parent-style-name="Standard">
      <style:paragraph-properties fo:text-align="justify" style:justify-single-word="false"/>
      <style:text-properties officeooo:paragraph-rsid="064ced94"/>
    </style:style>
    <style:style style:name="P288" style:family="paragraph" style:parent-style-name="Footnote">
      <style:text-properties officeooo:paragraph-rsid="064ced94"/>
    </style:style>
    <style:style style:name="P289" style:family="paragraph" style:parent-style-name="Table_20_Contents">
      <style:paragraph-properties fo:text-align="justify" style:justify-single-word="false"/>
      <style:text-properties fo:font-size="12pt" officeooo:rsid="0164f685" officeooo:paragraph-rsid="027fd63e" style:font-size-asian="12pt" style:font-size-complex="12pt"/>
    </style:style>
    <style:style style:name="P290" style:family="paragraph" style:parent-style-name="Table_20_Contents">
      <style:paragraph-properties fo:text-align="left" style:justify-single-word="false"/>
      <style:text-properties fo:font-size="12pt" officeooo:rsid="0164f685" officeooo:paragraph-rsid="027fd63e" style:font-size-asian="12pt" style:font-size-complex="12pt"/>
    </style:style>
    <style:style style:name="P291" style:family="paragraph" style:parent-style-name="Standard">
      <style:paragraph-properties fo:text-align="justify" style:justify-single-word="false"/>
      <style:text-properties fo:font-size="12pt" fo:font-weight="normal" officeooo:rsid="0164f685" officeooo:paragraph-rsid="027fd63e" style:font-size-asian="12pt" style:font-weight-asian="normal" style:font-size-complex="12pt" style:font-weight-complex="normal"/>
    </style:style>
    <style:style style:name="P292" style:family="paragraph" style:parent-style-name="Standard">
      <style:paragraph-properties fo:text-align="justify" style:justify-single-word="false"/>
      <style:text-properties fo:font-size="12pt" fo:font-weight="normal" officeooo:rsid="016735e0" officeooo:paragraph-rsid="064ced94" style:font-size-asian="12pt" style:font-weight-asian="normal" style:font-size-complex="12pt" style:font-weight-complex="normal"/>
    </style:style>
    <style:style style:name="P293" style:family="paragraph" style:parent-style-name="Standard">
      <style:paragraph-properties fo:text-align="justify" style:justify-single-word="false"/>
      <style:text-properties fo:font-size="12pt" fo:font-weight="normal" officeooo:rsid="0164f685" officeooo:paragraph-rsid="064ced94" style:font-size-asian="12pt" style:font-weight-asian="normal" style:font-size-complex="12pt" style:font-weight-complex="normal"/>
    </style:style>
    <style:style style:name="P294" style:family="paragraph" style:parent-style-name="Standard">
      <style:paragraph-properties fo:text-align="justify" style:justify-single-word="false"/>
      <style:text-properties officeooo:rsid="016735e0" officeooo:paragraph-rsid="064ced94" style:font-size-asian="12pt"/>
    </style:style>
    <style:style style:name="P295" style:family="paragraph" style:parent-style-name="Standard">
      <style:paragraph-properties fo:text-align="justify" style:justify-single-word="false"/>
      <style:text-properties fo:font-size="12pt" fo:font-weight="normal" officeooo:rsid="016c5eaa" officeooo:paragraph-rsid="064ced94" style:font-size-asian="12pt" style:font-weight-asian="normal" style:font-size-complex="12pt" style:font-weight-complex="normal"/>
    </style:style>
    <style:style style:name="P296" style:family="paragraph" style:parent-style-name="Standard">
      <style:paragraph-properties fo:text-align="justify" style:justify-single-word="false"/>
      <style:text-properties fo:font-size="12pt" fo:font-weight="normal" officeooo:rsid="016ec8cc" officeooo:paragraph-rsid="064ced94" style:font-size-asian="12pt" style:font-weight-asian="normal" style:font-size-complex="12pt" style:font-weight-complex="normal"/>
    </style:style>
    <style:style style:name="P297" style:family="paragraph" style:parent-style-name="Standard">
      <style:paragraph-properties fo:text-align="left" style:justify-single-word="false"/>
      <style:text-properties fo:font-size="12pt" fo:font-weight="normal" officeooo:rsid="016ec8cc" officeooo:paragraph-rsid="064ced94" style:font-size-asian="12pt" style:font-weight-asian="normal" style:font-size-complex="12pt" style:font-weight-complex="normal"/>
    </style:style>
    <style:style style:name="P298" style:family="paragraph" style:parent-style-name="Standard">
      <style:paragraph-properties fo:text-align="left" style:justify-single-word="false"/>
      <style:text-properties officeooo:paragraph-rsid="064ced94"/>
    </style:style>
    <style:style style:name="P299" style:family="paragraph" style:parent-style-name="Standard">
      <style:paragraph-properties fo:text-align="justify" style:justify-single-word="false"/>
      <style:text-properties fo:font-size="12pt" fo:font-weight="normal" officeooo:rsid="01709404" officeooo:paragraph-rsid="064ced94" style:font-size-asian="12pt" style:font-weight-asian="normal" style:font-size-complex="12pt" style:font-weight-complex="normal"/>
    </style:style>
    <style:style style:name="P300" style:family="paragraph" style:parent-style-name="Footnote">
      <style:text-properties officeooo:paragraph-rsid="063e7077"/>
    </style:style>
    <style:style style:name="P301" style:family="paragraph" style:parent-style-name="Standard">
      <style:paragraph-properties fo:text-align="justify" style:justify-single-word="false"/>
      <style:text-properties fo:font-size="12pt" fo:font-weight="normal" officeooo:rsid="01709404" officeooo:paragraph-rsid="027fd63e"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fo:font-size="13pt" fo:font-weight="bold" officeooo:rsid="064ced94" officeooo:paragraph-rsid="064ced94" style:font-size-asian="13pt" style:font-weight-asian="bold" style:font-size-complex="13pt" style:font-weight-complex="bold"/>
    </style:style>
    <style:style style:name="P303" style:family="paragraph" style:parent-style-name="Standard">
      <style:paragraph-properties fo:text-align="justify" style:justify-single-word="false"/>
      <style:text-properties fo:font-size="12pt" fo:font-weight="normal" officeooo:rsid="017cf6c8" officeooo:paragraph-rsid="064ced94" style:font-size-asian="12pt" style:font-weight-asian="normal" style:font-size-complex="12pt" style:font-weight-complex="normal"/>
    </style:style>
    <style:style style:name="P304" style:family="paragraph" style:parent-style-name="Table_20_Contents">
      <style:paragraph-properties fo:text-align="justify" style:justify-single-word="false"/>
      <style:text-properties fo:font-size="12pt" officeooo:rsid="017d7eb6" officeooo:paragraph-rsid="027fd63e" style:font-size-asian="12pt" style:font-size-complex="12pt"/>
    </style:style>
    <style:style style:name="P305" style:family="paragraph" style:parent-style-name="Table_20_Contents">
      <style:paragraph-properties fo:text-align="justify" style:justify-single-word="false"/>
      <style:text-properties fo:color="#808080" loext:opacity="100%" fo:font-size="12pt" officeooo:rsid="017d7eb6" officeooo:paragraph-rsid="027fd63e" style:font-size-asian="12pt" style:font-size-complex="12pt"/>
    </style:style>
    <style:style style:name="P306" style:family="paragraph" style:parent-style-name="Standard">
      <style:paragraph-properties fo:text-align="justify" style:justify-single-word="false"/>
      <style:text-properties fo:font-size="12pt" fo:font-weight="normal" officeooo:rsid="017cf6c8" officeooo:paragraph-rsid="027fd63e"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fo:font-size="12pt" fo:font-weight="normal" officeooo:rsid="017e3f57" officeooo:paragraph-rsid="027fd63e" style:font-size-asian="12pt" style:font-weight-asian="normal" style:font-size-complex="12pt" style:font-weight-complex="normal"/>
    </style:style>
    <style:style style:name="P308" style:family="paragraph" style:parent-style-name="Table_20_Contents">
      <style:paragraph-properties fo:text-align="justify" style:justify-single-word="false"/>
      <style:text-properties fo:font-size="12pt" officeooo:rsid="01801d2c" officeooo:paragraph-rsid="027fd63e" style:font-size-asian="12pt" style:font-size-complex="12pt"/>
    </style:style>
    <style:style style:name="P309" style:family="paragraph" style:parent-style-name="Table_20_Contents">
      <style:paragraph-properties fo:text-align="justify" style:justify-single-word="false"/>
      <style:text-properties fo:font-size="12pt" officeooo:rsid="0181c270" officeooo:paragraph-rsid="027fd63e" style:font-size-asian="12pt" style:font-size-complex="12pt"/>
    </style:style>
    <style:style style:name="P310" style:family="paragraph" style:parent-style-name="Standard">
      <style:paragraph-properties fo:text-align="justify" style:justify-single-word="false"/>
      <style:text-properties fo:font-size="12pt" fo:font-weight="normal" officeooo:rsid="0188cae0" officeooo:paragraph-rsid="04792447" style:font-size-asian="12pt" style:font-weight-asian="normal" style:font-size-complex="12pt" style:font-weight-complex="normal"/>
    </style:style>
    <style:style style:name="P311" style:family="paragraph" style:parent-style-name="Standard">
      <style:paragraph-properties fo:text-align="justify" style:justify-single-word="false"/>
      <style:text-properties fo:font-size="12pt" fo:font-weight="normal" officeooo:rsid="0181c270" officeooo:paragraph-rsid="027fd63e" style:font-size-asian="12pt" style:font-weight-asian="normal" style:font-size-complex="12pt" style:font-weight-complex="normal"/>
    </style:style>
    <style:style style:name="P312" style:family="paragraph" style:parent-style-name="Footnote">
      <style:text-properties officeooo:rsid="0187638d" officeooo:paragraph-rsid="0187638d"/>
    </style:style>
    <style:style style:name="P313" style:family="paragraph" style:parent-style-name="Standard">
      <style:paragraph-properties fo:text-align="justify" style:justify-single-word="false"/>
      <style:text-properties fo:font-size="12pt" fo:font-weight="normal" officeooo:rsid="01886a55" officeooo:paragraph-rsid="027fd63e"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fo:font-size="12pt" fo:font-weight="bold" officeooo:rsid="022f6448" officeooo:paragraph-rsid="027fd63e" style:font-size-asian="12pt" style:font-weight-asian="bold" style:font-size-complex="12pt" style:font-weight-complex="bold"/>
    </style:style>
    <style:style style:name="P315" style:family="paragraph" style:parent-style-name="Standard">
      <style:paragraph-properties fo:text-align="justify" style:justify-single-word="false"/>
      <style:text-properties fo:font-size="12pt" fo:font-weight="normal" officeooo:rsid="064e6439" officeooo:paragraph-rsid="064e6439"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font-size="12pt" officeooo:rsid="018dd9c7" officeooo:paragraph-rsid="027fd63e" style:font-size-asian="12pt" style:font-size-complex="12pt"/>
    </style:style>
    <style:style style:name="P317" style:family="paragraph" style:parent-style-name="Standard">
      <style:paragraph-properties fo:text-align="justify" style:justify-single-word="false"/>
      <style:text-properties fo:font-size="12pt" fo:font-weight="normal" officeooo:rsid="01917027" officeooo:paragraph-rsid="047a9463" style:font-size-asian="12pt" style:font-weight-asian="normal" style:font-size-complex="12pt" style:font-weight-complex="normal"/>
    </style:style>
    <style:style style:name="P318" style:family="paragraph" style:parent-style-name="Standard">
      <style:paragraph-properties fo:text-align="justify" style:justify-single-word="false"/>
      <style:text-properties fo:font-size="12pt" fo:font-weight="normal" officeooo:rsid="01917027" officeooo:paragraph-rsid="027fd63e" style:font-size-asian="12pt" style:font-weight-asian="normal" style:font-size-complex="12pt" style:font-weight-complex="normal"/>
    </style:style>
    <style:style style:name="P319" style:family="paragraph" style:parent-style-name="Standard">
      <style:paragraph-properties fo:text-align="justify" style:justify-single-word="false"/>
      <style:text-properties fo:font-size="12pt" fo:font-weight="normal" officeooo:rsid="0193f5e3" officeooo:paragraph-rsid="027fd63e" style:font-size-asian="12pt" style:font-weight-asian="normal" style:font-size-complex="12pt" style:font-weight-complex="normal"/>
    </style:style>
    <style:style style:name="P320" style:family="paragraph" style:parent-style-name="Standard">
      <style:paragraph-properties fo:text-align="center" style:justify-single-word="false"/>
      <style:text-properties officeooo:paragraph-rsid="047e7993"/>
    </style:style>
    <style:style style:name="P321" style:family="paragraph" style:parent-style-name="Standard">
      <style:paragraph-properties fo:text-align="justify" style:justify-single-word="false"/>
      <style:text-properties fo:font-size="12pt" fo:font-weight="normal" officeooo:rsid="040d1e28" officeooo:paragraph-rsid="001e271c" style:font-size-asian="12pt" style:font-weight-asian="normal" style:font-size-complex="12pt" style:font-weight-complex="normal"/>
    </style:style>
    <style:style style:name="P322" style:family="paragraph" style:parent-style-name="Standard">
      <style:paragraph-properties fo:text-align="justify" style:justify-single-word="false"/>
      <style:text-properties officeooo:paragraph-rsid="066273c0"/>
    </style:style>
    <style:style style:name="P323" style:family="paragraph" style:parent-style-name="Standard">
      <style:paragraph-properties fo:text-align="justify" style:justify-single-word="false"/>
      <style:text-properties fo:font-size="12pt" fo:font-weight="normal" officeooo:rsid="040d1e28" officeooo:paragraph-rsid="066273c0" style:font-size-asian="12pt" style:font-weight-asian="normal" style:font-size-complex="12pt" style:font-weight-complex="normal"/>
    </style:style>
    <style:style style:name="P324" style:family="paragraph" style:parent-style-name="Standard">
      <style:paragraph-properties fo:text-align="justify" style:justify-single-word="false"/>
      <style:text-properties officeooo:paragraph-rsid="001e271c"/>
    </style:style>
    <style:style style:name="P325" style:family="paragraph" style:parent-style-name="Standard">
      <style:paragraph-properties fo:text-align="justify" style:justify-single-word="false"/>
      <style:text-properties fo:font-size="12pt" fo:font-weight="normal" officeooo:rsid="04070cec" officeooo:paragraph-rsid="001e271c" style:font-size-asian="12pt" style:font-weight-asian="normal" style:font-size-complex="12pt" style:font-weight-complex="normal"/>
    </style:style>
    <style:style style:name="P326" style:family="paragraph" style:parent-style-name="Standard">
      <style:paragraph-properties fo:text-align="justify" style:justify-single-word="false"/>
      <style:text-properties fo:font-size="12pt" fo:font-weight="normal" officeooo:rsid="040d1e28" officeooo:paragraph-rsid="064f8467" style:font-size-asian="12pt" style:font-weight-asian="normal" style:font-size-complex="12pt" style:font-weight-complex="normal"/>
    </style:style>
    <style:style style:name="P327" style:family="paragraph" style:parent-style-name="Standard">
      <style:paragraph-properties fo:text-align="justify" style:justify-single-word="false"/>
      <style:text-properties fo:font-size="12pt" fo:font-weight="normal" officeooo:rsid="040f6a6d" officeooo:paragraph-rsid="001e271c" style:font-size-asian="12pt" style:font-weight-asian="normal" style:font-size-complex="12pt" style:font-weight-complex="normal"/>
    </style:style>
    <style:style style:name="P328" style:family="paragraph" style:parent-style-name="Footnote">
      <style:text-properties officeooo:rsid="03397c59" officeooo:paragraph-rsid="03397c59"/>
    </style:style>
    <style:style style:name="P329" style:family="paragraph" style:parent-style-name="Standard">
      <style:paragraph-properties fo:text-align="center" style:justify-single-word="false"/>
      <style:text-properties officeooo:paragraph-rsid="065222dc"/>
    </style:style>
    <style:style style:name="P330" style:family="paragraph" style:parent-style-name="Standard">
      <style:paragraph-properties fo:text-align="justify" style:justify-single-word="false"/>
      <style:text-properties officeooo:paragraph-rsid="064ffe4f"/>
    </style:style>
    <style:style style:name="P331" style:family="paragraph" style:parent-style-name="Footnote">
      <style:text-properties officeooo:paragraph-rsid="06403430"/>
    </style:style>
    <style:style style:name="P332" style:family="paragraph" style:parent-style-name="Standard">
      <style:paragraph-properties fo:text-align="justify" style:justify-single-word="false"/>
      <style:text-properties fo:font-size="12pt" fo:font-weight="normal" officeooo:rsid="0465636d" officeooo:paragraph-rsid="064ffe4f" style:font-size-asian="12pt" style:font-weight-asian="normal" style:font-size-complex="12pt" style:font-weight-complex="normal"/>
    </style:style>
    <style:style style:name="P333" style:family="paragraph" style:parent-style-name="Standard" style:list-style-name="L2">
      <style:paragraph-properties fo:text-align="justify" style:justify-single-word="false"/>
      <style:text-properties fo:font-size="12pt" fo:font-weight="normal" officeooo:rsid="0465636d" officeooo:paragraph-rsid="064ffe4f" style:font-size-asian="12pt" style:font-weight-asian="normal" style:font-size-complex="12pt" style:font-weight-complex="normal"/>
    </style:style>
    <style:style style:name="P334" style:family="paragraph" style:parent-style-name="Standard">
      <style:paragraph-properties fo:text-align="justify" style:justify-single-word="false"/>
      <style:text-properties fo:font-size="12pt" fo:font-weight="normal" officeooo:rsid="0465636d" officeooo:paragraph-rsid="001e271c" style:font-size-asian="12pt" style:font-weight-asian="normal" style:font-size-complex="12pt" style:font-weight-complex="normal"/>
    </style:style>
    <style:style style:name="P335" style:family="paragraph" style:parent-style-name="Horizontal_20_Line">
      <style:text-properties officeooo:paragraph-rsid="066273c0"/>
    </style:style>
    <style:style style:name="P336" style:family="paragraph" style:parent-style-name="Standard">
      <style:paragraph-properties fo:text-align="justify" style:justify-single-word="false"/>
      <style:text-properties style:font-name="Courier" fo:font-size="12pt" fo:font-style="normal" fo:font-weight="normal" officeooo:rsid="0021ebf9" officeooo:paragraph-rsid="001e271c" style:font-size-asian="12pt" style:font-style-asian="normal" style:font-weight-asian="normal" style:font-size-complex="12pt" style:font-style-complex="normal" style:font-weight-complex="normal"/>
    </style:style>
    <style:style style:name="P337" style:family="paragraph" style:parent-style-name="Table_20_Contents">
      <style:paragraph-properties fo:text-align="justify" style:justify-single-word="false"/>
      <style:text-properties style:font-name="Courier" fo:font-size="11pt" officeooo:paragraph-rsid="066273c0" style:font-size-asian="11pt" style:font-size-complex="11pt"/>
    </style:style>
    <style:style style:name="P338" style:family="paragraph" style:parent-style-name="Standard">
      <style:paragraph-properties fo:text-align="justify" style:justify-single-word="false"/>
      <style:text-properties fo:font-size="12pt" fo:font-weight="normal" officeooo:rsid="04699678" officeooo:paragraph-rsid="001e271c" style:font-size-asian="12pt" style:font-weight-asian="normal" style:font-size-complex="12pt" style:font-weight-complex="normal"/>
    </style:style>
    <style:style style:name="P339" style:family="paragraph" style:parent-style-name="Horizontal_20_Line">
      <style:text-properties officeooo:paragraph-rsid="001e271c"/>
    </style:style>
    <style:style style:name="P340" style:family="paragraph" style:parent-style-name="Table_20_Contents">
      <style:paragraph-properties fo:text-align="justify" style:justify-single-word="false"/>
      <style:text-properties style:font-name="Courier" fo:font-size="11pt" officeooo:paragraph-rsid="001e271c" style:font-size-asian="11pt" style:font-size-complex="11pt"/>
    </style:style>
    <style:style style:name="P341" style:family="paragraph" style:parent-style-name="Horizontal_20_Line">
      <style:text-properties fo:font-size="12pt" officeooo:paragraph-rsid="001e271c" style:font-size-asian="12pt" style:font-size-complex="12pt"/>
    </style:style>
    <style:style style:name="P342" style:family="paragraph" style:parent-style-name="Standard">
      <style:paragraph-properties fo:text-align="center" style:justify-single-word="false"/>
      <style:text-properties fo:font-size="12pt" fo:font-weight="bold" officeooo:rsid="0489ab65" officeooo:paragraph-rsid="001e271c" style:font-size-asian="12pt" style:font-weight-asian="bold" style:font-size-complex="12pt" style:font-weight-complex="bold"/>
    </style:style>
    <style:style style:name="P343" style:family="paragraph" style:parent-style-name="Standard">
      <style:paragraph-properties fo:text-align="justify" style:justify-single-word="false"/>
      <style:text-properties officeooo:paragraph-rsid="060ffe9e"/>
    </style:style>
    <style:style style:name="P344" style:family="paragraph" style:parent-style-name="Standard">
      <style:paragraph-properties fo:text-align="center" style:justify-single-word="false"/>
      <style:text-properties fo:font-size="12pt" fo:font-weight="bold" officeooo:rsid="048aa2c9" officeooo:paragraph-rsid="001e271c" style:font-size-asian="12pt" style:font-weight-asian="bold" style:font-size-complex="12pt" style:font-weight-complex="bold"/>
    </style:style>
    <style:style style:name="P345" style:family="paragraph" style:parent-style-name="Standard">
      <style:paragraph-properties fo:text-align="justify" style:justify-single-word="false"/>
      <style:text-properties fo:font-size="12pt" fo:font-weight="bold" officeooo:rsid="04888d6b" officeooo:paragraph-rsid="001e271c" style:font-size-asian="12pt" style:font-weight-asian="bold" style:font-size-complex="12pt" style:font-weight-complex="bold"/>
    </style:style>
    <style:style style:name="P346" style:family="paragraph" style:parent-style-name="Table_20_Contents">
      <style:paragraph-properties fo:text-align="justify" style:justify-single-word="false"/>
      <style:text-properties style:font-name="Courier" fo:font-size="12pt" fo:font-weight="normal" officeooo:rsid="048aa2c9" officeooo:paragraph-rsid="001e271c"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officeooo:paragraph-rsid="001e271c"/>
    </style:style>
    <style:style style:name="P348" style:family="paragraph" style:parent-style-name="Table_20_Contents">
      <style:paragraph-properties fo:text-align="justify" style:justify-single-word="false"/>
      <style:text-properties style:font-name="Courier" fo:font-size="12pt" fo:font-weight="normal" officeooo:rsid="048aa2c9" officeooo:paragraph-rsid="03cc35ef"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fo:font-size="12pt" fo:font-weight="bold" officeooo:rsid="04888d6b" officeooo:paragraph-rsid="001e271c" style:font-size-asian="12pt" style:font-weight-asian="bold" style:font-size-complex="12pt" style:font-weight-complex="bold"/>
    </style:style>
    <style:style style:name="P350" style:family="paragraph" style:parent-style-name="Standard">
      <style:paragraph-properties fo:text-align="left" style:justify-single-word="false"/>
      <style:text-properties style:font-name="Liberation Serif" fo:font-size="12pt" fo:font-style="italic" fo:font-weight="normal" officeooo:rsid="01ddb8c4" officeooo:paragraph-rsid="001e271c" style:font-size-asian="12pt" style:font-style-asian="italic" style:font-weight-asian="normal" style:font-size-complex="12pt" style:font-style-complex="italic" style:font-weight-complex="normal"/>
    </style:style>
    <style:style style:name="P351" style:family="paragraph" style:parent-style-name="Standard">
      <style:paragraph-properties fo:text-align="left" style:justify-single-word="false"/>
      <style:text-properties officeooo:paragraph-rsid="064ffe4f"/>
    </style:style>
    <style:style style:name="P352" style:family="paragraph" style:parent-style-name="Standard">
      <style:paragraph-properties fo:text-align="left" style:justify-single-word="false"/>
      <style:text-properties style:font-name="Courier" fo:font-size="12pt" fo:font-style="italic" fo:font-weight="normal" officeooo:rsid="03cf1436" officeooo:paragraph-rsid="04810dc4" style:font-size-asian="12pt" style:font-style-asian="italic" style:font-weight-asian="normal" style:font-size-complex="12pt" style:font-style-complex="italic" style:font-weight-complex="normal"/>
    </style:style>
    <style:style style:name="P353" style:family="paragraph" style:parent-style-name="Standard">
      <style:paragraph-properties fo:text-align="justify" style:justify-single-word="false"/>
      <style:text-properties fo:font-size="12pt" fo:font-weight="bold" officeooo:rsid="048aa2c9" officeooo:paragraph-rsid="001e271c" style:font-size-asian="12pt" style:font-weight-asian="bold" style:font-size-complex="12pt" style:font-weight-complex="bold"/>
    </style:style>
    <style:style style:name="P354" style:family="paragraph" style:parent-style-name="Standard">
      <style:paragraph-properties fo:text-align="justify" style:justify-single-word="false"/>
      <style:text-properties fo:font-size="12pt" fo:font-weight="bold" officeooo:rsid="0455e319" officeooo:paragraph-rsid="001e271c" style:font-size-asian="12pt" style:font-weight-asian="bold" style:font-size-complex="12pt" style:font-weight-complex="bold"/>
    </style:style>
    <style:style style:name="P355" style:family="paragraph" style:parent-style-name="Standard">
      <style:paragraph-properties fo:text-align="justify" style:justify-single-word="false"/>
      <style:text-properties fo:font-size="12pt" fo:font-weight="normal" officeooo:rsid="048c12bc" officeooo:paragraph-rsid="03d040ea" style:font-size-asian="12pt" style:font-weight-asian="normal" style:font-size-complex="12pt" style:font-weight-complex="normal"/>
    </style:style>
    <style:style style:name="P356" style:family="paragraph" style:parent-style-name="Standard">
      <style:paragraph-properties fo:text-align="justify" style:justify-single-word="false"/>
      <style:text-properties fo:font-size="12pt" fo:font-weight="normal" officeooo:rsid="04947f2c" officeooo:paragraph-rsid="001e271c" style:font-size-asian="12pt" style:font-weight-asian="normal" style:font-size-complex="12pt" style:font-weight-complex="normal"/>
    </style:style>
    <style:style style:name="P357" style:family="paragraph" style:parent-style-name="Standard">
      <style:paragraph-properties fo:text-align="justify" style:justify-single-word="false"/>
      <style:text-properties fo:font-size="12pt" fo:font-weight="normal" officeooo:rsid="0494dedd" officeooo:paragraph-rsid="001e271c" style:font-size-asian="12pt" style:font-weight-asian="normal" style:font-size-complex="12pt" style:font-weight-complex="normal"/>
    </style:style>
    <style:style style:name="P358" style:family="paragraph" style:parent-style-name="Standard">
      <style:paragraph-properties fo:text-align="justify" style:justify-single-word="false"/>
      <style:text-properties fo:font-size="12pt" fo:font-weight="normal" officeooo:rsid="04a17493" officeooo:paragraph-rsid="03d14737" style:font-size-asian="12pt" style:font-weight-asian="normal" style:font-size-complex="12pt" style:font-weight-complex="normal"/>
    </style:style>
    <style:style style:name="P359" style:family="paragraph" style:parent-style-name="Standard">
      <style:paragraph-properties fo:text-align="justify" style:justify-single-word="false"/>
      <style:text-properties officeooo:paragraph-rsid="0650887b"/>
    </style:style>
    <style:style style:name="P360" style:family="paragraph" style:parent-style-name="Standard">
      <style:paragraph-properties fo:text-align="justify" style:justify-single-word="false"/>
      <style:text-properties fo:font-size="12pt" fo:font-weight="normal" officeooo:rsid="0497ec70" officeooo:paragraph-rsid="001e271c" style:font-size-asian="12pt" style:font-weight-asian="normal" style:font-size-complex="12pt" style:font-weight-complex="normal"/>
    </style:style>
    <style:style style:name="P361" style:family="paragraph" style:parent-style-name="Standard">
      <style:paragraph-properties fo:text-align="justify" style:justify-single-word="false"/>
      <style:text-properties fo:font-size="12pt" fo:font-weight="normal" officeooo:rsid="04838021" officeooo:paragraph-rsid="0650887b" style:font-size-asian="12pt" style:font-weight-asian="normal" style:font-size-complex="12pt" style:font-weight-complex="normal"/>
    </style:style>
    <style:style style:name="P362" style:family="paragraph" style:parent-style-name="Standard">
      <style:paragraph-properties fo:text-align="justify" style:justify-single-word="false"/>
      <style:text-properties fo:font-size="12pt" fo:font-weight="normal" officeooo:rsid="03d21eb5" officeooo:paragraph-rsid="03d21eb5" style:font-size-asian="12pt" style:font-weight-asian="normal" style:font-size-complex="12pt" style:font-weight-complex="normal"/>
    </style:style>
    <style:style style:name="P363" style:family="paragraph" style:parent-style-name="Standard">
      <style:paragraph-properties fo:text-align="justify" style:justify-single-word="false"/>
      <style:text-properties fo:font-size="14pt" fo:font-weight="bold" officeooo:rsid="03d21eb5" officeooo:paragraph-rsid="001e271c" style:font-size-asian="14pt" style:font-weight-asian="bold" style:font-size-complex="14pt" style:font-weight-complex="bold"/>
    </style:style>
    <style:style style:name="P364" style:family="paragraph" style:parent-style-name="Standard">
      <style:paragraph-properties fo:text-align="justify" style:justify-single-word="false"/>
      <style:text-properties fo:font-size="14pt" fo:font-weight="bold" officeooo:rsid="06a6b977" officeooo:paragraph-rsid="001e271c" style:font-size-asian="14pt" style:font-weight-asian="bold" style:font-size-complex="14pt" style:font-weight-complex="bold"/>
    </style:style>
    <style:style style:name="P365" style:family="paragraph" style:parent-style-name="Standard">
      <style:paragraph-properties fo:text-align="justify" style:justify-single-word="false"/>
      <style:text-properties fo:font-size="18pt" fo:font-weight="bold" officeooo:rsid="06a6b977" officeooo:paragraph-rsid="001e271c" style:font-size-asian="18pt" style:font-weight-asian="bold" style:font-size-complex="18pt" style:font-weight-complex="bold"/>
    </style:style>
    <style:style style:name="P366" style:family="paragraph" style:parent-style-name="Standard">
      <style:paragraph-properties fo:text-align="center" style:justify-single-word="false"/>
      <style:text-properties fo:font-size="18pt" fo:font-weight="bold" officeooo:rsid="0643e15d" officeooo:paragraph-rsid="001e271c" style:font-size-asian="18pt" style:font-weight-asian="bold" style:font-size-complex="18pt" style:font-weight-complex="bold"/>
    </style:style>
    <style:style style:name="P367" style:family="paragraph" style:parent-style-name="Standard">
      <style:paragraph-properties fo:text-align="justify" style:justify-single-word="false"/>
      <style:text-properties officeooo:paragraph-rsid="065222dc"/>
    </style:style>
    <style:style style:name="P368" style:family="paragraph" style:parent-style-name="Standard">
      <style:paragraph-properties fo:text-align="justify" style:justify-single-word="false"/>
      <style:text-properties fo:font-size="12pt" fo:font-weight="normal" officeooo:rsid="06be0a8c" officeooo:paragraph-rsid="001e271c" style:font-size-asian="12pt" style:font-weight-asian="normal" style:font-size-complex="12pt" style:font-weight-complex="normal"/>
    </style:style>
    <style:style style:name="P369" style:family="paragraph" style:parent-style-name="Standard">
      <style:paragraph-properties fo:text-align="justify" style:justify-single-word="false"/>
      <style:text-properties fo:color="#808080" loext:opacity="100%" fo:font-size="12pt" fo:font-weight="normal" officeooo:rsid="0027fc66" officeooo:paragraph-rsid="001e271c" style:font-size-asian="12pt" style:font-weight-asian="normal" style:font-size-complex="12pt" style:font-weight-complex="normal"/>
    </style:style>
    <style:style style:name="P370" style:family="paragraph" style:parent-style-name="Standard">
      <style:paragraph-properties fo:text-align="justify" style:justify-single-word="false"/>
      <style:text-properties fo:font-size="12pt" fo:font-weight="normal" officeooo:rsid="06d04419" officeooo:paragraph-rsid="001e271c" style:font-size-asian="12pt" style:font-weight-asian="normal" style:font-size-complex="12pt" style:font-weight-complex="normal"/>
    </style:style>
    <style:style style:name="P371" style:family="paragraph" style:parent-style-name="Standard">
      <style:paragraph-properties fo:text-align="justify" style:justify-single-word="false"/>
      <style:text-properties fo:font-size="12pt" fo:font-weight="normal" officeooo:rsid="06c5a696" officeooo:paragraph-rsid="001e271c" style:font-size-asian="12pt" style:font-weight-asian="normal" style:font-size-complex="12pt" style:font-weight-complex="normal"/>
    </style:style>
    <style:style style:name="P372" style:family="paragraph" style:parent-style-name="Standard">
      <style:paragraph-properties fo:text-align="justify" style:justify-single-word="false"/>
      <style:text-properties fo:font-size="12pt" fo:font-weight="normal" officeooo:rsid="06c65e1a" officeooo:paragraph-rsid="001e271c" style:font-size-asian="12pt" style:font-weight-asian="normal" style:font-size-complex="12pt" style:font-weight-complex="normal"/>
    </style:style>
    <style:style style:name="P373" style:family="paragraph" style:parent-style-name="Table_20_Contents">
      <style:paragraph-properties fo:text-align="justify" style:justify-single-word="false"/>
      <style:text-properties style:font-name="Courier" fo:font-size="12pt" fo:font-style="normal" fo:font-weight="normal" officeooo:rsid="0021ebf9" officeooo:paragraph-rsid="001e271c"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fo:font-size="12pt" fo:font-weight="normal" officeooo:rsid="048a2ddb" officeooo:paragraph-rsid="044c52d9" style:font-size-asian="12pt" style:font-weight-asian="normal" style:font-size-complex="12pt" style:font-weight-complex="normal"/>
    </style:style>
    <style:style style:name="P375" style:family="paragraph" style:parent-style-name="Standard">
      <style:paragraph-properties fo:text-align="justify" style:justify-single-word="false"/>
      <style:text-properties fo:font-size="12pt" fo:font-weight="normal" officeooo:rsid="06d1fec8" officeooo:paragraph-rsid="001e271c" style:font-size-asian="12pt" style:font-weight-asian="normal" style:font-size-complex="12pt" style:font-weight-complex="normal"/>
    </style:style>
    <style:style style:name="P376" style:family="paragraph" style:parent-style-name="Standard">
      <style:paragraph-properties fo:text-align="justify" style:justify-single-word="false"/>
      <style:text-properties fo:font-size="12pt" fo:font-weight="normal" officeooo:rsid="06d2a6e3" officeooo:paragraph-rsid="001e271c" style:font-size-asian="12pt" style:font-weight-asian="normal" style:font-size-complex="12pt" style:font-weight-complex="normal"/>
    </style:style>
    <style:style style:name="P377" style:family="paragraph" style:parent-style-name="Standard">
      <style:paragraph-properties fo:text-align="justify" style:justify-single-word="false"/>
      <style:text-properties fo:font-size="12pt" fo:font-weight="normal" officeooo:rsid="06c927e1" officeooo:paragraph-rsid="001e271c" style:font-size-asian="12pt" style:font-weight-asian="normal" style:font-size-complex="12pt" style:font-weight-complex="normal"/>
    </style:style>
    <style:style style:name="P378" style:family="paragraph" style:parent-style-name="Standard">
      <style:paragraph-properties fo:text-align="justify" style:justify-single-word="false"/>
      <style:text-properties fo:font-size="12pt" fo:font-weight="normal" officeooo:rsid="06d631b0" officeooo:paragraph-rsid="001e271c" style:font-size-asian="12pt" style:font-weight-asian="normal" style:font-size-complex="12pt" style:font-weight-complex="normal"/>
    </style:style>
    <style:style style:name="P379" style:family="paragraph" style:parent-style-name="Standard">
      <style:paragraph-properties fo:text-align="justify" style:justify-single-word="false"/>
      <style:text-properties fo:font-size="12pt" fo:font-weight="normal" officeooo:rsid="048b16b7" officeooo:paragraph-rsid="044c52d9" style:font-size-asian="12pt" style:font-weight-asian="normal" style:font-size-complex="12pt" style:font-weight-complex="normal"/>
    </style:style>
    <style:style style:name="P380" style:family="paragraph" style:parent-style-name="Standard">
      <style:paragraph-properties fo:text-align="justify" style:justify-single-word="false"/>
      <style:text-properties style:font-name="Courier" fo:font-size="12pt" fo:font-style="normal" fo:font-weight="normal" officeooo:rsid="0021ebf9" officeooo:paragraph-rsid="044c52d9" style:font-size-asian="12pt" style:font-style-asian="normal" style:font-weight-asian="normal" style:font-size-complex="12pt" style:font-style-complex="normal" style:font-weight-complex="normal"/>
    </style:style>
    <style:style style:name="P381" style:family="paragraph" style:parent-style-name="Footnote">
      <style:text-properties officeooo:rsid="06d9f15f" officeooo:paragraph-rsid="06d9f15f"/>
    </style:style>
    <style:style style:name="P382" style:family="paragraph" style:parent-style-name="Standard">
      <style:paragraph-properties fo:text-align="justify" style:justify-single-word="false"/>
      <style:text-properties fo:font-size="12pt" fo:font-weight="normal" officeooo:rsid="06dbb081" officeooo:paragraph-rsid="001e271c" style:font-size-asian="12pt" style:font-weight-asian="normal" style:font-size-complex="12pt" style:font-weight-complex="normal"/>
    </style:style>
    <style:style style:name="P383" style:family="paragraph" style:parent-style-name="Standard">
      <style:paragraph-properties fo:text-align="justify" style:justify-single-word="false"/>
      <style:text-properties fo:font-size="12pt" fo:font-weight="normal" officeooo:rsid="06dd93e5" officeooo:paragraph-rsid="001e271c" style:font-size-asian="12pt" style:font-weight-asian="normal" style:font-size-complex="12pt" style:font-weight-complex="normal"/>
    </style:style>
    <style:style style:name="P384" style:family="paragraph" style:parent-style-name="Standard">
      <style:paragraph-properties fo:text-align="justify" style:justify-single-word="false"/>
      <style:text-properties fo:font-size="12pt" fo:font-weight="normal" officeooo:rsid="0653d54e" officeooo:paragraph-rsid="0653d54e" style:font-size-asian="12pt" style:font-weight-asian="normal" style:font-size-complex="12pt" style:font-weight-complex="normal"/>
    </style:style>
    <style:style style:name="P385" style:family="paragraph" style:parent-style-name="Standard">
      <style:paragraph-properties fo:text-align="justify" style:justify-single-word="false"/>
      <style:text-properties fo:font-size="12pt" fo:font-weight="normal" officeooo:rsid="06e77972" officeooo:paragraph-rsid="001e271c" style:font-size-asian="12pt" style:font-weight-asian="normal" style:font-size-complex="12pt" style:font-weight-complex="normal"/>
    </style:style>
    <style:style style:name="P386" style:family="paragraph" style:parent-style-name="Standard">
      <style:paragraph-properties fo:text-align="justify" style:justify-single-word="false"/>
      <style:text-properties fo:font-size="12pt" fo:font-weight="normal" officeooo:rsid="06e0d100" officeooo:paragraph-rsid="001e271c" style:font-size-asian="12pt" style:font-weight-asian="normal" style:font-size-complex="12pt" style:font-weight-complex="normal"/>
    </style:style>
    <style:style style:name="P387" style:family="paragraph" style:parent-style-name="Standard">
      <style:paragraph-properties fo:text-align="justify" style:justify-single-word="false"/>
      <style:text-properties officeooo:paragraph-rsid="0653d54e"/>
    </style:style>
    <style:style style:name="P388" style:family="paragraph" style:parent-style-name="Footnote">
      <style:text-properties officeooo:rsid="06ea6ee0" officeooo:paragraph-rsid="048fc858"/>
    </style:style>
    <style:style style:name="P389" style:family="paragraph" style:parent-style-name="Footnote">
      <style:text-properties officeooo:rsid="06f3498f" officeooo:paragraph-rsid="06f3498f"/>
    </style:style>
    <style:style style:name="P390" style:family="paragraph" style:parent-style-name="Standard">
      <style:paragraph-properties fo:text-align="justify" style:justify-single-word="false"/>
      <style:text-properties fo:font-size="12pt" fo:font-weight="normal" officeooo:rsid="0702ba65" officeooo:paragraph-rsid="001e271c" style:font-size-asian="12pt" style:font-weight-asian="normal" style:font-size-complex="12pt" style:font-weight-complex="normal"/>
    </style:style>
    <style:style style:name="P391" style:family="paragraph" style:parent-style-name="Standard">
      <style:paragraph-properties fo:text-align="justify" style:justify-single-word="false"/>
      <style:text-properties fo:font-size="12pt" fo:font-weight="normal" officeooo:rsid="06efcd22" officeooo:paragraph-rsid="001e271c" style:font-size-asian="12pt" style:font-weight-asian="normal" style:font-size-complex="12pt" style:font-weight-complex="normal"/>
    </style:style>
    <style:style style:name="P392" style:family="paragraph" style:parent-style-name="Standard">
      <style:paragraph-properties fo:text-align="justify" style:justify-single-word="false"/>
      <style:text-properties fo:font-size="12pt" fo:font-weight="normal" officeooo:rsid="048fc858" officeooo:paragraph-rsid="048fc858" style:font-size-asian="12pt" style:font-weight-asian="normal" style:font-size-complex="12pt" style:font-weight-complex="normal"/>
    </style:style>
    <style:style style:name="P393" style:family="paragraph" style:parent-style-name="Standard">
      <style:paragraph-properties fo:text-align="justify" style:justify-single-word="false"/>
      <style:text-properties fo:font-size="12pt" fo:font-weight="normal" officeooo:rsid="06f35c2f" officeooo:paragraph-rsid="001e271c" style:font-size-asian="12pt" style:font-weight-asian="normal" style:font-size-complex="12pt" style:font-weight-complex="normal"/>
    </style:style>
    <style:style style:name="P394" style:family="paragraph" style:parent-style-name="Standard">
      <style:paragraph-properties fo:text-align="justify" style:justify-single-word="false"/>
      <style:text-properties fo:font-size="12pt" fo:font-weight="normal" officeooo:rsid="06f7c016" officeooo:paragraph-rsid="001e271c" style:font-size-asian="12pt" style:font-weight-asian="normal" style:font-size-complex="12pt" style:font-weight-complex="normal"/>
    </style:style>
    <style:style style:name="P395" style:family="paragraph" style:parent-style-name="Standard">
      <style:paragraph-properties fo:text-align="justify" style:justify-single-word="false"/>
      <style:text-properties fo:font-size="12pt" fo:font-weight="normal" officeooo:rsid="06cb1fca" officeooo:paragraph-rsid="001e271c" style:font-size-asian="12pt" style:font-weight-asian="normal" style:font-size-complex="12pt" style:font-weight-complex="normal"/>
    </style:style>
    <style:style style:name="P396" style:family="paragraph" style:parent-style-name="Standard">
      <style:paragraph-properties fo:text-align="justify" style:justify-single-word="false"/>
      <style:text-properties fo:font-size="12pt" fo:font-weight="normal" officeooo:rsid="06e5d86a" officeooo:paragraph-rsid="001e271c" style:font-size-asian="12pt" style:font-weight-asian="normal" style:font-size-complex="12pt" style:font-weight-complex="normal"/>
    </style:style>
    <style:style style:name="P397" style:family="paragraph" style:parent-style-name="Standard">
      <style:paragraph-properties fo:text-align="justify" style:justify-single-word="false"/>
      <style:text-properties fo:color="#808080" loext:opacity="100%" fo:font-size="12pt" fo:font-weight="normal" officeooo:rsid="0027fc66" officeooo:paragraph-rsid="0653d54e" style:font-size-asian="12pt" style:font-weight-asian="normal" style:font-size-complex="12pt" style:font-weight-complex="normal"/>
    </style:style>
    <style:style style:name="P398" style:family="paragraph" style:parent-style-name="Standard">
      <style:paragraph-properties fo:text-align="justify" style:justify-single-word="false"/>
      <style:text-properties fo:font-size="12pt" fo:font-weight="normal" officeooo:rsid="06fde8a3" officeooo:paragraph-rsid="001e271c" style:font-size-asian="12pt" style:font-weight-asian="normal" style:font-size-complex="12pt" style:font-weight-complex="normal"/>
    </style:style>
    <style:style style:name="P399" style:family="paragraph" style:parent-style-name="Standard">
      <style:paragraph-properties fo:text-align="justify" style:justify-single-word="false"/>
      <style:text-properties fo:font-size="12pt" fo:font-weight="normal" officeooo:rsid="07083d7b" officeooo:paragraph-rsid="001e271c" style:font-size-asian="12pt" style:font-weight-asian="normal" style:font-size-complex="12pt" style:font-weight-complex="normal"/>
    </style:style>
    <style:style style:name="P400" style:family="paragraph" style:parent-style-name="Standard">
      <style:paragraph-properties fo:text-align="justify" style:justify-single-word="false"/>
      <style:text-properties fo:font-size="12pt" fo:font-weight="normal" officeooo:rsid="070adc0a" officeooo:paragraph-rsid="001e271c" style:font-size-asian="12pt" style:font-weight-asian="normal" style:font-size-complex="12pt" style:font-weight-complex="normal"/>
    </style:style>
    <style:style style:name="P401" style:family="paragraph" style:parent-style-name="Standard">
      <style:paragraph-properties fo:text-align="justify" style:justify-single-word="false"/>
      <style:text-properties fo:font-size="12pt" fo:font-weight="normal" officeooo:rsid="070c4142" officeooo:paragraph-rsid="001e271c" style:font-size-asian="12pt" style:font-weight-asian="normal" style:font-size-complex="12pt" style:font-weight-complex="normal"/>
    </style:style>
    <style:style style:name="P402" style:family="paragraph" style:parent-style-name="Standard">
      <style:paragraph-properties fo:text-align="justify" style:justify-single-word="false"/>
      <style:text-properties fo:font-size="12pt" fo:font-weight="normal" officeooo:rsid="07017306" officeooo:paragraph-rsid="001e271c" style:font-size-asian="12pt" style:font-weight-asian="normal" style:font-size-complex="12pt" style:font-weight-complex="normal"/>
    </style:style>
    <style:style style:name="P403" style:family="paragraph" style:parent-style-name="Standard">
      <style:paragraph-properties fo:text-align="justify" style:justify-single-word="false"/>
      <style:text-properties fo:font-size="12pt" fo:font-weight="normal" officeooo:rsid="0702ba65" officeooo:paragraph-rsid="0653d54e" style:font-size-asian="12pt" style:font-weight-asian="normal" style:font-size-complex="12pt" style:font-weight-complex="normal"/>
    </style:style>
    <style:style style:name="P404" style:family="paragraph" style:parent-style-name="Standard">
      <style:paragraph-properties fo:text-align="justify" style:justify-single-word="false"/>
      <style:text-properties fo:font-size="12pt" fo:font-weight="bold" officeooo:rsid="070f36b0" officeooo:paragraph-rsid="001e271c" style:font-size-asian="12pt" style:font-weight-asian="bold" style:font-size-complex="12pt" style:font-weight-complex="bold"/>
    </style:style>
    <style:style style:name="P405" style:family="paragraph" style:parent-style-name="Standard">
      <style:paragraph-properties fo:text-align="justify" style:justify-single-word="false"/>
      <style:text-properties fo:font-size="12pt" fo:font-weight="normal" officeooo:rsid="06548b2f" officeooo:paragraph-rsid="06548b2f" style:font-size-asian="12pt" style:font-weight-asian="normal" style:font-size-complex="12pt" style:font-weight-complex="normal"/>
    </style:style>
    <style:style style:name="P406" style:family="paragraph" style:parent-style-name="Standard">
      <style:paragraph-properties fo:text-align="justify" style:justify-single-word="false"/>
      <style:text-properties fo:font-size="13pt" fo:font-weight="bold" officeooo:rsid="070f36b0" officeooo:paragraph-rsid="001e271c" style:font-size-asian="13pt" style:font-weight-asian="bold" style:font-size-complex="13pt" style:font-weight-complex="bold"/>
    </style:style>
    <style:style style:name="P407" style:family="paragraph" style:parent-style-name="Standard">
      <style:paragraph-properties fo:text-align="justify" style:justify-single-word="false"/>
      <style:text-properties fo:font-size="13pt" fo:font-weight="bold" officeooo:rsid="02391998" officeooo:paragraph-rsid="001e271c" style:font-size-asian="13pt" style:font-weight-asian="bold" style:font-size-complex="13pt" style:font-weight-complex="bold"/>
    </style:style>
    <style:style style:name="P408" style:family="paragraph" style:parent-style-name="Standard">
      <style:paragraph-properties fo:text-align="center" style:justify-single-word="false"/>
      <style:text-properties fo:font-size="12pt" fo:font-weight="bold" officeooo:rsid="09ba0ddb" officeooo:paragraph-rsid="001e271c" style:font-size-asian="12pt" style:font-weight-asian="bold" style:font-size-complex="12pt" style:font-weight-complex="bold"/>
    </style:style>
    <style:style style:name="P409" style:family="paragraph" style:parent-style-name="Standard">
      <style:paragraph-properties fo:text-align="center" style:justify-single-word="false"/>
      <style:text-properties fo:font-size="18pt" fo:font-weight="bold" officeooo:rsid="02391998" officeooo:paragraph-rsid="001e271c" style:font-size-asian="18pt" style:font-weight-asian="bold" style:font-size-complex="18pt" style:font-weight-complex="bold"/>
    </style:style>
    <style:style style:name="P410" style:family="paragraph" style:parent-style-name="Standard">
      <style:paragraph-properties fo:text-align="justify" style:justify-single-word="false"/>
      <style:text-properties officeooo:paragraph-rsid="040829eb"/>
    </style:style>
    <style:style style:name="P411" style:family="paragraph" style:parent-style-name="Standard">
      <style:paragraph-properties fo:text-align="justify" style:justify-single-word="false"/>
      <style:text-properties fo:font-size="12pt" fo:font-weight="normal" officeooo:rsid="040a1959" officeooo:paragraph-rsid="040829eb" style:font-size-asian="12pt" style:font-weight-asian="normal" style:font-size-complex="12pt" style:font-weight-complex="normal"/>
    </style:style>
    <style:style style:name="P412" style:family="paragraph" style:parent-style-name="Standard">
      <style:paragraph-properties fo:text-align="justify" style:justify-single-word="false"/>
      <style:text-properties fo:font-size="12pt" fo:font-weight="normal" officeooo:rsid="04a7af56" officeooo:paragraph-rsid="001e271c"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font-size="13pt" officeooo:rsid="0d570f22" officeooo:paragraph-rsid="001e271c" style:font-size-asian="13pt" style:font-size-complex="13pt"/>
    </style:style>
    <style:style style:name="P414" style:family="paragraph" style:parent-style-name="Standard">
      <style:paragraph-properties fo:text-align="justify" style:justify-single-word="false"/>
      <style:text-properties fo:font-size="12pt" fo:font-weight="normal" officeooo:rsid="04ac6167" officeooo:paragraph-rsid="001e271c" style:font-size-asian="12pt" style:font-weight-asian="normal" style:font-size-complex="12pt" style:font-weight-complex="normal"/>
    </style:style>
    <style:style style:name="P415" style:family="paragraph" style:parent-style-name="Footnote">
      <style:text-properties officeooo:rsid="049a5967" officeooo:paragraph-rsid="040f7c3e"/>
    </style:style>
    <style:style style:name="P416" style:family="paragraph" style:parent-style-name="Standard">
      <style:paragraph-properties fo:text-align="justify" style:justify-single-word="false"/>
      <style:text-properties fo:font-size="12pt" fo:font-weight="normal" officeooo:rsid="0d14e2b3" officeooo:paragraph-rsid="001e271c"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font-size="13pt" officeooo:rsid="0d16309b" officeooo:paragraph-rsid="001e271c" style:font-size-asian="13pt" style:font-size-complex="13pt"/>
    </style:style>
    <style:style style:name="P418" style:family="paragraph" style:parent-style-name="Standard">
      <style:paragraph-properties fo:text-align="justify" style:justify-single-word="false"/>
      <style:text-properties fo:font-size="12pt" fo:font-weight="normal" officeooo:rsid="0d1a7aea" officeooo:paragraph-rsid="001e271c"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font-size="13pt" officeooo:rsid="0d1902ba" officeooo:paragraph-rsid="001e271c" style:font-size-asian="13pt" style:font-size-complex="13pt"/>
    </style:style>
    <style:style style:name="P420" style:family="paragraph" style:parent-style-name="Table_20_Contents">
      <style:paragraph-properties fo:text-align="justify" style:justify-single-word="false"/>
      <style:text-properties fo:font-size="12pt" officeooo:rsid="0d1902ba" officeooo:paragraph-rsid="001e271c" style:font-size-asian="12pt" style:font-size-complex="12pt"/>
    </style:style>
    <style:style style:name="P421" style:family="paragraph" style:parent-style-name="Table_20_Contents">
      <style:paragraph-properties fo:text-align="justify" style:justify-single-word="false"/>
      <style:text-properties fo:font-size="12pt" officeooo:rsid="0d1ad91b" officeooo:paragraph-rsid="001e271c" style:font-size-asian="12pt" style:font-size-complex="12pt"/>
    </style:style>
    <style:style style:name="P422" style:family="paragraph" style:parent-style-name="Table_20_Contents">
      <style:paragraph-properties fo:text-align="justify" style:justify-single-word="false"/>
      <style:text-properties fo:font-size="13pt" officeooo:rsid="0d2606f6" officeooo:paragraph-rsid="001e271c" style:font-size-asian="13pt" style:font-size-complex="13pt"/>
    </style:style>
    <style:style style:name="P423" style:family="paragraph" style:parent-style-name="Standard">
      <style:paragraph-properties fo:text-align="justify" style:justify-single-word="false"/>
      <style:text-properties fo:font-size="10pt" fo:font-weight="normal" officeooo:rsid="0d355eaa" officeooo:paragraph-rsid="04a2f3c0" style:font-size-asian="10pt" style:font-weight-asian="normal" style:font-size-complex="10pt" style:font-weight-complex="normal"/>
    </style:style>
    <style:style style:name="P424" style:family="paragraph" style:parent-style-name="Footnote">
      <style:text-properties officeooo:paragraph-rsid="011c93e8"/>
    </style:style>
    <style:style style:name="P425" style:family="paragraph" style:parent-style-name="Standard">
      <style:paragraph-properties fo:text-align="justify" style:justify-single-word="false"/>
      <style:text-properties style:font-name="Liberation Serif" fo:font-size="12pt" fo:font-weight="normal" officeooo:rsid="011015a4" officeooo:paragraph-rsid="065565b6"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font-size="12pt" officeooo:rsid="011c30b0" officeooo:paragraph-rsid="065fcc80" style:font-size-asian="12pt" style:font-size-complex="12pt"/>
    </style:style>
    <style:style style:name="P427" style:family="paragraph" style:parent-style-name="Table_20_Contents">
      <style:paragraph-properties fo:text-align="justify" style:justify-single-word="false"/>
      <style:text-properties style:font-name="Courier" fo:font-size="12pt" fo:font-weight="normal" officeooo:rsid="011c93e8" officeooo:paragraph-rsid="065fcc80" style:font-size-asian="12pt" style:font-weight-asian="normal" style:font-size-complex="12pt" style:font-weight-complex="normal"/>
    </style:style>
    <style:style style:name="P428" style:family="paragraph" style:parent-style-name="Footnote">
      <style:paragraph-properties fo:margin-left="0in" fo:text-indent="0in" style:auto-text-indent="false"/>
      <style:text-properties officeooo:paragraph-rsid="041e0134"/>
    </style:style>
    <style:style style:name="P429" style:family="paragraph" style:parent-style-name="Table_20_Contents">
      <style:paragraph-properties fo:text-align="justify" style:justify-single-word="false"/>
      <style:text-properties fo:font-size="12pt" officeooo:rsid="05131cd1" officeooo:paragraph-rsid="065fcc80" style:font-size-asian="12pt" style:font-size-complex="12pt"/>
    </style:style>
    <style:style style:name="P430" style:family="paragraph" style:parent-style-name="Table_20_Contents">
      <style:paragraph-properties fo:text-align="left" style:justify-single-word="false"/>
      <style:text-properties fo:font-size="12pt" officeooo:rsid="011c30b0" officeooo:paragraph-rsid="065fcc80" style:font-size-asian="12pt" style:font-size-complex="12pt"/>
    </style:style>
    <style:style style:name="P431" style:family="paragraph" style:parent-style-name="Standard">
      <style:paragraph-properties fo:text-align="justify" style:justify-single-word="false"/>
      <style:text-properties style:font-name="Liberation Serif" fo:font-size="12pt" fo:font-weight="normal" officeooo:rsid="010e95bc" officeooo:paragraph-rsid="065fcc80" style:font-size-asian="12pt" style:font-weight-asian="normal" style:font-size-complex="12pt" style:font-weight-complex="normal"/>
    </style:style>
    <style:style style:name="P432" style:family="paragraph" style:parent-style-name="Standard">
      <style:paragraph-properties fo:text-align="center" style:justify-single-word="false"/>
      <style:text-properties officeooo:paragraph-rsid="065fcc80"/>
    </style:style>
    <style:style style:name="P433" style:family="paragraph" style:parent-style-name="Standard">
      <style:paragraph-properties fo:text-align="justify" style:justify-single-word="false"/>
      <style:text-properties fo:font-size="12pt" fo:font-weight="normal" officeooo:rsid="0d1cae2f" officeooo:paragraph-rsid="065565b6" style:font-size-asian="12pt" style:font-weight-asian="normal" style:font-size-complex="12pt" style:font-weight-complex="normal"/>
    </style:style>
    <style:style style:name="P434" style:family="paragraph" style:parent-style-name="Standard">
      <style:paragraph-properties fo:text-align="justify" style:justify-single-word="false"/>
      <style:text-properties officeooo:paragraph-rsid="065fcc80"/>
    </style:style>
    <style:style style:name="P435" style:family="paragraph" style:parent-style-name="Standard">
      <style:paragraph-properties fo:text-align="justify" style:justify-single-word="false"/>
      <style:text-properties fo:font-size="12pt" officeooo:rsid="01089405" officeooo:paragraph-rsid="065fcc80" style:font-size-asian="12pt" style:font-size-complex="12pt"/>
    </style:style>
    <style:style style:name="P436" style:family="paragraph" style:parent-style-name="Table_20_Contents">
      <style:paragraph-properties fo:text-align="justify" style:justify-single-word="false"/>
      <style:text-properties officeooo:rsid="01089405" officeooo:paragraph-rsid="065fcc80"/>
    </style:style>
    <style:style style:name="P437" style:family="paragraph" style:parent-style-name="Table_20_Contents">
      <style:paragraph-properties fo:text-align="justify" style:justify-single-word="false"/>
      <style:text-properties fo:color="#808080" loext:opacity="100%" fo:font-size="12pt" officeooo:rsid="01089405" officeooo:paragraph-rsid="065fcc80" style:font-size-asian="12pt" style:font-size-complex="12pt"/>
    </style:style>
    <style:style style:name="P438" style:family="paragraph" style:parent-style-name="Standard">
      <style:paragraph-properties fo:text-align="justify" style:justify-single-word="false"/>
      <style:text-properties fo:font-size="12pt" fo:font-weight="normal" officeooo:rsid="0618d4cf" officeooo:paragraph-rsid="065fcc80" style:font-size-asian="12pt" style:font-weight-asian="normal" style:font-size-complex="12pt" style:font-weight-complex="normal"/>
    </style:style>
    <style:style style:name="P439" style:family="paragraph" style:parent-style-name="Horizontal_20_Line">
      <style:text-properties fo:font-size="12pt" officeooo:paragraph-rsid="065fcc80" style:font-size-asian="12pt" style:font-size-complex="12pt"/>
    </style:style>
    <style:style style:name="P440" style:family="paragraph" style:parent-style-name="Table_20_Contents">
      <style:text-properties style:font-name="Courier" fo:font-size="11pt" officeooo:paragraph-rsid="065fcc80" style:font-size-asian="11pt" style:font-size-complex="11pt"/>
    </style:style>
    <style:style style:name="P441" style:family="paragraph" style:parent-style-name="Horizontal_20_Line">
      <style:text-properties officeooo:paragraph-rsid="065fcc80"/>
    </style:style>
    <style:style style:name="P442" style:family="paragraph" style:parent-style-name="Text_20_body">
      <style:paragraph-properties fo:text-align="center" style:justify-single-word="false"/>
      <style:text-properties fo:font-size="12pt" officeooo:paragraph-rsid="065fcc80" style:font-size-asian="12pt" style:font-size-complex="12pt"/>
    </style:style>
    <style:style style:name="P443" style:family="paragraph" style:parent-style-name="Standard">
      <style:paragraph-properties fo:text-align="justify" style:justify-single-word="false"/>
      <style:text-properties fo:font-size="12pt" fo:font-weight="bold" officeooo:rsid="02330c21" officeooo:paragraph-rsid="065fcc80" style:font-size-asian="12pt" style:font-weight-asian="bold" style:font-size-complex="12pt" style:font-weight-complex="bold"/>
    </style:style>
    <style:style style:name="P444" style:family="paragraph" style:parent-style-name="Table_20_Contents">
      <style:paragraph-properties fo:text-align="justify" style:justify-single-word="false"/>
      <style:text-properties fo:font-size="13pt" officeooo:rsid="010b4b1a" officeooo:paragraph-rsid="065fcc80" style:font-size-asian="13pt" style:font-size-complex="13pt"/>
    </style:style>
    <style:style style:name="P445" style:family="paragraph" style:parent-style-name="Table_20_Contents">
      <style:paragraph-properties fo:text-align="justify" style:justify-single-word="false"/>
      <style:text-properties fo:font-size="12pt" officeooo:rsid="010b4b1a" officeooo:paragraph-rsid="065fcc80" style:font-size-asian="12pt" style:font-size-complex="12pt"/>
    </style:style>
    <style:style style:name="P446" style:family="paragraph" style:parent-style-name="Table_20_Contents">
      <style:paragraph-properties fo:text-align="justify" style:justify-single-word="false"/>
      <style:text-properties fo:font-size="12pt" officeooo:rsid="010f520f" officeooo:paragraph-rsid="065fcc80" style:font-size-asian="12pt" style:font-size-complex="12pt"/>
    </style:style>
    <style:style style:name="P447" style:family="paragraph" style:parent-style-name="Standard">
      <style:paragraph-properties fo:text-align="justify" style:justify-single-word="false"/>
      <style:text-properties fo:font-size="12pt" fo:font-weight="normal" officeooo:rsid="0d355eaa" officeooo:paragraph-rsid="001e271c" style:font-size-asian="12pt" style:font-weight-asian="normal" style:font-size-complex="12pt" style:font-weight-complex="normal"/>
    </style:style>
    <style:style style:name="P448" style:family="paragraph" style:parent-style-name="Standard">
      <style:paragraph-properties fo:text-align="justify" style:justify-single-word="false"/>
      <style:text-properties fo:font-size="12pt" fo:font-weight="bold" officeooo:rsid="023abbef" officeooo:paragraph-rsid="001e271c" style:font-size-asian="12pt" style:font-weight-asian="bold" style:font-size-complex="12pt" style:font-weight-complex="bold"/>
    </style:style>
    <style:style style:name="P449" style:family="paragraph" style:parent-style-name="Standard">
      <style:paragraph-properties fo:text-align="justify" style:justify-single-word="false"/>
      <style:text-properties fo:font-size="12pt" fo:font-weight="bold" officeooo:rsid="023abbef" officeooo:paragraph-rsid="001e271c" style:font-size-asian="10.5pt" style:font-weight-asian="bold" style:font-size-complex="12pt" style:font-weight-complex="bold"/>
    </style:style>
    <style:style style:name="P450" style:family="paragraph" style:parent-style-name="Standard">
      <style:paragraph-properties fo:text-align="center" style:justify-single-word="false"/>
      <style:text-properties fo:font-size="18pt" fo:font-weight="bold" officeooo:rsid="066cfbbe" officeooo:paragraph-rsid="001e271c" style:font-size-asian="18pt" style:font-weight-asian="bold" style:font-size-complex="18pt" style:font-weight-complex="bold"/>
    </style:style>
    <style:style style:name="P451" style:family="paragraph" style:parent-style-name="Standard">
      <style:paragraph-properties fo:text-align="justify" style:justify-single-word="false"/>
      <style:text-properties fo:font-size="12pt" fo:font-weight="bold" officeooo:rsid="066cfbbe" officeooo:paragraph-rsid="001e271c" style:font-size-asian="12pt" style:font-weight-asian="bold" style:font-size-complex="12pt" style:font-weight-complex="bold"/>
    </style:style>
    <style:style style:name="P452" style:family="paragraph" style:parent-style-name="Standard">
      <style:paragraph-properties fo:text-align="justify" style:justify-single-word="false"/>
      <style:text-properties fo:font-size="12pt" fo:font-weight="normal" officeooo:rsid="066e0a98" officeooo:paragraph-rsid="001e271c" style:font-size-asian="12pt" style:font-weight-asian="normal" style:font-size-complex="12pt" style:font-weight-complex="normal"/>
    </style:style>
    <style:style style:name="P453" style:family="paragraph" style:parent-style-name="Standard">
      <style:paragraph-properties fo:text-align="justify" style:justify-single-word="false"/>
      <style:text-properties fo:font-size="12pt" fo:font-weight="normal" officeooo:rsid="0683af9c" officeooo:paragraph-rsid="001e271c" style:font-size-asian="12pt" style:font-weight-asian="normal" style:font-size-complex="12pt" style:font-weight-complex="normal"/>
    </style:style>
    <style:style style:name="P454" style:family="paragraph" style:parent-style-name="Footnote">
      <style:text-properties officeooo:paragraph-rsid="0d8d3834"/>
    </style:style>
    <style:style style:name="P455" style:family="paragraph" style:parent-style-name="Standard">
      <style:paragraph-properties fo:text-align="justify" style:justify-single-word="false"/>
      <style:text-properties fo:font-size="12pt" fo:font-weight="normal" officeooo:rsid="068c0026" officeooo:paragraph-rsid="001e271c" style:font-size-asian="12pt" style:font-weight-asian="normal" style:font-size-complex="12pt" style:font-weight-complex="normal"/>
    </style:style>
    <style:style style:name="P456" style:family="paragraph" style:parent-style-name="Standard">
      <style:paragraph-properties fo:text-align="justify" style:justify-single-word="false"/>
      <style:text-properties fo:font-size="12pt" fo:font-weight="normal" officeooo:rsid="068967e8" officeooo:paragraph-rsid="001e271c" style:font-size-asian="12pt" style:font-weight-asian="normal" style:font-size-complex="12pt" style:font-weight-complex="normal"/>
    </style:style>
    <style:style style:name="P457" style:family="paragraph" style:parent-style-name="Standard">
      <style:paragraph-properties fo:text-align="justify" style:justify-single-word="false"/>
      <style:text-properties fo:font-size="12pt" fo:font-weight="normal" officeooo:rsid="068c0026" officeooo:paragraph-rsid="04ae9a80" style:font-size-asian="12pt" style:font-weight-asian="normal" style:font-size-complex="12pt" style:font-weight-complex="normal"/>
    </style:style>
    <style:style style:name="P458" style:family="paragraph" style:parent-style-name="Standard">
      <style:paragraph-properties fo:text-align="justify" style:justify-single-word="false"/>
      <style:text-properties fo:font-size="12pt" fo:font-weight="normal" officeooo:rsid="068a5577" officeooo:paragraph-rsid="001e271c" style:font-size-asian="12pt" style:font-weight-asian="normal" style:font-size-complex="12pt" style:font-weight-complex="normal"/>
    </style:style>
    <style:style style:name="P459" style:family="paragraph" style:parent-style-name="Standard">
      <style:paragraph-properties fo:text-align="justify" style:justify-single-word="false"/>
      <style:text-properties fo:font-size="12pt" fo:font-weight="normal" officeooo:rsid="068b13c2" officeooo:paragraph-rsid="001e271c" style:font-size-asian="12pt" style:font-weight-asian="normal" style:font-size-complex="12pt" style:font-weight-complex="normal"/>
    </style:style>
    <style:style style:name="P460" style:family="paragraph" style:parent-style-name="Standard">
      <style:paragraph-properties fo:text-align="justify" style:justify-single-word="false"/>
      <style:text-properties fo:font-size="12pt" fo:font-weight="normal" officeooo:rsid="0d6c304f" officeooo:paragraph-rsid="001e271c" style:font-size-asian="12pt" style:font-weight-asian="normal" style:font-size-complex="12pt" style:font-weight-complex="normal"/>
    </style:style>
    <style:style style:name="P461" style:family="paragraph" style:parent-style-name="Standard">
      <style:paragraph-properties fo:text-align="justify" style:justify-single-word="false"/>
      <style:text-properties fo:font-size="12pt" fo:font-weight="normal" officeooo:rsid="068f75a9" officeooo:paragraph-rsid="05c31711" style:font-size-asian="12pt" style:font-weight-asian="normal" style:font-size-complex="12pt" style:font-weight-complex="normal"/>
    </style:style>
    <style:style style:name="P462" style:family="paragraph" style:parent-style-name="Standard">
      <style:paragraph-properties fo:text-align="justify" style:justify-single-word="false"/>
      <style:text-properties officeooo:paragraph-rsid="05c31711"/>
    </style:style>
    <style:style style:name="P463" style:family="paragraph" style:parent-style-name="Standard">
      <style:paragraph-properties fo:text-align="justify" style:justify-single-word="false"/>
      <style:text-properties fo:font-size="12pt" fo:font-weight="normal" officeooo:rsid="068f6c16" officeooo:paragraph-rsid="01b63785" style:font-size-asian="12pt" style:font-weight-asian="normal" style:font-size-complex="12pt" style:font-weight-complex="normal"/>
    </style:style>
    <style:style style:name="P464" style:family="paragraph" style:parent-style-name="Standard">
      <style:paragraph-properties fo:text-align="justify" style:justify-single-word="false"/>
      <style:text-properties fo:font-size="12pt" fo:font-weight="normal" officeooo:rsid="068f75a9" officeooo:paragraph-rsid="001e271c" style:font-size-asian="12pt" style:font-weight-asian="normal" style:font-size-complex="12pt" style:font-weight-complex="normal"/>
    </style:style>
    <style:style style:name="P465" style:family="paragraph" style:parent-style-name="Standard">
      <style:paragraph-properties fo:text-align="justify" style:justify-single-word="false"/>
      <style:text-properties officeooo:paragraph-rsid="01b63785"/>
    </style:style>
    <style:style style:name="P466" style:family="paragraph" style:parent-style-name="Standard">
      <style:paragraph-properties fo:text-align="justify" style:justify-single-word="false"/>
      <style:text-properties fo:font-size="12pt" fo:font-weight="normal" officeooo:rsid="0692a5c8" officeooo:paragraph-rsid="001e271c" style:font-size-asian="12pt" style:font-weight-asian="normal" style:font-size-complex="12pt" style:font-weight-complex="normal"/>
    </style:style>
    <style:style style:name="P467" style:family="paragraph" style:parent-style-name="Standard">
      <style:paragraph-properties fo:text-align="justify" style:justify-single-word="false"/>
      <style:text-properties fo:color="#808080" loext:opacity="100%" fo:font-size="12pt" fo:font-weight="normal" officeooo:rsid="0027fc66" officeooo:paragraph-rsid="0655cf7e" style:font-size-asian="12pt" style:font-weight-asian="normal" style:font-size-complex="12pt" style:font-weight-complex="normal"/>
    </style:style>
    <style:style style:name="P468" style:family="paragraph" style:parent-style-name="Standard">
      <style:paragraph-properties fo:text-align="justify" style:justify-single-word="false"/>
      <style:text-properties fo:font-size="14pt" fo:font-weight="bold" officeooo:rsid="023abbef" officeooo:paragraph-rsid="001e271c" style:font-size-asian="14pt" style:font-weight-asian="bold" style:font-size-complex="14pt" style:font-weight-complex="bold"/>
    </style:style>
    <style:style style:name="P469" style:family="paragraph" style:parent-style-name="Standard">
      <style:paragraph-properties fo:text-align="center" style:justify-single-word="false"/>
      <style:text-properties fo:font-size="18pt" fo:font-weight="bold" officeooo:rsid="023abbef" officeooo:paragraph-rsid="001e271c" style:font-size-asian="18pt" style:font-weight-asian="bold" style:font-size-complex="18pt" style:font-weight-complex="bold"/>
    </style:style>
    <style:style style:name="P470" style:family="paragraph" style:parent-style-name="Standard">
      <style:paragraph-properties fo:text-align="justify" style:justify-single-word="false"/>
      <style:text-properties fo:font-size="12pt" fo:font-weight="normal" officeooo:rsid="04b5ee0b" officeooo:paragraph-rsid="001e271c" style:font-size-asian="12pt" style:font-weight-asian="normal" style:font-size-complex="12pt" style:font-weight-complex="normal"/>
    </style:style>
    <style:style style:name="P471" style:family="paragraph" style:parent-style-name="Standard">
      <style:paragraph-properties fo:text-align="center" style:justify-single-word="false"/>
      <style:text-properties fo:font-size="13pt" fo:font-weight="bold" officeooo:rsid="06579bb3" officeooo:paragraph-rsid="06579bb3" style:font-size-asian="13pt" style:font-weight-asian="bold" style:font-size-complex="13pt" style:font-weight-complex="bold"/>
    </style:style>
    <style:style style:name="P472" style:family="paragraph" style:parent-style-name="Standard" style:list-style-name="L3">
      <style:paragraph-properties fo:text-align="justify" style:justify-single-word="false"/>
      <style:text-properties fo:font-size="12pt" fo:font-weight="normal" officeooo:rsid="04b5ee0b" officeooo:paragraph-rsid="06574cbd" style:font-size-asian="12pt" style:font-weight-asian="normal" style:font-size-complex="12pt" style:font-weight-complex="normal"/>
    </style:style>
    <style:style style:name="P473" style:family="paragraph" style:parent-style-name="Standard" style:list-style-name="L3">
      <style:paragraph-properties fo:text-align="justify" style:justify-single-word="false"/>
      <style:text-properties officeooo:paragraph-rsid="06574cbd"/>
    </style:style>
    <style:style style:name="P474" style:family="paragraph" style:parent-style-name="Standard">
      <style:paragraph-properties fo:text-align="justify" style:justify-single-word="false"/>
      <style:text-properties fo:font-size="12pt" fo:font-weight="normal" officeooo:rsid="04b7983e" officeooo:paragraph-rsid="001e271c" style:font-size-asian="12pt" style:font-weight-asian="normal" style:font-size-complex="12pt" style:font-weight-complex="normal"/>
    </style:style>
    <style:style style:name="P475" style:family="paragraph" style:parent-style-name="Table_20_Contents">
      <style:paragraph-properties fo:text-align="justify" style:justify-single-word="false"/>
      <style:text-properties fo:font-size="13pt" officeooo:rsid="0d52110e" officeooo:paragraph-rsid="001e271c" style:font-size-asian="13pt" style:font-size-complex="13pt"/>
    </style:style>
    <style:style style:name="P476" style:family="paragraph" style:parent-style-name="Standard">
      <style:paragraph-properties fo:text-align="justify" style:justify-single-word="false"/>
      <style:text-properties officeooo:paragraph-rsid="0433ccdd"/>
    </style:style>
    <style:style style:name="P477" style:family="paragraph" style:parent-style-name="Table_20_Contents">
      <style:paragraph-properties fo:text-align="justify" style:justify-single-word="false"/>
      <style:text-properties fo:font-size="12pt" officeooo:rsid="0d52110e" officeooo:paragraph-rsid="001e271c" style:font-size-asian="12pt" style:font-size-complex="12pt"/>
    </style:style>
    <style:style style:name="P478" style:family="paragraph" style:parent-style-name="Table_20_Contents">
      <style:paragraph-properties fo:text-align="justify" style:justify-single-word="false"/>
      <style:text-properties fo:font-size="12pt" officeooo:rsid="0d52110e" officeooo:paragraph-rsid="06574cbd" style:font-size-asian="12pt" style:font-size-complex="12pt"/>
    </style:style>
    <style:style style:name="P479" style:family="paragraph" style:parent-style-name="Table_20_Contents">
      <style:paragraph-properties fo:text-align="justify" style:justify-single-word="false"/>
      <style:text-properties fo:font-size="13pt" officeooo:rsid="0d52110e" officeooo:paragraph-rsid="06574cbd" style:font-size-asian="13pt" style:font-size-complex="13pt"/>
    </style:style>
    <style:style style:name="P480" style:family="paragraph" style:parent-style-name="Standard">
      <style:paragraph-properties fo:text-align="justify" style:justify-single-word="false"/>
      <style:text-properties fo:font-size="12pt" fo:font-weight="normal" officeooo:rsid="04b7983e" officeooo:paragraph-rsid="04bfa321" style:font-size-asian="12pt" style:font-weight-asian="normal" style:font-size-complex="12pt" style:font-weight-complex="normal"/>
    </style:style>
    <style:style style:name="P481" style:family="paragraph" style:parent-style-name="Standard">
      <style:paragraph-properties fo:text-align="justify" style:justify-single-word="false"/>
      <style:text-properties fo:font-size="12pt" fo:font-weight="normal" officeooo:rsid="04b98f49" officeooo:paragraph-rsid="001e271c" style:font-size-asian="12pt" style:font-weight-asian="normal" style:font-size-complex="12pt" style:font-weight-complex="normal"/>
    </style:style>
    <style:style style:name="P482" style:family="paragraph" style:parent-style-name="Standard">
      <style:paragraph-properties fo:text-align="justify" style:justify-single-word="false"/>
      <style:text-properties officeooo:paragraph-rsid="06574cbd"/>
    </style:style>
    <style:style style:name="P483" style:family="paragraph" style:parent-style-name="Standard">
      <style:paragraph-properties fo:text-align="justify" style:justify-single-word="false"/>
      <style:text-properties fo:font-size="12pt" fo:font-weight="normal" officeooo:rsid="04b7983e" officeooo:paragraph-rsid="06574cbd" style:font-size-asian="12pt" style:font-weight-asian="normal" style:font-size-complex="12pt" style:font-weight-complex="normal"/>
    </style:style>
    <style:style style:name="P484" style:family="paragraph" style:parent-style-name="Standard">
      <style:paragraph-properties fo:text-align="justify" style:justify-single-word="false"/>
      <style:text-properties fo:font-size="12pt" fo:font-weight="normal" officeooo:rsid="04b98f49" officeooo:paragraph-rsid="06574cbd" style:font-size-asian="12pt" style:font-weight-asian="normal" style:font-size-complex="12pt" style:font-weight-complex="normal"/>
    </style:style>
    <style:style style:name="P485" style:family="paragraph" style:parent-style-name="Standard">
      <style:paragraph-properties fo:text-align="justify" style:justify-single-word="false"/>
      <style:text-properties fo:font-size="12pt" fo:font-weight="normal" officeooo:rsid="00b30070" officeooo:paragraph-rsid="0128fc01" style:font-size-asian="12pt" style:font-weight-asian="normal" style:font-size-complex="12pt" style:font-weight-complex="normal"/>
    </style:style>
    <style:style style:name="P486" style:family="paragraph" style:parent-style-name="Footnote">
      <style:text-properties officeooo:rsid="012958af" officeooo:paragraph-rsid="012958af"/>
    </style:style>
    <style:style style:name="P487" style:family="paragraph" style:parent-style-name="Table_20_Contents">
      <style:paragraph-properties fo:text-align="justify" style:justify-single-word="false"/>
      <style:text-properties fo:font-size="12pt" officeooo:rsid="0128fc01" officeooo:paragraph-rsid="0128fc01" style:font-size-asian="12pt" style:font-size-complex="12pt"/>
    </style:style>
    <style:style style:name="P488" style:family="paragraph" style:parent-style-name="Standard">
      <style:paragraph-properties fo:text-align="justify" style:justify-single-word="false"/>
      <style:text-properties fo:font-size="12pt" fo:font-weight="normal" officeooo:rsid="00b30070" officeooo:paragraph-rsid="06574cbd" style:font-size-asian="12pt" style:font-weight-asian="normal" style:font-size-complex="12pt" style:font-weight-complex="normal"/>
    </style:style>
    <style:style style:name="P489" style:family="paragraph" style:parent-style-name="Table_20_Contents">
      <style:paragraph-properties fo:text-align="justify" style:justify-single-word="false"/>
      <style:text-properties fo:font-size="12pt" officeooo:rsid="00b4fdf6" officeooo:paragraph-rsid="00b4fdf6" style:font-size-asian="12pt" style:font-size-complex="12pt"/>
    </style:style>
    <style:style style:name="P490" style:family="paragraph" style:parent-style-name="Standard">
      <style:paragraph-properties fo:text-align="justify" style:justify-single-word="false"/>
      <style:text-properties fo:color="#808080" loext:opacity="100%" fo:font-size="12pt" fo:font-weight="normal" officeooo:rsid="0027fc66" officeooo:paragraph-rsid="06574cbd" style:font-size-asian="12pt" style:font-weight-asian="normal" style:font-size-complex="12pt" style:font-weight-complex="normal"/>
    </style:style>
    <style:style style:name="P491" style:family="paragraph" style:parent-style-name="Standard">
      <style:paragraph-properties fo:text-align="justify" style:justify-single-word="false"/>
      <style:text-properties fo:font-size="12pt" fo:font-weight="normal" officeooo:rsid="01299497" officeooo:paragraph-rsid="01299497" style:font-size-asian="12pt" style:font-weight-asian="normal" style:font-size-complex="12pt" style:font-weight-complex="normal"/>
    </style:style>
    <style:style style:name="P492" style:family="paragraph" style:parent-style-name="Table_20_Contents">
      <style:paragraph-properties fo:text-align="justify" style:justify-single-word="false"/>
      <style:text-properties fo:font-size="12pt" officeooo:rsid="012a0123" officeooo:paragraph-rsid="012a0123" style:font-size-asian="12pt" style:font-size-complex="12pt"/>
    </style:style>
    <style:style style:name="P493" style:family="paragraph" style:parent-style-name="Standard">
      <style:paragraph-properties fo:text-align="justify" style:justify-single-word="false"/>
      <style:text-properties officeooo:paragraph-rsid="0434fc7c"/>
    </style:style>
    <style:style style:name="P494" style:family="paragraph" style:parent-style-name="Standard">
      <style:paragraph-properties fo:text-align="justify" style:justify-single-word="false"/>
      <style:text-properties fo:font-size="12pt" fo:font-weight="normal" officeooo:rsid="0434fc7c" officeooo:paragraph-rsid="0434fc7c" style:font-size-asian="12pt" style:font-weight-asian="normal" style:font-size-complex="12pt" style:font-weight-complex="normal"/>
    </style:style>
    <style:style style:name="P495" style:family="paragraph" style:parent-style-name="Table_20_Contents">
      <style:paragraph-properties fo:text-align="justify" style:justify-single-word="false"/>
      <style:text-properties fo:font-size="12pt" officeooo:rsid="0434fc7c" officeooo:paragraph-rsid="0434fc7c" style:font-size-asian="12pt" style:font-size-complex="12pt"/>
    </style:style>
    <style:style style:name="P496" style:family="paragraph" style:parent-style-name="Table_20_Contents">
      <style:paragraph-properties fo:text-align="justify" style:justify-single-word="false"/>
      <style:text-properties fo:font-size="12pt" officeooo:rsid="0434fc7c" officeooo:paragraph-rsid="06574cbd" style:font-size-asian="12pt" style:font-size-complex="12pt"/>
    </style:style>
    <style:style style:name="P497" style:family="paragraph" style:parent-style-name="Standard">
      <style:paragraph-properties fo:text-align="justify" style:justify-single-word="false"/>
      <style:text-properties fo:font-size="12pt" fo:font-weight="normal" officeooo:rsid="04365b05" officeooo:paragraph-rsid="06574cbd" style:font-size-asian="12pt" style:font-weight-asian="normal" style:font-size-complex="12pt" style:font-weight-complex="normal"/>
    </style:style>
    <style:style style:name="P498" style:family="paragraph" style:parent-style-name="Standard">
      <style:paragraph-properties fo:text-align="justify" style:justify-single-word="false"/>
      <style:text-properties fo:font-size="12pt" fo:font-weight="normal" officeooo:rsid="0434fc7c" officeooo:paragraph-rsid="04365b05" style:font-size-asian="12pt" style:font-weight-asian="normal" style:font-size-complex="12pt" style:font-weight-complex="normal"/>
    </style:style>
    <style:style style:name="P499" style:family="paragraph" style:parent-style-name="Table_20_Contents">
      <style:paragraph-properties fo:text-align="justify" style:justify-single-word="false"/>
      <style:text-properties fo:font-size="12pt" officeooo:rsid="0434fc7c" officeooo:paragraph-rsid="04365b05" style:font-size-asian="12pt" style:font-size-complex="12pt"/>
    </style:style>
    <style:style style:name="P500" style:family="paragraph" style:parent-style-name="Standard">
      <style:paragraph-properties fo:text-align="justify" style:justify-single-word="false"/>
      <style:text-properties fo:font-size="12pt" fo:font-weight="normal" officeooo:rsid="0434fc7c" officeooo:paragraph-rsid="05963542" style:font-size-asian="12pt" style:font-weight-asian="normal" style:font-size-complex="12pt" style:font-weight-complex="normal"/>
    </style:style>
    <style:style style:name="P501" style:family="paragraph" style:parent-style-name="Table_20_Contents">
      <style:paragraph-properties fo:text-align="justify" style:justify-single-word="false"/>
      <style:text-properties fo:font-size="12pt" officeooo:rsid="0434fc7c" officeooo:paragraph-rsid="05963542" style:font-size-asian="12pt" style:font-size-complex="12pt"/>
    </style:style>
    <style:style style:name="P502" style:family="paragraph" style:parent-style-name="Preformatted_20_Text">
      <style:paragraph-properties fo:text-align="justify" style:justify-single-word="false"/>
      <style:text-properties fo:color="#2a6099" loext:opacity="100%" fo:font-size="12pt" fo:font-weight="normal" officeooo:rsid="0434fc7c" officeooo:paragraph-rsid="05963542" style:font-size-asian="12pt" style:font-weight-asian="normal" style:font-size-complex="12pt" style:font-weight-complex="normal"/>
    </style:style>
    <style:style style:name="P503" style:family="paragraph" style:parent-style-name="Preformatted_20_Text">
      <style:paragraph-properties fo:text-align="justify" style:justify-single-word="false" fo:orphans="0" fo:widows="0"/>
      <style:text-properties fo:color="#2a6099" loext:opacity="100%" fo:font-size="12pt" fo:font-weight="normal" officeooo:rsid="0434fc7c" style:font-size-asian="12pt" style:font-weight-asian="normal" style:font-size-complex="12pt" style:font-weight-complex="normal"/>
    </style:style>
    <style:style style:name="P504" style:family="paragraph" style:parent-style-name="Preformatted_20_Text">
      <style:paragraph-properties fo:margin-top="0in" fo:margin-bottom="0.1965in" style:contextual-spacing="false" fo:text-align="justify" style:justify-single-word="false" fo:orphans="0" fo:widows="0"/>
      <style:text-properties fo:color="#2a6099" loext:opacity="100%" fo:font-size="12pt" fo:font-weight="normal" officeooo:rsid="0434fc7c" style:font-size-asian="12pt" style:font-weight-asian="normal" style:font-size-complex="12pt" style:font-weight-complex="normal"/>
    </style:style>
    <style:style style:name="P505" style:family="paragraph" style:parent-style-name="Standard">
      <style:paragraph-properties fo:text-align="justify" style:justify-single-word="false"/>
      <style:text-properties fo:font-size="12pt" fo:font-weight="normal" officeooo:rsid="0434fc7c" officeooo:paragraph-rsid="05987b75" style:font-size-asian="12pt" style:font-weight-asian="normal" style:font-size-complex="12pt" style:font-weight-complex="normal"/>
    </style:style>
    <style:style style:name="P506" style:family="paragraph" style:parent-style-name="Table_20_Contents">
      <style:paragraph-properties fo:text-align="justify" style:justify-single-word="false"/>
      <style:text-properties officeooo:paragraph-rsid="05987b75"/>
    </style:style>
    <style:style style:name="P507" style:family="paragraph" style:parent-style-name="Preformatted_20_Text">
      <style:paragraph-properties fo:text-align="justify" style:justify-single-word="false"/>
      <style:text-properties fo:color="#ff0000" loext:opacity="100%" fo:font-size="12pt" fo:font-weight="normal" officeooo:rsid="05963542" officeooo:paragraph-rsid="05987b75" style:font-size-asian="12pt" style:font-weight-asian="normal" style:font-size-complex="12pt" style:font-weight-complex="normal"/>
    </style:style>
    <style:style style:name="P508" style:family="paragraph" style:parent-style-name="Table_20_Contents">
      <style:paragraph-properties fo:text-align="justify" style:justify-single-word="false"/>
      <style:text-properties fo:font-size="12pt" officeooo:rsid="05963542" officeooo:paragraph-rsid="05987b75" style:font-size-asian="12pt" style:font-size-complex="12pt"/>
    </style:style>
    <style:style style:name="P509" style:family="paragraph" style:parent-style-name="Standard">
      <style:paragraph-properties fo:text-align="justify" style:justify-single-word="false"/>
      <style:text-properties fo:font-size="12pt" fo:font-weight="normal" officeooo:rsid="04b98f49" officeooo:paragraph-rsid="05987b75" style:font-size-asian="12pt" style:font-weight-asian="normal" style:font-size-complex="12pt" style:font-weight-complex="normal"/>
    </style:style>
    <style:style style:name="P510" style:family="paragraph" style:parent-style-name="Standard">
      <style:paragraph-properties fo:text-align="justify" style:justify-single-word="false"/>
      <style:text-properties officeooo:paragraph-rsid="0594d25f"/>
    </style:style>
    <style:style style:name="P511" style:family="paragraph" style:parent-style-name="Footnote">
      <style:text-properties officeooo:paragraph-rsid="0598c912"/>
    </style:style>
    <style:style style:name="P512" style:family="paragraph" style:parent-style-name="Table_20_Contents">
      <style:paragraph-properties fo:text-align="justify" style:justify-single-word="false"/>
      <style:text-properties officeooo:paragraph-rsid="0598c912"/>
    </style:style>
    <style:style style:name="P513" style:family="paragraph" style:parent-style-name="Standard">
      <style:paragraph-properties fo:text-align="justify" style:justify-single-word="false"/>
      <style:text-properties fo:font-size="12pt" fo:font-weight="normal" officeooo:rsid="0598c912" officeooo:paragraph-rsid="0594d25f" style:font-size-asian="12pt" style:font-weight-asian="normal" style:font-size-complex="12pt" style:font-weight-complex="normal"/>
    </style:style>
    <style:style style:name="P514" style:family="paragraph" style:parent-style-name="Footnote">
      <style:text-properties officeooo:paragraph-rsid="059a537a"/>
    </style:style>
    <style:style style:name="P515" style:family="paragraph" style:parent-style-name="Table_20_Contents">
      <style:paragraph-properties fo:text-align="justify" style:justify-single-word="false"/>
      <style:text-properties officeooo:paragraph-rsid="059b87dd"/>
    </style:style>
    <style:style style:name="P516" style:family="paragraph" style:parent-style-name="Table_20_Contents">
      <style:paragraph-properties fo:text-align="justify" style:justify-single-word="false"/>
      <style:text-properties officeooo:paragraph-rsid="06579bb3"/>
    </style:style>
    <style:style style:name="P517" style:family="paragraph" style:parent-style-name="Standard">
      <style:paragraph-properties fo:text-align="justify" style:justify-single-word="false"/>
      <style:text-properties fo:font-size="12pt" fo:font-weight="normal" officeooo:rsid="0598c912" officeooo:paragraph-rsid="0598c912" style:font-size-asian="12pt" style:font-weight-asian="normal" style:font-size-complex="12pt" style:font-weight-complex="normal"/>
    </style:style>
    <style:style style:name="P518" style:family="paragraph" style:parent-style-name="Standard">
      <style:paragraph-properties fo:text-align="justify" style:justify-single-word="false"/>
      <style:text-properties fo:font-size="12pt" fo:font-weight="normal" officeooo:rsid="0598c912" officeooo:paragraph-rsid="059d2674" style:font-size-asian="12pt" style:font-weight-asian="normal" style:font-size-complex="12pt" style:font-weight-complex="normal"/>
    </style:style>
    <style:style style:name="P519" style:family="paragraph" style:parent-style-name="Table_20_Contents">
      <style:paragraph-properties fo:text-align="justify" style:justify-single-word="false"/>
      <style:text-properties officeooo:paragraph-rsid="05edd9fb"/>
    </style:style>
    <style:style style:name="P520" style:family="paragraph" style:parent-style-name="Table_20_Contents">
      <style:paragraph-properties fo:text-align="justify" style:justify-single-word="false"/>
      <style:text-properties fo:color="#808080" loext:opacity="100%" officeooo:paragraph-rsid="05edd9fb"/>
    </style:style>
    <style:style style:name="P521" style:family="paragraph" style:parent-style-name="Table_20_Contents">
      <style:paragraph-properties fo:text-align="justify" style:justify-single-word="false"/>
      <style:text-properties officeooo:paragraph-rsid="059d2674"/>
    </style:style>
    <style:style style:name="P522" style:family="paragraph" style:parent-style-name="Standard">
      <style:paragraph-properties fo:text-align="justify" style:justify-single-word="false"/>
      <style:text-properties fo:font-size="12pt" fo:font-weight="normal" officeooo:rsid="059c3e28" officeooo:paragraph-rsid="0594d25f" style:font-size-asian="12pt" style:font-weight-asian="normal" style:font-size-complex="12pt" style:font-weight-complex="normal"/>
    </style:style>
    <style:style style:name="P523" style:family="paragraph" style:parent-style-name="Footnote">
      <style:text-properties officeooo:rsid="05a39793" officeooo:paragraph-rsid="05a39793"/>
    </style:style>
    <style:style style:name="P524" style:family="paragraph" style:parent-style-name="Standard">
      <style:paragraph-properties fo:text-align="justify" style:justify-single-word="false"/>
      <style:text-properties fo:font-size="12pt" fo:font-weight="normal" officeooo:rsid="0598c912" officeooo:paragraph-rsid="05a082fd" style:font-size-asian="12pt" style:font-weight-asian="normal" style:font-size-complex="12pt" style:font-weight-complex="normal"/>
    </style:style>
    <style:style style:name="P525" style:family="paragraph" style:parent-style-name="Table_20_Contents">
      <style:paragraph-properties fo:text-align="justify" style:justify-single-word="false"/>
      <style:text-properties officeooo:paragraph-rsid="05a0aee2"/>
    </style:style>
    <style:style style:name="P526" style:family="paragraph" style:parent-style-name="Standard">
      <style:paragraph-properties fo:text-align="justify" style:justify-single-word="false"/>
      <style:text-properties fo:font-size="12pt" fo:font-weight="normal" officeooo:rsid="0598c912" officeooo:paragraph-rsid="05a0aee2" style:font-size-asian="12pt" style:font-weight-asian="normal" style:font-size-complex="12pt" style:font-weight-complex="normal"/>
    </style:style>
    <style:style style:name="P527" style:family="paragraph" style:parent-style-name="Standard">
      <style:paragraph-properties fo:text-align="justify" style:justify-single-word="false"/>
      <style:text-properties fo:font-size="12pt" fo:font-weight="normal" officeooo:rsid="05a25531" officeooo:paragraph-rsid="05a25531" style:font-size-asian="12pt" style:font-weight-asian="normal" style:font-size-complex="12pt" style:font-weight-complex="normal"/>
    </style:style>
    <style:style style:name="P528" style:family="paragraph" style:parent-style-name="Standard">
      <style:paragraph-properties fo:text-align="justify" style:justify-single-word="false"/>
      <style:text-properties fo:font-size="12pt" fo:font-weight="normal" officeooo:rsid="0598c912" officeooo:paragraph-rsid="05a25531" style:font-size-asian="12pt" style:font-weight-asian="normal" style:font-size-complex="12pt" style:font-weight-complex="normal"/>
    </style:style>
    <style:style style:name="P529" style:family="paragraph" style:parent-style-name="Table_20_Contents">
      <style:paragraph-properties fo:text-align="justify" style:justify-single-word="false"/>
      <style:text-properties officeooo:paragraph-rsid="05a25531"/>
    </style:style>
    <style:style style:name="P530" style:family="paragraph" style:parent-style-name="Standard">
      <style:paragraph-properties fo:text-align="justify" style:justify-single-word="false"/>
      <style:text-properties fo:font-size="12pt" fo:font-weight="normal" officeooo:rsid="05e987ab" officeooo:paragraph-rsid="001e271c" style:font-size-asian="12pt" style:font-weight-asian="normal" style:font-size-complex="12pt" style:font-weight-complex="normal"/>
    </style:style>
    <style:style style:name="P531" style:family="paragraph" style:parent-style-name="Standard">
      <style:paragraph-properties fo:text-align="justify" style:justify-single-word="false"/>
      <style:text-properties fo:font-size="12pt" fo:font-weight="normal" officeooo:rsid="06579bb3" officeooo:paragraph-rsid="001e271c" style:font-size-asian="12pt" style:font-weight-asian="normal" style:font-size-complex="12pt" style:font-weight-complex="normal"/>
    </style:style>
    <style:style style:name="P532" style:family="paragraph" style:parent-style-name="Standard">
      <style:paragraph-properties fo:text-align="justify" style:justify-single-word="false"/>
      <style:text-properties fo:font-size="12pt" fo:font-weight="normal" officeooo:rsid="06579bb3" officeooo:paragraph-rsid="06579bb3" style:font-size-asian="12pt" style:font-weight-asian="normal" style:font-size-complex="12pt" style:font-weight-complex="normal"/>
    </style:style>
    <style:style style:name="P533" style:family="paragraph" style:parent-style-name="Standard">
      <style:paragraph-properties fo:text-align="justify" style:justify-single-word="false"/>
      <style:text-properties fo:font-size="12pt" fo:font-weight="normal" officeooo:rsid="0598c912" officeooo:paragraph-rsid="06579bb3" style:font-size-asian="12pt" style:font-weight-asian="normal" style:font-size-complex="12pt" style:font-weight-complex="normal"/>
    </style:style>
    <style:style style:name="P534" style:family="paragraph" style:parent-style-name="Standard">
      <style:paragraph-properties fo:text-align="justify" style:justify-single-word="false"/>
      <style:text-properties fo:font-size="12pt" fo:font-weight="normal" officeooo:rsid="05e987ab" officeooo:paragraph-rsid="05e987ab" style:font-size-asian="12pt" style:font-weight-asian="normal" style:font-size-complex="12pt" style:font-weight-complex="normal"/>
    </style:style>
    <style:style style:name="P535" style:family="paragraph" style:parent-style-name="Standard">
      <style:paragraph-properties fo:text-align="center" style:justify-single-word="false"/>
      <style:text-properties fo:font-size="12pt" fo:font-weight="bold" officeooo:rsid="09ba0ddb" officeooo:paragraph-rsid="06579bb3" style:font-size-asian="12pt" style:font-weight-asian="bold" style:font-size-complex="12pt" style:font-weight-complex="bold"/>
    </style:style>
    <style:style style:name="P536" style:family="paragraph" style:parent-style-name="Standard">
      <style:paragraph-properties fo:text-align="center" style:justify-single-word="false"/>
      <style:text-properties fo:font-size="13pt" fo:font-weight="bold" officeooo:rsid="0438a0dc" officeooo:paragraph-rsid="0438a0dc" style:font-size-asian="13pt" style:font-weight-asian="bold" style:font-size-complex="13pt" style:font-weight-complex="bold"/>
    </style:style>
    <style:style style:name="P537" style:family="paragraph" style:parent-style-name="Standard">
      <style:paragraph-properties fo:text-align="justify" style:justify-single-word="false"/>
      <style:text-properties fo:font-size="12pt" fo:font-weight="normal" officeooo:rsid="04c03f17" officeooo:paragraph-rsid="04c218d1" style:font-size-asian="12pt" style:font-weight-asian="normal" style:font-size-complex="12pt" style:font-weight-complex="normal"/>
    </style:style>
    <style:style style:name="P538" style:family="paragraph" style:parent-style-name="Standard">
      <style:paragraph-properties fo:text-align="justify" style:justify-single-word="false"/>
      <style:text-properties officeooo:paragraph-rsid="06594c02"/>
    </style:style>
    <style:style style:name="P539" style:family="paragraph" style:parent-style-name="Footnote">
      <style:paragraph-properties fo:margin-left="0in" fo:margin-right="0in" fo:text-indent="0in" style:auto-text-indent="false"/>
      <style:text-properties officeooo:paragraph-rsid="06403430"/>
    </style:style>
    <style:style style:name="P540" style:family="paragraph" style:parent-style-name="Standard">
      <style:paragraph-properties fo:text-align="justify" style:justify-single-word="false"/>
      <style:text-properties fo:font-size="12pt" fo:font-weight="normal" officeooo:rsid="04ba3ce3" officeooo:paragraph-rsid="001e271c" style:font-size-asian="12pt" style:font-weight-asian="normal" style:font-size-complex="12pt" style:font-weight-complex="normal"/>
    </style:style>
    <style:style style:name="P541" style:family="paragraph" style:parent-style-name="Standard">
      <style:paragraph-properties fo:text-align="justify" style:justify-single-word="false"/>
      <style:text-properties fo:font-size="12pt" fo:font-weight="normal" officeooo:rsid="04c03f17" officeooo:paragraph-rsid="06594c02" style:font-size-asian="12pt" style:font-weight-asian="normal" style:font-size-complex="12pt" style:font-weight-complex="normal"/>
    </style:style>
    <style:style style:name="P542" style:family="paragraph" style:parent-style-name="Standard">
      <style:paragraph-properties fo:text-align="justify" style:justify-single-word="false"/>
      <style:text-properties fo:font-size="13pt" fo:font-weight="bold" officeooo:rsid="043a01de" officeooo:paragraph-rsid="06594c02" style:font-size-asian="13pt" style:font-weight-asian="bold" style:font-size-complex="13pt" style:font-weight-complex="bold"/>
    </style:style>
    <style:style style:name="P543" style:family="paragraph" style:parent-style-name="Standard">
      <style:paragraph-properties fo:text-align="center" style:justify-single-word="false"/>
      <style:text-properties officeooo:paragraph-rsid="0438a0dc"/>
    </style:style>
    <style:style style:name="P544" style:family="paragraph" style:parent-style-name="Standard">
      <style:paragraph-properties fo:text-align="justify" style:justify-single-word="false"/>
      <style:text-properties fo:font-size="12pt" fo:font-weight="normal" officeooo:rsid="04bcbe38" officeooo:paragraph-rsid="001e271c" style:font-size-asian="12pt" style:font-weight-asian="normal" style:font-size-complex="12pt" style:font-weight-complex="normal"/>
    </style:style>
    <style:style style:name="P545" style:family="paragraph" style:parent-style-name="Footnote">
      <style:paragraph-properties fo:margin-left="0in" fo:margin-right="0in" fo:text-indent="0in" style:auto-text-indent="false"/>
      <style:text-properties officeooo:rsid="043ed957" officeooo:paragraph-rsid="06403430"/>
    </style:style>
    <style:style style:name="P546" style:family="paragraph" style:parent-style-name="Standard">
      <style:paragraph-properties fo:text-align="justify" style:justify-single-word="false"/>
      <style:text-properties fo:color="#808080" loext:opacity="100%" fo:font-size="12pt" fo:font-weight="normal" officeooo:rsid="04bf905d" officeooo:paragraph-rsid="001e271c" style:font-size-asian="12pt" style:font-weight-asian="normal" style:font-size-complex="12pt" style:font-weight-complex="normal"/>
    </style:style>
    <style:style style:name="P547" style:family="paragraph" style:parent-style-name="Standard">
      <style:paragraph-properties fo:text-align="justify" style:justify-single-word="false"/>
      <style:text-properties fo:font-size="12pt" fo:font-weight="normal" officeooo:rsid="04c0d40f" officeooo:paragraph-rsid="001e271c" style:font-size-asian="12pt" style:font-weight-asian="normal" style:font-size-complex="12pt" style:font-weight-complex="normal"/>
    </style:style>
    <style:style style:name="P548" style:family="paragraph" style:parent-style-name="Standard">
      <style:paragraph-properties fo:text-align="justify" style:justify-single-word="false"/>
      <style:text-properties fo:font-size="12pt" fo:font-weight="normal" officeooo:rsid="08d28b38" officeooo:paragraph-rsid="001e271c" style:font-size-asian="12pt" style:font-weight-asian="normal" style:font-size-complex="12pt" style:font-weight-complex="normal"/>
    </style:style>
    <style:style style:name="P549" style:family="paragraph" style:parent-style-name="Standard">
      <style:paragraph-properties fo:text-align="center" style:justify-single-word="false"/>
      <style:text-properties fo:font-size="12pt" fo:font-weight="bold" officeooo:rsid="04437650" officeooo:paragraph-rsid="04437650" style:font-size-asian="12pt" style:font-weight-asian="bold" style:font-size-complex="12pt" style:font-weight-complex="bold"/>
    </style:style>
    <style:style style:name="P550" style:family="paragraph" style:parent-style-name="Standard">
      <style:paragraph-properties fo:text-align="center" style:justify-single-word="false"/>
      <style:text-properties fo:font-size="13pt" fo:font-weight="bold" officeooo:rsid="04437650" officeooo:paragraph-rsid="04437650" style:font-size-asian="13pt" style:font-weight-asian="bold" style:font-size-complex="13pt" style:font-weight-complex="bold"/>
    </style:style>
    <style:style style:name="P551" style:family="paragraph" style:parent-style-name="Standard">
      <style:paragraph-properties fo:text-align="justify" style:justify-single-word="false"/>
      <style:text-properties fo:font-size="12pt" fo:font-weight="normal" officeooo:rsid="04437650" officeooo:paragraph-rsid="04437650" style:font-size-asian="12pt" style:font-weight-asian="normal" style:font-size-complex="12pt" style:font-weight-complex="normal"/>
    </style:style>
    <style:style style:name="P552" style:family="paragraph" style:parent-style-name="Table_20_Contents">
      <style:paragraph-properties fo:text-align="justify" style:justify-single-word="false"/>
      <style:text-properties fo:font-size="13pt" officeooo:rsid="08d374c4" officeooo:paragraph-rsid="001e271c" style:font-size-asian="13pt" style:font-size-complex="13pt"/>
    </style:style>
    <style:style style:name="P553" style:family="paragraph" style:parent-style-name="Standard">
      <style:paragraph-properties fo:text-align="justify" style:justify-single-word="false"/>
      <style:text-properties fo:color="#808080" loext:opacity="100%" fo:font-size="12pt" fo:font-weight="normal" officeooo:rsid="04bf905d" officeooo:paragraph-rsid="06594c02" style:font-size-asian="12pt" style:font-weight-asian="normal" style:font-size-complex="12pt" style:font-weight-complex="normal"/>
    </style:style>
    <style:style style:name="P554" style:family="paragraph" style:parent-style-name="Standard">
      <style:paragraph-properties fo:text-align="justify" style:justify-single-word="false"/>
      <style:text-properties fo:font-size="12pt" fo:font-weight="normal" officeooo:rsid="08d451fc" officeooo:paragraph-rsid="001e271c" style:font-size-asian="12pt" style:font-weight-asian="normal" style:font-size-complex="12pt" style:font-weight-complex="normal"/>
    </style:style>
    <style:style style:name="P555" style:family="paragraph" style:parent-style-name="Table_20_Contents">
      <style:paragraph-properties fo:text-align="justify" style:justify-single-word="false"/>
      <style:text-properties fo:font-size="14pt" officeooo:rsid="0d9d7fc3" officeooo:paragraph-rsid="001e271c" style:font-size-asian="14pt" style:font-size-complex="14pt"/>
    </style:style>
    <style:style style:name="P556" style:family="paragraph" style:parent-style-name="Standard">
      <style:paragraph-properties fo:text-align="center" style:justify-single-word="false"/>
      <style:text-properties fo:font-size="12pt" fo:font-weight="normal" officeooo:rsid="04437650" officeooo:paragraph-rsid="04437650" style:font-size-asian="12pt" style:font-weight-asian="normal" style:font-size-complex="12pt" style:font-weight-complex="normal"/>
    </style:style>
    <style:style style:name="P557" style:family="paragraph" style:parent-style-name="Standard">
      <style:paragraph-properties fo:text-align="justify" style:justify-single-word="false"/>
      <style:text-properties officeooo:paragraph-rsid="0130fca4"/>
    </style:style>
    <style:style style:name="P558" style:family="paragraph" style:parent-style-name="Standard">
      <style:paragraph-properties fo:text-align="justify" style:justify-single-word="false"/>
      <style:text-properties fo:font-size="12pt" fo:font-weight="normal" officeooo:rsid="04c3486c" officeooo:paragraph-rsid="001e271c" style:font-size-asian="12pt" style:font-weight-asian="normal" style:font-size-complex="12pt" style:font-weight-complex="normal"/>
    </style:style>
    <style:style style:name="P559" style:family="paragraph" style:parent-style-name="Standard">
      <style:paragraph-properties fo:text-align="justify" style:justify-single-word="false"/>
      <style:text-properties fo:color="#808080" loext:opacity="100%" fo:font-size="12pt" fo:font-weight="normal" officeooo:rsid="04c3486c" officeooo:paragraph-rsid="001e271c" style:font-size-asian="12pt" style:font-weight-asian="normal" style:font-size-complex="12pt" style:font-weight-complex="normal"/>
    </style:style>
    <style:style style:name="P560" style:family="paragraph" style:parent-style-name="Standard">
      <style:paragraph-properties fo:text-align="justify" style:justify-single-word="false"/>
      <style:text-properties fo:font-size="12pt" fo:font-weight="normal" officeooo:rsid="04c30da7" officeooo:paragraph-rsid="001e271c" style:font-size-asian="12pt" style:font-weight-asian="normal" style:font-size-complex="12pt" style:font-weight-complex="normal"/>
    </style:style>
    <style:style style:name="P561" style:family="paragraph" style:parent-style-name="Standard">
      <style:paragraph-properties fo:text-align="justify" style:justify-single-word="false"/>
      <style:text-properties fo:color="#808080" loext:opacity="100%" fo:font-size="12pt" fo:font-weight="normal" officeooo:rsid="04c3486c" officeooo:paragraph-rsid="0659acf0" style:font-size-asian="12pt" style:font-weight-asian="normal" style:font-size-complex="12pt" style:font-weight-complex="normal"/>
    </style:style>
    <style:style style:name="P562" style:family="paragraph" style:parent-style-name="Standard">
      <style:paragraph-properties fo:text-align="justify" style:justify-single-word="false"/>
      <style:text-properties officeooo:paragraph-rsid="0143efd2"/>
    </style:style>
    <style:style style:name="P563" style:family="paragraph" style:parent-style-name="Standard">
      <style:paragraph-properties fo:text-align="justify" style:justify-single-word="false"/>
      <style:text-properties fo:font-size="12pt" fo:font-weight="normal" officeooo:rsid="0143efd2" officeooo:paragraph-rsid="0143efd2" style:font-size-asian="12pt" style:font-weight-asian="normal" style:font-size-complex="12pt" style:font-weight-complex="normal"/>
    </style:style>
    <style:style style:name="P564" style:family="paragraph" style:parent-style-name="Table_20_Contents">
      <style:paragraph-properties fo:text-align="justify" style:justify-single-word="false"/>
      <style:text-properties fo:font-size="12pt" officeooo:rsid="0143efd2" officeooo:paragraph-rsid="0143efd2" style:font-size-asian="12pt" style:font-size-complex="12pt"/>
    </style:style>
    <style:style style:name="P565" style:family="paragraph" style:parent-style-name="Table_20_Contents">
      <style:paragraph-properties fo:text-align="justify" style:justify-single-word="false"/>
      <style:text-properties fo:font-size="12pt" officeooo:rsid="0146aead" officeooo:paragraph-rsid="0146aead" style:font-size-asian="12pt" style:font-size-complex="12pt"/>
    </style:style>
    <style:style style:name="P566" style:family="paragraph" style:parent-style-name="Preformatted_20_Text">
      <style:paragraph-properties fo:text-align="justify" style:justify-single-word="false"/>
      <style:text-properties officeooo:paragraph-rsid="0146aead"/>
    </style:style>
    <style:style style:name="P567" style:family="paragraph" style:parent-style-name="Standard">
      <style:paragraph-properties fo:text-align="justify" style:justify-single-word="false"/>
      <style:text-properties fo:font-size="12pt" fo:font-weight="normal" officeooo:rsid="04c30da7" officeooo:paragraph-rsid="0143efd2" style:font-size-asian="12pt" style:font-weight-asian="normal" style:font-size-complex="12pt" style:font-weight-complex="normal"/>
    </style:style>
    <style:style style:name="P568" style:family="paragraph" style:parent-style-name="Footnote">
      <style:text-properties officeooo:rsid="014fb50c" officeooo:paragraph-rsid="014fb50c"/>
    </style:style>
    <style:style style:name="P569" style:family="paragraph" style:parent-style-name="Standard">
      <style:paragraph-properties fo:text-align="justify" style:justify-single-word="false"/>
      <style:text-properties fo:font-size="12pt" fo:font-weight="normal" officeooo:rsid="04c590e2" officeooo:paragraph-rsid="001e271c" style:font-size-asian="12pt" style:font-weight-asian="normal" style:font-size-complex="12pt" style:font-weight-complex="normal"/>
    </style:style>
    <style:style style:name="P570" style:family="paragraph" style:parent-style-name="Table_20_Contents">
      <style:paragraph-properties fo:text-align="justify" style:justify-single-word="false"/>
      <style:text-properties fo:font-size="12pt" officeooo:rsid="014e5c51" officeooo:paragraph-rsid="014e5c51" style:font-size-asian="12pt" style:font-size-complex="12pt"/>
    </style:style>
    <style:style style:name="P571" style:family="paragraph" style:parent-style-name="Standard">
      <style:paragraph-properties fo:text-align="justify" style:justify-single-word="false"/>
      <style:text-properties fo:font-size="13pt" fo:font-weight="normal" officeooo:rsid="0027fc66" officeooo:paragraph-rsid="014e5c51" style:font-size-asian="13pt" style:font-weight-asian="normal" style:font-size-complex="13pt" style:font-weight-complex="normal"/>
    </style:style>
    <style:style style:name="P572" style:family="paragraph" style:parent-style-name="Standard">
      <style:paragraph-properties fo:text-align="justify" style:justify-single-word="false"/>
      <style:text-properties fo:font-size="12pt" fo:font-weight="normal" officeooo:rsid="0151431b" officeooo:paragraph-rsid="0151431b" style:font-size-asian="12pt" style:font-weight-asian="normal" style:font-size-complex="12pt" style:font-weight-complex="normal"/>
    </style:style>
    <style:style style:name="P573" style:family="paragraph" style:parent-style-name="Standard">
      <style:paragraph-properties fo:text-align="justify" style:justify-single-word="false"/>
      <style:text-properties officeooo:paragraph-rsid="0659acf0"/>
    </style:style>
    <style:style style:name="P574" style:family="paragraph" style:parent-style-name="Footnote">
      <style:text-properties officeooo:rsid="013251db" officeooo:paragraph-rsid="013251db"/>
    </style:style>
    <style:style style:name="P575" style:family="paragraph" style:parent-style-name="Standard">
      <style:paragraph-properties fo:text-align="justify" style:justify-single-word="false"/>
      <style:text-properties fo:font-size="12pt" fo:font-weight="normal" officeooo:rsid="013251db" officeooo:paragraph-rsid="013251db" style:font-size-asian="12pt" style:font-weight-asian="normal" style:font-size-complex="12pt" style:font-weight-complex="normal"/>
    </style:style>
    <style:style style:name="P576" style:family="paragraph" style:parent-style-name="Standard">
      <style:paragraph-properties fo:text-align="justify" style:justify-single-word="false"/>
      <style:text-properties officeooo:paragraph-rsid="013251db"/>
    </style:style>
    <style:style style:name="P577" style:family="paragraph" style:parent-style-name="Table_20_Contents">
      <style:paragraph-properties fo:text-align="justify" style:justify-single-word="false"/>
      <style:text-properties fo:font-size="12pt" style:font-size-asian="12pt" style:font-size-complex="12pt"/>
    </style:style>
    <style:style style:name="P578" style:family="paragraph" style:parent-style-name="Standard">
      <style:paragraph-properties fo:text-align="justify" style:justify-single-word="false"/>
      <style:text-properties fo:font-size="12pt" fo:font-weight="normal" officeooo:rsid="04cb320e" officeooo:paragraph-rsid="01343340" style:font-size-asian="12pt" style:font-weight-asian="normal" style:font-size-complex="12pt" style:font-weight-complex="normal"/>
    </style:style>
    <style:style style:name="P579" style:family="paragraph" style:parent-style-name="Standard">
      <style:paragraph-properties fo:text-align="justify" style:justify-single-word="false"/>
      <style:text-properties fo:font-size="12pt" fo:font-weight="normal" officeooo:rsid="04cb320e" officeooo:paragraph-rsid="001e271c" style:font-size-asian="12pt" style:font-weight-asian="normal" style:font-size-complex="12pt" style:font-weight-complex="normal"/>
    </style:style>
    <style:style style:name="P580" style:family="paragraph" style:parent-style-name="Standard">
      <style:paragraph-properties fo:text-align="justify" style:justify-single-word="false"/>
      <style:text-properties fo:font-size="13pt" fo:font-weight="normal" officeooo:rsid="013f7ce2" officeooo:paragraph-rsid="013f7ce2" style:font-size-asian="13pt" style:font-weight-asian="normal" style:font-size-complex="13pt" style:font-weight-complex="normal"/>
    </style:style>
    <style:style style:name="P581" style:family="paragraph" style:parent-style-name="Standard">
      <style:paragraph-properties fo:text-align="justify" style:justify-single-word="false"/>
      <style:text-properties fo:color="#808080" loext:opacity="100%" fo:font-size="12pt" fo:font-weight="normal" officeooo:rsid="013f7ce2" officeooo:paragraph-rsid="013f7ce2" style:font-size-asian="12pt" style:font-weight-asian="normal" style:font-size-complex="12pt" style:font-weight-complex="normal"/>
    </style:style>
    <style:style style:name="P582" style:family="paragraph" style:parent-style-name="Standard">
      <style:paragraph-properties fo:text-align="justify" style:justify-single-word="false"/>
      <style:text-properties fo:font-size="12pt" fo:font-weight="normal" officeooo:rsid="013f7ce2" officeooo:paragraph-rsid="013f7ce2" style:font-size-asian="12pt" style:font-weight-asian="normal" style:font-size-complex="12pt" style:font-weight-complex="normal"/>
    </style:style>
    <style:style style:name="P583" style:family="paragraph" style:parent-style-name="Standard">
      <style:paragraph-properties fo:text-align="justify" style:justify-single-word="false"/>
      <style:text-properties fo:color="#808080" loext:opacity="100%" fo:font-size="12pt" fo:font-weight="normal" officeooo:rsid="04cb885b" officeooo:paragraph-rsid="001e271c" style:font-size-asian="12pt" style:font-weight-asian="normal" style:font-size-complex="12pt" style:font-weight-complex="normal"/>
    </style:style>
    <style:style style:name="P584" style:family="paragraph" style:parent-style-name="Standard">
      <style:paragraph-properties fo:text-align="justify" style:justify-single-word="false"/>
      <style:text-properties fo:font-size="12pt" fo:font-weight="normal" officeooo:rsid="04cec1ae" officeooo:paragraph-rsid="001e271c" style:font-size-asian="12pt" style:font-weight-asian="normal" style:font-size-complex="12pt" style:font-weight-complex="normal"/>
    </style:style>
    <style:style style:name="P585" style:family="paragraph" style:parent-style-name="Table_20_Contents">
      <style:paragraph-properties fo:text-align="justify" style:justify-single-word="false"/>
      <style:text-properties fo:font-size="12pt" officeooo:rsid="013f7ce2" officeooo:paragraph-rsid="013f7ce2" style:font-size-asian="12pt" style:font-size-complex="12pt"/>
    </style:style>
    <style:style style:name="P586" style:family="paragraph" style:parent-style-name="Table_20_Contents">
      <style:paragraph-properties fo:text-align="justify" style:justify-single-word="false"/>
      <style:text-properties officeooo:paragraph-rsid="013f7ce2"/>
    </style:style>
    <style:style style:name="P587" style:family="paragraph" style:parent-style-name="Standard">
      <style:paragraph-properties fo:text-align="justify" style:justify-single-word="false"/>
      <style:text-properties style:use-window-font-color="true" loext:opacity="0%" fo:font-size="12pt" fo:font-weight="normal" officeooo:rsid="014180e1" officeooo:paragraph-rsid="01576bf6" style:font-size-asian="12pt" style:font-weight-asian="normal" style:font-size-complex="12pt" style:font-weight-complex="normal"/>
    </style:style>
    <style:style style:name="P588" style:family="paragraph" style:parent-style-name="Standard">
      <style:paragraph-properties fo:text-align="justify" style:justify-single-word="false"/>
      <style:text-properties fo:font-size="12pt" fo:font-weight="normal" officeooo:rsid="0142465c" officeooo:paragraph-rsid="01576bf6" style:font-size-asian="12pt" style:font-weight-asian="normal" style:font-size-complex="12pt" style:font-weight-complex="normal"/>
    </style:style>
    <style:style style:name="P589" style:family="paragraph" style:parent-style-name="Standard">
      <style:paragraph-properties fo:text-align="justify" style:justify-single-word="false"/>
      <style:text-properties fo:font-size="12pt" fo:font-weight="normal" officeooo:rsid="0142465c" officeooo:paragraph-rsid="0142465c" style:font-size-asian="12pt" style:font-weight-asian="normal" style:font-size-complex="12pt" style:font-weight-complex="normal"/>
    </style:style>
    <style:style style:name="P590" style:family="paragraph" style:parent-style-name="Table_20_Contents">
      <style:paragraph-properties fo:text-align="justify" style:justify-single-word="false"/>
      <style:text-properties fo:font-size="12pt" officeooo:rsid="0142465c" officeooo:paragraph-rsid="0142465c" style:font-size-asian="12pt" style:font-size-complex="12pt"/>
    </style:style>
    <style:style style:name="P591" style:family="paragraph" style:parent-style-name="Preformatted_20_Text">
      <style:paragraph-properties fo:text-align="justify" style:justify-single-word="false"/>
      <style:text-properties fo:font-size="10pt" fo:font-weight="normal" officeooo:rsid="0142465c" officeooo:paragraph-rsid="0142465c" style:font-size-asian="10pt" style:font-weight-asian="normal" style:font-size-complex="10pt" style:font-weight-complex="normal"/>
    </style:style>
    <style:style style:name="P592" style:family="paragraph" style:parent-style-name="Preformatted_20_Text">
      <style:text-properties fo:font-weight="normal" style:font-weight-asian="normal" style:font-weight-complex="normal"/>
    </style:style>
    <style:style style:name="P593" style:family="paragraph" style:parent-style-name="Preformatted_20_Text">
      <style:paragraph-properties fo:margin-top="0in" fo:margin-bottom="0.1965in" style:contextual-spacing="false"/>
      <style:text-properties fo:font-weight="normal" style:font-weight-asian="normal" style:font-weight-complex="normal"/>
    </style:style>
    <style:style style:name="P594" style:family="paragraph" style:parent-style-name="Standard">
      <style:paragraph-properties fo:text-align="justify" style:justify-single-word="false"/>
      <style:text-properties fo:font-size="12pt" fo:font-weight="normal" officeooo:rsid="0138fd0e" officeooo:paragraph-rsid="001e271c" style:font-size-asian="12pt" style:font-weight-asian="normal" style:font-size-complex="12pt" style:font-weight-complex="normal"/>
    </style:style>
    <style:style style:name="P595" style:family="paragraph" style:parent-style-name="Standard">
      <style:paragraph-properties fo:text-align="justify" style:justify-single-word="false"/>
      <style:text-properties officeooo:paragraph-rsid="065abbfd"/>
    </style:style>
    <style:style style:name="P596" style:family="paragraph" style:parent-style-name="Footnote">
      <style:text-properties officeooo:paragraph-rsid="04d4c53f"/>
    </style:style>
    <style:style style:name="P597" style:family="paragraph" style:parent-style-name="Standard">
      <style:paragraph-properties fo:text-align="justify" style:justify-single-word="false"/>
      <style:text-properties fo:font-size="12pt" fo:font-weight="normal" officeooo:rsid="0138fd0e" officeooo:paragraph-rsid="0138fd0e" style:font-size-asian="12pt" style:font-weight-asian="normal" style:font-size-complex="12pt" style:font-weight-complex="normal"/>
    </style:style>
    <style:style style:name="P598" style:family="paragraph" style:parent-style-name="Table_20_Contents">
      <style:paragraph-properties fo:text-align="justify" style:justify-single-word="false"/>
      <style:text-properties fo:font-size="13pt" officeooo:rsid="0d5d9990" officeooo:paragraph-rsid="001e271c" style:font-size-asian="13pt" style:font-size-complex="13pt"/>
    </style:style>
    <style:style style:name="P599" style:family="paragraph" style:parent-style-name="Table_20_Contents">
      <style:paragraph-properties fo:text-align="justify" style:justify-single-word="false"/>
      <style:text-properties fo:color="#808080" loext:opacity="100%" fo:font-size="12pt" officeooo:rsid="0d5d9990" officeooo:paragraph-rsid="001e271c" style:font-size-asian="12pt" style:font-size-complex="12pt"/>
    </style:style>
    <style:style style:name="P600" style:family="paragraph" style:parent-style-name="Table_20_Contents">
      <style:paragraph-properties fo:text-align="justify" style:justify-single-word="false"/>
      <style:text-properties fo:font-size="12pt" officeooo:rsid="0d5d9990" officeooo:paragraph-rsid="001e271c" style:font-size-asian="12pt" style:font-size-complex="12pt"/>
    </style:style>
    <style:style style:name="P601" style:family="paragraph" style:parent-style-name="Table_20_Contents">
      <style:paragraph-properties fo:text-align="justify" style:justify-single-word="false"/>
      <style:text-properties fo:font-size="13pt" officeooo:rsid="0d5def2f" officeooo:paragraph-rsid="0138fd0e" style:font-size-asian="13pt" style:font-size-complex="13pt"/>
    </style:style>
    <style:style style:name="P602" style:family="paragraph" style:parent-style-name="Table_20_Contents">
      <style:paragraph-properties fo:text-align="justify" style:justify-single-word="false"/>
      <style:text-properties fo:font-size="12pt" officeooo:rsid="0d5def2f" officeooo:paragraph-rsid="0138fd0e" style:font-size-asian="12pt" style:font-size-complex="12pt"/>
    </style:style>
    <style:style style:name="P603" style:family="paragraph" style:parent-style-name="Standard">
      <style:paragraph-properties fo:text-align="justify" style:justify-single-word="false"/>
      <style:text-properties fo:font-size="12pt" fo:font-weight="normal" officeooo:rsid="0d5bea9d" officeooo:paragraph-rsid="001e271c" style:font-size-asian="12pt" style:font-weight-asian="normal" style:font-size-complex="12pt" style:font-weight-complex="normal"/>
    </style:style>
    <style:style style:name="P604" style:family="paragraph" style:parent-style-name="Standard">
      <style:paragraph-properties fo:text-align="justify" style:justify-single-word="false"/>
      <style:text-properties fo:font-size="12pt" fo:font-weight="normal" officeooo:rsid="0d5def2f" officeooo:paragraph-rsid="001e271c" style:font-size-asian="12pt" style:font-weight-asian="normal" style:font-size-complex="12pt" style:font-weight-complex="normal"/>
    </style:style>
    <style:style style:name="P605" style:family="paragraph" style:parent-style-name="Footnote">
      <style:text-properties officeooo:paragraph-rsid="04d64897"/>
    </style:style>
    <style:style style:name="P606" style:family="paragraph" style:parent-style-name="Table_20_Contents">
      <style:paragraph-properties fo:text-align="justify" style:justify-single-word="false"/>
      <style:text-properties fo:font-size="13pt" officeooo:rsid="0d5def2f" officeooo:paragraph-rsid="001e271c" style:font-size-asian="13pt" style:font-size-complex="13pt"/>
    </style:style>
    <style:style style:name="P607" style:family="paragraph" style:parent-style-name="Table_20_Contents">
      <style:paragraph-properties fo:text-align="justify" style:justify-single-word="false"/>
      <style:text-properties fo:color="#808080" loext:opacity="100%" fo:font-size="12pt" officeooo:rsid="0d5d9990" officeooo:paragraph-rsid="065abbfd" style:font-size-asian="12pt" style:font-size-complex="12pt"/>
    </style:style>
    <style:style style:name="P608" style:family="paragraph" style:parent-style-name="Table_20_Contents">
      <style:paragraph-properties fo:text-align="justify" style:justify-single-word="false"/>
      <style:text-properties fo:font-size="12pt" officeooo:rsid="0d5def2f" officeooo:paragraph-rsid="001e271c" style:font-size-asian="12pt" style:font-size-complex="12pt"/>
    </style:style>
    <style:style style:name="P609" style:family="paragraph" style:parent-style-name="Standard">
      <style:paragraph-properties fo:text-align="justify" style:justify-single-word="false"/>
      <style:text-properties fo:font-size="12pt" fo:font-weight="normal" officeooo:rsid="013bc174" officeooo:paragraph-rsid="001e271c" style:font-size-asian="12pt" style:font-weight-asian="normal" style:font-size-complex="12pt" style:font-weight-complex="normal"/>
    </style:style>
    <style:style style:name="P610" style:family="paragraph" style:parent-style-name="Table_20_Contents">
      <style:paragraph-properties fo:text-align="justify" style:justify-single-word="false"/>
      <style:text-properties fo:font-size="13pt" officeooo:rsid="0d5ec8b2" officeooo:paragraph-rsid="001e271c" style:font-size-asian="13pt" style:font-size-complex="13pt"/>
    </style:style>
    <style:style style:name="P611" style:family="paragraph" style:parent-style-name="Table_20_Contents">
      <style:paragraph-properties fo:text-align="justify" style:justify-single-word="false"/>
      <style:text-properties fo:font-size="13pt" officeooo:rsid="0d600e69" officeooo:paragraph-rsid="001e271c" style:font-size-asian="13pt" style:font-size-complex="13pt"/>
    </style:style>
    <style:style style:name="P612" style:family="paragraph" style:parent-style-name="Standard">
      <style:paragraph-properties fo:text-align="justify" style:justify-single-word="false"/>
      <style:text-properties fo:font-size="12pt" fo:font-weight="normal" officeooo:rsid="0d603366" officeooo:paragraph-rsid="001e271c" style:font-size-asian="12pt" style:font-weight-asian="normal" style:font-size-complex="12pt" style:font-weight-complex="normal"/>
    </style:style>
    <style:style style:name="P613" style:family="paragraph" style:parent-style-name="Standard">
      <style:paragraph-properties fo:text-align="center" style:justify-single-word="false"/>
      <style:text-properties fo:font-size="18pt" fo:font-weight="bold" officeooo:rsid="07abb34e" officeooo:paragraph-rsid="0027921a" style:font-size-asian="18pt" style:font-weight-asian="bold" style:font-size-complex="18pt" style:font-weight-complex="bold"/>
    </style:style>
    <style:style style:name="P614" style:family="paragraph" style:parent-style-name="Standard">
      <style:paragraph-properties fo:text-align="justify" style:justify-single-word="false"/>
      <style:text-properties fo:font-size="12pt" fo:font-weight="normal" officeooo:rsid="002e7b98" officeooo:paragraph-rsid="06403430" style:font-size-asian="10.5pt" style:font-weight-asian="normal" style:font-size-complex="12pt" style:font-weight-complex="normal"/>
    </style:style>
    <style:style style:name="P615" style:family="paragraph" style:parent-style-name="Footnote">
      <style:text-properties officeooo:rsid="04f81a41" officeooo:paragraph-rsid="04f81a41"/>
    </style:style>
    <style:style style:name="P616" style:family="paragraph" style:parent-style-name="Standard">
      <style:paragraph-properties fo:text-align="justify" style:justify-single-word="false"/>
      <style:text-properties fo:font-size="12pt" fo:font-weight="normal" officeooo:rsid="07c01a42" officeooo:paragraph-rsid="04fad620" style:font-size-asian="12pt" style:font-weight-asian="normal" style:font-size-complex="12pt" style:font-weight-complex="normal"/>
    </style:style>
    <style:style style:name="P617" style:family="paragraph" style:parent-style-name="Standard">
      <style:paragraph-properties fo:text-align="justify" style:justify-single-word="false"/>
      <style:text-properties fo:font-size="12pt" fo:font-weight="bold" officeooo:rsid="07c01a42" officeooo:paragraph-rsid="04fad620" style:font-size-asian="12pt" style:font-weight-asian="bold" style:font-size-complex="12pt" style:font-weight-complex="bold"/>
    </style:style>
    <style:style style:name="P618" style:family="paragraph" style:parent-style-name="Standard">
      <style:paragraph-properties fo:text-align="center" style:justify-single-word="false"/>
      <style:text-properties fo:font-size="18pt" fo:font-weight="bold" officeooo:rsid="07abb34e" officeooo:paragraph-rsid="001e271c" style:font-size-asian="18pt" style:font-weight-asian="bold" style:font-size-complex="18pt" style:font-weight-complex="bold"/>
    </style:style>
    <style:style style:name="P619" style:family="paragraph" style:parent-style-name="Standard">
      <style:paragraph-properties fo:text-align="justify" style:justify-single-word="false"/>
      <style:text-properties fo:font-size="12pt" fo:font-weight="bold" officeooo:rsid="07abb34e" officeooo:paragraph-rsid="001e271c" style:font-size-asian="12pt" style:font-weight-asian="bold" style:font-size-complex="12pt" style:font-weight-complex="bold"/>
    </style:style>
    <style:style style:name="P620" style:family="paragraph" style:parent-style-name="Standard">
      <style:paragraph-properties fo:text-align="justify" style:justify-single-word="false"/>
      <style:text-properties fo:font-size="12pt" officeooo:paragraph-rsid="04fddd5a" style:font-size-asian="12pt" style:font-size-complex="12pt"/>
    </style:style>
    <style:style style:name="P621" style:family="paragraph" style:parent-style-name="Standard">
      <style:paragraph-properties fo:text-align="justify" style:justify-single-word="false"/>
      <style:text-properties fo:font-size="12pt" fo:font-weight="normal" officeooo:rsid="07c01a42" officeooo:paragraph-rsid="001e271c" style:font-size-asian="12pt" style:font-weight-asian="normal" style:font-size-complex="12pt" style:font-weight-complex="normal"/>
    </style:style>
    <style:style style:name="P622" style:family="paragraph" style:parent-style-name="Standard">
      <style:paragraph-properties fo:text-align="justify" style:justify-single-word="false"/>
      <style:text-properties officeooo:paragraph-rsid="04fc3c44"/>
    </style:style>
    <style:style style:name="P623" style:family="paragraph" style:parent-style-name="Standard">
      <style:paragraph-properties fo:text-align="justify" style:justify-single-word="false"/>
      <style:text-properties fo:font-size="12pt" fo:font-weight="bold" officeooo:paragraph-rsid="001e271c" style:font-size-asian="12pt" style:font-weight-asian="bold" style:font-size-complex="12pt" style:font-weight-complex="bold"/>
    </style:style>
    <style:style style:name="P624" style:family="paragraph" style:parent-style-name="Text_20_body" style:list-style-name="L4">
      <style:paragraph-properties fo:margin-top="0in" fo:margin-bottom="0in" style:contextual-spacing="false"/>
      <style:text-properties fo:font-size="12pt" officeooo:paragraph-rsid="001e271c" style:font-size-asian="12pt" style:font-size-complex="12pt"/>
    </style:style>
    <style:style style:name="P625" style:family="paragraph" style:parent-style-name="Text_20_body" style:list-style-name="L5">
      <style:paragraph-properties fo:margin-top="0in" fo:margin-bottom="0in" style:contextual-spacing="false"/>
    </style:style>
    <style:style style:name="P626" style:family="paragraph" style:parent-style-name="Text_20_body" style:list-style-name="L5"/>
    <style:style style:name="P627" style:family="paragraph" style:parent-style-name="Standard">
      <style:text-properties fo:font-size="12pt" fo:font-style="italic" officeooo:rsid="07c3536c" style:font-size-asian="12pt" style:font-style-asian="italic" style:font-size-complex="12pt" style:font-style-complex="italic"/>
    </style:style>
    <style:style style:name="P628" style:family="paragraph" style:parent-style-name="Standard">
      <style:paragraph-properties fo:text-align="justify" style:justify-single-word="false"/>
      <style:text-properties fo:font-size="12pt" fo:font-weight="bold" officeooo:rsid="02330c21" style:font-size-asian="12pt" style:font-weight-asian="bold" style:font-size-complex="12pt" style:font-weight-complex="bold"/>
    </style:style>
    <style:style style:name="P629" style:family="paragraph" style:parent-style-name="Standard">
      <style:paragraph-properties fo:text-align="justify" style:justify-single-word="false"/>
      <style:text-properties fo:font-size="12pt" fo:font-weight="bold" officeooo:rsid="02330c21" officeooo:paragraph-rsid="001e271c" style:font-size-asian="12pt" style:font-weight-asian="bold" style:font-size-complex="12pt" style:font-weight-complex="bold"/>
    </style:style>
    <style:style style:name="P630" style:family="paragraph" style:parent-style-name="Standard">
      <style:paragraph-properties fo:text-align="center" style:justify-single-word="false"/>
      <style:text-properties officeooo:paragraph-rsid="05ad2409"/>
    </style:style>
    <style:style style:name="P631" style:family="paragraph" style:parent-style-name="Standard">
      <style:paragraph-properties fo:text-align="center" style:justify-single-word="false"/>
      <style:text-properties fo:font-size="12pt" fo:font-weight="bold" officeooo:rsid="02330c21" officeooo:paragraph-rsid="00b93e5a" style:font-size-asian="12pt" style:font-weight-asian="bold" style:font-size-complex="12pt" style:font-weight-complex="bold"/>
    </style:style>
    <style:style style:name="P632" style:family="paragraph" style:parent-style-name="Standard">
      <style:paragraph-properties fo:text-align="center" style:justify-single-word="false"/>
      <style:text-properties officeooo:paragraph-rsid="019ad0fa"/>
    </style:style>
    <style:style style:name="P633" style:family="paragraph" style:parent-style-name="Standard">
      <style:paragraph-properties fo:text-align="center" style:justify-single-word="false"/>
      <style:text-properties fo:font-size="12pt" fo:font-weight="bold" officeooo:rsid="02330c21" officeooo:paragraph-rsid="001e271c" style:font-size-asian="12pt" style:font-weight-asian="bold" style:font-size-complex="12pt" style:font-weight-complex="bold"/>
    </style:style>
    <style:style style:name="P634" style:family="paragraph" style:parent-style-name="Standard">
      <style:paragraph-properties fo:text-align="justify" style:justify-single-word="false"/>
      <style:text-properties fo:font-size="12pt" fo:font-weight="normal" officeooo:rsid="01a4be16" officeooo:paragraph-rsid="0618e6ff" style:font-size-asian="12pt" style:font-weight-asian="normal" style:font-size-complex="12pt" style:font-weight-complex="normal"/>
    </style:style>
    <style:style style:name="P635" style:family="paragraph" style:parent-style-name="Standard">
      <style:paragraph-properties fo:text-align="justify" style:justify-single-word="false"/>
      <style:text-properties fo:font-size="12pt" fo:font-weight="normal" officeooo:rsid="019b259a" officeooo:paragraph-rsid="051548ca" style:font-size-asian="12pt" style:font-weight-asian="normal" style:font-size-complex="12pt" style:font-weight-complex="normal"/>
    </style:style>
    <style:style style:name="P636" style:family="paragraph" style:parent-style-name="Standard">
      <style:paragraph-properties fo:text-align="justify" style:justify-single-word="false"/>
      <style:text-properties fo:font-size="12pt" fo:font-weight="normal" officeooo:rsid="01a4be16" officeooo:paragraph-rsid="051548ca" style:font-size-asian="12pt" style:font-weight-asian="normal" style:font-size-complex="12pt" style:font-weight-complex="normal"/>
    </style:style>
    <style:style style:name="P637" style:family="paragraph" style:parent-style-name="Footnote">
      <style:text-properties officeooo:rsid="01a54c67" officeooo:paragraph-rsid="01a54c67"/>
    </style:style>
    <style:style style:name="P638" style:family="paragraph" style:parent-style-name="Standard">
      <style:paragraph-properties fo:text-align="justify" style:justify-single-word="false"/>
      <style:text-properties fo:font-size="12pt" fo:font-weight="normal" officeooo:rsid="019b259a" officeooo:paragraph-rsid="019df636" style:font-size-asian="12pt" style:font-weight-asian="normal" style:font-size-complex="12pt" style:font-weight-complex="normal"/>
    </style:style>
    <style:style style:name="P639" style:family="paragraph" style:parent-style-name="Standard">
      <style:paragraph-properties fo:text-align="justify" style:justify-single-word="false"/>
      <style:text-properties fo:font-size="12pt" fo:font-weight="normal" officeooo:rsid="01a8a7fc" officeooo:paragraph-rsid="051548ca" style:font-size-asian="12pt" style:font-weight-asian="normal" style:font-size-complex="12pt" style:font-weight-complex="normal"/>
    </style:style>
    <style:style style:name="P640" style:family="paragraph" style:parent-style-name="Standard">
      <style:paragraph-properties fo:text-align="justify" style:justify-single-word="false"/>
      <style:text-properties fo:font-size="12pt" fo:font-weight="normal" officeooo:rsid="01a2925c" officeooo:paragraph-rsid="01a2925c" style:font-size-asian="12pt" style:font-weight-asian="normal" style:font-size-complex="12pt" style:font-weight-complex="normal"/>
    </style:style>
    <style:style style:name="P641" style:family="paragraph" style:parent-style-name="Standard">
      <style:paragraph-properties fo:text-align="justify" style:justify-single-word="false"/>
      <style:text-properties fo:font-size="12pt" fo:font-weight="normal" officeooo:rsid="01a11379" officeooo:paragraph-rsid="01a11379" style:font-size-asian="12pt" style:font-weight-asian="normal" style:font-size-complex="12pt" style:font-weight-complex="normal"/>
    </style:style>
    <style:style style:name="P642" style:family="paragraph" style:parent-style-name="Standard">
      <style:paragraph-properties fo:text-align="justify" style:justify-single-word="false"/>
      <style:text-properties fo:font-size="12pt" fo:font-weight="bold" officeooo:rsid="02330c21" officeooo:paragraph-rsid="01a11379" style:font-size-asian="12pt" style:font-weight-asian="bold" style:font-size-complex="12pt" style:font-weight-complex="bold"/>
    </style:style>
    <style:style style:name="P643" style:family="paragraph" style:parent-style-name="Standard">
      <style:paragraph-properties fo:text-align="center" style:justify-single-word="false"/>
      <style:text-properties fo:font-size="12pt" fo:font-weight="bold" officeooo:rsid="01a8a7fc" officeooo:paragraph-rsid="01a8a7fc" style:font-size-asian="12pt" style:font-weight-asian="bold" style:font-size-complex="12pt" style:font-weight-complex="bold"/>
    </style:style>
    <style:style style:name="P644" style:family="paragraph" style:parent-style-name="Standard">
      <style:paragraph-properties fo:text-align="justify" style:justify-single-word="false"/>
      <style:text-properties officeooo:paragraph-rsid="01ada720"/>
    </style:style>
    <style:style style:name="P645" style:family="paragraph" style:parent-style-name="Standard">
      <style:paragraph-properties fo:text-align="justify" style:justify-single-word="false"/>
      <style:text-properties fo:font-size="12pt" fo:font-weight="normal" officeooo:rsid="01ac837f" officeooo:paragraph-rsid="01ada720" style:font-size-asian="12pt" style:font-weight-asian="normal" style:font-size-complex="12pt" style:font-weight-complex="normal"/>
    </style:style>
    <style:style style:name="P646" style:family="paragraph" style:parent-style-name="Standard">
      <style:paragraph-properties fo:text-align="center" style:justify-single-word="false"/>
      <style:text-properties fo:font-size="14pt" fo:font-weight="bold" officeooo:rsid="026e62f1" officeooo:paragraph-rsid="026e62f1" style:font-size-asian="14pt" style:font-weight-asian="bold" style:font-size-complex="14pt" style:font-weight-complex="bold"/>
    </style:style>
    <style:style style:name="P647" style:family="paragraph" style:parent-style-name="Standard">
      <style:paragraph-properties fo:text-align="justify" style:justify-single-word="false"/>
      <style:text-properties style:use-window-font-color="true" loext:opacity="0%" fo:font-size="12pt" fo:font-weight="normal" officeooo:rsid="02896742" officeooo:paragraph-rsid="0283e2ba" style:font-size-asian="12pt" style:font-weight-asian="normal" style:font-size-complex="12pt" style:font-weight-complex="normal"/>
    </style:style>
    <style:style style:name="P648" style:family="paragraph" style:parent-style-name="Standard">
      <style:paragraph-properties fo:text-align="justify" style:justify-single-word="false"/>
      <style:text-properties officeooo:paragraph-rsid="0283e2ba"/>
    </style:style>
    <style:style style:name="P649" style:family="paragraph" style:parent-style-name="Standard">
      <style:paragraph-properties fo:text-align="justify" style:justify-single-word="false"/>
      <style:text-properties style:use-window-font-color="true" loext:opacity="0%" fo:font-size="12pt" fo:font-weight="normal" officeooo:rsid="02896742" officeooo:paragraph-rsid="061c35af" style:font-size-asian="12pt" style:font-weight-asian="normal" style:font-size-complex="12pt" style:font-weight-complex="normal"/>
    </style:style>
    <style:style style:name="P650" style:family="paragraph" style:parent-style-name="Standard">
      <style:paragraph-properties fo:text-align="justify" style:justify-single-word="false"/>
      <style:text-properties fo:font-size="12pt" fo:font-weight="normal" officeooo:rsid="02896742" officeooo:paragraph-rsid="0283e2ba" style:font-size-asian="12pt" style:font-weight-asian="normal" style:font-size-complex="12pt" style:font-weight-complex="normal"/>
    </style:style>
    <style:style style:name="P651" style:family="paragraph" style:parent-style-name="Standard">
      <style:paragraph-properties fo:text-align="center" style:justify-single-word="false"/>
      <style:text-properties fo:font-size="12pt" fo:font-weight="bold" officeooo:rsid="028b6207" officeooo:paragraph-rsid="028b6207" style:font-size-asian="12pt" style:font-weight-asian="bold" style:font-size-complex="12pt" style:font-weight-complex="bold"/>
    </style:style>
    <style:style style:name="P652" style:family="paragraph" style:parent-style-name="Standard">
      <style:paragraph-properties fo:text-align="center" style:justify-single-word="false"/>
      <style:text-properties fo:font-size="12pt" fo:font-weight="bold" officeooo:rsid="028b6207" officeooo:paragraph-rsid="0636dca5" style:font-size-asian="12pt" style:font-weight-asian="bold" style:font-size-complex="12pt" style:font-weight-complex="bold"/>
    </style:style>
    <style:style style:name="P653" style:family="paragraph" style:parent-style-name="Standard">
      <style:paragraph-properties fo:text-align="justify" style:justify-single-word="false"/>
      <style:text-properties fo:font-size="12pt" fo:font-weight="normal" officeooo:rsid="029cb53a" officeooo:paragraph-rsid="029b0dc6" style:font-size-asian="12pt" style:font-weight-asian="normal" style:font-size-complex="12pt" style:font-weight-complex="normal"/>
    </style:style>
    <style:style style:name="P654" style:family="paragraph" style:parent-style-name="Standard">
      <style:paragraph-properties fo:text-align="center" style:justify-single-word="false"/>
      <style:text-properties fo:font-size="12pt" fo:font-weight="bold" officeooo:rsid="062a0665" officeooo:paragraph-rsid="062a0665" style:font-size-asian="12pt" style:font-weight-asian="bold" style:font-size-complex="12pt" style:font-weight-complex="bold"/>
    </style:style>
    <style:style style:name="P655" style:family="paragraph" style:parent-style-name="Horizontal_20_Line">
      <style:text-properties fo:font-size="12pt" style:font-size-asian="12pt" style:font-size-complex="12pt"/>
    </style:style>
    <style:style style:name="P656" style:family="paragraph" style:parent-style-name="Standard">
      <style:paragraph-properties fo:text-align="justify" style:justify-single-word="false"/>
      <style:text-properties fo:color="#000000" loext:opacity="100%" style:font-name="Courier" fo:font-size="11pt" fo:font-weight="normal" officeooo:rsid="015ae828" officeooo:paragraph-rsid="001e271c" fo:background-color="#ffffff" style:font-size-asian="11pt" style:font-weight-asian="normal" style:font-size-complex="11pt" style:font-weight-complex="normal"/>
    </style:style>
    <style:style style:name="P657" style:family="paragraph" style:parent-style-name="Text_20_body">
      <style:paragraph-properties fo:text-align="center" style:justify-single-word="false"/>
      <style:text-properties fo:font-size="12pt" fo:font-weight="bold" officeooo:rsid="029d6d54" officeooo:paragraph-rsid="029d6d54" style:font-size-asian="12pt" style:font-weight-asian="bold" style:font-size-complex="12pt" style:font-weight-complex="bold"/>
    </style:style>
    <style:style style:name="P658" style:family="paragraph" style:parent-style-name="Standard">
      <style:paragraph-properties fo:text-align="justify" style:justify-single-word="false"/>
      <style:text-properties fo:font-size="12pt" fo:font-weight="normal" officeooo:rsid="029d6d54" officeooo:paragraph-rsid="029d6d54" style:font-size-asian="12pt" style:font-weight-asian="normal" style:font-size-complex="12pt" style:font-weight-complex="normal"/>
    </style:style>
    <style:style style:name="P659" style:family="paragraph" style:parent-style-name="Standard">
      <style:paragraph-properties fo:margin-left="0in" fo:margin-right="0in" style:line-height-at-least="0.198in" fo:text-indent="0in" style:auto-text-indent="false"/>
      <style:text-properties style:font-name="Courier" fo:font-size="11pt" style:font-size-asian="11pt" style:font-size-complex="11pt"/>
    </style:style>
    <style:style style:name="P660" style:family="paragraph" style:parent-style-name="Standard">
      <style:paragraph-properties fo:text-align="justify" style:justify-single-word="false"/>
      <style:text-properties fo:font-size="12pt" fo:font-weight="normal" officeooo:rsid="02a0702d" officeooo:paragraph-rsid="02a0702d" style:font-size-asian="12pt" style:font-weight-asian="normal" style:font-size-complex="12pt" style:font-weight-complex="normal"/>
    </style:style>
    <style:style style:name="P661" style:family="paragraph" style:parent-style-name="Standard">
      <style:text-properties fo:color="#000000" loext:opacity="100%" style:font-name="Courier" fo:font-size="10.5pt" fo:font-weight="normal" fo:background-color="#ffffff" style:font-size-asian="12pt" style:font-size-complex="12pt"/>
    </style:style>
    <style:style style:name="P662" style:family="paragraph" style:parent-style-name="Standard">
      <style:paragraph-properties style:line-height-at-least="0.198in"/>
      <style:text-properties style:font-name="Courier"/>
    </style:style>
    <style:style style:name="P663" style:family="paragraph" style:parent-style-name="Standard">
      <style:paragraph-properties fo:margin-left="0in" fo:margin-right="0in" style:line-height-at-least="0.198in" fo:text-indent="0in" style:auto-text-indent="false"/>
      <style:text-properties fo:color="#000000" loext:opacity="100%" style:font-name="Courier" fo:font-size="10.5pt" fo:font-weight="normal" fo:background-color="#ffffff"/>
    </style:style>
    <style:style style:name="P664" style:family="paragraph" style:parent-style-name="Horizontal_20_Line">
      <style:text-properties style:font-name="Courier" fo:font-size="12pt" style:font-size-asian="12pt" style:font-size-complex="12pt"/>
    </style:style>
    <style:style style:name="P665" style:family="paragraph" style:parent-style-name="Text_20_body">
      <style:paragraph-properties fo:text-align="center" style:justify-single-word="false"/>
      <style:text-properties fo:font-size="12pt" fo:font-weight="bold" officeooo:rsid="02a1e3d0" officeooo:paragraph-rsid="02a1e3d0" style:font-size-asian="12pt" style:font-weight-asian="bold" style:font-size-complex="12pt" style:font-weight-complex="bold"/>
    </style:style>
    <style:style style:name="P666" style:family="paragraph" style:parent-style-name="Standard">
      <style:paragraph-properties fo:text-align="justify" style:justify-single-word="false"/>
      <style:text-properties fo:font-size="12pt" fo:font-weight="normal" officeooo:rsid="02a26831" officeooo:paragraph-rsid="02a26831" style:font-size-asian="12pt" style:font-weight-asian="normal" style:font-size-complex="12pt" style:font-weight-complex="normal"/>
    </style:style>
    <style:style style:name="P667" style:family="paragraph" style:parent-style-name="Table_20_Contents">
      <style:paragraph-properties fo:text-align="justify" style:justify-single-word="false"/>
      <style:text-properties fo:font-size="12pt" officeooo:rsid="02a26831" officeooo:paragraph-rsid="02a26831" style:font-size-asian="12pt" style:font-size-complex="12pt"/>
    </style:style>
    <style:style style:name="P668" style:family="paragraph" style:parent-style-name="Standard">
      <style:paragraph-properties fo:text-align="justify" style:justify-single-word="false"/>
      <style:text-properties officeooo:paragraph-rsid="062746c9"/>
    </style:style>
    <style:style style:name="P669" style:family="paragraph" style:parent-style-name="Footnote">
      <style:text-properties officeooo:rsid="02a47326" officeooo:paragraph-rsid="06403430"/>
    </style:style>
    <style:style style:name="P670" style:family="paragraph" style:parent-style-name="Standard">
      <style:paragraph-properties fo:text-align="justify" style:justify-single-word="false"/>
      <style:text-properties fo:font-size="12pt" fo:font-weight="normal" officeooo:rsid="02a47326" officeooo:paragraph-rsid="062746c9" style:font-size-asian="12pt" style:font-weight-asian="normal" style:font-size-complex="12pt" style:font-weight-complex="normal"/>
    </style:style>
    <style:style style:name="P671" style:family="paragraph" style:parent-style-name="Table_20_Contents">
      <style:paragraph-properties fo:text-align="justify" style:justify-single-word="false"/>
      <style:text-properties fo:font-size="12pt" officeooo:rsid="02a50ca5" officeooo:paragraph-rsid="02a50ca5" style:font-size-asian="12pt" style:font-size-complex="12pt"/>
    </style:style>
    <style:style style:name="P672" style:family="paragraph" style:parent-style-name="Standard">
      <style:paragraph-properties fo:text-align="justify" style:justify-single-word="false"/>
      <style:text-properties fo:font-size="12pt" fo:font-weight="bold" officeooo:rsid="015ae828" officeooo:paragraph-rsid="001e271c" style:font-size-asian="12pt" style:font-weight-asian="bold" style:font-size-complex="12pt" style:font-weight-complex="bold"/>
    </style:style>
    <style:style style:name="P673" style:family="paragraph" style:parent-style-name="Standard">
      <style:paragraph-properties fo:text-align="justify" style:justify-single-word="false"/>
      <style:text-properties fo:font-size="12pt" fo:font-weight="normal" officeooo:rsid="02a6209f" officeooo:paragraph-rsid="02a6209f" style:font-size-asian="12pt" style:font-weight-asian="normal" style:font-size-complex="12pt" style:font-weight-complex="normal"/>
    </style:style>
    <style:style style:name="P674" style:family="paragraph" style:parent-style-name="Standard">
      <style:paragraph-properties fo:text-align="justify" style:justify-single-word="false"/>
      <style:text-properties officeooo:paragraph-rsid="02a6209f"/>
    </style:style>
    <style:style style:name="P675" style:family="paragraph" style:parent-style-name="Table_20_Contents">
      <style:paragraph-properties fo:text-align="justify" style:justify-single-word="false"/>
      <style:text-properties fo:font-size="12pt" officeooo:rsid="02a6fe41" officeooo:paragraph-rsid="02a6fe41" style:font-size-asian="12pt" style:font-size-complex="12pt"/>
    </style:style>
    <style:style style:name="P676" style:family="paragraph" style:parent-style-name="Table_20_Contents">
      <style:paragraph-properties fo:text-align="justify" style:justify-single-word="false"/>
      <style:text-properties fo:font-size="12pt" officeooo:rsid="02a74e8e" officeooo:paragraph-rsid="02a74e8e" style:font-size-asian="12pt" style:font-size-complex="12pt"/>
    </style:style>
    <style:style style:name="P677" style:family="paragraph" style:parent-style-name="Standard">
      <style:paragraph-properties fo:text-align="justify" style:justify-single-word="false"/>
      <style:text-properties officeooo:paragraph-rsid="02b5951e"/>
    </style:style>
    <style:style style:name="P678" style:family="paragraph" style:parent-style-name="Standard">
      <style:paragraph-properties fo:text-align="justify" style:justify-single-word="false"/>
      <style:text-properties fo:font-size="12pt" fo:font-weight="normal" officeooo:rsid="02a6209f" officeooo:paragraph-rsid="02b5951e" style:font-size-asian="12pt" style:font-weight-asian="normal" style:font-size-complex="12pt" style:font-weight-complex="normal"/>
    </style:style>
    <style:style style:name="P679" style:family="paragraph" style:parent-style-name="Standard">
      <style:paragraph-properties fo:text-align="justify" style:justify-single-word="false"/>
      <style:text-properties style:font-name="Courier" fo:font-size="12pt" fo:font-weight="normal" officeooo:rsid="02aaac44" officeooo:paragraph-rsid="02a6209f" style:font-size-asian="12pt" style:font-weight-asian="normal" style:font-size-complex="12pt" style:font-weight-complex="normal"/>
    </style:style>
    <style:style style:name="P680" style:family="paragraph" style:parent-style-name="Table_20_Contents">
      <style:paragraph-properties fo:text-align="justify" style:justify-single-word="false"/>
      <style:text-properties fo:font-size="12pt" officeooo:rsid="02aaac44" officeooo:paragraph-rsid="02aaac44" style:font-size-asian="12pt" style:font-size-complex="12pt"/>
    </style:style>
    <style:style style:name="P681" style:family="paragraph" style:parent-style-name="Standard">
      <style:paragraph-properties fo:text-align="justify" style:justify-single-word="false"/>
      <style:text-properties officeooo:paragraph-rsid="02b3f9b7"/>
    </style:style>
    <style:style style:name="P682" style:family="paragraph" style:parent-style-name="Standard">
      <style:paragraph-properties fo:text-align="justify" style:justify-single-word="false"/>
      <style:text-properties fo:font-size="12pt" fo:font-weight="normal" officeooo:rsid="02b3f9b7" officeooo:paragraph-rsid="02b3f9b7" style:font-size-asian="12pt" style:font-weight-asian="normal" style:font-size-complex="12pt" style:font-weight-complex="normal"/>
    </style:style>
    <style:style style:name="P683" style:family="paragraph" style:parent-style-name="Table_20_Contents">
      <style:paragraph-properties fo:text-align="justify" style:justify-single-word="false"/>
      <style:text-properties fo:font-size="12pt" officeooo:rsid="02b5951e" officeooo:paragraph-rsid="02b5951e" style:font-size-asian="12pt" style:font-size-complex="12pt"/>
    </style:style>
    <style:style style:name="P684" style:family="paragraph" style:parent-style-name="Standard">
      <style:paragraph-properties fo:text-align="justify" style:justify-single-word="false"/>
      <style:text-properties fo:font-size="12pt" fo:font-weight="normal" officeooo:rsid="02b34c7a" officeooo:paragraph-rsid="02b34c7a" style:font-size-asian="12pt" style:font-weight-asian="normal" style:font-size-complex="12pt" style:font-weight-complex="normal"/>
    </style:style>
    <style:style style:name="P685" style:family="paragraph" style:parent-style-name="Standard">
      <style:paragraph-properties fo:text-align="justify" style:justify-single-word="false"/>
      <style:text-properties officeooo:paragraph-rsid="062a0665"/>
    </style:style>
    <style:style style:name="P686" style:family="paragraph" style:parent-style-name="Standard">
      <style:paragraph-properties fo:text-align="justify" style:justify-single-word="false"/>
      <style:text-properties fo:font-size="12pt" fo:font-weight="normal" officeooo:rsid="02bd9156" officeooo:paragraph-rsid="02bd9156" style:font-size-asian="12pt" style:font-weight-asian="normal" style:font-size-complex="12pt" style:font-weight-complex="normal"/>
    </style:style>
    <style:style style:name="P687" style:family="paragraph" style:parent-style-name="Table_20_Contents">
      <style:paragraph-properties fo:text-align="justify" style:justify-single-word="false"/>
      <style:text-properties fo:font-size="12pt" officeooo:rsid="02bf24eb" officeooo:paragraph-rsid="02bf24eb" style:font-size-asian="12pt" style:font-size-complex="12pt"/>
    </style:style>
    <style:style style:name="P688" style:family="paragraph" style:parent-style-name="Standard">
      <style:paragraph-properties fo:text-align="justify" style:justify-single-word="false"/>
      <style:text-properties officeooo:paragraph-rsid="02bf24eb"/>
    </style:style>
    <style:style style:name="P689" style:family="paragraph" style:parent-style-name="Standard">
      <style:paragraph-properties fo:text-align="justify" style:justify-single-word="false"/>
      <style:text-properties fo:font-size="12pt" fo:font-weight="normal" officeooo:rsid="02bf24eb" officeooo:paragraph-rsid="02bf24eb" style:font-size-asian="12pt" style:font-weight-asian="normal" style:font-size-complex="12pt" style:font-weight-complex="normal"/>
    </style:style>
    <style:style style:name="P690" style:family="paragraph" style:parent-style-name="Table_20_Contents">
      <style:paragraph-properties fo:text-align="justify" style:justify-single-word="false"/>
      <style:text-properties fo:font-size="12pt" officeooo:rsid="02bfcbf1" officeooo:paragraph-rsid="02bfcbf1" style:font-size-asian="12pt" style:font-size-complex="12pt"/>
    </style:style>
    <style:style style:name="P691" style:family="paragraph" style:parent-style-name="Standard">
      <style:paragraph-properties fo:text-align="justify" style:justify-single-word="false"/>
      <style:text-properties fo:font-size="12pt" fo:font-weight="normal" officeooo:rsid="02bfcbf1" officeooo:paragraph-rsid="02bfcbf1" style:font-size-asian="12pt" style:font-weight-asian="normal" style:font-size-complex="12pt" style:font-weight-complex="normal"/>
    </style:style>
    <style:style style:name="P692" style:family="paragraph" style:parent-style-name="Table_20_Contents">
      <style:paragraph-properties fo:text-align="justify" style:justify-single-word="false"/>
      <style:text-properties fo:font-size="12pt" officeooo:rsid="02c06a63" officeooo:paragraph-rsid="02c06a63" style:font-size-asian="12pt" style:font-size-complex="12pt"/>
    </style:style>
    <style:style style:name="P693" style:family="paragraph" style:parent-style-name="Standard">
      <style:paragraph-properties fo:text-align="justify" style:justify-single-word="false"/>
      <style:text-properties fo:font-size="12pt" fo:font-weight="normal" officeooo:rsid="02cbf116" officeooo:paragraph-rsid="02cbf116" style:font-size-asian="12pt" style:font-weight-asian="normal" style:font-size-complex="12pt" style:font-weight-complex="normal"/>
    </style:style>
    <style:style style:name="P694" style:family="paragraph" style:parent-style-name="Table_20_Contents">
      <style:paragraph-properties fo:text-align="justify" style:justify-single-word="false"/>
      <style:text-properties fo:font-size="12pt" officeooo:rsid="02cbf116" officeooo:paragraph-rsid="02cbf116" style:font-size-asian="12pt" style:font-size-complex="12pt"/>
    </style:style>
    <style:style style:name="P695" style:family="paragraph" style:parent-style-name="Standard">
      <style:paragraph-properties fo:text-align="justify" style:justify-single-word="false"/>
      <style:text-properties officeooo:paragraph-rsid="02d2b4b1"/>
    </style:style>
    <style:style style:name="P696" style:family="paragraph" style:parent-style-name="Footnote">
      <style:text-properties officeooo:rsid="02d8a4bf" officeooo:paragraph-rsid="06403430"/>
    </style:style>
    <style:style style:name="P697" style:family="paragraph" style:parent-style-name="Standard">
      <style:paragraph-properties fo:text-align="justify" style:justify-single-word="false"/>
      <style:text-properties officeooo:paragraph-rsid="02cd6ae1"/>
    </style:style>
    <style:style style:name="P698" style:family="paragraph" style:parent-style-name="Standard">
      <style:paragraph-properties fo:text-align="justify" style:justify-single-word="false"/>
      <style:text-properties fo:font-size="12pt" fo:font-weight="normal" officeooo:rsid="02cd6ae1" officeooo:paragraph-rsid="02cd6ae1" style:font-size-asian="12pt" style:font-weight-asian="normal" style:font-size-complex="12pt" style:font-weight-complex="normal"/>
    </style:style>
    <style:style style:name="P699" style:family="paragraph" style:parent-style-name="Table_20_Contents">
      <style:paragraph-properties fo:text-align="justify" style:justify-single-word="false"/>
      <style:text-properties fo:font-size="12pt" officeooo:rsid="02ce70a5" officeooo:paragraph-rsid="02ce70a5" style:font-size-asian="12pt" style:font-size-complex="12pt"/>
    </style:style>
    <style:style style:name="P700" style:family="paragraph" style:parent-style-name="Standard">
      <style:paragraph-properties fo:text-align="justify" style:justify-single-word="false"/>
      <style:text-properties fo:font-size="12pt" fo:font-weight="normal" officeooo:rsid="02ce70a5" officeooo:paragraph-rsid="02cd6ae1" style:font-size-asian="12pt" style:font-weight-asian="normal" style:font-size-complex="12pt" style:font-weight-complex="normal"/>
    </style:style>
    <style:style style:name="P701" style:family="paragraph" style:parent-style-name="Standard">
      <style:paragraph-properties fo:text-align="justify" style:justify-single-word="false"/>
      <style:text-properties officeooo:paragraph-rsid="02ce70a5"/>
    </style:style>
    <style:style style:name="P702" style:family="paragraph" style:parent-style-name="Standard">
      <style:paragraph-properties fo:text-align="justify" style:justify-single-word="false"/>
      <style:text-properties fo:font-size="12pt" fo:font-weight="normal" officeooo:rsid="02ce70a5" officeooo:paragraph-rsid="02ce70a5" style:font-size-asian="12pt" style:font-weight-asian="normal" style:font-size-complex="12pt" style:font-weight-complex="normal"/>
    </style:style>
    <style:style style:name="P703" style:family="paragraph" style:parent-style-name="Table_20_Contents">
      <style:paragraph-properties fo:text-align="justify" style:justify-single-word="false"/>
      <style:text-properties fo:font-size="12pt" officeooo:rsid="02cfc348" officeooo:paragraph-rsid="02cfc348" style:font-size-asian="12pt" style:font-size-complex="12pt"/>
    </style:style>
    <style:style style:name="P704" style:family="paragraph" style:parent-style-name="Standard">
      <style:paragraph-properties fo:margin-left="0in" fo:margin-right="0in" fo:text-align="justify" style:justify-single-word="false" fo:text-indent="0in" style:auto-text-indent="false"/>
      <style:text-properties officeooo:paragraph-rsid="03106e54"/>
    </style:style>
    <style:style style:name="P705" style:family="paragraph" style:parent-style-name="Standard">
      <style:paragraph-properties fo:text-align="justify" style:justify-single-word="false"/>
      <style:text-properties officeooo:paragraph-rsid="02d8b689"/>
    </style:style>
    <style:style style:name="P706" style:family="paragraph" style:parent-style-name="Standard">
      <style:paragraph-properties fo:text-align="justify" style:justify-single-word="false"/>
      <style:text-properties fo:font-size="12pt" fo:font-weight="normal" officeooo:rsid="02d8b689" officeooo:paragraph-rsid="02d8b689" style:font-size-asian="12pt" style:font-weight-asian="normal" style:font-size-complex="12pt" style:font-weight-complex="normal"/>
    </style:style>
    <style:style style:name="P707" style:family="paragraph" style:parent-style-name="Table_20_Contents">
      <style:paragraph-properties fo:text-align="justify" style:justify-single-word="false"/>
      <style:text-properties fo:font-size="12pt" officeooo:rsid="02d8dfb3" officeooo:paragraph-rsid="02d8dfb3" style:font-size-asian="12pt" style:font-size-complex="12pt"/>
    </style:style>
    <style:style style:name="P708" style:family="paragraph" style:parent-style-name="Standard">
      <style:paragraph-properties fo:text-align="justify" style:justify-single-word="false"/>
      <style:text-properties officeooo:paragraph-rsid="02fcdcda"/>
    </style:style>
    <style:style style:name="P709" style:family="paragraph" style:parent-style-name="Standard">
      <style:paragraph-properties fo:text-align="justify" style:justify-single-word="false"/>
      <style:text-properties fo:font-size="12pt" fo:font-weight="normal" officeooo:rsid="02f734a7" officeooo:paragraph-rsid="02fcdcda" style:font-size-asian="12pt" style:font-weight-asian="normal" style:font-size-complex="12pt" style:font-weight-complex="normal"/>
    </style:style>
    <style:style style:name="P710" style:family="paragraph" style:parent-style-name="Table_20_Contents">
      <style:paragraph-properties fo:text-align="justify" style:justify-single-word="false"/>
      <style:text-properties fo:font-size="12pt" officeooo:rsid="02f8e3ac" officeooo:paragraph-rsid="02fcdcda" style:font-size-asian="12pt" style:font-size-complex="12pt"/>
    </style:style>
    <style:style style:name="P711" style:family="paragraph" style:parent-style-name="Table_20_Contents">
      <style:paragraph-properties fo:text-align="justify" style:justify-single-word="false"/>
      <style:text-properties fo:font-size="12pt" officeooo:rsid="02fe7e9b" officeooo:paragraph-rsid="02fe7e9b" style:font-size-asian="12pt" style:font-size-complex="12pt"/>
    </style:style>
    <style:style style:name="P712" style:family="paragraph" style:parent-style-name="Standard">
      <style:paragraph-properties fo:text-align="justify" style:justify-single-word="false"/>
      <style:text-properties fo:font-size="12pt" fo:font-weight="normal" officeooo:rsid="02fe7e9b" officeooo:paragraph-rsid="02fcdcda" style:font-size-asian="12pt" style:font-weight-asian="normal" style:font-size-complex="12pt" style:font-weight-complex="normal"/>
    </style:style>
    <style:style style:name="P713" style:family="paragraph" style:parent-style-name="Standard">
      <style:paragraph-properties fo:text-align="justify" style:justify-single-word="false"/>
      <style:text-properties fo:font-size="12pt" fo:font-weight="normal" officeooo:rsid="02fe7e9b" officeooo:paragraph-rsid="02fe7e9b" style:font-size-asian="12pt" style:font-weight-asian="normal" style:font-size-complex="12pt" style:font-weight-complex="normal"/>
    </style:style>
    <style:style style:name="P714" style:family="paragraph" style:parent-style-name="Standard">
      <style:paragraph-properties fo:text-align="center" style:justify-single-word="false"/>
      <style:text-properties fo:font-size="14pt" fo:font-weight="bold" officeooo:rsid="00050863" officeooo:paragraph-rsid="044a96b6" style:font-size-asian="14pt" style:font-weight-asian="bold" style:font-size-complex="14pt" style:font-weight-complex="bold"/>
    </style:style>
    <style:style style:name="P715" style:family="paragraph" style:parent-style-name="Standard">
      <style:text-properties fo:font-size="14pt" fo:font-weight="bold" officeooo:rsid="00050863" officeooo:paragraph-rsid="044a96b6" style:font-size-asian="14pt" style:font-weight-asian="bold" style:font-size-complex="14pt" style:font-weight-complex="bold"/>
    </style:style>
    <style:style style:name="P716" style:family="paragraph" style:parent-style-name="Standard">
      <style:text-properties fo:font-size="12pt" officeooo:rsid="000df035" officeooo:paragraph-rsid="044c52d9" style:font-size-asian="12pt" style:font-size-complex="12pt"/>
    </style:style>
    <style:style style:name="P717" style:family="paragraph" style:parent-style-name="Standard">
      <style:text-properties officeooo:paragraph-rsid="05df3abc"/>
    </style:style>
    <style:style style:name="P718" style:family="paragraph" style:parent-style-name="Standard">
      <style:paragraph-properties fo:text-align="left" style:justify-single-word="false"/>
      <style:text-properties officeooo:paragraph-rsid="044d31de"/>
    </style:style>
    <style:style style:name="P719" style:family="paragraph" style:parent-style-name="Standard">
      <style:paragraph-properties fo:text-align="center" style:justify-single-word="false"/>
      <style:text-properties fo:font-size="14pt" fo:font-weight="bold" officeooo:rsid="04e6de64" officeooo:paragraph-rsid="001e271c" style:font-size-asian="14pt" style:font-weight-asian="bold" style:font-size-complex="14pt" style:font-weight-complex="bold"/>
    </style:style>
    <style:style style:name="P720" style:family="paragraph" style:parent-style-name="Standard">
      <style:paragraph-properties fo:text-align="center" style:justify-single-word="false"/>
      <style:text-properties fo:font-size="14pt" fo:font-weight="bold" officeooo:rsid="0525347f" officeooo:paragraph-rsid="05e1541e" style:font-size-asian="14pt" style:font-weight-asian="bold" style:font-size-complex="14pt" style:font-weight-complex="bold"/>
    </style:style>
    <style:style style:name="P721" style:family="paragraph" style:parent-style-name="Standard">
      <style:text-properties fo:font-size="12pt" fo:font-weight="bold" officeooo:rsid="00100831" officeooo:paragraph-rsid="05e1541e" style:font-size-asian="12pt" style:font-weight-asian="bold" style:font-size-complex="12pt" style:font-weight-complex="bold"/>
    </style:style>
    <style:style style:name="P722" style:family="paragraph" style:parent-style-name="Standard">
      <style:text-properties fo:font-size="12pt" officeooo:rsid="000b4c8f" officeooo:paragraph-rsid="05e1541e" style:font-size-asian="12pt" style:font-size-complex="12pt"/>
    </style:style>
    <style:style style:name="P723" style:family="paragraph" style:parent-style-name="Standard">
      <style:text-properties fo:font-size="12pt" officeooo:rsid="00089a61" officeooo:paragraph-rsid="05e1541e" style:font-size-asian="12pt" style:font-size-complex="12pt"/>
    </style:style>
    <style:style style:name="P724" style:family="paragraph" style:parent-style-name="Standard">
      <style:text-properties officeooo:paragraph-rsid="05e1541e"/>
    </style:style>
    <style:style style:name="P725" style:family="paragraph" style:parent-style-name="Standard">
      <style:paragraph-properties fo:text-align="left" style:justify-single-word="false"/>
      <style:text-properties style:font-name="Liberation Serif" fo:font-size="12pt" fo:font-weight="normal" officeooo:rsid="000a39f5" officeooo:paragraph-rsid="05e1541e" style:font-size-asian="12pt" style:font-weight-asian="normal" style:font-size-complex="12pt" style:font-weight-complex="normal"/>
    </style:style>
    <style:style style:name="P726" style:family="paragraph" style:parent-style-name="Standard">
      <style:paragraph-properties fo:text-align="left" style:justify-single-word="false"/>
      <style:text-properties style:font-name="Liberation Serif" fo:font-size="12pt" fo:font-weight="normal" officeooo:rsid="0028db55" officeooo:paragraph-rsid="05e1541e" style:font-size-asian="12pt" style:font-weight-asian="normal" style:font-size-complex="12pt" style:font-weight-complex="normal"/>
    </style:style>
    <style:style style:name="P727" style:family="paragraph" style:parent-style-name="Standard">
      <style:paragraph-properties fo:text-align="center" style:justify-single-word="false"/>
      <style:text-properties style:font-name="Liberation Serif" fo:font-size="16pt" style:text-underline-style="none" fo:font-weight="bold" officeooo:rsid="25940124" officeooo:paragraph-rsid="06656c02" style:font-size-asian="16pt" style:font-weight-asian="bold" style:font-size-complex="16pt" style:font-weight-complex="bold"/>
    </style:style>
    <style:style style:name="P728" style:family="paragraph" style:parent-style-name="Standard">
      <style:text-properties fo:font-size="11pt" officeooo:paragraph-rsid="06656c02" style:font-size-asian="11pt" style:font-size-complex="11pt"/>
    </style:style>
    <style:style style:name="P729" style:family="paragraph" style:parent-style-name="Standard">
      <style:text-properties fo:font-size="11pt" fo:font-style="normal" officeooo:paragraph-rsid="06656c02" style:font-size-asian="11pt" style:font-style-asian="normal" style:font-size-complex="11pt" style:font-style-complex="normal"/>
    </style:style>
    <style:style style:name="P730" style:family="paragraph" style:parent-style-name="Text_20_body">
      <style:text-properties officeooo:paragraph-rsid="06656c02"/>
    </style:style>
    <style:style style:name="P731" style:family="paragraph" style:parent-style-name="Text_20_body">
      <style:paragraph-properties fo:text-align="center" style:justify-single-word="false"/>
      <style:text-properties officeooo:paragraph-rsid="06656c02"/>
    </style:style>
    <style:style style:name="P732" style:family="paragraph" style:parent-style-name="Standard">
      <style:paragraph-properties fo:text-align="center" style:justify-single-word="false"/>
      <style:text-properties fo:font-size="12pt" fo:font-style="normal" fo:font-weight="bold" officeooo:rsid="001864e6" officeooo:paragraph-rsid="06656c02" style:font-size-asian="12pt" style:font-style-asian="normal" style:font-weight-asian="bold" style:font-size-complex="12pt" style:font-style-complex="normal" style:font-weight-complex="bold"/>
    </style:style>
    <style:style style:name="P733" style:family="paragraph" style:parent-style-name="Standard">
      <style:paragraph-properties fo:text-align="left" style:justify-single-word="false"/>
      <style:text-properties fo:font-size="13pt" fo:font-style="normal" fo:font-weight="bold" officeooo:rsid="001864e6" officeooo:paragraph-rsid="06656c02" style:font-size-asian="13pt" style:font-style-asian="normal" style:font-weight-asian="bold" style:font-size-complex="13pt" style:font-style-complex="normal" style:font-weight-complex="bold"/>
    </style:style>
    <style:style style:name="P734" style:family="paragraph" style:parent-style-name="Standard">
      <style:paragraph-properties fo:text-align="left" style:justify-single-word="false"/>
      <style:text-properties fo:color="#000000" loext:opacity="100%" fo:font-size="11pt" fo:font-style="normal" fo:font-weight="normal" officeooo:rsid="0042ce28" officeooo:paragraph-rsid="06656c02" style:font-size-asian="11pt" style:font-style-asian="normal" style:font-weight-asian="normal" style:font-size-complex="11pt" style:font-style-complex="normal" style:font-weight-complex="normal"/>
    </style:style>
    <style:style style:name="P735" style:family="paragraph" style:parent-style-name="Standard">
      <style:paragraph-properties fo:text-align="left" style:justify-single-word="false"/>
      <style:text-properties fo:font-size="12pt" officeooo:paragraph-rsid="06656c02" style:font-size-asian="12pt" style:font-size-complex="12pt"/>
    </style:style>
    <style:style style:name="P736" style:family="paragraph" style:parent-style-name="Standard">
      <style:paragraph-properties fo:text-align="left" style:justify-single-word="false"/>
      <style:text-properties fo:font-size="11pt" officeooo:paragraph-rsid="06656c02" style:font-size-asian="11pt" style:font-size-complex="11pt"/>
    </style:style>
    <style:style style:name="P737" style:family="paragraph" style:parent-style-name="Standard">
      <style:paragraph-properties fo:text-align="left" style:justify-single-word="false"/>
      <style:text-properties fo:font-size="12pt" fo:font-style="normal" fo:font-weight="normal" officeooo:rsid="001bb40f" officeooo:paragraph-rsid="06656c02" style:font-size-asian="12pt" style:font-style-asian="normal" style:font-weight-asian="normal" style:font-size-complex="12pt" style:font-style-complex="normal" style:font-weight-complex="normal"/>
    </style:style>
    <style:style style:name="P738" style:family="paragraph" style:parent-style-name="Standard">
      <style:paragraph-properties fo:text-align="left" style:justify-single-word="false"/>
      <style:text-properties fo:font-size="12pt" fo:font-style="italic" fo:font-weight="normal" officeooo:rsid="04e6de64" officeooo:paragraph-rsid="06656c02" style:font-size-asian="12pt" style:font-style-asian="italic" style:font-weight-asian="normal" style:font-size-complex="12pt" style:font-style-complex="italic" style:font-weight-complex="normal"/>
    </style:style>
    <style:style style:name="P739" style:family="paragraph" style:parent-style-name="Standard">
      <style:paragraph-properties fo:text-align="left" style:justify-single-word="false"/>
      <style:text-properties fo:color="#000000" loext:opacity="100%" officeooo:rsid="07ca9b6f" officeooo:paragraph-rsid="06656c02"/>
    </style:style>
    <style:style style:name="P740" style:family="paragraph" style:parent-style-name="Standard">
      <style:paragraph-properties fo:text-align="left" style:justify-single-word="false"/>
      <style:text-properties fo:font-size="12pt" fo:font-style="normal" fo:font-weight="normal" officeooo:rsid="06a83a61" officeooo:paragraph-rsid="06656c02" style:font-size-asian="12pt" style:font-style-asian="normal" style:font-weight-asian="normal" style:font-size-complex="12pt" style:font-style-complex="normal" style:font-weight-complex="normal"/>
    </style:style>
    <style:style style:name="P741" style:family="paragraph" style:parent-style-name="Standard">
      <style:paragraph-properties fo:text-align="left" style:justify-single-word="false"/>
      <style:text-properties fo:font-size="11pt" fo:font-style="normal" fo:font-weight="normal" officeooo:rsid="002e2447" officeooo:paragraph-rsid="06656c02" style:font-size-asian="11pt" style:font-style-asian="normal" style:font-weight-asian="normal" style:font-size-complex="11pt" style:font-style-complex="normal" style:font-weight-complex="normal"/>
    </style:style>
    <style:style style:name="P742" style:family="paragraph" style:parent-style-name="Standard">
      <style:paragraph-properties fo:text-align="left" style:justify-single-word="false"/>
      <style:text-properties fo:font-size="11pt" fo:font-style="normal" fo:font-weight="normal" officeooo:rsid="0040da04" officeooo:paragraph-rsid="06656c02" style:font-size-asian="11pt" style:font-style-asian="normal" style:font-weight-asian="normal" style:font-size-complex="11pt" style:font-style-complex="normal" style:font-weight-complex="normal"/>
    </style:style>
    <style:style style:name="P743" style:family="paragraph" style:parent-style-name="Standard">
      <style:paragraph-properties fo:text-align="left" style:justify-single-word="false"/>
      <style:text-properties fo:font-size="12pt" fo:font-style="normal" fo:font-weight="normal" officeooo:rsid="00300a2e" officeooo:paragraph-rsid="06656c02" style:font-size-asian="12pt" style:font-style-asian="normal" style:font-weight-asian="normal" style:font-size-complex="12pt" style:font-style-complex="normal" style:font-weight-complex="normal"/>
    </style:style>
    <style:style style:name="P744" style:family="paragraph" style:parent-style-name="Standard">
      <style:paragraph-properties fo:text-align="left" style:justify-single-word="false"/>
      <style:text-properties fo:color="#000000" loext:opacity="100%" fo:font-size="12pt" officeooo:rsid="001bb40f" officeooo:paragraph-rsid="06656c02" style:font-size-asian="12pt" style:font-size-complex="12pt"/>
    </style:style>
    <style:style style:name="P745" style:family="paragraph" style:parent-style-name="Standard">
      <style:paragraph-properties fo:text-align="left" style:justify-single-word="false"/>
      <style:text-properties fo:font-size="12pt" fo:font-style="normal" fo:font-weight="normal" officeooo:rsid="0038ea64" officeooo:paragraph-rsid="06656c02" style:font-size-asian="12pt" style:font-style-asian="normal" style:font-weight-asian="normal" style:font-size-complex="12pt" style:font-style-complex="normal" style:font-weight-complex="normal"/>
    </style:style>
    <style:style style:name="P746" style:family="paragraph" style:parent-style-name="Standard">
      <style:paragraph-properties fo:text-align="left" style:justify-single-word="false"/>
      <style:text-properties fo:font-variant="normal" fo:text-transform="none" fo:color="#000000" loext:opacity="100%" style:font-name="Times New Roman" fo:font-size="12pt" fo:letter-spacing="normal" fo:font-style="normal" fo:font-weight="normal" officeooo:rsid="003eb191" officeooo:paragraph-rsid="06656c02"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left" style:justify-single-word="false"/>
      <style:text-properties fo:font-variant="normal" fo:text-transform="none" fo:color="#000000" loext:opacity="100%" style:font-name="Times New Roman" fo:font-size="11pt" fo:letter-spacing="normal" fo:font-style="normal" fo:font-weight="normal" officeooo:rsid="001e3f4e" officeooo:paragraph-rsid="06656c02" style:font-size-asian="11pt" style:font-style-asian="normal" style:font-weight-asian="normal" style:font-size-complex="11pt" style:font-style-complex="normal" style:font-weight-complex="normal"/>
    </style:style>
    <style:style style:name="P748" style:family="paragraph" style:parent-style-name="Standard">
      <style:paragraph-properties fo:text-align="left" style:justify-single-word="false"/>
      <style:text-properties fo:font-size="12pt" fo:font-style="normal" fo:font-weight="bold" officeooo:rsid="001864e6" officeooo:paragraph-rsid="06656c02" style:font-size-asian="12pt" style:font-style-asian="normal" style:font-weight-asian="bold" style:font-size-complex="12pt" style:font-style-complex="normal" style:font-weight-complex="bold"/>
    </style:style>
    <style:style style:name="P749" style:family="paragraph" style:parent-style-name="Standard">
      <style:paragraph-properties fo:text-align="left" style:justify-single-word="false"/>
      <style:text-properties style:use-window-font-color="true" loext:opacity="0%" fo:font-size="12pt" fo:language="zxx" fo:country="none" fo:font-style="italic" style:text-underline-style="solid" style:text-underline-width="auto" style:text-underline-color="font-color" fo:font-weight="normal" officeooo:rsid="04e6de64" officeooo:paragraph-rsid="06656c0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50" style:family="paragraph" style:parent-style-name="Standard">
      <style:paragraph-properties fo:text-align="left" style:justify-single-word="false"/>
      <style:text-properties fo:font-size="12pt" fo:font-style="normal" fo:font-weight="bold" officeooo:rsid="005b6578" officeooo:paragraph-rsid="06656c02" style:font-size-asian="12pt" style:font-style-asian="normal" style:font-weight-asian="bold" style:font-size-complex="12pt" style:font-style-complex="normal" style:font-weight-complex="bold"/>
    </style:style>
    <style:style style:name="P751" style:family="paragraph" style:parent-style-name="Standard">
      <style:paragraph-properties fo:text-align="left" style:justify-single-word="false"/>
      <style:text-properties fo:font-size="11pt" fo:font-style="normal" fo:font-weight="bold" officeooo:rsid="005b6578" officeooo:paragraph-rsid="06656c02" style:font-size-asian="11pt" style:font-style-asian="normal" style:font-weight-asian="bold" style:font-size-complex="11pt" style:font-style-complex="normal" style:font-weight-complex="bold"/>
    </style:style>
    <style:style style:name="P752" style:family="paragraph" style:parent-style-name="Standard">
      <style:paragraph-properties fo:text-align="left" style:justify-single-word="false"/>
      <style:text-properties fo:font-size="12pt" fo:font-style="normal" fo:font-weight="normal" officeooo:rsid="0032b4f6" officeooo:paragraph-rsid="06656c02" style:font-size-asian="12pt" style:font-style-asian="normal" style:font-weight-asian="normal" style:font-size-complex="12pt" style:font-style-complex="normal" style:font-weight-complex="normal"/>
    </style:style>
    <style:style style:name="P753" style:family="paragraph" style:parent-style-name="Standard">
      <style:paragraph-properties fo:text-align="left" style:justify-single-word="false"/>
      <style:text-properties fo:font-size="12pt" fo:font-style="normal" fo:font-weight="normal" officeooo:rsid="00362759" officeooo:paragraph-rsid="06656c02" style:font-size-asian="12pt" style:font-style-asian="normal" style:font-weight-asian="normal" style:font-size-complex="12pt" style:font-style-complex="normal" style:font-weight-complex="normal"/>
    </style:style>
    <style:style style:name="P754" style:family="paragraph" style:parent-style-name="Standard">
      <style:paragraph-properties fo:text-align="left" style:justify-single-word="false"/>
      <style:text-properties fo:font-size="12pt" fo:font-style="normal" fo:font-weight="bold" officeooo:rsid="016c5eaa" officeooo:paragraph-rsid="06656c02" style:font-size-asian="12pt" style:font-style-asian="normal" style:font-weight-asian="bold" style:font-size-complex="12pt" style:font-style-complex="normal" style:font-weight-complex="bold"/>
    </style:style>
    <style:style style:name="P755" style:family="paragraph" style:parent-style-name="Standard">
      <style:paragraph-properties fo:text-align="left" style:justify-single-word="false"/>
      <style:text-properties fo:font-size="12pt" fo:font-style="normal" fo:font-weight="bold" officeooo:rsid="008738a1" officeooo:paragraph-rsid="06656c02" style:font-size-asian="12pt" style:font-style-asian="normal" style:font-weight-asian="bold" style:font-size-complex="12pt" style:font-style-complex="normal" style:font-weight-complex="bold"/>
    </style:style>
    <style:style style:name="P756" style:family="paragraph" style:parent-style-name="Standard">
      <style:paragraph-properties fo:text-align="left" style:justify-single-word="false"/>
      <style:text-properties fo:font-size="12pt" fo:font-style="normal" fo:font-weight="normal" officeooo:rsid="0064ed33" officeooo:paragraph-rsid="06656c02" style:font-size-asian="12pt" style:font-style-asian="normal" style:font-weight-asian="normal" style:font-size-complex="12pt" style:font-style-complex="normal" style:font-weight-complex="normal"/>
    </style:style>
    <style:style style:name="P757" style:family="paragraph" style:parent-style-name="Standard">
      <style:paragraph-properties fo:text-align="left" style:justify-single-word="false"/>
      <style:text-properties fo:font-size="12pt" fo:font-style="normal" fo:font-weight="normal" officeooo:rsid="008738a1" officeooo:paragraph-rsid="06656c02" style:font-size-asian="12pt" style:font-style-asian="normal" style:font-weight-asian="normal" style:font-size-complex="12pt" style:font-style-complex="normal" style:font-weight-complex="normal"/>
    </style:style>
    <style:style style:name="P758" style:family="paragraph" style:parent-style-name="Standard">
      <style:paragraph-properties fo:text-align="left" style:justify-single-word="false"/>
      <style:text-properties fo:font-size="11pt" fo:font-style="normal" fo:font-weight="bold" officeooo:rsid="005e86f0" officeooo:paragraph-rsid="06656c02" style:font-size-asian="11pt" style:font-style-asian="normal" style:font-weight-asian="bold" style:font-size-complex="11pt" style:font-style-complex="normal" style:font-weight-complex="bold"/>
    </style:style>
    <style:style style:name="P759" style:family="paragraph" style:parent-style-name="Standard">
      <style:paragraph-properties fo:text-align="left" style:justify-single-word="false"/>
      <style:text-properties fo:font-size="12pt" fo:font-style="normal" fo:font-weight="normal" officeooo:rsid="00667026" officeooo:paragraph-rsid="06656c02" style:font-size-asian="12pt" style:font-style-asian="normal" style:font-weight-asian="normal" style:font-size-complex="12pt" style:font-style-complex="normal" style:font-weight-complex="normal"/>
    </style:style>
    <style:style style:name="P760" style:family="paragraph" style:parent-style-name="Standard">
      <style:paragraph-properties fo:text-align="center" style:justify-single-word="false"/>
      <style:text-properties style:font-name="Courier" fo:font-size="12pt" fo:font-weight="normal" officeooo:rsid="000f2c87" officeooo:paragraph-rsid="001e271c" style:font-size-asian="12pt" style:font-weight-asian="normal" style:font-size-complex="12pt" style:font-weight-complex="normal"/>
    </style:style>
    <style:style style:name="T1" style:family="text">
      <style:text-properties officeooo:rsid="381f241e"/>
    </style:style>
    <style:style style:name="T2" style:family="text">
      <style:text-properties officeooo:rsid="06656c02"/>
    </style:style>
    <style:style style:name="T3" style:family="text">
      <style:text-properties fo:font-weight="bold" officeooo:rsid="0020e2f6" style:font-weight-asian="bold" style:font-weight-complex="bold"/>
    </style:style>
    <style:style style:name="T4" style:family="text">
      <style:text-properties fo:font-style="normal" fo:font-weight="bold" officeooo:rsid="00225b0b" style:font-style-asian="normal" style:font-weight-asian="bold" style:font-style-complex="normal" style:font-weight-complex="bold"/>
    </style:style>
    <style:style style:name="T5" style:family="text">
      <style:text-properties fo:font-size="16pt" officeooo:rsid="381fa95b" style:font-size-asian="16pt" style:font-size-complex="16pt"/>
    </style:style>
    <style:style style:name="T6" style:family="text">
      <style:text-properties style:font-name="Liberation Serif" fo:font-size="12pt" fo:font-weight="normal" officeooo:rsid="00225b0b" style:font-size-asian="12pt" style:font-weight-asian="normal" style:font-size-complex="12pt" style:font-weight-complex="normal"/>
    </style:style>
    <style:style style:name="T7" style:family="text">
      <style:text-properties fo:font-size="16pt" officeooo:rsid="0023b133" style:font-size-asian="16pt" style:font-size-complex="16pt"/>
    </style:style>
    <style:style style:name="T8" style:family="text">
      <style:text-properties fo:font-size="16pt" officeooo:rsid="06656c02" style:font-size-asian="16pt" style:font-size-complex="16pt"/>
    </style:style>
    <style:style style:name="T9" style:family="text">
      <style:text-properties fo:font-size="13pt" officeooo:rsid="0023b133" style:font-size-asian="13pt" style:font-size-complex="13pt"/>
    </style:style>
    <style:style style:name="T10" style:family="text">
      <style:text-properties fo:font-size="12pt" fo:font-style="normal" fo:font-weight="normal" officeooo:rsid="06424484" style:font-size-asian="10.5pt" style:font-style-asian="normal" style:font-weight-asian="normal" style:font-size-complex="12pt" style:font-style-complex="normal" style:font-weight-complex="normal"/>
    </style:style>
    <style:style style:name="T11" style:family="text">
      <style:text-properties style:font-name="Courier" fo:font-size="12pt" fo:font-style="normal" fo:font-weight="normal" officeooo:rsid="063ced5f" style:font-size-asian="10.5pt" style:font-style-asian="normal" style:font-weight-asian="normal" style:font-size-complex="12pt" style:font-style-complex="normal" style:font-weight-complex="normal"/>
    </style:style>
    <style:style style:name="T12" style:family="text">
      <style:text-properties style:font-name="Courier" fo:font-size="12pt" fo:font-style="italic" fo:font-weight="normal" officeooo:rsid="063ced5f" style:font-size-asian="10.5pt" style:font-style-asian="italic" style:font-weight-asian="normal" style:font-size-complex="12pt" style:font-style-complex="italic" style:font-weight-complex="normal"/>
    </style:style>
    <style:style style:name="T13" style:family="text">
      <style:text-properties officeooo:rsid="00073d60"/>
    </style:style>
    <style:style style:name="T14" style:family="text">
      <style:text-properties officeooo:rsid="063ced5f"/>
    </style:style>
    <style:style style:name="T15" style:family="text">
      <style:text-properties style:font-name="Courier"/>
    </style:style>
    <style:style style:name="T16" style:family="text">
      <style:text-properties style:use-window-font-color="true" loext:opacity="0%" style:font-name="Courier" fo:font-size="10pt" fo:font-weight="normal" fo:background-color="#ffffff" loext:char-shading-value="0" style:font-size-asian="10pt" style:font-size-complex="10pt"/>
    </style:style>
    <style:style style:name="T17" style:family="text">
      <style:text-properties fo:color="#000000" loext:opacity="100%" style:font-name="Courier" fo:font-size="11pt" fo:font-weight="normal" fo:background-color="#ffffff" loext:char-shading-value="0" style:font-size-asian="11pt" style:font-size-complex="11pt"/>
    </style:style>
    <style:style style:name="T18" style:family="text">
      <style:text-properties fo:color="#0000ff" loext:opacity="100%" style:font-name="Courier" fo:font-size="11pt" fo:font-weight="normal" fo:background-color="#ffffff" loext:char-shading-value="0" style:font-size-asian="11pt" style:font-size-complex="11pt"/>
    </style:style>
    <style:style style:name="T19" style:family="text">
      <style:text-properties fo:color="#a31515" loext:opacity="100%" style:font-name="Courier" fo:font-size="11pt" fo:font-weight="normal" fo:background-color="#ffffff" loext:char-shading-value="0" style:font-size-asian="11pt" style:font-size-complex="11pt"/>
    </style:style>
    <style:style style:name="T20" style:family="text">
      <style:text-properties style:use-window-font-color="true" loext:opacity="0%" style:font-name="Courier" fo:font-size="11pt" fo:font-weight="normal" fo:background-color="#ffffff" loext:char-shading-value="0" style:font-size-asian="11pt" style:font-size-complex="11pt"/>
    </style:style>
    <style:style style:name="T21" style:family="text">
      <style:text-properties fo:color="#800080" loext:opacity="100%" style:font-name="Courier" fo:font-size="11pt" fo:font-weight="normal" fo:background-color="#ffffff" loext:char-shading-value="0" style:font-size-asian="11pt" style:font-size-complex="11pt"/>
    </style:style>
    <style:style style:name="T22" style:family="text">
      <style:text-properties fo:color="#000000" loext:opacity="100%" style:font-name="Courier" fo:font-size="11pt" fo:font-weight="normal" officeooo:rsid="06127a9f" fo:background-color="#ffffff" loext:char-shading-value="0" style:font-size-asian="11pt" style:font-size-complex="11pt"/>
    </style:style>
    <style:style style:name="T23" style:family="text">
      <style:text-properties fo:color="#098658" loext:opacity="100%" style:font-name="Courier" fo:font-size="11pt" fo:font-weight="normal" fo:background-color="#ffffff" loext:char-shading-value="0" style:font-size-asian="11pt" style:font-size-complex="11pt"/>
    </style:style>
    <style:style style:name="T24" style:family="text">
      <style:text-properties officeooo:rsid="06127a9f"/>
    </style:style>
    <style:style style:name="T25" style:family="text">
      <style:text-properties style:font-name="Liberation Serif" fo:font-size="12pt" fo:font-style="normal" style:text-underline-style="none" fo:font-weight="normal" officeooo:rsid="0614557e" style:font-size-asian="12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3bd8e32" style:font-size-asian="12pt" style:font-style-asian="normal" style:font-weight-asian="normal" style:font-size-complex="12pt" style:font-style-complex="normal" style:font-weight-complex="normal"/>
    </style:style>
    <style:style style:name="T27" style:family="text">
      <style:text-properties fo:font-size="12pt" fo:font-weight="normal" officeooo:rsid="009c6998" style:font-size-asian="12pt" style:font-weight-asian="normal" style:font-size-complex="12pt" style:font-weight-complex="normal"/>
    </style:style>
    <style:style style:name="T28" style:family="text">
      <style:text-properties style:font-name="Courier" fo:font-size="12pt" fo:font-weight="normal" officeooo:rsid="009c6998" style:font-size-asian="12pt" style:font-weight-asian="normal" style:font-size-complex="12pt" style:font-weight-complex="normal"/>
    </style:style>
    <style:style style:name="T29" style:family="text">
      <style:text-properties officeooo:rsid="05bb8c5f"/>
    </style:style>
    <style:style style:name="T30" style:family="text">
      <style:text-properties style:font-name="Courier" officeooo:rsid="009f34b3"/>
    </style:style>
    <style:style style:name="T31" style:family="text">
      <style:text-properties fo:font-size="10pt" officeooo:rsid="05bb8c5f" style:font-size-asian="10pt" style:font-size-complex="10pt"/>
    </style:style>
    <style:style style:name="T32" style:family="text">
      <style:text-properties fo:color="#0000ff" loext:opacity="100%"/>
    </style:style>
    <style:style style:name="T33" style:family="text">
      <style:text-properties fo:color="#a31515" loext:opacity="100%"/>
    </style:style>
    <style:style style:name="T34" style:family="text">
      <style:text-properties fo:color="#800080" loext:opacity="100%"/>
    </style:style>
    <style:style style:name="T35" style:family="text">
      <style:text-properties fo:font-style="italic" style:font-style-asian="italic" style:font-style-complex="italic"/>
    </style:style>
    <style:style style:name="T36" style:family="text">
      <style:text-properties fo:color="#00a933" loext:opacity="100%" fo:font-size="10pt" officeooo:rsid="045b1ee7" style:font-size-asian="10pt" style:font-size-complex="10pt"/>
    </style:style>
    <style:style style:name="T37" style:family="text">
      <style:text-properties fo:color="#00a933" loext:opacity="100%" fo:font-size="10pt" officeooo:rsid="057ba008" style:font-size-asian="10pt" style:font-size-complex="10pt"/>
    </style:style>
    <style:style style:name="T38" style:family="text">
      <style:text-properties fo:color="#00a933" loext:opacity="100%" fo:font-size="10pt" style:font-size-asian="10pt" style:font-size-complex="10pt"/>
    </style:style>
    <style:style style:name="T39" style:family="text">
      <style:text-properties fo:font-size="12pt" fo:font-weight="normal" officeooo:rsid="0614557e" style:font-size-asian="12pt" style:font-weight-asian="normal" style:font-size-complex="12pt" style:font-weight-complex="normal"/>
    </style:style>
    <style:style style:name="T40" style:family="text">
      <style:text-properties fo:font-size="12pt" fo:font-weight="normal" officeooo:rsid="00073d60" style:font-size-asian="12pt" style:font-weight-asian="normal" style:font-size-complex="12pt" style:font-weight-complex="normal"/>
    </style:style>
    <style:style style:name="T41" style:family="text">
      <style:text-properties style:font-name="Courier" fo:font-size="10pt" officeooo:rsid="009f34b3" style:font-size-asian="10pt" style:font-size-complex="10pt"/>
    </style:style>
    <style:style style:name="T42" style:family="text">
      <style:text-properties fo:font-size="12pt" fo:font-weight="normal" officeooo:rsid="06127a9f" style:font-size-asian="10.5pt" style:font-weight-asian="normal" style:font-size-complex="12pt" style:font-weight-complex="normal"/>
    </style:style>
    <style:style style:name="T43" style:family="text">
      <style:text-properties fo:font-size="12pt" fo:font-style="normal" fo:font-weight="normal" officeooo:rsid="063ced5f" style:font-size-asian="10.5pt" style:font-style-asian="normal" style:font-weight-asian="normal" style:font-size-complex="12pt" style:font-style-complex="normal" style:font-weight-complex="normal"/>
    </style:style>
    <style:style style:name="T44" style:family="text">
      <style:text-properties fo:font-size="12pt" fo:font-style="italic" fo:font-weight="normal" officeooo:rsid="063ced5f" style:font-size-asian="10.5pt" style:font-style-asian="italic" style:font-weight-asian="normal" style:font-size-complex="12pt" style:font-style-complex="italic" style:font-weight-complex="normal"/>
    </style:style>
    <style:style style:name="T45" style:family="text">
      <style:text-properties style:use-window-font-color="true" loext:opacity="0%" style:font-name="Courier" fo:background-color="#ffffff" loext:char-shading-value="0"/>
    </style:style>
    <style:style style:name="T46" style:family="text">
      <style:text-properties fo:color="#800080" loext:opacity="100%" style:font-name="Courier" fo:background-color="#ffffff" loext:char-shading-value="0"/>
    </style:style>
    <style:style style:name="T47" style:family="text">
      <style:text-properties fo:color="#000000" loext:opacity="100%" style:font-name="Courier" fo:background-color="#ffffff" loext:char-shading-value="0"/>
    </style:style>
    <style:style style:name="T48" style:family="text">
      <style:text-properties fo:color="#000000" loext:opacity="100%" style:font-name="Courier" officeooo:rsid="06127a9f" fo:background-color="#ffffff" loext:char-shading-value="0"/>
    </style:style>
    <style:style style:name="T49" style:family="text">
      <style:text-properties officeooo:rsid="05695b86"/>
    </style:style>
    <style:style style:name="T50" style:family="text">
      <style:text-properties officeooo:rsid="0459d7a3"/>
    </style:style>
    <style:style style:name="T51" style:family="text">
      <style:text-properties fo:font-size="13pt" style:font-size-asian="13pt" style:font-size-complex="13pt"/>
    </style:style>
    <style:style style:name="T52" style:family="text">
      <style:text-properties officeooo:rsid="0069734c"/>
    </style:style>
    <style:style style:name="T53" style:family="text">
      <style:text-properties officeooo:rsid="0643e15d"/>
    </style:style>
    <style:style style:name="T54" style:family="text">
      <style:text-properties officeooo:rsid="06614372"/>
    </style:style>
    <style:style style:name="T55" style:family="text">
      <style:text-properties officeooo:rsid="0464fbaa"/>
    </style:style>
    <style:style style:name="T56" style:family="text">
      <style:text-properties officeooo:rsid="06609515"/>
    </style:style>
    <style:style style:name="T57" style:family="text">
      <style:text-properties fo:font-size="13pt" fo:font-weight="normal" officeooo:rsid="05bc05ed" style:font-size-asian="13pt" style:font-weight-asian="normal" style:font-size-complex="13pt" style:font-weight-complex="normal"/>
    </style:style>
    <style:style style:name="T58" style:family="text">
      <style:text-properties fo:font-size="13pt" fo:font-weight="normal" officeooo:rsid="06614372" style:font-size-asian="13pt" style:font-weight-asian="normal" style:font-size-complex="13pt" style:font-weight-complex="normal"/>
    </style:style>
    <style:style style:name="T59" style:family="text">
      <style:text-properties fo:font-size="13pt" fo:font-weight="normal" officeooo:rsid="06609515" style:font-size-asian="13pt" style:font-weight-asian="normal" style:font-size-complex="13pt" style:font-weight-complex="normal"/>
    </style:style>
    <style:style style:name="T60" style:family="text">
      <style:text-properties fo:font-size="13pt" fo:font-weight="normal" officeooo:rsid="0654d1e7" style:font-size-asian="13pt" style:font-weight-asian="normal" style:font-size-complex="13pt" style:font-weight-complex="normal"/>
    </style:style>
    <style:style style:name="T61" style:family="text">
      <style:text-properties style:font-name="Courier" fo:font-size="13pt" fo:font-weight="normal" officeooo:rsid="05e987ab" style:font-size-asian="13pt" style:font-weight-asian="normal" style:font-size-complex="13pt" style:font-weight-complex="normal"/>
    </style:style>
    <style:style style:name="T62" style:family="text">
      <style:text-properties officeooo:rsid="05e2c1c7"/>
    </style:style>
    <style:style style:name="T63" style:family="text">
      <style:text-properties officeooo:rsid="0471668c"/>
    </style:style>
    <style:style style:name="T64" style:family="text">
      <style:text-properties officeooo:rsid="023cad51"/>
    </style:style>
    <style:style style:name="T65" style:family="text">
      <style:text-properties officeooo:rsid="054e85af"/>
    </style:style>
    <style:style style:name="T66" style:family="text">
      <style:text-properties officeooo:rsid="023abbef"/>
    </style:style>
    <style:style style:name="T67" style:family="text">
      <style:text-properties officeooo:rsid="06548b2f"/>
    </style:style>
    <style:style style:name="T68" style:family="text">
      <style:text-properties fo:font-size="13pt" fo:font-weight="normal" officeooo:rsid="06a6b977" style:font-size-asian="13pt" style:font-weight-asian="normal" style:font-size-complex="13pt" style:font-weight-complex="normal"/>
    </style:style>
    <style:style style:name="T69" style:family="text">
      <style:text-properties fo:font-size="13pt" fo:font-weight="normal" officeooo:rsid="06548b2f" style:font-size-asian="13pt" style:font-weight-asian="normal" style:font-size-complex="13pt" style:font-weight-complex="normal"/>
    </style:style>
    <style:style style:name="T70" style:family="text">
      <style:text-properties fo:font-size="13pt" fo:font-weight="normal" officeooo:rsid="02391998" style:font-size-asian="13pt" style:font-weight-asian="normal" style:font-size-complex="13pt" style:font-weight-complex="normal"/>
    </style:style>
    <style:style style:name="T71" style:family="text">
      <style:text-properties officeooo:rsid="08cc7e67"/>
    </style:style>
    <style:style style:name="T72" style:family="text">
      <style:text-properties officeooo:rsid="063afee4"/>
    </style:style>
    <style:style style:name="T73" style:family="text">
      <style:text-properties fo:font-size="13pt" fo:font-weight="normal" officeooo:rsid="05c60ac2" style:font-size-asian="13pt" style:font-weight-asian="normal" style:font-size-complex="13pt" style:font-weight-complex="normal"/>
    </style:style>
    <style:style style:name="T74" style:family="text">
      <style:text-properties style:font-name="Liberation Serif" fo:font-size="13pt" fo:font-weight="normal" officeooo:rsid="05e987ab" style:font-size-asian="13pt" style:font-weight-asian="normal" style:font-size-complex="13pt" style:font-weight-complex="normal"/>
    </style:style>
    <style:style style:name="T75" style:family="text">
      <style:text-properties fo:font-size="13pt" fo:font-weight="normal" officeooo:rsid="054e85af" style:font-size-asian="13pt" style:font-weight-asian="normal" style:font-size-complex="13pt" style:font-weight-complex="normal"/>
    </style:style>
    <style:style style:name="T76" style:family="text">
      <style:text-properties fo:font-size="13pt" fo:font-weight="normal" officeooo:rsid="05c7c60d" style:font-size-asian="13pt" style:font-weight-asian="normal" style:font-size-complex="13pt" style:font-weight-complex="normal"/>
    </style:style>
    <style:style style:name="T77" style:family="text">
      <style:text-properties style:font-name="Courier" fo:font-size="13pt" fo:font-weight="normal" officeooo:rsid="05c7c60d" style:font-size-asian="13pt" style:font-weight-asian="normal" style:font-size-complex="13pt" style:font-weight-complex="normal"/>
    </style:style>
    <style:style style:name="T78" style:family="text">
      <style:text-properties officeooo:rsid="05c7c60d"/>
    </style:style>
    <style:style style:name="T79" style:family="text">
      <style:text-properties style:font-name="Courier" officeooo:rsid="05c7c60d"/>
    </style:style>
    <style:style style:name="T80" style:family="text">
      <style:text-properties fo:font-size="13pt" fo:font-weight="normal" officeooo:rsid="023abbef" style:font-size-asian="13pt" style:font-weight-asian="normal" style:font-size-complex="13pt" style:font-weight-complex="normal"/>
    </style:style>
    <style:style style:name="T81" style:family="text">
      <style:text-properties officeooo:rsid="05d71e03"/>
    </style:style>
    <style:style style:name="T82" style:family="text">
      <style:text-properties fo:font-style="italic" officeooo:rsid="05d71e03" style:font-style-asian="italic" style:font-style-complex="italic"/>
    </style:style>
    <style:style style:name="T83" style:family="text">
      <style:text-properties fo:font-style="italic" officeooo:rsid="05c7c60d" style:font-style-asian="italic" style:font-style-complex="italic"/>
    </style:style>
    <style:style style:name="T84" style:family="text">
      <style:text-properties officeooo:rsid="07aea5c8"/>
    </style:style>
    <style:style style:name="T85" style:family="text">
      <style:text-properties fo:font-size="13pt" fo:font-weight="normal" officeooo:rsid="0068d3c8" style:font-size-asian="13pt" style:font-weight-asian="normal" style:font-size-complex="13pt" style:font-weight-complex="normal"/>
    </style:style>
    <style:style style:name="T86" style:family="text">
      <style:text-properties fo:font-size="13pt" fo:font-weight="normal" officeooo:rsid="07aea5c8" style:font-size-asian="13pt" style:font-weight-asian="normal" style:font-size-complex="13pt" style:font-weight-complex="normal"/>
    </style:style>
    <style:style style:name="T87" style:family="text">
      <style:text-properties fo:font-size="13pt" fo:font-weight="normal" officeooo:rsid="0459d7a3" style:font-size-asian="13pt" style:font-weight-asian="normal" style:font-size-complex="13pt" style:font-weight-complex="normal"/>
    </style:style>
    <style:style style:name="T88" style:family="text">
      <style:text-properties fo:font-size="13pt" fo:font-weight="normal" officeooo:rsid="0634eb79" style:font-size-asian="13pt" style:font-weight-asian="normal" style:font-size-complex="13pt" style:font-weight-complex="normal"/>
    </style:style>
    <style:style style:name="T89" style:family="text">
      <style:text-properties officeooo:rsid="05d43e74"/>
    </style:style>
    <style:style style:name="T90" style:family="text">
      <style:text-properties officeooo:rsid="05d82001"/>
    </style:style>
    <style:style style:name="T91" style:family="text">
      <style:text-properties fo:font-size="13pt" fo:font-weight="normal" officeooo:rsid="06356f43" style:font-size-asian="13pt" style:font-weight-asian="normal" style:font-size-complex="13pt" style:font-weight-complex="normal"/>
    </style:style>
    <style:style style:name="T92" style:family="text">
      <style:text-properties fo:font-size="13pt" fo:font-weight="normal" officeooo:rsid="05e2350d" style:font-size-asian="13pt" style:font-weight-asian="normal" style:font-size-complex="13pt" style:font-weight-complex="normal"/>
    </style:style>
    <style:style style:name="T93" style:family="text">
      <style:text-properties fo:font-size="18pt" fo:font-weight="bold" officeooo:rsid="06644257" style:font-size-asian="18pt" style:font-weight-asian="bold" style:font-size-complex="18pt" style:font-weight-complex="bold"/>
    </style:style>
    <style:style style:name="T94" style:family="text">
      <style:text-properties fo:font-size="18pt" fo:font-weight="bold" officeooo:rsid="0069734c" style:font-size-asian="18pt" style:font-weight-asian="bold" style:font-size-complex="18pt" style:font-weight-complex="bold"/>
    </style:style>
    <style:style style:name="T95" style:family="text">
      <style:text-properties fo:font-size="18pt" fo:font-weight="bold" officeooo:rsid="0643e15d" style:font-size-asian="18pt" style:font-weight-asian="bold" style:font-size-complex="18pt" style:font-weight-complex="bold"/>
    </style:style>
    <style:style style:name="T96" style:family="text">
      <style:text-properties fo:font-size="18pt" fo:font-weight="bold" officeooo:rsid="0024c6a2" style:font-size-asian="18pt" style:font-weight-asian="bold" style:font-size-complex="18pt" style:font-weight-complex="bold"/>
    </style:style>
    <style:style style:name="T97" style:family="text">
      <style:text-properties fo:font-size="18pt" fo:font-weight="bold" officeooo:rsid="045c6cfb" style:font-size-asian="18pt" style:font-weight-asian="bold" style:font-size-complex="18pt" style:font-weight-complex="bold"/>
    </style:style>
    <style:style style:name="T98" style:family="text">
      <style:text-properties fo:font-size="12pt" fo:font-weight="normal" officeooo:rsid="00262852" style:font-size-asian="12pt" style:font-weight-asian="normal" style:font-size-complex="12pt" style:font-weight-complex="normal"/>
    </style:style>
    <style:style style:name="T99" style:family="text">
      <style:text-properties style:font-name="Courier" fo:font-size="13pt" fo:font-weight="normal" officeooo:rsid="00a75902" style:font-size-asian="13pt" style:font-weight-asian="normal" style:font-size-complex="13pt" style:font-weight-complex="normal"/>
    </style:style>
    <style:style style:name="T100" style:family="text">
      <style:text-properties style:font-name="Courier" fo:font-size="13pt" fo:font-weight="normal" officeooo:rsid="0644a642" style:font-size-asian="13pt" style:font-weight-asian="normal" style:font-size-complex="13pt" style:font-weight-complex="normal"/>
    </style:style>
    <style:style style:name="T101" style:family="text">
      <style:text-properties officeooo:rsid="063801db"/>
    </style:style>
    <style:style style:name="T102" style:family="text">
      <style:text-properties fo:font-size="12pt" officeooo:rsid="0029a9f0" style:font-size-asian="12pt" style:font-size-complex="12pt"/>
    </style:style>
    <style:style style:name="T103" style:family="text">
      <style:text-properties fo:font-size="12pt" style:font-size-asian="12pt" style:font-size-complex="12pt"/>
    </style:style>
    <style:style style:name="T104" style:family="text">
      <style:text-properties fo:font-size="12pt" officeooo:rsid="01c9c34e" style:font-size-asian="12pt" style:font-size-complex="12pt"/>
    </style:style>
    <style:style style:name="T105" style:family="text">
      <style:text-properties fo:font-size="12pt" officeooo:rsid="0611f0d5" style:font-size-asian="12pt" style:font-size-complex="12pt"/>
    </style:style>
    <style:style style:name="T106" style:family="text">
      <style:text-properties fo:font-size="12pt" fo:font-weight="normal" officeooo:rsid="01cfa5a3" style:font-size-asian="12pt" style:font-weight-asian="normal" style:font-size-complex="12pt" style:font-weight-complex="normal"/>
    </style:style>
    <style:style style:name="T107" style:family="text">
      <style:text-properties fo:font-size="12pt" fo:font-weight="normal" officeooo:rsid="0644e637" style:font-size-asian="12pt" style:font-weight-asian="normal" style:font-size-complex="12pt" style:font-weight-complex="normal"/>
    </style:style>
    <style:style style:name="T108" style:family="text">
      <style:text-properties officeooo:rsid="0611f0d5"/>
    </style:style>
    <style:style style:name="T109" style:family="text">
      <style:text-properties fo:font-size="12pt" fo:font-weight="normal" officeooo:rsid="01d178c6" style:font-size-asian="12pt" style:font-weight-asian="normal" style:font-size-complex="12pt" style:font-weight-complex="normal"/>
    </style:style>
    <style:style style:name="T110" style:family="text">
      <style:text-properties fo:font-size="12pt" fo:font-weight="normal" officeooo:rsid="045d6ffb" style:font-size-asian="12pt" style:font-weight-asian="normal" style:font-size-complex="12pt" style:font-weight-complex="normal"/>
    </style:style>
    <style:style style:name="T111" style:family="text">
      <style:text-properties fo:font-size="12pt" fo:font-style="italic" fo:font-weight="normal" officeooo:rsid="0616f127"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45d6ffb" style:font-size-asian="12pt" style:font-style-asian="italic" style:font-weight-asian="normal" style:font-size-complex="12pt" style:font-style-complex="italic" style:font-weight-complex="normal"/>
    </style:style>
    <style:style style:name="T113" style:family="text">
      <style:text-properties fo:font-size="12pt" fo:font-weight="normal" officeooo:rsid="0093a7d7" style:font-size-asian="12pt" style:font-weight-asian="normal" style:font-size-complex="12pt" style:font-weight-complex="normal"/>
    </style:style>
    <style:style style:name="T114" style:family="text">
      <style:text-properties fo:color="#107c10" loext:opacity="100%" fo:font-size="12pt" fo:font-weight="bold" officeooo:rsid="009671fe" fo:background-color="#ffffff" loext:char-shading-value="0" style:font-size-asian="12pt" style:font-size-complex="12pt"/>
    </style:style>
    <style:style style:name="T115" style:family="text">
      <style:text-properties fo:font-size="12pt" officeooo:rsid="009671fe" style:font-size-asian="12pt" style:font-size-complex="12pt"/>
    </style:style>
    <style:style style:name="T116" style:family="text">
      <style:text-properties officeooo:rsid="06464cc8"/>
    </style:style>
    <style:style style:name="T117" style:family="text">
      <style:text-properties officeooo:rsid="05a8a400"/>
    </style:style>
    <style:style style:name="T118" style:family="text">
      <style:text-properties fo:font-style="italic" officeooo:rsid="05a8a400" style:font-style-asian="italic" style:font-style-complex="italic"/>
    </style:style>
    <style:style style:name="T119" style:family="text">
      <style:text-properties officeooo:rsid="045e2eb9"/>
    </style:style>
    <style:style style:name="T120" style:family="text">
      <style:text-properties style:font-name="Courier" fo:font-size="13pt" fo:font-weight="normal" officeooo:rsid="0611f0d5" style:font-size-asian="13pt" style:font-weight-asian="normal" style:font-size-complex="13pt" style:font-weight-complex="normal"/>
    </style:style>
    <style:style style:name="T121" style:family="text">
      <style:text-properties fo:font-size="12pt" fo:font-weight="normal" officeooo:rsid="002b79c2" style:font-size-asian="12pt" style:font-weight-asian="normal" style:font-size-complex="12pt" style:font-weight-complex="normal"/>
    </style:style>
    <style:style style:name="T122" style:family="text">
      <style:text-properties fo:font-size="11pt" officeooo:rsid="015f1db2" style:font-size-asian="11pt" style:font-size-complex="11pt"/>
    </style:style>
    <style:style style:name="T123" style:family="text">
      <style:text-properties fo:font-weight="normal" officeooo:rsid="045ff492" style:font-weight-asian="normal" style:font-weight-complex="normal"/>
    </style:style>
    <style:style style:name="T124" style:family="text">
      <style:text-properties fo:font-weight="normal" style:font-weight-asian="normal" style:font-weight-complex="normal"/>
    </style:style>
    <style:style style:name="T125" style:family="text">
      <style:text-properties fo:font-size="12pt" fo:font-weight="normal" officeooo:rsid="01ec8907" style:font-size-asian="12pt" style:font-weight-asian="normal" style:font-size-complex="12pt" style:font-weight-complex="normal"/>
    </style:style>
    <style:style style:name="T126" style:family="text">
      <style:text-properties fo:font-size="12pt" fo:font-weight="normal" officeooo:rsid="04635010" style:font-size-asian="12pt" style:font-weight-asian="normal" style:font-size-complex="12pt" style:font-weight-complex="normal"/>
    </style:style>
    <style:style style:name="T127" style:family="text">
      <style:text-properties fo:language="en" fo:country="US"/>
    </style:style>
    <style:style style:name="T128" style:family="text">
      <style:text-properties fo:language="en" fo:country="US" officeooo:rsid="05bb8c5f"/>
    </style:style>
    <style:style style:name="T129" style:family="text">
      <style:text-properties fo:font-size="12pt" fo:font-weight="normal" officeooo:rsid="026aee91" style:font-size-asian="12pt" style:font-weight-asian="normal" style:font-size-complex="12pt" style:font-weight-complex="normal"/>
    </style:style>
    <style:style style:name="T130" style:family="text">
      <style:text-properties fo:font-size="12pt" officeooo:rsid="0427f7bd" style:font-size-asian="12pt" style:font-size-complex="12pt"/>
    </style:style>
    <style:style style:name="T131" style:family="text">
      <style:text-properties fo:font-size="12pt" officeooo:rsid="060ffe9e" style:font-size-asian="12pt" style:font-size-complex="12pt"/>
    </style:style>
    <style:style style:name="T132" style:family="text">
      <style:text-properties fo:font-size="12pt" officeooo:rsid="042fea63" style:font-size-asian="12pt" style:font-size-complex="12pt"/>
    </style:style>
    <style:style style:name="T133" style:family="text">
      <style:text-properties fo:font-size="12pt" officeooo:rsid="02480863" style:font-size-asian="12pt" style:font-size-complex="12pt"/>
    </style:style>
    <style:style style:name="T134" style:family="text">
      <style:text-properties fo:font-size="12pt" fo:font-weight="normal" officeooo:rsid="024872c9" style:font-size-asian="12pt" style:font-weight-asian="normal" style:font-size-complex="12pt" style:font-weight-complex="normal"/>
    </style:style>
    <style:style style:name="T135" style:family="text">
      <style:text-properties officeooo:rsid="01f45024"/>
    </style:style>
    <style:style style:name="T136" style:family="text">
      <style:text-properties style:font-name="Courier" fo:font-style="normal" officeooo:rsid="0021ebf9" style:font-style-asian="normal" style:font-style-complex="normal"/>
    </style:style>
    <style:style style:name="T137" style:family="text">
      <style:text-properties fo:font-size="12pt" officeooo:rsid="042c25d8" style:font-size-asian="12pt" style:font-size-complex="12pt"/>
    </style:style>
    <style:style style:name="T138" style:family="text">
      <style:text-properties fo:font-size="12pt" fo:font-weight="normal" officeooo:rsid="0468850b" style:font-size-asian="12pt" style:font-weight-asian="normal" style:font-size-complex="12pt" style:font-weight-complex="normal"/>
    </style:style>
    <style:style style:name="T139" style:family="text">
      <style:text-properties fo:font-size="12pt" fo:font-weight="normal" officeooo:rsid="06482556" style:font-size-asian="12pt" style:font-weight-asian="normal" style:font-size-complex="12pt" style:font-weight-complex="normal"/>
    </style:style>
    <style:style style:name="T140" style:family="text">
      <style:text-properties fo:font-size="12pt" fo:font-weight="normal" officeooo:rsid="042e8555" style:font-size-asian="12pt" style:font-weight-asian="normal" style:font-size-complex="12pt" style:font-weight-complex="normal"/>
    </style:style>
    <style:style style:name="T141" style:family="text">
      <style:text-properties style:font-name="Courier" fo:font-size="12pt" fo:font-style="normal" fo:font-weight="normal" officeooo:rsid="0021ebf9" style:font-size-asian="12pt" style:font-style-asian="normal" style:font-weight-asian="normal" style:font-size-complex="12pt" style:font-style-complex="normal" style:font-weight-complex="normal"/>
    </style:style>
    <style:style style:name="T142" style:family="text">
      <style:text-properties fo:font-size="12pt" fo:font-weight="normal" officeooo:rsid="042f2d61" style:font-size-asian="12pt" style:font-weight-asian="normal" style:font-size-complex="12pt" style:font-weight-complex="normal"/>
    </style:style>
    <style:style style:name="T143" style:family="text">
      <style:text-properties fo:font-size="12pt" fo:font-style="italic" fo:font-weight="normal" officeooo:rsid="042f2d61" style:font-size-asian="12pt" style:font-style-asian="italic" style:font-weight-asian="normal" style:font-size-complex="12pt" style:font-style-complex="italic" style:font-weight-complex="normal"/>
    </style:style>
    <style:style style:name="T144" style:family="text">
      <style:text-properties style:font-name="Liberation Serif" fo:font-size="12pt" fo:font-weight="normal" officeooo:rsid="02269d95" style:font-size-asian="12pt" style:font-weight-asian="normal" style:font-size-complex="12pt" style:font-weight-complex="normal"/>
    </style:style>
    <style:style style:name="T145" style:family="text">
      <style:text-properties officeooo:rsid="06482556"/>
    </style:style>
    <style:style style:name="T146" style:family="text">
      <style:text-properties style:font-name="Courier" officeooo:rsid="021638e8"/>
    </style:style>
    <style:style style:name="T147" style:family="text">
      <style:text-properties officeooo:rsid="060ffe9e"/>
    </style:style>
    <style:style style:name="T148" style:family="text">
      <style:text-properties fo:color="#107c10" loext:opacity="100%" fo:font-weight="bold" fo:background-color="#ffffff" loext:char-shading-value="0"/>
    </style:style>
    <style:style style:name="T149" style:family="text">
      <style:text-properties style:font-name="Courier" fo:font-size="12pt" fo:font-weight="normal" officeooo:rsid="0236e767" style:font-size-asian="12pt" style:font-weight-asian="normal" style:font-size-complex="12pt" style:font-weight-complex="normal"/>
    </style:style>
    <style:style style:name="T150" style:family="text">
      <style:text-properties fo:font-size="12pt" fo:font-weight="normal" officeooo:rsid="0233c5d5" style:font-size-asian="12pt" style:font-weight-asian="normal" style:font-size-complex="12pt" style:font-weight-complex="normal"/>
    </style:style>
    <style:style style:name="T151" style:family="text">
      <style:text-properties fo:font-size="12pt" fo:font-weight="normal" officeooo:rsid="0235498b" style:font-size-asian="12pt" style:font-weight-asian="normal" style:font-size-complex="12pt" style:font-weight-complex="normal"/>
    </style:style>
    <style:style style:name="T152" style:family="text">
      <style:text-properties officeooo:rsid="0468db21"/>
    </style:style>
    <style:style style:name="T153" style:family="text">
      <style:text-properties fo:font-weight="bold" style:font-weight-asian="bold" style:font-weight-complex="bold"/>
    </style:style>
    <style:style style:name="T154" style:family="text">
      <style:text-properties officeooo:rsid="05bbcade"/>
    </style:style>
    <style:style style:name="T155" style:family="text">
      <style:text-properties style:font-name="Courier" officeooo:rsid="0236e767"/>
    </style:style>
    <style:style style:name="T156" style:family="text">
      <style:text-properties fo:font-size="12pt" fo:font-weight="normal" officeooo:rsid="0238faf5" style:font-size-asian="12pt" style:font-weight-asian="normal" style:font-size-complex="12pt" style:font-weight-complex="normal"/>
    </style:style>
    <style:style style:name="T157" style:family="text">
      <style:text-properties fo:font-size="12pt" fo:font-weight="normal" officeooo:rsid="0468db21" style:font-size-asian="12pt" style:font-weight-asian="normal" style:font-size-complex="12pt" style:font-weight-complex="normal"/>
    </style:style>
    <style:style style:name="T158" style:family="text">
      <style:text-properties style:font-name="Courier" fo:font-size="12pt" fo:font-weight="normal" officeooo:rsid="0238faf5" style:font-size-asian="12pt" style:font-weight-asian="normal" style:font-size-complex="12pt" style:font-weight-complex="normal"/>
    </style:style>
    <style:style style:name="T159" style:family="text">
      <style:text-properties style:font-name="Courier" fo:font-size="12pt" fo:font-weight="normal" officeooo:rsid="023af2b2" style:font-size-asian="12pt" style:font-weight-asian="normal" style:font-size-complex="12pt" style:font-weight-complex="normal"/>
    </style:style>
    <style:style style:name="T160" style:family="text">
      <style:text-properties fo:font-size="12pt" fo:font-weight="normal" officeooo:rsid="023af2b2" style:font-size-asian="12pt" style:font-weight-asian="normal" style:font-size-complex="12pt" style:font-weight-complex="normal"/>
    </style:style>
    <style:style style:name="T161" style:family="text">
      <style:text-properties fo:font-size="12pt" fo:font-weight="normal" officeooo:rsid="023ce99f" style:font-size-asian="12pt" style:font-weight-asian="normal" style:font-size-complex="12pt" style:font-weight-complex="normal"/>
    </style:style>
    <style:style style:name="T162" style:family="text">
      <style:text-properties officeooo:rsid="023f1c3e"/>
    </style:style>
    <style:style style:name="T163" style:family="text">
      <style:text-properties fo:font-size="12pt" fo:font-weight="normal" officeooo:rsid="0259f8f0" style:font-size-asian="12pt" style:font-weight-asian="normal" style:font-size-complex="12pt" style:font-weight-complex="normal"/>
    </style:style>
    <style:style style:name="T164" style:family="text">
      <style:text-properties style:font-name="Courier" officeooo:rsid="01e02301"/>
    </style:style>
    <style:style style:name="T165" style:family="text">
      <style:text-properties officeooo:rsid="01e02301"/>
    </style:style>
    <style:style style:name="T166" style:family="text">
      <style:text-properties officeooo:rsid="05bc05ed"/>
    </style:style>
    <style:style style:name="T167" style:family="text">
      <style:text-properties officeooo:rsid="046acbfa"/>
    </style:style>
    <style:style style:name="T168" style:family="text">
      <style:text-properties fo:font-size="10pt" officeooo:rsid="01e02301" style:font-size-asian="10pt" style:font-size-complex="10pt"/>
    </style:style>
    <style:style style:name="T169" style:family="text">
      <style:text-properties officeooo:rsid="025da294"/>
    </style:style>
    <style:style style:name="T170" style:family="text">
      <style:text-properties fo:font-size="12pt" fo:font-weight="normal" officeooo:rsid="025dc0cf" style:font-size-asian="12pt" style:font-weight-asian="normal" style:font-size-complex="12pt" style:font-weight-complex="normal"/>
    </style:style>
    <style:style style:name="T171" style:family="text">
      <style:text-properties officeooo:rsid="025f2d29"/>
    </style:style>
    <style:style style:name="T172" style:family="text">
      <style:text-properties style:font-name="Courier" fo:font-size="10pt" officeooo:rsid="01e02301" style:font-size-asian="10pt" style:font-size-complex="10pt"/>
    </style:style>
    <style:style style:name="T173" style:family="text">
      <style:text-properties fo:font-size="12pt" officeooo:rsid="022bb8d3" style:font-size-asian="12pt" style:font-size-complex="12pt"/>
    </style:style>
    <style:style style:name="T174" style:family="text">
      <style:text-properties fo:font-size="12pt" officeooo:rsid="0433009d" style:font-size-asian="12pt" style:font-size-complex="12pt"/>
    </style:style>
    <style:style style:name="T175" style:family="text">
      <style:text-properties fo:font-size="12pt" fo:font-weight="normal" officeooo:rsid="044de9b0" style:font-size-asian="12pt" style:font-weight-asian="normal" style:font-size-complex="12pt" style:font-weight-complex="normal"/>
    </style:style>
    <style:style style:name="T176" style:family="text">
      <style:text-properties fo:font-size="10pt" officeooo:rsid="025f2d29" style:font-size-asian="10pt" style:font-size-complex="10pt"/>
    </style:style>
    <style:style style:name="T177" style:family="text">
      <style:text-properties fo:color="#a31515" loext:opacity="100%" officeooo:rsid="060ffe9e"/>
    </style:style>
    <style:style style:name="T178" style:family="text">
      <style:text-properties officeooo:rsid="061873e9"/>
    </style:style>
    <style:style style:name="T179" style:family="text">
      <style:text-properties fo:color="#0000ff" loext:opacity="100%" fo:font-weight="normal" fo:background-color="#ffffff" loext:char-shading-value="0"/>
    </style:style>
    <style:style style:name="T180" style:family="text">
      <style:text-properties fo:color="#0000ff" loext:opacity="100%" fo:font-weight="normal" officeooo:rsid="060ffe9e" fo:background-color="#ffffff" loext:char-shading-value="0"/>
    </style:style>
    <style:style style:name="T181" style:family="text">
      <style:text-properties fo:color="#000000" loext:opacity="100%" fo:font-weight="normal" fo:background-color="#ffffff" loext:char-shading-value="0"/>
    </style:style>
    <style:style style:name="T182" style:family="text">
      <style:text-properties officeooo:rsid="030a4ea3"/>
    </style:style>
    <style:style style:name="T183" style:family="text">
      <style:text-properties fo:font-size="12pt" fo:font-weight="normal" officeooo:rsid="046b29a5" style:font-size-asian="12pt" style:font-weight-asian="normal" style:font-size-complex="12pt" style:font-weight-complex="normal"/>
    </style:style>
    <style:style style:name="T184" style:family="text">
      <style:text-properties fo:font-size="12pt" fo:font-weight="normal" officeooo:rsid="030d2a29" style:font-size-asian="12pt" style:font-weight-asian="normal" style:font-size-complex="12pt" style:font-weight-complex="normal"/>
    </style:style>
    <style:style style:name="T185" style:family="text">
      <style:text-properties style:font-name="Courier" fo:font-size="12pt" fo:font-weight="normal" officeooo:rsid="030d2a29" style:font-size-asian="12pt" style:font-weight-asian="normal" style:font-size-complex="12pt" style:font-weight-complex="normal"/>
    </style:style>
    <style:style style:name="T186" style:family="text">
      <style:text-properties fo:font-size="12pt" fo:font-weight="normal" officeooo:rsid="020b8f3e" style:font-size-asian="12pt" style:font-weight-asian="normal" style:font-size-complex="12pt" style:font-weight-complex="normal"/>
    </style:style>
    <style:style style:name="T187" style:family="text">
      <style:text-properties officeooo:rsid="046b29a5"/>
    </style:style>
    <style:style style:name="T188" style:family="text">
      <style:text-properties fo:font-size="12pt" officeooo:rsid="046b29a5" style:font-size-asian="12pt" style:font-size-complex="12pt"/>
    </style:style>
    <style:style style:name="T189" style:family="text">
      <style:text-properties style:font-name="Courier" fo:font-size="12pt" fo:font-weight="normal" officeooo:rsid="02048792" style:font-size-asian="12pt" style:font-weight-asian="normal" style:font-size-complex="12pt" style:font-weight-complex="normal"/>
    </style:style>
    <style:style style:name="T190" style:family="text">
      <style:text-properties fo:font-size="12pt" officeooo:rsid="04406450" style:font-size-asian="12pt" style:font-size-complex="12pt"/>
    </style:style>
    <style:style style:name="T191" style:family="text">
      <style:text-properties fo:font-size="12pt" officeooo:rsid="044331e6" style:font-size-asian="12pt" style:font-size-complex="12pt"/>
    </style:style>
    <style:style style:name="T192" style:family="text">
      <style:text-properties officeooo:rsid="046c783c"/>
    </style:style>
    <style:style style:name="T193" style:family="text">
      <style:text-properties fo:font-size="12pt" officeooo:rsid="04482a94" style:font-size-asian="12pt" style:font-size-complex="12pt"/>
    </style:style>
    <style:style style:name="T194" style:family="text">
      <style:text-properties fo:font-weight="bold" officeooo:rsid="044c52d9" style:font-weight-asian="bold" style:font-weight-complex="bold"/>
    </style:style>
    <style:style style:name="T195" style:family="text">
      <style:text-properties fo:font-size="12pt" officeooo:rsid="044ac00a" style:font-size-asian="12pt" style:font-size-complex="12pt"/>
    </style:style>
    <style:style style:name="T196" style:family="text">
      <style:text-properties fo:font-size="12pt" officeooo:rsid="0649b13e" style:font-size-asian="12pt" style:font-size-complex="12pt"/>
    </style:style>
    <style:style style:name="T197"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normal" style:letter-kerning="true" style:font-family-asian="'Bitstream Vera Sans'" style:font-family-generic-asian="system" style:font-pitch-asian="variable"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98" style:family="text">
      <style:text-properties fo:font-weight="bold" officeooo:rsid="039ff04d" style:font-weight-asian="bold" style:font-weight-complex="bold"/>
    </style:style>
    <style:style style:name="T199" style:family="text">
      <style:text-properties officeooo:rsid="046e5b09"/>
    </style:style>
    <style:style style:name="T200" style:family="text">
      <style:text-properties officeooo:rsid="04701310"/>
    </style:style>
    <style:style style:name="T201" style:family="text">
      <style:text-properties fo:font-size="13pt" officeooo:rsid="06609515" style:font-size-asian="13pt" style:font-size-complex="13pt"/>
    </style:style>
    <style:style style:name="T202" style:family="text">
      <style:text-properties fo:font-size="13pt" officeooo:rsid="06614372" style:font-size-asian="13pt" style:font-size-complex="13pt"/>
    </style:style>
    <style:style style:name="T203" style:family="text">
      <style:text-properties style:font-name="Courier" fo:font-size="12pt" style:font-size-asian="12pt" style:font-size-complex="12pt"/>
    </style:style>
    <style:style style:name="T204" style:family="text">
      <style:text-properties officeooo:rsid="065d372a"/>
    </style:style>
    <style:style style:name="T205" style:family="text">
      <style:text-properties officeooo:rsid="0501fe7e"/>
    </style:style>
    <style:style style:name="T206" style:family="text">
      <style:text-properties officeooo:rsid="05cdf88f"/>
    </style:style>
    <style:style style:name="T207" style:family="text">
      <style:text-properties fo:font-size="12pt" officeooo:rsid="05fad2c6" style:font-size-asian="12pt" style:font-size-complex="12pt"/>
    </style:style>
    <style:style style:name="T208" style:family="text">
      <style:text-properties fo:font-size="12pt" fo:font-weight="bold" officeooo:rsid="05fcc113" style:font-size-asian="12pt" style:font-weight-asian="bold" style:font-size-complex="12pt" style:font-weight-complex="bold"/>
    </style:style>
    <style:style style:name="T209" style:family="text">
      <style:text-properties fo:font-size="12pt" fo:font-weight="bold" style:font-size-asian="12pt" style:font-weight-asian="bold" style:font-size-complex="12pt" style:font-weight-complex="bold"/>
    </style:style>
    <style:style style:name="T210" style:family="text">
      <style:text-properties fo:font-size="12pt" officeooo:rsid="05023da7" style:font-size-asian="12pt" style:font-size-complex="12pt"/>
    </style:style>
    <style:style style:name="T211" style:family="text">
      <style:text-properties fo:font-size="12pt" officeooo:rsid="05ff61c8" style:font-size-asian="12pt" style:font-size-complex="12pt"/>
    </style:style>
    <style:style style:name="T212" style:family="text">
      <style:text-properties fo:font-size="12pt" officeooo:rsid="0601d57a" style:font-size-asian="12pt" style:font-size-complex="12pt"/>
    </style:style>
    <style:style style:name="T213" style:family="text">
      <style:text-properties fo:font-size="12pt" officeooo:rsid="065d372a" style:font-size-asian="12pt" style:font-size-complex="12pt"/>
    </style:style>
    <style:style style:name="T214" style:family="text">
      <style:text-properties fo:font-size="12pt" officeooo:rsid="05029956" style:font-size-asian="12pt" style:font-size-complex="12pt"/>
    </style:style>
    <style:style style:name="T215" style:family="text">
      <style:text-properties fo:font-weight="bold"/>
    </style:style>
    <style:style style:name="T216" style:family="text">
      <style:text-properties fo:color="#bc05bc" loext:opacity="100%" fo:font-weight="bold"/>
    </style:style>
    <style:style style:name="T217" style:family="text">
      <style:text-properties fo:color="#bc05bc" loext:opacity="100%" style:text-underline-style="solid" style:text-underline-width="auto" style:text-underline-color="font-color" fo:font-weight="bold"/>
    </style:style>
    <style:style style:name="T218" style:family="text">
      <style:text-properties fo:color="#000000" loext:opacity="100%" fo:background-color="#ffffff" loext:char-shading-value="0"/>
    </style:style>
    <style:style style:name="T219" style:family="text">
      <style:text-properties fo:color="#bc05bc" loext:opacity="100%" fo:font-weight="bold" fo:background-color="#ffffff" loext:char-shading-value="0"/>
    </style:style>
    <style:style style:name="T220" style:family="text">
      <style:text-properties style:font-name="Liberation Serif" fo:font-size="12pt" officeooo:rsid="00d22f84" style:font-size-asian="12pt" style:font-size-complex="12pt"/>
    </style:style>
    <style:style style:name="T221" style:family="text">
      <style:text-properties style:font-name="Liberation Serif" fo:font-size="12pt" officeooo:rsid="06012abb" style:font-size-asian="12pt" style:font-size-complex="12pt"/>
    </style:style>
    <style:style style:name="T222" style:family="text">
      <style:text-properties style:font-name="Courier" fo:font-size="12pt" officeooo:rsid="06012abb" style:font-size-asian="12pt" style:font-size-complex="12pt"/>
    </style:style>
    <style:style style:name="T223" style:family="text">
      <style:text-properties officeooo:rsid="05057c0d"/>
    </style:style>
    <style:style style:name="T224" style:family="text">
      <style:text-properties style:font-name="Courier" officeooo:rsid="05cdf88f"/>
    </style:style>
    <style:style style:name="T225" style:family="text">
      <style:text-properties style:font-name="Liberation Serif" fo:font-size="12pt" officeooo:rsid="05029956" style:font-size-asian="12pt" style:font-size-complex="12pt"/>
    </style:style>
    <style:style style:name="T226" style:family="text">
      <style:text-properties style:font-name="Liberation Serif" fo:font-size="12pt" officeooo:rsid="00d32152" style:font-size-asian="12pt" style:font-size-complex="12pt"/>
    </style:style>
    <style:style style:name="T227" style:family="text">
      <style:text-properties style:font-name="Liberation Serif" fo:font-size="12pt" officeooo:rsid="065d372a" style:font-size-asian="12pt" style:font-size-complex="12pt"/>
    </style:style>
    <style:style style:name="T228" style:family="text">
      <style:text-properties style:font-name="Liberation Serif" fo:font-size="12pt" officeooo:rsid="060645a8" style:font-size-asian="12pt" style:font-size-complex="12pt"/>
    </style:style>
    <style:style style:name="T229" style:family="text">
      <style:text-properties style:font-name="Courier" fo:font-size="12pt" officeooo:rsid="060645a8" style:font-size-asian="12pt" style:font-size-complex="12pt"/>
    </style:style>
    <style:style style:name="T230" style:family="text">
      <style:text-properties fo:color="#098658" loext:opacity="100%"/>
    </style:style>
    <style:style style:name="T231" style:family="text">
      <style:text-properties fo:font-weight="bold" officeooo:rsid="0601d57a" style:font-weight-asian="bold" style:font-weight-complex="bold"/>
    </style:style>
    <style:style style:name="T232" style:family="text">
      <style:text-properties fo:font-weight="bold" officeooo:rsid="060645a8" style:font-weight-asian="bold" style:font-weight-complex="bold"/>
    </style:style>
    <style:style style:name="T233" style:family="text">
      <style:text-properties officeooo:rsid="05045e32"/>
    </style:style>
    <style:style style:name="T234" style:family="text">
      <style:text-properties fo:font-size="12pt" officeooo:rsid="050629de" style:font-size-asian="12pt" style:font-size-complex="12pt"/>
    </style:style>
    <style:style style:name="T235" style:family="text">
      <style:text-properties fo:font-size="12pt" officeooo:rsid="060674bb" style:font-size-asian="12pt" style:font-size-complex="12pt"/>
    </style:style>
    <style:style style:name="T236" style:family="text">
      <style:text-properties officeooo:rsid="050629de"/>
    </style:style>
    <style:style style:name="T237" style:family="text">
      <style:text-properties officeooo:rsid="0601d57a"/>
    </style:style>
    <style:style style:name="T238" style:family="text">
      <style:text-properties style:font-name="Courier" fo:font-size="12pt" officeooo:rsid="00dd44da" style:font-size-asian="12pt" style:font-size-complex="12pt"/>
    </style:style>
    <style:style style:name="T239" style:family="text">
      <style:text-properties style:font-name="Liberation Serif" fo:font-size="12pt" officeooo:rsid="00e1c70c" style:font-size-asian="12pt" style:font-size-complex="12pt"/>
    </style:style>
    <style:style style:name="T240" style:family="text">
      <style:text-properties style:font-name="Courier" fo:font-size="12pt" officeooo:rsid="0607ff8b" style:font-size-asian="12pt" style:font-size-complex="12pt"/>
    </style:style>
    <style:style style:name="T241" style:family="text">
      <style:text-properties fo:font-size="12pt" officeooo:rsid="0604db31" style:font-size-asian="12pt" style:font-size-complex="12pt"/>
    </style:style>
    <style:style style:name="T242" style:family="text">
      <style:text-properties fo:font-size="12pt" officeooo:rsid="0607ff8b" style:font-size-asian="12pt" style:font-size-complex="12pt"/>
    </style:style>
    <style:style style:name="T243" style:family="text">
      <style:text-properties fo:color="#107c10" loext:opacity="100%"/>
    </style:style>
    <style:style style:name="T244" style:family="text">
      <style:text-properties fo:color="#0451a5" loext:opacity="100%" fo:font-weight="bold"/>
    </style:style>
    <style:style style:name="T245" style:family="text">
      <style:text-properties fo:color="#cd3131" loext:opacity="100%"/>
    </style:style>
    <style:style style:name="T246" style:family="text">
      <style:text-properties fo:color="#000000" loext:opacity="100%" fo:font-size="10pt" officeooo:rsid="00e0b0b3" fo:background-color="#ffffff" loext:char-shading-value="0" style:font-size-asian="10pt" style:font-size-complex="10pt"/>
    </style:style>
    <style:style style:name="T247" style:family="text">
      <style:text-properties fo:color="#0451a5" loext:opacity="100%" fo:font-weight="bold" officeooo:rsid="00e0b0b3" fo:background-color="#ffffff" loext:char-shading-value="0"/>
    </style:style>
    <style:style style:name="T248" style:family="text">
      <style:text-properties fo:color="#000000" loext:opacity="100%" fo:font-size="10pt" fo:font-weight="bold" officeooo:rsid="00e0b0b3" fo:background-color="#ffffff" loext:char-shading-value="0" style:font-size-asian="10pt" style:font-size-complex="10pt"/>
    </style:style>
    <style:style style:name="T249" style:family="text">
      <style:text-properties fo:color="#cd3131" loext:opacity="100%" fo:font-size="10pt" officeooo:rsid="00e0b0b3" fo:background-color="#ffffff" loext:char-shading-value="0" style:font-size-asian="10pt" style:font-size-complex="10pt"/>
    </style:style>
    <style:style style:name="T250" style:family="text">
      <style:text-properties fo:color="#bc05bc" loext:opacity="100%" fo:font-size="10pt" officeooo:rsid="00e0b0b3" fo:background-color="#ffffff" loext:char-shading-value="0" style:font-size-asian="10pt" style:font-size-complex="10pt"/>
    </style:style>
    <style:style style:name="T251" style:family="text">
      <style:text-properties fo:color="#bc05bc" loext:opacity="100%"/>
    </style:style>
    <style:style style:name="T252" style:family="text">
      <style:text-properties fo:font-size="12pt" officeooo:rsid="00e1c70c" style:font-size-asian="12pt" style:font-size-complex="12pt"/>
    </style:style>
    <style:style style:name="T253" style:family="text">
      <style:text-properties style:font-name="Courier" fo:font-size="12pt" officeooo:rsid="0604db31" style:font-size-asian="12pt" style:font-size-complex="12pt"/>
    </style:style>
    <style:style style:name="T254" style:family="text">
      <style:text-properties fo:font-size="12pt" officeooo:rsid="00ea964f" style:font-size-asian="12pt" style:font-size-complex="12pt"/>
    </style:style>
    <style:style style:name="T255" style:family="text">
      <style:text-properties officeooo:rsid="05ce4126"/>
    </style:style>
    <style:style style:name="T256" style:family="text">
      <style:text-properties style:font-name="Courier" officeooo:rsid="00ec36fc"/>
    </style:style>
    <style:style style:name="T257" style:family="text">
      <style:text-properties style:font-name="Courier" officeooo:rsid="05ce4126"/>
    </style:style>
    <style:style style:name="T258" style:family="text">
      <style:text-properties fo:font-size="10pt" officeooo:rsid="050f9fbb" style:font-size-asian="10pt" style:font-size-complex="10pt"/>
    </style:style>
    <style:style style:name="T259" style:family="text">
      <style:text-properties fo:font-size="12pt" officeooo:rsid="00eee4c5" style:font-size-asian="12pt" style:font-size-complex="12pt"/>
    </style:style>
    <style:style style:name="T260" style:family="text">
      <style:text-properties fo:font-size="12pt" officeooo:rsid="05079d2d" style:font-size-asian="12pt" style:font-size-complex="12pt"/>
    </style:style>
    <style:style style:name="T261" style:family="text">
      <style:text-properties fo:font-size="12pt" officeooo:rsid="060aaf7d" style:font-size-asian="12pt" style:font-size-complex="12pt"/>
    </style:style>
    <style:style style:name="T262" style:family="text">
      <style:text-properties fo:font-size="12pt" officeooo:rsid="06060d2c" style:font-size-asian="12pt" style:font-size-complex="12pt"/>
    </style:style>
    <style:style style:name="T263" style:family="text">
      <style:text-properties officeooo:rsid="060b92be"/>
    </style:style>
    <style:style style:name="T264" style:family="text">
      <style:text-properties style:font-name="Courier" fo:font-size="12pt" officeooo:rsid="060b92be" style:font-size-asian="12pt" style:font-size-complex="12pt"/>
    </style:style>
    <style:style style:name="T265" style:family="text">
      <style:text-properties fo:font-weight="bold" officeooo:rsid="06060d2c" style:font-weight-asian="bold" style:font-weight-complex="bold"/>
    </style:style>
    <style:style style:name="T266" style:family="text">
      <style:text-properties fo:font-weight="bold" officeooo:rsid="060d4beb" style:font-weight-asian="bold" style:font-weight-complex="bold"/>
    </style:style>
    <style:style style:name="T267" style:family="text">
      <style:text-properties officeooo:rsid="050894ab"/>
    </style:style>
    <style:style style:name="T268" style:family="text">
      <style:text-properties officeooo:rsid="050a0912"/>
    </style:style>
    <style:style style:name="T269" style:family="text">
      <style:text-properties style:font-name="Courier" officeooo:rsid="01031d65"/>
    </style:style>
    <style:style style:name="T270" style:family="text">
      <style:text-properties officeooo:rsid="01031d65"/>
    </style:style>
    <style:style style:name="T271" style:family="text">
      <style:text-properties officeooo:rsid="050f9fbb"/>
    </style:style>
    <style:style style:name="T272" style:family="text">
      <style:text-properties style:font-name="Courier" officeooo:rsid="065d372a"/>
    </style:style>
    <style:style style:name="T273" style:family="text">
      <style:text-properties officeooo:rsid="050b62b1"/>
    </style:style>
    <style:style style:name="T274" style:family="text">
      <style:text-properties fo:font-size="12pt" officeooo:rsid="060d4beb" style:font-size-asian="12pt" style:font-size-complex="12pt"/>
    </style:style>
    <style:style style:name="T275" style:family="text">
      <style:text-properties officeooo:rsid="050d004c"/>
    </style:style>
    <style:style style:name="T276" style:family="text">
      <style:text-properties officeooo:rsid="06061521"/>
    </style:style>
    <style:style style:name="T277" style:family="text">
      <style:text-properties fo:font-size="12pt" officeooo:rsid="06063a6a" style:font-size-asian="12pt" style:font-size-complex="12pt"/>
    </style:style>
    <style:style style:name="T278" style:family="text">
      <style:text-properties fo:font-size="12pt" officeooo:rsid="060d7f56" style:font-size-asian="12pt" style:font-size-complex="12pt"/>
    </style:style>
    <style:style style:name="T279" style:family="text">
      <style:text-properties fo:font-size="12pt" officeooo:rsid="060f5c8f" style:font-size-asian="12pt" style:font-size-complex="12pt"/>
    </style:style>
    <style:style style:name="T280" style:family="text">
      <style:text-properties style:font-name="Courier" officeooo:rsid="050a0912"/>
    </style:style>
    <style:style style:name="T281" style:family="text">
      <style:text-properties officeooo:rsid="05bcd64b"/>
    </style:style>
    <style:style style:name="T282" style:family="text">
      <style:text-properties officeooo:rsid="0654d1e7"/>
    </style:style>
    <style:style style:name="T283" style:family="text">
      <style:text-properties style:font-name="Courier" officeooo:rsid="0654d1e7"/>
    </style:style>
    <style:style style:name="T284" style:family="text">
      <style:text-properties officeooo:rsid="05b344c4"/>
    </style:style>
    <style:style style:name="T285" style:family="text">
      <style:text-properties style:font-name="Courier" fo:font-size="12pt" fo:font-weight="normal" officeooo:rsid="026aee91" style:font-size-asian="12pt" style:font-weight-asian="normal" style:font-size-complex="12pt" style:font-weight-complex="normal"/>
    </style:style>
    <style:style style:name="T286" style:family="text">
      <style:text-properties style:font-name="Courier" fo:font-size="12pt" fo:font-weight="normal" officeooo:rsid="064b9e61" style:font-size-asian="12pt" style:font-weight-asian="normal" style:font-size-complex="12pt" style:font-weight-complex="normal"/>
    </style:style>
    <style:style style:name="T287" style:family="text">
      <style:text-properties fo:font-size="12pt" fo:font-weight="normal" officeooo:rsid="05b344c4" style:font-size-asian="12pt" style:font-weight-asian="normal" style:font-size-complex="12pt" style:font-weight-complex="normal"/>
    </style:style>
    <style:style style:name="T288" style:family="text">
      <style:text-properties style:font-name="Liberation Serif" fo:font-size="12pt" fo:font-weight="normal" officeooo:rsid="05b344c4" style:font-size-asian="12pt" style:font-weight-asian="normal" style:font-size-complex="12pt" style:font-weight-complex="normal"/>
    </style:style>
    <style:style style:name="T289" style:family="text">
      <style:text-properties fo:font-size="10pt" officeooo:rsid="05b344c4" style:font-size-asian="10pt" style:font-size-complex="10pt"/>
    </style:style>
    <style:style style:name="T290" style:family="text">
      <style:text-properties style:font-name="Courier" fo:font-size="12pt" fo:font-weight="normal" officeooo:rsid="05b45f68" style:font-size-asian="12pt" style:font-weight-asian="normal" style:font-size-complex="12pt" style:font-weight-complex="normal"/>
    </style:style>
    <style:style style:name="T291" style:family="text">
      <style:text-properties fo:font-size="12pt" fo:font-weight="normal" officeooo:rsid="05ae994f" style:font-size-asian="12pt" style:font-weight-asian="normal" style:font-size-complex="12pt" style:font-weight-complex="normal"/>
    </style:style>
    <style:style style:name="T292" style:family="text">
      <style:text-properties fo:font-size="12pt" fo:font-weight="normal" style:font-size-asian="12pt" style:font-weight-asian="normal" style:font-size-complex="12pt" style:font-weight-complex="normal"/>
    </style:style>
    <style:style style:name="T293" style:family="text">
      <style:text-properties officeooo:rsid="05b79ba5"/>
    </style:style>
    <style:style style:name="T294" style:family="text">
      <style:text-properties fo:font-size="12pt" fo:font-weight="normal" officeooo:rsid="016338bb" style:font-size-asian="12pt" style:font-weight-asian="normal" style:font-size-complex="12pt" style:font-weight-complex="normal"/>
    </style:style>
    <style:style style:name="T295" style:family="text">
      <style:text-properties fo:font-size="12pt" fo:font-style="italic" fo:font-weight="normal" officeooo:rsid="016338bb" style:font-size-asian="12pt" style:font-style-asian="italic" style:font-weight-asian="normal" style:font-size-complex="12pt" style:font-style-complex="italic" style:font-weight-complex="normal"/>
    </style:style>
    <style:style style:name="T296" style:family="text">
      <style:text-properties officeooo:rsid="05beced3"/>
    </style:style>
    <style:style style:name="T297" style:family="text">
      <style:text-properties officeooo:rsid="0472c148"/>
    </style:style>
    <style:style style:name="T298" style:family="text">
      <style:text-properties style:font-name="Courier" fo:font-size="10pt" fo:font-weight="normal" officeooo:rsid="026aee91" style:font-size-asian="10pt" style:font-weight-asian="normal" style:font-size-complex="10pt" style:font-weight-complex="normal"/>
    </style:style>
    <style:style style:name="T299" style:family="text">
      <style:text-properties fo:font-size="12pt" fo:font-weight="normal" officeooo:rsid="0164f685" style:font-size-asian="12pt" style:font-weight-asian="normal" style:font-size-complex="12pt" style:font-weight-complex="normal"/>
    </style:style>
    <style:style style:name="T300" style:family="text">
      <style:text-properties officeooo:rsid="064ced94"/>
    </style:style>
    <style:style style:name="T301" style:family="text">
      <style:text-properties officeooo:rsid="016735e0"/>
    </style:style>
    <style:style style:name="T302" style:family="text">
      <style:text-properties fo:font-style="italic" officeooo:rsid="016735e0" style:font-style-asian="italic" style:font-style-complex="italic"/>
    </style:style>
    <style:style style:name="T303" style:family="text">
      <style:text-properties fo:font-size="12pt" fo:font-weight="normal" officeooo:rsid="016735e0" style:font-size-asian="12pt" style:font-weight-asian="normal" style:font-size-complex="12pt" style:font-weight-complex="normal"/>
    </style:style>
    <style:style style:name="T304" style:family="text">
      <style:text-properties fo:font-size="12pt" fo:font-weight="normal" officeooo:rsid="016854a3" style:font-size-asian="12pt" style:font-weight-asian="normal" style:font-size-complex="12pt" style:font-weight-complex="normal"/>
    </style:style>
    <style:style style:name="T305" style:family="text">
      <style:text-properties officeooo:rsid="016854a3"/>
    </style:style>
    <style:style style:name="T306" style:family="text">
      <style:text-properties officeooo:rsid="05bf4345"/>
    </style:style>
    <style:style style:name="T307" style:family="text">
      <style:text-properties fo:font-size="12pt" fo:font-weight="normal" style:font-weight-asian="normal" style:font-size-complex="12pt" style:font-weight-complex="normal"/>
    </style:style>
    <style:style style:name="T308" style:family="text">
      <style:text-properties officeooo:rsid="0473aa78"/>
    </style:style>
    <style:style style:name="T309" style:family="text">
      <style:text-properties officeooo:rsid="016c5eaa"/>
    </style:style>
    <style:style style:name="T310" style:family="text">
      <style:text-properties fo:font-size="12pt" fo:font-weight="normal" officeooo:rsid="016ec8cc" style:font-size-asian="12pt" style:font-weight-asian="normal" style:font-size-complex="12pt" style:font-weight-complex="normal"/>
    </style:style>
    <style:style style:name="T311" style:family="text">
      <style:text-properties fo:font-size="12pt" fo:font-style="italic" fo:font-weight="normal" officeooo:rsid="016ec8cc" style:font-size-asian="12pt" style:font-style-asian="italic" style:font-weight-asian="normal" style:font-size-complex="12pt" style:font-style-complex="italic" style:font-weight-complex="normal"/>
    </style:style>
    <style:style style:name="T312" style:family="text">
      <style:text-properties fo:font-size="12pt" fo:font-weight="normal" officeooo:rsid="01709404" style:font-size-asian="12pt" style:font-weight-asian="normal" style:font-size-complex="12pt" style:font-weight-complex="normal"/>
    </style:style>
    <style:style style:name="T313" style:family="text">
      <style:text-properties officeooo:rsid="01709404"/>
    </style:style>
    <style:style style:name="T314" style:family="text">
      <style:text-properties style:font-name="Courier" officeooo:rsid="01709404"/>
    </style:style>
    <style:style style:name="T315" style:family="text">
      <style:text-properties fo:font-size="10pt" officeooo:rsid="05bf4345" style:font-size-asian="10pt" style:font-size-complex="10pt"/>
    </style:style>
    <style:style style:name="T316" style:family="text">
      <style:text-properties officeooo:rsid="0181c270"/>
    </style:style>
    <style:style style:name="T317" style:family="text">
      <style:text-properties officeooo:rsid="018a4e28"/>
    </style:style>
    <style:style style:name="T318" style:family="text">
      <style:text-properties officeooo:rsid="04792447"/>
    </style:style>
    <style:style style:name="T319" style:family="text">
      <style:text-properties officeooo:rsid="01838ae7"/>
    </style:style>
    <style:style style:name="T320" style:family="text">
      <style:text-properties officeooo:rsid="047a9463"/>
    </style:style>
    <style:style style:name="T321" style:family="text">
      <style:text-properties officeooo:rsid="047b8538"/>
    </style:style>
    <style:style style:name="T322" style:family="text">
      <style:text-properties officeooo:rsid="019224bd"/>
    </style:style>
    <style:style style:name="T323" style:family="text">
      <style:text-properties fo:font-size="18pt" fo:font-weight="bold" officeooo:rsid="022f6448" style:font-size-asian="18pt" style:font-weight-asian="bold" style:font-size-complex="18pt" style:font-weight-complex="bold"/>
    </style:style>
    <style:style style:name="T324" style:family="text">
      <style:text-properties fo:font-size="18pt" fo:font-weight="bold" officeooo:rsid="06614372" style:font-size-asian="18pt" style:font-weight-asian="bold" style:font-size-complex="18pt" style:font-weight-complex="bold"/>
    </style:style>
    <style:style style:name="T325" style:family="text">
      <style:text-properties fo:font-size="18pt" fo:font-weight="bold" officeooo:rsid="063e7077" style:font-size-asian="18pt" style:font-weight-asian="bold" style:font-size-complex="18pt" style:font-weight-complex="bold"/>
    </style:style>
    <style:style style:name="T326" style:family="text">
      <style:text-properties fo:font-size="18pt" fo:font-weight="bold" officeooo:rsid="0283844b" style:font-size-asian="18pt" style:font-weight-asian="bold" style:font-size-complex="18pt" style:font-weight-complex="bold"/>
    </style:style>
    <style:style style:name="T327" style:family="text">
      <style:text-properties fo:font-size="18pt" fo:font-weight="bold" officeooo:rsid="06403430" style:font-size-asian="18pt" style:font-weight-asian="bold" style:font-size-complex="18pt" style:font-weight-complex="bold"/>
    </style:style>
    <style:style style:name="T328" style:family="text">
      <style:text-properties fo:font-size="12pt" fo:font-weight="normal" officeooo:rsid="040d1e28" style:font-size-asian="12pt" style:font-weight-asian="normal" style:font-size-complex="12pt" style:font-weight-complex="normal"/>
    </style:style>
    <style:style style:name="T329" style:family="text">
      <style:text-properties style:font-name="Courier" fo:font-size="12pt" fo:font-weight="normal" officeooo:rsid="040d1e28" style:font-size-asian="12pt" style:font-weight-asian="normal" style:font-size-complex="12pt" style:font-weight-complex="normal"/>
    </style:style>
    <style:style style:name="T330" style:family="text">
      <style:text-properties fo:font-size="12pt" officeooo:rsid="040938b1" style:font-size-asian="12pt" style:font-size-complex="12pt"/>
    </style:style>
    <style:style style:name="T331" style:family="text">
      <style:text-properties fo:font-size="12pt" officeooo:rsid="040a31a6" style:font-size-asian="12pt" style:font-size-complex="12pt"/>
    </style:style>
    <style:style style:name="T332" style:family="text">
      <style:text-properties fo:font-size="12pt" officeooo:rsid="040b2718" style:font-size-asian="12pt" style:font-size-complex="12pt"/>
    </style:style>
    <style:style style:name="T333" style:family="text">
      <style:text-properties officeooo:rsid="064f8467"/>
    </style:style>
    <style:style style:name="T334" style:family="text">
      <style:text-properties officeooo:rsid="032e34ea"/>
    </style:style>
    <style:style style:name="T335" style:family="text">
      <style:text-properties style:font-name="Courier" officeooo:rsid="032e34ea"/>
    </style:style>
    <style:style style:name="T336" style:family="text">
      <style:text-properties fo:font-size="12pt" officeooo:rsid="040f8860" style:font-size-asian="12pt" style:font-size-complex="12pt"/>
    </style:style>
    <style:style style:name="T337" style:family="text">
      <style:text-properties officeooo:rsid="03393885"/>
    </style:style>
    <style:style style:name="T338" style:family="text">
      <style:text-properties officeooo:rsid="047e7eae"/>
    </style:style>
    <style:style style:name="T339" style:family="text">
      <style:text-properties fo:font-style="italic" officeooo:rsid="060ffe9e" style:font-style-asian="italic" style:font-style-complex="italic"/>
    </style:style>
    <style:style style:name="T340" style:family="text">
      <style:text-properties fo:font-style="italic" officeooo:rsid="047e7eae" style:font-style-asian="italic" style:font-style-complex="italic"/>
    </style:style>
    <style:style style:name="T341" style:family="text">
      <style:text-properties fo:font-size="12pt" fo:font-style="normal" fo:font-weight="normal" officeooo:rsid="0465636d" style:font-size-asian="12pt" style:font-style-asian="normal" style:font-weight-asian="normal" style:font-size-complex="12pt" style:font-style-complex="normal" style:font-weight-complex="normal"/>
    </style:style>
    <style:style style:name="T342" style:family="text">
      <style:text-properties fo:font-size="10pt" officeooo:rsid="03c64469" style:font-size-asian="10pt" style:font-size-complex="10pt"/>
    </style:style>
    <style:style style:name="T343" style:family="text">
      <style:text-properties style:font-name="Courier" fo:font-size="10pt" fo:font-style="normal" fo:font-weight="normal" officeooo:rsid="0021ebf9" style:font-size-asian="10pt" style:font-style-asian="normal" style:font-weight-asian="normal" style:font-size-complex="10pt" style:font-style-complex="normal" style:font-weight-complex="normal"/>
    </style:style>
    <style:style style:name="T344" style:family="text">
      <style:text-properties fo:font-size="10pt" officeooo:rsid="0480d471" style:font-size-asian="10pt" style:font-size-complex="10pt"/>
    </style:style>
    <style:style style:name="T345" style:family="text">
      <style:text-properties fo:font-size="12pt" fo:font-weight="normal" officeooo:rsid="0465636d" style:font-size-asian="12pt" style:font-weight-asian="normal" style:font-size-complex="12pt" style:font-weight-complex="normal"/>
    </style:style>
    <style:style style:name="T346" style:family="text">
      <style:text-properties fo:color="#0000ff" loext:opacity="100%" fo:font-weight="normal" officeooo:rsid="048aa2c9" fo:background-color="#ffffff" loext:char-shading-value="0" style:font-weight-asian="normal" style:font-weight-complex="normal"/>
    </style:style>
    <style:style style:name="T347" style:family="text">
      <style:text-properties officeooo:rsid="073753ea"/>
    </style:style>
    <style:style style:name="T348" style:family="text">
      <style:text-properties officeooo:rsid="047ffea4"/>
    </style:style>
    <style:style style:name="T349" style:family="text">
      <style:text-properties fo:color="#a31515" loext:opacity="100%" fo:font-weight="normal" officeooo:rsid="048aa2c9" fo:background-color="#ffffff" loext:char-shading-value="0" style:font-weight-asian="normal" style:font-weight-complex="normal"/>
    </style:style>
    <style:style style:name="T350" style:family="text">
      <style:text-properties fo:color="#0000ff" loext:opacity="100%" style:font-name="Courier" fo:font-size="11pt" fo:font-weight="normal" officeooo:rsid="048aa2c9" fo:background-color="#ffffff" loext:char-shading-value="0" style:font-size-asian="11pt" style:font-weight-asian="normal" style:font-size-complex="11pt" style:font-weight-complex="normal"/>
    </style:style>
    <style:style style:name="T351" style:family="text">
      <style:text-properties fo:color="#a31515" loext:opacity="100%" style:font-name="Courier" fo:font-size="11pt" fo:font-weight="normal" officeooo:rsid="048aa2c9" fo:background-color="#ffffff" loext:char-shading-value="0" style:font-size-asian="11pt" style:font-weight-asian="normal" style:font-size-complex="11pt" style:font-weight-complex="normal"/>
    </style:style>
    <style:style style:name="T352" style:family="text">
      <style:text-properties fo:font-size="10pt" officeooo:rsid="03cc35ef" style:font-size-asian="10pt" style:font-size-complex="10pt"/>
    </style:style>
    <style:style style:name="T353" style:family="text">
      <style:text-properties officeooo:rsid="03cc35ef"/>
    </style:style>
    <style:style style:name="T354" style:family="text">
      <style:text-properties fo:color="#00a933" loext:opacity="100%"/>
    </style:style>
    <style:style style:name="T355" style:family="text">
      <style:text-properties fo:color="#2a6099" loext:opacity="100%"/>
    </style:style>
    <style:style style:name="T356" style:family="text">
      <style:text-properties style:font-name="Courier" fo:font-size="10pt" fo:font-weight="normal" officeooo:rsid="03cc35ef" style:font-size-asian="10pt" style:font-weight-asian="normal" style:font-size-complex="10pt" style:font-weight-complex="normal"/>
    </style:style>
    <style:style style:name="T357" style:family="text">
      <style:text-properties style:font-name="Courier" fo:font-size="12pt" fo:font-weight="normal" officeooo:rsid="03cc35ef" style:font-size-asian="12pt" style:font-weight-asian="normal" style:font-size-complex="12pt" style:font-weight-complex="normal"/>
    </style:style>
    <style:style style:name="T358" style:family="text">
      <style:text-properties fo:color="#00a933" loext:opacity="100%" style:font-name="Courier" fo:font-size="12pt" fo:font-weight="normal" officeooo:rsid="048aa2c9" style:font-size-asian="12pt" style:font-weight-asian="normal" style:font-size-complex="12pt" style:font-weight-complex="normal"/>
    </style:style>
    <style:style style:name="T359" style:family="text">
      <style:text-properties style:font-name="Courier" fo:font-size="12pt" fo:font-weight="normal" officeooo:rsid="048aa2c9" style:font-size-asian="12pt" style:font-weight-asian="normal" style:font-size-complex="12pt" style:font-weight-complex="normal"/>
    </style:style>
    <style:style style:name="T360" style:family="text">
      <style:text-properties style:font-name="Liberation Serif" fo:font-size="12pt" fo:font-style="italic" fo:font-weight="normal" officeooo:rsid="01ddb8c4" style:font-size-asian="12pt" style:font-style-asian="italic" style:font-weight-asian="normal" style:font-size-complex="12pt" style:font-style-complex="italic" style:font-weight-complex="normal"/>
    </style:style>
    <style:style style:name="T361" style:family="text">
      <style:text-properties style:font-name="Courier" fo:font-size="12pt" fo:font-style="italic" fo:font-weight="normal" officeooo:rsid="01ddb8c4" style:font-size-asian="12pt" style:font-style-asian="italic" style:font-weight-asian="normal" style:font-size-complex="12pt" style:font-style-complex="italic" style:font-weight-complex="normal"/>
    </style:style>
    <style:style style:name="T362" style:family="text">
      <style:text-properties style:font-name="Liberation Serif" fo:font-size="12pt" fo:font-style="normal" fo:font-weight="normal" officeooo:rsid="01ddb8c4" style:font-size-asian="12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650887b" style:font-size-asian="12pt" style:font-style-asian="normal" style:font-weight-asian="normal" style:font-size-complex="12pt" style:font-style-complex="normal" style:font-weight-complex="normal"/>
    </style:style>
    <style:style style:name="T364" style:family="text">
      <style:text-properties fo:font-size="12pt" officeooo:rsid="048b0a9d" style:font-size-asian="12pt" style:font-size-complex="12pt"/>
    </style:style>
    <style:style style:name="T365" style:family="text">
      <style:text-properties style:font-name="Courier" officeooo:rsid="01ddb8c4"/>
    </style:style>
    <style:style style:name="T366" style:family="text">
      <style:text-properties officeooo:rsid="048d39a7"/>
    </style:style>
    <style:style style:name="T367" style:family="text">
      <style:text-properties officeooo:rsid="0650887b"/>
    </style:style>
    <style:style style:name="T368" style:family="text">
      <style:text-properties officeooo:rsid="04810dc4"/>
    </style:style>
    <style:style style:name="T369" style:family="text">
      <style:text-properties officeooo:rsid="04a17493"/>
    </style:style>
    <style:style style:name="T370" style:family="text">
      <style:text-properties style:font-name="Courier" officeooo:rsid="048aa2c9"/>
    </style:style>
    <style:style style:name="T371" style:family="text">
      <style:text-properties fo:font-weight="bold" officeooo:rsid="04947f2c" style:font-weight-asian="bold" style:font-weight-complex="bold"/>
    </style:style>
    <style:style style:name="T372" style:family="text">
      <style:text-properties fo:font-size="12pt" officeooo:rsid="0494b16f" style:font-size-asian="12pt" style:font-size-complex="12pt"/>
    </style:style>
    <style:style style:name="T373" style:family="text">
      <style:text-properties officeooo:rsid="0481769c"/>
    </style:style>
    <style:style style:name="T374" style:family="text">
      <style:text-properties officeooo:rsid="03d14737"/>
    </style:style>
    <style:style style:name="T375" style:family="text">
      <style:text-properties officeooo:rsid="048239a0"/>
    </style:style>
    <style:style style:name="T376" style:family="text">
      <style:text-properties officeooo:rsid="04823be9"/>
    </style:style>
    <style:style style:name="T377" style:family="text">
      <style:text-properties officeooo:rsid="04a2903d"/>
    </style:style>
    <style:style style:name="T378" style:family="text">
      <style:text-properties fo:font-size="12pt" fo:font-weight="normal" officeooo:rsid="0650887b" style:font-size-asian="12pt" style:font-weight-asian="normal" style:font-size-complex="12pt" style:font-weight-complex="normal"/>
    </style:style>
    <style:style style:name="T379" style:family="text">
      <style:text-properties fo:font-size="12pt" fo:font-weight="normal" officeooo:rsid="04838021" style:font-size-asian="12pt" style:font-weight-asian="normal" style:font-size-complex="12pt" style:font-weight-complex="normal"/>
    </style:style>
    <style:style style:name="T380" style:family="text">
      <style:text-properties fo:font-size="12pt" officeooo:rsid="0495ed2d" style:font-size-asian="12pt" style:font-size-complex="12pt"/>
    </style:style>
    <style:style style:name="T381" style:family="text">
      <style:text-properties style:font-name="Courier" fo:font-size="12pt" fo:font-weight="normal" officeooo:rsid="06bf476b" style:font-size-asian="12pt" style:font-weight-asian="normal" style:font-size-complex="12pt" style:font-weight-complex="normal"/>
    </style:style>
    <style:style style:name="T382" style:family="text">
      <style:text-properties officeooo:rsid="05c0b714"/>
    </style:style>
    <style:style style:name="T383" style:family="text">
      <style:text-properties style:font-name="Courier" fo:font-size="10pt" fo:font-style="normal" fo:font-weight="normal" officeooo:rsid="03ffd603" style:font-size-asian="10pt" style:font-style-asian="normal" style:font-weight-asian="normal" style:font-size-complex="10pt" style:font-style-complex="normal" style:font-weight-complex="normal"/>
    </style:style>
    <style:style style:name="T384" style:family="text">
      <style:text-properties fo:font-size="10pt" officeooo:rsid="05c0b714" style:font-size-asian="10pt" style:font-size-complex="10pt"/>
    </style:style>
    <style:style style:name="T385" style:family="text">
      <style:text-properties style:font-name="Courier" fo:font-size="10pt" fo:font-style="normal" fo:font-weight="normal" officeooo:rsid="0480d471" style:font-size-asian="10pt" style:font-style-asian="normal" style:font-weight-asian="normal" style:font-size-complex="10pt" style:font-style-complex="normal" style:font-weight-complex="normal"/>
    </style:style>
    <style:style style:name="T386" style:family="text">
      <style:text-properties fo:font-size="10pt" officeooo:rsid="065222dc" style:font-size-asian="10pt" style:font-size-complex="10pt"/>
    </style:style>
    <style:style style:name="T387" style:family="text">
      <style:text-properties style:font-name="Liberation Serif" fo:font-size="10pt" fo:font-style="normal" fo:font-weight="normal" officeooo:rsid="05c0b714" style:font-size-asian="10pt" style:font-style-asian="normal" style:font-weight-asian="normal" style:font-size-complex="10pt" style:font-style-complex="normal" style:font-weight-complex="normal"/>
    </style:style>
    <style:style style:name="T388" style:family="text">
      <style:text-properties style:font-name="Liberation Serif" fo:font-size="10pt" fo:font-style="normal" fo:font-weight="normal" officeooo:rsid="048abae3" style:font-size-asian="10pt" style:font-style-asian="normal" style:font-weight-asian="normal" style:font-size-complex="10pt" style:font-style-complex="normal" style:font-weight-complex="normal"/>
    </style:style>
    <style:style style:name="T389" style:family="text">
      <style:text-properties style:font-name="Liberation Serif" fo:font-size="10pt" fo:font-style="normal" fo:font-weight="normal" officeooo:rsid="065222dc" style:font-size-asian="10pt" style:font-style-asian="normal" style:font-weight-asian="normal" style:font-size-complex="10pt" style:font-style-complex="normal" style:font-weight-complex="normal"/>
    </style:style>
    <style:style style:name="T390" style:family="text">
      <style:text-properties fo:font-size="12pt" fo:font-weight="normal" officeooo:rsid="06be0a8c" style:font-size-asian="12pt" style:font-weight-asian="normal" style:font-size-complex="12pt" style:font-weight-complex="normal"/>
    </style:style>
    <style:style style:name="T391" style:family="text">
      <style:text-properties fo:font-size="12pt" officeooo:rsid="06c08341" style:font-size-asian="12pt" style:font-size-complex="12pt"/>
    </style:style>
    <style:style style:name="T392" style:family="text">
      <style:text-properties officeooo:rsid="065222dc"/>
    </style:style>
    <style:style style:name="T393" style:family="text">
      <style:text-properties fo:font-size="12pt" fo:font-weight="normal" officeooo:rsid="06d04419" style:font-size-asian="12pt" style:font-weight-asian="normal" style:font-size-complex="12pt" style:font-weight-complex="normal"/>
    </style:style>
    <style:style style:name="T394" style:family="text">
      <style:text-properties officeooo:rsid="048a2ddb"/>
    </style:style>
    <style:style style:name="T395" style:family="text">
      <style:text-properties officeooo:rsid="0702ba65"/>
    </style:style>
    <style:style style:name="T396" style:family="text">
      <style:text-properties officeooo:rsid="03e90fe9"/>
    </style:style>
    <style:style style:name="T397" style:family="text">
      <style:text-properties officeooo:rsid="03e94b30"/>
    </style:style>
    <style:style style:name="T398" style:family="text">
      <style:text-properties officeooo:rsid="06d404eb"/>
    </style:style>
    <style:style style:name="T399" style:family="text">
      <style:text-properties style:font-name="Liberation Serif" fo:font-style="normal" officeooo:rsid="03e94b30" style:font-style-asian="normal" style:font-style-complex="normal"/>
    </style:style>
    <style:style style:name="T400" style:family="text">
      <style:text-properties officeooo:rsid="048abae3"/>
    </style:style>
    <style:style style:name="T401" style:family="text">
      <style:text-properties officeooo:rsid="048b16b7"/>
    </style:style>
    <style:style style:name="T402" style:family="text">
      <style:text-properties officeooo:rsid="06d80db1"/>
    </style:style>
    <style:style style:name="T403" style:family="text">
      <style:text-properties officeooo:rsid="048fc858"/>
    </style:style>
    <style:style style:name="T404" style:family="text">
      <style:text-properties fo:font-size="12pt" officeooo:rsid="06e93762" style:font-size-asian="12pt" style:font-size-complex="12pt"/>
    </style:style>
    <style:style style:name="T405" style:family="text">
      <style:text-properties fo:font-size="12pt" fo:font-weight="normal" officeooo:rsid="06e0d100" style:font-size-asian="12pt" style:font-weight-asian="normal" style:font-size-complex="12pt" style:font-weight-complex="normal"/>
    </style:style>
    <style:style style:name="T406" style:family="text">
      <style:text-properties fo:font-size="12pt" fo:font-style="normal" fo:font-weight="bold" officeooo:rsid="06e0d100" style:font-size-asian="12pt" style:font-style-asian="normal" style:font-weight-asian="bold" style:font-size-complex="12pt" style:font-style-complex="normal" style:font-weight-complex="bold"/>
    </style:style>
    <style:style style:name="T407" style:family="text">
      <style:text-properties fo:font-size="12pt" fo:font-weight="normal" officeooo:rsid="06efcd22" style:font-size-asian="12pt" style:font-weight-asian="normal" style:font-size-complex="12pt" style:font-weight-complex="normal"/>
    </style:style>
    <style:style style:name="T408" style:family="text">
      <style:text-properties fo:font-size="12pt" officeooo:rsid="06cce740" style:font-size-asian="12pt" style:font-size-complex="12pt"/>
    </style:style>
    <style:style style:name="T409" style:family="text">
      <style:text-properties fo:font-size="12pt" officeooo:rsid="06f35c2f" style:font-size-asian="12pt" style:font-size-complex="12pt"/>
    </style:style>
    <style:style style:name="T410" style:family="text">
      <style:text-properties officeooo:rsid="0653d54e"/>
    </style:style>
    <style:style style:name="T411" style:family="text">
      <style:text-properties fo:font-size="12pt" officeooo:rsid="06f547dc" style:font-size-asian="12pt" style:font-size-complex="12pt"/>
    </style:style>
    <style:style style:name="T412" style:family="text">
      <style:text-properties style:font-name="Liberation Serif" fo:font-style="normal" officeooo:rsid="07041ada" style:font-style-asian="normal" style:font-style-complex="normal"/>
    </style:style>
    <style:style style:name="T413" style:family="text">
      <style:text-properties style:font-name="Liberation Serif" fo:font-style="normal" officeooo:rsid="0653d54e" style:font-style-asian="normal" style:font-style-complex="normal"/>
    </style:style>
    <style:style style:name="T414" style:family="text">
      <style:text-properties style:font-name="Courier" fo:font-style="normal" officeooo:rsid="03f3ca97" style:font-style-asian="normal" style:font-style-complex="normal"/>
    </style:style>
    <style:style style:name="T415" style:family="text">
      <style:text-properties fo:font-size="12pt" officeooo:rsid="06faacaf" style:font-size-asian="12pt" style:font-size-complex="12pt"/>
    </style:style>
    <style:style style:name="T416" style:family="text">
      <style:text-properties officeooo:rsid="07242c75"/>
    </style:style>
    <style:style style:name="T417" style:family="text">
      <style:text-properties fo:font-size="12pt" officeooo:rsid="0701327b" style:font-size-asian="12pt" style:font-size-complex="12pt"/>
    </style:style>
    <style:style style:name="T418" style:family="text">
      <style:text-properties fo:color="#3465a4" loext:opacity="100%"/>
    </style:style>
    <style:style style:name="T419" style:family="text">
      <style:text-properties fo:color="#00a933" loext:opacity="100%" fo:font-weight="bold" style:font-weight-asian="bold" style:font-weight-complex="bold"/>
    </style:style>
    <style:style style:name="T420" style:family="text">
      <style:text-properties officeooo:rsid="04910fb9"/>
    </style:style>
    <style:style style:name="T421" style:family="text">
      <style:text-properties style:font-name="Liberation Serif" fo:font-style="normal" officeooo:rsid="0021ebf9" style:font-style-asian="normal" style:font-style-complex="normal"/>
    </style:style>
    <style:style style:name="T422" style:family="text">
      <style:text-properties style:font-name="Liberation Serif" fo:font-style="normal" officeooo:rsid="04910fb9" style:font-style-asian="normal" style:font-style-complex="normal"/>
    </style:style>
    <style:style style:name="T423" style:family="text">
      <style:text-properties style:font-name="Liberation Serif" fo:font-style="normal" officeooo:rsid="03f7840d" style:font-style-asian="normal" style:font-style-complex="normal"/>
    </style:style>
    <style:style style:name="T424" style:family="text">
      <style:text-properties style:font-name="Courier" fo:font-style="normal" officeooo:rsid="03f7840d" style:font-style-asian="normal" style:font-style-complex="normal"/>
    </style:style>
    <style:style style:name="T425" style:family="text">
      <style:text-properties fo:font-size="12pt" officeooo:rsid="07096f7e" style:font-size-asian="12pt" style:font-size-complex="12pt"/>
    </style:style>
    <style:style style:name="T426" style:family="text">
      <style:text-properties style:font-name="Liberation Serif" fo:font-size="12pt" fo:font-style="normal" fo:font-weight="normal" officeooo:rsid="0653d54e" style:font-size-asian="12pt" style:font-style-asian="normal" style:font-weight-asian="normal" style:font-size-complex="12pt" style:font-style-complex="normal" style:font-weight-complex="normal"/>
    </style:style>
    <style:style style:name="T427" style:family="text">
      <style:text-properties style:use-window-font-color="true" loext:opacity="0%" fo:font-size="12pt" fo:font-weight="normal" officeooo:rsid="0027fc66" style:font-size-asian="12pt" style:font-weight-asian="normal" style:font-size-complex="12pt" style:font-weight-complex="normal"/>
    </style:style>
    <style:style style:name="T428" style:family="text">
      <style:text-properties fo:color="#3465a4" loext:opacity="100%" fo:font-size="12pt" fo:font-weight="normal" officeooo:rsid="0027fc66" style:font-size-asian="12pt" style:font-weight-asian="normal" style:font-size-complex="12pt" style:font-weight-complex="normal"/>
    </style:style>
    <style:style style:name="T429" style:family="text">
      <style:text-properties fo:color="#00a933" loext:opacity="100%" fo:font-size="12pt" fo:font-weight="normal" officeooo:rsid="0027fc66" style:font-size-asian="12pt" style:font-weight-asian="normal" style:font-size-complex="12pt" style:font-weight-complex="normal"/>
    </style:style>
    <style:style style:name="T430" style:family="text">
      <style:text-properties style:use-window-font-color="true" loext:opacity="0%" fo:font-size="12pt" fo:font-weight="bold" officeooo:rsid="0027fc66" style:font-size-asian="12pt" style:font-weight-asian="bold" style:font-size-complex="12pt" style:font-weight-complex="bold"/>
    </style:style>
    <style:style style:name="T431" style:family="text">
      <style:text-properties officeooo:rsid="04930715"/>
    </style:style>
    <style:style style:name="T432" style:family="text">
      <style:text-properties officeooo:rsid="03f718da"/>
    </style:style>
    <style:style style:name="T433" style:family="text">
      <style:text-properties fo:font-size="12pt" officeooo:rsid="0702641a" style:font-size-asian="12pt" style:font-size-complex="12pt"/>
    </style:style>
    <style:style style:name="T434" style:family="text">
      <style:text-properties officeooo:rsid="070c6123"/>
    </style:style>
    <style:style style:name="T435" style:family="text">
      <style:text-properties officeooo:rsid="04942b97"/>
    </style:style>
    <style:style style:name="T436" style:family="text">
      <style:text-properties officeooo:rsid="0728066e"/>
    </style:style>
    <style:style style:name="T437" style:family="text">
      <style:text-properties fo:font-size="12pt" officeooo:rsid="070d650c" style:font-size-asian="12pt" style:font-size-complex="12pt"/>
    </style:style>
    <style:style style:name="T438" style:family="text">
      <style:text-properties fo:font-size="12pt" fo:font-weight="normal" officeooo:rsid="0027fc66" style:font-size-asian="12pt" style:font-weight-asian="normal" style:font-size-complex="12pt" style:font-weight-complex="normal"/>
    </style:style>
    <style:style style:name="T439" style:family="text">
      <style:text-properties fo:color="#00a933" loext:opacity="100%" fo:font-size="12pt" fo:font-weight="bold" officeooo:rsid="0027fc66" style:font-size-asian="12pt" style:font-weight-asian="bold" style:font-size-complex="12pt" style:font-weight-complex="bold"/>
    </style:style>
    <style:style style:name="T440" style:family="text">
      <style:text-properties fo:font-size="12pt" fo:font-weight="bold" officeooo:rsid="0027fc66" style:font-size-asian="12pt" style:font-weight-asian="bold" style:font-size-complex="12pt" style:font-weight-complex="bold"/>
    </style:style>
    <style:style style:name="T441" style:family="text">
      <style:text-properties officeooo:rsid="121f10a5"/>
    </style:style>
    <style:style style:name="T442" style:family="text">
      <style:text-properties officeooo:rsid="03a014ca"/>
    </style:style>
    <style:style style:name="T443" style:family="text">
      <style:text-properties fo:font-weight="normal" officeooo:rsid="0495abbf" style:font-weight-asian="normal" style:font-weight-complex="normal"/>
    </style:style>
    <style:style style:name="T444" style:family="text">
      <style:text-properties fo:font-weight="normal" officeooo:rsid="0653d54e" style:font-weight-asian="normal" style:font-weight-complex="normal"/>
    </style:style>
    <style:style style:name="T445" style:family="text">
      <style:text-properties officeooo:rsid="0495abbf"/>
    </style:style>
    <style:style style:name="T446" style:family="text">
      <style:text-properties style:font-name="Courier" fo:font-weight="normal" officeooo:rsid="012487c5" style:font-weight-asian="normal" style:font-weight-complex="normal"/>
    </style:style>
    <style:style style:name="T447" style:family="text">
      <style:text-properties fo:font-size="18pt" fo:font-weight="bold" officeooo:rsid="06548b2f" style:font-size-asian="18pt" style:font-weight-asian="bold" style:font-size-complex="18pt" style:font-weight-complex="bold"/>
    </style:style>
    <style:style style:name="T448" style:family="text">
      <style:text-properties style:font-name="Courier" fo:font-size="18pt" fo:font-weight="bold" officeooo:rsid="0653d54e" style:font-size-asian="18pt" style:font-weight-asian="bold" style:font-size-complex="18pt" style:font-weight-complex="bold"/>
    </style:style>
    <style:style style:name="T449" style:family="text">
      <style:text-properties fo:font-size="12pt" fo:font-weight="normal" officeooo:rsid="040a1959" style:font-size-asian="12pt" style:font-weight-asian="normal" style:font-size-complex="12pt" style:font-weight-complex="normal"/>
    </style:style>
    <style:style style:name="T450" style:family="text">
      <style:text-properties style:font-name="Courier" fo:font-size="12pt" fo:font-weight="normal" officeooo:rsid="040a1959" style:font-size-asian="12pt" style:font-weight-asian="normal" style:font-size-complex="12pt" style:font-weight-complex="normal"/>
    </style:style>
    <style:style style:name="T451" style:family="text">
      <style:text-properties fo:font-size="12pt" officeooo:rsid="04adade4" style:font-size-asian="12pt" style:font-size-complex="12pt"/>
    </style:style>
    <style:style style:name="T452" style:family="text">
      <style:text-properties fo:font-size="12pt" fo:font-weight="normal" officeooo:rsid="0d2aff96" style:font-size-asian="12pt" style:font-weight-asian="normal" style:font-size-complex="12pt" style:font-weight-complex="normal"/>
    </style:style>
    <style:style style:name="T453" style:family="text">
      <style:text-properties fo:font-size="12pt" fo:font-weight="normal" officeooo:rsid="0497d60a" style:font-size-asian="12pt" style:font-weight-asian="normal" style:font-size-complex="12pt" style:font-weight-complex="normal"/>
    </style:style>
    <style:style style:name="T454" style:family="text">
      <style:text-properties fo:font-size="12pt" fo:font-weight="normal" officeooo:rsid="065565b6" style:font-size-asian="12pt" style:font-weight-asian="normal" style:font-size-complex="12pt" style:font-weight-complex="normal"/>
    </style:style>
    <style:style style:name="T455" style:family="text">
      <style:text-properties fo:font-size="12pt" fo:font-weight="normal" officeooo:rsid="04af4f1b" style:font-size-asian="12pt" style:font-weight-asian="normal" style:font-size-complex="12pt" style:font-weight-complex="normal"/>
    </style:style>
    <style:style style:name="T456" style:family="text">
      <style:text-properties officeooo:rsid="065565b6"/>
    </style:style>
    <style:style style:name="T457" style:family="text">
      <style:text-properties officeooo:rsid="0d282e83"/>
    </style:style>
    <style:style style:name="T458" style:family="text">
      <style:text-properties style:font-name="Courier" officeooo:rsid="04af4f1b"/>
    </style:style>
    <style:style style:name="T459" style:family="text">
      <style:text-properties officeooo:rsid="049a2f6e"/>
    </style:style>
    <style:style style:name="T460" style:family="text">
      <style:text-properties fo:font-size="12pt" officeooo:rsid="0d1c107f" style:font-size-asian="12pt" style:font-size-complex="12pt"/>
    </style:style>
    <style:style style:name="T461" style:family="text">
      <style:text-properties fo:font-size="12pt" officeooo:rsid="0d17b148" style:font-size-asian="12pt" style:font-size-complex="12pt"/>
    </style:style>
    <style:style style:name="T462" style:family="text">
      <style:text-properties fo:font-size="12pt" fo:font-weight="normal" officeooo:rsid="0d1a7aea" style:font-size-asian="12pt" style:font-weight-asian="normal" style:font-size-complex="12pt" style:font-weight-complex="normal"/>
    </style:style>
    <style:style style:name="T463" style:family="text">
      <style:text-properties fo:font-size="12pt" fo:font-weight="normal" officeooo:rsid="049a5967" style:font-size-asian="12pt" style:font-weight-asian="normal" style:font-size-complex="12pt" style:font-weight-complex="normal"/>
    </style:style>
    <style:style style:name="T464" style:family="text">
      <style:text-properties style:font-name="Courier" fo:font-size="12pt" fo:font-weight="normal" officeooo:rsid="04af4f1b" style:font-size-asian="12pt" style:font-weight-asian="normal" style:font-size-complex="12pt" style:font-weight-complex="normal"/>
    </style:style>
    <style:style style:name="T465" style:family="text">
      <style:text-properties fo:font-size="12pt" officeooo:rsid="0d1a209f" style:font-size-asian="12pt" style:font-size-complex="12pt"/>
    </style:style>
    <style:style style:name="T466" style:family="text">
      <style:text-properties fo:font-weight="bold" officeooo:rsid="0d1c107f" style:font-weight-asian="bold" style:font-weight-complex="bold"/>
    </style:style>
    <style:style style:name="T467" style:family="text">
      <style:text-properties fo:font-weight="bold" officeooo:rsid="0d1cae2f" style:font-weight-asian="bold" style:font-weight-complex="bold"/>
    </style:style>
    <style:style style:name="T468" style:family="text">
      <style:text-properties fo:font-weight="bold" officeooo:rsid="0d248a0e" style:font-weight-asian="bold" style:font-weight-complex="bold"/>
    </style:style>
    <style:style style:name="T469" style:family="text">
      <style:text-properties fo:font-size="12pt" fo:font-weight="normal" officeooo:rsid="0d355eaa" style:font-size-asian="12pt" style:font-weight-asian="normal" style:font-size-complex="12pt" style:font-weight-complex="normal"/>
    </style:style>
    <style:style style:name="T470" style:family="text">
      <style:text-properties officeooo:rsid="065fcc80"/>
    </style:style>
    <style:style style:name="T471" style:family="text">
      <style:text-properties fo:font-size="12pt" fo:font-weight="normal" officeooo:rsid="049ba736" style:font-size-asian="12pt" style:font-weight-asian="normal" style:font-size-complex="12pt" style:font-weight-complex="normal"/>
    </style:style>
    <style:style style:name="T472" style:family="text">
      <style:text-properties fo:font-size="12pt" fo:font-weight="normal" officeooo:rsid="0d1cae2f" style:font-size-asian="12pt" style:font-weight-asian="normal" style:font-size-complex="12pt" style:font-weight-complex="normal"/>
    </style:style>
    <style:style style:name="T473" style:family="text">
      <style:text-properties style:font-name="Liberation Serif" fo:font-size="12pt" fo:font-weight="normal" officeooo:rsid="011015a4" style:font-size-asian="12pt" style:font-weight-asian="normal" style:font-size-complex="12pt" style:font-weight-complex="normal"/>
    </style:style>
    <style:style style:name="T474" style:family="text">
      <style:text-properties officeooo:rsid="011c93e8"/>
    </style:style>
    <style:style style:name="T475" style:family="text">
      <style:text-properties style:font-name="Courier" fo:font-size="10pt" officeooo:rsid="041e0134" style:font-size-asian="10pt" style:font-size-complex="10pt"/>
    </style:style>
    <style:style style:name="T476" style:family="text">
      <style:text-properties style:font-name="Courier" fo:font-weight="normal" officeooo:rsid="041e0134" style:font-weight-asian="normal" style:font-weight-complex="normal"/>
    </style:style>
    <style:style style:name="T477" style:family="text">
      <style:text-properties style:font-name="Courier" fo:font-weight="normal" officeooo:rsid="011c93e8" style:font-weight-asian="normal" style:font-weight-complex="normal"/>
    </style:style>
    <style:style style:name="T478" style:family="text">
      <style:text-properties officeooo:rsid="05131cd1"/>
    </style:style>
    <style:style style:name="T479" style:family="text">
      <style:text-properties officeooo:rsid="041e0134"/>
    </style:style>
    <style:style style:name="T480" style:family="text">
      <style:text-properties officeooo:rsid="0618d4cf"/>
    </style:style>
    <style:style style:name="T481" style:family="text">
      <style:text-properties fo:font-weight="bold" officeooo:rsid="011c93e8" style:font-weight-asian="bold" style:font-weight-complex="bold"/>
    </style:style>
    <style:style style:name="T482" style:family="text">
      <style:text-properties fo:font-weight="bold" officeooo:rsid="065fcc80" style:font-weight-asian="bold" style:font-weight-complex="bold"/>
    </style:style>
    <style:style style:name="T483" style:family="text">
      <style:text-properties style:font-name="Courier" officeooo:rsid="011abb2e"/>
    </style:style>
    <style:style style:name="T484" style:family="text">
      <style:text-properties officeooo:rsid="011c30b0"/>
    </style:style>
    <style:style style:name="T485" style:family="text">
      <style:text-properties fo:font-size="12pt" officeooo:rsid="0618d4cf" style:font-size-asian="12pt" style:font-size-complex="12pt"/>
    </style:style>
    <style:style style:name="T486" style:family="text">
      <style:text-properties fo:font-size="12pt" officeooo:rsid="01089405" style:font-size-asian="12pt" style:font-size-complex="12pt"/>
    </style:style>
    <style:style style:name="T487" style:family="text">
      <style:text-properties fo:font-size="12pt" officeooo:rsid="0663a379" style:font-size-asian="12pt" style:font-size-complex="12pt"/>
    </style:style>
    <style:style style:name="T488" style:family="text">
      <style:text-properties style:font-name="Courier" fo:font-size="12pt" officeooo:rsid="01031d65" style:font-size-asian="12pt" style:font-size-complex="12pt"/>
    </style:style>
    <style:style style:name="T489" style:family="text">
      <style:text-properties fo:font-size="12pt" fo:font-weight="normal" officeooo:rsid="010a2344" style:font-size-asian="12pt" style:font-weight-asian="normal" style:font-size-complex="12pt" style:font-weight-complex="normal"/>
    </style:style>
    <style:style style:name="T490" style:family="text">
      <style:text-properties fo:font-size="12pt" fo:font-weight="normal" officeooo:rsid="0618d4cf" style:font-size-asian="12pt" style:font-weight-asian="normal" style:font-size-complex="12pt" style:font-weight-complex="normal"/>
    </style:style>
    <style:style style:name="T491" style:family="text">
      <style:text-properties style:font-name="Courier" fo:font-size="12pt" officeooo:rsid="06609515" style:font-size-asian="12pt" style:font-size-complex="12pt"/>
    </style:style>
    <style:style style:name="T492" style:family="text">
      <style:text-properties fo:font-weight="bold" officeooo:rsid="0618d4cf" style:font-weight-asian="bold" style:font-weight-complex="bold"/>
    </style:style>
    <style:style style:name="T493" style:family="text">
      <style:text-properties fo:font-weight="bold" officeooo:rsid="010a43c1" style:font-weight-asian="bold" style:font-weight-complex="bold"/>
    </style:style>
    <style:style style:name="T494" style:family="text">
      <style:text-properties fo:font-weight="bold" officeooo:rsid="06609515" style:font-weight-asian="bold" style:font-weight-complex="bold"/>
    </style:style>
    <style:style style:name="T495" style:family="text">
      <style:text-properties fo:font-weight="normal" officeooo:rsid="010a43c1" style:font-weight-asian="normal" style:font-weight-complex="normal"/>
    </style:style>
    <style:style style:name="T496" style:family="text">
      <style:text-properties fo:font-weight="normal" officeooo:rsid="050fec7a" style:font-weight-asian="normal" style:font-weight-complex="normal"/>
    </style:style>
    <style:style style:name="T497" style:family="text">
      <style:text-properties fo:font-weight="normal" officeooo:rsid="0618d4cf" style:font-weight-asian="normal" style:font-weight-complex="normal"/>
    </style:style>
    <style:style style:name="T498" style:family="text">
      <style:text-properties fo:font-size="12pt" officeooo:rsid="06609515" style:font-size-asian="12pt" style:font-size-complex="12pt"/>
    </style:style>
    <style:style style:name="T499" style:family="text">
      <style:text-properties officeooo:rsid="054c81d3"/>
    </style:style>
    <style:style style:name="T500" style:family="text">
      <style:text-properties fo:font-size="12pt" fo:font-weight="normal" officeooo:rsid="066d858d" style:font-size-asian="12pt" style:font-weight-asian="normal" style:font-size-complex="12pt" style:font-weight-complex="normal"/>
    </style:style>
    <style:style style:name="T501" style:family="text">
      <style:text-properties fo:font-size="12pt" fo:font-style="italic" fo:font-weight="normal" officeooo:rsid="066d858d" style:font-size-asian="12pt" style:font-style-asian="italic" style:font-weight-asian="normal" style:font-size-complex="12pt" style:font-style-complex="italic" style:font-weight-complex="normal"/>
    </style:style>
    <style:style style:name="T502" style:family="text">
      <style:text-properties fo:font-size="12pt" fo:font-weight="normal" officeooo:rsid="0655cf7e" style:font-size-asian="12pt" style:font-weight-asian="normal" style:font-size-complex="12pt" style:font-weight-complex="normal"/>
    </style:style>
    <style:style style:name="T503" style:family="text">
      <style:text-properties officeooo:rsid="0655cf7e"/>
    </style:style>
    <style:style style:name="T504" style:family="text">
      <style:text-properties officeooo:rsid="04a7e1ac"/>
    </style:style>
    <style:style style:name="T505" style:family="text">
      <style:text-properties officeooo:rsid="06850070"/>
    </style:style>
    <style:style style:name="T506" style:family="text">
      <style:text-properties officeooo:rsid="041faa4d"/>
    </style:style>
    <style:style style:name="T507" style:family="text">
      <style:text-properties officeooo:rsid="04a80306"/>
    </style:style>
    <style:style style:name="T508" style:family="text">
      <style:text-properties officeooo:rsid="04a90d7b"/>
    </style:style>
    <style:style style:name="T509" style:family="text">
      <style:text-properties officeooo:rsid="068f75a9"/>
    </style:style>
    <style:style style:name="T510" style:family="text">
      <style:text-properties style:font-name="Courier" officeooo:rsid="068f75a9"/>
    </style:style>
    <style:style style:name="T511" style:family="text">
      <style:text-properties officeooo:rsid="05c196e2"/>
    </style:style>
    <style:style style:name="T512" style:family="text">
      <style:text-properties officeooo:rsid="0d8d3834"/>
    </style:style>
    <style:style style:name="T513" style:family="text">
      <style:text-properties style:font-name="Courier" fo:font-size="10pt" officeooo:rsid="041f8029" style:font-size-asian="10pt" style:font-size-complex="10pt"/>
    </style:style>
    <style:style style:name="T514" style:family="text">
      <style:text-properties fo:font-style="italic" officeooo:rsid="0d8d3834" style:font-style-asian="italic" style:font-style-complex="italic"/>
    </style:style>
    <style:style style:name="T515" style:family="text">
      <style:text-properties fo:font-style="normal" officeooo:rsid="05c196e2" style:font-style-asian="normal" style:font-style-complex="normal"/>
    </style:style>
    <style:style style:name="T516" style:family="text">
      <style:text-properties officeooo:rsid="0688df2f"/>
    </style:style>
    <style:style style:name="T517" style:family="text">
      <style:text-properties officeooo:rsid="04235d3d"/>
    </style:style>
    <style:style style:name="T518" style:family="text">
      <style:text-properties officeooo:rsid="06876881"/>
    </style:style>
    <style:style style:name="T519" style:family="text">
      <style:text-properties officeooo:rsid="04a9ff12"/>
    </style:style>
    <style:style style:name="T520" style:family="text">
      <style:text-properties officeooo:rsid="04aa4d28"/>
    </style:style>
    <style:style style:name="T521" style:family="text">
      <style:text-properties officeooo:rsid="04aae303"/>
    </style:style>
    <style:style style:name="T522" style:family="text">
      <style:text-properties officeooo:rsid="04250b96"/>
    </style:style>
    <style:style style:name="T523" style:family="text">
      <style:text-properties officeooo:rsid="04ace88e"/>
    </style:style>
    <style:style style:name="T524" style:family="text">
      <style:text-properties officeooo:rsid="068c0026"/>
    </style:style>
    <style:style style:name="T525" style:family="text">
      <style:text-properties officeooo:rsid="04ae9a80"/>
    </style:style>
    <style:style style:name="T526" style:family="text">
      <style:text-properties officeooo:rsid="04aeb87d"/>
    </style:style>
    <style:style style:name="T527" style:family="text">
      <style:text-properties officeooo:rsid="04b15107"/>
    </style:style>
    <style:style style:name="T528" style:family="text">
      <style:text-properties officeooo:rsid="04afdf4f"/>
    </style:style>
    <style:style style:name="T529" style:family="text">
      <style:text-properties officeooo:rsid="068c51e4"/>
    </style:style>
    <style:style style:name="T530" style:family="text">
      <style:text-properties officeooo:rsid="04b2baf9"/>
    </style:style>
    <style:style style:name="T531" style:family="text">
      <style:text-properties officeooo:rsid="0d6e2eb7"/>
    </style:style>
    <style:style style:name="T532" style:family="text">
      <style:text-properties fo:font-size="12pt" fo:font-weight="normal" officeooo:rsid="068f75a9" style:font-size-asian="12pt" style:font-weight-asian="normal" style:font-size-complex="12pt" style:font-weight-complex="normal"/>
    </style:style>
    <style:style style:name="T533" style:family="text">
      <style:text-properties fo:font-size="12pt" fo:font-style="italic" fo:font-weight="normal" officeooo:rsid="068f75a9" style:font-size-asian="12pt" style:font-style-asian="italic" style:font-weight-asian="normal" style:font-size-complex="12pt" style:font-style-complex="italic" style:font-weight-complex="normal"/>
    </style:style>
    <style:style style:name="T534" style:family="text">
      <style:text-properties officeooo:rsid="01b63785"/>
    </style:style>
    <style:style style:name="T535" style:family="text">
      <style:text-properties style:font-name="Courier" officeooo:rsid="01b63785"/>
    </style:style>
    <style:style style:name="T536" style:family="text">
      <style:text-properties officeooo:rsid="04b353a5"/>
    </style:style>
    <style:style style:name="T537" style:family="text">
      <style:text-properties fo:font-size="12pt" officeooo:rsid="0690f344" style:font-size-asian="12pt" style:font-size-complex="12pt"/>
    </style:style>
    <style:style style:name="T538" style:family="text">
      <style:text-properties style:font-name="Courier" fo:font-size="12pt" fo:font-weight="normal" officeooo:rsid="01b63785" style:font-size-asian="12pt" style:font-weight-asian="normal" style:font-size-complex="12pt" style:font-weight-complex="normal"/>
    </style:style>
    <style:style style:name="T539" style:family="text">
      <style:text-properties officeooo:rsid="05c510fd"/>
    </style:style>
    <style:style style:name="T540" style:family="text">
      <style:text-properties officeooo:rsid="04b4b2b8"/>
    </style:style>
    <style:style style:name="T541" style:family="text">
      <style:text-properties style:font-name="Courier" fo:font-size="10pt" officeooo:rsid="042a34a8" style:font-size-asian="10pt" style:font-size-complex="10pt"/>
    </style:style>
    <style:style style:name="T542" style:family="text">
      <style:text-properties fo:font-size="10pt" officeooo:rsid="04b755c7" style:font-size-asian="10pt" style:font-size-complex="10pt"/>
    </style:style>
    <style:style style:name="T543" style:family="text">
      <style:text-properties fo:font-size="12pt" officeooo:rsid="0693b07b" style:font-size-asian="12pt" style:font-size-complex="12pt"/>
    </style:style>
    <style:style style:name="T544" style:family="text">
      <style:text-properties officeooo:rsid="04b9eead"/>
    </style:style>
    <style:style style:name="T545" style:family="text">
      <style:text-properties fo:font-size="12pt" fo:font-weight="normal" officeooo:rsid="04b5ee0b" style:font-size-asian="12pt" style:font-weight-asian="normal" style:font-size-complex="12pt" style:font-weight-complex="normal"/>
    </style:style>
    <style:style style:name="T546" style:family="text">
      <style:text-properties fo:font-size="12pt" fo:font-weight="normal" officeooo:rsid="0433ccdd" style:font-size-asian="12pt" style:font-weight-asian="normal" style:font-size-complex="12pt" style:font-weight-complex="normal"/>
    </style:style>
    <style:style style:name="T547" style:family="text">
      <style:text-properties fo:font-size="12pt" fo:font-weight="normal" officeooo:rsid="06574cbd" style:font-size-asian="12pt" style:font-weight-asian="normal" style:font-size-complex="12pt" style:font-weight-complex="normal"/>
    </style:style>
    <style:style style:name="T548" style:family="text">
      <style:text-properties fo:font-size="12pt" fo:font-weight="normal" officeooo:rsid="04bfa321" style:font-size-asian="12pt" style:font-weight-asian="normal" style:font-size-complex="12pt" style:font-weight-complex="normal"/>
    </style:style>
    <style:style style:name="T549" style:family="text">
      <style:text-properties fo:font-size="12pt" fo:font-weight="normal" officeooo:rsid="04b7983e" style:font-size-asian="12pt" style:font-weight-asian="normal" style:font-size-complex="12pt" style:font-weight-complex="normal"/>
    </style:style>
    <style:style style:name="T550" style:family="text">
      <style:text-properties fo:font-size="12pt" officeooo:rsid="0d53ac28" style:font-size-asian="12pt" style:font-size-complex="12pt"/>
    </style:style>
    <style:style style:name="T551" style:family="text">
      <style:text-properties style:font-name="Courier" fo:font-size="12pt" fo:font-style="normal" fo:font-weight="normal" officeooo:rsid="06574cbd" style:font-size-asian="12pt" style:font-style-asian="normal" style:font-weight-asian="normal" style:font-size-complex="12pt" style:font-style-complex="normal" style:font-weight-complex="normal"/>
    </style:style>
    <style:style style:name="T552" style:family="text">
      <style:text-properties fo:font-size="12pt" officeooo:rsid="06574cbd" style:font-size-asian="12pt" style:font-size-complex="12pt"/>
    </style:style>
    <style:style style:name="T553" style:family="text">
      <style:text-properties officeooo:rsid="0128fc01"/>
    </style:style>
    <style:style style:name="T554" style:family="text">
      <style:text-properties officeooo:rsid="06574cbd"/>
    </style:style>
    <style:style style:name="T555" style:family="text">
      <style:text-properties officeooo:rsid="05c60ac2"/>
    </style:style>
    <style:style style:name="T556" style:family="text">
      <style:text-properties style:font-name="Courier" fo:font-size="10pt" style:font-size-asian="10pt" style:font-size-complex="10pt"/>
    </style:style>
    <style:style style:name="T557" style:family="text">
      <style:text-properties officeooo:rsid="04c03f17"/>
    </style:style>
    <style:style style:name="T558" style:family="text">
      <style:text-properties fo:font-size="12pt" fo:font-weight="normal" officeooo:rsid="0434fc7c" style:font-size-asian="12pt" style:font-weight-asian="normal" style:font-size-complex="12pt" style:font-weight-complex="normal"/>
    </style:style>
    <style:style style:name="T559" style:family="text">
      <style:text-properties style:font-name="Courier" fo:font-size="12pt" fo:font-weight="normal" officeooo:rsid="0434fc7c" style:font-size-asian="12pt" style:font-weight-asian="normal" style:font-size-complex="12pt" style:font-weight-complex="normal"/>
    </style:style>
    <style:style style:name="T560" style:family="text">
      <style:text-properties officeooo:rsid="04365b05"/>
    </style:style>
    <style:style style:name="T561" style:family="text">
      <style:text-properties fo:font-size="12pt" fo:font-weight="normal" officeooo:rsid="04365b05" style:font-size-asian="12pt" style:font-weight-asian="normal" style:font-size-complex="12pt" style:font-weight-complex="normal"/>
    </style:style>
    <style:style style:name="T562" style:family="text">
      <style:text-properties style:font-name="Courier" fo:font-size="12pt" fo:font-weight="normal" officeooo:rsid="04365b05" style:font-size-asian="12pt" style:font-weight-asian="normal" style:font-size-complex="12pt" style:font-weight-complex="normal"/>
    </style:style>
    <style:style style:name="T563" style:family="text">
      <style:text-properties officeooo:rsid="05963542"/>
    </style:style>
    <style:style style:name="T564" style:family="text">
      <style:text-properties fo:font-size="12pt" officeooo:rsid="0434fc7c" style:font-size-asian="12pt" style:font-size-complex="12pt"/>
    </style:style>
    <style:style style:name="T565" style:family="text">
      <style:text-properties fo:font-size="12pt" officeooo:rsid="05963542" style:font-size-asian="12pt" style:font-size-complex="12pt"/>
    </style:style>
    <style:style style:name="T566" style:family="text">
      <style:text-properties fo:font-size="12pt" fo:font-weight="normal" officeooo:rsid="05987b75" style:font-size-asian="12pt" style:font-weight-asian="normal" style:font-size-complex="12pt" style:font-weight-complex="normal"/>
    </style:style>
    <style:style style:name="T567" style:family="text">
      <style:text-properties fo:font-size="12pt" fo:font-weight="normal" officeooo:rsid="05a39793" style:font-size-asian="12pt" style:font-weight-asian="normal" style:font-size-complex="12pt" style:font-weight-complex="normal"/>
    </style:style>
    <style:style style:name="T568" style:family="text">
      <style:text-properties officeooo:rsid="0598c912"/>
    </style:style>
    <style:style style:name="T569" style:family="text">
      <style:text-properties style:font-name="Courier" officeooo:rsid="0598c912"/>
    </style:style>
    <style:style style:name="T570" style:family="text">
      <style:text-properties fo:font-size="12pt" officeooo:rsid="05987b75" style:font-size-asian="12pt" style:font-size-complex="12pt"/>
    </style:style>
    <style:style style:name="T571" style:family="text">
      <style:text-properties officeooo:rsid="0434fc7c"/>
    </style:style>
    <style:style style:name="T572" style:family="text">
      <style:text-properties fo:font-size="12pt" fo:font-weight="normal" officeooo:rsid="0598c912" style:font-size-asian="12pt" style:font-weight-asian="normal" style:font-size-complex="12pt" style:font-weight-complex="normal"/>
    </style:style>
    <style:style style:name="T573" style:family="text">
      <style:text-properties fo:font-size="12pt" fo:font-style="italic" fo:font-weight="normal" officeooo:rsid="0598c912" style:font-size-asian="12pt" style:font-style-asian="italic" style:font-weight-asian="normal" style:font-size-complex="12pt" style:font-style-complex="italic" style:font-weight-complex="normal"/>
    </style:style>
    <style:style style:name="T574" style:family="text">
      <style:text-properties style:font-name="Courier" officeooo:rsid="059a537a"/>
    </style:style>
    <style:style style:name="T575" style:family="text">
      <style:text-properties officeooo:rsid="059a537a"/>
    </style:style>
    <style:style style:name="T576" style:family="text">
      <style:text-properties officeooo:rsid="06579bb3"/>
    </style:style>
    <style:style style:name="T577" style:family="text">
      <style:text-properties style:font-name="Courier" fo:font-size="10pt" officeooo:rsid="059a537a" style:font-size-asian="10pt" style:font-size-complex="10pt"/>
    </style:style>
    <style:style style:name="T578" style:family="text">
      <style:text-properties style:font-name="Courier" fo:font-size="10pt" officeooo:rsid="05a03b53" style:font-size-asian="10pt" style:font-size-complex="10pt"/>
    </style:style>
    <style:style style:name="T579" style:family="text">
      <style:text-properties style:font-name="Courier" fo:font-size="10pt" officeooo:rsid="059d862e" style:font-size-asian="10pt" style:font-size-complex="10pt"/>
    </style:style>
    <style:style style:name="T580" style:family="text">
      <style:text-properties style:font-name="Courier" fo:font-size="10pt" officeooo:rsid="059ee15f" style:font-size-asian="10pt" style:font-size-complex="10pt"/>
    </style:style>
    <style:style style:name="T581" style:family="text">
      <style:text-properties fo:font-size="12pt" fo:font-weight="normal" officeooo:rsid="06579bb3" style:font-size-asian="12pt" style:font-weight-asian="normal" style:font-size-complex="12pt" style:font-weight-complex="normal"/>
    </style:style>
    <style:style style:name="T582" style:family="text">
      <style:text-properties officeooo:rsid="059b87dd"/>
    </style:style>
    <style:style style:name="T583" style:family="text">
      <style:text-properties fo:color="#808080" loext:opacity="100%"/>
    </style:style>
    <style:style style:name="T584" style:family="text">
      <style:text-properties fo:color="#808080" loext:opacity="100%" officeooo:rsid="059c3e28"/>
    </style:style>
    <style:style style:name="T585" style:family="text">
      <style:text-properties fo:font-size="12pt" fo:font-weight="normal" officeooo:rsid="059c3e28" style:font-size-asian="12pt" style:font-weight-asian="normal" style:font-size-complex="12pt" style:font-weight-complex="normal"/>
    </style:style>
    <style:style style:name="T586" style:family="text">
      <style:text-properties officeooo:rsid="05edd9fb"/>
    </style:style>
    <style:style style:name="T587" style:family="text">
      <style:text-properties officeooo:rsid="059c3e28"/>
    </style:style>
    <style:style style:name="T588" style:family="text">
      <style:text-properties officeooo:rsid="05efd3bf"/>
    </style:style>
    <style:style style:name="T589" style:family="text">
      <style:text-properties fo:font-weight="normal" officeooo:rsid="06579bb3" style:font-weight-asian="normal" style:font-weight-complex="normal"/>
    </style:style>
    <style:style style:name="T590" style:family="text">
      <style:text-properties style:font-name="Courier" officeooo:rsid="05d69e0b"/>
    </style:style>
    <style:style style:name="T591" style:family="text">
      <style:text-properties officeooo:rsid="04cc070e"/>
    </style:style>
    <style:style style:name="T592" style:family="text">
      <style:text-properties officeooo:rsid="06403430"/>
    </style:style>
    <style:style style:name="T593" style:family="text">
      <style:text-properties officeooo:rsid="043ed957"/>
    </style:style>
    <style:style style:name="T594" style:family="text">
      <style:text-properties style:font-name="Courier" officeooo:rsid="043ed957"/>
    </style:style>
    <style:style style:name="T595" style:family="text">
      <style:text-properties fo:font-size="10pt" officeooo:rsid="043ed957" style:font-size-asian="10pt" style:font-size-complex="10pt"/>
    </style:style>
    <style:style style:name="T596" style:family="text">
      <style:text-properties fo:font-size="12pt" fo:font-weight="normal" officeooo:rsid="04c03f17" style:font-size-asian="12pt" style:font-weight-asian="normal" style:font-size-complex="12pt" style:font-weight-complex="normal"/>
    </style:style>
    <style:style style:name="T597" style:family="text">
      <style:text-properties fo:font-size="12pt" officeooo:rsid="04bb8419" style:font-size-asian="12pt" style:font-size-complex="12pt"/>
    </style:style>
    <style:style style:name="T598" style:family="text">
      <style:text-properties fo:font-size="12pt" officeooo:rsid="04423fb3" style:font-size-asian="12pt" style:font-size-complex="12pt"/>
    </style:style>
    <style:style style:name="T599" style:family="text">
      <style:text-properties fo:font-size="13pt" fo:font-weight="bold" officeooo:rsid="05c7c60d" style:font-size-asian="13pt" style:font-weight-asian="bold" style:font-size-complex="13pt" style:font-weight-complex="bold"/>
    </style:style>
    <style:style style:name="T600" style:family="text">
      <style:text-properties fo:font-size="13pt" fo:font-weight="bold" officeooo:rsid="06614372" style:font-size-asian="13pt" style:font-weight-asian="bold" style:font-size-complex="13pt" style:font-weight-complex="bold"/>
    </style:style>
    <style:style style:name="T601" style:family="text">
      <style:text-properties style:font-name="Courier" fo:font-size="13pt" fo:font-weight="bold" officeooo:rsid="05d69e0b" style:font-size-asian="13pt" style:font-weight-asian="bold" style:font-size-complex="13pt" style:font-weight-complex="bold"/>
    </style:style>
    <style:style style:name="T602" style:family="text">
      <style:text-properties officeooo:rsid="04c4eafb"/>
    </style:style>
    <style:style style:name="T603" style:family="text">
      <style:text-properties officeooo:rsid="06594c02"/>
    </style:style>
    <style:style style:name="T604" style:family="text">
      <style:text-properties fo:font-size="12pt" officeooo:rsid="04be9efb" style:font-size-asian="12pt" style:font-size-complex="12pt"/>
    </style:style>
    <style:style style:name="T605" style:family="text">
      <style:text-properties fo:font-size="12pt" officeooo:rsid="043a4837" style:font-size-asian="12pt" style:font-size-complex="12pt"/>
    </style:style>
    <style:style style:name="T606" style:family="text">
      <style:text-properties officeooo:rsid="04c889df"/>
    </style:style>
    <style:style style:name="T607" style:family="text">
      <style:text-properties fo:font-size="12pt" officeooo:rsid="04c0d40f" style:font-size-asian="12pt" style:font-size-complex="12pt"/>
    </style:style>
    <style:style style:name="T608" style:family="text">
      <style:text-properties officeooo:rsid="05d69e0b"/>
    </style:style>
    <style:style style:name="T609" style:family="text">
      <style:text-properties fo:font-style="italic" officeooo:rsid="05d69e0b" style:font-style-asian="italic" style:font-style-complex="italic"/>
    </style:style>
    <style:style style:name="T610" style:family="text">
      <style:text-properties officeooo:rsid="04c9444b"/>
    </style:style>
    <style:style style:name="T611" style:family="text">
      <style:text-properties fo:font-size="12pt" fo:font-weight="normal" officeooo:rsid="06594c02" style:font-size-asian="12pt" style:font-weight-asian="normal" style:font-size-complex="12pt" style:font-weight-complex="normal"/>
    </style:style>
    <style:style style:name="T612" style:family="text">
      <style:text-properties fo:font-size="12pt" fo:font-weight="normal" officeooo:rsid="08d28b38" style:font-size-asian="12pt" style:font-weight-asian="normal" style:font-size-complex="12pt" style:font-weight-complex="normal"/>
    </style:style>
    <style:style style:name="T613" style:family="text">
      <style:text-properties fo:font-size="12pt" officeooo:rsid="08d40c6a" style:font-size-asian="12pt" style:font-size-complex="12pt"/>
    </style:style>
    <style:style style:name="T614" style:family="text">
      <style:text-properties officeooo:rsid="01b443c1"/>
    </style:style>
    <style:style style:name="T615" style:family="text">
      <style:text-properties fo:font-size="18pt" fo:font-weight="bold" officeooo:rsid="00b922ce" style:font-size-asian="18pt" style:font-weight-asian="bold" style:font-size-complex="18pt" style:font-weight-complex="bold"/>
    </style:style>
    <style:style style:name="T616" style:family="text">
      <style:text-properties fo:font-size="18pt" fo:font-weight="bold" officeooo:rsid="023abbef" style:font-size-asian="18pt" style:font-weight-asian="bold" style:font-size-complex="18pt" style:font-weight-complex="bold"/>
    </style:style>
    <style:style style:name="T617" style:family="text">
      <style:text-properties fo:font-size="18pt" fo:font-weight="bold" officeooo:rsid="04cf7186" style:font-size-asian="18pt" style:font-weight-asian="bold" style:font-size-complex="18pt" style:font-weight-complex="bold"/>
    </style:style>
    <style:style style:name="T618" style:family="text">
      <style:text-properties fo:font-size="12pt" fo:font-weight="normal" officeooo:rsid="04c3486c" style:font-size-asian="12pt" style:font-weight-asian="normal" style:font-size-complex="12pt" style:font-weight-complex="normal"/>
    </style:style>
    <style:style style:name="T619" style:family="text">
      <style:text-properties fo:font-size="12pt" fo:font-weight="normal" officeooo:rsid="0659acf0" style:font-size-asian="12pt" style:font-weight-asian="normal" style:font-size-complex="12pt" style:font-weight-complex="normal"/>
    </style:style>
    <style:style style:name="T620" style:family="text">
      <style:text-properties fo:font-size="12pt" officeooo:rsid="04c3486c" style:font-size-asian="12pt" style:font-size-complex="12pt"/>
    </style:style>
    <style:style style:name="T621" style:family="text">
      <style:text-properties officeooo:rsid="0659acf0"/>
    </style:style>
    <style:style style:name="T622" style:family="text">
      <style:text-properties fo:font-size="12pt" officeooo:rsid="04c40635" style:font-size-asian="12pt" style:font-size-complex="12pt"/>
    </style:style>
    <style:style style:name="T623" style:family="text">
      <style:text-properties fo:font-size="12pt" officeooo:rsid="0143efd2" style:font-size-asian="12pt" style:font-size-complex="12pt"/>
    </style:style>
    <style:style style:name="T624" style:family="text">
      <style:text-properties fo:font-size="12pt" officeooo:rsid="0144c2eb" style:font-size-asian="12pt" style:font-size-complex="12pt"/>
    </style:style>
    <style:style style:name="T625" style:family="text">
      <style:text-properties fo:font-size="12pt" officeooo:rsid="04c41c1f" style:font-size-asian="12pt" style:font-size-complex="12pt"/>
    </style:style>
    <style:style style:name="T626" style:family="text">
      <style:text-properties fo:font-size="12pt" fo:font-weight="normal" officeooo:rsid="0143efd2" style:font-size-asian="12pt" style:font-weight-asian="normal" style:font-size-complex="12pt" style:font-weight-complex="normal"/>
    </style:style>
    <style:style style:name="T627" style:family="text">
      <style:text-properties officeooo:rsid="0144c2eb"/>
    </style:style>
    <style:style style:name="T628" style:family="text">
      <style:text-properties fo:color="#2a6099" loext:opacity="100%" fo:font-size="10pt" fo:font-weight="normal" officeooo:rsid="0146aead" style:font-size-asian="10pt" style:font-weight-asian="normal" style:font-size-complex="10pt" style:font-weight-complex="normal"/>
    </style:style>
    <style:style style:name="T629" style:family="text">
      <style:text-properties style:use-window-font-color="true" loext:opacity="0%" fo:font-size="10pt" fo:font-weight="normal" officeooo:rsid="0146aead" style:font-size-asian="10pt" style:font-weight-asian="normal" style:font-size-complex="10pt" style:font-weight-complex="normal"/>
    </style:style>
    <style:style style:name="T630" style:family="text">
      <style:text-properties style:use-window-font-color="true" loext:opacity="0%" fo:font-weight="normal" officeooo:rsid="0146aead" style:font-weight-asian="normal" style:font-weight-complex="normal"/>
    </style:style>
    <style:style style:name="T631" style:family="text">
      <style:text-properties fo:color="#2a6099" loext:opacity="100%" fo:font-weight="normal" style:font-weight-asian="normal" style:font-weight-complex="normal"/>
    </style:style>
    <style:style style:name="T632" style:family="text">
      <style:text-properties style:font-name="Liberation Serif" fo:font-size="12pt" fo:font-weight="normal" officeooo:rsid="014ee688" style:font-size-asian="12pt" style:font-weight-asian="normal" style:font-size-complex="12pt" style:font-weight-complex="normal"/>
    </style:style>
    <style:style style:name="T633" style:family="text">
      <style:text-properties style:font-name="Liberation Serif" fo:font-size="12pt" fo:font-weight="normal" officeooo:rsid="0659acf0" style:font-size-asian="12pt" style:font-weight-asian="normal" style:font-size-complex="12pt" style:font-weight-complex="normal"/>
    </style:style>
    <style:style style:name="T634" style:family="text">
      <style:text-properties fo:font-size="12pt" fo:font-weight="normal" officeooo:rsid="014e5c51" style:font-size-asian="12pt" style:font-weight-asian="normal" style:font-size-complex="12pt" style:font-weight-complex="normal"/>
    </style:style>
    <style:style style:name="T635" style:family="text">
      <style:text-properties officeooo:rsid="05cc8421"/>
    </style:style>
    <style:style style:name="T636" style:family="text">
      <style:text-properties style:font-name="Liberation Serif" fo:font-size="12pt" fo:font-weight="normal" officeooo:rsid="014e5c51" style:font-size-asian="12pt" style:font-weight-asian="normal" style:font-size-complex="12pt" style:font-weight-complex="normal"/>
    </style:style>
    <style:style style:name="T637" style:family="text">
      <style:text-properties fo:font-size="12pt" officeooo:rsid="04c590e2" style:font-size-asian="12pt" style:font-size-complex="12pt"/>
    </style:style>
    <style:style style:name="T638" style:family="text">
      <style:text-properties fo:font-size="12pt" officeooo:rsid="014dc7bc" style:font-size-asian="12pt" style:font-size-complex="12pt"/>
    </style:style>
    <style:style style:name="T639" style:family="text">
      <style:text-properties fo:font-size="12pt" officeooo:rsid="014e5c51" style:font-size-asian="12pt" style:font-size-complex="12pt"/>
    </style:style>
    <style:style style:name="T640" style:family="text">
      <style:text-properties fo:font-size="12pt" fo:font-weight="normal" officeooo:rsid="0151431b" style:font-size-asian="12pt" style:font-weight-asian="normal" style:font-size-complex="12pt" style:font-weight-complex="normal"/>
    </style:style>
    <style:style style:name="T641" style:family="text">
      <style:text-properties style:font-name="Courier" fo:font-size="12pt" fo:font-weight="normal" officeooo:rsid="0151431b" style:font-size-asian="12pt" style:font-weight-asian="normal" style:font-size-complex="12pt" style:font-weight-complex="normal"/>
    </style:style>
    <style:style style:name="T642" style:family="text">
      <style:text-properties officeooo:rsid="04d162fa"/>
    </style:style>
    <style:style style:name="T643" style:family="text">
      <style:text-properties fo:font-size="10pt" fo:font-weight="normal" officeooo:rsid="04c9f0c6" style:font-size-asian="10pt" style:font-weight-asian="normal" style:font-size-complex="10pt" style:font-weight-complex="normal"/>
    </style:style>
    <style:style style:name="T644" style:family="text">
      <style:text-properties fo:font-size="12pt" fo:font-weight="normal" officeooo:rsid="013251db" style:font-size-asian="12pt" style:font-weight-asian="normal" style:font-size-complex="12pt" style:font-weight-complex="normal"/>
    </style:style>
    <style:style style:name="T645" style:family="text">
      <style:text-properties officeooo:rsid="065abbfd"/>
    </style:style>
    <style:style style:name="T646" style:family="text">
      <style:text-properties fo:font-size="12pt" officeooo:rsid="04cb885b" style:font-size-asian="12pt" style:font-size-complex="12pt"/>
    </style:style>
    <style:style style:name="T647" style:family="text">
      <style:text-properties fo:color="#2a6099" loext:opacity="100%" fo:font-size="12pt" officeooo:rsid="013f7ce2" style:font-size-asian="12pt" style:font-size-complex="12pt"/>
    </style:style>
    <style:style style:name="T648" style:family="text">
      <style:text-properties fo:font-size="12pt" officeooo:rsid="013f7ce2" style:font-size-asian="12pt" style:font-size-complex="12pt"/>
    </style:style>
    <style:style style:name="T649" style:family="text">
      <style:text-properties fo:color="#f10d0c" loext:opacity="100%"/>
    </style:style>
    <style:style style:name="T650" style:family="text">
      <style:text-properties fo:color="#f10d0c" loext:opacity="100%" fo:font-size="12pt" officeooo:rsid="013f7ce2" style:font-size-asian="12pt" style:font-size-complex="12pt"/>
    </style:style>
    <style:style style:name="T651" style:family="text">
      <style:text-properties fo:font-size="12pt" fo:font-weight="normal" officeooo:rsid="04cec1ae" style:font-size-asian="12pt" style:font-weight-asian="normal" style:font-size-complex="12pt" style:font-weight-complex="normal"/>
    </style:style>
    <style:style style:name="T652" style:family="text">
      <style:text-properties fo:font-size="12pt" fo:font-weight="normal" officeooo:rsid="0138fd0e" style:font-size-asian="12pt" style:font-weight-asian="normal" style:font-size-complex="12pt" style:font-weight-complex="normal"/>
    </style:style>
    <style:style style:name="T653" style:family="text">
      <style:text-properties style:use-window-font-color="true" loext:opacity="0%" style:font-name="Courier" fo:font-size="12pt" fo:font-weight="normal" officeooo:rsid="014180e1" style:font-size-asian="12pt" style:font-weight-asian="normal" style:font-size-complex="12pt" style:font-weight-complex="normal"/>
    </style:style>
    <style:style style:name="T654" style:family="text">
      <style:text-properties style:font-name="Courier" fo:font-size="10pt" officeooo:rsid="0138fd0e" style:font-size-asian="10pt" style:font-size-complex="10pt"/>
    </style:style>
    <style:style style:name="T655" style:family="text">
      <style:text-properties fo:font-size="10pt" officeooo:rsid="05cc8421" style:font-size-asian="10pt" style:font-size-complex="10pt"/>
    </style:style>
    <style:style style:name="T656" style:family="text">
      <style:text-properties fo:font-size="12pt" fo:font-weight="normal" officeooo:rsid="065abbfd" style:font-size-asian="12pt" style:font-weight-asian="normal" style:font-size-complex="12pt" style:font-weight-complex="normal"/>
    </style:style>
    <style:style style:name="T657" style:family="text">
      <style:text-properties officeooo:rsid="04d4c53f"/>
    </style:style>
    <style:style style:name="T658" style:family="text">
      <style:text-properties officeooo:rsid="05cd990a"/>
    </style:style>
    <style:style style:name="T659" style:family="text">
      <style:text-properties style:font-name="Courier" fo:font-size="10pt" officeooo:rsid="04d76b99" style:font-size-asian="10pt" style:font-size-complex="10pt"/>
    </style:style>
    <style:style style:name="T660" style:family="text">
      <style:text-properties fo:font-size="10pt" officeooo:rsid="04d4c53f" style:font-size-asian="10pt" style:font-size-complex="10pt"/>
    </style:style>
    <style:style style:name="T661" style:family="text">
      <style:text-properties fo:font-size="10pt" officeooo:rsid="05cd990a" style:font-size-asian="10pt" style:font-size-complex="10pt"/>
    </style:style>
    <style:style style:name="T662" style:family="text">
      <style:text-properties officeooo:rsid="0138fd0e"/>
    </style:style>
    <style:style style:name="T663" style:family="text">
      <style:text-properties officeooo:rsid="04d64897"/>
    </style:style>
    <style:style style:name="T664" style:family="text">
      <style:text-properties fo:font-size="10pt" officeooo:rsid="04d64897" style:font-size-asian="10pt" style:font-size-complex="10pt"/>
    </style:style>
    <style:style style:name="T665" style:family="text">
      <style:text-properties style:font-name="Courier" officeooo:rsid="0138fd0e"/>
    </style:style>
    <style:style style:name="T666" style:family="text">
      <style:text-properties fo:font-size="12pt" officeooo:rsid="0d600e69" style:font-size-asian="12pt" style:font-size-complex="12pt"/>
    </style:style>
    <style:style style:name="T667" style:family="text">
      <style:text-properties fo:font-size="12pt" fo:font-weight="normal" officeooo:rsid="0d5ec8b2" style:font-size-asian="12pt" style:font-weight-asian="normal" style:font-size-complex="12pt" style:font-weight-complex="normal"/>
    </style:style>
    <style:style style:name="T668" style:family="text">
      <style:text-properties fo:font-size="12pt" fo:font-weight="normal" officeooo:rsid="0d603366" style:font-size-asian="12pt" style:font-weight-asian="normal" style:font-size-complex="12pt" style:font-weight-complex="normal"/>
    </style:style>
    <style:style style:name="T669" style:family="text">
      <style:text-properties officeooo:rsid="04f9e35c"/>
    </style:style>
    <style:style style:name="T670" style:family="text">
      <style:text-properties officeooo:rsid="0027921a"/>
    </style:style>
    <style:style style:name="T671" style:family="text">
      <style:text-properties fo:font-style="italic" officeooo:rsid="05f9bb58" style:font-style-asian="italic" style:font-style-complex="italic"/>
    </style:style>
    <style:style style:name="T672" style:family="text">
      <style:text-properties officeooo:rsid="04fa71fe"/>
    </style:style>
    <style:style style:name="T673" style:family="text">
      <style:text-properties fo:font-weight="normal" officeooo:rsid="07c01a42" style:font-weight-asian="normal" style:font-weight-complex="normal"/>
    </style:style>
    <style:style style:name="T674" style:family="text">
      <style:text-properties fo:font-weight="normal" officeooo:rsid="04fddd5a" style:font-weight-asian="normal" style:font-weight-complex="normal"/>
    </style:style>
    <style:style style:name="T675" style:family="text">
      <style:text-properties fo:font-size="12pt" fo:font-style="italic" fo:font-weight="bold" style:font-size-asian="12pt" style:font-style-asian="italic" style:font-weight-asian="bold" style:font-size-complex="12pt" style:font-style-complex="italic" style:font-weight-complex="bold"/>
    </style:style>
    <style:style style:name="T676" style:family="text">
      <style:text-properties fo:font-size="18pt" fo:font-weight="bold" officeooo:rsid="00b93e5a" style:font-size-asian="18pt" style:font-weight-asian="bold" style:font-size-complex="18pt" style:font-weight-complex="bold"/>
    </style:style>
    <style:style style:name="T677" style:family="text">
      <style:text-properties fo:font-size="18pt" fo:font-weight="bold" officeooo:rsid="0363f740" style:font-size-asian="18pt" style:font-weight-asian="bold" style:font-size-complex="18pt" style:font-weight-complex="bold"/>
    </style:style>
    <style:style style:name="T678" style:family="text">
      <style:text-properties fo:font-size="18pt" fo:font-weight="bold" officeooo:rsid="04fcce1e" style:font-size-asian="18pt" style:font-weight-asian="bold" style:font-size-complex="18pt" style:font-weight-complex="bold"/>
    </style:style>
    <style:style style:name="T679" style:family="text">
      <style:text-properties fo:font-size="18pt" fo:font-weight="bold" officeooo:rsid="0634eb79" style:font-size-asian="18pt" style:font-weight-asian="bold" style:font-size-complex="18pt" style:font-weight-complex="bold"/>
    </style:style>
    <style:style style:name="T680" style:family="text">
      <style:text-properties fo:font-size="14pt" fo:font-weight="bold" officeooo:rsid="05d82001" style:font-size-asian="14pt" style:font-weight-asian="bold" style:font-size-complex="14pt" style:font-weight-complex="bold"/>
    </style:style>
    <style:style style:name="T681" style:family="text">
      <style:text-properties fo:font-size="14pt" fo:font-weight="bold" officeooo:rsid="06614372" style:font-size-asian="14pt" style:font-weight-asian="bold" style:font-size-complex="14pt" style:font-weight-complex="bold"/>
    </style:style>
    <style:style style:name="T682" style:family="text">
      <style:text-properties fo:font-size="14pt" fo:font-weight="bold" officeooo:rsid="06609515" style:font-size-asian="14pt" style:font-weight-asian="bold" style:font-size-complex="14pt" style:font-weight-complex="bold"/>
    </style:style>
    <style:style style:name="T683" style:family="text">
      <style:text-properties fo:font-size="14pt" fo:font-weight="bold" officeooo:rsid="0513514f" style:font-size-asian="14pt" style:font-weight-asian="bold" style:font-size-complex="14pt" style:font-weight-complex="bold"/>
    </style:style>
    <style:style style:name="T684" style:family="text">
      <style:text-properties fo:font-size="14pt" fo:font-weight="bold" officeooo:rsid="019ad0fa" style:font-size-asian="14pt" style:font-weight-asian="bold" style:font-size-complex="14pt" style:font-weight-complex="bold"/>
    </style:style>
    <style:style style:name="T685" style:family="text">
      <style:text-properties officeooo:rsid="019b259a"/>
    </style:style>
    <style:style style:name="T686" style:family="text">
      <style:text-properties fo:font-style="italic" officeooo:rsid="019b259a" style:font-style-asian="italic" style:font-style-complex="italic"/>
    </style:style>
    <style:style style:name="T687" style:family="text">
      <style:text-properties officeooo:rsid="0618e6ff"/>
    </style:style>
    <style:style style:name="T688" style:family="text">
      <style:text-properties officeooo:rsid="01a4be16"/>
    </style:style>
    <style:style style:name="T689" style:family="text">
      <style:text-properties fo:font-style="normal" officeooo:rsid="01ab031e" style:font-style-asian="normal" style:font-style-complex="normal"/>
    </style:style>
    <style:style style:name="T690" style:family="text">
      <style:text-properties fo:font-style="italic" officeooo:rsid="0618e6ff" style:font-style-asian="italic" style:font-style-complex="italic"/>
    </style:style>
    <style:style style:name="T691" style:family="text">
      <style:text-properties fo:font-style="italic" officeooo:rsid="01ab031e" style:font-style-asian="italic" style:font-style-complex="italic"/>
    </style:style>
    <style:style style:name="T692" style:family="text">
      <style:text-properties fo:font-style="normal" officeooo:rsid="0618e6ff" style:font-style-asian="normal" style:font-style-complex="normal"/>
    </style:style>
    <style:style style:name="T693" style:family="text">
      <style:text-properties officeooo:rsid="03a17e27"/>
    </style:style>
    <style:style style:name="T694" style:family="text">
      <style:text-properties fo:font-weight="normal" officeooo:rsid="0516f971" style:font-weight-asian="normal" style:font-weight-complex="normal"/>
    </style:style>
    <style:style style:name="T695" style:family="text">
      <style:text-properties fo:font-size="12pt" fo:font-weight="normal" officeooo:rsid="01ac837f" style:font-size-asian="12pt" style:font-weight-asian="normal" style:font-size-complex="12pt" style:font-weight-complex="normal"/>
    </style:style>
    <style:style style:name="T696" style:family="text">
      <style:text-properties style:font-name="Courier" fo:font-size="12pt" fo:font-weight="normal" officeooo:rsid="01a2925c" style:font-size-asian="12pt" style:font-weight-asian="normal" style:font-size-complex="12pt" style:font-weight-complex="normal"/>
    </style:style>
    <style:style style:name="T697" style:family="text">
      <style:text-properties fo:font-size="12pt" fo:font-style="italic" fo:font-weight="normal" officeooo:rsid="0618e6ff" style:font-size-asian="12pt" style:font-style-asian="italic" style:font-weight-asian="normal" style:font-size-complex="12pt" style:font-style-complex="italic" style:font-weight-complex="normal"/>
    </style:style>
    <style:style style:name="T698" style:family="text">
      <style:text-properties fo:font-size="12pt" fo:font-style="italic" fo:font-weight="normal" officeooo:rsid="01ac837f" style:font-size-asian="12pt" style:font-style-asian="italic" style:font-weight-asian="normal" style:font-size-complex="12pt" style:font-style-complex="italic" style:font-weight-complex="normal"/>
    </style:style>
    <style:style style:name="T699" style:family="text">
      <style:text-properties fo:font-size="12pt" fo:font-weight="normal" officeooo:rsid="0618e6ff" style:font-size-asian="12pt" style:font-weight-asian="normal" style:font-size-complex="12pt" style:font-weight-complex="normal"/>
    </style:style>
    <style:style style:name="T700" style:family="text">
      <style:text-properties style:use-window-font-color="true" loext:opacity="0%" fo:font-size="12pt" fo:font-weight="normal" officeooo:rsid="02896742" style:font-size-asian="12pt" style:font-weight-asian="normal" style:font-size-complex="12pt" style:font-weight-complex="normal"/>
    </style:style>
    <style:style style:name="T701" style:family="text">
      <style:text-properties style:use-window-font-color="true" loext:opacity="0%" fo:font-size="12pt" fo:font-style="italic" fo:font-weight="normal" officeooo:rsid="02896742" style:font-size-asian="12pt" style:font-style-asian="italic" style:font-weight-asian="normal" style:font-size-complex="12pt" style:font-style-complex="italic" style:font-weight-complex="normal"/>
    </style:style>
    <style:style style:name="T702" style:family="text">
      <style:text-properties style:use-window-font-color="true" loext:opacity="0%"/>
    </style:style>
    <style:style style:name="T703" style:family="text">
      <style:text-properties style:use-window-font-color="true" loext:opacity="0%" officeooo:rsid="061e06c1"/>
    </style:style>
    <style:style style:name="T704" style:family="text">
      <style:text-properties style:use-window-font-color="true" loext:opacity="0%" fo:font-style="italic" style:font-style-asian="italic" style:font-style-complex="italic"/>
    </style:style>
    <style:style style:name="T705" style:family="text">
      <style:text-properties fo:font-weight="normal" officeooo:rsid="05180c96" style:font-weight-asian="normal" style:font-weight-complex="normal"/>
    </style:style>
    <style:style style:name="T706" style:family="text">
      <style:text-properties officeooo:rsid="03a32851"/>
    </style:style>
    <style:style style:name="T707" style:family="text">
      <style:text-properties officeooo:rsid="0620b99c"/>
    </style:style>
    <style:style style:name="T708" style:family="text">
      <style:text-properties fo:font-style="normal" style:font-style-asian="normal" style:font-style-complex="normal"/>
    </style:style>
    <style:style style:name="T709" style:family="text">
      <style:text-properties officeooo:rsid="06228fd6"/>
    </style:style>
    <style:style style:name="T710" style:family="text">
      <style:text-properties officeooo:rsid="0623b237"/>
    </style:style>
    <style:style style:name="T711" style:family="text">
      <style:text-properties officeooo:rsid="0625acc1"/>
    </style:style>
    <style:style style:name="T712" style:family="text">
      <style:text-properties fo:font-size="12pt" fo:font-weight="normal" officeooo:rsid="02a47326" style:font-size-asian="12pt" style:font-weight-asian="normal" style:font-size-complex="12pt" style:font-weight-complex="normal"/>
    </style:style>
    <style:style style:name="T713" style:family="text">
      <style:text-properties fo:font-size="12pt" fo:font-weight="normal" officeooo:rsid="062746c9" style:font-size-asian="12pt" style:font-weight-asian="normal" style:font-size-complex="12pt" style:font-weight-complex="normal"/>
    </style:style>
    <style:style style:name="T714" style:family="text">
      <style:text-properties style:font-name="Courier" fo:font-size="12pt" fo:font-weight="normal" officeooo:rsid="02a47326" style:font-size-asian="12pt" style:font-weight-asian="normal" style:font-size-complex="12pt" style:font-weight-complex="normal"/>
    </style:style>
    <style:style style:name="T715" style:family="text">
      <style:text-properties officeooo:rsid="051ab8f0"/>
    </style:style>
    <style:style style:name="T716" style:family="text">
      <style:text-properties officeooo:rsid="062746c9"/>
    </style:style>
    <style:style style:name="T717" style:family="text">
      <style:text-properties officeooo:rsid="02a5959b"/>
    </style:style>
    <style:style style:name="T718" style:family="text">
      <style:text-properties officeooo:rsid="065e8625"/>
    </style:style>
    <style:style style:name="T719" style:family="text">
      <style:text-properties officeooo:rsid="0518d1e2"/>
    </style:style>
    <style:style style:name="T720" style:family="text">
      <style:text-properties officeooo:rsid="06276e94"/>
    </style:style>
    <style:style style:name="T721" style:family="text">
      <style:text-properties fo:font-style="italic" officeooo:rsid="0518d1e2" style:font-style-asian="italic" style:font-style-complex="italic"/>
    </style:style>
    <style:style style:name="T722" style:family="text">
      <style:text-properties fo:font-size="12pt" fo:font-weight="normal" officeooo:rsid="06276e94" style:font-size-asian="12pt" style:font-weight-asian="normal" style:font-size-complex="12pt" style:font-weight-complex="normal"/>
    </style:style>
    <style:style style:name="T723" style:family="text">
      <style:text-properties fo:font-size="12pt" fo:font-weight="normal" officeooo:rsid="02a6209f" style:font-size-asian="12pt" style:font-weight-asian="normal" style:font-size-complex="12pt" style:font-weight-complex="normal"/>
    </style:style>
    <style:style style:name="T724" style:family="text">
      <style:text-properties style:font-name="Courier" fo:font-size="12pt" fo:font-weight="normal" officeooo:rsid="02a6209f" style:font-size-asian="12pt" style:font-weight-asian="normal" style:font-size-complex="12pt" style:font-weight-complex="normal"/>
    </style:style>
    <style:style style:name="T725" style:family="text">
      <style:text-properties officeooo:rsid="02a74e8e"/>
    </style:style>
    <style:style style:name="T726" style:family="text">
      <style:text-properties officeooo:rsid="02a8e7d9"/>
    </style:style>
    <style:style style:name="T727" style:family="text">
      <style:text-properties fo:font-size="12pt" fo:font-weight="normal" officeooo:rsid="0629618f" style:font-size-asian="12pt" style:font-weight-asian="normal" style:font-size-complex="12pt" style:font-weight-complex="normal"/>
    </style:style>
    <style:style style:name="T728" style:family="text">
      <style:text-properties fo:font-size="12pt" fo:font-weight="normal" officeooo:rsid="02b3f9b7" style:font-size-asian="12pt" style:font-weight-asian="normal" style:font-size-complex="12pt" style:font-weight-complex="normal"/>
    </style:style>
    <style:style style:name="T729" style:family="text">
      <style:text-properties fo:font-size="12pt" fo:font-style="italic" fo:font-weight="normal" officeooo:rsid="02b3f9b7" style:font-size-asian="12pt" style:font-style-asian="italic" style:font-weight-asian="normal" style:font-size-complex="12pt" style:font-style-complex="italic" style:font-weight-complex="normal"/>
    </style:style>
    <style:style style:name="T730" style:family="text">
      <style:text-properties officeooo:rsid="02b92fcb"/>
    </style:style>
    <style:style style:name="T731" style:family="text">
      <style:text-properties officeooo:rsid="062a0665"/>
    </style:style>
    <style:style style:name="T732" style:family="text">
      <style:text-properties fo:font-size="12pt" fo:font-weight="normal" officeooo:rsid="02bd9156" style:font-size-asian="12pt" style:font-weight-asian="normal" style:font-size-complex="12pt" style:font-weight-complex="normal"/>
    </style:style>
    <style:style style:name="T733" style:family="text">
      <style:text-properties fo:font-size="12pt" fo:font-style="italic" fo:font-weight="normal" officeooo:rsid="02bd9156" style:font-size-asian="12pt" style:font-style-asian="italic" style:font-weight-asian="normal" style:font-size-complex="12pt" style:font-style-complex="italic" style:font-weight-complex="normal"/>
    </style:style>
    <style:style style:name="T734" style:family="text">
      <style:text-properties fo:font-size="12pt" fo:font-weight="normal" officeooo:rsid="062a0665" style:font-size-asian="12pt" style:font-weight-asian="normal" style:font-size-complex="12pt" style:font-weight-complex="normal"/>
    </style:style>
    <style:style style:name="T735" style:family="text">
      <style:text-properties officeooo:rsid="02c2dde3"/>
    </style:style>
    <style:style style:name="T736" style:family="text">
      <style:text-properties fo:font-size="12pt" fo:font-weight="normal" officeooo:rsid="02bf24eb" style:font-size-asian="12pt" style:font-weight-asian="normal" style:font-size-complex="12pt" style:font-weight-complex="normal"/>
    </style:style>
    <style:style style:name="T737" style:family="text">
      <style:text-properties fo:font-size="12pt" fo:font-style="italic" fo:font-weight="normal" officeooo:rsid="02bf24eb" style:font-size-asian="12pt" style:font-style-asian="italic" style:font-weight-asian="normal" style:font-size-complex="12pt" style:font-style-complex="italic" style:font-weight-complex="normal"/>
    </style:style>
    <style:style style:name="T738" style:family="text">
      <style:text-properties officeooo:rsid="02c45158"/>
    </style:style>
    <style:style style:name="T739" style:family="text">
      <style:text-properties fo:font-size="12pt" fo:font-weight="normal" officeooo:rsid="02bfcbf1" style:font-size-asian="12pt" style:font-weight-asian="normal" style:font-size-complex="12pt" style:font-weight-complex="normal"/>
    </style:style>
    <style:style style:name="T740" style:family="text">
      <style:text-properties fo:font-size="12pt" fo:font-style="italic" fo:font-weight="normal" officeooo:rsid="02bfcbf1" style:font-size-asian="12pt" style:font-style-asian="italic" style:font-weight-asian="normal" style:font-size-complex="12pt" style:font-style-complex="italic" style:font-weight-complex="normal"/>
    </style:style>
    <style:style style:name="T741" style:family="text">
      <style:text-properties officeooo:rsid="02ca6c6c"/>
    </style:style>
    <style:style style:name="T742" style:family="text">
      <style:text-properties fo:font-size="12pt" fo:font-weight="normal" officeooo:rsid="051cb5c5" style:font-size-asian="12pt" style:font-weight-asian="normal" style:font-size-complex="12pt" style:font-weight-complex="normal"/>
    </style:style>
    <style:style style:name="T743" style:family="text">
      <style:text-properties fo:font-size="12pt" fo:font-weight="normal" officeooo:rsid="02d2b4b1" style:font-size-asian="12pt" style:font-weight-asian="normal" style:font-size-complex="12pt" style:font-weight-complex="normal"/>
    </style:style>
    <style:style style:name="T744" style:family="text">
      <style:text-properties style:font-name="Courier" fo:font-size="12pt" fo:font-weight="normal" officeooo:rsid="02c1e999" style:font-size-asian="12pt" style:font-weight-asian="normal" style:font-size-complex="12pt" style:font-weight-complex="normal"/>
    </style:style>
    <style:style style:name="T745" style:family="text">
      <style:text-properties officeooo:rsid="051d9463"/>
    </style:style>
    <style:style style:name="T746" style:family="text">
      <style:text-properties fo:font-size="12pt" fo:font-weight="normal" officeooo:rsid="062c3aa8" style:font-size-asian="12pt" style:font-weight-asian="normal" style:font-size-complex="12pt" style:font-weight-complex="normal"/>
    </style:style>
    <style:style style:name="T747" style:family="text">
      <style:text-properties fo:font-size="12pt" fo:font-weight="normal" officeooo:rsid="063457b6" style:font-size-asian="12pt" style:font-weight-asian="normal" style:font-size-complex="12pt" style:font-weight-complex="normal"/>
    </style:style>
    <style:style style:name="T748" style:family="text">
      <style:text-properties fo:font-size="12pt" fo:font-style="italic" fo:font-weight="normal" officeooo:rsid="051cb5c5" style:font-size-asian="12pt" style:font-style-asian="italic" style:font-weight-asian="normal" style:font-size-complex="12pt" style:font-style-complex="italic" style:font-weight-complex="normal"/>
    </style:style>
    <style:style style:name="T749" style:family="text">
      <style:text-properties fo:font-size="12pt" fo:font-weight="normal" officeooo:rsid="02cd6ae1" style:font-size-asian="12pt" style:font-weight-asian="normal" style:font-size-complex="12pt" style:font-weight-complex="normal"/>
    </style:style>
    <style:style style:name="T750" style:family="text">
      <style:text-properties fo:font-size="12pt" fo:font-weight="normal" officeooo:rsid="051d9463" style:font-size-asian="12pt" style:font-weight-asian="normal" style:font-size-complex="12pt" style:font-weight-complex="normal"/>
    </style:style>
    <style:style style:name="T751" style:family="text">
      <style:text-properties fo:font-size="12pt" fo:font-weight="normal" officeooo:rsid="02ce70a5" style:font-size-asian="12pt" style:font-weight-asian="normal" style:font-size-complex="12pt" style:font-weight-complex="normal"/>
    </style:style>
    <style:style style:name="T752" style:family="text">
      <style:text-properties style:font-name="Courier" fo:font-size="12pt" officeooo:rsid="02d8a4bf" style:font-size-asian="12pt" style:font-size-complex="12pt"/>
    </style:style>
    <style:style style:name="T753" style:family="text">
      <style:text-properties fo:font-size="12pt" fo:font-weight="normal" officeooo:rsid="02d28bc5" style:font-size-asian="12pt" style:font-weight-asian="normal" style:font-size-complex="12pt" style:font-weight-complex="normal"/>
    </style:style>
    <style:style style:name="T754" style:family="text">
      <style:text-properties officeooo:rsid="02d172bd"/>
    </style:style>
    <style:style style:name="T755" style:family="text">
      <style:text-properties fo:font-size="12pt" fo:font-weight="normal" officeooo:rsid="04524606" style:font-size-asian="12pt" style:font-weight-asian="normal" style:font-size-complex="12pt" style:font-weight-complex="normal"/>
    </style:style>
    <style:style style:name="T756" style:family="text">
      <style:text-properties fo:font-size="12pt" fo:font-weight="normal" officeooo:rsid="062dfcf5" style:font-size-asian="12pt" style:font-weight-asian="normal" style:font-size-complex="12pt" style:font-weight-complex="normal"/>
    </style:style>
    <style:style style:name="T757" style:family="text">
      <style:text-properties fo:font-size="12pt" fo:font-weight="normal" officeooo:rsid="02d8b689" style:font-size-asian="12pt" style:font-weight-asian="normal" style:font-size-complex="12pt" style:font-weight-complex="normal"/>
    </style:style>
    <style:style style:name="T758" style:family="text">
      <style:text-properties fo:font-size="12pt" fo:font-weight="normal" officeooo:rsid="062fa41d" style:font-size-asian="12pt" style:font-weight-asian="normal" style:font-size-complex="12pt" style:font-weight-complex="normal"/>
    </style:style>
    <style:style style:name="T759" style:family="text">
      <style:text-properties fo:font-size="12pt" fo:font-style="italic" fo:font-weight="normal" officeooo:rsid="02d8b689" style:font-size-asian="12pt" style:font-style-asian="italic" style:font-weight-asian="normal" style:font-size-complex="12pt" style:font-style-complex="italic" style:font-weight-complex="normal"/>
    </style:style>
    <style:style style:name="T760" style:family="text">
      <style:text-properties officeooo:rsid="051f9011"/>
    </style:style>
    <style:style style:name="T761" style:family="text">
      <style:text-properties style:font-name="Courier" officeooo:rsid="02fa4fbe"/>
    </style:style>
    <style:style style:name="T762" style:family="text">
      <style:text-properties officeooo:rsid="062fea7a"/>
    </style:style>
    <style:style style:name="T763" style:family="text">
      <style:text-properties style:font-name="Courier" fo:font-size="10pt" officeooo:rsid="03025f5b" style:font-size-asian="10pt" style:font-size-complex="10pt"/>
    </style:style>
    <style:style style:name="T764" style:family="text">
      <style:text-properties fo:font-style="italic" officeooo:rsid="051f9011" style:font-style-asian="italic" style:font-style-complex="italic"/>
    </style:style>
    <style:style style:name="T765" style:family="text">
      <style:text-properties fo:font-style="italic" officeooo:rsid="030172cc" style:font-style-asian="italic" style:font-style-complex="italic"/>
    </style:style>
    <style:style style:name="T766" style:family="text">
      <style:text-properties officeooo:rsid="0630111d"/>
    </style:style>
    <style:style style:name="T767" style:family="text">
      <style:text-properties officeooo:rsid="0527912e"/>
    </style:style>
    <style:style style:name="T768" style:family="text">
      <style:text-properties fo:font-weight="bold" officeooo:rsid="05df3abc" style:font-weight-asian="bold" style:font-weight-complex="bold"/>
    </style:style>
    <style:style style:name="T769" style:family="text">
      <style:text-properties fo:font-weight="normal" officeooo:rsid="044c52d9" style:font-weight-asian="normal" style:font-weight-complex="normal"/>
    </style:style>
    <style:style style:name="T770" style:family="text">
      <style:text-properties style:font-name="Courier" fo:font-weight="normal" officeooo:rsid="0236e767" style:font-weight-asian="normal" style:font-weight-complex="normal"/>
    </style:style>
    <style:style style:name="T771" style:family="text">
      <style:text-properties fo:font-size="12pt" fo:font-weight="bold" officeooo:rsid="05df3abc" style:font-size-asian="12pt" style:font-weight-asian="bold" style:font-size-complex="12pt" style:font-weight-complex="bold"/>
    </style:style>
    <style:style style:name="T772" style:family="text">
      <style:text-properties fo:font-size="12pt" fo:font-weight="bold" officeooo:rsid="05da50e4" style:font-size-asian="12pt" style:font-weight-asian="bold" style:font-size-complex="12pt" style:font-weight-complex="bold"/>
    </style:style>
    <style:style style:name="T773" style:family="text">
      <style:text-properties fo:font-size="12pt" officeooo:rsid="044c52d9" style:font-size-asian="12pt" style:font-size-complex="12pt"/>
    </style:style>
    <style:style style:name="T774" style:family="text">
      <style:text-properties style:font-name="Courier" fo:font-size="12pt" officeooo:rsid="000df035" style:font-size-asian="12pt" style:font-size-complex="12pt"/>
    </style:style>
    <style:style style:name="T775" style:family="text">
      <style:text-properties fo:font-size="12pt" officeooo:rsid="0527912e" style:font-size-asian="12pt" style:font-size-complex="12pt"/>
    </style:style>
    <style:style style:name="T776" style:family="text">
      <style:text-properties style:font-name="Courier" fo:font-size="12pt" officeooo:rsid="0527912e" style:font-size-asian="12pt" style:font-size-complex="12pt"/>
    </style:style>
    <style:style style:name="T777" style:family="text">
      <style:text-properties fo:font-size="12pt" fo:font-weight="bold" officeooo:rsid="05df5f67" style:font-size-asian="12pt" style:font-weight-asian="bold" style:font-size-complex="12pt" style:font-weight-complex="bold"/>
    </style:style>
    <style:style style:name="T778" style:family="text">
      <style:text-properties fo:font-size="12pt" fo:font-weight="bold" officeooo:rsid="06609515" style:font-size-asian="12pt" style:font-weight-asian="bold" style:font-size-complex="12pt" style:font-weight-complex="bold"/>
    </style:style>
    <style:style style:name="T779" style:family="text">
      <style:text-properties fo:font-size="12pt" fo:font-weight="bold" officeooo:rsid="000df035" style:font-size-asian="12pt" style:font-weight-asian="bold" style:font-size-complex="12pt" style:font-weight-complex="bold"/>
    </style:style>
    <style:style style:name="T780" style:family="text">
      <style:text-properties fo:font-size="12pt" fo:font-weight="normal" officeooo:rsid="000df035" style:font-size-asian="12pt" style:font-weight-asian="normal" style:font-size-complex="12pt" style:font-weight-complex="normal"/>
    </style:style>
    <style:style style:name="T781" style:family="text">
      <style:text-properties style:font-name="Courier" fo:font-size="12pt" fo:font-weight="normal" officeooo:rsid="000f2c87" style:font-size-asian="12pt" style:font-weight-asian="normal" style:font-size-complex="12pt" style:font-weight-complex="normal"/>
    </style:style>
    <style:style style:name="T782" style:family="text">
      <style:text-properties fo:font-size="12pt" fo:font-weight="normal" officeooo:rsid="0527912e" style:font-size-asian="12pt" style:font-weight-asian="normal" style:font-size-complex="12pt" style:font-weight-complex="normal"/>
    </style:style>
    <style:style style:name="T783" style:family="text">
      <style:text-properties fo:font-weight="bold" officeooo:rsid="05da50e4" style:font-weight-asian="bold" style:font-weight-complex="bold"/>
    </style:style>
    <style:style style:name="T784" style:family="text">
      <style:text-properties officeooo:rsid="0525cc8d"/>
    </style:style>
    <style:style style:name="T785" style:family="text">
      <style:text-properties fo:font-weight="bold" officeooo:rsid="002860cd" style:font-weight-asian="bold" style:font-weight-complex="bold"/>
    </style:style>
    <style:style style:name="T786" style:family="text">
      <style:text-properties fo:font-size="13pt" fo:font-weight="normal" officeooo:rsid="0495abbf" style:font-size-asian="13pt" style:font-weight-asian="normal" style:font-size-complex="13pt" style:font-weight-complex="normal"/>
    </style:style>
    <style:style style:name="T787" style:family="text">
      <style:text-properties fo:font-size="13pt" fo:font-weight="bold" officeooo:rsid="0495abbf" style:font-size-asian="13pt" style:font-weight-asian="bold" style:font-size-complex="13pt" style:font-weight-complex="bold"/>
    </style:style>
    <style:style style:name="T788" style:family="text">
      <style:text-properties style:font-name="Courier" fo:font-size="13pt" fo:font-weight="normal" officeooo:rsid="012487c5" style:font-size-asian="13pt" style:font-weight-asian="normal" style:font-size-complex="13pt" style:font-weight-complex="normal"/>
    </style:style>
    <style:style style:name="T789" style:family="text">
      <style:text-properties style:font-name="Liberation Serif" fo:font-size="12pt" fo:font-weight="bold" officeooo:rsid="05da50e4" style:font-size-asian="12pt" style:font-weight-asian="bold" style:font-size-complex="12pt" style:font-weight-complex="bold"/>
    </style:style>
    <style:style style:name="T790" style:family="text">
      <style:text-properties style:font-name="Liberation Serif" fo:font-size="12pt" fo:font-weight="bold" officeooo:rsid="002860cd" style:font-size-asian="12pt" style:font-weight-asian="bold" style:font-size-complex="12pt" style:font-weight-complex="bold"/>
    </style:style>
    <style:style style:name="T791" style:family="text">
      <style:text-properties style:font-name="Liberation Serif" fo:font-size="12pt" fo:font-weight="bold" officeooo:rsid="012487c5" style:font-size-asian="12pt" style:font-weight-asian="bold" style:font-size-complex="12pt" style:font-weight-complex="bold"/>
    </style:style>
    <style:style style:name="T792" style:family="text">
      <style:text-properties style:font-name="Liberation Serif" fo:font-size="12pt" fo:font-weight="normal" officeooo:rsid="012487c5" style:font-size-asian="12pt" style:font-weight-asian="normal" style:font-size-complex="12pt" style:font-weight-complex="normal"/>
    </style:style>
    <style:style style:name="T793" style:family="text">
      <style:text-properties fo:font-weight="bold" officeooo:rsid="0028db55" style:font-weight-asian="bold" style:font-weight-complex="bold"/>
    </style:style>
    <style:style style:name="T794" style:family="text">
      <style:text-properties officeooo:rsid="2a9a814b"/>
    </style:style>
    <style:style style:name="T795" style:family="text">
      <style:text-properties officeooo:rsid="001699e7"/>
    </style:style>
    <style:style style:name="T796" style:family="text">
      <style:text-properties officeooo:rsid="0024b26e"/>
    </style:style>
    <style:style style:name="T797" style:family="text">
      <style:text-properties officeooo:rsid="00269e32"/>
    </style:style>
    <style:style style:name="T798" style:family="text">
      <style:text-properties officeooo:rsid="0026d97f"/>
    </style:style>
    <style:style style:name="T799" style:family="text">
      <style:text-properties officeooo:rsid="00079c1f"/>
    </style:style>
    <style:style style:name="T800" style:family="text">
      <style:text-properties officeooo:rsid="0027af39"/>
    </style:style>
    <style:style style:name="T801" style:family="text">
      <style:text-properties officeooo:rsid="003cd185"/>
    </style:style>
    <style:style style:name="T802" style:family="text">
      <style:text-properties officeooo:rsid="002a474c"/>
    </style:style>
    <style:style style:name="T803" style:family="text">
      <style:text-properties officeooo:rsid="052d2003"/>
    </style:style>
    <style:style style:name="T804" style:family="text">
      <style:text-properties officeooo:rsid="002277f8"/>
    </style:style>
    <style:style style:name="T805" style:family="text">
      <style:text-properties officeooo:rsid="052a33d6"/>
    </style:style>
    <style:style style:name="T806" style:family="text">
      <style:text-properties officeooo:rsid="00240c35"/>
    </style:style>
    <style:style style:name="T807" style:family="text">
      <style:text-properties officeooo:rsid="002b02f8"/>
    </style:style>
    <style:style style:name="T808" style:family="text">
      <style:text-properties officeooo:rsid="0029d5a1"/>
    </style:style>
    <style:style style:name="T809" style:family="text">
      <style:text-properties officeooo:rsid="00b7f752"/>
    </style:style>
    <style:style style:name="T810" style:family="text">
      <style:text-properties officeooo:rsid="00baa2c3"/>
    </style:style>
    <style:style style:name="T811" style:family="text">
      <style:text-properties officeooo:rsid="00b8dd9d"/>
    </style:style>
    <style:style style:name="T812" style:family="text">
      <style:text-properties officeooo:rsid="04d6b779"/>
    </style:style>
    <style:style style:name="T813" style:family="text">
      <style:text-properties fo:font-size="11pt" fo:font-style="normal" style:font-size-asian="11pt" style:font-style-asian="normal" style:font-size-complex="11pt" style:font-style-complex="normal"/>
    </style:style>
    <style:style style:name="T814" style:family="text">
      <style:text-properties fo:font-size="14pt" fo:font-weight="bold" officeooo:rsid="06656c02" style:font-size-asian="14pt" style:font-weight-asian="bold" style:font-size-complex="14pt" style:font-weight-complex="bold"/>
    </style:style>
    <style:style style:name="T815" style:family="text">
      <style:text-properties fo:font-size="14pt" fo:font-weight="bold" officeooo:rsid="001858fe" style:font-size-asian="14pt" style:font-weight-asian="bold" style:font-size-complex="14pt" style:font-weight-complex="bold"/>
    </style:style>
    <style:style style:name="T816" style:family="text">
      <style:text-properties officeooo:rsid="001bb40f"/>
    </style:style>
    <style:style style:name="T817" style:family="text">
      <style:text-properties fo:color="#000000" loext:opacity="100%" fo:font-size="11pt" fo:font-style="normal" fo:font-weight="normal" officeooo:rsid="04e6de64" style:font-size-asian="11pt" style:font-style-asian="normal" style:font-weight-asian="normal" style:font-size-complex="11pt" style:font-style-complex="normal" style:font-weight-complex="normal"/>
    </style:style>
    <style:style style:name="T818" style:family="text">
      <style:text-properties fo:color="#000000" loext:opacity="100%" fo:font-size="11pt" fo:font-style="normal" fo:font-weight="normal" officeooo:rsid="06a771fb" style:font-size-asian="11pt" style:font-style-asian="normal" style:font-weight-asian="normal" style:font-size-complex="11pt" style:font-style-complex="normal" style:font-weight-complex="normal"/>
    </style:style>
    <style:style style:name="T819" style:family="text">
      <style:text-properties fo:color="#000080" loext:opacity="100%" fo:font-size="11pt" fo:language="zxx" fo:country="none" fo:font-style="normal" style:text-underline-style="solid" style:text-underline-width="auto" style:text-underline-color="font-color" fo:font-weight="normal" officeooo:rsid="07ca9b6f"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820" style:family="text">
      <style:text-properties fo:color="#000000" loext:opacity="100%" fo:font-style="normal" fo:font-weight="normal" officeooo:rsid="06a771fb" style:font-style-asian="normal" style:font-weight-asian="normal" style:font-style-complex="normal" style:font-weight-complex="normal"/>
    </style:style>
    <style:style style:name="T821" style:family="text">
      <style:text-properties fo:color="#000000" loext:opacity="100%" fo:font-style="italic" fo:font-weight="normal" officeooo:rsid="06a771fb" style:font-style-asian="italic" style:font-weight-asian="normal" style:font-style-complex="italic" style:font-weight-complex="normal"/>
    </style:style>
    <style:style style:name="T822" style:family="text">
      <style:text-properties fo:color="#000080" loext:opacity="100%" fo:language="zxx" fo:country="none" fo:font-style="normal" style:text-underline-style="solid" style:text-underline-width="auto" style:text-underline-color="font-color" fo:font-weight="normal" officeooo:rsid="07ca9b6f" style:language-asian="zxx" style:country-asian="none" style:font-style-asian="normal" style:font-weight-asian="normal" style:language-complex="zxx" style:country-complex="none" style:font-style-complex="normal" style:font-weight-complex="normal"/>
    </style:style>
    <style:style style:name="T823" style:family="text">
      <style:text-properties fo:font-variant="normal" fo:text-transform="none" fo:color="#000000" loext:opacity="100%" style:font-name="Times New Roman" fo:font-size="11pt" fo:letter-spacing="normal" style:font-size-asian="11pt" style:font-size-complex="11pt"/>
    </style:style>
    <style:style style:name="T824" style:family="text">
      <style:text-properties fo:font-variant="normal" fo:text-transform="none" fo:color="#000080" loext:opacity="100%" style:font-name="Times New Roman" fo:font-size="11pt" fo:letter-spacing="normal" style:font-size-asian="11pt" style:font-size-complex="11pt"/>
    </style:style>
    <style:style style:name="T825" style:family="text">
      <style:text-properties fo:font-variant="normal" fo:text-transform="none" fo:color="#000080" loext:opacity="100%" style:font-name="Times New Roman" fo:font-size="11pt" fo:letter-spacing="normal" officeooo:rsid="00427b9a" style:font-size-asian="11pt" style:font-size-complex="11pt"/>
    </style:style>
    <style:style style:name="T826" style:family="text">
      <style:text-properties fo:font-variant="normal" fo:text-transform="none" fo:color="#000000" loext:opacity="100%" style:font-name="Times New Roman" fo:font-size="11pt" fo:letter-spacing="normal" fo:font-style="normal" fo:font-weight="normal" officeooo:rsid="001bb40f" style:font-size-asian="11pt" style:font-style-asian="normal" style:font-weight-asian="normal" style:font-size-complex="11pt" style:font-style-complex="normal" style:font-weight-complex="normal"/>
    </style:style>
    <style:style style:name="T827" style:family="text">
      <style:text-properties fo:font-variant="normal" fo:text-transform="none" fo:color="#000080" loext:opacity="100%" style:font-name="Times New Roman" fo:font-size="11pt" fo:letter-spacing="normal" fo:font-style="normal" fo:font-weight="normal" officeooo:rsid="00427b9a" style:font-size-asian="11pt" style:font-style-asian="normal" style:font-weight-asian="normal" style:font-size-complex="11pt" style:font-style-complex="normal" style:font-weight-complex="normal"/>
    </style:style>
    <style:style style:name="T828" style:family="text">
      <style:text-properties fo:font-size="11pt" fo:font-style="normal" officeooo:rsid="07a9cc64" style:font-size-asian="11pt" style:font-style-asian="normal" style:font-size-complex="11pt" style:font-style-complex="normal"/>
    </style:style>
    <style:style style:name="T829" style:family="text">
      <style:text-properties fo:color="#000080" loext:opacity="100%" fo:font-size="11pt" fo:language="zxx" fo:country="none" fo:font-style="normal" style:text-underline-style="solid" style:text-underline-width="auto" style:text-underline-color="font-color" officeooo:rsid="07ca9b6f" style:font-size-asian="11pt" style:language-asian="zxx" style:country-asian="none" style:font-style-asian="normal" style:font-size-complex="11pt" style:language-complex="zxx" style:country-complex="none" style:font-style-complex="normal"/>
    </style:style>
    <style:style style:name="T830" style:family="text">
      <style:text-properties fo:color="#000000" loext:opacity="100%" fo:font-size="11pt" officeooo:rsid="04e6de64" style:font-size-asian="11pt" style:font-size-complex="11pt"/>
    </style:style>
    <style:style style:name="T831" style:family="text">
      <style:text-properties fo:color="#000000" loext:opacity="100%" fo:font-size="11pt" fo:font-style="italic" officeooo:rsid="04e6de64" style:font-size-asian="11pt" style:font-style-asian="italic" style:font-size-complex="11pt" style:font-style-complex="italic"/>
    </style:style>
    <style:style style:name="T832" style:family="text">
      <style:text-properties fo:font-size="11pt" style:font-size-asian="11pt" style:font-size-complex="11pt"/>
    </style:style>
    <style:style style:name="T833" style:family="text">
      <style:text-properties fo:color="#111111" loext:opacity="100%" fo:font-style="normal" fo:font-weight="normal" officeooo:rsid="069bf9d9" style:font-style-asian="normal" style:font-weight-asian="normal" style:font-style-complex="normal" style:font-weight-complex="normal"/>
    </style:style>
    <style:style style:name="T834" style:family="text">
      <style:text-properties fo:color="#111111" loext:opacity="100%" fo:font-style="italic" fo:font-weight="normal" officeooo:rsid="069bf9d9" style:font-style-asian="italic" style:font-weight-asian="normal" style:font-style-complex="italic" style:font-weight-complex="normal"/>
    </style:style>
    <style:style style:name="T835" style:family="text">
      <style:text-properties style:use-window-font-color="true" loext:opacity="0%" fo:font-size="11pt" fo:language="zxx" fo:country="none" fo:font-style="normal" style:text-underline-style="none" officeooo:rsid="052c39f3" style:font-size-asian="11pt" style:language-asian="zxx" style:country-asian="none" style:font-style-asian="normal" style:font-size-complex="11pt" style:language-complex="zxx" style:country-complex="none" style:font-style-complex="normal"/>
    </style:style>
    <style:style style:name="T836" style:family="text">
      <style:text-properties fo:font-size="11pt" fo:font-style="normal" officeooo:rsid="04e6de64" style:font-size-asian="11pt" style:font-style-asian="normal" style:font-size-complex="11pt" style:font-style-complex="normal"/>
    </style:style>
    <style:style style:name="T837" style:family="text">
      <style:text-properties style:use-window-font-color="true" loext:opacity="0%" fo:font-size="11pt" fo:font-style="normal" officeooo:rsid="04e6de64" style:font-size-asian="11pt" style:font-style-asian="normal" style:font-size-complex="11pt" style:font-style-complex="normal"/>
    </style:style>
    <style:style style:name="T838" style:family="text">
      <style:text-properties style:use-window-font-color="true" loext:opacity="0%" fo:font-size="11pt" officeooo:rsid="04e6de64" style:font-size-asian="11pt" style:font-size-complex="11pt"/>
    </style:style>
    <style:style style:name="T839" style:family="text">
      <style:text-properties fo:font-variant="normal" fo:text-transform="none"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840" style:family="text">
      <style:text-properties fo:color="#000000" loext:opacity="100%" fo:font-size="11pt" style:font-size-asian="11pt" style:font-size-complex="11pt"/>
    </style:style>
    <style:style style:name="T841" style:family="text">
      <style:text-properties fo:color="#000000" loext:opacity="100%" fo:font-size="11pt" officeooo:rsid="06a42392" style:font-size-asian="11pt" style:font-size-complex="11pt"/>
    </style:style>
    <style:style style:name="T842" style:family="text">
      <style:text-properties fo:color="#000000" loext:opacity="100%" fo:font-size="11pt" officeooo:rsid="06a60fac" style:font-size-asian="11pt" style:font-size-complex="11pt"/>
    </style:style>
    <style:style style:name="T843" style:family="text">
      <style:text-properties fo:color="#000000" loext:opacity="100%" fo:font-size="11pt" fo:font-style="italic" officeooo:rsid="06a42392" style:font-size-asian="11pt" style:font-style-asian="italic" style:font-size-complex="11pt" style:font-style-complex="italic"/>
    </style:style>
    <style:style style:name="T844" style:family="text">
      <style:text-properties fo:font-size="11pt" fo:font-style="normal" fo:font-weight="normal" officeooo:rsid="07ca9b6f" style:font-size-asian="11pt" style:font-style-asian="normal" style:font-weight-asian="normal" style:font-size-complex="11pt" style:font-style-complex="normal" style:font-weight-complex="normal"/>
    </style:style>
    <style:style style:name="T845" style:family="text">
      <style:text-properties style:use-window-font-color="true" loext:opacity="0%" fo:font-size="11pt" officeooo:rsid="001d40bf" style:font-size-asian="11pt" style:font-size-complex="11pt"/>
    </style:style>
    <style:style style:name="T846" style:family="text">
      <style:text-properties fo:color="#000080" loext:opacity="100%" fo:font-size="11pt" officeooo:rsid="001d40bf" style:font-size-asian="11pt" style:font-size-complex="11pt"/>
    </style:style>
    <style:style style:name="T847" style:family="text">
      <style:text-properties style:use-window-font-color="true" loext:opacity="0%" fo:font-size="11pt" fo:font-style="normal" fo:font-weight="normal" officeooo:rsid="04e6de64" style:font-size-asian="11pt" style:font-style-asian="normal" style:font-weight-asian="normal" style:font-size-complex="11pt" style:font-style-complex="normal" style:font-weight-complex="normal"/>
    </style:style>
    <style:style style:name="T848" style:family="text">
      <style:text-properties style:use-window-font-color="true" loext:opacity="0%" fo:font-size="11pt" fo:font-style="normal" fo:font-weight="normal" officeooo:rsid="05304cb8" style:font-size-asian="11pt" style:font-style-asian="normal" style:font-weight-asian="normal" style:font-size-complex="11pt" style:font-style-complex="normal" style:font-weight-complex="normal"/>
    </style:style>
    <style:style style:name="T849" style:family="text">
      <style:text-properties style:use-window-font-color="true" loext:opacity="0%" fo:font-size="11pt" fo:font-style="normal" fo:font-weight="bold" officeooo:rsid="05304cb8" style:font-size-asian="11pt" style:font-style-asian="normal" style:font-weight-asian="bold" style:font-size-complex="11pt" style:font-style-complex="normal" style:font-weight-complex="bold"/>
    </style:style>
    <style:style style:name="T850" style:family="text">
      <style:text-properties fo:color="#000080" loext:opacity="100%" fo:font-size="11pt" fo:language="zxx" fo:country="none" style:text-underline-style="solid" style:text-underline-width="auto" style:text-underline-color="font-color" officeooo:rsid="07ca9b6f" style:font-size-asian="11pt" style:language-asian="zxx" style:country-asian="none" style:font-size-complex="11pt" style:language-complex="zxx" style:country-complex="none"/>
    </style:style>
    <style:style style:name="T851" style:family="text">
      <style:text-properties fo:font-size="11pt" officeooo:rsid="0528bba3" style:font-size-asian="11pt" style:font-size-complex="11pt"/>
    </style:style>
    <style:style style:name="T852" style:family="text">
      <style:text-properties fo:font-variant="normal" fo:text-transform="none" style:font-name="Times New Roman" fo:font-size="11pt" fo:letter-spacing="normal" fo:font-style="normal" fo:font-weight="normal" officeooo:rsid="003798ab" style:font-size-asian="11pt" style:font-style-asian="normal" style:font-weight-asian="normal" style:font-size-complex="11pt" style:font-style-complex="normal" style:font-weight-complex="normal"/>
    </style:style>
    <style:style style:name="T853" style:family="text">
      <style:text-properties fo:font-size="11pt" fo:font-weight="normal" style:font-size-asian="11pt" style:font-weight-asian="normal" style:font-size-complex="11pt" style:font-weight-complex="normal"/>
    </style:style>
    <style:style style:name="T854" style:family="text">
      <style:text-properties fo:font-size="11pt" fo:font-weight="normal" officeooo:rsid="052aeabf" style:font-size-asian="11pt" style:font-weight-asian="normal" style:font-size-complex="11pt" style:font-weight-complex="normal"/>
    </style:style>
    <style:style style:name="T855" style:family="text">
      <style:text-properties style:use-window-font-color="true" loext:opacity="0%" fo:font-size="11pt" fo:font-weight="normal" officeooo:rsid="06a2ae7a" style:font-size-asian="11pt" style:font-weight-asian="normal" style:font-size-complex="11pt" style:font-weight-complex="normal"/>
    </style:style>
    <style:style style:name="T856" style:family="text">
      <style:text-properties fo:font-size="11pt" officeooo:rsid="00300a2e" style:font-size-asian="11pt" style:font-size-complex="11pt"/>
    </style:style>
    <style:style style:name="T857" style:family="text">
      <style:text-properties fo:font-size="11pt" officeooo:rsid="003b533f" style:font-size-asian="11pt" style:font-size-complex="11pt"/>
    </style:style>
    <style:style style:name="T858" style:family="text">
      <style:text-properties fo:font-size="11pt" officeooo:rsid="051369a7" style:font-size-asian="11pt" style:font-size-complex="11pt"/>
    </style:style>
    <style:style style:name="T859" style:family="text">
      <style:text-properties style:use-window-font-color="true" loext:opacity="0%" fo:font-size="11pt" fo:font-style="normal" fo:font-weight="normal" officeooo:rsid="052f2d5a" style:font-size-asian="11pt" style:font-style-asian="normal" style:font-weight-asian="normal" style:font-size-complex="11pt" style:font-style-complex="normal" style:font-weight-complex="normal"/>
    </style:style>
    <style:style style:name="T860" style:family="text">
      <style:text-properties style:use-window-font-color="true" loext:opacity="0%" fo:font-size="11pt" fo:font-style="normal" fo:font-weight="bold" officeooo:rsid="052f2d5a" style:font-size-asian="11pt" style:font-style-asian="normal" style:font-weight-asian="bold" style:font-size-complex="11pt" style:font-style-complex="normal" style:font-weight-complex="bold"/>
    </style:style>
    <style:style style:name="T861" style:family="text">
      <style:text-properties fo:font-size="11pt" officeooo:rsid="052aeabf" style:font-size-asian="11pt" style:font-size-complex="11pt"/>
    </style:style>
    <style:style style:name="T862" style:family="text">
      <style:text-properties style:use-window-font-color="true" loext:opacity="0%" fo:font-size="11pt" fo:font-style="normal" fo:font-weight="normal" officeooo:rsid="052f2fb4" style:font-size-asian="11pt" style:font-style-asian="normal" style:font-weight-asian="normal" style:font-size-complex="11pt" style:font-style-complex="normal" style:font-weight-complex="normal"/>
    </style:style>
    <style:style style:name="T863" style:family="text">
      <style:text-properties style:use-window-font-color="true" loext:opacity="0%" fo:font-size="11pt" fo:font-style="normal" fo:font-weight="bold" officeooo:rsid="052f2fb4" style:font-size-asian="11pt" style:font-style-asian="normal" style:font-weight-asian="bold" style:font-size-complex="11pt" style:font-style-complex="normal" style:font-weight-complex="bold"/>
    </style:style>
    <style:style style:name="T864" style:family="text">
      <style:text-properties fo:font-weight="normal" officeooo:rsid="071f942e" style:font-weight-asian="normal" style:font-weight-complex="normal"/>
    </style:style>
    <style:style style:name="T865" style:family="text">
      <style:text-properties fo:font-size="11pt" fo:font-style="normal" fo:font-weight="normal" officeooo:rsid="0032b4f6" style:font-size-asian="11pt" style:font-style-asian="normal" style:font-weight-asian="normal" style:font-size-complex="11pt" style:font-style-complex="normal" style:font-weight-complex="normal"/>
    </style:style>
    <style:style style:name="T866" style:family="text">
      <style:text-properties fo:font-size="11pt" fo:font-style="normal" fo:font-weight="normal" officeooo:rsid="052aeabf" style:font-size-asian="11pt" style:font-style-asian="normal" style:font-weight-asian="normal" style:font-size-complex="11pt" style:font-style-complex="normal" style:font-weight-complex="normal"/>
    </style:style>
    <style:style style:name="T867" style:family="text">
      <style:text-properties fo:font-size="11pt" fo:font-weight="normal" officeooo:rsid="0531dd55" style:font-size-asian="11pt" style:font-weight-asian="normal" style:font-size-complex="11pt" style:font-weight-complex="normal"/>
    </style:style>
    <style:style style:name="T868" style:family="text">
      <style:text-properties fo:font-size="11pt" fo:font-weight="normal" officeooo:rsid="053259e4" style:font-size-asian="11pt" style:font-weight-asian="normal" style:font-size-complex="11pt" style:font-weight-complex="normal"/>
    </style:style>
    <style:style style:name="T869" style:family="text">
      <style:text-properties fo:font-weight="normal" officeooo:rsid="001858fe" style:font-weight-asian="normal" style:font-weight-complex="normal"/>
    </style:style>
    <style:style style:name="T870" style:family="text">
      <style:text-properties fo:font-weight="normal" officeooo:rsid="052aeabf" style:font-weight-asian="normal" style:font-weight-complex="normal"/>
    </style:style>
    <style:style style:name="T871" style:family="text">
      <style:text-properties fo:font-size="11pt" fo:font-style="normal" fo:font-weight="normal" officeooo:rsid="001858fe" style:font-size-asian="11pt" style:font-style-asian="normal" style:font-weight-asian="normal" style:font-size-complex="11pt" style:font-style-complex="normal" style:font-weight-complex="normal"/>
    </style:style>
    <style:style style:name="T872" style:family="text">
      <style:text-properties fo:font-size="11pt" fo:font-style="normal" fo:font-weight="normal" officeooo:rsid="310ab0c1" style:font-size-asian="11pt" style:font-style-asian="normal" style:font-weight-asian="normal" style:font-size-complex="11pt" style:font-style-complex="normal" style:font-weight-complex="normal"/>
    </style:style>
    <style:style style:name="T873" style:family="text">
      <style:text-properties fo:color="#000080" loext:opacity="100%" fo:font-size="11pt" fo:font-style="normal" style:text-underline-style="solid" style:text-underline-width="auto" style:text-underline-color="font-color" fo:font-weight="normal" officeooo:rsid="00667026" style:font-size-asian="11pt" style:font-style-asian="normal" style:font-weight-asian="normal" style:font-size-complex="11pt" style:font-style-complex="normal" style:font-weight-complex="normal"/>
    </style:style>
    <style:style style:name="T874" style:family="text">
      <style:text-properties fo:font-style="normal" officeooo:rsid="310ab0c1"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4866in" fo:min-width="1.300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2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52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2"/>
      <text:p text:style-name="P3">Advanced Programming in the Linux Environment</text:p>
      <text:p text:style-name="P4"/>
      <text:p text:style-name="P4"><text:span text:style-name="T1">Volume</text:span> <text:span text:style-name="T2">0</text:span></text:p>
      <text:p text:style-name="P5"/>
      <text:p text:style-name="P6">Tools</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Marco Bruno</text:p>
      <text:p text:style-name="P7"><text:soft-page-break/></text:p>
      <text:p text:style-name="P7"/>
      <text:p text:style-name="P7"/>
      <text:p text:style-name="P7"/>
      <text:p text:style-name="P7"/>
      <text:p text:style-name="P7"/>
      <text:p text:style-name="P7"><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ext:span text:style-name="T3">A</text:span><text:span text:style-name="T4">bout the author</text:span></text:p>
      <text:p text:style-name="P10"/>
      <text:p text:style-name="P11">Marco Bruno</text:p>
      <text:p text:style-name="P12">Marco Bruno is a software developer and educator with over twenty years of experience in information technology and professional training. He began his career as a system administrator, working extensively with UNIX and Linux systems, where he developed strong expertise in system-level operations.</text:p>
      <text:p text:style-name="P12"/>
      <text:p text:style-name="P12">Over time, he specialized in C programming on Linux, focusing on system programming and low-level software development. He has taught these subjects through private courses and technical training programs, combining practical experience with a clear and methodical teaching approach.</text:p>
      <text:p text:style-name="P12">He has also gained significant international working experience, collaborating with companies and professionals across different countries and technical environments. This exposure has contributed to a broad and adaptable perspective on software development practices and system architectures.</text:p>
      <text:p text:style-name="P12"/>
      <text:p text:style-name="P12">Throughout his career, Mr. Bruno has developed software for a wide range of companies, working across multiple domains, including system software, user applications, network programming, and web development. His experience spans several widely used programming languages, including C, Python, and Java.</text:p>
      <text:p text:style-name="P12">He combines extensive industry experience with a strong ability to both develop complex software systems and effectively teach their underlying principles.</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text:span text:style-name="Strong_20_Emphasis"><text:span text:style-name="T5">Preface </text:span></text:span></text:p>
      <text:p text:style-name="P12"/>
      <text:p text:style-name="P12">This book was created with the goal of bringing order to the Linux manual pages and providing a structured learning path for system programming on Linux.</text:p>
      <text:p text:style-name="P12">Linux documentation is vast but often fragmented, and does not follow a clear pedagogical sequence. In addition, many existing books either omit important topics or do not explore them in sufficient depth. <text:span text:style-name="Emphasis">Advanced Programming in the Linux Environment</text:span> was written to address this gap by organizing system programming concepts in a logical, progressive order.</text:p>
      <text:p text:style-name="P12">The aim of this book is to transform the material found in the Linux manual pages into a coherent and guided learning experience. Topics are introduced in a structured, step-by-step manner, following a natural progression from fundamental concepts to more advanced features of the Linux programming environment.</text:p>
      <text:p text:style-name="P12">A new stylistic convention is introduced throughout this book: function names are written without parentheses, and header file names are written without angle brackets. This choice is intended to improve readability and keep the focus on concepts rather than syntax.</text:p>
      <text:p text:style-name="P12">The development environment used throughout this book is Kali Linux. This choice was made due to the simplicity of installing tools and libraries through the <text:span text:style-name="Source_20_Text">apt</text:span> package manager, as well as the advantages provided by a Debian-based system during development and experimentation.</text:p>
      <text:p text:style-name="P12">Each topic is covered in depth with multiple practical examples, and all code is carefully commented to ensure clarity. The standard structure followed in each section is: explanation of the API, code example, analysis of the code, execution, notes on execution behavior, and further insights.</text:p>
      <text:p text:style-name="P12">Special attention is given to depth and completeness. Rather than providing superficial coverage, this book explores the behavior, design, and practical use of Linux system interfaces in detail, helping readers develop a thorough understanding of how Linux systems operate.</text:p>
      <text:p text:style-name="P12">The result is a comprehensive text that serves both as a learning guide and as a practical reference, designed to support readers in mastering the complexities of Linux system programming.</text:p>
      <text:p text:style-name="P15"><text:span text:style-name="Strong_20_Emphasis"><text:span text:style-name="T6"/></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pan text:style-name="Strong_20_Emphasis"><text:span text:style-name="T5"/></text:span></text:p>
      <text:p text:style-name="P14"><text:soft-page-break/><text:span text:style-name="Strong_20_Emphasis"><text:span text:style-name="T5">Volume</text:span></text:span><text:span text:style-name="Strong_20_Emphasis"><text:span text:style-name="T7"> </text:span></text:span><text:span text:style-name="Strong_20_Emphasis"><text:span text:style-name="T8">0</text:span></text:span><text:span text:style-name="Strong_20_Emphasis"><text:span text:style-name="T7"> — </text:span></text:span><text:span text:style-name="Strong_20_Emphasis"><text:span text:style-name="T8">Tools</text:span></text:span></text:p>
      <text:p text:style-name="P14"><text:span text:style-name="Strong_20_Emphasis"><text:span text:style-name="T9"/></text:span></text:p>
      <text:p text:style-name="P12">This introductory chapter presents the essential tools commonly used for software development in a Linux environment, along with an overview of the standards that define software behavior and portability. It is intended to provide readers with the necessary background for the topics covered in the rest of the book; those already familiar with these concepts may choose to skip it.</text:p>
      <text:p text:style-name="P12"/>
      <text:p text:style-name="P12">The chapter covers the compilation process and the use of key development tools such as <text:span text:style-name="Emphasis">gcc</text:span>, <text:span text:style-name="Emphasis">make</text:span>, and <text:span text:style-name="Emphasis">autoconf</text:span>, as well as debugging with <text:span text:style-name="Emphasis">gdb</text:span>. It also introduces the source code and how it can be obtained and organized in a Linux system. In addition, it outlines the most widely used software standards at a high level and includes a simple introduction to the GNU General Public License (GPL) and its role in software development and distribution.</text:p>
      <text:p text:style-name="P12"/>
      <text:p text:style-name="P16"/>
      <text:p text:style-name="P17"/>
      <text:p text:style-name="P17"/>
      <text:p text:style-name="P18"/>
      <text:p text:style-name="P19"/>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Convention used in the book</text:p>
      <text:p text:style-name="P23"/>
      <text:p text:style-name="P12"><text:span text:style-name="T10">In the text, function names are written without parentheses </text:span><text:span text:style-name="Source_20_Text"><text:span text:style-name="T11">()</text:span></text:span><text:span text:style-name="T10">. Although this may initially seem unusual in the UNIX and Linux environment, the author intentionally adopted this convention for several reasons. One of the main motivations is to help the reader become familiar with recognizing system calls and library functions immediately by name, an important skill when studying Linux system programming.</text:span></text:p>
      <text:p text:style-name="P12"><text:span text:style-name="T10">Another stylistic choice differs from the common notation typically used in manuals and documentation. Instead of using angle brackets in paths such as </text:span><text:span text:style-name="Source_20_Text"><text:span text:style-name="T11">/proc/&lt;pid&gt;/fd</text:span></text:span><text:span text:style-name="T10">, the text uses the form </text:span><text:span text:style-name="Source_20_Text"><text:span text:style-name="T11">/proc/</text:span></text:span><text:span text:style-name="Source_20_Text"><text:span text:style-name="T12">pid</text:span></text:span><text:span text:style-name="Source_20_Text"><text:span text:style-name="T11">/fd</text:span></text:span><text:span text:style-name="T10">, where </text:span><text:span text:style-name="Source_20_Text"><text:span text:style-name="T12">pid</text:span></text:span><text:span text:style-name="T10"> is written in italics to indicate a variable component of the path. This notation was chosen to improve readability and maintain consistency throughout the text.</text:span></text:p>
      <text:p text:style-name="P24"/>
      <text:p text:style-name="P24">For each system call and library function discussed in the text, a footnote is included containing a reference to the corresponding manual page. This allows the reader to quickly access the official documentation and explore additional details, usage information, return values, error conditions, and related functions.</text:p>
      <text:p text:style-name="P23"/>
      <text:p text:style-name="P25"><text:span text:style-name="T13">W</text:span>e will use the following format for the code, the function prototypes and the execution of <text:span text:style-name="T14">programs</text:span>.</text:p>
      <text:p text:style-name="P25"/>
      <text:p text:style-name="P26">Code</text:p>
      <text:p text:style-name="P27"/>
      <text:p text:style-name="P28">The <text:span text:style-name="T15">hello.c</text:span> program prints a string on the console.</text:p>
      <text:p text:style-name="P29"/>
      <text:p text:style-name="P30"><text:span text:style-name="T16">1</text:span><text:span text:style-name="T17"> </text:span><text:span text:style-name="T18">#include </text:span><text:span text:style-name="T19">&lt;stdio.h&gt;</text:span></text:p>
      <text:p text:style-name="P31"/>
      <text:p text:style-name="P30"><text:span text:style-name="T16">2</text:span><text:span text:style-name="T20"> </text:span><text:span text:style-name="T18">int</text:span><text:span text:style-name="T17"> main()</text:span></text:p>
      <text:p text:style-name="P30"><text:span text:style-name="T16">3</text:span><text:span text:style-name="T20"> </text:span><text:span text:style-name="T17">{</text:span></text:p>
      <text:p text:style-name="P30"><text:span text:style-name="T16">4</text:span><text:span text:style-name="T20"> <text:tab/></text:span><text:span text:style-name="T21">printf</text:span><text:span text:style-name="T17">(“Hello, </text:span><text:span text:style-name="T22">w</text:span><text:span text:style-name="T17">orld! \n”);</text:span></text:p>
      <text:p text:style-name="P30"><text:span text:style-name="T16">5</text:span><text:span text:style-name="T20"> <text:tab/></text:span><text:span text:style-name="T18">return</text:span><text:span text:style-name="T17"> </text:span><text:span text:style-name="T23">0</text:span><text:span text:style-name="T17">;</text:span></text:p>
      <text:p text:style-name="P30"><text:span text:style-name="T16">6</text:span><text:span text:style-name="T20"> </text:span><text:span text:style-name="T17">}</text:span></text:p>
      <text:p text:style-name="P32"/>
      <text:p text:style-name="P33"><text:span text:style-name="T24">h</text:span>ello.c</text:p>
      <text:p text:style-name="P33"/>
      <text:p text:style-name="P33"/>
      <text:p text:style-name="P34">Function prototypes</text:p>
      <text:p text:style-name="P35"/>
      <text:p text:style-name="P12"><text:span text:style-name="T25">T</text:span><text:span text:style-name="T26">he</text:span><text:span text:style-name="T27"> </text:span><text:span text:style-name="T28">printf</text:span><text:span text:style-name="T28"><text:note text:id="ftn1" text:note-class="footnote"><text:note-citation>1</text:note-citation><text:note-body><text:p text:style-name="P36"><text:span text:style-name="T29">See the </text:span><text:span text:style-name="T30">printf(3)</text:span><text:span text:style-name="T31"> manual page</text:span></text:p></text:note-body></text:note></text:span><text:span text:style-name="T26"> function </text:span><text:span text:style-name="T25">is defined as follows.</text:span></text:p>
      <text:p text:style-name="P37"/>
      <table:table table:name="Table44" table:style-name="Table44">
        <table:table-column table:style-name="Table44.A"/>
        <table:table-row>
          <table:table-cell table:style-name="Table44.A1" office:value-type="string">
            <text:p text:style-name="P38"><text:span text:style-name="T32">#include </text:span><text:span text:style-name="T33">&lt;stdio.h&gt;</text:span></text:p>
            <text:p text:style-name="P31"/>
            <text:p text:style-name="P39"><text:span text:style-name="T32">int</text:span> <text:span text:style-name="T34">printf</text:span>(<text:span text:style-name="T32">const</text:span> <text:span text:style-name="T32">char</text:span> *<text:span text:style-name="T35">format</text:span>, ...);</text:p>
            <text:p text:style-name="P40"/>
            <text:p text:style-name="P41"><text:s text:c="31"/><text:span text:style-name="T36">Return</text:span><text:span text:style-name="T37">s</text:span><text:span text:style-name="T38">: </text:span><text:span text:style-name="T36">the number of printed characters</text:span></text:p>
          </table:table-cell>
        </table:table-row>
      </table:table>
      <text:p text:style-name="P42"/>
      <text:p text:style-name="P42"/>
      <text:p text:style-name="P26"><text:soft-page-break/>Execution of programs and commands</text:p>
      <text:p text:style-name="P25"/>
      <text:p text:style-name="P12"><text:span text:style-name="T39">We can see the manual page of </text:span><text:span text:style-name="T28">printf</text:span><text:span text:style-name="T39"> </text:span><text:span text:style-name="T40">using </text:span><text:span text:style-name="T39">the </text:span><text:span text:style-name="T28">man</text:span><text:span text:style-name="T28"><text:note text:id="ftn2" text:note-class="footnote"><text:note-citation>2</text:note-citation><text:note-body><text:p text:style-name="P36"><text:span text:style-name="T24">See the </text:span><text:span text:style-name="T41">man(1)</text:span> <text:span text:style-name="T14">mnual page</text:span></text:p></text:note-body></text:note></text:span><text:span text:style-name="T39"> program.</text:span></text:p>
      <text:p text:style-name="P43"/>
      <table:table table:name="Table113" table:style-name="Table113">
        <table:table-column table:style-name="Table113.A"/>
        <table:table-row>
          <table:table-cell table:style-name="Table113.A1" office:value-type="string">
            <text:p text:style-name="P44">[<text:a xlink:type="simple" xlink:href="mailto:linux@base" text:style-name="Internet_20_link" text:visited-style-name="Visited_20_Internet_20_Link">linux@basis</text:a>] man 3 printf</text:p>
          </table:table-cell>
        </table:table-row>
      </table:table>
      <text:p text:style-name="P45"/>
      <table:table table:name="Table99" table:style-name="Table99">
        <table:table-column table:style-name="Table99.A"/>
        <table:table-row>
          <table:table-cell table:style-name="Table99.A1" office:value-type="string">
            <text:p text:style-name="P44">[<text:a xlink:type="simple" xlink:href="mailto:linux@base" text:style-name="Internet_20_link" text:visited-style-name="Visited_20_Internet_20_Link">linux@basis</text:a>] man -<text:span text:style-name="T24">s</text:span> 3 printf</text:p>
          </table:table-cell>
        </table:table-row>
      </table:table>
      <text:p text:style-name="P45"/>
      <table:table table:name="Table71" table:style-name="Table71">
        <table:table-column table:style-name="Table71.A"/>
        <table:table-row>
          <table:table-cell table:style-name="Table71.A1" office:value-type="string">
            <text:p text:style-name="P44">[<text:a xlink:type="simple" xlink:href="mailto:linux@base" text:style-name="Internet_20_link" text:visited-style-name="Visited_20_Internet_20_Link">linux@basis</text:a>] man -S 3 printf</text:p>
          </table:table-cell>
        </table:table-row>
      </table:table>
      <text:p text:style-name="P45"/>
      <table:table table:name="Table114" table:style-name="Table114">
        <table:table-column table:style-name="Table114.A"/>
        <table:table-row>
          <table:table-cell table:style-name="Table114.A1" office:value-type="string">
            <text:p text:style-name="P44">[<text:a xlink:type="simple" xlink:href="mailto:linux@base" text:style-name="Internet_20_link" text:visited-style-name="Visited_20_Internet_20_Link">linux@basis</text:a>] man --<text:span text:style-name="T24">sections=</text:span>3 printf</text:p>
          </table:table-cell>
        </table:table-row>
      </table:table>
      <text:p text:style-name="P46"/>
      <text:p text:style-name="P12"><text:span text:style-name="T42">The options </text:span><text:span text:style-name="T28">-S</text:span><text:span text:style-name="T42">, </text:span><text:span text:style-name="T28">-s</text:span><text:span text:style-name="T42"> and </text:span><text:span text:style-name="T28">–sections</text:span><text:span text:style-name="T42"> specify the section to which the manual page belong.</text:span></text:p>
      <text:p text:style-name="P47"/>
      <text:p text:style-name="P47"/>
      <text:p text:style-name="P48">Code analysis</text:p>
      <text:p text:style-name="P48"/>
      <text:p text:style-name="P49">The code analysis can be presented in three different formats:</text:p>
      <text:p text:style-name="P50"><text:span text:style-name="Strong_20_Emphasis"><text:span text:style-name="T43"/></text:span></text:p>
      <text:p text:style-name="P50"><text:span text:style-name="Strong_20_Emphasis"><text:span text:style-name="T43">1. Line-by-line (italicized)</text:span></text:span><text:span text:style-name="T43"><text:line-break/></text:span></text:p>
      <text:p text:style-name="P50"><text:span text:style-name="Emphasis"><text:span text:style-name="T43"><text:tab/></text:span></text:span><text:span text:style-name="Emphasis"><text:span text:style-name="T44">Line 4:</text:span></text:span><text:span text:style-name="T44"> Prints the string to standard output.<text:line-break/><text:tab/></text:span><text:span text:style-name="Emphasis"><text:span text:style-name="T44">Line 5:</text:span></text:span><text:span text:style-name="T44"> Exits the program successfully</text:span></text:p>
      <text:p text:style-name="P50"><text:span text:style-name="Strong_20_Emphasis"><text:span text:style-name="T43"/></text:span></text:p>
      <text:p text:style-name="P50"><text:span text:style-name="Strong_20_Emphasis"><text:span text:style-name="T43">2. Explanatory</text:span></text:span></text:p>
      <text:p text:style-name="P49"/>
      <text:p text:style-name="P50"><text:span text:style-name="T43"><text:tab/>At line 4, the string is printed to standard output using </text:span><text:span text:style-name="Source_20_Text"><text:span text:style-name="T11">printf</text:span></text:span><text:span text:style-name="T43"><text:line-break/><text:tab/>At line 5, the program terminates successfully using </text:span><text:span text:style-name="Source_20_Text"><text:span text:style-name="T11">return</text:span></text:span></text:p>
      <text:p text:style-name="P50"><text:span text:style-name="Strong_20_Emphasis"><text:span text:style-name="T43"/></text:span></text:p>
      <text:p text:style-name="P50"><text:span text:style-name="Strong_20_Emphasis"><text:span text:style-name="T43">3. Highlighted</text:span></text:span><text:span text:style-name="T43"><text:line-break/></text:span></text:p>
      <text:p text:style-name="P49"><text:tab/>The call</text:p>
      <text:p text:style-name="P49"/>
      <text:p text:style-name="P51"><text:span text:style-name="T45"><text:tab/><text:tab/>4 <text:tab/></text:span><text:span text:style-name="T46">printf</text:span><text:span text:style-name="T47">(“Hello, </text:span><text:span text:style-name="T48">w</text:span><text:span text:style-name="T47">orld! \n”);</text:span></text:p>
      <text:p text:style-name="P49"/>
      <text:p text:style-name="P7"><text:span text:style-name="T43"><text:tab/>prints the message to standard output followed by a newline.</text:span><text:tab/><text:tab/><text:tab/><text:tab/><text:tab/><text:tab/><text:tab/><text:tab/><text:tab/><text:tab/></text:p>
      <text:p text:style-name="P52"/>
      <text:p text:style-name="P52"/>
      <text:p text:style-name="P52"><text:tab/><text:tab/><text:tab/><text:tab/><text:tab/><text:tab/><text:tab/><text:tab/><text:tab/><text:tab/></text:p>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4"><text:soft-page-break/>Table of contents</text:p>
      <text:p text:style-name="P21"/>
      <text:p text:style-name="P21"><text:span text:style-name="T49">Chapter</text:span> 0 – <text:span text:style-name="T50">Tools</text:span></text:p>
      <text:p text:style-name="P55"><text:span text:style-name="T51"/></text:p>
      <text:p text:style-name="P56"><text:span text:style-name="T52">0.</text:span><text:span text:style-name="T53">1</text:span><text:span text:style-name="T52"> </text:span>Compil<text:span text:style-name="T50">ation</text:span></text:p>
      <text:p text:style-name="P57">0.<text:span text:style-name="T54">2</text:span> <text:span text:style-name="T55">The </text:span>GNU C Compiler</text:p>
      <text:p text:style-name="P58"><text:tab/><text:span text:style-name="T56">0.</text:span><text:span text:style-name="T54">2</text:span><text:span text:style-name="T56">.1 Compiling</text:span></text:p>
      <text:p text:style-name="P58"><text:tab/><text:span text:style-name="T56">0.</text:span><text:span text:style-name="T54">2</text:span><text:span text:style-name="T56">.2 Documentation</text:span></text:p>
      <text:p text:style-name="P58"><text:tab/>0.<text:span text:style-name="T54">2</text:span>.<text:span text:style-name="T56">3</text:span> Warnings and optimization levels</text:p>
      <text:p text:style-name="P59"><text:span text:style-name="T57"><text:tab/>0.</text:span><text:span text:style-name="T58">2</text:span><text:span text:style-name="T57">.</text:span><text:span text:style-name="T59">4</text:span><text:span text:style-name="T57"> The </text:span><text:span text:style-name="T60">GNU</text:span><text:span text:style-name="T57"> </text:span><text:span text:style-name="T60">L</text:span><text:span text:style-name="T57">inker: </text:span><text:span text:style-name="T61">ld</text:span></text:p>
      <text:p text:style-name="P60"><text:tab/><text:span text:style-name="T62">0.</text:span><text:span text:style-name="T54">2</text:span><text:span text:style-name="T62">.</text:span><text:span text:style-name="T56">5</text:span><text:span text:style-name="T62"> </text:span><text:span text:style-name="T63">Executable files </text:span></text:p>
      <text:p text:style-name="P61"><text:tab/><text:span text:style-name="T54">0.2.6 C</text:span>ross-compiling</text:p>
      <text:p text:style-name="P62">0.<text:span text:style-name="T54">3</text:span> <text:span text:style-name="T50">The standard library and</text:span><text:span text:style-name="T64"> </text:span><text:span text:style-name="T65">the </text:span>header<text:span text:style-name="T50">s</text:span></text:p>
      <text:p text:style-name="P63"><text:span text:style-name="T66">0.</text:span><text:span text:style-name="T54">4</text:span><text:span text:style-name="T53"> </text:span><text:span text:style-name="T67">GNU Make</text:span></text:p>
      <text:p text:style-name="P59"><text:span text:style-name="T68">0.</text:span><text:span text:style-name="T58">5</text:span><text:span text:style-name="T68"> </text:span><text:span text:style-name="T69">GNU Autoconf</text:span></text:p>
      <text:p text:style-name="P59"><text:span text:style-name="T70">0.</text:span><text:span text:style-name="T58">6</text:span><text:span text:style-name="T70"> </text:span><text:span text:style-name="T69">The GNU Debugger: </text:span><text:span text:style-name="T61">gdb</text:span></text:p>
      <text:p text:style-name="P64">0.<text:span text:style-name="T54">7</text:span> <text:span text:style-name="T50">The</text:span> Linux File System</text:p>
      <text:p text:style-name="P65">0.<text:span text:style-name="T54">8</text:span><text:span text:style-name="T71"> </text:span><text:span text:style-name="T65">Documentatio</text:span><text:span text:style-name="T72">n</text:span></text:p>
      <text:p text:style-name="P59"><text:span text:style-name="T73"><text:tab/>0.</text:span><text:span text:style-name="T58">8</text:span><text:span text:style-name="T73">.1</text:span><text:span text:style-name="T74"> </text:span><text:span text:style-name="T75">Manual pages</text:span></text:p>
      <text:p text:style-name="P59"><text:span text:style-name="T76"><text:tab/>0.</text:span><text:span text:style-name="T58">8</text:span><text:span text:style-name="T76">.2 </text:span><text:span text:style-name="T77">whatis</text:span></text:p>
      <text:p text:style-name="P65"><text:span text:style-name="T78"><text:tab/>0.</text:span><text:span text:style-name="T54">8</text:span><text:span text:style-name="T78">.3 </text:span><text:span text:style-name="T79">info</text:span></text:p>
      <text:p text:style-name="P66"><text:span text:style-name="T80"><text:tab/></text:span><text:span text:style-name="T76">0.</text:span><text:span text:style-name="T58">8</text:span><text:span text:style-name="T76">.4 </text:span><text:span text:style-name="T77">apropos</text:span></text:p>
      <text:p text:style-name="P65"><text:tab/><text:span text:style-name="T78">0.</text:span><text:span text:style-name="T54">8</text:span><text:span text:style-name="T78">.5 </text:span><text:span text:style-name="T81">The </text:span><text:span text:style-name="T82">g</text:span><text:span text:style-name="T83">libc</text:span><text:span text:style-name="T78"> documentation</text:span></text:p>
      <text:p text:style-name="P65">0.<text:span text:style-name="T54">9</text:span> <text:span text:style-name="T50">The source code</text:span></text:p>
      <text:p text:style-name="P67">0.1<text:span text:style-name="T54">0</text:span> <text:span text:style-name="T50">The S</text:span>tandards</text:p>
      <text:p text:style-name="P68">0.1<text:span text:style-name="T54">1</text:span> <text:span text:style-name="T50">The</text:span> <text:span text:style-name="T84">GNU General Public License</text:span></text:p>
      <text:p text:style-name="P69"><text:span text:style-name="T85">0.1</text:span><text:span text:style-name="T58">2</text:span><text:span text:style-name="T86"> </text:span><text:span text:style-name="T87">T</text:span><text:span text:style-name="T86">heory </text:span><text:span text:style-name="T88">and</text:span><text:span text:style-name="T86"> </text:span><text:span text:style-name="T88">i</text:span><text:span text:style-name="T86">nsights</text:span></text:p>
      <text:p text:style-name="P70"><text:tab/><text:span text:style-name="T89">0.1</text:span><text:span text:style-name="T54">2</text:span><text:span text:style-name="T89">.</text:span><text:span text:style-name="T56">1 </text:span><text:span text:style-name="T90">Byte order</text:span></text:p>
      <text:p text:style-name="P70"><text:tab/><text:span text:style-name="T89">0.1</text:span><text:span text:style-name="T54">2</text:span><text:span text:style-name="T89">.</text:span><text:span text:style-name="T56">2</text:span><text:span text:style-name="T89"> </text:span><text:span text:style-name="T90">Static and dynamic linking</text:span></text:p>
      <text:p text:style-name="P59"><text:span text:style-name="T91">L</text:span><text:span text:style-name="T87">ist of </text:span><text:span text:style-name="T92">tables</text:span></text:p>
      <text:p text:style-name="P59"><text:span text:style-name="T87">List of </text:span><text:span text:style-name="T92">figures</text:span></text:p>
      <text:p text:style-name="P71">Bibliography</text:p>
      <text:p text:style-name="P72"><text:tab/><text:tab/></text:p>
      <text:p text:style-name="P73"/>
      <text:p text:style-name="P73"/>
      <text:p text:style-name="P73"/>
      <text:p text:style-name="P73"/>
      <text:p text:style-name="P73"/>
      <text:p text:style-name="P73"/>
      <text:p text:style-name="P73"/>
      <text:p text:style-name="P73"/>
      <text:p text:style-name="P74"><text:soft-page-break/><text:span text:style-name="T93">0</text:span><text:bookmark-start text:name="0.2"/><text:span text:style-name="T94">.</text:span><text:span text:style-name="T95">1</text:span><text:span text:style-name="T94"> </text:span><text:span text:style-name="T96">Compila</text:span><text:span text:style-name="T97">tion</text:span><text:bookmark-end text:name="0.2"/></text:p>
      <text:p text:style-name="P75"/>
      <text:p text:style-name="P76"><text:span text:style-name="T98">The basic tools required for programming are a text editor and a compiler. On Linux systems, many text editors are available, such as </text:span><text:span text:style-name="Source_20_Text"><text:span text:style-name="T99">vi</text:span></text:span><text:span text:style-name="T99">m</text:span><text:span text:style-name="T98">, </text:span><text:span text:style-name="Source_20_Text"><text:span text:style-name="T99">n</text:span></text:span><text:span text:style-name="T99">ano</text:span><text:span text:style-name="T98">, and </text:span><text:span text:style-name="Source_20_Text"><text:span text:style-name="T99">gedit</text:span></text:span><text:span text:style-name="T98">, and in most cases they are already installed. The most commonly used compiler on Linux systems is </text:span><text:span text:style-name="T100">gcc</text:span><text:span text:style-name="T98">, the GNU C Compiler</text:span><text:span text:style-name="T98"><text:note text:id="ftn3" text:note-class="footnote"><text:note-citation>3</text:note-citation><text:note-body><text:p text:style-name="P77"><text:span text:style-name="T101">Visit the </text:span>GNU (GNU is Not Unix)<text:span text:style-name="T101"> official website </text:span><text:a xlink:type="simple" xlink:href="http://www.gnu.org/" text:style-name="Internet_20_link" text:visited-style-name="Visited_20_Internet_20_Link">www.gnu.org</text:a> </text:p></text:note-body></text:note></text:span><text:span text:style-name="T98">. On Debian-based systems, software can be installed and managed using the </text:span><text:span text:style-name="Source_20_Text"><text:span text:style-name="T99">apt</text:span></text:span><text:span text:style-name="T98"> package manager.</text:span></text:p>
      <text:p text:style-name="P78"/>
      <table:table table:name="Table24" table:style-name="Table24">
        <table:table-column table:style-name="Table24.A"/>
        <table:table-row>
          <table:table-cell table:style-name="Table24.A1" office:value-type="string">
            <text:p text:style-name="P79"><text:span text:style-name="T102">[</text:span><text:a xlink:type="simple" xlink:href="mailto:linux@io" text:style-name="Internet_20_link" text:visited-style-name="Visited_20_Internet_20_Link"><text:span text:style-name="T102">linux@basis</text:span></text:a><text:span text:style-name="T102">] </text:span><text:span text:style-name="T103">sudo apt install gcc </text:span></text:p>
            <text:p text:style-name="P80"><text:span text:style-name="T103">...</text:span><text:span text:style-name="T104">output...</text:span></text:p>
          </table:table-cell>
        </table:table-row>
      </table:table>
      <text:p text:style-name="P81"/>
      <text:p text:style-name="P76"><text:span text:style-name="T98">Once the compiler is installed and the program has been written using a text editor, it can be compiled with </text:span><text:span text:style-name="Source_20_Text"><text:span text:style-name="T99">gcc</text:span></text:span><text:span text:style-name="T98"> in the following way.</text:span></text:p>
      <text:p text:style-name="P82"/>
      <table:table table:name="Table31" table:style-name="Table31">
        <table:table-column table:style-name="Table31.A"/>
        <table:table-row>
          <table:table-cell table:style-name="Table31.A1" office:value-type="string">
            <text:p text:style-name="P83"><text:span text:style-name="T102">[</text:span><text:a xlink:type="simple" xlink:href="mailto:linux@io" text:style-name="Internet_20_link" text:visited-style-name="Visited_20_Internet_20_Link"><text:span text:style-name="T102">linux@basis</text:span></text:a><text:span text:style-name="T102">] </text:span><text:span text:style-name="T103">gcc -o </text:span><text:span text:style-name="T105">h</text:span><text:span text:style-name="T103">ello </text:span><text:span text:style-name="T105">he</text:span><text:span text:style-name="T103">llo.c</text:span></text:p>
            <text:p text:style-name="P84"><text:span text:style-name="T103">[</text:span><text:a xlink:type="simple" xlink:href="mailto:linux@base" text:style-name="Internet_20_link" text:visited-style-name="Visited_20_Internet_20_Link"><text:span text:style-name="T103">linux@basis</text:span></text:a><text:span text:style-name="T103">] </text:span></text:p>
          </table:table-cell>
        </table:table-row>
      </table:table>
      <text:p text:style-name="P82"/>
      <text:p text:style-name="P85"><text:span text:style-name="T106">The </text:span><text:span text:style-name="T99">-o</text:span><text:span text:style-name="T106"> option specifies the name of the executable file. </text:span><text:span text:style-name="T107">After the compilation has terminated we can run the executable.</text:span></text:p>
      <text:p text:style-name="P82"/>
      <table:table table:name="Table34" table:style-name="Table34">
        <table:table-column table:style-name="Table34.A"/>
        <table:table-row>
          <table:table-cell table:style-name="Table34.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103">./</text:span><text:span text:style-name="T105">h</text:span><text:span text:style-name="T103">ello</text:span></text:p>
            <text:p text:style-name="P82">Hello, <text:span text:style-name="T108">w</text:span>orld!</text:p>
          </table:table-cell>
        </table:table-row>
      </table:table>
      <text:p text:style-name="P82"/>
      <text:p text:style-name="P87"><text:span text:style-name="T109">To check the return value of the program, you can use the </text:span><text:span text:style-name="Source_20_Text"><text:span text:style-name="T99">echo</text:span></text:span><text:span text:style-name="T109"> command with the </text:span><text:span text:style-name="Source_20_Text"><text:span text:style-name="T99">$?</text:span></text:span><text:span text:style-name="T109">, </text:span><text:span text:style-name="T107">which </text:span><text:span text:style-name="T110">prints the </text:span><text:span text:style-name="T111">exit</text:span><text:span text:style-name="T112"> value</text:span><text:span text:style-name="T110"> of the last program executed.</text:span></text:p>
      <text:p text:style-name="P88"/>
      <table:table table:name="Table37" table:style-name="Table37">
        <table:table-column table:style-name="Table37.A"/>
        <table:table-row>
          <table:table-cell table:style-name="Table37.A1" office:value-type="string">
            <text:p text:style-name="P89"><text:span text:style-name="T102">[</text:span><text:a xlink:type="simple" xlink:href="mailto:linux@io" text:style-name="Internet_20_link" text:visited-style-name="Visited_20_Internet_20_Link"><text:span text:style-name="T102">linux@basis</text:span></text:a><text:span text:style-name="T102">] </text:span><text:span text:style-name="T103">echo $?</text:span></text:p>
            <text:p text:style-name="P90">0</text:p>
          </table:table-cell>
        </table:table-row>
      </table:table>
      <text:p text:style-name="P90"/>
      <text:p text:style-name="P88">At the end of execution, the program returned a value of 0 to the shell, indicating that it terminated successfully without errors.</text:p>
      <text:p text:style-name="P91"/>
      <text:p text:style-name="P87"><text:span text:style-name="T113">If no output file is specified with the </text:span><text:span text:style-name="T99">-o</text:span><text:span text:style-name="T113"> option, </text:span><text:span text:style-name="T99">gcc</text:span><text:span text:style-name="T113"> automatically creates the <text:s/></text:span><text:span text:style-name="T99">a.out</text:span><text:span text:style-name="T113"> executable file.</text:span></text:p>
      <text:p text:style-name="P92"/>
      <table:table table:name="Table1" table:style-name="Table1">
        <table:table-column table:style-name="Table1.A"/>
        <table:table-row>
          <table:table-cell table:style-name="Table1.A1" office:value-type="string">
            <text:p text:style-name="P93"><text:span text:style-name="T103">[</text:span><text:a xlink:type="simple" xlink:href="mailto:linux@io" text:style-name="Internet_20_link" text:visited-style-name="Visited_20_Internet_20_Link"><text:span text:style-name="T103">linux@basis</text:span></text:a><text:span text:style-name="T103">] gcc </text:span><text:span text:style-name="T105">h</text:span><text:span text:style-name="T103">ello.c</text:span></text:p>
            <text:p text:style-name="P94"/>
            <text:p text:style-name="P93"><text:span text:style-name="T103">[</text:span><text:a xlink:type="simple" xlink:href="mailto:linux@io" text:style-name="Internet_20_link" text:visited-style-name="Visited_20_Internet_20_Link"><text:span text:style-name="T103">linux@basis</text:span></text:a><text:span text:style-name="T103">] ls</text:span></text:p>
            <text:p text:style-name="Preformatted_20_Text"><text:span text:style-name="T114">a.out </text:span><text:span text:style-name="T115"><text:s text:c="2"/></text:span><text:span text:style-name="T105">h</text:span><text:span text:style-name="T115">ello <text:s text:c="3"/></text:span><text:span text:style-name="T105">h</text:span><text:span text:style-name="T115">ello.c</text:span></text:p>
            <text:p text:style-name="P94"/>
            <text:p text:style-name="P95"><text:span text:style-name="T103">[</text:span><text:a xlink:type="simple" xlink:href="mailto:linux@io" text:style-name="Internet_20_link" text:visited-style-name="Visited_20_Internet_20_Link"><text:span text:style-name="T103">linux@basis</text:span></text:a><text:span text:style-name="T103">] ./a.out</text:span></text:p>
            <text:p text:style-name="P96">Hello, <text:span text:style-name="T108">w</text:span>orld!</text:p>
          </table:table-cell>
        </table:table-row>
      </table:table>
      <text:p text:style-name="P92"/>
      <text:p text:style-name="P92"/>
      <text:p text:style-name="P92"/>
      <text:p text:style-name="P92"/>
      <text:p text:style-name="P97"><text:soft-page-break/>The build process is divided into 4 <text:span text:style-name="T116">stages:</text:span></text:p>
      <text:p text:style-name="P97"/>
      <text:p text:style-name="P98">Preprocessing</text:p>
      <text:p text:style-name="P99"><text:span text:style-name="T35"><text:tab/></text:span>The preprocessor removes comments, expands macros and headers files</text:p>
      <text:p text:style-name="P97"/>
      <text:p text:style-name="P98">Compilation</text:p>
      <text:p text:style-name="P99"><text:span text:style-name="T35"><text:tab/></text:span>The compiler generates the assembly code</text:p>
      <text:p text:style-name="P97"/>
      <text:p text:style-name="P98">Assembly</text:p>
      <text:p text:style-name="P99"><text:tab/><text:span text:style-name="T116">T</text:span>he assembler converts the assembly code into binary machine code by creating the object <text:tab/>file</text:p>
      <text:p text:style-name="P97"/>
      <text:p text:style-name="P98">Link<text:span text:style-name="T117">ing</text:span></text:p>
      <text:p text:style-name="P99"><text:span text:style-name="T118"><text:tab/></text:span>The linker combines all object files into one executable file and links functions in external <text:tab/>libraries to the program code.</text:p>
      <text:p text:style-name="P99"/>
      <text:p text:style-name="P99">Each of these four stages is carried out by a software component (preprocessor, compiler, assembler, and linker), which are often integrated into a single compiler toolchain.</text:p>
      <text:p text:style-name="P99">A compiler is a piece of software that takes one or more source code files as input, processes them, and translates them into machine code. In other words, it reads instructions written in a high-level language such as C and converts them into the machine language of the target processor, producing an executable file.</text:p>
      <text:p text:style-name="P99"/>
      <text:p text:style-name="P100"><text:s/><text:tab/><text:tab/> <text:s text:c="3"/>C <text:span text:style-name="T119">Source <text:s text:c="8"/></text:span>→ <text:s text:c="3"/>Compila<text:span text:style-name="T119">tion <text:s text:c="2"/></text:span>→ <text:s text:c="2"/><text:span text:style-name="T119">Executable f</text:span>ile (binar<text:span text:style-name="T119">y</text:span>)</text:p>
      <text:p text:style-name="P101"/>
      <text:p text:style-name="P102"><text:span text:style-name="T120"><text:tab/><text:tab/> <text:s/>h</text:span><text:span text:style-name="T99">ello.c</text:span><text:span text:style-name="T121"> <text:s text:c="4"/>→ <text:s text:c="9"/></text:span><text:span text:style-name="T99">gcc</text:span><text:span text:style-name="T121"> <text:s text:c="8"/>→ <text:s text:c="3"/></text:span><text:span text:style-name="T99">hello</text:span></text:p>
      <text:p text:style-name="Standard"/>
      <text:p text:style-name="P103">During linking, the program is connected to the libraries that contain the functions it uses. Libraries can be linked in two ways: <text:span text:style-name="T35">static</text:span> or <text:span text:style-name="T35">dynamic</text:span>. In <text:span text:style-name="T35">static linking</text:span>, the code of the library functions is included directly in the executable file. In <text:span text:style-name="T35">dynamic linking</text:span>, the library functions are loaded and executed at run time, when the program is running. <text:span text:style-name="T35">Dynamic linking</text:span> has the advantage of producing smaller executable files, but it requires the necessary libraries to be present on the system at run time<text:span text:style-name="T122">.</text:span></text:p>
      <text:p text:style-name="P103"/>
      <text:p text:style-name="P104">The default compiler for the C language on Linux systems is <text:span text:style-name="Source_20_Text"><text:span text:style-name="T99">gcc</text:span></text:span> (GNU Compiler Collection), while the default linker is <text:span text:style-name="Source_20_Text"><text:span text:style-name="T99">ld</text:span></text:span>. The <text:span text:style-name="Source_20_Text"><text:span text:style-name="T99">gcc</text:span></text:span> compiler handles both compilation and linking to libraries, since it internally invokes the necessary tools to complete the build process. The <text:span text:style-name="Source_20_Text"><text:span text:style-name="T99">ld</text:span></text:span> linker performs the actual task of linking object files and libraries, and it is typically called by <text:span text:style-name="Source_20_Text"><text:span text:style-name="T99">gcc</text:span></text:span> during compilation unless otherwise specified.</text:p>
      <text:p text:style-name="P104"/>
      <text:p text:style-name="P104">The executable file generated by the compiler is adapted to the underlying operating system or to the one indicated during compilation, in this case Linux. If the same program is compiled on a different operating system, the size of the executable file changes. This is because the compiler compiles the source file based on the operating system on which the executable is to run and therefore tailors the executable to that operating system. To run the same program on two different operating systems, it must be recompiled unless the programming language in which the program was written uses a virtual machine.</text:p>
      <text:p text:style-name="P105">The figure below shows the process of compiling a single source file.</text:p>
      <text:p text:style-name="P89"/>
      <text:p text:style-name="P106"><draw:frame draw:style-name="fr1" draw:name="Image1" text:anchor-type="char" svg:width="6.6929in" svg:height="2.3654in" draw:z-index="2"><draw:image xlink:href="Pictures/10000001000002E800000107AF218174.png" xlink:type="simple" xlink:show="embed" xlink:actuate="onLoad" draw:mime-type="image/png"/></draw:frame><text:soft-page-break/>Fig 1. <text:span text:style-name="T123">Compilation</text:span><text:span text:style-name="T124"> </text:span></text:p>
      <text:p text:style-name="P107"/>
      <text:p text:style-name="P108"><text:span text:style-name="T125"/></text:p>
      <text:p text:style-name="P108"><text:span text:style-name="T125">The compiler-generated executable</text:span><text:bookmark text:name="tw-target-text Copy 3"/><text:span text:style-name="T125"> </text:span><text:span text:style-name="T126">fi</text:span><text:span text:style-name="T127">le is loadable into </text:span><text:span text:style-name="T128">the </text:span><text:span text:style-name="T127">memory and executable by the </text:span><text:span text:style-name="T128">CPU</text:span><text:span text:style-name="T127">.</text:span></text:p>
      <text:p text:style-name="P109">On Linux, by convention, executable files have no extension, however, some software uses extensions for clarity.</text:p>
      <text:p text:style-name="P109"/>
      <text:p text:style-name="P109"/>
      <text:p text:style-name="P109"/>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text:bookmark-start text:name="0.4"/><text:soft-page-break/>0.<text:span text:style-name="T54">2</text:span> <text:span text:style-name="T55">The </text:span>GNU C Compiler<text:bookmark-end text:name="0.4"/></text:p>
      <text:p text:style-name="P112"/>
      <text:p text:style-name="P113"><text:span text:style-name="T129">The </text:span><text:span text:style-name="Source_20_Text"><text:span text:style-name="T99">gcc</text:span></text:span><text:span text:style-name="T129"> compiler handles all four stages of the build process. It is a powerful compiler that supports a large number of options</text:span><text:span text:style-name="T129"><text:note text:id="ftn4" text:note-class="footnote"><text:note-citation>4</text:note-citation><text:note-body><text:p text:style-name="P114"><text:span text:style-name="T29">See the </text:span><text:span text:style-name="T15">gcc(1)</text:span><text:span text:style-name="T29"> manual page</text:span> </text:p></text:note-body></text:note></text:span><text:span text:style-name="T129">.</text:span></text:p>
      <text:p text:style-name="P115"/>
      <text:p text:style-name="P116">0.<text:span text:style-name="T54">2</text:span>.1 Compiling</text:p>
      <text:p text:style-name="P115"/>
      <text:p text:style-name="P115">To compile a source file, the following syntax is used.</text:p>
      <text:p text:style-name="P117"/>
      <table:table table:name="Table45" table:style-name="Table45">
        <table:table-column table:style-name="Table45.A"/>
        <table:table-row>
          <table:table-cell table:style-name="Table45.A1" office:value-type="string">
            <text:p text:style-name="P118"><text:span text:style-name="T102">[</text:span><text:a xlink:type="simple" xlink:href="mailto:linux@io" text:style-name="Internet_20_link" text:visited-style-name="Visited_20_Internet_20_Link"><text:span text:style-name="T102">linux@basis</text:span></text:a><text:span text:style-name="T102">] </text:span><text:span text:style-name="T130">gcc </text:span><text:span text:style-name="T131">h</text:span><text:span text:style-name="T132">ello.</text:span><text:span text:style-name="T133">c</text:span><text:span text:style-name="T132"> -o </text:span><text:span text:style-name="T131">h</text:span><text:span text:style-name="T132">ello</text:span></text:p>
            <text:p text:style-name="P119"/>
            <text:p text:style-name="P120"><text:span text:style-name="T132">[</text:span><text:a xlink:type="simple" xlink:href="mailto:linux@base" text:style-name="Internet_20_link" text:visited-style-name="Visited_20_Internet_20_Link"><text:span text:style-name="T103">linux@basis</text:span></text:a><text:span text:style-name="T103">] ls </text:span></text:p>
            <text:p text:style-name="P121"/>
            <text:p text:style-name="P122">hello</text:p>
          </table:table-cell>
        </table:table-row>
      </table:table>
      <text:p text:style-name="P123"/>
      <text:p text:style-name="P124"><text:span text:style-name="T99">gcc</text:span><text:span text:style-name="T134"> creates the </text:span><text:span text:style-name="T99">hello</text:span><text:span text:style-name="T134"> executable file. If you omit the </text:span><text:span text:style-name="T99">-o</text:span><text:span text:style-name="T134"> option and the executable name, </text:span><text:span text:style-name="T99">gcc</text:span><text:span text:style-name="T134"> automatically creates the executable file </text:span><text:span text:style-name="T99">a.out</text:span><text:span text:style-name="T134">.</text:span></text:p>
      <text:p text:style-name="P125"/>
      <table:table table:name="Table35" table:style-name="Table35">
        <table:table-column table:style-name="Table35.A"/>
        <table:table-row>
          <table:table-cell table:style-name="Table35.A1" office:value-type="string">
            <text:p text:style-name="P126"><text:span text:style-name="T102">[</text:span><text:a xlink:type="simple" xlink:href="mailto:linux@io" text:style-name="Internet_20_link" text:visited-style-name="Visited_20_Internet_20_Link"><text:span text:style-name="T102">linux@basis</text:span></text:a><text:span text:style-name="T102">] </text:span><text:span text:style-name="T130">gcc </text:span><text:span text:style-name="T131">h</text:span><text:span text:style-name="T130">ello.c </text:span></text:p>
            <text:p text:style-name="P127"/>
            <text:p text:style-name="P128"><text:span text:style-name="T130">[</text:span><text:a xlink:type="simple" xlink:href="mailto:linux@base" text:style-name="Internet_20_link" text:visited-style-name="Visited_20_Internet_20_Link"><text:span text:style-name="T103">linux@basis</text:span></text:a><text:span text:style-name="T103">] ls</text:span></text:p>
            <text:p text:style-name="P128"/>
            <text:p text:style-name="P122">a.out</text:p>
          </table:table-cell>
        </table:table-row>
      </table:table>
      <text:p text:style-name="P129"/>
      <text:p text:style-name="P130">To compile the source file and create the <text:span text:style-name="T35">object file</text:span> <text:span text:style-name="T135">without linking, use the </text:span><text:span text:style-name="T136">-c</text:span><text:span text:style-name="T135"> option</text:span><text:span text:style-name="T136">.</text:span> </text:p>
      <text:p text:style-name="P131"/>
      <table:table table:name="Table32" table:style-name="Table32">
        <table:table-column table:style-name="Table32.A"/>
        <table:table-row>
          <table:table-cell table:style-name="Table32.A1" office:value-type="string">
            <text:p text:style-name="P132"><text:span text:style-name="T102">[</text:span><text:a xlink:type="simple" xlink:href="mailto:linux@io" text:style-name="Internet_20_link" text:visited-style-name="Visited_20_Internet_20_Link"><text:span text:style-name="T102">linux@basis</text:span></text:a><text:span text:style-name="T102">] </text:span><text:span text:style-name="T130">gcc -</text:span><text:span text:style-name="T137">c</text:span><text:span text:style-name="T130"> </text:span><text:span text:style-name="T131">h</text:span><text:span text:style-name="T130">ello.c</text:span></text:p>
          </table:table-cell>
        </table:table-row>
      </table:table>
      <text:p text:style-name="P131"/>
      <text:p text:style-name="P133"><text:span text:style-name="T138">The compiler creates the </text:span><text:span text:style-name="T139">object </text:span><text:span text:style-name="T138">file</text:span><text:span text:style-name="T140"> </text:span><text:span text:style-name="T141">hello.o</text:span><text:span text:style-name="T138">. The object file contains information about the symbols (global objects, functions, etc..) that must be loaded</text:span></text:p>
      <text:p text:style-name="P134"/>
      <text:p text:style-name="P135"><text:span text:style-name="T142">To link the object file and create the </text:span><text:span text:style-name="T143">binary file</text:span><text:span text:style-name="T142">, </text:span><text:span text:style-name="T139">we </text:span><text:span text:style-name="T142">pass the object file to </text:span><text:span text:style-name="T141">gcc</text:span><text:span text:style-name="T142"> and specify the executable file with </text:span><text:span text:style-name="T141">-o</text:span><text:span text:style-name="T142">.</text:span></text:p>
      <text:p text:style-name="P131"/>
      <table:table table:name="Table33" table:style-name="Table33">
        <table:table-column table:style-name="Table33.A"/>
        <table:table-row>
          <table:table-cell table:style-name="Table33.A1" office:value-type="string">
            <text:p text:style-name="P132"><text:span text:style-name="T102">[</text:span><text:a xlink:type="simple" xlink:href="mailto:linux@io" text:style-name="Internet_20_link" text:visited-style-name="Visited_20_Internet_20_Link"><text:span text:style-name="T102">linux@basis</text:span></text:a><text:span text:style-name="T102">] </text:span><text:span text:style-name="T130">gcc </text:span><text:span text:style-name="T131">h</text:span><text:span text:style-name="T132">ello.o -o </text:span><text:span text:style-name="T131">h</text:span><text:span text:style-name="T132">ello</text:span></text:p>
          </table:table-cell>
        </table:table-row>
      </table:table>
      <text:p text:style-name="P131"/>
      <text:p text:style-name="P136"><text:span text:style-name="T141">gcc</text:span><text:span text:style-name="T144"> creates the </text:span><text:span text:style-name="T141">hello</text:span><text:span text:style-name="T144"> executable file. If the filename is not specified and the </text:span><text:span text:style-name="T141">-o</text:span><text:span text:style-name="T144"> option is omitted, </text:span><text:span text:style-name="T141">gcc</text:span><text:span text:style-name="T144"> automatically creates the executable file </text:span><text:span text:style-name="T141">a.out</text:span><text:span text:style-name="T144">.</text:span></text:p>
      <text:p text:style-name="P137"/>
      <text:p text:style-name="P138">To save the files created by each step, <text:span text:style-name="T145">we can </text:span>use the <text:span text:style-name="T146">-save-temps</text:span> option.</text:p>
      <text:p text:style-name="P139"/>
      <table:table table:name="Table29" table:style-name="Table29">
        <table:table-column table:style-name="Table29.A"/>
        <table:table-row>
          <table:table-cell table:style-name="Table29.A1" office:value-type="string">
            <text:p text:style-name="P140">[<text:a xlink:type="simple" xlink:href="mailto:linux@base" text:style-name="Internet_20_link" text:visited-style-name="Visited_20_Internet_20_Link">linux@basis</text:a>] gcc -save-temps <text:span text:style-name="T147">h</text:span>ello.c</text:p>
            <text:p text:style-name="P140"/>
            <text:p text:style-name="P141">[<text:a xlink:type="simple" xlink:href="mailto:linux@base" text:style-name="Internet_20_link" text:visited-style-name="Visited_20_Internet_20_Link">linux@basis</text:a>] ls</text:p>
            <text:p text:style-name="P141"/>
            <text:p text:style-name="P142"><text:span text:style-name="T147">h</text:span>ello.i <text:s/><text:span text:style-name="T147">h</text:span>ello.o <text:s/><text:span text:style-name="T147">h</text:span>ello.s <text:s/><text:span text:style-name="T148">a.out</text:span> <text:s/><text:span text:style-name="T147">h</text:span>ello.c</text:p>
          </table:table-cell>
        </table:table-row>
      </table:table>
      <text:p text:style-name="P143"><text:soft-page-break/><text:span text:style-name="T147">The following table lists the extensions of the </text:span>files saved <text:span text:style-name="T147">with </text:span><text:span text:style-name="T15">-save-temps</text:span></text:p>
      <text:p text:style-name="P144"/>
      <text:p text:style-name="P144"/>
      <table:table table:name="Table76" table:style-name="Table76">
        <table:table-column table:style-name="Table76.A"/>
        <table:table-column table:style-name="Table76.B"/>
        <table:table-row table:style-name="Table76.1">
          <table:table-cell table:style-name="Table76.A1" office:value-type="string">
            <text:p text:style-name="P145"><text:span text:style-name="T149">.i</text:span><text:span text:style-name="T150"><text:tab/><text:tab/></text:span><text:span text:style-name="T151"><text:tab/></text:span></text:p>
          </table:table-cell>
          <table:table-cell table:style-name="Table76.B1" office:value-type="string">
            <text:p text:style-name="P146">preprocess<text:span text:style-name="T152">ed </text:span>file </text:p>
          </table:table-cell>
        </table:table-row>
        <table:table-row>
          <table:table-cell table:style-name="Table76.A2" office:value-type="string">
            <text:p text:style-name="P147">.o</text:p>
          </table:table-cell>
          <table:table-cell table:style-name="Table76.B2" office:value-type="string">
            <text:p text:style-name="P148"><text:span text:style-name="T152">object </text:span>file</text:p>
          </table:table-cell>
        </table:table-row>
        <table:table-row>
          <table:table-cell table:style-name="Table76.A2" office:value-type="string">
            <text:p text:style-name="P147">.s</text:p>
          </table:table-cell>
          <table:table-cell table:style-name="Table76.B2" office:value-type="string">
            <text:p text:style-name="P146">assembly file </text:p>
          </table:table-cell>
        </table:table-row>
        <table:table-row>
          <table:table-cell table:style-name="Table76.A2" office:value-type="string">
            <text:p text:style-name="P147">.out</text:p>
          </table:table-cell>
          <table:table-cell table:style-name="Table76.B2" office:value-type="string">
            <text:p text:style-name="P149"><text:span text:style-name="T152">executable </text:span>file</text:p>
          </table:table-cell>
        </table:table-row>
        <table:table-row>
          <table:table-cell table:style-name="Table76.A2" office:value-type="string">
            <text:p text:style-name="P147">.c</text:p>
          </table:table-cell>
          <table:table-cell table:style-name="Table76.B2" office:value-type="string">
            <text:p text:style-name="P149"><text:span text:style-name="T152">c-source </text:span>file</text:p>
          </table:table-cell>
        </table:table-row>
      </table:table>
      <text:p text:style-name="P150"/>
      <text:p text:style-name="P151"><text:span text:style-name="T153">Tab 1.</text:span> <text:span text:style-name="T154">F</text:span><text:span text:style-name="T152">iles </text:span><text:span text:style-name="T154">e</text:span><text:span text:style-name="T152">xtensions <text:s/>created by</text:span> <text:span text:style-name="T155">-save-temps</text:span></text:p>
      <text:p text:style-name="P152"/>
      <text:p text:style-name="P153"><text:span text:style-name="T156">To create the file containing the assembly instructions </text:span><text:span text:style-name="T139">we can </text:span><text:span text:style-name="T156">use </text:span><text:span text:style-name="T157">the</text:span><text:span text:style-name="T156"> </text:span><text:span text:style-name="T158">-S</text:span><text:span text:style-name="T156"> option.</text:span></text:p>
      <text:p text:style-name="P154"/>
      <table:table table:name="Table30" table:style-name="Table30">
        <table:table-column table:style-name="Table30.A"/>
        <table:table-row>
          <table:table-cell table:style-name="Table30.A1" office:value-type="string">
            <text:p text:style-name="P155">[<text:a xlink:type="simple" xlink:href="mailto:linux@base" text:style-name="Internet_20_link" text:visited-style-name="Visited_20_Internet_20_Link">linux@basis</text:a>] gcc -S <text:span text:style-name="T147">h</text:span>ello.c</text:p>
          </table:table-cell>
        </table:table-row>
      </table:table>
      <text:p text:style-name="P154"/>
      <text:p text:style-name="P156"><text:span text:style-name="T159">gcc</text:span><text:span text:style-name="T160"> crea</text:span><text:span text:style-name="T157">tes</text:span><text:span text:style-name="T160"> </text:span><text:span text:style-name="T157">the</text:span><text:span text:style-name="T160"> file </text:span><text:span text:style-name="T159">hello.s</text:span><text:span text:style-name="T160">. </text:span><text:span text:style-name="T157">It is possible to compile the</text:span><text:span text:style-name="T161"> assembly </text:span><text:span text:style-name="T157">file to create the executable in the following way</text:span></text:p>
      <text:p text:style-name="P157"/>
      <table:table table:name="Table36" table:style-name="Table36">
        <table:table-column table:style-name="Table36.A"/>
        <table:table-row>
          <table:table-cell table:style-name="Table36.A1" office:value-type="string">
            <text:p text:style-name="P158">[<text:a xlink:type="simple" xlink:href="mailto:linux@base" text:style-name="Internet_20_link" text:visited-style-name="Visited_20_Internet_20_Link">linux@basis</text:a>] <text:span text:style-name="T162">gcc </text:span><text:span text:style-name="T147">h</text:span><text:span text:style-name="T162">ello.s -o </text:span><text:span text:style-name="T147">h</text:span><text:span text:style-name="T162">ello</text:span></text:p>
          </table:table-cell>
        </table:table-row>
      </table:table>
      <text:p text:style-name="P157"/>
      <text:p text:style-name="P159"><text:span text:style-name="T139">If we want t</text:span><text:span text:style-name="T157">o stop the build process after the preprocessing </text:span><text:span text:style-name="T139">stage we can </text:span><text:span text:style-name="T157">use the </text:span><text:span text:style-name="T159">-E</text:span><text:span text:style-name="T163"> </text:span><text:span text:style-name="T157">option </text:span><text:span text:style-name="T139">as follows</text:span></text:p>
      <text:p text:style-name="P160"/>
      <table:table table:name="Table40" table:style-name="Table40">
        <table:table-column table:style-name="Table40.A"/>
        <table:table-row>
          <table:table-cell table:style-name="Table40.A1" office:value-type="string">
            <text:p text:style-name="P161"><text:span text:style-name="T102">[</text:span><text:a xlink:type="simple" xlink:href="mailto:linux@io" text:style-name="Internet_20_link" text:visited-style-name="Visited_20_Internet_20_Link"><text:span text:style-name="T102">linux@basis</text:span></text:a><text:span text:style-name="T102">] </text:span><text:span text:style-name="T130">gcc -E </text:span><text:span text:style-name="T131">h</text:span><text:span text:style-name="T130">ello.c -o </text:span><text:span text:style-name="T131">h</text:span><text:span text:style-name="T130">ello.cpp</text:span></text:p>
          </table:table-cell>
        </table:table-row>
      </table:table>
      <text:p text:style-name="P162"/>
      <text:p text:style-name="P163"><text:span text:style-name="T157">If we print the contents of </text:span><text:span text:style-name="Source_20_Text"><text:span text:style-name="T141">hello.cpp</text:span></text:span><text:span text:style-name="T157"> using </text:span><text:span text:style-name="Source_20_Text"><text:span text:style-name="T141">cat</text:span></text:span><text:span text:style-name="Source_20_Text"><text:span text:style-name="T141"><text:note text:id="ftn5" text:note-class="footnote"><text:note-citation>5</text:note-citation><text:note-body><text:p text:style-name="P164"><text:span text:style-name="T164">cat</text:span><text:span text:style-name="T165"> is </text:span><text:span text:style-name="T145">a</text:span><text:span text:style-name="T165"> program </text:span><text:span text:style-name="T166">used </text:span><text:span text:style-name="T165">to </text:span><text:span text:style-name="T145">display</text:span><text:span text:style-name="T165"> the contents of text files, </text:span><text:span text:style-name="T167">see</text:span><text:span text:style-name="T165"> the </text:span><text:span text:style-name="T164">cat(1)</text:span><text:span text:style-name="T168"> manual page</text:span></text:p></text:note-body></text:note></text:span></text:span><text:span text:style-name="T157">, we can see that the contents of the </text:span><text:span text:style-name="Source_20_Text"><text:span text:style-name="T141">stdio.h</text:span></text:span><text:span text:style-name="T157"> header file have been inserted into the source code.</text:span></text:p>
      <text:p text:style-name="P165"/>
      <text:p text:style-name="P166">We can specify the language of the code we want to compile.</text:p>
      <text:p text:style-name="P167"/>
      <table:table table:name="Table46" table:style-name="Table46">
        <table:table-column table:style-name="Table46.A"/>
        <table:table-row>
          <table:table-cell table:style-name="Table46.A1" office:value-type="string">
            <text:p text:style-name="P168">[<text:a xlink:type="simple" xlink:href="mailto:linux@base" text:style-name="Internet_20_link" text:visited-style-name="Visited_20_Internet_20_Link">linux@basis</text:a>] gcc -x cpp-output <text:span text:style-name="T147">h</text:span>ello.cpp -o <text:span text:style-name="T147">h</text:span><text:span text:style-name="T169">ello</text:span></text:p>
          </table:table-cell>
        </table:table-row>
      </table:table>
      <text:p text:style-name="P169"/>
      <text:p text:style-name="P170"><text:span text:style-name="T170">The gcc </text:span><text:span text:style-name="T141">-x</text:span><text:span text:style-name="T170"> option allows you to specify the language. </text:span><text:span text:style-name="T139">I</text:span><text:span text:style-name="T170">n this case </text:span><text:span text:style-name="T141">cpp-output</text:span><text:span text:style-name="T170"> represents a C file generated by the preprocessor (</text:span><text:span text:style-name="T141">cpp</text:span><text:span text:style-name="T170"> stands for C PrepProcessing)</text:span><text:span text:style-name="T170"><text:note text:id="ftn6" text:note-class="footnote"><text:note-citation>6</text:note-citation><text:note-body><text:p text:style-name="P171"><text:span text:style-name="T171">Programs written in C++ have the extension </text:span><text:span text:style-name="T172">.cpp</text:span><text:span text:style-name="T171">, it is good to distinguish these programs from the C code generated by the preprocessor</text:span></text:p></text:note-body></text:note></text:span><text:span text:style-name="T170">.</text:span></text:p>
      <text:p text:style-name="P157"/>
      <text:p text:style-name="P172">To compile multiple source files belonging to a single project, the syntax is as follows</text:p>
      <text:p text:style-name="P131"/>
      <table:table table:name="Table41" table:style-name="Table41">
        <table:table-column table:style-name="Table41.A"/>
        <table:table-row>
          <table:table-cell table:style-name="Table41.A1" office:value-type="string">
            <text:p text:style-name="P132"><text:span text:style-name="T102">[</text:span><text:a xlink:type="simple" xlink:href="mailto:linux@io" text:style-name="Internet_20_link" text:visited-style-name="Visited_20_Internet_20_Link"><text:span text:style-name="T102">linux@basis</text:span></text:a><text:span text:style-name="T102">] </text:span><text:span text:style-name="T130">gcc </text:span><text:span text:style-name="T131">h</text:span><text:span text:style-name="T130">ello.c </text:span><text:span text:style-name="T131">h</text:span><text:span text:style-name="T173">ello.c</text:span><text:span text:style-name="T174"> </text:span><text:span text:style-name="T131">h</text:span><text:span text:style-name="T173">ello.h</text:span><text:span text:style-name="T174"> -o </text:span><text:span text:style-name="T131">h</text:span><text:span text:style-name="T174">ello</text:span></text:p>
          </table:table-cell>
        </table:table-row>
      </table:table>
      <text:p text:style-name="P173"/>
      <text:p text:style-name="P174"/>
      <text:p text:style-name="P175"><text:soft-page-break/><text:span text:style-name="T175">With the </text:span><text:span text:style-name="T141">-I</text:span><text:span text:style-name="T175"> option </text:span><text:span text:style-name="T139">of </text:span><text:span text:style-name="T141">gcc</text:span><text:span text:style-name="T139"> we</text:span><text:span text:style-name="T175"> can specify an alternative directory for header </text:span><text:span text:style-name="T139">files</text:span><text:span text:style-name="T175"><text:note text:id="ftn7" text:note-class="footnote"><text:note-citation>7</text:note-citation><text:note-body><text:p text:style-name="P176"><text:span text:style-name="T176">By default, the directory in which </text:span><text:span text:style-name="T172">gcc</text:span><text:span text:style-name="T176"> looks for headers is </text:span><text:span text:style-name="T172">/usr/include</text:span></text:p></text:note-body></text:note></text:span><text:span text:style-name="T175">. The following </text:span><text:span text:style-name="T141">hello.c</text:span><text:span text:style-name="T175"> program, which uses the </text:span><text:span text:style-name="T141">hello.h</text:span><text:span text:style-name="T175"> header file, can be compiled by specifying the </text:span><text:span text:style-name="T139">directory containing the </text:span><text:span text:style-name="T175">header file.</text:span></text:p>
      <text:p text:style-name="P174"/>
      <text:p text:style-name="Horizontal_20_Line"/>
      <text:p text:style-name="P177"><text:span text:style-name="T32">#include </text:span><text:span text:style-name="T33">"</text:span><text:span text:style-name="T177">h</text:span><text:span text:style-name="T33">ello.h"</text:span></text:p>
      <text:p text:style-name="P178"><text:span text:style-name="T32">#include </text:span><text:span text:style-name="T33">&lt;stdio.h&gt;</text:span></text:p>
      <text:p text:style-name="P179"/>
      <text:p text:style-name="P178"><text:span text:style-name="T32">void</text:span> main()</text:p>
      <text:p text:style-name="P178">{</text:p>
      <text:p text:style-name="P178"><text:tab/>printf (<text:span text:style-name="T33">"%s"</text:span>, GREETING);</text:p>
      <text:p text:style-name="P178">}</text:p>
      <text:p text:style-name="Horizontal_20_Line"/>
      <text:p text:style-name="P180"><text:span text:style-name="T178">h</text:span>ello.c</text:p>
      <text:p text:style-name="Horizontal_20_Line"/>
      <text:p text:style-name="P181"><text:span text:style-name="T179">#define GREETING “Hello, </text:span><text:span text:style-name="T180">w</text:span><text:span text:style-name="T179">orld</text:span><text:span text:style-name="T181">!</text:span><text:span text:style-name="T179">”</text:span></text:p>
      <text:p text:style-name="Horizontal_20_Line"/>
      <text:p text:style-name="P182"><text:span text:style-name="T178">h</text:span>ello.h</text:p>
      <text:p text:style-name="P174"/>
      <table:table table:name="Table61" table:style-name="Table61">
        <table:table-column table:style-name="Table61.A"/>
        <table:table-row>
          <table:table-cell table:style-name="Table61.A1" office:value-type="string">
            <text:p text:style-name="P183">[<text:a xlink:type="simple" xlink:href="mailto:linux@base" text:style-name="Internet_20_link" text:visited-style-name="Visited_20_Internet_20_Link">linux@basis</text:a>] <text:span text:style-name="T182">gcc -o hello </text:span><text:span text:style-name="T147">h</text:span><text:span text:style-name="T182">ello.c -I.</text:span></text:p>
            <text:p text:style-name="P183"/>
            <text:p text:style-name="P184">[<text:a xlink:type="simple" xlink:href="mailto:linux@base" text:style-name="Internet_20_link" text:visited-style-name="Visited_20_Internet_20_Link">linux@basis</text:a>] ./hello</text:p>
            <text:p text:style-name="P184">Hello, <text:span text:style-name="T147">w</text:span>orld!</text:p>
          </table:table-cell>
        </table:table-row>
      </table:table>
      <text:p text:style-name="P174"/>
      <text:p text:style-name="P185"><text:span text:style-name="T183">The</text:span><text:span text:style-name="T184"> </text:span><text:span text:style-name="T185">-I</text:span><text:span text:style-name="T184"> </text:span><text:span text:style-name="T183">option followed by </text:span><text:span text:style-name="T185">.</text:span><text:span text:style-name="T184"> </text:span><text:span text:style-name="T183">tells </text:span><text:span text:style-name="T184"><text:s/></text:span><text:span text:style-name="T185">gcc</text:span><text:span text:style-name="T184"> </text:span><text:span text:style-name="T183">to search </text:span><text:span text:style-name="T139">for </text:span><text:span text:style-name="T184">header </text:span><text:span text:style-name="T183">files in the current</text:span><text:span text:style-name="T184"> directory </text:span><text:span text:style-name="T139">in addition</text:span><text:span text:style-name="T183"> </text:span><text:span text:style-name="T139">to</text:span><text:span text:style-name="T183"> </text:span><text:span text:style-name="T185">/usr/include</text:span><text:span text:style-name="T183">.</text:span></text:p>
      <text:p text:style-name="P186"/>
      <text:p text:style-name="P175"><text:span text:style-name="T186">With the </text:span><text:span text:style-name="T185">-L</text:span><text:span text:style-name="T186"> option </text:span><text:span text:style-name="T139">we</text:span><text:span text:style-name="T186"> can specify a directory for libraries and with the </text:span><text:span text:style-name="T185">-l</text:span><text:span text:style-name="T186"> option </text:span><text:span text:style-name="T139">we</text:span><text:span text:style-name="T186"> can link to a specific library. </text:span></text:p>
      <text:p text:style-name="P187"/>
      <text:p text:style-name="P185"><text:span text:style-name="T186">The following table lists some of the most common </text:span><text:span text:style-name="T185">gcc</text:span><text:span text:style-name="T186"> options</text:span><text:span text:style-name="T186"><text:note text:id="ftn8" text:note-class="footnote"><text:note-citation>8</text:note-citation><text:note-body><text:p text:style-name="P188">For the complete list, consult the <text:span text:style-name="T15">gcc(1)</text:span> manual page and the documentation <text:span text:style-name="T166">listed </text:span>in the bibliography</text:p></text:note-body></text:note></text:span><text:span text:style-name="T186">. </text:span></text:p>
      <text:p text:style-name="P187"/>
      <table:table table:name="Table42" table:style-name="Table42">
        <table:table-column table:style-name="Table42.A"/>
        <table:table-column table:style-name="Table42.B"/>
        <table:table-row>
          <table:table-cell table:style-name="Table42.A1" office:value-type="string">
            <text:p text:style-name="P189">-o FILE</text:p>
          </table:table-cell>
          <table:table-cell table:style-name="Table42.B1" office:value-type="string">
            <text:p text:style-name="P190"><text:span text:style-name="T187">Specifies the</text:span> output <text:span text:style-name="T187">file</text:span></text:p>
          </table:table-cell>
        </table:table-row>
        <table:table-row>
          <table:table-cell table:style-name="Table42.A2" office:value-type="string">
            <text:p text:style-name="P189">-c</text:p>
          </table:table-cell>
          <table:table-cell table:style-name="Table42.B2" office:value-type="string">
            <text:p text:style-name="P190"><text:span text:style-name="T187">Build without </text:span>linking</text:p>
          </table:table-cell>
        </table:table-row>
        <table:table-row>
          <table:table-cell table:style-name="Table42.A2" office:value-type="string">
            <text:p text:style-name="P189">-Idir</text:p>
          </table:table-cell>
          <table:table-cell table:style-name="Table42.B2" office:value-type="string">
            <text:p text:style-name="P191"><text:span text:style-name="T188">Search the header files in the direcotry </text:span><text:span text:style-name="T189">dir</text:span></text:p>
          </table:table-cell>
        </table:table-row>
        <table:table-row>
          <table:table-cell table:style-name="Table42.A2" office:value-type="string">
            <text:p text:style-name="P189">-Ldir</text:p>
          </table:table-cell>
          <table:table-cell table:style-name="Table42.B2" office:value-type="string">
            <text:p text:style-name="P192"><text:span text:style-name="T188">Serch the libraries in the directory </text:span><text:span text:style-name="T189">dir</text:span><text:span text:style-name="T190"> </text:span></text:p>
          </table:table-cell>
        </table:table-row>
        <table:table-row>
          <table:table-cell table:style-name="Table42.A2" office:value-type="string">
            <text:p text:style-name="P189">-static</text:p>
          </table:table-cell>
          <table:table-cell table:style-name="Table42.B2" office:value-type="string">
            <text:p text:style-name="P193">Link <text:span text:style-name="T187">to static library</text:span></text:p>
          </table:table-cell>
        </table:table-row>
        <table:table-row>
          <table:table-cell table:style-name="Table42.A2" office:value-type="string">
            <text:p text:style-name="P189">-llib</text:p>
          </table:table-cell>
          <table:table-cell table:style-name="Table42.B2" office:value-type="string">
            <text:p text:style-name="P192"><text:span text:style-name="T190">Link </text:span><text:span text:style-name="T188">to the </text:span><text:span text:style-name="T189">lib</text:span><text:span text:style-name="T190"> </text:span><text:span text:style-name="T188">library</text:span></text:p>
          </table:table-cell>
        </table:table-row>
        <table:table-row>
          <table:table-cell table:style-name="Table42.A2" office:value-type="string">
            <text:p text:style-name="P189">-g</text:p>
          </table:table-cell>
          <table:table-cell table:style-name="Table42.B2" office:value-type="string">
            <text:p text:style-name="P194">Include<text:span text:style-name="T187">s </text:span>debug <text:span text:style-name="T187">information in the executable file</text:span></text:p>
          </table:table-cell>
        </table:table-row>
        <table:table-row>
          <table:table-cell table:style-name="Table42.A2" office:value-type="string">
            <text:p text:style-name="P189">-ggdb</text:p>
          </table:table-cell>
          <table:table-cell table:style-name="Table42.B2" office:value-type="string">
            <text:p text:style-name="P195"><text:span text:style-name="T191">Include</text:span><text:span text:style-name="T188">s </text:span><text:span text:style-name="T191">debug </text:span><text:span text:style-name="T188">information</text:span><text:span text:style-name="T191"> </text:span><text:span text:style-name="T188">that</text:span><text:span text:style-name="T191"> </text:span><text:span text:style-name="T189">gdb</text:span><text:span text:style-name="T191"> </text:span><text:span text:style-name="T188">can use</text:span></text:p>
          </table:table-cell>
        </table:table-row>
        <text:soft-page-break/>
        <table:table-row>
          <table:table-cell table:style-name="Table42.A2" office:value-type="string">
            <text:p text:style-name="P189">-O</text:p>
          </table:table-cell>
          <table:table-cell table:style-name="Table42.B2" office:value-type="string">
            <text:p text:style-name="P196">Optimize the compiled code</text:p>
          </table:table-cell>
        </table:table-row>
        <table:table-row>
          <table:table-cell table:style-name="Table42.A2" office:value-type="string">
            <text:p text:style-name="P189">-ON</text:p>
          </table:table-cell>
          <table:table-cell table:style-name="Table42.B2" office:value-type="string">
            <text:p text:style-name="P197">Specifi<text:span text:style-name="T187">es</text:span> <text:span text:style-name="T187">an optimization level (</text:span>0-3<text:span text:style-name="T187">)</text:span></text:p>
          </table:table-cell>
        </table:table-row>
        <table:table-row>
          <table:table-cell table:style-name="Table42.A2" office:value-type="string">
            <text:p text:style-name="P189">-pedantic</text:p>
          </table:table-cell>
          <table:table-cell table:style-name="Table42.B2" office:value-type="string">
            <text:p text:style-name="P198"><text:span text:style-name="T187">Issue all the </text:span>warning<text:span text:style-name="T187">s</text:span> <text:span text:style-name="T187">of the </text:span>ANSI/ISO C <text:span text:style-name="T187">standard</text:span></text:p>
          </table:table-cell>
        </table:table-row>
        <table:table-row>
          <table:table-cell table:style-name="Table42.A2" office:value-type="string">
            <text:p text:style-name="P189">-w</text:p>
          </table:table-cell>
          <table:table-cell table:style-name="Table42.B2" office:value-type="string">
            <text:p text:style-name="P199"><text:span text:style-name="T192">Suppress all</text:span> warning<text:span text:style-name="T192">s</text:span></text:p>
          </table:table-cell>
        </table:table-row>
        <table:table-row table:style-name="Table42.13">
          <table:table-cell table:style-name="Table42.A13" office:value-type="string">
            <text:p text:style-name="P189">-Wall</text:p>
          </table:table-cell>
          <table:table-cell table:style-name="Table42.B2" office:value-type="string">
            <text:p text:style-name="P200"><text:span text:style-name="T193">Issues all or most of the warnings that </text:span><text:span text:style-name="T141">gcc</text:span><text:span text:style-name="T193"> can issue</text:span></text:p>
          </table:table-cell>
        </table:table-row>
        <table:table-row>
          <table:table-cell table:style-name="Table42.A2" office:value-type="string">
            <text:p text:style-name="P189">-werror</text:p>
          </table:table-cell>
          <table:table-cell table:style-name="Table42.B2" office:value-type="string">
            <text:p text:style-name="P201">Convert all warnings to errors</text:p>
          </table:table-cell>
        </table:table-row>
        <table:table-row>
          <table:table-cell table:style-name="Table42.A2" office:value-type="string">
            <text:p text:style-name="P189">-MM</text:p>
          </table:table-cell>
          <table:table-cell table:style-name="Table42.B2" office:value-type="string">
            <text:p text:style-name="P202">Create a make-compatible dependency list</text:p>
          </table:table-cell>
        </table:table-row>
        <table:table-row>
          <table:table-cell table:style-name="Table42.A2" office:value-type="string">
            <text:p text:style-name="P189">-v</text:p>
          </table:table-cell>
          <table:table-cell table:style-name="Table42.B2" office:value-type="string">
            <text:p text:style-name="P202"><text:span text:style-name="T192">Display</text:span> the commands used in each step of the build</text:p>
          </table:table-cell>
        </table:table-row>
        <table:table-row>
          <table:table-cell table:style-name="Table42.A2" office:value-type="string">
            <text:p text:style-name="P189">-h</text:p>
          </table:table-cell>
          <table:table-cell table:style-name="Table42.B2" office:value-type="string">
            <text:p text:style-name="P201">Display a summary help</text:p>
          </table:table-cell>
        </table:table-row>
      </table:table>
      <text:p text:style-name="P203"/>
      <text:p text:style-name="P204"><text:span text:style-name="T153">Tab </text:span><text:span text:style-name="T194">2</text:span>. <text:span text:style-name="T15">gcc</text:span> <text:span text:style-name="T192">options</text:span></text:p>
      <text:p text:style-name="P203"/>
      <text:p text:style-name="P203"/>
      <text:p text:style-name="P205"><text:span text:style-name="T195">The following figure shows each step of compil</text:span><text:span text:style-name="T196">ation process</text:span><text:span text:style-name="T195"> with </text:span><text:span text:style-name="T141">gcc</text:span><text:span text:style-name="T195">, except </text:span><text:span text:style-name="T196">for </text:span><text:span text:style-name="T195">preprocessing.</text:span></text:p>
      <text:p text:style-name="P206"/>
      <text:p text:style-name="P207"><draw:g text:anchor-type="paragraph" draw:z-index="1" draw:name="Group object 3" draw:style-name="gr1"><draw:custom-shape draw:style-name="gr2" draw:text-style-name="P209" svg:width="1.498in" svg:height="0.5858in" svg:x="2.5634in" svg:y="0.1654in"><text:p text:style-name="P208"><text:span text:style-name="T197">hello.c</text:span></text:p><draw:enhanced-geometry svg:viewBox="0 0 21600 21600" draw:type="rectangle" draw:enhanced-path="M 0 0 L 21600 0 21600 21600 0 21600 0 0 Z N"/></draw:custom-shape><draw:custom-shape draw:style-name="gr2" draw:text-style-name="P209" svg:width="1.498in" svg:height="0.5858in" svg:x="2.5634in" svg:y="1.3362in"><text:p text:style-name="P208"><text:span text:style-name="T197">hello.s</text:span></text:p><draw:enhanced-geometry svg:viewBox="0 0 21600 21600" draw:type="rectangle" draw:enhanced-path="M 0 0 L 21600 0 21600 21600 0 21600 0 0 Z N"/></draw:custom-shape><draw:line draw:style-name="gr3" draw:text-style-name="P210" svg:x1="3.3122in" svg:y1="0.7508in" svg:x2="3.3122in" svg:y2="1.3362in"><text:p/></draw:line><draw:frame draw:style-name="gr4" draw:text-style-name="P212" svg:width="2.4898in" svg:height="0.3394in" svg:x="3.5189in" svg:y="0.9016in"><draw:text-box><text:p text:style-name="P211"><text:span text:style-name="T197">gcc -S hello.c</text:span></text:p></draw:text-box></draw:frame><draw:custom-shape draw:style-name="gr2" draw:text-style-name="P209" svg:width="1.498in" svg:height="0.5858in" svg:x="2.5634in" svg:y="2.5079in"><text:p text:style-name="P208"><text:span text:style-name="T197">hello.o</text:span></text:p><draw:enhanced-geometry svg:viewBox="0 0 21600 21600" draw:type="rectangle" draw:enhanced-path="M 0 0 L 21600 0 21600 21600 0 21600 0 0 Z N"/></draw:custom-shape><draw:line draw:style-name="gr3" draw:text-style-name="P210" svg:x1="3.3122in" svg:y1="1.9217in" svg:x2="3.3122in" svg:y2="2.5071in"><text:p/></draw:line><draw:frame draw:style-name="gr5" draw:text-style-name="P212" svg:width="2.4898in" svg:height="0.574in" svg:x="3.5189in" svg:y="2.039in"><draw:text-box><text:p text:style-name="P211"><text:span text:style-name="T197">gcc -c hello.s -o hello.o</text:span></text:p></draw:text-box></draw:frame><draw:custom-shape draw:style-name="gr2" draw:text-style-name="P209" svg:width="1.498in" svg:height="0.5858in" svg:x="2.5634in" svg:y="3.6787in"><text:p text:style-name="P208"><text:span text:style-name="T197">hello</text:span></text:p><draw:enhanced-geometry svg:viewBox="0 0 21600 21600" draw:type="rectangle" draw:enhanced-path="M 0 0 L 21600 0 21600 21600 0 21600 0 0 Z N"/></draw:custom-shape><draw:line draw:style-name="gr3" draw:text-style-name="P210" svg:x1="3.3122in" svg:y1="3.0937in" svg:x2="3.3122in" svg:y2="3.6791in"><text:p/></draw:line><draw:frame draw:style-name="gr5" draw:text-style-name="P212" svg:width="2.4898in" svg:height="0.574in" svg:x="3.5189in" svg:y="3.2106in"><draw:text-box><text:p text:style-name="P211"><text:span text:style-name="T197">gcc hello.o -o hello</text:span></text:p></draw:text-box></draw:frame><draw:frame draw:style-name="gr6" draw:text-style-name="P212" svg:width="2.4906in" svg:height="0.3398in" svg:x="1.1965in" svg:y="1.5028in"><draw:text-box><text:p text:style-name="P211"><text:span text:style-name="T197">assembly file</text:span></text:p></draw:text-box></draw:frame><draw:frame draw:style-name="gr6" draw:text-style-name="P212" svg:width="2.4913in" svg:height="0.3398in" svg:x="1.3457in" svg:y="2.6752in"><draw:text-box><text:p text:style-name="P211"><text:span text:style-name="T197">object file </text:span></text:p></draw:text-box></draw:frame><draw:frame draw:style-name="gr4" draw:text-style-name="P212" svg:width="2.4898in" svg:height="0.3394in" svg:x="1.1591in" svg:y="3.8126in"><draw:text-box><text:p text:style-name="P211"><text:span text:style-name="T197">executable file </text:span></text:p></draw:text-box></draw:frame></draw:g></text:p>
      <text:p text:style-name="P213"/>
      <text:p text:style-name="P21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14"/>
      <text:p text:style-name="P214"/>
      <text:p text:style-name="P215"><text:span text:style-name="T153">Fig </text:span><text:span text:style-name="T198">2</text:span>. <text:span text:style-name="T199">Compilation steps </text:span><text:span text:style-name="T200">with</text:span> <text:span text:style-name="T15">gcc</text:span></text:p>
      <text:p text:style-name="P216"/>
      <text:p text:style-name="P216"/>
      <text:p text:style-name="P216"/>
      <text:p text:style-name="P216"/>
      <text:p text:style-name="P216"/>
      <text:p text:style-name="P216"/>
      <text:p text:style-name="P216"/>
      <text:p text:style-name="P217"><text:soft-page-break/><text:span text:style-name="T201">0.</text:span><text:span text:style-name="T202">2</text:span><text:span text:style-name="T201">.2 Documentation</text:span></text:p>
      <text:p text:style-name="P216"/>
      <text:p text:style-name="P113"><text:span text:style-name="T103"><text:s/>On Debian-based systems, the documentation can be installed using </text:span><text:span text:style-name="Source_20_Text"><text:span text:style-name="T203">apt</text:span></text:span><text:span text:style-name="T103">.</text:span></text:p>
      <text:p text:style-name="P218"/>
      <table:table table:name="Table5" table:style-name="Table5">
        <table:table-column table:style-name="Table5.A"/>
        <table:table-row>
          <table:table-cell table:style-name="Table5.A1" office:value-type="string">
            <text:p text:style-name="P219"><text:span text:style-name="T103">[</text:span><text:a xlink:type="simple" xlink:href="mailto:linux@io" text:style-name="Internet_20_link" text:visited-style-name="Visited_20_Internet_20_Link"><text:span text:style-name="T103">linux@basis</text:span></text:a><text:span text:style-name="T103">] sudo apt install gcc-doc</text:span></text:p>
            <text:p text:style-name="P220">...output...</text:p>
          </table:table-cell>
        </table:table-row>
      </table:table>
      <text:p text:style-name="P218"/>
      <text:p text:style-name="P218">Once the package containing the documentation <text:span text:style-name="T204">has been</text:span> installed, <text:span text:style-name="T204">we can view the manual </text:span>page</text:p>
      <text:p text:style-name="P218"/>
      <table:table table:name="Table6" table:style-name="Table6">
        <table:table-column table:style-name="Table6.A"/>
        <table:table-row>
          <table:table-cell table:style-name="Table6.A1" office:value-type="string">
            <text:p text:style-name="P219"><text:span text:style-name="T103">[</text:span><text:a xlink:type="simple" xlink:href="mailto:linux@io" text:style-name="Internet_20_link" text:visited-style-name="Visited_20_Internet_20_Link"><text:span text:style-name="T103">linux@basis</text:span></text:a><text:span text:style-name="T103">] man gcc</text:span></text:p>
            <text:p text:style-name="P220">…<text:span text:style-name="T205">man page...</text:span></text:p>
          </table:table-cell>
        </table:table-row>
      </table:table>
      <text:p text:style-name="P218"/>
      <text:p text:style-name="P218">In addition to the documentation package, GNU also provides a manual that can be downloaded from the official website<text:note text:id="ftn9" text:note-class="footnote"><text:note-citation>9</text:note-citation><text:note-body><text:p text:style-name="P221"><text:span text:style-name="T206">See the ‘</text:span>Using the GNU Compiler Collection’ <text:span text:style-name="T206">link </text:span><text:a xlink:type="simple" xlink:href="https://gcc.gnu.org/onlinedocs/" text:style-name="Internet_20_link" text:visited-style-name="Visited_20_Internet_20_Link">https://gcc.gnu.org/onlinedocs/</text:a> </text:p></text:note-body></text:not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116"><text:soft-page-break/>0.<text:span text:style-name="T54">2</text:span>.3 Warning and optimization levels</text:p>
      <text:p text:style-name="P222"/>
      <text:p text:style-name="P113"><text:span text:style-name="T103">During compilation, we can specify the level of strictness for warning messages. The </text:span><text:span text:style-name="Source_20_Text"><text:span text:style-name="T203">-Wall</text:span></text:span><text:span text:style-name="T103"> option enables most of the warnings supported by the compiler.</text:span></text:p>
      <text:p text:style-name="P222"/>
      <text:p text:style-name="P113"><text:span text:style-name="T103">The <text:s/></text:span><text:span text:style-name="T203">hello.c</text:span><text:span text:style-name="T103"> program prints a string </text:span><text:span text:style-name="T207">on the console</text:span><text:span text:style-name="T103">.</text:span></text:p>
      <text:p text:style-name="P223"/>
      <text:p text:style-name="P224"><text:span text:style-name="T32">#include </text:span><text:span text:style-name="T33">&lt;stdio.h&gt;</text:span></text:p>
      <text:p text:style-name="P225"/>
      <text:p text:style-name="P226"><text:span text:style-name="T32">int</text:span> main(<text:span text:style-name="T32">int</text:span> argc, <text:span text:style-name="T32">char</text:span> *argv<text:span text:style-name="T32">[]</text:span>)</text:p>
      <text:p text:style-name="P226">{</text:p>
      <text:p text:style-name="P226"><text:span text:style-name="T32"><text:tab/>int</text:span> x;</text:p>
      <text:p text:style-name="P226"><text:tab/>printf (<text:span text:style-name="T33">"Hello, world!"</text:span>);</text:p>
      <text:p text:style-name="P226"><text:span text:style-name="T32"><text:tab/>return</text:span>;</text:p>
      <text:p text:style-name="P226">}</text:p>
      <text:p text:style-name="P223"/>
      <text:p text:style-name="P227"><text:span text:style-name="T208">h</text:span><text:span text:style-name="T209">ello.c</text:span><text:span text:style-name="T103"> </text:span><text:span text:style-name="T210">Prints</text:span><text:span text:style-name="T103"> </text:span><text:span text:style-name="T203">‘Hello, world!’</text:span></text:p>
      <text:p text:style-name="P228"/>
      <text:p text:style-name="P228">Let’s compile the code</text:p>
      <text:p text:style-name="P228"/>
      <table:table table:name="Table3" table:style-name="Table3">
        <table:table-column table:style-name="Table3.A"/>
        <table:table-row>
          <table:table-cell table:style-name="Table3.A1" office:value-type="string">
            <text:p text:style-name="P219"><text:span text:style-name="T103">[</text:span><text:a xlink:type="simple" xlink:href="mailto:linux@io" text:style-name="Internet_20_link" text:visited-style-name="Visited_20_Internet_20_Link"><text:span text:style-name="T103">linux@basis</text:span></text:a><text:span text:style-name="T103">] gcc -o </text:span><text:span text:style-name="T211">h</text:span><text:span text:style-name="T103">ello </text:span><text:span text:style-name="T211">h</text:span><text:span text:style-name="T103">ello.c</text:span></text:p>
            <text:p text:style-name="P218"/>
            <text:p text:style-name="P218">[<text:a xlink:type="simple" xlink:href="mailto:linux@base" text:style-name="Internet_20_link" text:visited-style-name="Visited_20_Internet_20_Link">linux@basis</text:a>] </text:p>
          </table:table-cell>
        </table:table-row>
      </table:table>
      <text:p text:style-name="P229"/>
      <text:p text:style-name="P219"><text:span text:style-name="T211">The compilation </text:span><text:span text:style-name="T212">succe</text:span><text:span text:style-name="T213">eded</text:span><text:span text:style-name="T212">. </text:span><text:span text:style-name="T214">Let’s compile </text:span><text:span text:style-name="T213">passing</text:span><text:span text:style-name="T214"> </text:span><text:span text:style-name="T203">-Wall</text:span></text:p>
      <text:p text:style-name="P218"/>
      <table:table table:name="Table4" table:style-name="Table4">
        <table:table-column table:style-name="Table4.A"/>
        <table:table-row table:style-name="Table4.1">
          <table:table-cell table:style-name="Table4.A1" office:value-type="string">
            <text:p text:style-name="P219"><text:span text:style-name="T103">[</text:span><text:a xlink:type="simple" xlink:href="mailto:linux@io" text:style-name="Internet_20_link" text:visited-style-name="Visited_20_Internet_20_Link"><text:span text:style-name="T103">linux@basis</text:span></text:a><text:span text:style-name="T103">] gcc -Wall -o </text:span><text:span text:style-name="T211">h</text:span><text:span text:style-name="T103">ello </text:span><text:span text:style-name="T211">h</text:span><text:span text:style-name="T103">ello.c</text:span></text:p>
            <text:p text:style-name="P230"><text:span text:style-name="T215">hello.c:3:6:</text:span> <text:span text:style-name="T216">warning: </text:span>return type of ‘<text:span text:style-name="T215">main</text:span>’ is not ‘<text:span text:style-name="T215">int</text:span>’ [<text:span text:style-name="T217">-Wmain</text:span>] <text:s text:c="9"/></text:p>
            <text:p text:style-name="P231"><text:s text:c="4"/>3 | void <text:span text:style-name="T216">main</text:span>(int argc, char *argv[]) <text:s text:c="33"/></text:p>
            <text:p text:style-name="P231"><text:s text:c="6"/>| <text:s text:c="5"/><text:span text:style-name="T216">^~~~</text:span> <text:s text:c="57"/></text:p>
            <text:p text:style-name="P231"><text:span text:style-name="T215">hello.c:</text:span> In function ‘<text:span text:style-name="T215">main</text:span>’: <text:s text:c="46"/></text:p>
            <text:p text:style-name="P231"><text:span text:style-name="T215">hello.c:5:13:</text:span> <text:span text:style-name="T216">warning: </text:span>unused variable ‘<text:span text:style-name="T215">x</text:span>’ [<text:span text:style-name="T217">-Wunused-variable</text:span>] <text:s text:c="12"/></text:p>
            <text:p text:style-name="P231"><text:s text:c="4"/>5 | <text:s text:c="8"/>int <text:span text:style-name="T216">x</text:span>; <text:s text:c="52"/></text:p>
            <text:p text:style-name="P232"><text:span text:style-name="T218"><text:s text:c="6"/>| <text:s text:c="12"/></text:span><text:span text:style-name="T219">^</text:span><text:span text:style-name="T218"> <text:s text:c="7"/></text:span></text:p>
            <text:p text:style-name="P233"><text:span text:style-name="T103">[</text:span><text:a xlink:type="simple" xlink:href="mailto:linux@base" text:style-name="Internet_20_link" text:visited-style-name="Visited_20_Internet_20_Link"><text:span text:style-name="T103">linux@basis</text:span></text:a><text:span text:style-name="T103">] </text:span></text:p>
          </table:table-cell>
        </table:table-row>
      </table:table>
      <text:p text:style-name="P218"/>
      <text:p text:style-name="P219"><text:span text:style-name="T220">The compiler displays </text:span><text:span text:style-name="T221">two</text:span><text:span text:style-name="T220"> warning</text:span><text:span text:style-name="T221">s:</text:span></text:p>
      <text:p text:style-name="P234"/>
      <text:list text:style-name="L1">
        <text:list-item>
          <text:p text:style-name="P235"><text:span text:style-name="T221">The return type of the </text:span><text:span text:style-name="T222">main</text:span><text:span text:style-name="T221"> is not </text:span><text:span text:style-name="T222">int</text:span><text:span text:style-name="T221"> (we did not specify a value to </text:span><text:span text:style-name="T222">return</text:span><text:span text:style-name="T221">)</text:span></text:p>
        </text:list-item>
        <text:list-item>
          <text:p text:style-name="P235"><text:span text:style-name="T221">The </text:span><text:span text:style-name="T222">x</text:span><text:span text:style-name="T221"> variable is not used (we did not initialized it nor used it)</text:span></text:p>
          <text:p text:style-name="P236"/>
        </text:list-item>
      </text:list>
      <text:p text:style-name="P219"><text:span text:style-name="T220">The </text:span><text:span text:style-name="T203">--Wall</text:span><text:span text:style-name="T220"> option evaluates many control flags</text:span><text:span text:style-name="T220"><text:note text:id="ftn10" text:note-class="footnote"><text:note-citation>10</text:note-citation><text:note-body><text:p text:style-name="P237"><text:span text:style-name="T223">For a complete list see the </text:span><text:span text:style-name="T224">gcc(1)</text:span><text:span text:style-name="T206"> </text:span><text:span text:style-name="T223">manual </text:span><text:span text:style-name="T206">page</text:span></text:p></text:note-body></text:note></text:span><text:span text:style-name="T220"> </text:span><text:span text:style-name="T225">of the code</text:span><text:span text:style-name="T226">.</text:span></text:p>
      <text:p text:style-name="P238"/>
      <text:p text:style-name="P113"><text:soft-page-break/><text:span text:style-name="T226">Another </text:span><text:span text:style-name="T221">option for </text:span><text:span text:style-name="T226">warning analysis </text:span><text:span text:style-name="T227">is</text:span><text:span text:style-name="T226"> </text:span><text:span text:style-name="T203">-Wextra</text:span><text:span text:style-name="T226"> which enables some checks not included in </text:span><text:span text:style-name="T203">-Wall</text:span><text:span text:style-name="T226"> such as for example the comparison of a pointer with the value </text:span><text:span text:style-name="T203">0</text:span><text:span text:style-name="T226"> using the operators </text:span><text:span text:style-name="T203">&lt;</text:span><text:span text:style-name="T226">, </text:span><text:span text:style-name="T203">&lt;=</text:span><text:span text:style-name="T226">, </text:span><text:span text:style-name="T203">&gt;</text:span><text:span text:style-name="T226">, </text:span><text:span text:style-name="T203">&gt;=</text:span><text:span text:style-name="T226">.</text:span></text:p>
      <text:p text:style-name="P239"/>
      <text:p text:style-name="P113"><text:span text:style-name="T228">T</text:span><text:span text:style-name="T226">he </text:span><text:span text:style-name="T229">h</text:span><text:span text:style-name="T203">ello</text:span><text:span text:style-name="T229">pointer</text:span><text:span text:style-name="T203">.c</text:span><text:span text:style-name="T226"> program </text:span><text:span text:style-name="T228">compares a pointer with </text:span><text:span text:style-name="T203">0</text:span></text:p>
      <text:p text:style-name="P223"/>
      <text:p text:style-name="P224"><text:span text:style-name="T32">#include </text:span><text:span text:style-name="T33">&lt;stdio.h&gt;</text:span></text:p>
      <text:p text:style-name="P225"/>
      <text:p text:style-name="P226"><text:span text:style-name="T32">int</text:span> main(<text:span text:style-name="T32">int</text:span> argc, <text:span text:style-name="T32">char</text:span> *argv<text:span text:style-name="T32">[]</text:span>)</text:p>
      <text:p text:style-name="P226">{</text:p>
      <text:p text:style-name="P226"><text:span text:style-name="T32"><text:tab/>int</text:span> x = <text:span text:style-name="T230">4</text:span>;</text:p>
      <text:p text:style-name="P226"><text:span text:style-name="T32"><text:tab/>int</text:span> *y;</text:p>
      <text:p text:style-name="P226"><text:tab/>y = &amp;x;</text:p>
      <text:p text:style-name="P226"><text:span text:style-name="T32"><text:tab/>if</text:span> (y &gt; <text:span text:style-name="T230">0</text:span>)</text:p>
      <text:p text:style-name="P226"><text:tab/><text:tab/>printf (<text:span text:style-name="T33">"Hello, world!"</text:span>);</text:p>
      <text:p text:style-name="P226"><text:span text:style-name="T32"><text:tab/>return</text:span> <text:span text:style-name="T230">0</text:span>;</text:p>
      <text:p text:style-name="P226">}</text:p>
      <text:p text:style-name="P223"/>
      <text:p text:style-name="P240"><text:span text:style-name="T231">h</text:span><text:span text:style-name="T153">ello</text:span><text:span text:style-name="T232">pointer</text:span><text:span text:style-name="T153">.c</text:span> <text:span text:style-name="T233">Compare a pointer with the value 0</text:span></text:p>
      <text:p text:style-name="P240"/>
      <text:p text:style-name="P219"><text:span text:style-name="T234">Let’s compile with </text:span><text:span text:style-name="T203">-Wall</text:span></text:p>
      <text:p text:style-name="P241"/>
      <table:table table:name="Table7" table:style-name="Table7">
        <table:table-column table:style-name="Table7.A"/>
        <table:table-row>
          <table:table-cell table:style-name="Table7.A1" office:value-type="string">
            <text:p text:style-name="P219"><text:span text:style-name="T103">[</text:span><text:a xlink:type="simple" xlink:href="mailto:linux@base" text:style-name="Internet_20_link" text:visited-style-name="Visited_20_Internet_20_Link"><text:span text:style-name="T103">linux@basis</text:span></text:a><text:span text:style-name="T103">] gcc -Wall -o </text:span><text:span text:style-name="T235">h</text:span><text:span text:style-name="T103">ello</text:span><text:span text:style-name="T235">pointer</text:span><text:span text:style-name="T103"> </text:span><text:span text:style-name="T235">h</text:span><text:span text:style-name="T103">ello</text:span><text:span text:style-name="T235">pointer</text:span><text:span text:style-name="T103">.c</text:span></text:p>
            <text:p text:style-name="P218"/>
            <text:p text:style-name="P219"><text:span text:style-name="T103">[</text:span><text:a xlink:type="simple" xlink:href="mailto:linux@base" text:style-name="Internet_20_link" text:visited-style-name="Visited_20_Internet_20_Link"><text:span text:style-name="T103">linux@basis</text:span></text:a><text:span text:style-name="T103">] </text:span></text:p>
          </table:table-cell>
        </table:table-row>
      </table:table>
      <text:p text:style-name="P218"><text:span text:style-name="T236">Now </text:span><text:span text:style-name="T237">compile with</text:span> <text:span text:style-name="T15">-Wextra</text:span></text:p>
      <text:p text:style-name="P241"/>
      <table:table table:name="Table8" table:style-name="Table8">
        <table:table-column table:style-name="Table8.A"/>
        <table:table-row table:style-name="Table8.1">
          <table:table-cell table:style-name="Table8.A1" office:value-type="string">
            <text:p text:style-name="P219"><text:span text:style-name="T103">[</text:span><text:a xlink:type="simple" xlink:href="mailto:linux@base" text:style-name="Internet_20_link" text:visited-style-name="Visited_20_Internet_20_Link"><text:span text:style-name="T103">linux@basis</text:span></text:a><text:span text:style-name="T103">] gcc -Wextra -o hello</text:span><text:span text:style-name="T235">pointer</text:span><text:span text:style-name="T103"> hello</text:span><text:span text:style-name="T235">pointer</text:span><text:span text:style-name="T103">.c</text:span></text:p>
            <text:p text:style-name="P230"><text:span text:style-name="T215">hellopointer.c:</text:span> In function ‘<text:span text:style-name="T215">main</text:span>’: <text:s text:c="39"/></text:p>
            <text:p text:style-name="P242"><text:span text:style-name="T215">hellopointer.c:8:15:</text:span> <text:span text:style-name="T216">warning: </text:span>ordered comparison of pointer with integer ze</text:p>
            <text:p text:style-name="P242">ro [<text:span text:style-name="T217">-Wextra</text:span>] <text:s text:c="62"/></text:p>
            <text:p text:style-name="P242"><text:s text:c="4"/>8 | <text:s text:c="8"/>if (y <text:span text:style-name="T216">&gt;</text:span> 0) <text:s text:c="48"/></text:p>
            <text:p text:style-name="P243"><text:s text:c="6"/>| <text:s text:c="9"/></text:p>
            <text:p text:style-name="P244"><text:span text:style-name="T103">[</text:span><text:a xlink:type="simple" xlink:href="mailto:linux@basis" text:style-name="Internet_20_link" text:visited-style-name="Visited_20_Internet_20_Link"><text:span text:style-name="T103">linux@basis</text:span></text:a><text:span text:style-name="T103">] </text:span></text:p>
          </table:table-cell>
        </table:table-row>
      </table:table>
      <text:p text:style-name="P218"/>
      <text:p text:style-name="P113"><text:span text:style-name="T103">The --</text:span><text:span text:style-name="T238">Wextra</text:span><text:span text:style-name="T103"> option detects the comparison between the pointer and the value </text:span><text:span text:style-name="T203">0</text:span><text:span text:style-name="T103">. </text:span></text:p>
      <text:p text:style-name="P222"/>
      <text:p text:style-name="P113"><text:span text:style-name="T239">The </text:span><text:span text:style-name="T238">-g</text:span><text:span text:style-name="T239"> option causes </text:span><text:span text:style-name="T238">gcc</text:span><text:span text:style-name="T239"> to include debugging information in the executable file. This information is entered in the native format of the system on which the compilation is performed. The </text:span><text:span text:style-name="T238">gdb</text:span><text:span text:style-name="T239"> program can use this information. If you are sure you are using </text:span><text:span text:style-name="T238">gdb</text:span><text:span text:style-name="T239"> as a debugging tool you can use the </text:span><text:span text:style-name="T238">-ggdb</text:span><text:span text:style-name="T239"> option which includes debug information for use with </text:span><text:span text:style-name="T238">gdb</text:span><text:span text:style-name="T239">. Among the debug information is the source code of the program.</text:span></text:p>
      <text:p text:style-name="P245"/>
      <text:p text:style-name="P113"><text:span text:style-name="T239">The </text:span><text:span text:style-name="T238">hello</text:span><text:span text:style-name="T240">pointer</text:span><text:span text:style-name="T238">.c</text:span><text:span text:style-name="T239"> program compiled with the </text:span><text:span text:style-name="T238">-g</text:span><text:span text:style-name="T239"> option and passed to </text:span><text:span text:style-name="T238">gdb</text:span><text:span text:style-name="T239"> for debugging.</text:span></text:p>
      <text:p text:style-name="P246"/>
      <table:table table:name="Table9" table:style-name="Table9">
        <table:table-column table:style-name="Table9.A"/>
        <text:soft-page-break/>
        <table:table-row>
          <table:table-cell table:style-name="Table9.A1" office:value-type="string">
            <text:p text:style-name="P247"><text:span text:style-name="T103">[</text:span><text:a xlink:type="simple" xlink:href="mailto:linux@base" text:style-name="Internet_20_link" text:visited-style-name="Visited_20_Internet_20_Link"><text:span text:style-name="T103">linux@basis</text:span></text:a><text:span text:style-name="T103">] gcc -Wall -g -o </text:span><text:span text:style-name="T241">h</text:span><text:span text:style-name="T103">ello</text:span><text:span text:style-name="T242">pointer</text:span><text:span text:style-name="T103"> </text:span><text:span text:style-name="T241">h</text:span><text:span text:style-name="T103">ello</text:span><text:span text:style-name="T242">pointer</text:span><text:span text:style-name="T103">.c</text:span></text:p>
            <text:p text:style-name="P248"/>
            <text:p text:style-name="P247"><text:span text:style-name="T103">[</text:span><text:a xlink:type="simple" xlink:href="mailto:linux@base" text:style-name="Internet_20_link" text:visited-style-name="Visited_20_Internet_20_Link"><text:span text:style-name="T103">linux@basis</text:span></text:a><text:span text:style-name="T103">] gdb -q ./</text:span><text:span text:style-name="T241">h</text:span><text:span text:style-name="T103">ello</text:span><text:span text:style-name="T242">pointer</text:span></text:p>
            <text:p text:style-name="P249"/>
            <text:p text:style-name="P250">Reading symbols from <text:span text:style-name="T243">./hellopointer</text:span>... <text:s text:c="36"/></text:p>
            <text:p text:style-name="P251">(gdb) list <text:s text:c="64"/></text:p>
            <text:p text:style-name="P252">1 <text:s text:c="6"/><text:span text:style-name="T244">#include</text:span> <text:span text:style-name="T245">&lt;stdio.h&gt;</text:span> <text:s text:c="48"/></text:p>
            <text:p text:style-name="P252">2 <text:s text:c="73"/></text:p>
            <text:p text:style-name="P253"><text:span text:style-name="T246">3 <text:s text:c="6"/></text:span><text:span text:style-name="T247">int</text:span><text:span text:style-name="T246"> </text:span><text:span text:style-name="T248">main</text:span><text:span text:style-name="T249">(</text:span><text:span text:style-name="T247">int</text:span><text:span text:style-name="T246"> argc</text:span><text:span text:style-name="T249">,</text:span><text:span text:style-name="T246"> </text:span><text:span text:style-name="T247">char</text:span><text:span text:style-name="T246"> </text:span><text:span text:style-name="T249">*</text:span><text:span text:style-name="T246">argv</text:span><text:span text:style-name="T249">[])</text:span><text:span text:style-name="T246"> <text:s text:c="34"/></text:span></text:p>
            <text:p text:style-name="P252">4 <text:s text:c="6"/><text:span text:style-name="T245">{</text:span> <text:s text:c="65"/></text:p>
            <text:p text:style-name="P253"><text:span text:style-name="T246">5 <text:s text:c="14"/></text:span><text:span text:style-name="T247">int</text:span><text:span text:style-name="T246"> x </text:span><text:span text:style-name="T249">=</text:span><text:span text:style-name="T246"> </text:span><text:span text:style-name="T250">4</text:span><text:span text:style-name="T249">;</text:span><text:span text:style-name="T246"> <text:s text:c="48"/></text:span></text:p>
            <text:p text:style-name="P253"><text:span text:style-name="T246">6 <text:s text:c="14"/></text:span><text:span text:style-name="T247">int</text:span><text:span text:style-name="T246"> </text:span><text:span text:style-name="T249">*</text:span><text:span text:style-name="T246">y</text:span><text:span text:style-name="T249">;</text:span><text:span text:style-name="T246"> <text:s text:c="51"/></text:span></text:p>
            <text:p text:style-name="P252">7 <text:s text:c="14"/>y <text:span text:style-name="T245">=</text:span> <text:span text:style-name="T245">&amp;</text:span>x<text:span text:style-name="T245">;</text:span> <text:s text:c="51"/></text:p>
            <text:p text:style-name="P252">8 <text:s text:c="14"/><text:span text:style-name="T244">if</text:span> <text:span text:style-name="T245">(</text:span>y <text:span text:style-name="T245">&gt;</text:span> <text:span text:style-name="T251">0</text:span><text:span text:style-name="T245">)</text:span> <text:s text:c="48"/></text:p>
            <text:p text:style-name="P252">9 <text:s text:c="22"/><text:span text:style-name="T215">printf</text:span> <text:span text:style-name="T245">("Hello, world!");</text:span> <text:s text:c="25"/></text:p>
            <text:p text:style-name="P252">10 <text:s text:c="13"/><text:span text:style-name="T244">return</text:span> <text:span text:style-name="T251">0</text:span><text:span text:style-name="T245">;</text:span> <text:s text:c="49"/></text:p>
            <text:p text:style-name="P254">(gdb)</text:p>
          </table:table-cell>
        </table:table-row>
      </table:table>
      <text:p text:style-name="P255"/>
      <text:p text:style-name="P113"><text:span text:style-name="T241">With</text:span><text:span text:style-name="T252"> the </text:span><text:span text:style-name="T253">l</text:span><text:span text:style-name="T238">ist</text:span><text:span text:style-name="T252"> command </text:span><text:span text:style-name="T241">of </text:span><text:span text:style-name="T238">gdb</text:span><text:span text:style-name="T241"> we can</text:span><text:span text:style-name="T252"> view the source code </text:span><text:span text:style-name="T241">t</text:span><text:span text:style-name="T252">hat has been inserted into the executable file </text:span><text:span text:style-name="T241">thanks to the</text:span><text:span text:style-name="T252"> </text:span><text:span text:style-name="T238">-g</text:span><text:span text:style-name="T252"> option </text:span><text:span text:style-name="T241">passed to </text:span><text:span text:style-name="T238">gcc</text:span><text:span text:style-name="T241">.</text:span></text:p>
      <text:p text:style-name="P113"><text:span text:style-name="Source_20_Text"><text:span text:style-name="T238">gcc</text:span></text:span><text:span text:style-name="T254"> provides several debugging options, including options that specify the amount of debugging information to include in the executable file</text:span><text:span text:style-name="T254"><text:note text:id="ftn11" text:note-class="footnote"><text:note-citation>11</text:note-citation><text:note-body><text:p text:style-name="P256"><text:span text:style-name="T255">See the </text:span><text:span text:style-name="T256">gcc</text:span><text:span text:style-name="T257">(1)</text:span><text:span text:style-name="T258"> manual page</text:span></text:p></text:note-body></text:note></text:span><text:span text:style-name="T254">. </text:span><text:span text:style-name="T259">Levels range from 0 (no debug information) to 3 (debu</text:span><text:span text:style-name="T260">g</text:span><text:span text:style-name="T259"> detailed information), </text:span><text:span text:style-name="T241">t</text:span><text:span text:style-name="T259">he default level is 2. The level of information to be entered can be specified by placing the relative number alongside the </text:span><text:span text:style-name="T238">-g</text:span><text:span text:style-name="T259"> option (e.g. </text:span><text:span text:style-name="T238">-g3</text:span><text:span text:style-name="T259">). Obviously the size of the executable file changes according to the </text:span><text:span text:style-name="T241">selected</text:span><text:span text:style-name="T259"> level.</text:span></text:p>
      <text:p text:style-name="P257"/>
      <table:table table:name="Table10" table:style-name="Table10">
        <table:table-column table:style-name="Table10.A"/>
        <table:table-row>
          <table:table-cell table:style-name="Table10.A1" office:value-type="string">
            <text:p text:style-name="P258"><text:span text:style-name="T103">[</text:span><text:a xlink:type="simple" xlink:href="mailto:linux@base" text:style-name="Internet_20_link" text:visited-style-name="Visited_20_Internet_20_Link"><text:span text:style-name="T103">linux@basis</text:span></text:a><text:span text:style-name="T103">] gcc -Wall </text:span><text:span text:style-name="T209">-g1</text:span><text:span text:style-name="T103"> -</text:span><text:span text:style-name="T261">o </text:span><text:span text:style-name="T262">h</text:span><text:span text:style-name="T103">ello</text:span><text:span text:style-name="T261">pointer</text:span><text:span text:style-name="T103"> </text:span><text:span text:style-name="T262">h</text:span><text:span text:style-name="T103">ello</text:span><text:span text:style-name="T261">pointer</text:span><text:span text:style-name="T103">.c</text:span></text:p>
            <text:p text:style-name="P259"/>
            <text:p text:style-name="P258"><text:span text:style-name="T103">[</text:span><text:a xlink:type="simple" xlink:href="mailto:linux@base" text:style-name="Internet_20_link" text:visited-style-name="Visited_20_Internet_20_Link"><text:span text:style-name="T103">linux@basis</text:span></text:a><text:span text:style-name="T103">] ls -l </text:span><text:span text:style-name="T262">h</text:span><text:span text:style-name="T103">ello</text:span><text:span text:style-name="T261">pointer</text:span></text:p>
            <text:p text:style-name="P259">-rwxrwxr-x 1 <text:span text:style-name="T263">basis</text:span> <text:span text:style-name="T263">basis</text:span> <text:span text:style-name="T153">16920</text:span> Oct <text:s/>1 20:38 hellopointer <text:s text:c="18"/></text:p>
            <text:p text:style-name="P259"/>
            <text:p text:style-name="P258"><text:span text:style-name="T103">[</text:span><text:a xlink:type="simple" xlink:href="mailto:linux@base" text:style-name="Internet_20_link" text:visited-style-name="Visited_20_Internet_20_Link"><text:span text:style-name="T103">linux@basis</text:span></text:a><text:span text:style-name="T103">] gcc -Wall </text:span><text:span text:style-name="T209">-g3</text:span><text:span text:style-name="T103"> -</text:span><text:span text:style-name="T261">o </text:span><text:span text:style-name="T262">h</text:span><text:span text:style-name="T103">ello</text:span><text:span text:style-name="T261">pointer</text:span><text:span text:style-name="T103"> </text:span><text:span text:style-name="T262">h</text:span><text:span text:style-name="T103">ello</text:span><text:span text:style-name="T261">pointer</text:span><text:span text:style-name="T103">.c</text:span></text:p>
            <text:p text:style-name="P259"/>
            <text:p text:style-name="P258"><text:span text:style-name="T103">[</text:span><text:a xlink:type="simple" xlink:href="mailto:linux@base" text:style-name="Internet_20_link" text:visited-style-name="Visited_20_Internet_20_Link"><text:span text:style-name="T103">linux@basis</text:span></text:a><text:span text:style-name="T103">] ls -l </text:span><text:span text:style-name="T262">h</text:span><text:span text:style-name="T103">ello</text:span></text:p>
            <text:p text:style-name="P259">-rwxrwxr-x 1 <text:span text:style-name="T263">basis</text:span> <text:span text:style-name="T263">basis</text:span> <text:span text:style-name="T153">44688</text:span> Oct <text:s/>1 20:39 hellopointer</text:p>
            <text:p text:style-name="P259"/>
          </table:table-cell>
        </table:table-row>
      </table:table>
      <text:p text:style-name="P260"><text:s/></text:p>
      <text:p text:style-name="P113"><text:span text:style-name="T103">The </text:span><text:span text:style-name="T238">-O</text:span><text:span text:style-name="T103"> option allows to optimize </text:span><text:span text:style-name="T262">the</text:span><text:span text:style-name="T103"> code. In this way the goal of the compiler is no longer to reduce the cost of compiling time but to improve the execution performance of the program and to reduce the size of the executable file.</text:span></text:p>
      <text:p text:style-name="P113"><text:span text:style-name="T103">The </text:span><text:span text:style-name="T238">-O</text:span><text:span text:style-name="T103"> option accepts optimization levels 0 to 3. Levels are inclusive in the sense that level 2 contains all optimizations of level 1, and so on.</text:span></text:p>
      <text:p text:style-name="P222">Optimization options are an advanced topic in programming and include elements that are beyond the scope of this book. An example is shown below for information.</text:p>
      <text:p text:style-name="P222"/>
      <text:p text:style-name="P113"><text:span text:style-name="T103">The </text:span><text:span text:style-name="T262">following</text:span><text:span text:style-name="T103"> </text:span><text:span text:style-name="T238">hello</text:span><text:span text:style-name="T264">inc</text:span><text:span text:style-name="T238">.c</text:span><text:span text:style-name="T103"> program increments the variable </text:span><text:span text:style-name="T238">sum</text:span><text:span text:style-name="T103"> on each iteration</text:span></text:p>
      <text:p text:style-name="P223"/>
      <text:p text:style-name="P261"><text:span text:style-name="T32">#include </text:span><text:span text:style-name="T33">&lt;stdio.h&gt;</text:span></text:p>
      <text:p text:style-name="P261"><text:soft-page-break/></text:p>
      <text:p text:style-name="P261"><text:span text:style-name="T32">int</text:span> main(<text:span text:style-name="T32">int</text:span> argc, <text:span text:style-name="T32">char</text:span> *argv<text:span text:style-name="T32">[]</text:span>)</text:p>
      <text:p text:style-name="P261">{</text:p>
      <text:p text:style-name="P261"><text:span text:style-name="T32"><text:tab/>int</text:span> x = <text:span text:style-name="T230">1</text:span>; </text:p>
      <text:p text:style-name="P261"><text:span text:style-name="T32"><text:tab/>int</text:span> sum;</text:p>
      <text:p text:style-name="P261"/>
      <text:p text:style-name="P261"><text:span text:style-name="T32"><text:tab/>for</text:span> (<text:span text:style-name="T32">int</text:span> i=<text:span text:style-name="T230">0</text:span>; i&lt;<text:span text:style-name="T230">1000000000</text:span>; i++) {</text:p>
      <text:p text:style-name="P261"><text:tab/><text:tab/>sum += i;</text:p>
      <text:p text:style-name="P261"><text:tab/><text:tab/>sum += x;</text:p>
      <text:p text:style-name="P261"><text:tab/>}</text:p>
      <text:p text:style-name="P261"><text:span text:style-name="T32"><text:tab/>return</text:span> <text:span text:style-name="T230">0</text:span>;</text:p>
      <text:p text:style-name="P261">}</text:p>
      <text:p text:style-name="P262"/>
      <text:p text:style-name="P240"><text:span text:style-name="T265">h</text:span><text:span text:style-name="T153">ello</text:span><text:span text:style-name="T266">inc</text:span><text:span text:style-name="T153">.c</text:span> <text:span text:style-name="T267">Increments the variabile on each iteration</text:span></text:p>
      <text:p text:style-name="P240"/>
      <text:p text:style-name="P218"><text:span text:style-name="T268">Let’s compile without optimization and execute </text:span><text:span text:style-name="T204">using</text:span><text:span text:style-name="T268"> </text:span><text:span text:style-name="T269">time</text:span><text:span text:style-name="T270"><text:note text:id="ftn12" text:note-class="footnote"><text:note-citation>12</text:note-citation><text:note-body><text:p text:style-name="P263"><text:span text:style-name="T15">time</text:span> <text:span text:style-name="T271">calculates the execution time of a program, </text:span><text:span text:style-name="T204">see the </text:span><text:span text:style-name="T272">time(1POSIX) </text:span><text:span text:style-name="T204">manual page</text:span></text:p></text:note-body></text:note></text:span><text:span text:style-name="T270"> </text:span><text:span text:style-name="T273">to </text:span><text:span text:style-name="T204">look at</text:span><text:span text:style-name="T273"> the execution time</text:span></text:p>
      <text:p text:style-name="P264"/>
      <table:table table:name="Table11" table:style-name="Table11">
        <table:table-column table:style-name="Table11.A"/>
        <table:table-row>
          <table:table-cell table:style-name="Table11.A1" office:value-type="string">
            <text:p text:style-name="P265"><text:span text:style-name="T103">[</text:span><text:a xlink:type="simple" xlink:href="mailto:linux@base" text:style-name="Internet_20_link" text:visited-style-name="Visited_20_Internet_20_Link"><text:span text:style-name="T103">linux@basis</text:span></text:a><text:span text:style-name="T103">] gcc -o </text:span><text:span text:style-name="T262">h</text:span><text:span text:style-name="T103">ello</text:span><text:span text:style-name="T274">inc</text:span><text:span text:style-name="T103"> </text:span><text:span text:style-name="T262">h</text:span><text:span text:style-name="T103">ello</text:span><text:span text:style-name="T274">inc</text:span><text:span text:style-name="T103">.c</text:span></text:p>
            <text:p text:style-name="P266"/>
            <text:p text:style-name="P265"><text:span text:style-name="T103">[</text:span><text:a xlink:type="simple" xlink:href="mailto:linux@base" text:style-name="Internet_20_link" text:visited-style-name="Visited_20_Internet_20_Link"><text:span text:style-name="T103">linux@basis</text:span></text:a><text:span text:style-name="T103">] time ./</text:span><text:span text:style-name="T262">h</text:span><text:span text:style-name="T103">ello</text:span><text:span text:style-name="T274">inc</text:span></text:p>
            <text:p text:style-name="P266"/>
            <text:p text:style-name="P266">real <text:s text:c="3"/>2.42s</text:p>
            <text:p text:style-name="P266">user <text:s text:c="3"/>2.42s</text:p>
            <text:p text:style-name="P266">sys <text:s text:c="4"/>0.00s</text:p>
            <text:p text:style-name="P266">cpu <text:s text:c="4"/>99%</text:p>
          </table:table-cell>
        </table:table-row>
      </table:table>
      <text:p text:style-name="P267"/>
      <text:p text:style-name="P267"><text:span text:style-name="T275">Let’s compile </text:span><text:span text:style-name="T276">passing</text:span><text:span text:style-name="T275"> the optimization level</text:span> 3</text:p>
      <text:p text:style-name="P267"/>
      <table:table table:name="Table12" table:style-name="Table12">
        <table:table-column table:style-name="Table12.A"/>
        <table:table-row>
          <table:table-cell table:style-name="Table12.A1" office:value-type="string">
            <text:p text:style-name="P268"><text:span text:style-name="T103">[</text:span><text:a xlink:type="simple" xlink:href="mailto:linux@base" text:style-name="Internet_20_link" text:visited-style-name="Visited_20_Internet_20_Link"><text:span text:style-name="T103">linux@basis</text:span></text:a><text:span text:style-name="T103">] gcc -O3 -</text:span><text:span text:style-name="T277">o h</text:span><text:span text:style-name="T103">ello</text:span><text:span text:style-name="T278">inc</text:span><text:span text:style-name="T103"> </text:span><text:span text:style-name="T277">h</text:span><text:span text:style-name="T103">ello</text:span><text:span text:style-name="T278">inc</text:span><text:span text:style-name="T103">.c</text:span></text:p>
            <text:p text:style-name="P269"/>
            <text:p text:style-name="P270"><text:span text:style-name="T103">[</text:span><text:a xlink:type="simple" xlink:href="mailto:linux@base" text:style-name="Internet_20_link" text:visited-style-name="Visited_20_Internet_20_Link"><text:span text:style-name="T103">linux@basis</text:span></text:a><text:span text:style-name="T103">] time ./</text:span><text:span text:style-name="T277">h</text:span><text:span text:style-name="T103">ello</text:span><text:span text:style-name="T279">inc</text:span></text:p>
            <text:p text:style-name="P271"/>
            <text:p text:style-name="P271">real <text:s text:c="4"/>0.00s</text:p>
            <text:p text:style-name="P271">user <text:s text:c="3"/>0.00s</text:p>
            <text:p text:style-name="P271">sys <text:s text:c="4"/>0.00s</text:p>
            <text:p text:style-name="P271">cpu <text:s text:c="4"/>80%</text:p>
            <text:p text:style-name="P271"/>
          </table:table-cell>
        </table:table-row>
      </table:table>
      <text:p text:style-name="P272"/>
      <text:p text:style-name="P113"><text:span text:style-name="T268">Execution time and CPU usage decreased significantly after enabling compiler optimizations. However, this test is not entirely reliable, since the results may be influenced by factors such as system load, cache usage, background processes, compiler optimizations, and variations in hardware resource allocation during execution. In some cases, the compiler may also optimize away parts of the code that are not essential to the program output. Readers are encouraged to test programs compiled with different optimization levels in various contexts and compare their execution times using the </text:span><text:span text:style-name="Source_20_Text"><text:span text:style-name="T280">time</text:span></text:span><text:span text:style-name="T268"> command.</text:span></text:p>
      <text:p text:style-name="P113"/>
      <text:p text:style-name="P113"/>
      <text:p text:style-name="P113"/>
      <text:p text:style-name="P273"><text:soft-page-break/><text:span text:style-name="T281">0.</text:span><text:span text:style-name="T54">2</text:span><text:span text:style-name="T281">.</text:span><text:span text:style-name="T54">4</text:span><text:span text:style-name="T281"> </text:span>The <text:span text:style-name="T282">GNU L</text:span>inker: <text:span text:style-name="T283">ld</text:span></text:p>
      <text:p text:style-name="P274"/>
      <text:p text:style-name="P275"><text:span text:style-name="T284">The dynamic linker (</text:span><text:span text:style-name="Source_20_Text"><text:span text:style-name="T285">/usr/bin/ld.so</text:span></text:span><text:span text:style-name="T284"> or </text:span><text:span text:style-name="Source_20_Text"><text:span text:style-name="T285">/lib/ld-linux.so.2</text:span></text:span><text:span text:style-name="T284">) is responsible for locating and loading the shared objects (shared libraries) required by a program, preparing it for execution, and then starting it. Linux binaries typically use dynamic linking (linking at run time) unless the </text:span><text:span text:style-name="Source_20_Text"><text:span text:style-name="T285">-static</text:span></text:span><text:span text:style-name="T284"> option is specified during compilation.</text:span></text:p>
      <text:p text:style-name="P275"><text:span text:style-name="T284">The program </text:span><text:span text:style-name="Source_20_Text"><text:span text:style-name="T285">ld.so</text:span></text:span><text:span text:style-name="T284"> handles a.out binaries, an older binary format. The program </text:span><text:span text:style-name="Source_20_Text"><text:span text:style-name="T285">ld-linux.so</text:span></text:span><text:span text:style-name="Source_20_Text"><text:span text:style-name="T284">*</text:span></text:span><text:span text:style-name="T284"> (such as </text:span><text:span text:style-name="Source_20_Text"><text:span text:style-name="T285">/lib/ld-linux.so.1</text:span></text:span><text:span text:style-name="T284"> for libc5 and </text:span><text:span text:style-name="Source_20_Text"><text:span text:style-name="T285">/lib/ld-linux.so.2</text:span></text:span><text:span text:style-name="T284"> for glibc2) handles binaries in the more modern ELF format.</text:span></text:p>
      <text:p text:style-name="P275"><text:span text:style-name="T284">Usually, </text:span><text:span text:style-name="Source_20_Text"><text:span text:style-name="T285">gcc</text:span></text:span><text:span text:style-name="T284"> automatically invokes the dynamic linker to link the executable with the shared libraries, but linking can also be performed separately.</text:span></text:p>
      <text:p text:style-name="P274"/>
      <text:p text:style-name="P275"><text:span text:style-name="T284">To compile a program without linking we can use the </text:span><text:span text:style-name="T285">-</text:span><text:span text:style-name="T286">c</text:span><text:span text:style-name="T284"> option of </text:span><text:span text:style-name="T285">gcc</text:span><text:span text:style-name="T284"> </text:span></text:p>
      <text:p text:style-name="P274"/>
      <table:table table:name="Table85" table:style-name="Table85">
        <table:table-column table:style-name="Table85.A"/>
        <table:table-row>
          <table:table-cell table:style-name="Table85.A1" office:value-type="string">
            <text:p text:style-name="P276">[<text:a xlink:type="simple" xlink:href="mailto:linux@base" text:style-name="Internet_20_link" text:visited-style-name="Visited_20_Internet_20_Link">linux@basis</text:a>] <text:span text:style-name="T182">gcc -</text:span><text:span text:style-name="T284">c</text:span><text:span text:style-name="T182"> hello.</text:span><text:span text:style-name="T284">c -o</text:span><text:span text:style-name="T182"> </text:span><text:span text:style-name="T284">h</text:span><text:span text:style-name="T182">ello.</text:span><text:span text:style-name="T284">o</text:span><text:span text:style-name="T182"> </text:span></text:p>
            <text:p text:style-name="P276"/>
          </table:table-cell>
        </table:table-row>
      </table:table>
      <text:p text:style-name="P274"/>
      <text:p text:style-name="P275"><text:span text:style-name="T287">The resulting file (</text:span><text:span text:style-name="T285">hello.o</text:span><text:span text:style-name="T287">) is an object file containing the machine code without any entry point to shared libraries.</text:span></text:p>
      <text:p text:style-name="P275"><text:span text:style-name="Source_20_Text"><text:span text:style-name="T288">To link this file to the required shared libraries, we need to be familiar with the following options of the </text:span></text:span><text:span text:style-name="Source_20_Text"><text:span text:style-name="T285">ld</text:span></text:span><text:span text:style-name="Source_20_Text"><text:span text:style-name="T288"> program (the GNU linker).</text:span></text:span><text:span text:style-name="Source_20_Text"><text:span text:style-name="T288"><text:note text:id="ftn13" text:note-class="footnote"><text:note-citation>13</text:note-citation><text:note-body><text:p text:style-name="P277"><text:span text:style-name="T284">See the </text:span><text:span text:style-name="T285">ld(1)</text:span><text:span text:style-name="T289"> manual page</text:span></text:p></text:note-body></text:note></text:span></text:span></text:p>
      <text:p text:style-name="P275"><text:span text:style-name="Source_20_Text"><text:span text:style-name="T288"/></text:span></text:p>
      <text:p text:style-name="P278"><text:span text:style-name="Source_20_Text"><text:span text:style-name="T285">-lc<text:tab/><text:tab/><text:tab/><text:tab/><text:tab/></text:span></text:span><text:span text:style-name="Source_20_Text"><text:span text:style-name="T288">Link to the C standard library</text:span></text:span></text:p>
      <text:p text:style-name="P278"><text:span text:style-name="Source_20_Text"><text:span text:style-name="T285">-dynamic-linker<text:tab/><text:tab/></text:span></text:span><text:span text:style-name="Source_20_Text"><text:span text:style-name="T288">Specify the dynamic linker</text:span></text:span></text:p>
      <text:p text:style-name="P278"><text:span text:style-name="Source_20_Text"><text:span text:style-name="T15">-e main<text:tab/><text:tab/><text:tab/><text:tab/></text:span></text:span><text:span text:style-name="Source_20_Text"><text:span text:style-name="T288">Specify the entry symbol</text:span></text:span></text:p>
      <text:p text:style-name="P279"><text:span text:style-name="Source_20_Text"><text:span text:style-name="T285">crt1.o, crti.o, crtn.o<text:tab/></text:span></text:span><text:span text:style-name="Source_20_Text"><text:span text:style-name="T288">C runtime startup code</text:span></text:span></text:p>
      <text:p text:style-name="P279"><text:span text:style-name="Source_20_Text"><text:span text:style-name="T290"/></text:span></text:p>
      <text:p text:style-name="P278"><text:span text:style-name="T287">Let’s link the </text:span><text:span text:style-name="Source_20_Text"><text:span text:style-name="T285">hello.o</text:span></text:span><text:span text:style-name="T287"> file </text:span></text:p>
      <text:p text:style-name="P274"/>
      <table:table table:name="Table87" table:style-name="Table87">
        <table:table-column table:style-name="Table87.A"/>
        <table:table-row>
          <table:table-cell table:style-name="Table87.A1" office:value-type="string">
            <text:p text:style-name="P280">[<text:a xlink:type="simple" xlink:href="mailto:linux@base" text:style-name="Internet_20_link" text:visited-style-name="Visited_20_Internet_20_Link">linux@basis</text:a>] ld hello.o -o hello -lc -dynamic-linker /lib64/ld-linux-x86-64.so.2 -e main /usr/lib/x86_64-linux-gnu/crt1.o /usr/lib/x86_64-linux-gnu/crti.o /usr/lib/x86_64-linux-gnu/crtn.o</text:p>
            <text:p text:style-name="P280"/>
          </table:table-cell>
        </table:table-row>
      </table:table>
      <text:p text:style-name="P274"/>
      <text:p text:style-name="P281"><text:span text:style-name="T291">A</text:span><text:span text:style-name="T292">nd execute </text:span></text:p>
      <text:p text:style-name="P282"/>
      <table:table table:name="Table88" table:style-name="Table88">
        <table:table-column table:style-name="Table88.A"/>
        <table:table-row>
          <table:table-cell table:style-name="Table88.A1" office:value-type="string">
            <text:p text:style-name="P283">[<text:a xlink:type="simple" xlink:href="mailto:linux@base" text:style-name="Internet_20_link" text:visited-style-name="Visited_20_Internet_20_Link">linux@basis</text:a>] ./<text:span text:style-name="T293">hello</text:span></text:p>
            <text:p text:style-name="P283">Hello, <text:span text:style-name="T147">world</text:span>!</text:p>
          </table:table-cell>
        </table:table-row>
      </table:table>
      <text:p text:style-name="P282"/>
      <text:p text:style-name="P284"/>
      <text:p text:style-name="P284"/>
      <text:p text:style-name="P284"/>
      <text:p text:style-name="P284"/>
      <text:p text:style-name="P284"/>
      <text:p text:style-name="P284"/>
      <text:p text:style-name="P284"/>
      <text:p text:style-name="P285"><text:soft-page-break/><text:span text:style-name="T62">0.</text:span><text:span text:style-name="T54">2</text:span><text:span text:style-name="T62">.</text:span><text:span text:style-name="T54">5</text:span><text:span text:style-name="T62"> </text:span><text:span text:style-name="T63">Executable files</text:span></text:p>
      <text:p text:style-name="P286"/>
      <text:p text:style-name="P287"><text:span text:style-name="T294">On Linux, the standard format for executable files is ELF (</text:span><text:span text:style-name="T295">Executable and Linkable Format</text:span><text:span text:style-name="T294">). Using the </text:span><text:span text:style-name="Source_20_Text"><text:span text:style-name="T285">file</text:span></text:span><text:span text:style-name="Source_20_Text"><text:span text:style-name="T285"><text:note text:id="ftn14" text:note-class="footnote"><text:note-citation>14</text:note-citation><text:note-body><text:p text:style-name="P288"><text:span text:style-name="T296">See the</text:span><text:span text:style-name="T297"> </text:span><text:span text:style-name="T298">file(1)</text:span><text:span text:style-name="T296"> m</text:span><text:span text:style-name="T297">anual page</text:span></text:p></text:note-body></text:note></text:span></text:span><text:span text:style-name="T294"> program, you can determine the type of a file.</text:span></text:p>
      <text:p text:style-name="P286"/>
      <table:table table:name="Table25" table:style-name="Table25">
        <table:table-column table:style-name="Table25.A"/>
        <table:table-row>
          <table:table-cell table:style-name="Table25.A1" office:value-type="string">
            <text:p text:style-name="P289">[<text:a xlink:type="simple" xlink:href="mailto:linux@base" text:style-name="Internet_20_link" text:visited-style-name="Visited_20_Internet_20_Link">linux@basis</text:a>] file <text:span text:style-name="T147">h</text:span>ello.c</text:p>
            <text:p text:style-name="P289"><text:span text:style-name="T147">h</text:span>ello.c: <text:span text:style-name="T124">C source, ASCII text</text:span></text:p>
            <text:p text:style-name="P289"/>
            <text:p text:style-name="P289">[<text:a xlink:type="simple" xlink:href="mailto:linux@base" text:style-name="Internet_20_link" text:visited-style-name="Visited_20_Internet_20_Link">linux@basis</text:a>] file <text:span text:style-name="T147">h</text:span>ello</text:p>
            <text:p text:style-name="P290"><text:span text:style-name="T147">h</text:span>ello: ELF 64-bit LSB pie executable, x86-64, version 1 (SYSV), dynamically linked, interpreter /lib64/ld-linux-x86-64.so.2, BuildID[sha1]=dfb6ddef98a884e5d6caf63dc66e9d014e8ad9ea, for GNU/Linux 3.2.0, not stripped</text:p>
          </table:table-cell>
        </table:table-row>
      </table:table>
      <text:p text:style-name="P291"/>
      <text:p text:style-name="P287"><text:span text:style-name="T299">The </text:span><text:span text:style-name="Source_20_Text"><text:span text:style-name="T285">hello.c</text:span></text:span><text:span text:style-name="T299"> file is a text file. The </text:span><text:span text:style-name="Source_20_Text"><text:span text:style-name="T285">hello</text:span></text:span><text:span text:style-name="T299"> file is an executable file in ELF format. The following are the values returned by the </text:span><text:span text:style-name="Source_20_Text"><text:span text:style-name="T285">file</text:span></text:span><text:span text:style-name="T299"> command and their meanings.</text:span></text:p>
      <text:p text:style-name="P291"/>
      <text:p text:style-name="P292">64-bit</text:p>
      <text:p text:style-name="P292"><text:span text:style-name="T300"><text:tab/>T</text:span>he type of architecture. Processor registers, memory addresses and data are 64 bits in size</text:p>
      <text:p text:style-name="P291"/>
      <text:p text:style-name="P292">LSB</text:p>
      <text:p text:style-name="P293"><text:span text:style-name="T301"><text:tab/>The executable is </text:span><text:span text:style-name="T302">Least Significant Byte First</text:span><text:span text:style-name="T301">, i.e. the least significant byte is placed first</text:span></text:p>
      <text:p text:style-name="P291"/>
      <text:p text:style-name="P292">pie</text:p>
      <text:p text:style-name="P287"><text:span text:style-name="T303"><text:tab/>The program is a position-independent executable (PIE), meaning that its code, once loaded <text:tab/>into memory, can execute correctly regardless of the memory address at which it is loaded</text:span><text:span text:style-name="T304">.</text:span></text:p>
      <text:p text:style-name="P292"><text:span text:style-name="T305"><text:tab/>PIE programs do not require a specific memory address to be loaded in order to run, <text:tab/></text:span><text:span text:style-name="T306">a</text:span><text:span text:style-name="T305">nywhere in memory they are loaded they can be executed</text:span></text:p>
      <text:p text:style-name="P292"/>
      <text:p text:style-name="P292">86-64</text:p>
      <text:p text:style-name="P294"><text:span text:style-name="T307"><text:tab/></text:span>It indicates the type of processor architecture for which the program was compiled. <text:span text:style-name="Emphasis">x86</text:span> <text:tab/>refers to the processor family, while <text:span text:style-name="Emphasis">64</text:span> indicates that the architecture uses 64-bit registers.</text:p>
      <text:p text:style-name="P291"/>
      <text:p text:style-name="P295">version 1 (SYSV)</text:p>
      <text:p text:style-name="P293"><text:span text:style-name="T308"><text:tab/>V</text:span><text:span text:style-name="T309">ersion </text:span><text:span text:style-name="T308">of the</text:span><text:span text:style-name="T309"> ELF standard</text:span></text:p>
      <text:p text:style-name="P291"/>
      <text:p text:style-name="P296">dynamically linked</text:p>
      <text:p text:style-name="P296"><text:tab/>Libraries are dynamically linked to the program</text:p>
      <text:p text:style-name="P291"/>
      <text:p text:style-name="P297">interpreter</text:p>
      <text:p text:style-name="P298"><text:span text:style-name="T310"><text:tab/>The </text:span><text:span text:style-name="T311">dynamic linker</text:span><text:span text:style-name="T310"> used by the program (</text:span><text:span text:style-name="T285">/lib64/ld-linux-x86-64.so.2</text:span><text:span text:style-name="T310">)</text:span></text:p>
      <text:p text:style-name="P291"/>
      <text:p text:style-name="P296">BuildID</text:p>
      <text:p text:style-name="P296"><text:tab/>Identifier of the build session that produced the executable file</text:p>
      <text:p text:style-name="P291"/>
      <text:p text:style-name="P299">for GNU/Linux 3.2.0</text:p>
      <text:p text:style-name="P299"><text:tab/>The operating system for which the program was compiled. 3.2.0 <text:span text:style-name="T300">indicates t</text:span>he minimum <text:tab/>kernel version</text:p>
      <text:p text:style-name="P291"/>
      <text:p text:style-name="P299"><text:soft-page-break/>not stripped</text:p>
      <text:p text:style-name="P287"><text:span text:style-name="T312"><text:tab/>The executable file has not been optimized using the </text:span><text:span text:style-name="T285">strip</text:span><text:span text:style-name="T312"> command</text:span><text:span text:style-name="T312"><text:note text:id="ftn15" text:note-class="footnote"><text:note-citation>15</text:note-citation><text:note-body><text:p text:style-name="P300"><text:span text:style-name="T306">See the</text:span><text:span text:style-name="T313"> </text:span><text:span text:style-name="T314">strip(1)</text:span><text:span text:style-name="T315"> manual page</text:span></text:p></text:note-body></text:note></text:span></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2"><text:soft-page-break/><text:span text:style-name="T54">0.2.6 </text:span>Cross compiling</text:p>
      <text:p text:style-name="P299"/>
      <text:p text:style-name="P299">To compile a program for a processor different from the one you are currently using, you need to install the appropriate compiler. Compiling for a target platform different from the host system is called <text:span text:style-name="T35">cross-compiling</text:span>.</text:p>
      <text:p text:style-name="P299"/>
      <text:p text:style-name="P299">For example, to compile a C program for a 32-bit or 64-bit ARM processor, you must install the corresponding cross-compilers.</text:p>
      <text:p text:style-name="P303"/>
      <table:table table:name="Table26" table:style-name="Table26">
        <table:table-column table:style-name="Table26.A"/>
        <table:table-row>
          <table:table-cell table:style-name="Table26.A1" office:value-type="string">
            <text:p text:style-name="P304">[<text:a xlink:type="simple" xlink:href="mailto:linux@base" text:style-name="Internet_20_link" text:visited-style-name="Visited_20_Internet_20_Link">linux@basis</text:a>] sudo apt install gcc-arm-linux-gnueabi gcc-aarch64-linux-gnu</text:p>
            <text:p text:style-name="P305">...output...</text:p>
          </table:table-cell>
        </table:table-row>
      </table:table>
      <text:p text:style-name="P306"/>
      <text:p text:style-name="P307">Once the compiler is installed, the program can be compiled.</text:p>
      <text:p text:style-name="P307"/>
      <table:table table:name="Table27" table:style-name="Table27">
        <table:table-column table:style-name="Table27.A"/>
        <table:table-row>
          <table:table-cell table:style-name="Table27.A1" office:value-type="string">
            <text:p text:style-name="P308">[<text:a xlink:type="simple" xlink:href="mailto:linux@base" text:style-name="Internet_20_link" text:visited-style-name="Visited_20_Internet_20_Link">linux@basis</text:a>] arm-linux-gnueabi-gcc <text:span text:style-name="T147">h</text:span>ello.c -o hello<text:span text:style-name="T316">-</text:span>arm -static</text:p>
            <text:p text:style-name="P308"/>
            <text:p text:style-name="P309">[<text:a xlink:type="simple" xlink:href="mailto:linux@base" text:style-name="Internet_20_link" text:visited-style-name="Visited_20_Internet_20_Link">linux@basis</text:a>] file hello-arm</text:p>
            <text:p text:style-name="P309">hello-arm: ELF 32-bit LSB executable, ARM, EABI5 version 1 (SYSV), statically linked, BuildID[sha1]=f2678f1ce26ac6ca1dbc5fc7cfd13dc57d67e673, for GNU/Linux 3.2.0, not stripped</text:p>
          </table:table-cell>
        </table:table-row>
      </table:table>
      <text:p text:style-name="P307"/>
      <text:p text:style-name="P310">32-bit<text:tab/><text:tab/><text:tab/><text:tab/><text:span text:style-name="T317">32-bit </text:span><text:span text:style-name="T318">a</text:span><text:span text:style-name="T317">rchite</text:span><text:span text:style-name="T318">c</text:span><text:span text:style-name="T317">tur</text:span><text:span text:style-name="T318">e </text:span></text:p>
      <text:p text:style-name="P307"/>
      <text:p text:style-name="P311">ARM<text:tab/><text:tab/><text:tab/><text:tab/>The processor for which the program was compiled</text:p>
      <text:p text:style-name="P311"/>
      <text:p text:style-name="P311">EABI5<text:tab/><text:tab/><text:tab/><text:tab/><text:span text:style-name="T35">Embedded-Application Binary Interface</text:span>. The executable file interface <text:tab/><text:tab/><text:tab/><text:tab/>for embedded operating systems<text:span text:style-name="T319"><text:note text:id="ftn16" text:note-class="footnote"><text:note-citation>16</text:note-citation><text:note-body><text:p text:style-name="P312">Embedded systems are those systems that have a specific function, e.g. mobile phones, televisions, video game consoles, industrial machine controllers, digital clocks, etc..</text:p></text:note-body></text:note></text:span><text:span text:style-name="T319">.</text:span></text:p>
      <text:p text:style-name="P313"/>
      <text:p text:style-name="P313">static linked<text:tab/><text:tab/><text:tab/>Libraries are statically linked</text:p>
      <text:p text:style-name="P314"/>
      <text:p text:style-name="P315">To compile for <text:span text:style-name="T313">64-bit ARM</text:span></text:p>
      <text:p text:style-name="P314"/>
      <table:table table:name="Table28" table:style-name="Table28">
        <table:table-column table:style-name="Table28.A"/>
        <table:table-row>
          <table:table-cell table:style-name="Table28.A1" office:value-type="string">
            <text:p text:style-name="P316">[<text:a xlink:type="simple" xlink:href="mailto:linux@base" text:style-name="Internet_20_link" text:visited-style-name="Visited_20_Internet_20_Link">linux@basis</text:a>] aarch64-linux-gnu-gcc <text:span text:style-name="T147">h</text:span>ello.c -o hello-arm64 -static</text:p>
            <text:p text:style-name="P316"/>
            <text:p text:style-name="P316">[<text:a xlink:type="simple" xlink:href="mailto:linux@base" text:style-name="Internet_20_link" text:visited-style-name="Visited_20_Internet_20_Link">linux@basis</text:a>] file hello-arm64</text:p>
            <text:p text:style-name="P316">hello-arm<text:span text:style-name="T147">64</text:span>: ELF 64-bit LSB executable, ARM aarch64, version 1 (GNU/Linux), statically linked, BuildID[sha1]=56ac82782fd30fbfbf729f2eae1c2359e8a6c162, for GNU/Linux 3.7.0, not stripped</text:p>
          </table:table-cell>
        </table:table-row>
      </table:table>
      <text:p text:style-name="P314"/>
      <text:p text:style-name="P317">64-bit<text:tab/><text:tab/><text:tab/><text:tab/><text:span text:style-name="T320">64</text:span><text:span text:style-name="T317">-bit </text:span><text:span text:style-name="T318">a</text:span><text:span text:style-name="T317">rchite</text:span><text:span text:style-name="T318">c</text:span><text:span text:style-name="T317">tur</text:span><text:span text:style-name="T318">e </text:span></text:p>
      <text:p text:style-name="P318"/>
      <text:p text:style-name="P318">ARM aarch64<text:tab/><text:tab/><text:tab/><text:span text:style-name="T321">64-bit</text:span> <text:span text:style-name="T322">ARM </text:span><text:span text:style-name="T321">processor</text:span></text:p>
      <text:p text:style-name="P318"/>
      <text:p text:style-name="P319">The executable files generated will run respectively on a Linux operating system (kernel &gt;= 3.2.0 and 3.7.0) installed on a 32 and 64 bit ARM processor.</text:p>
      <text:p text:style-name="P319"/>
      <text:p text:style-name="P319"/>
      <text:p text:style-name="P319"/>
      <text:p text:style-name="P320"><text:bookmark-start text:name="0.5"/><text:soft-page-break/><text:span text:style-name="T323">0.</text:span><text:span text:style-name="T324">3</text:span><text:span text:style-name="T323"> <text:s/></text:span><text:span text:style-name="T325">S</text:span><text:span text:style-name="T326">tandard library and head</text:span><text:bookmark-end text:name="0.5"/><text:span text:style-name="T327">er </text:span><text:span text:style-name="T325">files</text:span></text:p>
      <text:p text:style-name="P321"/>
      <text:p text:style-name="P322"><text:span text:style-name="T328">The standard C library includes many header files, which on Linux are typically located in </text:span><text:span text:style-name="Source_20_Text"><text:span text:style-name="T329">/usr/include</text:span></text:span><text:span text:style-name="T328">.</text:span></text:p>
      <text:p text:style-name="P323"/>
      <text:p text:style-name="P322"><text:span text:style-name="T328">On Debian-based systems, packages that provide these headers usually end with the </text:span><text:span text:style-name="Source_20_Text"><text:span text:style-name="T329">-dev</text:span></text:span><text:span text:style-name="T328"> suffix (for example, </text:span><text:span text:style-name="Source_20_Text"><text:span text:style-name="T329">libc6-dev</text:span></text:span><text:span text:style-name="T328">). If some headers are missing, they can be installed by installing the corresponding library development package using the </text:span><text:span text:style-name="Source_20_Text"><text:span text:style-name="T329">-dev</text:span></text:span><text:span text:style-name="T328"> suffix. For instance, to use features provided by the MP3 library (</text:span><text:span text:style-name="Source_20_Text"><text:span text:style-name="T329">libmpg123</text:span></text:span><text:span text:style-name="T328">), you need to install the </text:span><text:span text:style-name="Source_20_Text"><text:span text:style-name="T329">libmpg123-dev</text:span></text:span><text:span text:style-name="T328"> package, which will place the required headers in the appropriate directory.</text:span></text:p>
      <text:p text:style-name="P323"/>
      <text:p text:style-name="P323">Development packages may also include shared libraries.</text:p>
      <text:p text:style-name="P322"><text:span text:style-name="T328">Libraries are typically located in directories such as </text:span><text:span text:style-name="Source_20_Text"><text:span text:style-name="T329">/lib</text:span></text:span><text:span text:style-name="T328">, </text:span><text:span text:style-name="Source_20_Text"><text:span text:style-name="T329">/usr/lib</text:span></text:span><text:span text:style-name="T328">, </text:span><text:span text:style-name="Source_20_Text"><text:span text:style-name="T329">/lib64</text:span></text:span><text:span text:style-name="T328">, and </text:span><text:span text:style-name="Source_20_Text"><text:span text:style-name="T329">/usr/lib64</text:span></text:span><text:span text:style-name="T328">. Additional or locally installed libraries are usually placed in </text:span><text:span text:style-name="Source_20_Text"><text:span text:style-name="T329">/usr/local/lib</text:span></text:span><text:span text:style-name="T328">.</text:span></text:p>
      <text:p text:style-name="P323"/>
      <text:p text:style-name="P322"><text:span text:style-name="T328">On Linux, static libraries use the </text:span><text:span text:style-name="Source_20_Text"><text:span text:style-name="T328">.a</text:span></text:span><text:span text:style-name="T328"> extension, while shared libraries use the </text:span><text:span text:style-name="Source_20_Text"><text:span text:style-name="T329">.so</text:span></text:span><text:span text:style-name="T328"> (shared object) extension.</text:span></text:p>
      <text:p text:style-name="P324"><text:span text:style-name="T328">Shared libraries follow the naming convention </text:span><text:span text:style-name="Source_20_Text"><text:span text:style-name="T329">library_name-version.so</text:span></text:span><text:span text:style-name="T328">, for example </text:span><text:span text:style-name="Source_20_Text"><text:span text:style-name="T329">libc-2.33.so</text:span></text:span><text:span text:style-name="T328">. Symbolic links to these libraries typically use the format </text:span><text:span text:style-name="Source_20_Text"><text:span text:style-name="T329">library_name.so.version</text:span></text:span><text:span text:style-name="T328">, such as </text:span><text:span text:style-name="Source_20_Text"><text:span text:style-name="T329">libc.so.6</text:span></text:span><text:span text:style-name="T328">.</text:span></text:p>
      <text:p text:style-name="P321"/>
      <text:p text:style-name="P324"><text:span text:style-name="T328">To determine which shared libraries an executable depends on, you can use the </text:span><text:span text:style-name="Source_20_Text"><text:span text:style-name="T329">ldd</text:span></text:span><text:span text:style-name="T328"> command.</text:span></text:p>
      <text:p text:style-name="P325"/>
      <table:table table:name="Table38" table:style-name="Table38">
        <table:table-column table:style-name="Table38.A"/>
        <table:table-row>
          <table:table-cell table:style-name="Table38.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30">ldd ./HelloWorld</text:span></text:p>
            <text:p text:style-name="P82"><text:s text:c="12"/>linux-vdso.so.1 (0x00007ffd22579000)</text:p>
            <text:p text:style-name="P82"><text:tab/>libc.so.6 =&gt; /lib/x86_64-linux-gnu/libc.so.6 (0x00007f1b6ecad000)</text:p>
            <text:p text:style-name="P82"><text:tab/>/lib64/ld-linux-x86-64.so.2 (0x00007f1b6eecd000)</text:p>
            <text:p text:style-name="P82"/>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31">ldd /</text:span><text:span text:style-name="T332">bin/ls</text:span></text:p>
            <text:p text:style-name="P82"><text:tab/>linux-vdso.so.1 (0x00007ffcceba7000)</text:p>
            <text:p text:style-name="P82"><text:tab/>libselinux.so.1 =&gt; /lib/x86_64-linux-gnu/libselinux.so.1 (0x00007f2dd6083000)</text:p>
            <text:p text:style-name="P82"><text:tab/>libc.so.6 =&gt; /lib/x86_64-linux-gnu/libc.so.6 (0x00007f2dd5eba000)</text:p>
            <text:p text:style-name="P82"><text:tab/>libpcre2-8.so.0 =&gt; /lib/x86_64-linux-gnu/libpcre2-8.so.0 (0x00007f2dd5e22000)</text:p>
            <text:p text:style-name="P82"><text:tab/>libdl.so.2 =&gt; /lib/x86_64-linux-gnu/libdl.so.2 (0x00007f2dd5e1b000)</text:p>
            <text:p text:style-name="P82"><text:tab/>/lib64/ld-linux-x86-64.so.2 (0x00007f2dd6127000)</text:p>
            <text:p text:style-name="P82"><text:tab/>libpthread.so.0 =&gt; /lib/x86_64-linux-gnu/libpthread.so.0 (0x00007f2dd5dfa000)</text:p>
          </table:table-cell>
        </table:table-row>
      </table:table>
      <text:p text:style-name="P321"/>
      <text:p text:style-name="P326">Library packages usually have the <text:span text:style-name="T15">lib</text:span> prefix, <text:span text:style-name="T333">for example</text:span> <text:span text:style-name="T136">libncurses5</text:span>.</text:p>
      <text:p text:style-name="P321"/>
      <text:p text:style-name="P327">The program that manages the <text:span text:style-name="T333">dynamic linker’s </text:span>library cache is <text:span text:style-name="T136">ldconfig</text:span><text:span text:style-name="T136"><text:note text:id="ftn17" text:note-class="footnote"><text:note-citation>17</text:note-citation><text:note-body><text:p text:style-name="P300"><text:span text:style-name="T306">See the</text:span><text:span text:style-name="T334"> </text:span><text:span text:style-name="T335">ldconfig(8)</text:span><text:span text:style-name="T315"> manual page</text:span></text:p></text:note-body></text:note></text:span>.</text:p>
      <text:p text:style-name="P327"/>
      <table:table table:name="Table39" table:style-name="Table39">
        <table:table-column table:style-name="Table39.A"/>
        <table:table-row>
          <table:table-cell table:style-name="Table39.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36">sudo ldconfig</text:span></text:p>
          </table:table-cell>
        </table:table-row>
      </table:table>
      <text:p text:style-name="P326"/>
      <text:p text:style-name="P326">The standard C library on Linux is the GNU C Library, known as glibc (GNU C Library). At the time of writing, the released version is 2.33. glibc provides standard C functionality as well as additional extensions<text:span text:style-name="T337"><text:note text:id="ftn18" text:note-class="footnote"><text:note-citation>18</text:note-citation><text:note-body><text:p text:style-name="P328"><text:span text:style-name="T333">See</text:span> <text:a xlink:type="simple" xlink:href="https://www.gnu.org/software/libc/" text:style-name="Internet_20_link" text:visited-style-name="Visited_20_Internet_20_Link">https://www.gnu.org/software/libc/</text:a> <text:span text:style-name="T338">and the </text:span><text:span text:style-name="T339">B</text:span><text:span text:style-name="T340">ibliography</text:span></text:p></text:note-body></text:note></text:span><text:span text:style-name="T337">.</text:span></text:p>
      <text:p text:style-name="P329"><text:soft-page-break/><text:span text:style-name="T95">0.</text:span><text:span text:style-name="T324">4</text:span><text:span text:style-name="T95"> GNU Make</text:span></text:p>
      <text:p text:style-name="P330"><text:span text:style-name="Source_20_Text"><text:span text:style-name="T141"/></text:span></text:p>
      <text:p text:style-name="P330"><text:span text:style-name="Source_20_Text"><text:span text:style-name="T141">make</text:span></text:span><text:span text:style-name="Source_20_Text"><text:span text:style-name="T341"><text:note text:id="ftn19" text:note-class="footnote"><text:note-citation>19</text:note-citation><text:note-body><text:p text:style-name="P331"><text:span text:style-name="T315">See the</text:span><text:span text:style-name="T342"> </text:span><text:span text:style-name="T343">make(1)</text:span><text:span text:style-name="T315"> m</text:span><text:span text:style-name="T344">anual page</text:span></text:p></text:note-body></text:note></text:span></text:span><text:span text:style-name="T345"> is a program that allows you to automate the compilation of multiple source files by defining rules in a file called a </text:span><text:span text:style-name="Source_20_Text"><text:span text:style-name="T141">Makefile</text:span></text:span><text:span text:style-name="T345">. The </text:span><text:span text:style-name="Source_20_Text"><text:span text:style-name="T141">Makefile</text:span></text:span><text:span text:style-name="T345"> contains rules that specify what to compile and how. A rule consists of:</text:span></text:p>
      <text:p text:style-name="P332"/>
      <text:list text:style-name="L2">
        <text:list-item>
          <text:p text:style-name="P333">A target - what make tries to create (the final executable program)</text:p>
        </text:list-item>
        <text:list-item>
          <text:p text:style-name="P333">A list of one or more dependencies (files required to compile the target)</text:p>
        </text:list-item>
        <text:list-item>
          <text:p text:style-name="P333">A list of commands to execute to create the target</text:p>
        </text:list-item>
      </text:list>
      <text:p text:style-name="P334"/>
      <text:p text:style-name="P324"><text:span text:style-name="T345">When </text:span><text:span text:style-name="T141">make</text:span><text:span text:style-name="T345"> is run it looks for a file called </text:span><text:span text:style-name="T141">GNUmakefile</text:span><text:span text:style-name="T345">, </text:span><text:span text:style-name="T141">makefile</text:span><text:span text:style-name="T345"> or </text:span><text:span text:style-name="T141">Makefile</text:span><text:span text:style-name="T345"> (in that order) in the directory it was run from.</text:span></text:p>
      <text:p text:style-name="P334"/>
      <text:p text:style-name="P334">The rules have the following form:</text:p>
      <text:p text:style-name="P335"/>
      <text:p text:style-name="P336">target : dependency dependency […]</text:p>
      <text:p text:style-name="P336"><text:tab/> <text:s text:c="3"/>command</text:p>
      <text:p text:style-name="P336"><text:tab/> <text:s text:c="3"/>command</text:p>
      <text:p text:style-name="P336"><text:tab/> <text:s text:c="3"/>[…]</text:p>
      <text:p text:style-name="P335"/>
      <text:p text:style-name="P337"><text:span text:style-name="T346"/></text:p>
      <text:p text:style-name="P338"><text:span text:style-name="T347">The following example shows a source file, a header file and </text:span><text:span text:style-name="T348">a</text:span><text:span text:style-name="T347"> </text:span><text:span text:style-name="T136">Makefile.</text:span></text:p>
      <text:p text:style-name="P339"/>
      <text:p text:style-name="P340"><text:span text:style-name="T346">#include </text:span><text:span text:style-name="T349">"hello.h"</text:span></text:p>
      <text:p text:style-name="P179"/>
      <text:p text:style-name="P178"><text:span text:style-name="T32">int</text:span> main()</text:p>
      <text:p text:style-name="P178">{</text:p>
      <text:p text:style-name="P178"><text:tab/>printf (<text:span text:style-name="T33">"\nHello, World"</text:span>);</text:p>
      <text:p text:style-name="P178"><text:span text:style-name="T32"><text:tab/>return</text:span> <text:span text:style-name="T230">0</text:span>;</text:p>
      <text:p text:style-name="P178">}</text:p>
      <text:p text:style-name="P341"/>
      <text:p text:style-name="P342">hello.c</text:p>
      <text:p text:style-name="P342"/>
      <text:p text:style-name="P341"/>
      <text:p text:style-name="P343"><text:span text:style-name="T350">#include </text:span><text:span text:style-name="T351">"hello.h"</text:span></text:p>
      <text:p text:style-name="P341"/>
      <text:p text:style-name="P344">hello.h</text:p>
      <text:p text:style-name="P345"/>
      <text:p text:style-name="P345"/>
      <text:p text:style-name="P345"/>
      <text:p text:style-name="P345"/>
      <text:p text:style-name="P345"/>
      <text:p text:style-name="P345"/>
      <text:p text:style-name="P345"><text:soft-page-break/></text:p>
      <text:p text:style-name="P341"/>
      <text:p text:style-name="P346"><text:span text:style-name="T352">1</text:span><text:span text:style-name="T353"> </text:span><text:span text:style-name="T354">hello</text:span> : hello.o </text:p>
      <text:p text:style-name="P346"><text:span text:style-name="T352">2</text:span> <text:s text:c="8"/><text:span text:style-name="T355">gcc</text:span> -o hello hello.o</text:p>
      <text:p text:style-name="P346"/>
      <text:p text:style-name="P347"><text:span text:style-name="T356">3</text:span><text:span text:style-name="T357"> </text:span><text:span text:style-name="T358">hello.o</text:span><text:span text:style-name="T359"> : hello.c hello.h</text:span></text:p>
      <text:p text:style-name="P348"><text:span text:style-name="T352">4 <text:s/></text:span><text:s text:c="9"/><text:span text:style-name="T355">gcc</text:span> -c hello.c</text:p>
      <text:p text:style-name="P346"/>
      <text:p text:style-name="P347"><text:span text:style-name="T356">5 </text:span><text:span text:style-name="T358">clean</text:span><text:span text:style-name="T359"> : </text:span></text:p>
      <text:p text:style-name="P348"><text:span text:style-name="T352">6</text:span> <text:s text:c="8"/><text:span text:style-name="T355">rm</text:span> hello *.o</text:p>
      <text:p text:style-name="P346"/>
      <text:p text:style-name="P347"><text:span text:style-name="T356">7 </text:span><text:span text:style-name="T358">install</text:span><text:span text:style-name="T359"> : </text:span></text:p>
      <text:p text:style-name="P348"><text:span text:style-name="T352">8</text:span> <text:s text:c="8"/><text:span text:style-name="T355">cp</text:span> hello /usr/local/bin</text:p>
      <text:p text:style-name="P341"/>
      <text:p text:style-name="P349">Makefile</text:p>
      <text:p text:style-name="P350"/>
      <text:p text:style-name="P351"><text:span text:style-name="T360">Line 1. Specifies the target executable file to create (</text:span><text:span text:style-name="Source_20_Text"><text:span text:style-name="T361">hello</text:span></text:span><text:span text:style-name="T360">) and, after the </text:span><text:span text:style-name="Source_20_Text"><text:span text:style-name="T361">:</text:span></text:span><text:span text:style-name="T360">, the dependency used</text:span></text:p>
      <text:p text:style-name="P351"><text:span text:style-name="T360"><text:tab/>to build it, i.e. </text:span><text:span text:style-name="Source_20_Text"><text:span text:style-name="T361">hello.o</text:span></text:span><text:span text:style-name="T360"><text:line-break/>Line 2. The compilation command (</text:span><text:span text:style-name="Source_20_Text"><text:span text:style-name="T361">gcc</text:span></text:span><text:span text:style-name="T360">) used to generate the executable<text:line-break/>Line 3. Specifies the object file to create (</text:span><text:span text:style-name="Source_20_Text"><text:span text:style-name="T361">hello.o</text:span></text:span><text:span text:style-name="T360">), which is later used to build the executable,</text:span></text:p>
      <text:p text:style-name="P351"><text:span text:style-name="T360"><text:tab/> and the source files required to build it (</text:span><text:span text:style-name="Source_20_Text"><text:span text:style-name="T361">hello.c</text:span></text:span><text:span text:style-name="T360"> and </text:span><text:span text:style-name="Source_20_Text"><text:span text:style-name="T361">hello.h</text:span></text:span><text:span text:style-name="T360">)<text:line-break/>Line 4. The command used to compile the source file into an object file<text:line-break/>Line 5. The </text:span><text:span text:style-name="Source_20_Text"><text:span text:style-name="T361">clean</text:span></text:span><text:span text:style-name="T360"> target deletes files generated by a previous build (the </text:span><text:span text:style-name="Source_20_Text"><text:span text:style-name="T361">hello</text:span></text:span><text:span text:style-name="T360"> executable and <text:tab/>object files with the </text:span><text:span text:style-name="Source_20_Text"><text:span text:style-name="T361">.o</text:span></text:span><text:span text:style-name="T360"> extension). It is used when recompilation is needed<text:line-break/>Line 6. The command that removes the files generated by compilation (</text:span><text:span text:style-name="Source_20_Text"><text:span text:style-name="T361">rm</text:span></text:span><text:span text:style-name="T360">)<text:line-break/>Line 7. After building the executable, the </text:span><text:span text:style-name="Source_20_Text"><text:span text:style-name="T361">install</text:span></text:span><text:span text:style-name="T360"> target is defined to install it in a system <text:tab/>directory containing executable programs (</text:span><text:span text:style-name="Source_20_Text"><text:span text:style-name="T361">/usr/local/bin</text:span></text:span><text:span text:style-name="T360">)<text:line-break/>Line 8. The </text:span><text:span text:style-name="Source_20_Text"><text:span text:style-name="T361">cp</text:span></text:span><text:span text:style-name="T360"> command used to copy the executable file into a system path</text:span></text:p>
      <text:p text:style-name="P352"/>
      <text:p text:style-name="P324"><text:span text:style-name="T362">Below is the execution of </text:span><text:span text:style-name="T359">make</text:span><text:span text:style-name="T362">, </text:span><text:span text:style-name="T363">which</text:span><text:span text:style-name="T362"> reads the </text:span><text:span text:style-name="T359">Makefile</text:span><text:span text:style-name="T362"> and compiles </text:span><text:span text:style-name="T363">the program accordingly</text:span><text:span text:style-name="T362">.</text:span></text:p>
      <text:p text:style-name="P353"/>
      <table:table table:name="Table89" table:style-name="Table89">
        <table:table-column table:style-name="Table89.A"/>
        <table:table-row>
          <table:table-cell table:style-name="Table89.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64">make</text:span></text:p>
            <text:p text:style-name="P82">cc <text:s text:c="3"/>-c -o hello.o hello.c</text:p>
            <text:p text:style-name="P82">gcc -o hello hello.o</text:p>
          </table:table-cell>
        </table:table-row>
      </table:table>
      <text:p text:style-name="P354"/>
      <text:p text:style-name="P355"><text:span text:style-name="T365">make</text:span><text:span text:style-name="T366"> </text:span><text:span text:style-name="T367">have </text:span><text:span text:style-name="T366">crea</text:span><text:span text:style-name="T368">te</text:span><text:span text:style-name="T367">d</text:span><text:span text:style-name="T366"> </text:span><text:span text:style-name="T368">the executable file </text:span><text:span text:style-name="T136">hello</text:span> <text:span text:style-name="T368">an</text:span><text:span text:style-name="T367">d</text:span><text:span text:style-name="T368"> the object file</text:span><text:span text:style-name="T369"> </text:span><text:span text:style-name="T136">hello.o</text:span><text:span text:style-name="T369">. </text:span></text:p>
      <text:p text:style-name="P355"><text:span text:style-name="T368">Below is the execution of </text:span><text:span text:style-name="T370">make</text:span><text:span text:style-name="T371"> </text:span><text:span text:style-name="T370">clean</text:span></text:p>
      <text:p text:style-name="P356"/>
      <table:table table:name="Table90" table:style-name="Table90">
        <table:table-column table:style-name="Table90.A"/>
        <table:table-row>
          <table:table-cell table:style-name="Table90.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64">make </text:span><text:span text:style-name="T372">clean</text:span></text:p>
            <text:p text:style-name="P82"/>
            <text:p text:style-name="P357">rm hello *.o</text:p>
          </table:table-cell>
        </table:table-row>
      </table:table>
      <text:p text:style-name="P356"/>
      <text:p text:style-name="P358"><text:span text:style-name="T373">The f</text:span>ile<text:span text:style-name="T374">s</text:span> <text:span text:style-name="T136">hello.o</text:span> <text:span text:style-name="T373">and</text:span> <text:span text:style-name="T136">hello</text:span> <text:span text:style-name="T373">have been deleted.</text:span></text:p>
      <text:p text:style-name="P358"/>
      <text:p text:style-name="P358"><text:span text:style-name="T367">We </text:span><text:span text:style-name="T375">run</text:span><text:span text:style-name="T374"> </text:span><text:span text:style-name="T136">make</text:span><text:span text:style-name="T374"> </text:span><text:span text:style-name="T367">again </text:span><text:span text:style-name="T375">to recre</text:span><text:span text:style-name="T376">a</text:span><text:span text:style-name="T375">te</text:span><text:span text:style-name="T377"> </text:span><text:span text:style-name="T136">hello</text:span><text:span text:style-name="T377"> </text:span><text:span text:style-name="T375">and</text:span><text:span text:style-name="T377"> </text:span><text:span text:style-name="T136">hello.o</text:span><text:span text:style-name="T377">.</text:span></text:p>
      <table:table table:name="Table91" table:style-name="Table91">
        <table:table-column table:style-name="Table91.A"/>
        <text:soft-page-break/>
        <table:table-row>
          <table:table-cell table:style-name="Table91.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64">make </text:span></text:p>
            <text:p text:style-name="P82"/>
            <text:p text:style-name="P82">cc <text:s text:c="3"/>-c -o hello.o hello.c</text:p>
            <text:p text:style-name="P82">gcc -o hello hello.o</text:p>
          </table:table-cell>
        </table:table-row>
      </table:table>
      <text:p text:style-name="P356"/>
      <text:p text:style-name="P359"><text:span text:style-name="T378">We i</text:span><text:span text:style-name="T379">nstall the </text:span><text:span text:style-name="T141">hello</text:span><text:span text:style-name="T379"> executable file in the system directory </text:span><text:span text:style-name="T141">/usr/local/bin</text:span></text:p>
      <text:p text:style-name="P357"/>
      <table:table table:name="Table92" table:style-name="Table92">
        <table:table-column table:style-name="Table92.A"/>
        <table:table-row>
          <table:table-cell table:style-name="Table92.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80">sudo </text:span><text:span text:style-name="T364">make </text:span><text:span text:style-name="T380">install</text:span></text:p>
            <text:p text:style-name="P82"/>
            <text:p text:style-name="P360">cp hello /usr/local/bin</text:p>
          </table:table-cell>
        </table:table-row>
      </table:table>
      <text:p text:style-name="P361"/>
      <text:p text:style-name="P359"><text:span text:style-name="Source_20_Text"><text:span text:style-name="T141">make</text:span></text:span><text:span text:style-name="T379"> is a very powerful tool and one of the most widely used in the development of programs on Linux systems. The set of rules that can be defined is quite extensive, and in addition to these, it is possible to define variables to configure various parameters, such as the target hardware architecture of the executable file, compilation options, and much more.</text:span></text:p>
      <text:p text:style-name="P361"/>
      <text:p text:style-name="P359"><text:span text:style-name="T379">The </text:span><text:span text:style-name="Source_20_Text"><text:span text:style-name="T141">make(1)</text:span></text:span><text:span text:style-name="T379"> manual page lists all available options; for complete documentation, you can also consult the official website listed in the </text:span><text:span text:style-name="T378">bibliography</text:span><text:span text:style-name="T379">.</text:span></text:p>
      <text:p text:style-name="P361"/>
      <text:p text:style-name="P362"/>
      <text:p text:style-name="P363"/>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5"><text:span text:style-name="T15"/></text:p>
      <text:p text:style-name="P366"><text:soft-page-break/>0.<text:span text:style-name="T54">5</text:span> GNU Autoconf</text:p>
      <text:p text:style-name="P367"><text:span text:style-name="Source_20_Text"><text:span text:style-name="T381"/></text:span></text:p>
      <text:p text:style-name="P367"><text:span text:style-name="Source_20_Text"><text:span text:style-name="T381">autoconf</text:span></text:span><text:span text:style-name="Source_20_Text"><text:span text:style-name="T381"><text:note text:id="ftn20" text:note-class="footnote"><text:note-citation>20</text:note-citation><text:note-body><text:p text:style-name="P331"><text:span text:style-name="T382">See the </text:span><text:span text:style-name="T343">autoconf(1</text:span><text:span text:style-name="T383">)</text:span><text:span text:style-name="T384"> man</text:span><text:span text:style-name="T382">ual</text:span><text:span text:style-name="T385"> </text:span><text:span text:style-name="T382">page, </text:span><text:span text:style-name="T386">t</text:span><text:span text:style-name="T387">he official web</text:span><text:span text:style-name="T388">site </text:span><text:span text:style-name="T387">is </text:span><text:span text:style-name="T388">listed in the </text:span><text:span text:style-name="T389">bibliography</text:span></text:p></text:note-body></text:note></text:span></text:span><text:span text:style-name="T390"> is a tool used to automate source code configuration. It generates a configuration script from a template file. On Debian-based systems, </text:span><text:span text:style-name="Source_20_Text"><text:span text:style-name="T381">autoconf</text:span></text:span><text:span text:style-name="T390"> can be installed by running the following command.</text:span></text:p>
      <text:p text:style-name="P368"/>
      <table:table table:name="Table93" table:style-name="Table93">
        <table:table-column table:style-name="Table93.A"/>
        <table:table-row>
          <table:table-cell table:style-name="Table93.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380">sudo </text:span><text:span text:style-name="T391">apt install autoconf</text:span></text:p>
            <text:p text:style-name="P369">...<text:span text:style-name="T392">output...</text:span></text:p>
          </table:table-cell>
        </table:table-row>
      </table:table>
      <text:p text:style-name="P370"/>
      <text:p text:style-name="P367"><text:span text:style-name="T393">To use </text:span><text:span text:style-name="Source_20_Text"><text:span text:style-name="T381">make</text:span></text:span><text:span text:style-name="T393"> to compile the source code, it is necessary to generate a </text:span><text:span text:style-name="Source_20_Text"><text:span text:style-name="T381">Makefile</text:span></text:span><text:span text:style-name="T393">. To generate it, you can use the </text:span><text:span text:style-name="Source_20_Text"><text:span text:style-name="T381">automake</text:span></text:span><text:span text:style-name="Source_20_Text"><text:span text:style-name="T381"><text:note text:id="ftn21" text:note-class="footnote"><text:note-citation>21</text:note-citation><text:note-body><text:p text:style-name="P331"><text:span text:style-name="T382">See the </text:span><text:span text:style-name="T343">automake(1)</text:span><text:span text:style-name="T384"> manual page</text:span></text:p></text:note-body></text:note></text:span></text:span><text:span text:style-name="T393"> program, which takes as input a file named </text:span><text:span text:style-name="Source_20_Text"><text:span text:style-name="T381">Makefile.am</text:span></text:span><text:span text:style-name="T393"> and produces a file named </text:span><text:span text:style-name="Source_20_Text"><text:span text:style-name="T381">Makefile.in</text:span></text:span><text:span text:style-name="T393">. This file is then read by the </text:span><text:span text:style-name="Source_20_Text"><text:span text:style-name="T381">configure</text:span></text:span><text:span text:style-name="T393"> script generated by </text:span><text:span text:style-name="Source_20_Text"><text:span text:style-name="T381">autoconf</text:span></text:span><text:span text:style-name="T393">, in order to create the final </text:span><text:span text:style-name="Source_20_Text"><text:span text:style-name="T381">Makefile</text:span></text:span><text:span text:style-name="T393">.</text:span></text:p>
      <text:p text:style-name="P324"><text:span text:style-name="T393">To proceed with the compilation, it is necessary to create two files: </text:span><text:span text:style-name="Source_20_Text"><text:span text:style-name="T381">configure.ac</text:span></text:span><text:span text:style-name="T393"> and </text:span><text:span text:style-name="Source_20_Text"><text:span text:style-name="T381">Makefile.am</text:span></text:span><text:span text:style-name="T393">.</text:span></text:p>
      <text:p text:style-name="P370"/>
      <text:p text:style-name="P324"><text:span text:style-name="T393">Below is an example showing how to compile the file </text:span><text:span text:style-name="Source_20_Text"><text:span text:style-name="T381">hello.c</text:span></text:span><text:span text:style-name="T393">.</text:span></text:p>
      <text:p text:style-name="P371"/>
      <text:p text:style-name="P372">1. <text:span text:style-name="T392">We </text:span><text:span text:style-name="T394">create the </text:span><text:span text:style-name="T395">file </text:span><text:span text:style-name="T136">configure.ac</text:span></text:p>
      <text:p text:style-name="P372"/>
      <table:table table:name="Table94" table:style-name="Table94">
        <table:table-column table:style-name="Table94.A"/>
        <table:table-row>
          <table:table-cell table:style-name="Table94.A1" office:value-type="string">
            <text:p text:style-name="P373">AC_INIT([hello], [1.0], [io@example.com])</text:p>
            <text:p text:style-name="P373">AM_INIT_AUTOMAKE</text:p>
            <text:p text:style-name="P373">AC_PROG_CC</text:p>
            <text:p text:style-name="P373">AC_CONFIG_FILES([Makefile])</text:p>
            <text:p text:style-name="P373">AC_OUTPUT</text:p>
          </table:table-cell>
        </table:table-row>
      </table:table>
      <text:p text:style-name="P372"><text:tab/></text:p>
      <text:p text:style-name="P374">The directives used </text:p>
      <text:p text:style-name="P372"/>
      <text:p text:style-name="P375"><text:span text:style-name="T136">AC_INIT</text:span> <text:tab/><text:tab/><text:tab/>→ Specifi<text:span text:style-name="T394">es the name of the</text:span> program, <text:span text:style-name="T394">the</text:span> version, <text:span text:style-name="T394">the </text:span>aut<text:span text:style-name="T394">hor</text:span></text:p>
      <text:p text:style-name="P375"><text:span text:style-name="T136">AM_INIT_AUTOMAKE</text:span> <text:s text:c="8"/>→ Crea<text:span text:style-name="T394">tes</text:span> <text:span text:style-name="T394">the configuration for the use of</text:span> <text:span text:style-name="T136">automake</text:span></text:p>
      <text:p text:style-name="P375"><text:span text:style-name="T136">AC_PROG_CC</text:span> <text:tab/><text:tab/>→ Specifi<text:span text:style-name="T394">es the</text:span> compil<text:span text:style-name="T394">er</text:span> (<text:span text:style-name="T136">gcc</text:span>)</text:p>
      <text:p text:style-name="P375"><text:span text:style-name="T136">AC_CONFIG_FILES</text:span> <text:tab/>→ Specifi<text:span text:style-name="T394">es the configuration file that will be generated</text:span> <text:span text:style-name="T396">(</text:span><text:span text:style-name="T136">Makefile</text:span><text:span text:style-name="T396">)</text:span></text:p>
      <text:p text:style-name="P376"><text:span text:style-name="T136">AC_OUTPUT</text:span> <text:tab/><text:tab/><text:tab/>→ <text:span text:style-name="T397">Specif</text:span><text:span text:style-name="T394">ies the </text:span><text:span text:style-name="T398">file </text:span><text:span text:style-name="T394">that will be generated</text:span><text:span text:style-name="T397"> (</text:span><text:span text:style-name="T136">configure</text:span><text:span text:style-name="T399">)</text:span></text:p>
      <text:p text:style-name="P372"/>
      <text:p text:style-name="P377">2. <text:span text:style-name="T392">We</text:span><text:span text:style-name="T400"> create the </text:span><text:span text:style-name="T392">file</text:span><text:span text:style-name="T395"> </text:span><text:span text:style-name="T136">Makefile.am</text:span></text:p>
      <text:p text:style-name="P377"/>
      <table:table table:name="Table95" table:style-name="Table95">
        <table:table-column table:style-name="Table95.A"/>
        <table:table-row>
          <table:table-cell table:style-name="Table95.A1" office:value-type="string">
            <text:p text:style-name="P373">AUTOMAKE_OPTIONS = foreign</text:p>
            <text:p text:style-name="P373">bin_PROGRAMS = hello</text:p>
            <text:p text:style-name="P373">hello_SOURCES = hello.c</text:p>
          </table:table-cell>
        </table:table-row>
      </table:table>
      <text:p text:style-name="P378"/>
      <text:p text:style-name="P379">The directives used </text:p>
      <text:p text:style-name="P380"/>
      <text:p text:style-name="P378"><text:span text:style-name="T136">AUTOMAKE_OPTIONS</text:span> <text:s text:c="8"/>→ <text:span text:style-name="T401">A</text:span>utomake <text:span text:style-name="T401">options</text:span>. <text:span text:style-name="T136">foreign</text:span><text:span text:style-name="T402"> </text:span><text:span text:style-name="T401">defines a level of narrowness <text:tab/><text:tab/><text:tab/><text:tab/><text:tab/> <text:s text:c="4"/>regarding the requirements of the compilation</text:span><text:span text:style-name="T402"><text:note text:id="ftn22" text:note-class="footnote"><text:note-citation>22</text:note-citation><text:note-body><text:p text:style-name="P381"><text:span text:style-name="T403">For more details on this topic </text:span><text:span text:style-name="T382">see</text:span><text:span text:style-name="T403"> </text:span><text:a xlink:type="simple" xlink:href="https://www.gnu.org/software/automake/manual/html_node/Strictness.html" text:style-name="Internet_20_link" text:visited-style-name="Visited_20_Internet_20_Link">https://www.gnu.org/software/automake/manual/html_node/Strictness.html</text:a></text:p></text:note-body></text:note></text:span></text:p>
      <text:p text:style-name="P382"><text:soft-page-break/><text:span text:style-name="T136">bin_PROGRAMS</text:span> <text:tab/><text:tab/>→ <text:span text:style-name="T401">The name of the executable file that will be generated</text:span></text:p>
      <text:p text:style-name="P383"><text:span text:style-name="T136">hello_SOURCES</text:span><text:tab/><text:tab/>→ <text:span text:style-name="T401">Source files to compile</text:span></text:p>
      <text:p text:style-name="P383"/>
      <text:p text:style-name="P384">Let’s take a look at the contents of the directory.</text:p>
      <text:p text:style-name="P385"/>
      <table:table table:name="Table96" table:style-name="Table96">
        <table:table-column table:style-name="Table96.A"/>
        <table:table-row>
          <table:table-cell table:style-name="Table96.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04">ls</text:span></text:p>
            <text:p text:style-name="P82"><text:span text:style-name="T153">configure.ac </text:span><text:s/>hello.c <text:s/><text:span text:style-name="T153">Makefile.am</text:span></text:p>
          </table:table-cell>
        </table:table-row>
      </table:table>
      <text:p text:style-name="P386"/>
      <text:p text:style-name="P387"><text:span text:style-name="T405">These instructions are actually macros, i.e. functions that are expanded into one or more underlying instructions. To work with these macros, a macro processor is required, i.e. software that reads the macros and executes the corresponding instructions. On Linux, the macro processor used by </text:span><text:span text:style-name="Source_20_Text"><text:span text:style-name="T141">autoconf</text:span></text:span><text:span text:style-name="T405"> is </text:span><text:span text:style-name="Source_20_Text"><text:span text:style-name="T141">m4</text:span></text:span><text:span text:style-name="Source_20_Text"><text:span text:style-name="T406"><text:note text:id="ftn23" text:note-class="footnote"><text:note-citation>23</text:note-citation><text:note-body><text:p text:style-name="P388"><text:span text:style-name="T403">For more details on the</text:span> macro processor <text:span text:style-name="T15">m4</text:span> <text:span text:style-name="T382">see</text:span> <text:a xlink:type="simple" xlink:href="https://www.gnu.org/software/m4/manual/" text:style-name="Internet_20_link" text:visited-style-name="Visited_20_Internet_20_Link">https://www.gnu.org/software/m4/manual/</text:a></text:p></text:note-body></text:note></text:span></text:span><text:span text:style-name="T405">.</text:span></text:p>
      <text:p text:style-name="P387"><text:span text:style-name="T405">For macro compatibility reasons, before running </text:span><text:span text:style-name="Source_20_Text"><text:span text:style-name="T141">autoconf</text:span></text:span><text:span text:style-name="T405">, it is necessary to run </text:span><text:span text:style-name="Source_20_Text"><text:span text:style-name="T141">aclocal</text:span></text:span><text:span text:style-name="Source_20_Text"><text:span text:style-name="T141"><text:note text:id="ftn24" text:note-class="footnote"><text:note-citation>24</text:note-citation><text:note-body><text:p text:style-name="P331"><text:span text:style-name="T382">See the</text:span><text:span text:style-name="T403"> </text:span><text:span text:style-name="T343">aclocal(1)</text:span><text:span text:style-name="T384"> <text:s/>manual page</text:span></text:p></text:note-body></text:note></text:span></text:span><text:span text:style-name="T405">. This program ensures that all macros required for the build process are available</text:span><text:span text:style-name="T407"><text:note text:id="ftn25" text:note-class="footnote"><text:note-citation>25</text:note-citation><text:note-body><text:p text:style-name="P389"><text:span text:style-name="T403">For more details on </text:span><text:span text:style-name="T343">aclocal</text:span> <text:span text:style-name="T382">see</text:span> <text:a xlink:type="simple" xlink:href="https://www.gnu.org/software/gettext/manual/html_node/aclocal.html" text:style-name="Internet_20_link" text:visited-style-name="Visited_20_Internet_20_Link">https://www.gnu.org/software/gettext/manual/html_node/aclocal.html</text:a></text:p><text:p text:style-name="P389"/></text:note-body></text:note></text:span><text:span text:style-name="T407">.</text:span><text:span text:style-name="T405"> To use the </text:span><text:span text:style-name="Source_20_Text"><text:span text:style-name="T141">AM_INIT_AUTOMAKE</text:span></text:span><text:span text:style-name="T405"> macro, the file </text:span><text:span text:style-name="Source_20_Text"><text:span text:style-name="T141">aclocal.m4</text:span></text:span><text:span text:style-name="T405"> must be generated using </text:span><text:span text:style-name="Source_20_Text"><text:span text:style-name="T141">aclocal</text:span></text:span><text:span text:style-name="T405">.</text:span></text:p>
      <text:p text:style-name="P386"/>
      <text:p text:style-name="P390">3. <text:span text:style-name="T403">Let’s execute</text:span> <text:span text:style-name="T136">aclocal</text:span></text:p>
      <text:p text:style-name="P391"/>
      <table:table table:name="Table97" table:style-name="Table97">
        <table:table-column table:style-name="Table97.A"/>
        <table:table-row>
          <table:table-cell table:style-name="Table97.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08">a</text:span><text:span text:style-name="T409">clocal</text:span></text:p>
          </table:table-cell>
        </table:table-row>
      </table:table>
      <text:p text:style-name="P391"/>
      <text:p text:style-name="P392">Now we have the <text:span text:style-name="T410">following</text:span> files</text:p>
      <text:p text:style-name="P393"/>
      <table:table table:name="Table98" table:style-name="Table98">
        <table:table-column table:style-name="Table98.A"/>
        <table:table-row>
          <table:table-cell table:style-name="Table98.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11">ls</text:span></text:p>
            <text:p text:style-name="P82"><text:span text:style-name="T153">aclocal.m4</text:span> <text:s/><text:span text:style-name="T355">autom4te.cache </text:span><text:s/>configure.ac <text:s/>hello.c <text:s/>Makefile.am</text:p>
          </table:table-cell>
        </table:table-row>
      </table:table>
      <text:p text:style-name="P393"/>
      <text:p text:style-name="P394"><text:span text:style-name="T395">4. </text:span><text:span text:style-name="T403">Let’s create the file</text:span><text:span text:style-name="T395"> </text:span><text:span text:style-name="T136">configure</text:span><text:span text:style-name="T412"> </text:span><text:span text:style-name="T413">using</text:span><text:span text:style-name="T412"> </text:span><text:span text:style-name="T414">autoconf</text:span></text:p>
      <text:p text:style-name="P395"/>
      <table:table table:name="Table100" table:style-name="Table100">
        <table:table-column table:style-name="Table100.A"/>
        <table:table-row>
          <table:table-cell table:style-name="Table100.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08">autoconf</text:span></text:p>
          </table:table-cell>
        </table:table-row>
      </table:table>
      <text:p text:style-name="P395"/>
      <text:p text:style-name="P390">5. <text:span text:style-name="T403">Let’s create the </text:span><text:span text:style-name="T136">makefile</text:span></text:p>
      <text:p text:style-name="P396"/>
      <table:table table:name="Table101" table:style-name="Table101">
        <table:table-column table:style-name="Table101.A"/>
        <table:table-row>
          <table:table-cell table:style-name="Table101.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15">automake –add-missing</text:span></text:p>
            <text:p text:style-name="P397">...<text:span text:style-name="T392">output...</text:span></text:p>
          </table:table-cell>
        </table:table-row>
      </table:table>
      <text:p text:style-name="P398"/>
      <text:p text:style-name="P398"><text:span text:style-name="T403">Now we have </text:span><text:span text:style-name="T410">also </text:span><text:span text:style-name="T403">the files </text:span><text:span text:style-name="T136">configure</text:span><text:span text:style-name="T416"> e </text:span><text:span text:style-name="T136">Makefile.in</text:span></text:p>
      <text:p text:style-name="P398"><text:span text:style-name="T136"/></text:p>
      <table:table table:name="Table102" table:style-name="Table102">
        <table:table-column table:style-name="Table102.A"/>
        <table:table-row>
          <table:table-cell table:style-name="Table102.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17">ls</text:span></text:p>
            <text:p text:style-name="P82">aclocal.m4 <text:s/><text:span text:style-name="T418">autom4te.cache</text:span> <text:s/><text:span text:style-name="T418">compile </text:span><text:s/><text:span text:style-name="T419">configure</text:span> <text:s/>configure.ac <text:s/><text:span text:style-name="T418">depcomp</text:span> <text:s/>hello.c <text:s/><text:span text:style-name="T418">install-sh</text:span> <text:s/>Makefile.am <text:s/><text:span text:style-name="T153">Makefile.in </text:span><text:s/><text:span text:style-name="T418">missing</text:span></text:p>
          </table:table-cell>
        </table:table-row>
      </table:table>
      <text:p text:style-name="P399"/>
      <text:p text:style-name="P399">6. <text:span text:style-name="T420">Let’s execute </text:span><text:span text:style-name="T136">configure</text:span><text:span text:style-name="T421"> </text:span><text:span text:style-name="T422">to generate the</text:span><text:span text:style-name="T423"> </text:span><text:span text:style-name="T424">Makefile</text:span></text:p>
      <text:p text:style-name="P399"/>
      <text:p text:style-name="P399"/>
      <table:table table:name="Table103" table:style-name="Table103">
        <table:table-column table:style-name="Table103.A"/>
        <text:soft-page-break/>
        <table:table-row>
          <table:table-cell table:style-name="Table103.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25">configure</text:span></text:p>
            <text:p text:style-name="P397">...<text:span text:style-name="T392">output...</text:span></text:p>
          </table:table-cell>
        </table:table-row>
      </table:table>
      <text:p text:style-name="P400"/>
      <text:p text:style-name="P324"><text:span text:style-name="T426">The </text:span><text:span text:style-name="T141">Makefile</text:span><text:span text:style-name="T426"> has been created</text:span></text:p>
      <text:p text:style-name="P400"/>
      <table:table table:name="Table104" table:style-name="Table104">
        <table:table-column table:style-name="Table104.A"/>
        <table:table-row>
          <table:table-cell table:style-name="Table104.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17">ls</text:span></text:p>
            <text:p text:style-name="P324"><text:span text:style-name="T427">aclocal.m4</text:span><text:span text:style-name="T428"> <text:s/>autom4te.cache <text:s/>compile <text:s/></text:span><text:span text:style-name="T427">config.log</text:span><text:span text:style-name="T428"> <text:s/></text:span><text:span text:style-name="T429">config.status</text:span><text:span text:style-name="T428"> <text:s/></text:span><text:span text:style-name="T429">configure</text:span><text:span text:style-name="T428"> <text:s/></text:span><text:span text:style-name="T427">configure.ac </text:span><text:span text:style-name="T428"><text:s/>depcomp <text:s text:c="3"/></text:span><text:span text:style-name="T427">hello.c </text:span><text:span text:style-name="T428"><text:s text:c="3"/>install-sh <text:s/></text:span><text:span text:style-name="T430">Makefile</text:span><text:span text:style-name="T427"> <text:s/>Makefile.am <text:s/>Makefile.in</text:span><text:span text:style-name="T428"> <text:s/>missing</text:span></text:p>
          </table:table-cell>
        </table:table-row>
      </table:table>
      <text:p text:style-name="P400"/>
      <text:p text:style-name="P401">7. <text:span text:style-name="T431">Let’s compile it </text:span><text:span text:style-name="T410">using</text:span><text:span text:style-name="T432"> </text:span><text:span text:style-name="T136">make</text:span></text:p>
      <text:p text:style-name="P402"/>
      <table:table table:name="Table105" table:style-name="Table105">
        <table:table-column table:style-name="Table105.A"/>
        <table:table-row>
          <table:table-cell table:style-name="Table105.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33">make</text:span></text:p>
            <text:p text:style-name="P397">...<text:span text:style-name="T392">output...</text:span></text:p>
          </table:table-cell>
        </table:table-row>
      </table:table>
      <text:p text:style-name="P402"/>
      <text:p text:style-name="P403"><text:span text:style-name="T136">make</text:span><text:span text:style-name="T434"> </text:span><text:span text:style-name="T435">create</text:span><text:span text:style-name="T410">s</text:span><text:span text:style-name="T435"> the </text:span><text:span text:style-name="T136">hello.o</text:span><text:span text:style-name="T435"> object f</text:span><text:span text:style-name="T434">ile</text:span><text:span text:style-name="T436"> </text:span><text:span text:style-name="T435">and the </text:span><text:span text:style-name="T136">hello</text:span><text:span text:style-name="T435"> executable </text:span><text:span text:style-name="T410">file</text:span><text:span text:style-name="T436">.</text:span></text:p>
      <text:p text:style-name="P390"/>
      <table:table table:name="Table106" table:style-name="Table106">
        <table:table-column table:style-name="Table106.A"/>
        <table:table-row>
          <table:table-cell table:style-name="Table106.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37">ls</text:span></text:p>
            <text:p text:style-name="P324"><text:span text:style-name="T438">aclocal.m4 <text:s/></text:span><text:span text:style-name="T428">autom4te.cache</text:span><text:span text:style-name="T438"> <text:s/></text:span><text:span text:style-name="T428">compile</text:span><text:span text:style-name="T438"> <text:s/>config.log <text:s/></text:span><text:span text:style-name="T429">config.status</text:span><text:span text:style-name="T438"> <text:s/></text:span><text:span text:style-name="T429">configure</text:span><text:span text:style-name="T438"> <text:s/>configure.ac <text:s/></text:span><text:span text:style-name="T428">depcomp</text:span><text:span text:style-name="T438"> <text:s/></text:span><text:span text:style-name="T439">hello</text:span><text:span text:style-name="T438"> <text:s/>hello.c <text:s/></text:span><text:span text:style-name="T440">hello.o</text:span><text:span text:style-name="T438"> <text:s/></text:span><text:span text:style-name="T428">install-sh</text:span><text:span text:style-name="T438"> <text:s/>Makefile <text:s/>Makefile.am <text:s/>Makefile.in <text:s/></text:span><text:span text:style-name="T428">missing</text:span></text:p>
          </table:table-cell>
        </table:table-row>
      </table:table>
      <text:p text:style-name="P404"/>
      <text:p text:style-name="P405">The following figure shows the process.</text:p>
      <text:p text:style-name="P406"/>
      <text:p text:style-name="P407"><draw:frame draw:style-name="fr2" draw:name="Image7" text:anchor-type="char" svg:width="5.9783in" svg:height="4.1957in" draw:z-index="5"><draw:image xlink:href="Pictures/10000001000004CF00000360252AC878.png" xlink:type="simple" xlink:show="embed" xlink:actuate="onLoad" draw:mime-type="image/png"/></draw:frame></text:p>
      <text:p text:style-name="P408"><text:span text:style-name="T441">Fig </text:span><text:span text:style-name="T442">3</text:span><text:span text:style-name="T441">. </text:span><text:span text:style-name="T443">Steps of the </text:span><text:span text:style-name="T444">compilation</text:span><text:span text:style-name="T443"> process with</text:span><text:span text:style-name="T445"> </text:span><text:span text:style-name="T446">autoconf</text:span></text:p>
      <text:p text:style-name="P409"/>
      <text:p text:style-name="P74"><text:soft-page-break/><text:span text:style-name="T447">0.</text:span><text:span text:style-name="T324">6</text:span><text:span text:style-name="T447"> The GNU Debugger: </text:span><text:span text:style-name="T448">gdb</text:span></text:p>
      <text:p text:style-name="P405"/>
      <text:p text:style-name="P410"><text:span text:style-name="T449">The GNU Debugger (</text:span><text:span text:style-name="Source_20_Text"><text:span text:style-name="T450">gdb</text:span></text:span><text:span text:style-name="T449">) is the default debugging tool on Linux. It operates in an interactive mode, using a prompt that accepts commands and displays their output. This paragraph serves only as an introduction to the tool.</text:span></text:p>
      <text:p text:style-name="P411"/>
      <text:p text:style-name="P410"><text:span text:style-name="T449">To install </text:span><text:span text:style-name="T141">gdb</text:span><text:span text:style-name="T449"> on debian-based systems run the following command.</text:span></text:p>
      <text:p text:style-name="P412"/>
      <table:table table:name="Table107" table:style-name="Table107">
        <table:table-column table:style-name="Table107.A"/>
        <table:table-row>
          <table:table-cell table:style-name="Table107.A1" office:value-type="string">
            <text:p text:style-name="P413"><text:span text:style-name="T103">[</text:span><text:a xlink:type="simple" xlink:href="mailto:linux@io" text:style-name="Internet_20_link" text:visited-style-name="Visited_20_Internet_20_Link"><text:span text:style-name="T103">linux@basis</text:span></text:a><text:span text:style-name="T103">] sudo apt install gdb</text:span></text:p>
          </table:table-cell>
        </table:table-row>
      </table:table>
      <text:p text:style-name="P412"/>
      <text:p text:style-name="P414">To run it, pass the program you want to debug as a command-line argument</text:p>
      <text:p text:style-name="P414"/>
      <table:table table:name="Table108" table:style-name="Table108">
        <table:table-column table:style-name="Table108.A"/>
        <table:table-row>
          <table:table-cell table:style-name="Table108.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451">gdb ./hello</text:span></text:p>
            <text:p text:style-name="P82">GNU gdb (Debian 10.1-2) 10.1.90.20210103-git</text:p>
            <text:p text:style-name="P82">Copyright (C) 2021 Free Software Foundation, Inc.</text:p>
            <text:p text:style-name="P82">License GPLv3+: GNU GPL version 3 or later &lt;http://gnu.org/licenses/gpl.html&gt;</text:p>
            <text:p text:style-name="P82">This is free software: you are free to change and redistribute it.</text:p>
            <text:p text:style-name="P82">There is NO WARRANTY, to the extent permitted by law.</text:p>
            <text:p text:style-name="P82">Type "show copying" and "show warranty" for details.</text:p>
            <text:p text:style-name="P82">This GDB was configured as "x86_64-linux-gnu".</text:p>
            <text:p text:style-name="P82">Type "show configuration" for configuration details.</text:p>
            <text:p text:style-name="P82">For bug reporting instructions, please see:</text:p>
            <text:p text:style-name="P82">&lt;https://www.gnu.org/software/gdb/bugs/&gt;.</text:p>
            <text:p text:style-name="P82">Find the GDB manual and other documentation resources online at:</text:p>
            <text:p text:style-name="P82"><text:s text:c="4"/>&lt;http://www.gnu.org/software/gdb/documentation/&gt;.</text:p>
            <text:p text:style-name="P82"/>
            <text:p text:style-name="P82">For help, type "help".</text:p>
            <text:p text:style-name="P82">Type "apropos word" to search for commands related to "word"...</text:p>
            <text:p text:style-name="P82"/>
            <text:p text:style-name="P82">Reading symbols from ./<text:span text:style-name="T147">h</text:span>ello...</text:p>
            <text:p text:style-name="P82">(gdb)</text:p>
          </table:table-cell>
        </table:table-row>
      </table:table>
      <text:p text:style-name="P414"/>
      <text:p text:style-name="P324"><text:span text:style-name="T452">After the initial banner (can be removed with the </text:span><text:span text:style-name="T141">-q</text:span><text:span text:style-name="T452"> option) </text:span><text:span text:style-name="T141">gdb</text:span><text:span text:style-name="T452"> reads the symbol table</text:span><text:span text:style-name="T452"><text:note text:id="ftn26" text:note-class="footnote"><text:note-citation>26</text:note-citation><text:note-body><text:p text:style-name="P415">The <text:span text:style-name="T35">symbol table</text:span> is the list of the functions used in the program</text:p></text:note-body></text:note></text:span><text:span text:style-name="T452"> </text:span><text:span text:style-name="T453">of the executable</text:span><text:span text:style-name="T452"> file </text:span><text:span text:style-name="T453">and </text:span><text:span text:style-name="T454">displays</text:span><text:span text:style-name="T453"> the</text:span><text:span text:style-name="T455"> prompt.</text:span></text:p>
      <text:p text:style-name="P416"><text:span text:style-name="T456">We</text:span><text:span text:style-name="T457"> can insert debugging information into compile-time programs with the option </text:span><text:span text:style-name="T458">-g</text:span><text:span text:style-name="T457"> </text:span><text:span text:style-name="T459">of</text:span><text:span text:style-name="T457"> </text:span><text:span text:style-name="T458">gcc</text:span><text:span text:style-name="T457">.</text:span></text:p>
      <text:p text:style-name="P416"/>
      <table:table table:name="Table109" table:style-name="Table109">
        <table:table-column table:style-name="Table109.A"/>
        <table:table-row>
          <table:table-cell table:style-name="Table109.A1" office:value-type="string">
            <text:p text:style-name="P417"><text:span text:style-name="T103">[</text:span><text:a xlink:type="simple" xlink:href="mailto:linux@io" text:style-name="Internet_20_link" text:visited-style-name="Visited_20_Internet_20_Link"><text:span text:style-name="T103">linux@basis</text:span></text:a><text:span text:style-name="T103">] gcc </text:span><text:span text:style-name="T460">hello</text:span><text:span text:style-name="T103">.c -</text:span><text:span text:style-name="T461">g </text:span><text:span text:style-name="T103">-o </text:span><text:span text:style-name="T131">h</text:span><text:span text:style-name="T103">ello</text:span></text:p>
          </table:table-cell>
        </table:table-row>
      </table:table>
      <text:p text:style-name="P416"/>
      <text:p text:style-name="P324"><text:span text:style-name="T462">Once </text:span><text:span text:style-name="T463">included</text:span><text:span text:style-name="T462">, they can be viewed and used. </text:span><text:span text:style-name="T454">For example, t</text:span><text:span text:style-name="T462">he </text:span><text:span text:style-name="Source_20_Text"><text:span text:style-name="T464">list</text:span></text:span><text:span text:style-name="T462"> command in </text:span><text:span text:style-name="Source_20_Text"><text:span text:style-name="T464">gdb</text:span></text:span><text:span text:style-name="T462"> displays the source code that is included in the debugging information of the executable. </text:span></text:p>
      <text:p text:style-name="P418"/>
      <table:table table:name="Table110" table:style-name="Table110">
        <table:table-column table:style-name="Table110.A"/>
        <table:table-row>
          <table:table-cell table:style-name="Table110.A1" office:value-type="string">
            <text:p text:style-name="P419"><text:span text:style-name="T103">[</text:span><text:a xlink:type="simple" xlink:href="mailto:linux@io" text:style-name="Internet_20_link" text:visited-style-name="Visited_20_Internet_20_Link"><text:span text:style-name="T103">linux@basis</text:span></text:a><text:span text:style-name="T103">] gdb -</text:span><text:span text:style-name="T465">q </text:span><text:span text:style-name="T103">./</text:span><text:span text:style-name="T131">h</text:span><text:span text:style-name="T103">ello</text:span></text:p>
            <text:p text:style-name="P420">Reading symbols from ./<text:span text:style-name="T147">h</text:span>ello...</text:p>
            <text:p text:style-name="P420">(gdb) </text:p>
            <text:p text:style-name="P421">(gdb) <text:span text:style-name="T466">break main</text:span></text:p>
            <text:p text:style-name="P421">Breakpoint 1 at 0x113d: file hello.c, line 5.</text:p>
            <text:p text:style-name="P421"><text:soft-page-break/>(gdb) <text:span text:style-name="T153">start</text:span></text:p>
            <text:p text:style-name="P421">Temporary breakpoint 2 at 0x113d: file hello.c, line 5.</text:p>
            <text:p text:style-name="P421">Starting program: /home/<text:span text:style-name="T147">basis</text:span>/<text:span text:style-name="T147">h</text:span>ello</text:p>
            <text:p text:style-name="P421"/>
            <text:p text:style-name="P421">Breakpoint 1, main () at hello.c:5</text:p>
            <text:p text:style-name="P421">5<text:tab/><text:tab/>printf ("\nHello, World");</text:p>
            <text:p text:style-name="P421">(gdb) <text:span text:style-name="T153">list</text:span></text:p>
            <text:p text:style-name="P421">1<text:tab/>#include "hello.h"</text:p>
            <text:p text:style-name="P421">2<text:tab/></text:p>
            <text:p text:style-name="P421">3<text:tab/>int main()</text:p>
            <text:p text:style-name="P421">4<text:tab/>{</text:p>
            <text:p text:style-name="P421">5<text:tab/><text:tab/>printf ("\nHello, World");</text:p>
            <text:p text:style-name="P421">6<text:tab/><text:tab/>return 0;</text:p>
            <text:p text:style-name="P421">7<text:tab/>}</text:p>
            <text:p text:style-name="P421">(gdb) <text:span text:style-name="T467">disassemble</text:span></text:p>
            <text:p text:style-name="P421">Dump of assembler code for function main:</text:p>
            <text:p text:style-name="P421"><text:s text:c="3"/>0x0000555555555139 &lt;+0&gt;:<text:tab/>push <text:s text:c="2"/>%rbp</text:p>
            <text:p text:style-name="P421"><text:s text:c="3"/>0x000055555555513a &lt;+1&gt;:<text:tab/>mov <text:s text:c="3"/>%rsp,%rbp</text:p>
            <text:p text:style-name="P421">=&gt; 0x000055555555513d &lt;+4&gt;:<text:tab/>lea <text:s text:c="3"/>0xec0(%rip),%rax <text:s text:c="7"/># 0x555555556004</text:p>
            <text:p text:style-name="P421"><text:s text:c="3"/>0x0000555555555144 &lt;+11&gt;:<text:tab/>mov <text:s text:c="3"/>%rax,%rdi</text:p>
            <text:p text:style-name="P421"><text:s text:c="3"/>0x0000555555555147 &lt;+14&gt;:<text:tab/>mov <text:s text:c="3"/>$0x0,%eax</text:p>
            <text:p text:style-name="P421"><text:s text:c="3"/>0x000055555555514c &lt;+19&gt;:<text:tab/>call <text:s text:c="2"/>0x555555555030 &lt;printf@plt&gt;</text:p>
            <text:p text:style-name="P421"><text:s text:c="3"/>0x0000555555555151 &lt;+24&gt;:<text:tab/>mov <text:s text:c="3"/>$0x0,%eax</text:p>
            <text:p text:style-name="P421"><text:s text:c="3"/>0x0000555555555156 &lt;+29&gt;:<text:tab/>pop <text:s text:c="3"/>%rbp</text:p>
            <text:p text:style-name="P421"><text:s text:c="3"/>0x0000555555555157 &lt;+30&gt;:<text:tab/>ret <text:s text:c="3"/></text:p>
            <text:p text:style-name="P421">End of assembler dump.</text:p>
            <text:p text:style-name="P421">(gdb) <text:span text:style-name="T153">set disassembly-flavor intel</text:span></text:p>
            <text:p text:style-name="P421">(gdb) <text:span text:style-name="T153">disassemble</text:span> </text:p>
            <text:p text:style-name="P421">Dump of assembler code for function main:</text:p>
            <text:p text:style-name="P421"><text:s text:c="3"/>0x0000555555555139 &lt;+0&gt;:<text:tab/>push <text:s text:c="2"/>rbp</text:p>
            <text:p text:style-name="P421"><text:s text:c="3"/>0x000055555555513a &lt;+1&gt;:<text:tab/>mov <text:s text:c="3"/>rbp,rsp</text:p>
            <text:p text:style-name="P421">=&gt; 0x000055555555513d &lt;+4&gt;:<text:tab/>lea <text:s text:c="3"/>rax,[rip+0xec0] <text:s text:c="7"/># 0x555555556004</text:p>
            <text:p text:style-name="P421"><text:s text:c="3"/>0x0000555555555144 &lt;+11&gt;:<text:tab/>mov <text:s text:c="3"/>rdi,rax</text:p>
            <text:p text:style-name="P421"><text:s text:c="3"/>0x0000555555555147 &lt;+14&gt;:<text:tab/>mov <text:s text:c="3"/>eax,0x0</text:p>
            <text:p text:style-name="P421"><text:s text:c="3"/>0x000055555555514c &lt;+19&gt;:<text:tab/>call <text:s text:c="2"/>0x555555555030 &lt;printf@plt&gt;</text:p>
            <text:p text:style-name="P421"><text:s text:c="3"/>0x0000555555555151 &lt;+24&gt;:<text:tab/>mov <text:s text:c="3"/>eax,0x0</text:p>
            <text:p text:style-name="P421"><text:s text:c="3"/>0x0000555555555156 &lt;+29&gt;:<text:tab/>pop <text:s text:c="3"/>rbp</text:p>
            <text:p text:style-name="P421"><text:s text:c="3"/>0x0000555555555157 &lt;+30&gt;:<text:tab/>ret <text:s text:c="3"/></text:p>
            <text:p text:style-name="P421">End of assembler dump.</text:p>
            <text:p text:style-name="P421">(gdb) <text:span text:style-name="T153">next</text:span> </text:p>
            <text:p text:style-name="P421">6<text:tab/><text:tab/>return 0;</text:p>
            <text:p text:style-name="P421">(gdb) <text:span text:style-name="T468">cont</text:span></text:p>
            <text:p text:style-name="P421">Continuing.</text:p>
            <text:p text:style-name="P421">Hello, World[Inferior 1 (process 219752) exited normally]</text:p>
            <text:p text:style-name="P421">(gdb) <text:span text:style-name="T468">quit</text:span></text:p>
            <text:p text:style-name="P421"/>
            <text:p text:style-name="P422"><text:span text:style-name="T103">[</text:span><text:a xlink:type="simple" xlink:href="mailto:linux@io" text:style-name="Internet_20_link" text:visited-style-name="Visited_20_Internet_20_Link"><text:span text:style-name="T103">linux@basis</text:span></text:a><text:span text:style-name="T103">] </text:span></text:p>
          </table:table-cell>
        </table:table-row>
      </table:table>
      <text:p text:style-name="P418"/>
      <text:p text:style-name="P418"/>
      <text:p text:style-name="P418"/>
      <text:p text:style-name="P113"><text:soft-page-break/><text:span text:style-name="Source_20_Text"><text:span text:style-name="T141">gdb</text:span></text:span><text:span text:style-name="T469"> provides many commands for memory analysis, variable inspection, and other operations</text:span><text:span text:style-name="T469"><text:note text:id="ftn27" text:note-class="footnote"><text:note-citation>27</text:note-citation><text:note-body><text:p text:style-name="P423"><text:s/>See the <text:span text:style-name="T15">gdb(1)</text:span> manual page and the links in <text:span text:style-name="T470">the bibliography</text:span></text:p></text:note-body></text:note></text:span><text:span text:style-name="T469">. </text:span><text:span text:style-name="T471">T</text:span><text:span text:style-name="T472">he following table lists some </text:span><text:span text:style-name="T141">gdb</text:span><text:span text:style-name="T472"> commands</text:span><text:span text:style-name="T473"><text:note text:id="ftn28" text:note-class="footnote"><text:note-citation>28</text:note-citation><text:note-body><text:p text:style-name="P424"><text:span text:style-name="T474">For a complete list of </text:span><text:span text:style-name="T255">the</text:span><text:span text:style-name="T474"> </text:span><text:span text:style-name="T475">gdb</text:span><text:span text:style-name="T474"> features </text:span><text:span text:style-name="T255">see</text:span><text:span text:style-name="T474"> the </text:span><text:span text:style-name="T475">gdb(1)</text:span><text:span text:style-name="T474"> manual page </text:span></text:p></text:note-body></text:note></text:span></text:p>
      <text:p text:style-name="P425"/>
      <table:table table:name="Table15" table:style-name="Table15">
        <table:table-column table:style-name="Table15.A"/>
        <table:table-column table:style-name="Table15.B"/>
        <table:table-row>
          <table:table-cell table:style-name="Table15.A1" office:value-type="string">
            <text:p text:style-name="P426"><text:span text:style-name="T476">b</text:span><text:span text:style-name="T477">acktrace</text:span></text:p>
            <text:p text:style-name="P427">bt</text:p>
          </table:table-cell>
          <table:table-cell table:style-name="Table15.B1" office:value-type="string">
            <text:p text:style-name="P426"><text:span text:style-name="T478">Displays </text:span>the content of the stack<text:note text:id="ftn29" text:note-class="footnote"><text:note-citation>29</text:note-citation><text:note-body><text:p text:style-name="P428"><text:span text:style-name="T479"><text:s/>The </text:span><text:span text:style-name="T475">backtrace</text:span><text:span text:style-name="T479"> command also has the short form </text:span><text:span text:style-name="T475">bt</text:span><text:span text:style-name="T479">, the same for the other </text:span><text:span text:style-name="T480">listed </text:span><text:span text:style-name="T479">commands </text:span></text:p></text:note-body></text:note></text:p>
          </table:table-cell>
        </table:table-row>
        <table:table-row>
          <table:table-cell table:style-name="Table15.A2" office:value-type="string">
            <text:p text:style-name="P427">break</text:p>
          </table:table-cell>
          <table:table-cell table:style-name="Table15.B2" office:value-type="string">
            <text:p text:style-name="P426"><text:span text:style-name="T478">Set a </text:span>break point</text:p>
          </table:table-cell>
        </table:table-row>
        <table:table-row>
          <table:table-cell table:style-name="Table15.A2" office:value-type="string">
            <text:p text:style-name="P426"><text:span text:style-name="T477">continue</text:span> </text:p>
            <text:p text:style-name="P427">cont</text:p>
          </table:table-cell>
          <table:table-cell table:style-name="Table15.B2" office:value-type="string">
            <text:p text:style-name="P426">Continue the execution until the next break point</text:p>
          </table:table-cell>
        </table:table-row>
        <table:table-row>
          <table:table-cell table:style-name="Table15.A2" office:value-type="string">
            <text:p text:style-name="P426"><text:span text:style-name="T477">disassemble</text:span> </text:p>
          </table:table-cell>
          <table:table-cell table:style-name="Table15.B2" office:value-type="string">
            <text:p text:style-name="P426"><text:span text:style-name="T478">Displays </text:span>the assembly code</text:p>
          </table:table-cell>
        </table:table-row>
        <table:table-row>
          <table:table-cell table:style-name="Table15.A2" office:value-type="string">
            <text:p text:style-name="P426"><text:span text:style-name="T477">info register</text:span> </text:p>
            <text:p text:style-name="P426"><text:span text:style-name="T477">i r</text:span> </text:p>
          </table:table-cell>
          <table:table-cell table:style-name="Table15.B2" office:value-type="string">
            <text:p text:style-name="P429">Displays the content of a cpu register</text:p>
          </table:table-cell>
        </table:table-row>
        <table:table-row>
          <table:table-cell table:style-name="Table15.A2" office:value-type="string">
            <text:p text:style-name="P427">list</text:p>
          </table:table-cell>
          <table:table-cell table:style-name="Table15.B2" office:value-type="string">
            <text:p text:style-name="P429">Displays the source code</text:p>
          </table:table-cell>
        </table:table-row>
        <table:table-row>
          <table:table-cell table:style-name="Table15.A2" office:value-type="string">
            <text:p text:style-name="P427">nexti</text:p>
          </table:table-cell>
          <table:table-cell table:style-name="Table15.B2" office:value-type="string">
            <text:p text:style-name="P429">Executes the next instruction</text:p>
          </table:table-cell>
        </table:table-row>
        <table:table-row>
          <table:table-cell table:style-name="Table15.A2" office:value-type="string">
            <text:p text:style-name="P427">quit</text:p>
          </table:table-cell>
          <table:table-cell table:style-name="Table15.B2" office:value-type="string">
            <text:p text:style-name="P429">Quit from the debugger</text:p>
          </table:table-cell>
        </table:table-row>
        <table:table-row>
          <table:table-cell table:style-name="Table15.A2" office:value-type="string">
            <text:p text:style-name="P426"><text:span text:style-name="T477">run</text:span> </text:p>
          </table:table-cell>
          <table:table-cell table:style-name="Table15.B2" office:value-type="string">
            <text:p text:style-name="P429">Start the exeution of the program</text:p>
          </table:table-cell>
        </table:table-row>
        <table:table-row>
          <table:table-cell table:style-name="Table15.A2" office:value-type="string">
            <text:p text:style-name="P427">set</text:p>
          </table:table-cell>
          <table:table-cell table:style-name="Table15.B2" office:value-type="string">
            <text:p text:style-name="P426"><text:span text:style-name="T478">Activatea a setting</text:span> </text:p>
          </table:table-cell>
        </table:table-row>
        <table:table-row>
          <table:table-cell table:style-name="Table15.A2" office:value-type="string">
            <text:p text:style-name="P426"><text:span text:style-name="T477">step</text:span> </text:p>
            <text:p text:style-name="P427">s</text:p>
          </table:table-cell>
          <table:table-cell table:style-name="Table15.B2" office:value-type="string">
            <text:p text:style-name="P430">Continue<text:span text:style-name="T478">s</text:span> execution until the next line of source code</text:p>
          </table:table-cell>
        </table:table-row>
        <table:table-row>
          <table:table-cell table:style-name="Table15.A2" office:value-type="string">
            <text:p text:style-name="P427">x</text:p>
          </table:table-cell>
          <table:table-cell table:style-name="Table15.B2" office:value-type="string">
            <text:p text:style-name="P426">Examine the contents of one or more memory cells</text:p>
          </table:table-cell>
        </table:table-row>
      </table:table>
      <text:p text:style-name="P431"/>
      <text:p text:style-name="P432"><text:span text:style-name="T481">Tab </text:span><text:span text:style-name="T482">3</text:span><text:span text:style-name="T481">. </text:span><text:span text:style-name="T483">gdb</text:span><text:span text:style-name="T484"> commands</text:span></text:p>
      <text:p text:style-name="P433"/>
      <text:p text:style-name="P434"><text:span text:style-name="T485">We can install t</text:span><text:span text:style-name="T486">he documentation </text:span><text:span text:style-name="T487">using</text:span><text:span text:style-name="T485"> </text:span><text:span text:style-name="T488">apt</text:span></text:p>
      <text:p text:style-name="P435"/>
      <table:table table:name="Table13" table:style-name="Table13">
        <table:table-column table:style-name="Table13.A"/>
        <table:table-row>
          <table:table-cell table:style-name="Table13.A1" office:value-type="string">
            <text:p text:style-name="P436"><text:span text:style-name="T103">[</text:span><text:a xlink:type="simple" xlink:href="mailto:linux@base" text:style-name="Internet_20_link" text:visited-style-name="Visited_20_Internet_20_Link"><text:span text:style-name="T103">linux@basis</text:span></text:a><text:span text:style-name="T103">] sudo apt install gdb-doc</text:span></text:p>
            <text:p text:style-name="P437">...output...</text:p>
          </table:table-cell>
        </table:table-row>
      </table:table>
      <text:p text:style-name="P435"/>
      <text:p text:style-name="P113"><text:span text:style-name="T489">The </text:span><text:span text:style-name="T488">-q</text:span><text:span text:style-name="T489"> option allows you to avoid displaying the initial banner during startup.</text:span></text:p>
      <text:p text:style-name="P113"><text:span text:style-name="T489">The </text:span><text:span text:style-name="T488">--args</text:span><text:span text:style-name="T489"> option allows you to pass command-line arguments to the program you want to debug.</text:span></text:p>
      <text:p text:style-name="P438"/>
      <text:p text:style-name="P434"><text:span text:style-name="T490">We can use</text:span><text:span text:style-name="T489"> the following </text:span><text:span text:style-name="T488">hello</text:span><text:span text:style-name="T491">2</text:span><text:span text:style-name="T488">.c</text:span><text:span text:style-name="T489"> program </text:span><text:span text:style-name="T490">to have a debugging session</text:span><text:span text:style-name="T489"> with </text:span><text:span text:style-name="T488">gdb</text:span></text:p>
      <text:p text:style-name="P439"/>
      <text:p text:style-name="P440"><text:span text:style-name="T32">#include </text:span><text:span text:style-name="T33">&lt;stdio.h&gt;</text:span></text:p>
      <text:p text:style-name="P440"><text:span text:style-name="T32">#include </text:span><text:span text:style-name="T33">&lt;stdlib.h&gt;</text:span></text:p>
      <text:p text:style-name="P440"/>
      <text:p text:style-name="P440"><text:span text:style-name="T32">int</text:span> main (<text:span text:style-name="T32">int</text:span> argc, <text:span text:style-name="T32">char</text:span> *argv<text:span text:style-name="T32">[]</text:span>)</text:p>
      <text:p text:style-name="P440">{</text:p>
      <text:p text:style-name="P440"><text:span text:style-name="T32"><text:tab/>int</text:span> x;</text:p>
      <text:p text:style-name="P440"><text:tab/>x = atoi(argv[<text:span text:style-name="T230">1</text:span>]);</text:p>
      <text:p text:style-name="P440"><text:soft-page-break/><text:tab/>printf (<text:span text:style-name="T33">"%d"</text:span>, x);</text:p>
      <text:p text:style-name="P440"><text:span text:style-name="T32"><text:tab/>return</text:span> <text:span text:style-name="T230">0</text:span>;</text:p>
      <text:p text:style-name="P440">}</text:p>
      <text:p text:style-name="P441"/>
      <text:p text:style-name="P442"><text:span text:style-name="T492">h</text:span><text:span text:style-name="T493">ello</text:span><text:span text:style-name="T494">2</text:span><text:span text:style-name="T493">.c</text:span><text:span text:style-name="T495"> </text:span><text:span text:style-name="T496">Prints the </text:span><text:span text:style-name="T497">passed</text:span><text:span text:style-name="T496"> number </text:span><text:span text:style-name="T497">on the console</text:span></text:p>
      <text:p text:style-name="P443"/>
      <table:table table:name="Table14" table:style-name="Table14">
        <table:table-column table:style-name="Table14.A"/>
        <table:table-row>
          <table:table-cell table:style-name="Table14.A1" office:value-type="string">
            <text:p text:style-name="P444"><text:span text:style-name="T103">[</text:span><text:a xlink:type="simple" xlink:href="mailto:linux@base" text:style-name="Internet_20_link" text:visited-style-name="Visited_20_Internet_20_Link"><text:span text:style-name="T103">linux@basis</text:span></text:a><text:span text:style-name="T103">] gdb -q --args </text:span><text:span text:style-name="T485">h</text:span><text:span text:style-name="T103">ello</text:span><text:span text:style-name="T498">2</text:span><text:span text:style-name="T103"> 4</text:span></text:p>
            <text:p text:style-name="P445">Reading symbols from <text:span text:style-name="T480">h</text:span>ello<text:span text:style-name="T56">2</text:span>...</text:p>
            <text:p text:style-name="P445">(No debugging symbols found in <text:span text:style-name="T480">h</text:span>ello)</text:p>
            <text:p text:style-name="P445">(gdb) <text:span text:style-name="T153">break</text:span> <text:span text:style-name="T153">main</text:span></text:p>
            <text:p text:style-name="P445">Breakpoint 1 at 0x114d</text:p>
            <text:p text:style-name="P445">(gdb) <text:span text:style-name="T153">set disassembly-flavor</text:span> <text:span text:style-name="T153">intel</text:span></text:p>
            <text:p text:style-name="P445">(gdb) <text:span text:style-name="T153">disassemble</text:span> <text:span text:style-name="T153">main</text:span></text:p>
            <text:p text:style-name="P445">Dump of assembler code for function main:</text:p>
            <text:p text:style-name="P445"><text:s text:c="3"/>0x0000000000001149 &lt;+0&gt;:<text:tab/>push <text:s text:c="2"/>rbp</text:p>
            <text:p text:style-name="P445"><text:s text:c="3"/>0x000000000000114a &lt;+1&gt;:<text:tab/>mov <text:s text:c="3"/>rbp,rsp</text:p>
            <text:p text:style-name="P445"><text:s text:c="3"/>0x000000000000114d &lt;+4&gt;:<text:tab/>sub <text:s text:c="3"/>rsp,0x20</text:p>
            <text:p text:style-name="P445"><text:s text:c="3"/>0x0000000000001151 &lt;+8&gt;:<text:tab/>mov <text:s text:c="3"/>DWORD PTR [rbp-0x14],edi</text:p>
            <text:p text:style-name="P445"><text:s text:c="3"/>0x0000000000001154 &lt;+11&gt;:<text:tab/>mov <text:s text:c="3"/>QWORD PTR [rbp-0x20],rsi</text:p>
            <text:p text:style-name="P445"><text:s text:c="3"/>0x0000000000001158 &lt;+15&gt;:<text:tab/>mov <text:s text:c="3"/>rax,QWORD PTR [rbp-0x20]</text:p>
            <text:p text:style-name="P445"><text:s text:c="3"/>0x000000000000115c &lt;+19&gt;:<text:tab/>add <text:s text:c="3"/>rax,0x8</text:p>
            <text:p text:style-name="P445"><text:s text:c="3"/>0x0000000000001160 &lt;+23&gt;:<text:tab/>mov <text:s text:c="3"/>rax,QWORD PTR [rax]</text:p>
            <text:p text:style-name="P445"><text:s text:c="3"/>0x0000000000001163 &lt;+26&gt;:<text:tab/>mov <text:s text:c="3"/>rdi,rax</text:p>
            <text:p text:style-name="P445"><text:s text:c="3"/>0x0000000000001166 &lt;+29&gt;:<text:tab/>call <text:s text:c="2"/>0x1040 &lt;atoi@plt&gt;</text:p>
            <text:p text:style-name="P445"><text:s text:c="3"/>0x000000000000116b &lt;+34&gt;:<text:tab/>mov <text:s text:c="3"/>DWORD PTR [rbp-0x4],eax</text:p>
            <text:p text:style-name="P445"><text:s text:c="3"/>0x000000000000116e &lt;+37&gt;:<text:tab/>mov <text:s text:c="3"/>eax,DWORD PTR [rbp-0x4]</text:p>
            <text:p text:style-name="P445"><text:s text:c="3"/>0x0000000000001171 &lt;+40&gt;:<text:tab/>mov <text:s text:c="3"/>esi,eax</text:p>
            <text:p text:style-name="P445"><text:s text:c="3"/>0x0000000000001173 &lt;+42&gt;:<text:tab/>lea <text:s text:c="3"/>rax,[rip+0xe8a] <text:s text:c="7"/># 0x2004</text:p>
            <text:p text:style-name="P445"><text:s text:c="3"/>0x000000000000117a &lt;+49&gt;:<text:tab/>mov <text:s text:c="3"/>rdi,rax</text:p>
            <text:p text:style-name="P445"><text:s text:c="3"/>0x000000000000117d &lt;+52&gt;:<text:tab/>mov <text:s text:c="3"/>eax,0x0</text:p>
            <text:p text:style-name="P445"><text:s text:c="3"/>0x0000000000001182 &lt;+57&gt;:<text:tab/>call <text:s text:c="2"/>0x1030 &lt;printf@plt&gt;</text:p>
            <text:p text:style-name="P445"><text:s text:c="3"/>0x0000000000001187 &lt;+62&gt;:<text:tab/>mov <text:s text:c="3"/>eax,0x0</text:p>
            <text:p text:style-name="P445"><text:s text:c="3"/>0x000000000000118c &lt;+67&gt;:<text:tab/>leave <text:s/></text:p>
            <text:p text:style-name="P445"><text:s text:c="3"/>0x000000000000118d &lt;+68&gt;:<text:tab/>ret <text:s text:c="3"/></text:p>
            <text:p text:style-name="P445">End of assembler dump.</text:p>
            <text:p text:style-name="P445">(gdb) <text:span text:style-name="T153">run</text:span> </text:p>
            <text:p text:style-name="P445">Starting program: /home/<text:span text:style-name="T480">basis</text:span>/<text:span text:style-name="T480">h</text:span>ello<text:span text:style-name="T56">2</text:span> 4</text:p>
            <text:p text:style-name="P445"/>
            <text:p text:style-name="P445">Breakpoint 1, 0x000055555555514d in main ()</text:p>
            <text:p text:style-name="P445">(gdb) <text:span text:style-name="T153">cont</text:span></text:p>
            <text:p text:style-name="P445">Continuing.</text:p>
            <text:p text:style-name="P445">4[Inferior 1 (process 7081) exited normally]</text:p>
            <text:p text:style-name="P446">(gdb) <text:span text:style-name="T153">quit</text:span></text:p>
          </table:table-cell>
        </table:table-row>
      </table:table>
      <text:p text:style-name="P443"/>
      <text:p text:style-name="P434"><text:span text:style-name="T473">The </text:span><text:span text:style-name="T488">break</text:span><text:span text:style-name="T473"> </text:span><text:span text:style-name="T488">main</text:span><text:span text:style-name="T473"> command sets a break point at the beginning of the main function. The </text:span><text:span text:style-name="T488">set</text:span><text:span text:style-name="T473"> </text:span><text:span text:style-name="T488">disassembly-flavor intel</text:span><text:span text:style-name="T473"> command sets the intel syntax for assembly language. The </text:span><text:span text:style-name="T488">disassemble</text:span><text:span text:style-name="T473"> </text:span><text:span text:style-name="T488">main</text:span><text:span text:style-name="T473"> command displays the assembly code of the main function. The </text:span><text:span text:style-name="T488">run</text:span><text:span text:style-name="T473"> command starts the execution of the program which stops at the break point set before. The </text:span><text:span text:style-name="T488">cont</text:span><text:span text:style-name="T473"> or </text:span><text:span text:style-name="T488">continue</text:span><text:span text:style-name="T473"> command continues program execution. The quit </text:span><text:span text:style-name="T488">command</text:span><text:span text:style-name="T473"> exits the debugger.</text:span></text:p>
      <text:p text:style-name="P324"><text:soft-page-break/><text:span text:style-name="T469">The output of the </text:span><text:span text:style-name="Source_20_Text"><text:span text:style-name="T141">disassemble</text:span></text:span><text:span text:style-name="T469"> command shows, in the first column, the memory address of each assembly instruction. The second column indicates the offset in bytes from the first instruction, while the third column contains the corresponding assembly instruction. The differences in the second column between successive entries represent the size of each instruction; for example, the first instruction (</text:span><text:span text:style-name="Source_20_Text"><text:span text:style-name="T141">push</text:span></text:span><text:span text:style-name="Source_20_Text"><text:span text:style-name="T469"> </text:span></text:span><text:span text:style-name="Source_20_Text"><text:span text:style-name="T141">rbp</text:span></text:span><text:span text:style-name="T469">) is 1 byte long, as indicated by the next entry showing </text:span><text:span text:style-name="Source_20_Text"><text:span text:style-name="T141">&lt;+1&gt;</text:span></text:span><text:span text:style-name="T469">.</text:span></text:p>
      <text:p text:style-name="P447">The arrow in the first column marks the current instruction, i.e. the exact point where the program execution is located.</text:p>
      <text:p text:style-name="P324"><text:span text:style-name="T469">Intel syntax for disassembly is generally more readable than AT&amp;T syntax, as it does not use symbols such as </text:span><text:span text:style-name="Source_20_Text"><text:span text:style-name="T141">%</text:span></text:span><text:span text:style-name="T469">.</text:span></text:p>
      <text:p text:style-name="P447"/>
      <text:p text:style-name="P447"><text:s/></text:p>
      <text:p text:style-name="P448"/>
      <text:p text:style-name="P448"/>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50"><text:bookmark-start text:name="0.9"/><text:soft-page-break/>0.<text:span text:style-name="T54">7</text:span> <text:span text:style-name="T499">The Linux </text:span>File Syste<text:span text:style-name="T499">m</text:span><text:bookmark-end text:name="0.9"/></text:p>
      <text:p text:style-name="P451"/>
      <text:p text:style-name="P324"><text:span text:style-name="T500">The </text:span><text:span text:style-name="T501">Linux File System</text:span><text:span text:style-name="T500"> is organized according to a tree structure starting from the root directory represented by the character </text:span><text:span text:style-name="T141">/</text:span><text:span text:style-name="T500">. The root directory (</text:span><text:span text:style-name="T141">/</text:span><text:span text:style-name="T500">) is the starting point of the <text:s/>filesystem. Not to be confused with the user </text:span><text:span text:style-name="T141">root</text:span><text:span text:style-name="T500"> </text:span><text:span text:style-name="T502">which</text:span><text:span text:style-name="T500"> is the superuser of the system and with the directory </text:span><text:span text:style-name="T141">/root</text:span><text:span text:style-name="T500"> that is the home directory of the </text:span><text:span text:style-name="T141">root</text:span><text:span text:style-name="T500"> user. Below is an overview of the Linux filesystem. </text:span></text:p>
      <text:p text:style-name="P452"/>
      <text:p text:style-name="P453">In directory / the following directories <text:span text:style-name="T503">are present</text:span>:</text:p>
      <text:p text:style-name="P453"/>
      <text:p text:style-name="P453"><text:span text:style-name="T136">boot</text:span><text:tab/><text:tab/><text:tab/>→ <text:span text:style-name="T504">Boot f</text:span><text:span text:style-name="T505">iles </text:span><text:span text:style-name="T504">of the system</text:span></text:p>
      <text:p text:style-name="P453"><text:span text:style-name="T136">dev</text:span><text:tab/><text:tab/><text:tab/>→ <text:span text:style-name="T504">Device files</text:span> <text:span text:style-name="T506">(audio, video, hard drives, etc..)</text:span></text:p>
      <text:p text:style-name="P453"><text:span text:style-name="T136">etc</text:span><text:tab/><text:tab/><text:tab/>→ <text:span text:style-name="T507">Configuration files</text:span></text:p>
      <text:p text:style-name="P453"><text:span text:style-name="T136">home</text:span><text:tab/><text:tab/><text:tab/>→ <text:span text:style-name="T507">Home directories of the users</text:span></text:p>
      <text:p text:style-name="P453"><text:span text:style-name="T136">lost+found</text:span><text:tab/>→ <text:span text:style-name="T507">Not needed files</text:span></text:p>
      <text:p text:style-name="P453"><text:span text:style-name="T136">media</text:span><text:tab/><text:tab/>→ <text:span text:style-name="T507">Mount point for removable devices</text:span></text:p>
      <text:p text:style-name="P453"><text:span text:style-name="T136">mnt</text:span><text:tab/><text:tab/><text:tab/>→ <text:span text:style-name="T507">Mount point for temporary file systems</text:span></text:p>
      <text:p text:style-name="P453"><text:span text:style-name="T136">opt</text:span><text:tab/><text:tab/><text:tab/>→ <text:span text:style-name="T507">Optional s</text:span><text:span text:style-name="T505">oftware</text:span></text:p>
      <text:p text:style-name="P453"><text:span text:style-name="T136">proc</text:span><text:tab/><text:tab/><text:tab/>→ <text:span text:style-name="T508">Running p</text:span><text:span text:style-name="T505">rocess</text:span><text:span text:style-name="T508">es on the system </text:span><text:span text:style-name="T509">(fs </text:span><text:span text:style-name="T510">proc</text:span><text:span text:style-name="T509"><text:note text:id="ftn30" text:note-class="footnote"><text:note-citation>30</text:note-citation><text:note-body><text:p text:style-name="P454"><text:span text:style-name="T511">The filesystem type</text:span><text:span text:style-name="T512">. </text:span><text:span text:style-name="T511">The</text:span><text:span text:style-name="T512"> </text:span><text:span text:style-name="T513">proc</text:span><text:span text:style-name="T512"> </text:span><text:span text:style-name="T511">directory is attached to a </text:span><text:span text:style-name="T514">proc </text:span><text:span text:style-name="T515">filesystem</text:span><text:span text:style-name="T512">, </text:span><text:span text:style-name="T511">the </text:span><text:span text:style-name="T513">run</text:span><text:span text:style-name="T512"> </text:span><text:span text:style-name="T511">directory to a </text:span><text:span text:style-name="T514">tmpfs </text:span><text:span text:style-name="T515">filesystem and the </text:span><text:span text:style-name="T513">sys</text:span><text:span text:style-name="T512"> </text:span><text:span text:style-name="T511">directory to a </text:span><text:span text:style-name="T514">sysfs</text:span><text:span text:style-name="T512"> </text:span><text:span text:style-name="T511">filesystem</text:span></text:p></text:note-body></text:note></text:span><text:span text:style-name="T509">)</text:span></text:p>
      <text:p text:style-name="P453"><text:span text:style-name="T136">root</text:span><text:tab/><text:tab/><text:tab/>→ <text:span text:style-name="T506">Home d</text:span><text:span text:style-name="T505">irectory </text:span><text:span text:style-name="T508">of the root user (superuser)</text:span></text:p>
      <text:p text:style-name="P453"><text:span text:style-name="T136">run</text:span><text:tab/><text:tab/><text:tab/>→ <text:span text:style-name="T508">T</text:span><text:span text:style-name="T516">empora</text:span><text:span text:style-name="T508">ry files of the running </text:span><text:span text:style-name="T505">process</text:span><text:span text:style-name="T508">es </text:span><text:span text:style-name="T505"><text:s/>(lock, logs, </text:span><text:span text:style-name="T517">etc..</text:span><text:span text:style-name="T505">) </text:span><text:span text:style-name="T509">(fs </text:span><text:span text:style-name="T510">tmpfs</text:span><text:span text:style-name="T509">)</text:span></text:p>
      <text:p text:style-name="P453"><text:span text:style-name="T136">srv</text:span><text:tab/><text:tab/><text:tab/>→ <text:span text:style-name="T505">Files </text:span><text:span text:style-name="T508">of the server services provided by the </text:span><text:span text:style-name="T518">s</text:span><text:span text:style-name="T508">y</text:span><text:span text:style-name="T518">stem (FTP, WWW)</text:span></text:p>
      <text:p text:style-name="P453"><text:span text:style-name="T136">sys</text:span><text:tab/><text:tab/><text:tab/>→ <text:span text:style-name="T519">Information and </text:span><text:span text:style-name="T518">kernel </text:span><text:span text:style-name="T519">interface</text:span><text:span text:style-name="T518"> </text:span><text:span text:style-name="T509">(fs </text:span><text:span text:style-name="T510">sysfs</text:span><text:span text:style-name="T509">)</text:span></text:p>
      <text:p text:style-name="P453"><text:span text:style-name="T136">tmp</text:span><text:tab/><text:tab/><text:tab/>→ <text:span text:style-name="T519">Temporary f</text:span><text:span text:style-name="T518">iles</text:span></text:p>
      <text:p text:style-name="P453"><text:span text:style-name="T136">usr</text:span><text:tab/><text:tab/><text:tab/>→ <text:span text:style-name="T520">Applications and programs of the users</text:span></text:p>
      <text:p text:style-name="P453"><text:span text:style-name="T136">var</text:span><text:tab/><text:tab/><text:tab/>→ <text:span text:style-name="T518">Files </text:span><text:span text:style-name="T521">created by the programs</text:span><text:span text:style-name="T518"> (logs, caches, </text:span><text:span text:style-name="T522">etc..</text:span><text:span text:style-name="T518">)</text:span></text:p>
      <text:p text:style-name="P453"/>
      <text:p text:style-name="P455"><text:span text:style-name="T523">In the</text:span> <text:span text:style-name="T136">/</text:span> <text:span text:style-name="T523">folder </text:span><text:span text:style-name="T503">the following links are present</text:span><text:span text:style-name="T523">:</text:span></text:p>
      <text:p text:style-name="P456"/>
      <text:p text:style-name="P456"><text:span text:style-name="T136">bin</text:span> → <text:span text:style-name="T136">/usr/bin</text:span><text:tab/><text:tab/>→ <text:span text:style-name="T524">Link </text:span><text:span text:style-name="T525">to the executable programs</text:span></text:p>
      <text:p text:style-name="P456"><text:span text:style-name="T136">lib</text:span> → <text:span text:style-name="T136">/usr/lib</text:span><text:tab/><text:tab/>→ <text:span text:style-name="T524">Link </text:span><text:span text:style-name="T525">to the libraries</text:span></text:p>
      <text:p text:style-name="P457"><text:span text:style-name="T136">lib32</text:span> → <text:span text:style-name="T136">/usr/lib32</text:span><text:tab/>→ Link <text:span text:style-name="T525">to the libraries for 32-bit </text:span>s<text:span text:style-name="T525">y</text:span>stem<text:span text:style-name="T525">s</text:span></text:p>
      <text:p text:style-name="P457"><text:span text:style-name="T136">lib64</text:span> → <text:span text:style-name="T136">/usr/lib64</text:span> <text:tab/>→ Link <text:span text:style-name="T525">to the libraries for 64-bit </text:span>s<text:span text:style-name="T525">y</text:span>stem<text:span text:style-name="T525">s</text:span></text:p>
      <text:p text:style-name="P458"><text:span text:style-name="T136">sbin</text:span> <text:s text:c="2"/>→ <text:span text:style-name="T136">/usr/sbin</text:span><text:tab/>→ <text:span text:style-name="T524">Link </text:span><text:span text:style-name="T526">to the executable programs of the </text:span><text:span text:style-name="T524">superuser (</text:span><text:span text:style-name="T136">root</text:span><text:span text:style-name="T524">)</text:span></text:p>
      <text:p text:style-name="P451"/>
      <text:p text:style-name="P459"><text:span text:style-name="T527">And the </text:span>files:</text:p>
      <text:p text:style-name="P459"/>
      <text:p text:style-name="P455"><text:span text:style-name="T136">initrd.img</text:span><text:tab/>→ <text:span text:style-name="T528">F</text:span>ile system <text:span text:style-name="T528">image to mount as</text:span><text:span text:style-name="T529"> RAM disk </text:span><text:span text:style-name="T528">during the </text:span>boot <text:span text:style-name="T528">phase</text:span></text:p>
      <text:p text:style-name="P455"><text:span text:style-name="T136">vmlinuz</text:span> <text:tab/><text:tab/>→ Kernel Linux</text:p>
      <text:p text:style-name="P455"/>
      <text:p text:style-name="P460"><text:span text:style-name="T530">Some </text:span><text:span text:style-name="T503">of the most commonly used </text:span>directorie<text:span text:style-name="T503">s are</text:span>:</text:p>
      <text:p text:style-name="P460"/>
      <text:p text:style-name="P460"><text:span text:style-name="T136">/proc/sys</text:span><text:span text:style-name="T531"><text:tab/><text:tab/><text:tab/>→ sistem </text:span><text:span text:style-name="T530">cofiguration</text:span></text:p>
      <text:p text:style-name="P460"><text:span text:style-name="T136">/usr/bin</text:span><text:span text:style-name="T531"><text:tab/><text:tab/><text:tab/>→ </text:span><text:span text:style-name="T530">executable programs</text:span></text:p>
      <text:p text:style-name="P460"><text:span text:style-name="T136">/usr/lib</text:span><text:span text:style-name="T531"><text:tab/><text:tab/><text:tab/>→ libr</text:span><text:span text:style-name="T530">aries</text:span></text:p>
      <text:p text:style-name="P460"><text:span text:style-name="T136">/usr/local</text:span><text:span text:style-name="T531"><text:tab/><text:tab/>→ </text:span><text:span text:style-name="T530">additional programs and configurations</text:span></text:p>
      <text:p text:style-name="P460"><text:span text:style-name="T136">/usr/sbin</text:span><text:span text:style-name="T531"><text:tab/><text:tab/><text:tab/>→ </text:span><text:span text:style-name="T530">executable programs of the superuser</text:span></text:p>
      <text:p text:style-name="P460"><text:soft-page-break/><text:span text:style-name="T136">/usr/share</text:span><text:span text:style-name="T531"><text:tab/><text:tab/>→ </text:span><text:span text:style-name="T530">files shared by programs</text:span></text:p>
      <text:p text:style-name="P460"><text:span text:style-name="T136">/usr/share/doc<text:tab/><text:tab/></text:span><text:span text:style-name="T531">→ documenta</text:span><text:span text:style-name="T530">tion</text:span></text:p>
      <text:p text:style-name="P460"><text:span text:style-name="T136">/var/log</text:span><text:span text:style-name="T531"><text:tab/><text:tab/><text:tab/>→ </text:span><text:span text:style-name="T530">system logs</text:span></text:p>
      <text:p text:style-name="P460"><text:span text:style-name="T136">/var/run</text:span><text:span text:style-name="T531"><text:tab/><text:tab/><text:tab/>→ files </text:span><text:span text:style-name="T530">and</text:span><text:span text:style-name="T531"> locks </text:span><text:span text:style-name="T530">of the running processes</text:span></text:p>
      <text:p text:style-name="P461"/>
      <text:p text:style-name="P462"><text:span text:style-name="T532">The default filesystem type used by Linux systems is </text:span><text:span text:style-name="T533">ext4</text:span><text:span text:style-name="T532">. For a complete list of Linux filesystem types, see the </text:span><text:span text:style-name="Source_20_Text"><text:span text:style-name="T141">filesystems(5)</text:span></text:span><text:span text:style-name="T532"> manual page.</text:span></text:p>
      <text:p text:style-name="P463"/>
      <text:p text:style-name="P463"><text:span text:style-name="T530">With the</text:span><text:span text:style-name="T534"> </text:span><text:span text:style-name="T535">df</text:span><text:span text:style-name="T534"> </text:span><text:span text:style-name="T530">program, we can </text:span><text:span text:style-name="T503">view</text:span><text:span text:style-name="T530"> all </text:span><text:span text:style-name="T536">currently</text:span><text:span text:style-name="T509"> </text:span><text:span text:style-name="T530">mounted </text:span><text:span text:style-name="T503">filesystems.</text:span></text:p>
      <text:p text:style-name="P464"/>
      <table:table table:name="Table111" table:style-name="Table111">
        <table:table-column table:style-name="Table111.A"/>
        <table:table-row>
          <table:table-cell table:style-name="Table111.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537">df -a</text:span></text:p>
            <text:p text:style-name="P369">...<text:span text:style-name="T503">output...</text:span></text:p>
          </table:table-cell>
        </table:table-row>
      </table:table>
      <text:p text:style-name="P464"/>
      <text:p text:style-name="P465"><text:span text:style-name="T532">A final consideration concerns the swap filesystem, which is used as virtual memory to increase the amount of available memory on a system. The swap space is a file or partition located on disk that is used by processes when physical memory is insufficient, helping to improve overall system performance. To view the partition where swap is located and its size, you can use the </text:span><text:span text:style-name="Source_20_Text"><text:span text:style-name="T538">swapon</text:span></text:span><text:span text:style-name="T532"><text:note text:id="ftn31" text:note-class="footnote"><text:note-citation>31</text:note-citation><text:note-body><text:p text:style-name="P331"><text:span text:style-name="T539">See the</text:span><text:span text:style-name="T540"> </text:span><text:span text:style-name="T541">swapon(8)</text:span><text:span text:style-name="T542"> manaual page</text:span></text:p></text:note-body></text:note></text:span><text:span text:style-name="T532"> command.</text:span></text:p>
      <text:p text:style-name="P466"/>
      <table:table table:name="Table112" table:style-name="Table112">
        <table:table-column table:style-name="Table112.A"/>
        <table:table-row>
          <table:table-cell table:style-name="Table112.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543">swapon –show</text:span></text:p>
            <text:p text:style-name="P467">...<text:span text:style-name="T503">output...</text:span></text:p>
          </table:table-cell>
        </table:table-row>
      </table:table>
      <text:p text:style-name="P466"/>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9"><text:bookmark-start text:name="0.10"/><text:soft-page-break/>0.<text:span text:style-name="T54">8</text:span> <text:span text:style-name="T544">Documentation</text:span><text:bookmark-end text:name="0.10"/></text:p>
      <text:p text:style-name="P470"/>
      <text:p text:style-name="P471">0.<text:span text:style-name="T54">8</text:span>.1 Manual pages</text:p>
      <text:p text:style-name="P470"/>
      <text:p text:style-name="P324"><text:span text:style-name="T545">On Linux, most documentation is located in </text:span><text:span text:style-name="Source_20_Text"><text:span text:style-name="T141">/usr/share/doc</text:span></text:span><text:span text:style-name="T545"> and </text:span><text:span text:style-name="Source_20_Text"><text:span text:style-name="T141">/usr/share/man</text:span></text:span><text:span text:style-name="T545">. Debian packages that contain documentation often have the </text:span><text:span text:style-name="Source_20_Text"><text:span text:style-name="T141">-doc</text:span></text:span><text:span text:style-name="T545"> suffix, for example </text:span><text:span text:style-name="Source_20_Text"><text:span text:style-name="T141">gdb-doc</text:span></text:span><text:span text:style-name="T545">.</text:span></text:p>
      <text:p text:style-name="P324"><text:span text:style-name="T545">Manual pages are one of the most useful and important sources of information and are divided into sections. The sections are listed below (as described in the </text:span><text:span text:style-name="Source_20_Text"><text:span text:style-name="T141">man(1)</text:span></text:span><text:span text:style-name="T545"> manual page, which can be accessed using the </text:span><text:span text:style-name="Source_20_Text"><text:span text:style-name="T141">man</text:span></text:span><text:span text:style-name="Source_20_Text"><text:span text:style-name="T545"> </text:span></text:span><text:span text:style-name="Source_20_Text"><text:span text:style-name="T141">man</text:span></text:span><text:span text:style-name="T545"> command):</text:span></text:p>
      <text:p text:style-name="P470"/>
      <text:list text:style-name="L3">
        <text:list-item>
          <text:p text:style-name="P472">Executable programs and shell commands</text:p>
        </text:list-item>
        <text:list-item>
          <text:p text:style-name="P472">System calls (functions provided by the kernel)</text:p>
        </text:list-item>
        <text:list-item>
          <text:p text:style-name="P472">Library calls (functions within system libraries)</text:p>
        </text:list-item>
        <text:list-item>
          <text:p text:style-name="P473">Special files (usually found in <text:span text:style-name="T136">/dev</text:span>)</text:p>
        </text:list-item>
        <text:list-item>
          <text:p text:style-name="P473"><text:span text:style-name="T545">File formats and conventions e.g. </text:span><text:span text:style-name="T141">/etc/passwd</text:span></text:p>
        </text:list-item>
        <text:list-item>
          <text:p text:style-name="P472">Games</text:p>
        </text:list-item>
        <text:list-item>
          <text:p text:style-name="P473">Macro packages and conventions e.g. <text:span text:style-name="T136">man(7)</text:span>, <text:span text:style-name="T136">groff(7)</text:span></text:p>
        </text:list-item>
        <text:list-item>
          <text:p text:style-name="P472">Commands for system administration (usually for root only)</text:p>
        </text:list-item>
        <text:list-item>
          <text:p text:style-name="P472">Kernel Routines [Non-Standard]</text:p>
        </text:list-item>
      </text:list>
      <text:p text:style-name="P324"><text:span text:style-name="T545"/></text:p>
      <text:p text:style-name="P324"><text:span text:style-name="T546">To read the manual page </text:span><text:span text:style-name="T547">of</text:span><text:span text:style-name="T546"> the </text:span><text:span text:style-name="T141">ls</text:span><text:span text:style-name="T546"> command</text:span></text:p>
      <text:p text:style-name="P474"/>
      <table:table table:name="Table126" table:style-name="Table126">
        <table:table-column table:style-name="Table126.A"/>
        <table:table-row>
          <table:table-cell table:style-name="Table126.A1" office:value-type="string">
            <text:p text:style-name="P475"><text:span text:style-name="T103">[</text:span><text:a xlink:type="simple" xlink:href="mailto:linux@io" text:style-name="Internet_20_link" text:visited-style-name="Visited_20_Internet_20_Link"><text:span text:style-name="T103">linux@basis</text:span></text:a><text:span text:style-name="T103">] man ls</text:span></text:p>
          </table:table-cell>
        </table:table-row>
      </table:table>
      <text:p text:style-name="P474"/>
      <text:p text:style-name="P476"><text:span text:style-name="T546">To read the man</text:span><text:span text:style-name="T547">ual</text:span><text:span text:style-name="T546"> page of the </text:span><text:span text:style-name="T141">read</text:span><text:span text:style-name="T546"> </text:span><text:span text:style-name="T547">system call</text:span><text:span text:style-name="T546"> in </text:span><text:span text:style-name="T548">the </text:span><text:span text:style-name="T546">section 2</text:span></text:p>
      <text:p text:style-name="P474"/>
      <table:table table:name="Table129" table:style-name="Table129">
        <table:table-column table:style-name="Table129.A"/>
        <table:table-row>
          <table:table-cell table:style-name="Table129.A1" office:value-type="string">
            <text:p text:style-name="P477">[<text:a xlink:type="simple" xlink:href="mailto:linux@io" text:style-name="Internet_20_link" text:visited-style-name="Visited_20_Internet_20_Link">linux@basis</text:a>] man -s 2 read</text:p>
            <text:p text:style-name="P478">[<text:a xlink:type="simple" xlink:href="mailto:linux@io" text:style-name="Internet_20_link" text:visited-style-name="Visited_20_Internet_20_Link">linux@basis</text:a>] man s 2 read</text:p>
            <text:p text:style-name="P479"><text:span text:style-name="T103">[</text:span><text:a xlink:type="simple" xlink:href="mailto:linux@io" text:style-name="Internet_20_link" text:visited-style-name="Visited_20_Internet_20_Link"><text:span text:style-name="T103">linux@basis</text:span></text:a><text:span text:style-name="T103">] man 2 read</text:span></text:p>
          </table:table-cell>
        </table:table-row>
      </table:table>
      <text:p text:style-name="P480"/>
      <text:p text:style-name="P324"><text:span text:style-name="T549">To view the manual page of </text:span><text:span text:style-name="T547">the </text:span><text:span text:style-name="T141">man</text:span><text:span text:style-name="T549"> command</text:span></text:p>
      <text:p text:style-name="P474"/>
      <table:table table:name="Table131" table:style-name="Table131">
        <table:table-column table:style-name="Table131.A"/>
        <table:table-row>
          <table:table-cell table:style-name="Table131.A1" office:value-type="string">
            <text:p text:style-name="P475"><text:span text:style-name="T103">[</text:span><text:a xlink:type="simple" xlink:href="mailto:linux@io" text:style-name="Internet_20_link" text:visited-style-name="Visited_20_Internet_20_Link"><text:span text:style-name="T103">linux@basis</text:span></text:a><text:span text:style-name="T103">] man </text:span><text:span text:style-name="T550">man</text:span></text:p>
          </table:table-cell>
        </table:table-row>
      </table:table>
      <text:p text:style-name="P481"/>
      <text:p text:style-name="P482"><text:span text:style-name="T549">To view the manual page of </text:span><text:span text:style-name="T547">the </text:span><text:span text:style-name="T551">proc</text:span><text:span text:style-name="T549"> </text:span><text:span text:style-name="T547">filesystem</text:span></text:p>
      <text:p text:style-name="P483"/>
      <table:table table:name="Table23" table:style-name="Table23">
        <table:table-column table:style-name="Table23.A"/>
        <table:table-row>
          <table:table-cell table:style-name="Table23.A1" office:value-type="string">
            <text:p text:style-name="P479"><text:span text:style-name="T103">[</text:span><text:a xlink:type="simple" xlink:href="mailto:linux@io" text:style-name="Internet_20_link" text:visited-style-name="Visited_20_Internet_20_Link"><text:span text:style-name="T103">linux@basis</text:span></text:a><text:span text:style-name="T103">] man </text:span><text:span text:style-name="T552">5 proc</text:span></text:p>
          </table:table-cell>
        </table:table-row>
      </table:table>
      <text:p text:style-name="P484"/>
      <text:p text:style-name="P485"><text:span text:style-name="T553">On </text:span><text:span text:style-name="T554">D</text:span><text:span text:style-name="T553">ebian-based systems the manual pages for the commands are usually installed automatically. However, </text:span><text:span text:style-name="T554">we</text:span><text:span text:style-name="T553"> can install them via </text:span><text:span text:style-name="T136">apt</text:span><text:span text:style-name="T553">.</text:span><text:span text:style-name="T553"><text:note text:id="ftn32" text:note-class="footnote"><text:note-citation>32</text:note-citation><text:note-body><text:p text:style-name="P486"><text:span text:style-name="T555">The packages of the manual pages are available in several languages</text:span> (<text:span text:style-name="T15">manpages-de</text:span>, <text:span text:style-name="T556">manpages-fr</text:span>, etc..)</text:p></text:note-body></text:note></text:span></text:p>
      <text:p text:style-name="P485"/>
      <table:table table:name="Table16" table:style-name="Table16">
        <table:table-column table:style-name="Table16.A"/>
        <table:table-row>
          <table:table-cell table:style-name="Table16.A1" office:value-type="string">
            <text:p text:style-name="P487">[<text:a xlink:type="simple" xlink:href="mailto:linux@base" text:style-name="Internet_20_link" text:visited-style-name="Visited_20_Internet_20_Link">linux@basis</text:a>] sudo apt-get manpages</text:p>
          </table:table-cell>
        </table:table-row>
      </table:table>
      <text:p text:style-name="P485"/>
      <text:p text:style-name="P488">To install the manual pages related to the C library and the Linux API, the <text:span text:style-name="T136">manpages-dev</text:span> package must be installed.</text:p>
      <table:table table:name="Table2" table:style-name="Table2">
        <table:table-column table:style-name="Table2.A"/>
        <text:soft-page-break/>
        <table:table-row>
          <table:table-cell table:style-name="Table2.A1" office:value-type="string">
            <text:p text:style-name="P489">[<text:a xlink:type="simple" xlink:href="mailto:linux@io" text:style-name="Internet_20_link" text:visited-style-name="Visited_20_Internet_20_Link">linux@basis</text:a>] sudo apt install manpages-dev</text:p>
            <text:p text:style-name="P490">...<text:span text:style-name="T503">output...</text:span></text:p>
          </table:table-cell>
        </table:table-row>
      </table:table>
      <text:p text:style-name="P491"/>
      <text:p text:style-name="P491">To install the POSIX standard manual pages the packages are: <text:span text:style-name="T136">manpages-posix</text:span> <text:span text:style-name="T557">and</text:span> <text:span text:style-name="T136">manpages-posix-dev</text:span></text:p>
      <text:p text:style-name="P491"/>
      <table:table table:name="Table17" table:style-name="Table17">
        <table:table-column table:style-name="Table17.A"/>
        <table:table-row table:style-name="Table17.1">
          <table:table-cell table:style-name="Table17.A1" office:value-type="string">
            <text:p text:style-name="P492">[<text:a xlink:type="simple" xlink:href="mailto:linux@base" text:style-name="Internet_20_link" text:visited-style-name="Visited_20_Internet_20_Link">linux@basis</text:a>] sudo apt install manpages-posix manpages-posix-dev</text:p>
            <text:p text:style-name="P490">...<text:span text:style-name="T503">output...</text:span></text:p>
          </table:table-cell>
        </table:table-row>
      </table:table>
      <text:p text:style-name="P481"/>
      <text:p text:style-name="P493"><text:span text:style-name="T558">To read the man</text:span><text:span text:style-name="T547">ual</text:span><text:span text:style-name="T558"> page </text:span><text:span text:style-name="T547">of the</text:span><text:span text:style-name="T558"> </text:span><text:span text:style-name="T559">/etc/passwd</text:span><text:span text:style-name="T558"> file</text:span></text:p>
      <text:p text:style-name="P494"/>
      <table:table table:name="Table73" table:style-name="Table73">
        <table:table-column table:style-name="Table73.A"/>
        <table:table-row>
          <table:table-cell table:style-name="Table73.A1" office:value-type="string">
            <text:p text:style-name="P495">[<text:a xlink:type="simple" xlink:href="mailto:linux@base" text:style-name="Internet_20_link" text:visited-style-name="Visited_20_Internet_20_Link">linux@basis</text:a>] man 5 passwd</text:p>
          </table:table-cell>
        </table:table-row>
      </table:table>
      <text:p text:style-name="P494"/>
      <text:p text:style-name="P493"><text:span text:style-name="T558">To read the manual page of the </text:span><text:span text:style-name="T559">passwd</text:span><text:span text:style-name="T558"> command</text:span></text:p>
      <text:p text:style-name="P494"/>
      <table:table table:name="Table74" table:style-name="Table74">
        <table:table-column table:style-name="Table74.A"/>
        <table:table-row>
          <table:table-cell table:style-name="Table74.A1" office:value-type="string">
            <text:p text:style-name="P495">[<text:a xlink:type="simple" xlink:href="mailto:linux@base" text:style-name="Internet_20_link" text:visited-style-name="Visited_20_Internet_20_Link">linux@basis</text:a>] man passwd</text:p>
            <text:p text:style-name="P496">[<text:a xlink:type="simple" xlink:href="mailto:linux@base" text:style-name="Internet_20_link" text:visited-style-name="Visited_20_Internet_20_Link">linux@basis</text:a>] man <text:span text:style-name="T554">1</text:span> passwd</text:p>
            <text:p text:style-name="P496">[<text:a xlink:type="simple" xlink:href="mailto:linux@base" text:style-name="Internet_20_link" text:visited-style-name="Visited_20_Internet_20_Link">linux@basis</text:a>] man -<text:span text:style-name="T554">s 1</text:span> passwd</text:p>
          </table:table-cell>
        </table:table-row>
      </table:table>
      <text:p text:style-name="P494"/>
      <text:p text:style-name="P497">To read the manual page of the <text:span text:style-name="T15">/dev/tty</text:span> terminal file </text:p>
      <text:p text:style-name="P498"/>
      <table:table table:name="Table75" table:style-name="Table75">
        <table:table-column table:style-name="Table75.A"/>
        <table:table-row>
          <table:table-cell table:style-name="Table75.A1" office:value-type="string">
            <text:p text:style-name="P499">[<text:a xlink:type="simple" xlink:href="mailto:linux@base" text:style-name="Internet_20_link" text:visited-style-name="Visited_20_Internet_20_Link">linux@basis</text:a>] man <text:span text:style-name="T560">4 tty</text:span></text:p>
          </table:table-cell>
        </table:table-row>
      </table:table>
      <text:p text:style-name="P497"/>
      <text:p text:style-name="P482"><text:span text:style-name="T561">The manual page files are located in </text:span><text:span text:style-name="Source_20_Text"><text:span text:style-name="T562">/usr/share/man</text:span></text:span><text:span text:style-name="T561">. This directory contains subdirectories representing the different sections (e.g., </text:span><text:span text:style-name="Source_20_Text"><text:span text:style-name="T562">man1</text:span></text:span><text:span text:style-name="T561">, </text:span><text:span text:style-name="Source_20_Text"><text:span text:style-name="T562">man2</text:span></text:span><text:span text:style-name="T561">, etc.) as well as directories for different languages of the manual pages.</text:span></text:p>
      <text:p text:style-name="P500"/>
      <table:table table:name="Table78" table:style-name="Table78">
        <table:table-column table:style-name="Table78.A"/>
        <table:table-row>
          <table:table-cell table:style-name="Table78.A1" office:value-type="string">
            <text:p text:style-name="P501">[<text:a xlink:type="simple" xlink:href="mailto:linux@base" text:style-name="Internet_20_link" text:visited-style-name="Visited_20_Internet_20_Link">linux@basis</text:a>] <text:span text:style-name="T563">cd /usr/share/man</text:span></text:p>
            <text:p text:style-name="P501">[<text:a xlink:type="simple" xlink:href="mailto:linux@base" text:style-name="Internet_20_link" text:visited-style-name="Visited_20_Internet_20_Link">linux@basis</text:a>] <text:span text:style-name="T563">ls </text:span></text:p>
            <text:p text:style-name="P502">ca <text:s/>el <text:s/>fr <text:s text:c="11"/>hr <text:s/>ja <text:s text:c="3"/>man3 <text:s/>man7 <text:s/>pl <text:s text:c="4"/>ru <text:s/>sv <text:s/>zh_CN</text:p>
            <text:p text:style-name="P503">cs <text:s/>es <text:s/>fr.ISO8859-1 <text:s/>hu <text:s/>ko <text:s text:c="3"/>man4 <text:s/>man8 <text:s/>pt <text:s text:c="4"/>sk <text:s/>tr <text:s/>zh_TW</text:p>
            <text:p text:style-name="P503">da <text:s/>et <text:s/>fr.UTF-8 <text:s text:c="5"/>id <text:s/>man1 <text:s/>man5 <text:s/>man9 <text:s/>pt_BR <text:s/>sl <text:s/>uk</text:p>
            <text:p text:style-name="P504">de <text:s/>fi <text:s/>gl <text:s text:c="11"/>it <text:s/>man2 <text:s/>man6 <text:s/>nl <text:s text:c="3"/>ro <text:s text:c="4"/>sr <text:s/>zh</text:p>
          </table:table-cell>
        </table:table-row>
      </table:table>
      <text:p text:style-name="P497"/>
      <text:p text:style-name="P482"><text:span text:style-name="T561">The files inside these subdirectories are compressed using </text:span><text:span text:style-name="Source_20_Text"><text:span text:style-name="T562">gzip</text:span></text:span><text:span text:style-name="T561">. For example, the manual page for the </text:span><text:span text:style-name="Source_20_Text"><text:span text:style-name="T562">ls</text:span></text:span><text:span text:style-name="T561"> command is stored in the file </text:span><text:span text:style-name="Source_20_Text"><text:span text:style-name="T562">ls.1.gz</text:span></text:span><text:span text:style-name="T561">.</text:span></text:p>
      <text:p text:style-name="P505"/>
      <table:table table:name="Table79" table:style-name="Table79">
        <table:table-column table:style-name="Table79.A"/>
        <table:table-row>
          <table:table-cell table:style-name="Table79.A1" office:value-type="string">
            <text:p text:style-name="P506"><text:span text:style-name="T564">[</text:span><text:a xlink:type="simple" xlink:href="mailto:linux@base" text:style-name="Internet_20_link" text:visited-style-name="Visited_20_Internet_20_Link"><text:span text:style-name="T564">linux@basis</text:span></text:a><text:span text:style-name="T564">] </text:span><text:span text:style-name="T565">ls ls.1.gz</text:span></text:p>
            <text:p text:style-name="P507">ls.1.gz</text:p>
            <text:p text:style-name="P508"/>
          </table:table-cell>
        </table:table-row>
      </table:table>
      <text:p text:style-name="P509"/>
      <text:p text:style-name="P509"/>
      <text:p text:style-name="P509"/>
      <text:p text:style-name="P509"/>
      <text:p text:style-name="P510"><text:soft-page-break/><text:span text:style-name="T566">If we want to read </text:span><text:span text:style-name="T567">the content </text:span><text:span text:style-name="T566">we </text:span><text:span text:style-name="T547">need to decompress</text:span><text:span text:style-name="T566"> it</text:span><text:span text:style-name="T566"><text:note text:id="ftn33" text:note-class="footnote"><text:note-citation>33</text:note-citation><text:note-body><text:p text:style-name="P511"><text:span text:style-name="T568">To unzip the files in the </text:span><text:span text:style-name="T569">/usr/share/man</text:span><text:span text:style-name="T568"> we </text:span><text:span text:style-name="T554">need </text:span><text:span text:style-name="T568">to use </text:span><text:span text:style-name="T569">sudo</text:span><text:span text:style-name="T568"> </text:span></text:p></text:note-body></text:note></text:span></text:p>
      <text:p text:style-name="P505"/>
      <table:table table:name="Table80" table:style-name="Table80">
        <table:table-column table:style-name="Table80.A"/>
        <table:table-row>
          <table:table-cell table:style-name="Table80.A1" office:value-type="string">
            <text:p text:style-name="P506"><text:span text:style-name="T564">[</text:span><text:a xlink:type="simple" xlink:href="mailto:linux@base" text:style-name="Internet_20_link" text:visited-style-name="Visited_20_Internet_20_Link"><text:span text:style-name="T564">linux@basis</text:span></text:a><text:span text:style-name="T564">] </text:span><text:span text:style-name="T570">sudo gunzip</text:span><text:span text:style-name="T565"> ls.1.gz</text:span></text:p>
            <text:p text:style-name="P512"><text:span text:style-name="T571">[</text:span><text:a xlink:type="simple" xlink:href="mailto:linux@base" text:style-name="Internet_20_link" text:visited-style-name="Visited_20_Internet_20_Link"><text:span text:style-name="T571">linux@basis</text:span></text:a><text:span text:style-name="T571">] </text:span><text:span text:style-name="T568">ls ls.1</text:span></text:p>
            <text:p text:style-name="P512">ls.1</text:p>
            <text:p text:style-name="P512"/>
          </table:table-cell>
        </table:table-row>
      </table:table>
      <text:p text:style-name="P513"/>
      <text:p text:style-name="P510"><text:span text:style-name="T572">The file is in the </text:span><text:span text:style-name="T562">troff</text:span><text:span text:style-name="T573"><text:note text:id="ftn34" text:note-class="footnote"><text:note-citation>34</text:note-citation><text:note-body><text:p text:style-name="P514"><text:span text:style-name="T574">troff</text:span><text:span text:style-name="T575"> is a program to format documents created with </text:span><text:span text:style-name="T574">roff</text:span><text:span text:style-name="T575">, </text:span><text:span text:style-name="T576">which </text:span><text:span text:style-name="T575">is a system used by GNU to deal with documents and typesetting, See the manual page </text:span><text:span text:style-name="T577">roff(7),</text:span><text:span text:style-name="T575"> </text:span><text:span text:style-name="T577">troff(</text:span><text:span text:style-name="T578">1</text:span><text:span text:style-name="T577">), </text:span><text:span text:style-name="T579">groff(</text:span><text:span text:style-name="T580">1</text:span><text:span text:style-name="T579">)</text:span></text:p></text:note-body></text:note></text:span><text:span text:style-name="T572"> format, </text:span><text:span text:style-name="T547">therefore, </text:span><text:span text:style-name="T572">to read it </text:span><text:span text:style-name="T581">need </text:span><text:span text:style-name="T572">to use the </text:span><text:span text:style-name="T562">man</text:span><text:span text:style-name="T572"> tool </text:span></text:p>
      <text:p text:style-name="P513"/>
      <table:table table:name="Table81" table:style-name="Table81">
        <table:table-column table:style-name="Table81.A"/>
        <table:table-row>
          <table:table-cell table:style-name="Table81.A1" office:value-type="string">
            <text:p text:style-name="P515"><text:span text:style-name="T571">[</text:span><text:a xlink:type="simple" xlink:href="mailto:linux@base" text:style-name="Internet_20_link" text:visited-style-name="Visited_20_Internet_20_Link"><text:span text:style-name="T571">linux@basis</text:span></text:a><text:span text:style-name="T571">] </text:span><text:span text:style-name="T582">man ./</text:span><text:span text:style-name="T568">ls.1</text:span></text:p>
            <text:p text:style-name="P516"><text:span text:style-name="T583">…</text:span><text:span text:style-name="T584">output…</text:span></text:p>
          </table:table-cell>
        </table:table-row>
      </table:table>
      <text:p text:style-name="P517"/>
      <text:p text:style-name="P510"><text:span text:style-name="T585">Another way is to use the </text:span><text:span text:style-name="T562">groff</text:span><text:span text:style-name="T585"> utility, </text:span><text:span text:style-name="T581">which</text:span><text:span text:style-name="T585"> can read the GNU </text:span><text:span text:style-name="T562">roff</text:span><text:span text:style-name="T585"> format</text:span></text:p>
      <text:p text:style-name="P518"/>
      <table:table table:name="Table82" table:style-name="Table82">
        <table:table-column table:style-name="Table82.A"/>
        <table:table-row>
          <table:table-cell table:style-name="Table82.A1" office:value-type="string">
            <text:p text:style-name="P519"><text:span text:style-name="T571">[</text:span><text:a xlink:type="simple" xlink:href="mailto:linux@basis" text:style-name="Internet_20_link" text:visited-style-name="Visited_20_Internet_20_Link"><text:span text:style-name="T571">linux@basis</text:span></text:a><text:span text:style-name="T571">] </text:span><text:span text:style-name="T586">sudo apt install </text:span><text:span text:style-name="T571">groff</text:span></text:p>
            <text:p text:style-name="P520">…<text:span text:style-name="T587">output…</text:span></text:p>
            <text:p text:style-name="P519"/>
            <text:p text:style-name="P521"><text:span text:style-name="T571">[</text:span><text:a xlink:type="simple" xlink:href="mailto:linux@basis" text:style-name="Internet_20_link" text:visited-style-name="Visited_20_Internet_20_Link"><text:span text:style-name="T571">linux@basis</text:span></text:a><text:span text:style-name="T571">] groff -man -T utf8 ls.1 | less -R:</text:span><text:span text:style-name="T568">ls.1</text:span></text:p>
            <text:p text:style-name="P519"><text:span text:style-name="T583">…</text:span><text:span text:style-name="T584">output…</text:span></text:p>
          </table:table-cell>
        </table:table-row>
      </table:table>
      <text:p text:style-name="P522"/>
      <text:p text:style-name="P510"><text:span text:style-name="T585">If we want to obtain a PDF version of the manual page, we can execute the following command</text:span><text:note text:id="ftn35" text:note-class="footnote"><text:note-citation>35</text:note-citation><text:note-body><text:p text:style-name="P523">This <text:span text:style-name="T588">command </text:span>creates a PDF file inside the user home folder </text:p></text:note-body></text:note></text:p>
      <text:p text:style-name="P524"/>
      <table:table table:name="Table83" table:style-name="Table83">
        <table:table-column table:style-name="Table83.A"/>
        <table:table-row>
          <table:table-cell table:style-name="Table83.A1" office:value-type="string">
            <text:p text:style-name="P525"><text:span text:style-name="T571">[</text:span><text:a xlink:type="simple" xlink:href="mailto:linux@basis" text:style-name="Internet_20_link" text:visited-style-name="Visited_20_Internet_20_Link"><text:span text:style-name="T571">linux@basis</text:span></text:a><text:span text:style-name="T571">] man -l -Tpdf ls.1 &gt; ~/ls.pdf</text:span></text:p>
            <text:p text:style-name="P525"/>
          </table:table-cell>
        </table:table-row>
      </table:table>
      <text:p text:style-name="P526"/>
      <text:p text:style-name="P527">We can convert the manual page into a PDF also without unzipping the file</text:p>
      <text:p text:style-name="P528"/>
      <table:table table:name="Table84" table:style-name="Table84">
        <table:table-column table:style-name="Table84.A"/>
        <table:table-row>
          <table:table-cell table:style-name="Table84.A1" office:value-type="string">
            <text:p text:style-name="P529"><text:span text:style-name="T571">[</text:span><text:a xlink:type="simple" xlink:href="mailto:linux@basis" text:style-name="Internet_20_link" text:visited-style-name="Visited_20_Internet_20_Link"><text:span text:style-name="T571">linux@basis</text:span></text:a><text:span text:style-name="T571">] man -l -Tpdf ls.1 &gt; ~/ls.pdf</text:span></text:p>
            <text:p text:style-name="P529"/>
          </table:table-cell>
        </table:table-row>
      </table:table>
      <text:p text:style-name="P528"/>
      <text:p text:style-name="P530">HelpMan is a graphical user interface that allows users to select a section in order to browse and find manual pages.</text:p>
      <text:p text:style-name="P531"/>
      <text:p text:style-name="P532">We can install it using apt</text:p>
      <text:p text:style-name="P533"/>
      <table:table table:name="Table43" table:style-name="Table43">
        <table:table-column table:style-name="Table43.A"/>
        <table:table-row>
          <table:table-cell table:style-name="Table43.A1" office:value-type="string">
            <text:p text:style-name="P516"><text:span text:style-name="T571">[</text:span><text:a xlink:type="simple" xlink:href="mailto:linux@basis" text:style-name="Internet_20_link" text:visited-style-name="Visited_20_Internet_20_Link"><text:span text:style-name="T571">linux@basis</text:span></text:a><text:span text:style-name="T571">] </text:span><text:span text:style-name="T576">sudo apt install helpman</text:span></text:p>
            <text:p text:style-name="P516"><text:span text:style-name="T583">…</text:span><text:span text:style-name="T584">output…</text:span></text:p>
          </table:table-cell>
        </table:table-row>
      </table:table>
      <text:p text:style-name="P533"/>
      <text:p text:style-name="P534"/>
      <text:p text:style-name="P534"/>
      <text:p text:style-name="P534"/>
      <text:p text:style-name="P534"/>
      <text:p text:style-name="P534"/>
      <text:p text:style-name="P530"><draw:frame draw:style-name="fr3" draw:name="Image3" text:anchor-type="char" svg:x="0.7311in" svg:y="0.0862in" svg:width="5.0126in" svg:height="4.4181in" draw:z-index="3"><draw:image xlink:href="Pictures/10000001000003980000032BC3ADE2CE.png" xlink:type="simple" xlink:show="embed" xlink:actuate="onLoad" draw:mime-type="image/png"/></draw:frame><text:soft-page-break/></text:p>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4"/>
      <text:p text:style-name="P535"><text:span text:style-name="T441">Fig </text:span><text:span text:style-name="T470">4</text:span><text:span text:style-name="T441">. </text:span><text:span text:style-name="T589">HelpMan</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6"><text:soft-page-break/><text:span text:style-name="T78">0.</text:span><text:span text:style-name="T54">8</text:span><text:span text:style-name="T78">.2 </text:span><text:span text:style-name="T590">whatis</text:span></text:p>
      <text:p text:style-name="P537"/>
      <text:p text:style-name="P538"><text:span text:style-name="Source_20_Text"><text:span text:style-name="T141">whatis</text:span></text:span><text:span text:style-name="Source_20_Text"><text:span text:style-name="T141"><text:note text:id="ftn36" text:note-class="footnote"><text:note-citation>36</text:note-citation><text:note-body><text:p text:style-name="P539"><text:span text:style-name="T591"><text:s text:c="2"/></text:span><text:span text:style-name="T592">See the </text:span><text:span text:style-name="T593"><text:s/></text:span><text:span text:style-name="T594">whatis(1)</text:span><text:span text:style-name="T595"> m</text:span><text:span text:style-name="T593">an</text:span><text:span text:style-name="T592">ual</text:span><text:span text:style-name="T593"> </text:span><text:span text:style-name="T591">page</text:span></text:p></text:note-body></text:note></text:span></text:span><text:span text:style-name="T596"> is a command-line utility that displays a short description of a command taken from its manual page.</text:span></text:p>
      <text:p text:style-name="P540"/>
      <table:table table:name="Table135" table:style-name="Table135">
        <table:table-column table:style-name="Table135.A"/>
        <table:table-row>
          <table:table-cell table:style-name="Table135.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597">whatis </text:span><text:span text:style-name="T598">ls</text:span></text:p>
            <text:p text:style-name="P82">ls (1) <text:s text:c="14"/>- list directory contents</text:p>
            <text:p text:style-name="P82">ls (1posix) <text:s text:c="5"/>- list directory contents</text:p>
          </table:table-cell>
        </table:table-row>
      </table:table>
      <text:p text:style-name="P541"/>
      <text:p text:style-name="P541">The number in parentheses corresponds to the manual section in which the program’s manual page is found.</text:p>
      <text:p text:style-name="P542"/>
      <text:p text:style-name="P543"><text:span text:style-name="T599">0.</text:span><text:span text:style-name="T600">8</text:span><text:span text:style-name="T599">.3 </text:span><text:span text:style-name="T601">info</text:span></text:p>
      <text:p text:style-name="P544"/>
      <text:p text:style-name="P544"><text:span text:style-name="T602">The </text:span><text:span text:style-name="T136">info</text:span><text:span text:style-name="T136"><text:note text:id="ftn37" text:note-class="footnote"><text:note-citation>37</text:note-citation><text:note-body><text:p text:style-name="P545"><text:span text:style-name="T591"><text:s text:c="2"/></text:span><text:span text:style-name="T592">See the </text:span><text:span text:style-name="T591"><text:s/></text:span><text:span text:style-name="T15">info(1)</text:span><text:span text:style-name="T592"> m</text:span>an<text:span text:style-name="T592">ual</text:span> <text:span text:style-name="T591">page </text:span></text:p></text:note-body></text:note></text:span> <text:span text:style-name="T602">program is a navigable document</text:span><text:span text:style-name="T603">ation</text:span><text:span text:style-name="T602"> viewer.</text:span></text:p>
      <text:p text:style-name="P540"/>
      <table:table table:name="Table136" table:style-name="Table136">
        <table:table-column table:style-name="Table136.A"/>
        <table:table-row>
          <table:table-cell table:style-name="Table136.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04">info</text:span><text:span text:style-name="T597"> </text:span><text:span text:style-name="T605">ls</text:span></text:p>
            <text:p text:style-name="P546">terminal screen <text:span text:style-name="T603">of</text:span> info...</text:p>
          </table:table-cell>
        </table:table-row>
      </table:table>
      <text:p text:style-name="P547"/>
      <text:p text:style-name="P543"><text:span text:style-name="T599">0.</text:span><text:span text:style-name="T600">8</text:span><text:span text:style-name="T599">.4 </text:span><text:span text:style-name="T601">apropos</text:span></text:p>
      <text:p text:style-name="P547"/>
      <text:p text:style-name="P547"><text:span text:style-name="T606">The</text:span> <text:span text:style-name="T136">apropos</text:span><text:span text:style-name="T136"><text:note text:id="ftn38" text:note-class="footnote"><text:note-citation>38</text:note-citation><text:note-body><text:p text:style-name="P545"><text:s text:c="2"/><text:span text:style-name="T592">See the </text:span><text:span text:style-name="T591"><text:s/></text:span><text:span text:style-name="T15">apropos(1)</text:span><text:span text:style-name="T592"> m</text:span>an<text:span text:style-name="T592">ual</text:span> <text:span text:style-name="T591">page</text:span></text:p></text:note-body></text:note></text:span> <text:span text:style-name="T606">program take</text:span><text:span text:style-name="T603">s</text:span><text:span text:style-name="T606"> a string as input and displays all manual pages related to that string.</text:span></text:p>
      <text:p text:style-name="P547"/>
      <table:table table:name="Table137" table:style-name="Table137">
        <table:table-column table:style-name="Table137.A"/>
        <table:table-row>
          <table:table-cell table:style-name="Table137.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07">apropos </text:span><text:span text:style-name="T598">bash</text:span></text:p>
            <text:p text:style-name="P82">bash (1) <text:s text:c="17"/>- GNU Bourne-Again SHell</text:p>
            <text:p text:style-name="P82">bash-builtins (7) <text:s text:c="3"/>- bash built-in commands, see bash(1)</text:p>
            <text:p text:style-name="P82">bashbug (1) <text:s text:c="10"/>- report a bug in bash</text:p>
            <text:p text:style-name="P82">builtins (7) <text:s text:c="12"/>- bash built-in commands, see bash(1)</text:p>
          </table:table-cell>
        </table:table-row>
      </table:table>
      <text:p text:style-name="P548"/>
      <text:p text:style-name="P549"/>
      <text:p text:style-name="P550"><text:span text:style-name="T78">0.</text:span><text:span text:style-name="T54">8</text:span><text:span text:style-name="T78">.5 </text:span><text:span text:style-name="T608">The</text:span><text:span text:style-name="T78"> </text:span><text:span text:style-name="T609">g</text:span><text:span text:style-name="T83">libc</text:span> <text:span text:style-name="T608">d</text:span><text:span text:style-name="T610">ocumentation</text:span></text:p>
      <text:p text:style-name="P551"/>
      <text:p text:style-name="P324"><text:span text:style-name="T611">The</text:span><text:span text:style-name="T612"> </text:span><text:span text:style-name="T611">glibc </text:span><text:span text:style-name="T612">documentation can be installed using </text:span><text:span text:style-name="T141">apt</text:span><text:span text:style-name="T611">.</text:span></text:p>
      <text:p text:style-name="P548"/>
      <table:table table:name="Table138" table:style-name="Table138">
        <table:table-column table:style-name="Table138.A"/>
        <table:table-row>
          <table:table-cell table:style-name="Table138.A1" office:value-type="string">
            <text:p text:style-name="P552"><text:span text:style-name="T103">[</text:span><text:a xlink:type="simple" xlink:href="mailto:linux@io" text:style-name="Internet_20_link" text:visited-style-name="Visited_20_Internet_20_Link"><text:span text:style-name="T103">linux@basis</text:span></text:a><text:span text:style-name="T103">] sudo apt install </text:span><text:span text:style-name="T613">glibc-doc glibc-doc-reference</text:span></text:p>
            <text:p text:style-name="P553">...<text:span text:style-name="T603">output</text:span>...</text:p>
          </table:table-cell>
        </table:table-row>
      </table:table>
      <text:p text:style-name="P554"/>
      <text:p text:style-name="P554">Once installed, the documentation files are located in the directory</text:p>
      <text:p text:style-name="P336"/>
      <text:p text:style-name="P336"><text:tab/>/usr/sha<text:span text:style-name="T614">r</text:span>e/doc/glibc-doc-reference</text:p>
      <text:p text:style-name="P548"/>
      <text:p text:style-name="P324"><text:span text:style-name="T612">To read the documentation for a header file, you can pass the header file name to </text:span><text:span text:style-name="Source_20_Text"><text:span text:style-name="T141">man</text:span></text:span></text:p>
      <text:p text:style-name="P548"/>
      <table:table table:name="Table139" table:style-name="Table139">
        <table:table-column table:style-name="Table139.A"/>
        <table:table-row>
          <table:table-cell table:style-name="Table139.A1" office:value-type="string">
            <text:p text:style-name="P555"><text:span text:style-name="T103">[</text:span><text:a xlink:type="simple" xlink:href="mailto:linux@io" text:style-name="Internet_20_link" text:visited-style-name="Visited_20_Internet_20_Link"><text:span text:style-name="T103">linux@basis</text:span></text:a><text:span text:style-name="T103">] man stdio.h</text:span></text:p>
          </table:table-cell>
        </table:table-row>
      </table:table>
      <text:p text:style-name="P556"><text:soft-page-break/><text:s/><text:bookmark-start text:name="0.11"/><text:span text:style-name="T615">0</text:span><text:span text:style-name="T616">.</text:span><text:span text:style-name="T324">9</text:span><text:span text:style-name="T616"> </text:span><text:span text:style-name="T617">The source code</text:span><text:bookmark-end text:name="0.11"/></text:p>
      <text:p text:style-name="P448"/>
      <text:p text:style-name="P557"><text:span text:style-name="T618">The Linux kernel code is downloadable from </text:span><text:a xlink:type="simple" xlink:href="http://www.kernel.org/" text:style-name="Internet_20_link" text:visited-style-name="Visited_20_Internet_20_Link"><text:span text:style-name="T618">www.kernel.org</text:span></text:a><text:span text:style-name="T618"> or on </text:span><text:span text:style-name="T619">D</text:span><text:span text:style-name="T618">ebian-based systems it is installable via </text:span><text:span text:style-name="T141">apt</text:span><text:span text:style-name="T618">.</text:span></text:p>
      <text:p text:style-name="P558"/>
      <table:table table:name="Table140" table:style-name="Table140">
        <table:table-column table:style-name="Table140.A"/>
        <table:table-row>
          <table:table-cell table:style-name="Table140.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20">sudo apt install linux-source</text:span></text:p>
            <text:p text:style-name="P559">...<text:span text:style-name="T621">output...</text:span></text:p>
          </table:table-cell>
        </table:table-row>
      </table:table>
      <text:p text:style-name="P560"/>
      <text:p text:style-name="P324"><text:span text:style-name="T618">Once installed, it is located in the </text:span><text:span text:style-name="T141">/usr/src</text:span><text:span text:style-name="T618"> directory in compressed format, so it must be </text:span><text:span text:style-name="T619">de</text:span><text:span text:style-name="T618">compressed and extracted.</text:span></text:p>
      <text:p text:style-name="P560"/>
      <table:table table:name="Table141" table:style-name="Table141">
        <table:table-column table:style-name="Table141.A"/>
        <table:table-row>
          <table:table-cell table:style-name="Table141.A1" office:value-type="string">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22">cd /usr/src</text:span></text:p>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23">sudo </text:span><text:span text:style-name="T622">unxz linux-source-</text:span><text:span text:style-name="T624">5.16</text:span><text:span text:style-name="T622">.tar.xz</text:span></text:p>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23">sudo </text:span><text:span text:style-name="T622">tar </text:span><text:span text:style-name="T625">xvf linux-source-</text:span><text:span text:style-name="T624">5.16</text:span><text:span text:style-name="T625">.tar</text:span></text:p>
            <text:p text:style-name="P561">...<text:span text:style-name="T621">output...</text:span></text:p>
          </table:table-cell>
        </table:table-row>
      </table:table>
      <text:p text:style-name="P560"/>
      <text:p text:style-name="P562"><text:span text:style-name="T626">Once extracted, the kernel source code can be found in the newly created directory </text:span><text:span text:style-name="T141">linux-source-5.16</text:span><text:span text:style-name="T626">.</text:span></text:p>
      <text:p text:style-name="P563"/>
      <table:table table:name="Table21" table:style-name="Table21">
        <table:table-column table:style-name="Table21.A"/>
        <table:table-row>
          <table:table-cell table:style-name="Table21.A1" office:value-type="string">
            <text:p text:style-name="P564">[<text:a xlink:type="simple" xlink:href="mailto:linux@base" text:style-name="Internet_20_link" text:visited-style-name="Visited_20_Internet_20_Link">linux@basis</text:a>] <text:span text:style-name="T627">cd linux-source-5.16</text:span></text:p>
            <text:p text:style-name="P565">[<text:a xlink:type="simple" xlink:href="mailto:linux@base" text:style-name="Internet_20_link" text:visited-style-name="Visited_20_Internet_20_Link">linux@basis</text:a>] ls </text:p>
            <text:p text:style-name="P566"><text:span text:style-name="T628">arch <text:s text:c="4"/></text:span><text:span text:style-name="T629">CREDITS</text:span><text:span text:style-name="T628"> <text:s text:c="7"/>fs <text:s text:c="6"/></text:span><text:span text:style-name="T630">Kbuild</text:span><text:span text:style-name="T628"> <text:s text:c="2"/></text:span><text:span text:style-name="T630">LICENSES</text:span><text:span text:style-name="T628"> <text:s text:c="4"/>net <text:s text:c="5"/>security <text:s/>virt</text:span></text:p>
            <text:p text:style-name="P566"><text:span text:style-name="T631">block <text:s text:c="3"/>crypto <text:s text:c="8"/>include <text:s/></text:span><text:span text:style-name="T630">Kconfig</text:span><text:span text:style-name="T631"> <text:s/></text:span><text:span text:style-name="T630">MAINTAINERS</text:span><text:span text:style-name="T631"> <text:s/></text:span><text:span text:style-name="T630">README</text:span><text:span text:style-name="T631"> <text:s text:c="2"/>sound</text:span></text:p>
            <text:p text:style-name="P566"><text:span text:style-name="T631">certs <text:s text:c="3"/>Documentation <text:s/>init <text:s text:c="4"/>kernel <text:s text:c="2"/></text:span><text:span text:style-name="T630">Makefile</text:span><text:span text:style-name="T631"> <text:s text:c="4"/>samples <text:s/>tools</text:span></text:p>
            <text:p text:style-name="P566"><text:span text:style-name="T630">COPYING</text:span><text:span text:style-name="T631"> <text:s/>drivers <text:s text:c="7"/>ipc <text:s text:c="5"/>lib <text:s text:c="5"/>mm <text:s text:c="10"/>scripts <text:s/>usr</text:span></text:p>
          </table:table-cell>
        </table:table-row>
      </table:table>
      <text:p text:style-name="P567"/>
      <text:p text:style-name="P562"><text:span text:style-name="T632">Most Linux distributions provide kernel header files in a separate package that can be installed on </text:span><text:span text:style-name="T633">D</text:span><text:span text:style-name="T632">ebian-based systems via </text:span><text:span text:style-name="T141">apt</text:span><text:span text:style-name="T632">. You can use the package manager to find the package corresponding to your kernel version</text:span><text:span text:style-name="T634">.</text:span><text:span text:style-name="T634"><text:note text:id="ftn39" text:note-class="footnote"><text:note-citation>39</text:note-citation><text:note-body><text:p text:style-name="P568"><text:span text:style-name="T635">The </text:span>Kernel header files are distributed by Linux distributions in a separate package from the kernel source package</text:p></text:note-body></text:note></text:span><text:span text:style-name="T636"> </text:span></text:p>
      <text:p text:style-name="P569"/>
      <table:table table:name="Table22" table:style-name="Table22">
        <table:table-column table:style-name="Table22.A"/>
        <table:table-row>
          <table:table-cell table:style-name="Table22.A1" office:value-type="string">
            <text:p text:style-name="P570">[<text:a xlink:type="simple" xlink:href="mailto:linux@base" text:style-name="Internet_20_link" text:visited-style-name="Visited_20_Internet_20_Link">linux@basis</text:a>] sudo apt-cache search linux-headers</text:p>
            <text:p text:style-name="P570">linux-headers-5.16.0-kali7-amd64 - Header files for Linux 5.16.0-kali7-amd64</text:p>
            <text:p text:style-name="P570">linux-headers-5.16.0-kali7-cloud-amd64 - Header files for Linux 5.16.0-kali7-cloud-amd64</text:p>
            <text:p text:style-name="P570">linux-headers-5.16.0-kali7-common - Common header files for Linux 5.16.0-kali7</text:p>
            <text:p text:style-name="P561">...<text:span text:style-name="T621">output...</text:span></text:p>
            <text:p text:style-name="P570"/>
            <text:p text:style-name="P571"><text:span text:style-name="T102">[</text:span><text:a xlink:type="simple" xlink:href="mailto:linux@io" text:style-name="Internet_20_link" text:visited-style-name="Visited_20_Internet_20_Link"><text:span text:style-name="T102">linux@basis</text:span></text:a><text:span text:style-name="T102">] </text:span><text:span text:style-name="T637">sudo apt install linux-headers-</text:span><text:span text:style-name="T638">5.16.</text:span><text:span text:style-name="T639">0-kali7-amd64</text:span></text:p>
          </table:table-cell>
        </table:table-row>
      </table:table>
      <text:p text:style-name="P448"/>
      <text:p text:style-name="P572">The package containing the headers is downloaded into the directory <text:span text:style-name="T15">/usr/src</text:span>.</text:p>
      <text:p text:style-name="P572"/>
      <text:p text:style-name="P573"><text:span text:style-name="T640">As for the source code of software used in Debian-based distributions, it can be downloaded from the corresponding mirrors. To obtain these sources, you need to add or uncomment the </text:span><text:span text:style-name="Source_20_Text"><text:span text:style-name="T641">deb-src</text:span></text:span><text:span text:style-name="Source_20_Text"><text:span text:style-name="T640"><text:note text:id="ftn40" text:note-class="footnote"><text:note-citation>40</text:note-citation><text:note-body><text:p text:style-name="P574"><text:span text:style-name="T642">Visit the url </text:span><text:a xlink:type="simple" xlink:href="https://wiki.debian.org/it/SourcesList" text:style-name="Internet_20_link" text:visited-style-name="Visited_20_Internet_20_Link"><text:span text:style-name="T643">https://wiki.debian.org/it/SourcesList</text:span></text:a><text:span text:style-name="T643"> </text:span></text:p></text:note-body></text:note></text:span></text:span><text:span text:style-name="T640"> entries in the </text:span><text:span text:style-name="Source_20_Text"><text:span text:style-name="T641">/etc/apt/sources.list</text:span></text:span><text:span text:style-name="T640"> file.</text:span></text:p>
      <text:p text:style-name="P572"/>
      <text:p text:style-name="P575"/>
      <text:p text:style-name="P576"><text:span text:style-name="T644">Example of </text:span><text:span text:style-name="T141">sources.list</text:span><text:span text:style-name="T644"> configured to download program sources.</text:span></text:p>
      <table:table table:name="Table18" table:style-name="Table18">
        <table:table-column table:style-name="Table18.A"/>
        <text:soft-page-break/>
        <table:table-row>
          <table:table-cell table:style-name="Table18.A1" office:value-type="string">
            <text:p text:style-name="P577">deb http://http.kali.org/kali kali-rolling main contrib non-free</text:p>
            <text:p text:style-name="P577">deb-src http://http.kali.org/kali kali-rolling main contrib non-free</text:p>
          </table:table-cell>
        </table:table-row>
      </table:table>
      <text:p text:style-name="P575"/>
      <text:p text:style-name="P578">The first line represents the mirror for downloading programs, the second <text:span text:style-name="T645">line the mirror </text:span>for downloading sources.</text:p>
      <text:p text:style-name="P578">Once mirror<text:span text:style-name="T645">s</text:span> ha<text:span text:style-name="T645">ve</text:span> been configured, the source packages can be installed</text:p>
      <text:p text:style-name="P579"/>
      <table:table table:name="Table143" table:style-name="Table143">
        <table:table-column table:style-name="Table143.A"/>
        <table:table-row>
          <table:table-cell table:style-name="Table143.A1" office:value-type="string">
            <text:p text:style-name="P580"><text:span text:style-name="T102">[</text:span><text:a xlink:type="simple" xlink:href="mailto:linux@base" text:style-name="Internet_20_link" text:visited-style-name="Visited_20_Internet_20_Link"><text:span text:style-name="T103">linux@basis</text:span></text:a><text:span text:style-name="T103">] sudo apt-get update</text:span></text:p>
            <text:p text:style-name="P581">...output…</text:p>
            <text:p text:style-name="P582"/>
            <text:p text:style-name="P86"><text:span text:style-name="T102">[</text:span><text:a xlink:type="simple" xlink:href="mailto:linux@io" text:style-name="Internet_20_link" text:visited-style-name="Visited_20_Internet_20_Link"><text:span text:style-name="T102">linux@basis</text:span></text:a><text:span text:style-name="T102">] </text:span><text:span text:style-name="T646">sudo apt-get source bash</text:span></text:p>
            <text:p text:style-name="P583">...output...</text:p>
          </table:table-cell>
        </table:table-row>
      </table:table>
      <text:p text:style-name="P579"/>
      <text:p text:style-name="P584">Packages are downloaded in compressed format <text:span text:style-name="T645">in the</text:span> current directory</text:p>
      <text:p text:style-name="P90"/>
      <table:table table:name="Table19" table:style-name="Table19">
        <table:table-column table:style-name="Table19.A"/>
        <table:table-row>
          <table:table-cell table:style-name="Table19.A1" office:value-type="string">
            <text:p text:style-name="P585">[<text:a xlink:type="simple" xlink:href="mailto:linux@base" text:style-name="Internet_20_link" text:visited-style-name="Visited_20_Internet_20_Link">linux@basis</text:a>] ls </text:p>
            <text:p text:style-name="P586"><text:span text:style-name="T647">bash-5.1</text:span><text:span text:style-name="T648"> <text:s text:c="2"/></text:span><text:span text:style-name="T649">bash_5.1-6.debian.tar.xz</text:span><text:span text:style-name="T648"> <text:s text:c="2"/>bash_5.1-6.dsc <text:s text:c="2"/></text:span><text:span text:style-name="T650">bash_5.1.orig.tar.xz</text:span></text:p>
          </table:table-cell>
        </table:table-row>
      </table:table>
      <text:p text:style-name="P584"/>
      <text:p text:style-name="P576"><text:span text:style-name="T651">In the case of source packages, </text:span><text:span text:style-name="Source_20_Text"><text:span text:style-name="T141">apt</text:span></text:span><text:span text:style-name="T651"> downloads the files and then extracts their contents. The directory contains a folder with the source code (</text:span><text:span text:style-name="Source_20_Text"><text:span text:style-name="T141">bash-5.1</text:span></text:span><text:span text:style-name="T651">), a Debian-specific package for your operating system (</text:span><text:span text:style-name="Source_20_Text"><text:span text:style-name="T141">bash_5.1-6.debian.tar.xz</text:span></text:span><text:span text:style-name="T651">), a file containing the package checksums and metadata (</text:span><text:span text:style-name="Source_20_Text"><text:span text:style-name="T141">bash_5.1-6.dsc</text:span></text:span><text:span text:style-name="T651">), and the archive with the original upstream source code (</text:span><text:span text:style-name="Source_20_Text"><text:span text:style-name="T141">bash_5.1.orig.tar.xz</text:span></text:span><text:span text:style-name="T651">).</text:span></text:p>
      <text:p text:style-name="P587"/>
      <text:p text:style-name="P588">The source files of the software are present in the decompressed folder.</text:p>
      <text:p text:style-name="P589"/>
      <table:table table:name="Table20" table:style-name="Table20">
        <table:table-column table:style-name="Table20.A"/>
        <table:table-row>
          <table:table-cell table:style-name="Table20.A1" office:value-type="string">
            <text:p text:style-name="P590">[<text:a xlink:type="simple" xlink:href="mailto:linux@base" text:style-name="Internet_20_link" text:visited-style-name="Visited_20_Internet_20_Link">linux@basis</text:a>] cd bash-5.1</text:p>
            <text:p text:style-name="P590">[<text:a xlink:type="simple" xlink:href="mailto:linux@base" text:style-name="Internet_20_link" text:visited-style-name="Visited_20_Internet_20_Link">linux@basis</text:a> ~/bash-5.1] ls</text:p>
            <text:p text:style-name="P591">ABOUT-NLS <text:s text:c="3"/>command.h <text:s text:c="5"/>findcmd.h <text:s text:c="3"/>mksyntax.c <text:s text:c="5"/>sig.h</text:p>
            <text:p text:style-name="P592">aclocal.m4 <text:s text:c="2"/>COMPAT <text:s text:c="8"/>flags.c <text:s text:c="5"/>NEWS <text:s text:c="11"/>siglist.c</text:p>
            <text:p text:style-name="P592">alias.c <text:s text:c="5"/>config-bot.h <text:s text:c="2"/>flags.h <text:s text:c="5"/>nojobs.c <text:s text:c="7"/>siglist.h</text:p>
            <text:p text:style-name="P592">alias.h <text:s text:c="5"/>config.h.in <text:s text:c="3"/>general.c <text:s text:c="3"/>NOTES <text:s text:c="10"/>stringlib.c</text:p>
            <text:p text:style-name="P592">array.c <text:s text:c="5"/>config-top.h <text:s text:c="2"/>general.h <text:s text:c="3"/>parser-built <text:s text:c="3"/>subst.c</text:p>
            <text:p text:style-name="P592">arrayfunc.c <text:s/><text:span text:style-name="T354">configure</text:span> <text:s text:c="5"/>hashcmd.c <text:s text:c="3"/>parser.h <text:s text:c="7"/>subst.h</text:p>
            <text:p text:style-name="Preformatted_20_Text"><text:span text:style-name="T124">arrayfunc.h <text:s/>configure.ac <text:s text:c="2"/>hashcmd.h <text:s text:c="3"/>parse.y <text:s text:c="8"/></text:span><text:span text:style-name="T631">support</text:span></text:p>
            <text:p text:style-name="P592">array.h <text:s text:c="5"/>conftypes.h <text:s text:c="3"/>hashlib.c <text:s text:c="3"/>patchlevel.h <text:s text:c="3"/>syntax.h</text:p>
            <text:p text:style-name="P592">assoc.c <text:s text:c="5"/>copy_cmd.c <text:s text:c="4"/>hashlib.h <text:s text:c="3"/>pathexp.c <text:s text:c="6"/>test.c</text:p>
            <text:p text:style-name="Preformatted_20_Text"><text:span text:style-name="T124">assoc.h <text:s text:c="5"/>COPYING <text:s text:c="7"/></text:span><text:span text:style-name="T631">include</text:span><text:span text:style-name="T124"> <text:s text:c="5"/>pathexp.h <text:s text:c="6"/>test.h</text:span></text:p>
            <text:p text:style-name="Preformatted_20_Text"><text:span text:style-name="T124">AUTHORS <text:s text:c="5"/></text:span><text:span text:style-name="T631">cross-build</text:span><text:span text:style-name="T124"> <text:s text:c="3"/>input.c <text:s text:c="5"/>pathnames.h.in <text:s/></text:span><text:span text:style-name="T631">tests</text:span></text:p>
            <text:p text:style-name="Preformatted_20_Text"><text:span text:style-name="T124">bashansi.h <text:s text:c="2"/></text:span><text:span text:style-name="T631">CWRU</text:span><text:span text:style-name="T124"> <text:s text:c="10"/>input.h <text:s text:c="5"/>pcomplete.c <text:s text:c="4"/>trap.c</text:span></text:p>
            <text:p text:style-name="Preformatted_20_Text"><text:span text:style-name="T124">bashhist.c <text:s text:c="2"/></text:span><text:span text:style-name="T631">debian</text:span><text:span text:style-name="T124"> <text:s text:c="8"/>INSTALL <text:s text:c="5"/>pcomplete.h <text:s text:c="4"/>trap.h</text:span></text:p>
            <text:p text:style-name="P592">bashhist.h <text:s text:c="2"/>dispose_cmd.c <text:s/>jobs.c <text:s text:c="6"/>pcomplib.c <text:s text:c="5"/>unwind_prot.c</text:p>
            <text:p text:style-name="Preformatted_20_Text"><text:span text:style-name="T124">bashintl.h <text:s text:c="2"/>dispose_cmd.h <text:s/>jobs.h <text:s text:c="6"/></text:span><text:span text:style-name="T631">po</text:span><text:span text:style-name="T124"> <text:s text:c="13"/>unwind_prot.h</text:span></text:p>
            <text:p text:style-name="Preformatted_20_Text"><text:span text:style-name="T124">bashjmp.h <text:s text:c="3"/></text:span><text:span text:style-name="T631">doc</text:span><text:span text:style-name="T124"> <text:s text:c="11"/></text:span><text:span text:style-name="T631">lib</text:span><text:span text:style-name="T124"> <text:s text:c="9"/>POSIX <text:s text:c="10"/>variables.c</text:span></text:p>
            <text:p text:style-name="P592">bashline.c <text:s text:c="2"/>error.c <text:s text:c="7"/>list.c <text:s text:c="6"/>print_cmd.c <text:s text:c="4"/>variables.h</text:p>
            <text:p text:style-name="P592">bashline.h <text:s text:c="2"/>error.h <text:s text:c="7"/>locale.c <text:s text:c="4"/>quit.h <text:s text:c="9"/>version.c</text:p>
            <text:p text:style-name="Preformatted_20_Text"><text:span text:style-name="T124">bashtypes.h <text:s/>eval.c <text:s text:c="8"/></text:span><text:span text:style-name="T631">m4</text:span><text:span text:style-name="T124"> <text:s text:c="10"/>RBASH <text:s text:c="10"/>xmalloc.c</text:span></text:p>
            <text:p text:style-name="Preformatted_20_Text"><text:span text:style-name="T124">bracecomp.c <text:s/></text:span><text:span text:style-name="T631">examples</text:span><text:span text:style-name="T124"> <text:s text:c="6"/>mailcheck.c <text:s/>README <text:s text:c="9"/>xmalloc.h</text:span></text:p>
            <text:p text:style-name="P592">braces.c <text:s text:c="4"/>execute_cmd.c <text:s/>mailcheck.h <text:s/>redir.c <text:s text:c="8"/>Y2K</text:p>
            <text:p text:style-name="Preformatted_20_Text"><text:span text:style-name="T631">builtins</text:span><text:span text:style-name="T124"> <text:s text:c="4"/>execute_cmd.h <text:s/>make_cmd.c <text:s text:c="2"/>redir.h <text:s text:c="8"/>y.tab.c</text:span></text:p>
            <text:p text:style-name="P592">builtins.h <text:s text:c="2"/>expr.c <text:s text:c="8"/>make_cmd.h <text:s text:c="2"/>shell.c <text:s text:c="8"/>y.tab.h</text:p>
            <text:p text:style-name="Preformatted_20_Text"><text:span text:style-name="T631">ChangeLog</text:span><text:span text:style-name="T124"> <text:s text:c="3"/>externs.h <text:s text:c="5"/>Makefile.in <text:s/>shell.h</text:span></text:p>
            <text:p text:style-name="P593"><text:soft-page-break/>CHANGES <text:s text:c="5"/>findcmd.c <text:s text:c="5"/>MANIFEST <text:s text:c="4"/>sig.c</text:p>
          </table:table-cell>
        </table:table-row>
      </table:table>
      <text:p text:style-name="P594"/>
      <text:p text:style-name="P595"><text:span text:style-name="T652">Much software is distributed as source code and, once downloaded, must be compiled. The compilation process varies from one program to another, but there are some conventions which, when followed, simplify building and installing software in Linux environments. For example, if we want to install the latest version of </text:span><text:span text:style-name="Source_20_Text"><text:span text:style-name="T653">gawk</text:span></text:span><text:span text:style-name="Source_20_Text"><text:span text:style-name="T653"><text:note text:id="ftn41" text:note-class="footnote"><text:note-citation>41</text:note-citation><text:note-body><text:p text:style-name="P331"><text:span text:style-name="T635">See the </text:span><text:span text:style-name="T654">gawk(1)</text:span><text:span text:style-name="T655"> manual page </text:span></text:p></text:note-body></text:note></text:span></text:span><text:span text:style-name="T652"> (a programming language designed for text processing and data extraction), we can download its source code from the official website and compile it. The complete procedure is shown below.</text:span></text:p>
      <text:p text:style-name="P594"/>
      <text:p text:style-name="P324"><text:span text:style-name="T656">We </text:span><text:span text:style-name="T652">download </text:span><text:span text:style-name="T656">the source code using </text:span><text:span text:style-name="T653">wget</text:span><text:span text:style-name="T653"><text:note text:id="ftn42" text:note-class="footnote"><text:note-citation>42</text:note-citation><text:note-body><text:p text:style-name="P596"><text:span text:style-name="T645">S</text:span><text:span text:style-name="T657">ee </text:span><text:span text:style-name="T658">the</text:span><text:span text:style-name="T657"> </text:span><text:span text:style-name="T654">wget(1</text:span><text:span text:style-name="T659">)</text:span><text:span text:style-name="T660"> manual page. </text:span><text:span text:style-name="T661">It can be </text:span><text:span text:style-name="T660">install</text:span><text:span text:style-name="T661">ed</text:span><text:span text:style-name="T660"> with </text:span><text:span text:style-name="T654">sudo apt install wget</text:span></text:p></text:note-body></text:note></text:span></text:p>
      <text:p text:style-name="P597"/>
      <table:table table:name="Table144" table:style-name="Table144">
        <table:table-column table:style-name="Table144.A"/>
        <table:table-row>
          <table:table-cell table:style-name="Table144.A1" office:value-type="string">
            <text:p text:style-name="P598"><text:span text:style-name="T103">[</text:span><text:a xlink:type="simple" xlink:href="mailto:linux@io" text:style-name="Internet_20_link" text:visited-style-name="Visited_20_Internet_20_Link"><text:span text:style-name="T103">linux@basis</text:span></text:a><text:span text:style-name="T103">] wget </text:span><text:a xlink:type="simple" xlink:href="https://ftp.gnu.org/gnu/gawk/gawk-5.1.1.tar.xz" text:style-name="Internet_20_link" text:visited-style-name="Visited_20_Internet_20_Link"><text:span text:style-name="T103">https://ftp.gnu.org/gnu/gawk/gawk-5.1.1.tar.xz</text:span></text:a></text:p>
            <text:p text:style-name="P599">...output…</text:p>
            <text:p text:style-name="P600"/>
            <text:p text:style-name="P601"><text:span text:style-name="T103">[</text:span><text:a xlink:type="simple" xlink:href="mailto:linux@io" text:style-name="Internet_20_link" text:visited-style-name="Visited_20_Internet_20_Link"><text:span text:style-name="T103">linux@basis</text:span></text:a><text:span text:style-name="T103">] ls</text:span></text:p>
            <text:p text:style-name="P602">gawk-5.1.1.tar.xz</text:p>
          </table:table-cell>
        </table:table-row>
      </table:table>
      <text:p text:style-name="P603"/>
      <text:p text:style-name="P604"><text:span text:style-name="T662">Unpacking the package and extracting </text:span><text:span text:style-name="T645">its</text:span><text:span text:style-name="T662"> contents </text:span><text:span text:style-name="T645">using</text:span><text:span text:style-name="T662"> </text:span><text:span text:style-name="T136">unxz</text:span><text:span text:style-name="T136"><text:note text:id="ftn43" text:note-class="footnote"><text:note-citation>43</text:note-citation><text:note-body><text:p text:style-name="P605"><text:span text:style-name="T654">unxz</text:span><text:span text:style-name="T663"> is a tool to decompress archive</text:span><text:span text:style-name="T658">s</text:span><text:span text:style-name="T663">, it belongs to the utility </text:span><text:span text:style-name="T654">xz</text:span><text:span text:style-name="T663">, see </text:span><text:span text:style-name="T658">the</text:span><text:span text:style-name="T663"> </text:span><text:span text:style-name="T654">xz(1)</text:span><text:span text:style-name="T664"> manual page</text:span></text:p></text:note-body></text:note></text:span><text:span text:style-name="T662"> </text:span><text:span text:style-name="T657">and</text:span><text:span text:style-name="T662"> </text:span><text:span text:style-name="T136">tar</text:span><text:span text:style-name="T662"><text:note text:id="ftn44" text:note-class="footnote"><text:note-citation>44</text:note-citation><text:note-body><text:p text:style-name="P605"><text:span text:style-name="T665">tar</text:span><text:span text:style-name="T663"> is </text:span><text:span text:style-name="T645">the</text:span><text:span text:style-name="T663"> archiving utility, see </text:span><text:span text:style-name="T658">the</text:span><text:span text:style-name="T663"> </text:span><text:span text:style-name="T654">tar(1)</text:span><text:span text:style-name="T664"> manual page. </text:span><text:span text:style-name="T662">Some packages are compressed via </text:span><text:span text:style-name="T654">gzip</text:span><text:span text:style-name="T662"> or </text:span><text:span text:style-name="T654">bzip2</text:span><text:span text:style-name="T662"> in which case the corresponding software must be used for </text:span><text:span text:style-name="T658">the </text:span><text:span text:style-name="T662">decompression (</text:span><text:span text:style-name="T654">gunzip</text:span><text:span text:style-name="T662">, </text:span><text:span text:style-name="T654">bunzip2</text:span><text:span text:style-name="T662">)</text:span></text:p></text:note-body></text:note></text:span></text:p>
      <text:p text:style-name="P604"/>
      <table:table table:name="Table146" table:style-name="Table146">
        <table:table-column table:style-name="Table146.A"/>
        <table:table-row>
          <table:table-cell table:style-name="Table146.A1" office:value-type="string">
            <text:p text:style-name="P606"><text:span text:style-name="T103">[</text:span><text:a xlink:type="simple" xlink:href="mailto:linux@io" text:style-name="Internet_20_link" text:visited-style-name="Visited_20_Internet_20_Link"><text:span text:style-name="T103">linux@basis</text:span></text:a><text:span text:style-name="T103">] unxz gawk-5.1.1.tar.xz</text:span></text:p>
            <text:p text:style-name="P606"><text:span text:style-name="T103">[</text:span><text:a xlink:type="simple" xlink:href="mailto:linux@io" text:style-name="Internet_20_link" text:visited-style-name="Visited_20_Internet_20_Link"><text:span text:style-name="T103">linux@basis</text:span></text:a><text:span text:style-name="T103">] tar xvf gawk-5.1.1.tar</text:span></text:p>
            <text:p text:style-name="P607">...output…</text:p>
            <text:p text:style-name="P606"><text:span text:style-name="T103">[</text:span><text:a xlink:type="simple" xlink:href="mailto:linux@io" text:style-name="Internet_20_link" text:visited-style-name="Visited_20_Internet_20_Link"><text:span text:style-name="T103">linux@basis</text:span></text:a><text:span text:style-name="T103">] ls </text:span></text:p>
            <text:p text:style-name="P608"><text:span text:style-name="T418">gawk-5.1.1</text:span> <text:s text:c="3"/>gawk-5.1.1.tar</text:p>
            <text:p text:style-name="P608"/>
          </table:table-cell>
        </table:table-row>
      </table:table>
      <text:p text:style-name="P604"/>
      <text:p text:style-name="P609">Once the contents of the package have been extracted, it is possible to proceed with the compilation</text:p>
      <text:p text:style-name="P604"/>
      <table:table table:name="Table166" table:style-name="Table166">
        <table:table-column table:style-name="Table166.A"/>
        <table:table-row>
          <table:table-cell table:style-name="Table166.A1" office:value-type="string">
            <text:p text:style-name="P610"><text:span text:style-name="T103">[</text:span><text:a xlink:type="simple" xlink:href="mailto:linux@io" text:style-name="Internet_20_link" text:visited-style-name="Visited_20_Internet_20_Link"><text:span text:style-name="T103">linux@basis</text:span></text:a><text:span text:style-name="T103">] cd gawk-5.1.1</text:span></text:p>
            <text:p text:style-name="P610"><text:span text:style-name="T103">[</text:span><text:a xlink:type="simple" xlink:href="mailto:linux@io" text:style-name="Internet_20_link" text:visited-style-name="Visited_20_Internet_20_Link"><text:span text:style-name="T103">linux@basis</text:span></text:a><text:span text:style-name="T103"> </text:span><text:span text:style-name="T292">~/gawk-5.1.1</text:span><text:span text:style-name="T103">] ./</text:span><text:span text:style-name="T666">configure</text:span></text:p>
            <text:p text:style-name="P607">...output…</text:p>
            <text:p text:style-name="P611"><text:span text:style-name="T103">[</text:span><text:a xlink:type="simple" xlink:href="mailto:linux@io" text:style-name="Internet_20_link" text:visited-style-name="Visited_20_Internet_20_Link"><text:span text:style-name="T103">linux@basis</text:span></text:a><text:span text:style-name="T103"> </text:span><text:span text:style-name="T667">~/gawk-5.1.1</text:span><text:span text:style-name="T103">] make</text:span></text:p>
            <text:p text:style-name="P607">...output…</text:p>
            <text:p text:style-name="P611"><text:span text:style-name="T103">[</text:span><text:a xlink:type="simple" xlink:href="mailto:linux@io" text:style-name="Internet_20_link" text:visited-style-name="Visited_20_Internet_20_Link"><text:span text:style-name="T103">linux@basis</text:span></text:a><text:span text:style-name="T103"> </text:span><text:span text:style-name="T667">~/gawk-5.1.1</text:span><text:span text:style-name="T209">] </text:span><text:span text:style-name="T668">make install</text:span></text:p>
            <text:p text:style-name="P607">...output…</text:p>
          </table:table-cell>
        </table:table-row>
      </table:table>
      <text:p text:style-name="P324"><text:span text:style-name="T668"/></text:p>
      <text:p text:style-name="P324"><text:span text:style-name="T668">The last command (</text:span><text:span text:style-name="T141">make install</text:span><text:span text:style-name="T668">) installs the compiled software. This is </text:span><text:span text:style-name="T656">the</text:span><text:span text:style-name="T668"> standard procedure for software distributed via source code. In the source directory there is usually a </text:span><text:span text:style-name="T141">README</text:span><text:span text:style-name="T668"> file. Some software provides an </text:span><text:span text:style-name="T141">INSTALL</text:span><text:span text:style-name="T668"> file or a directory (</text:span><text:span text:style-name="T141">doc</text:span><text:span text:style-name="T668">) containing installation documentation. In any case, regardless of the software, it is always good practice to consult the documentation provided.</text:span></text:p>
      <text:p text:style-name="P612"/>
      <text:p text:style-name="P613"><text:bookmark-start text:name="0.13"/><text:soft-page-break/>0.1<text:span text:style-name="T54">0</text:span> <text:span text:style-name="T669">The S</text:span><text:span text:style-name="T670">tandards</text:span><text:bookmark-end text:name="0.13"/></text:p>
      <text:p text:style-name="P614"/>
      <text:p text:style-name="P614">Working with programming on Linux often implies programming in the C language. When programming in C, it is important to know the standards that define the language and the features that enable system-level programming. Below is a summary of the main standards with a brief description<text:note text:id="ftn45" text:note-class="footnote"><text:note-citation>45</text:note-citation><text:note-body><text:p text:style-name="P615">For more information see the <text:span text:style-name="T671">Bibliography</text:span></text:p></text:note-body></text:note>.</text:p>
      <text:p text:style-name="P616"/>
      <text:p text:style-name="P617">ISO C</text:p>
      <text:p text:style-name="P616">This is the main standard of the C language adopted by the American National Standards Institute (ANSI) as ANSI C (X3.159-1989, “ANSI C”). It was later standardized by the International Organization for Standardization (ISO) as ISO/IEC 9899:1990 (“Programming Language C”). The GNU C Library is a superset of ISO C.</text:p>
      <text:p text:style-name="P616"/>
      <text:p text:style-name="P617">POSIX (Portable Operating System Interface for Unix)</text:p>
      <text:p text:style-name="P616">POSIX defines a set of standards for maintaining compatibility between operating systems (ISO/IEC 9945). It was also published as ANSI/IEEE Std 1003 and is largely based on UNIX systems. POSIX provides a superset of ISO C functionality, adding system-level features and additional functions for low-level operating system support.</text:p>
      <text:p text:style-name="P616">POSIX.1 (ISO/IEC 9945-1:1996), which defines the system API, is implemented by the GNU C Library.<text:line-break/>POSIX.2, which defines shell and utilities, is also implemented by the GNU C Library.</text:p>
      <text:p text:style-name="P616"/>
      <text:p text:style-name="P617">Berkeley UNIX</text:p>
      <text:p text:style-name="P616">The GNU C Library also includes features from non-formally standardized UNIX variants such as 4.2 BSD, 4.3 BSD, 4.4 BSD, and SunOS¹.</text:p>
      <text:p text:style-name="P616"/>
      <text:p text:style-name="P617">SVID</text:p>
      <text:p text:style-name="P616">The System V Interface Description is a specification describing AT&amp;T UNIX System V. The GNU C Library implements many features required by SVID that are not included in ISO C or POSIX.</text:p>
      <text:p text:style-name="P616"/>
      <text:p text:style-name="P617">XPG</text:p>
      <text:p text:style-name="P616">The X/Open Portability Guide is a general standard published by the X/Open Company Ltd. X/Open owns the UNIX trademark. It defines requirements for systems intended to be UNIX-compatible. The GNU C Library is compatible with XPG and includes common extensions from XSI (X/Open System Interface) and X/Open UNIX extensions.</text:p>
      <text:p text:style-name="P616"/>
      <text:p text:style-name="P617">LSB</text:p>
      <text:p text:style-name="P616">The Linux Standard Base is an ISO standard for GNU/Linux aimed at ensuring compatibility and standardization across Linux distributions. It incorporates other standards such as POSIX and SUS.</text:p>
      <text:p text:style-name="P616"/>
      <text:p text:style-name="P617">SUS</text:p>
      <text:p text:style-name="P616">The Single UNIX Specification defines the requirements a system must meet to be certified as a UNIX system. Linux is considered a UNIX-like operating system.</text:p>
      <text:p text:style-name="P616"/>
      <text:p text:style-name="P616"/>
      <text:p text:style-name="P616"/>
      <text:p text:style-name="P616"/>
      <text:p text:style-name="P616"/>
      <text:p text:style-name="P618"><text:bookmark-start text:name="0.14"/><text:soft-page-break/>0.1<text:span text:style-name="T54">1</text:span> <text:span text:style-name="T672">The</text:span> <text:span text:style-name="T84">GNU General Public License</text:span><text:bookmark-end text:name="0.14"/></text:p>
      <text:p text:style-name="P619"/>
      <text:p text:style-name="P616">The GNU General Public License (GPL) is a free copyleft license for software. It is based on some principles concerning the freedom to use and distribute software.</text:p>
      <text:p text:style-name="P616"/>
      <text:p text:style-name="P620"><text:span text:style-name="T673">From the official page </text:span><text:span text:style-name="T674">(</text:span><text:a xlink:type="simple" xlink:href="https://www.gnu.org/licenses/quick-guide-gplv3.html" text:style-name="Internet_20_link" text:visited-style-name="Visited_20_Internet_20_Link"><text:span text:style-name="T674">https://www.gnu.org/licenses/quick-guide-gplv3.html</text:span></text:a><text:span text:style-name="T674">):</text:span></text:p>
      <text:p text:style-name="P621"/>
      <text:p text:style-name="P622"><text:span text:style-name="T675">“</text:span>Nobody should be restricted by the software they use. There are four freedoms that every user should have:<text:span text:style-name="T675">”</text:span></text:p>
      <text:p text:style-name="P623"/>
      <text:list xml:id="list1703024123" text:style-name="L4">
        <text:list-item>
          <text:p text:style-name="P624">the freedom to use the software for any purpose</text:p>
        </text:list-item>
        <text:list-item text:style-override="L5">
          <text:p text:style-name="P625">the freedom to change the software to suit your needs</text:p>
        </text:list-item>
        <text:list-item text:style-override="L5">
          <text:p text:style-name="P625">the freedom to share the software with your friends and neighbors </text:p>
        </text:list-item>
        <text:list-item text:style-override="L5">
          <text:p text:style-name="P626">the freedom to share the changes you make</text:p>
        </text:list-item>
      </text:list>
      <text:p text:style-name="P627"/>
      <text:p text:style-name="P627">When a program offers users all these freedoms, we call it free software. Programmers can release the software under the terms of the GNU GPL in which case the software will be considered free software and will remain so in perpetuity, regardless of who modifies and/or distributes the program. This is what is called copyleft.</text:p>
      <text:p text:style-name="P616"/>
      <text:p text:style-name="P616">This paragraph provides only a brief introduction to the GPL license. For further details, the reader is encouraged to consult the official website: <text:a xlink:type="simple" xlink:href="https://www.gnu.org/" text:style-name="Internet_20_link" text:visited-style-name="Visited_20_Internet_20_Link">https://www.gnu.org</text:a> </text:p>
      <text:p text:style-name="P616"/>
      <text:p text:style-name="P616">The author makes a final observation: the development of Linux has been strongly driven by the concept of free software. Over the past two decades, Linux has evolved to become one of the most widely used operating systems in both corporate and mobile environments, largely because its source code is freely available, modifiable, and redistributable. This has allowed developers around the world to contribute to its growth and widespread adoption.</text:p>
      <text:p text:style-name="P616">Beyond technical and professional aspects, learning and passion for technology play a fundamental role when working with computers and software in general. These elements have contributed to a significant shift in perspective, both in the market and in the dissemination of knowledge, completely changing how technology is perceived and used over the last twenty years. What was once limited to a small group of scholars and researchers has become accessible to everyone thanks to free software.</text:p>
      <text:p text:style-name="P616">Linux has played a major role in the spread of free software, and where students or researchers once had to rely on experts to understand specific technologies, Linux and free software have helped establish a level of independence that is essential in study, research, innovation, and personal exploration.</text:p>
      <text:p text:style-name="P628"/>
      <text:p text:style-name="P616"/>
      <text:p text:style-name="P629"/>
      <text:p text:style-name="P629"/>
      <text:p text:style-name="P629"/>
      <text:p text:style-name="P629"/>
      <text:p text:style-name="P629"/>
      <text:p text:style-name="P629"/>
      <text:p text:style-name="P629"/>
      <text:p text:style-name="P629"/>
      <text:p text:style-name="P630"><text:bookmark-start text:name="0.15"/><text:soft-page-break/><text:span text:style-name="T676">0.1</text:span><text:span text:style-name="T324">2</text:span><text:span text:style-name="T677"> </text:span><text:span text:style-name="T678">T</text:span><text:span text:style-name="T677">heory </text:span><text:span text:style-name="T679">and i</text:span><text:span text:style-name="T677">nsights</text:span><text:bookmark-end text:name="0.15"/></text:p>
      <text:p text:style-name="P631"/>
      <text:p text:style-name="P632"><text:span text:style-name="T680">0.1</text:span><text:span text:style-name="T681">2</text:span><text:span text:style-name="T680">.</text:span><text:span text:style-name="T682">1</text:span><text:span text:style-name="T680"> </text:span><text:span text:style-name="T683">B</text:span><text:span text:style-name="T684">yte </text:span><text:span text:style-name="T683">order</text:span></text:p>
      <text:p text:style-name="P633"/>
      <text:p text:style-name="P634"><text:span text:style-name="T685">Byte order (</text:span><text:span text:style-name="T686">endianness</text:span><text:span text:style-name="T685">) refers to the convention a computer uses to store multi-byte data values in memory.</text:span> The<text:span text:style-name="T687">re are</text:span> two modes</text:p>
      <text:p text:style-name="P635"/>
      <text:p text:style-name="P636"><text:span text:style-name="T687">B</text:span>ig endian <text:tab/><text:tab/>Most significant (largest) byte first (MSB <text:span text:style-name="T687">f</text:span>irst)</text:p>
      <text:p text:style-name="P635"/>
      <text:p text:style-name="P635"><text:span text:style-name="T687">L</text:span><text:span text:style-name="T688">ittle endian <text:tab/><text:tab/>The least significant (smallest) byte first (LSB </text:span><text:span text:style-name="T687">f</text:span><text:span text:style-name="T688">irst)</text:span><text:span text:style-name="T688"><text:note text:id="ftn46" text:note-class="footnote"><text:note-citation>46</text:note-citation><text:note-body><text:p text:style-name="P637">MSB stands for <text:span text:style-name="T35">Most Significant Byte</text:span>, LSB stands for <text:span text:style-name="T35">Least Significant Byte</text:span></text:p></text:note-body></text:note></text:span></text:p>
      <text:p text:style-name="P638"/>
      <text:p text:style-name="P638"/>
      <text:p text:style-name="P639"><text:span text:style-name="T689">The order of the bytes varies from one architecture to another, for example Intel processors use </text:span><text:span text:style-name="T690">l</text:span><text:span text:style-name="T691">ittle </text:span><text:span text:style-name="T690">e</text:span><text:span text:style-name="T691">ndian</text:span><text:span text:style-name="T689"> while IBM and Motorola use </text:span><text:span text:style-name="T690">b</text:span><text:span text:style-name="T691">ig </text:span><text:span text:style-name="T690">e</text:span><text:span text:style-name="T691">ndian</text:span><text:span text:style-name="T689">. Many internet protocols use </text:span><text:span text:style-name="T690">b</text:span><text:span text:style-name="T689">ig </text:span><text:span text:style-name="T692">e</text:span><text:span text:style-name="T689">ndian, which is why this mode is also called </text:span><text:span text:style-name="T691">network byte order</text:span><text:span text:style-name="T689">. The two modes represent the order in which bytes are stored or transmitted. In the case of </text:span><text:span text:style-name="T690">l</text:span><text:span text:style-name="T691">ittle</text:span><text:span text:style-name="T689"> </text:span><text:span text:style-name="T690">i</text:span><text:span text:style-name="T691">ndian</text:span><text:span text:style-name="T689">, the </text:span><text:span text:style-name="T691">least significant byte</text:span><text:span text:style-name="T689"> is transmitted first, i.e. the smallest, in the case of </text:span><text:span text:style-name="T690">b</text:span><text:span text:style-name="T689">ig </text:span><text:span text:style-name="T692">e</text:span><text:span text:style-name="T689">ndian the </text:span><text:span text:style-name="T691">most significant</text:span><text:span text:style-name="T689"> </text:span><text:span text:style-name="T691">byte</text:span><text:span text:style-name="T689"> </text:span><text:span text:style-name="T692">(the largest) </text:span><text:span text:style-name="T689">is transmitted first.</text:span></text:p>
      <text:p text:style-name="P640">The following <text:span text:style-name="T687">picture</text:span> shows the representation of the hexadecimal number <text:span text:style-name="T15">0x0123</text:span> in both modes and the representation of the same number in both modes in binary.</text:p>
      <text:p text:style-name="P640"><draw:frame draw:style-name="fr3" draw:name="Image4" text:anchor-type="char" svg:x="1.1465in" svg:y="0.0791in" svg:width="4.6291in" svg:height="2.4602in" draw:z-index="0"><draw:image xlink:href="Pictures/10000001000002D800000183EC466DE5.png" xlink:type="simple" xlink:show="embed" xlink:actuate="onLoad" draw:mime-type="image/png"/></draw:frame></text:p>
      <text:p text:style-name="P641"/>
      <text:p text:style-name="P642"/>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43">Fig <text:span text:style-name="T693">5</text:span>. <text:span text:style-name="T694">Byte order</text:span></text:p>
      <text:p text:style-name="P633"/>
      <text:p text:style-name="P633"/>
      <text:p text:style-name="P644"><text:span text:style-name="T695">The hexadecimal number </text:span><text:span text:style-name="T696">0x0123</text:span><text:span text:style-name="T695"> is represented by the two bytes which are respectively the number </text:span><text:span text:style-name="T696">01</text:span><text:span text:style-name="T695"> which represents the hundreds and the number </text:span><text:span text:style-name="T696">23</text:span><text:span text:style-name="T695"> which represents the tens and the units. Of these two bytes the largest is byte </text:span><text:span text:style-name="T696">01</text:span><text:span text:style-name="T695"> and therefore it is the most significant. In </text:span><text:span text:style-name="T697">l</text:span><text:span text:style-name="T698">ittle </text:span><text:span text:style-name="T697">e</text:span><text:span text:style-name="T698">ndian</text:span><text:span text:style-name="T695"> mode byte </text:span><text:span text:style-name="T696">23</text:span><text:span text:style-name="T695"> </text:span><text:span text:style-name="T699">(</text:span><text:span text:style-name="T695">the least significant </text:span><text:span text:style-name="T699">or smallest)</text:span><text:span text:style-name="T695"> is transmitted first, while in </text:span><text:span text:style-name="T697">b</text:span><text:span text:style-name="T698">ig </text:span><text:span text:style-name="T697">e</text:span><text:span text:style-name="T698">ndian</text:span><text:span text:style-name="T695"> mode byte </text:span><text:span text:style-name="T696">01</text:span><text:span text:style-name="T695"> </text:span><text:span text:style-name="T699">(the</text:span><text:span text:style-name="T695"> most significant </text:span><text:span text:style-name="T699">or largest)</text:span><text:span text:style-name="T695"> is transmitted first. The two bytes that make up the number are respectively stored in reverse from each other in the two modes.</text:span></text:p>
      <text:p text:style-name="P645"/>
      <text:p text:style-name="P645"/>
      <text:p text:style-name="P645"/>
      <text:p text:style-name="P645"/>
      <text:p text:style-name="P645"/>
      <text:p text:style-name="P646"><text:soft-page-break/><text:span text:style-name="T90">0.1</text:span><text:span text:style-name="T54">2</text:span><text:span text:style-name="T90">.</text:span><text:span text:style-name="T56">2</text:span><text:span text:style-name="T90"> </text:span>Static and dynamic linking</text:p>
      <text:p text:style-name="P647"/>
      <text:p text:style-name="P648"><text:span text:style-name="T700">During the linking phase, external libraries are connected to the program so that their functions and objects can be used. With </text:span><text:span text:style-name="T701">static linking</text:span><text:span text:style-name="T700">, the code from the libraries is copied directly into the final executable file. As a result, if the program is transferred to another operating system that supports the same executable format, it can run independently, without requiring the corresponding libraries to be installed on the target system. </text:span><text:span text:style-name="T701">Statically</text:span><text:span text:style-name="T700"> </text:span><text:span text:style-name="T701">linked</text:span><text:span text:style-name="T700"> </text:span><text:span text:style-name="T701">programs</text:span><text:span text:style-name="T700"> are usually larger because they include the library code they depend on.</text:span></text:p>
      <text:p text:style-name="P647"/>
      <text:p text:style-name="P648"><text:span text:style-name="T700">With </text:span><text:span text:style-name="T701">dynamic</text:span><text:span text:style-name="T700"> </text:span><text:span text:style-name="T701">linking</text:span><text:span text:style-name="T700">, only references to </text:span><text:span text:style-name="T701">external</text:span><text:span text:style-name="T700"> </text:span><text:span text:style-name="T701">libraries</text:span><text:span text:style-name="T700"> are stored in the executable file, while the actual linking takes place during execution, i.e. at </text:span><text:span text:style-name="T701">run</text:span><text:span text:style-name="T700"> </text:span><text:span text:style-name="T701">time</text:span><text:span text:style-name="T700">. One advantage of </text:span><text:span text:style-name="T701">dynamic</text:span><text:span text:style-name="T700"> </text:span><text:span text:style-name="T701">linking</text:span><text:span text:style-name="T700"> is that if a library is updated, the executable usually does not need to be recompiled, since the library remains separate from the program. However, compatibility with </text:span><text:span text:style-name="T701">shared</text:span><text:span text:style-name="T700"> </text:span><text:span text:style-name="T701">libraries</text:span><text:span text:style-name="T700"> must still be maintained. In addition, only one copy of a </text:span><text:span text:style-name="T701">shared</text:span><text:span text:style-name="T700"> </text:span><text:span text:style-name="T701">library</text:span><text:span text:style-name="T700"> needs to be loaded into memory, allowing multiple programs to share it and reducing overall memory usage. On the other hand, </text:span><text:span text:style-name="T701">dynamically</text:span><text:span text:style-name="T700"> </text:span><text:span text:style-name="T701">linked</text:span><text:span text:style-name="T700"> </text:span><text:span text:style-name="T701">programs</text:span><text:span text:style-name="T700"> may be slightly slower than </text:span><text:span text:style-name="T701">statically</text:span><text:span text:style-name="T700"> </text:span><text:span text:style-name="T701">linked</text:span><text:span text:style-name="T700"> ones due to the overhead of run-time linking.</text:span></text:p>
      <text:p text:style-name="P649"/>
      <text:p text:style-name="P650"><text:span text:style-name="T702">The following </text:span><text:span text:style-name="T703">picture</text:span><text:span text:style-name="T702"> shows the difference between </text:span><text:span text:style-name="T704">static linking</text:span><text:span text:style-name="T702"> and </text:span><text:span text:style-name="T704">dynamic linking</text:span></text:p>
      <text:p text:style-name="P651"/>
      <text:p text:style-name="P651"><draw:frame draw:style-name="fr2" draw:name="Image5" text:anchor-type="char" svg:width="6.0618in" svg:height="5.3319in" draw:z-index="4"><draw:image xlink:href="Pictures/10000001000008050000070EC8D41D54.png" xlink:type="simple" xlink:show="embed" xlink:actuate="onLoad" draw:mime-type="image/png"/></draw:frame><text:span text:style-name="T705"/></text:p>
      <text:p text:style-name="P652">Fig <text:span text:style-name="T706">6</text:span>. <text:span text:style-name="T705">Static and dynamic linking</text:span></text:p>
      <text:p text:style-name="P653"><text:soft-page-break/>The following two examples illustrate the procedure for creating and linking a <text:span text:style-name="T35">static</text:span> and a <text:span text:style-name="T35">dynamic</text:span> <text:span text:style-name="T35">library</text:span>.</text:p>
      <text:p text:style-name="P653"/>
      <text:p text:style-name="P654">Static library</text:p>
      <text:p text:style-name="P653"/>
      <text:p text:style-name="P653">1. Creat<text:span text:style-name="T707">e</text:span> the file containing the <text:span text:style-name="T708">library</text:span><text:span text:style-name="T35"> </text:span><text:span text:style-name="T708">functions</text:span></text:p>
      <text:p text:style-name="P655"/>
      <text:p text:style-name="P656"><text:span text:style-name="T32">#include </text:span><text:span text:style-name="T33">&lt;stdio.h&gt;</text:span></text:p>
      <text:p text:style-name="P179"/>
      <text:p text:style-name="P178"><text:span text:style-name="T32">void</text:span> greet()</text:p>
      <text:p text:style-name="P178">{</text:p>
      <text:p text:style-name="P178"><text:tab/>printf(<text:span text:style-name="T33">"Hello, World!"</text:span>);</text:p>
      <text:p text:style-name="P178">}</text:p>
      <text:p text:style-name="P655"/>
      <text:p text:style-name="P657">lib_hello.c</text:p>
      <text:p text:style-name="P658">2. Creat<text:span text:style-name="T709">e</text:span> the header file</text:p>
      <text:p text:style-name="P655"/>
      <text:p text:style-name="P659"><text:span text:style-name="T179">void</text:span><text:span text:style-name="T181"> greet();</text:span></text:p>
      <text:p text:style-name="P655"/>
      <text:p text:style-name="P657">lib_hello.h</text:p>
      <text:p text:style-name="P660"/>
      <text:p text:style-name="P660">3. Creat<text:span text:style-name="T710">e</text:span> the program that will use the library functions</text:p>
      <text:p text:style-name="P655"/>
      <text:p text:style-name="P661"><text:span text:style-name="T32">#include </text:span><text:span text:style-name="T33">"lib_hello.h"</text:span></text:p>
      <text:p text:style-name="P662"/>
      <text:p text:style-name="P663"><text:span text:style-name="T32">void</text:span> main()</text:p>
      <text:p text:style-name="P663">{</text:p>
      <text:p text:style-name="P663"><text:tab/>greet();</text:p>
      <text:p text:style-name="P663">}</text:p>
      <text:p text:style-name="P664"/>
      <text:p text:style-name="P665">hello.c</text:p>
      <text:p text:style-name="P666"/>
      <text:p text:style-name="P666">4. Compi<text:span text:style-name="T711">le</text:span> the <text:span text:style-name="T35">library file</text:span> (create <text:span text:style-name="T711">the</text:span> <text:span text:style-name="T35">object file</text:span>)</text:p>
      <text:p text:style-name="P666"/>
      <table:table table:name="Table47" table:style-name="Table47">
        <table:table-column table:style-name="Table47.A"/>
        <table:table-row>
          <table:table-cell table:style-name="Table47.A1" office:value-type="string">
            <text:p text:style-name="P667">[<text:a xlink:type="simple" xlink:href="mailto:linux@base" text:style-name="Internet_20_link" text:visited-style-name="Visited_20_Internet_20_Link">linux@basis</text:a>] gcc -c lib_hello.c -o lib_hello.o</text:p>
            <text:p text:style-name="P667"/>
          </table:table-cell>
        </table:table-row>
      </table:table>
      <text:p text:style-name="P666"/>
      <text:p text:style-name="P668"><text:span text:style-name="T712">5. Creat</text:span><text:span text:style-name="T713">e</text:span><text:span text:style-name="T712"> the static library via </text:span><text:span text:style-name="T714">ar</text:span><text:span text:style-name="T714"><text:note text:id="ftn47" text:note-class="footnote"><text:note-citation>47</text:note-citation><text:note-body><text:p text:style-name="P669"><text:span text:style-name="T556">ar</text:span> <text:span text:style-name="T715">is </text:span><text:span text:style-name="T716">the</text:span><text:span text:style-name="T715"> program to create archives</text:span>, <text:span text:style-name="T255">see the</text:span> <text:span text:style-name="T15">ar(1)</text:span><text:span text:style-name="T255"> </text:span><text:span text:style-name="T715">man</text:span><text:span text:style-name="T255">ual</text:span><text:span text:style-name="T715"> page</text:span></text:p></text:note-body></text:note></text:span><text:span text:style-name="T712">. The </text:span><text:span text:style-name="T714">r</text:span><text:span text:style-name="T712"> option tells </text:span><text:span text:style-name="T714">ar</text:span><text:span text:style-name="T712"> to add the passed fi</text:span><text:span text:style-name="T713">l</text:span><text:span text:style-name="T712">es to the archive, the</text:span></text:p>
      <text:p text:style-name="P668"><text:span text:style-name="T714"><text:s text:c="2"/>c</text:span><text:span text:style-name="T712"> option creates the archive, the </text:span><text:span text:style-name="T714">s</text:span><text:span text:style-name="T712"> option adds an index to the archive so that the content</text:span><text:span text:style-name="T713">s</text:span><text:span text:style-name="T712"> is <text:s text:c="2"/></text:span></text:p>
      <text:p text:style-name="P670"><text:s text:c="5"/>faster reachable</text:p>
      <table:table table:name="Table48" table:style-name="Table48">
        <table:table-column table:style-name="Table48.A"/>
        <text:soft-page-break/>
        <table:table-row>
          <table:table-cell table:style-name="Table48.A1" office:value-type="string">
            <text:p text:style-name="P671">[<text:a xlink:type="simple" xlink:href="mailto:linux@base" text:style-name="Internet_20_link" text:visited-style-name="Visited_20_Internet_20_Link">linux@basis</text:a>] <text:span text:style-name="T717">ar rcs lib_hello.a lib_hello.o </text:span></text:p>
            <text:p text:style-name="P671"/>
          </table:table-cell>
        </table:table-row>
      </table:table>
      <text:p text:style-name="P672"/>
      <text:p text:style-name="P673"><text:span text:style-name="T15">ar</text:span> <text:span text:style-name="T718">has </text:span>crea<text:span text:style-name="T719">te</text:span><text:span text:style-name="T720">d</text:span> <text:span text:style-name="T719">the file</text:span> <text:span text:style-name="T15">lib_hello.a</text:span> (<text:span text:style-name="T719">the </text:span><text:span text:style-name="T721">static </text:span><text:span text:style-name="T35">libr</text:span><text:span text:style-name="T721">ary</text:span>)</text:p>
      <text:p text:style-name="P672"/>
      <text:p text:style-name="P674"><text:span text:style-name="T722">6</text:span><text:span text:style-name="T723">. Compil</text:span><text:span text:style-name="T722">e </text:span><text:span text:style-name="T723">the </text:span><text:span text:style-name="T724">hello.c</text:span><text:span text:style-name="T723"> program and link to the static library</text:span></text:p>
      <text:p text:style-name="P673"/>
      <table:table table:name="Table49" table:style-name="Table49">
        <table:table-column table:style-name="Table49.A"/>
        <table:table-row>
          <table:table-cell table:style-name="Table49.A1" office:value-type="string">
            <text:p text:style-name="P675">[<text:a xlink:type="simple" xlink:href="mailto:linux@base" text:style-name="Internet_20_link" text:visited-style-name="Visited_20_Internet_20_Link">linux@basis</text:a>] gcc -<text:span text:style-name="T725">c hello.c -o hello.o</text:span></text:p>
            <text:p text:style-name="P675"/>
            <text:p text:style-name="P676">[<text:a xlink:type="simple" xlink:href="mailto:linux@base" text:style-name="Internet_20_link" text:visited-style-name="Visited_20_Internet_20_Link">linux@basis</text:a>] gcc -o hello hello.o -L. -<text:span text:style-name="T726">l</text:span>_hello</text:p>
          </table:table-cell>
        </table:table-row>
      </table:table>
      <text:p text:style-name="P673"/>
      <text:p text:style-name="P677"><text:span text:style-name="T723">The </text:span><text:span text:style-name="T724">-L</text:span><text:span text:style-name="T723"> option followed by the </text:span><text:span text:style-name="T724">.</text:span><text:span text:style-name="T723"> tells </text:span><text:span text:style-name="T724">gcc</text:span><text:span text:style-name="T723"> to look for libraries in the current directory as well as the default paths. The </text:span><text:span text:style-name="T724">-l </text:span><text:span text:style-name="T723">option followed by </text:span><text:span text:style-name="T724">_hello</text:span><text:span text:style-name="T723"> specifies the name of the library to link.</text:span></text:p>
      <text:p text:style-name="P678"/>
      <text:p text:style-name="P674"><text:span text:style-name="T727">7</text:span><text:span text:style-name="T723">. Run the </text:span><text:span text:style-name="T724">hello</text:span><text:span text:style-name="T723"> program</text:span></text:p>
      <text:p text:style-name="P679"/>
      <table:table table:name="Table50" table:style-name="Table50">
        <table:table-column table:style-name="Table50.A"/>
        <table:table-row>
          <table:table-cell table:style-name="Table50.A1" office:value-type="string">
            <text:p text:style-name="P680">[<text:a xlink:type="simple" xlink:href="mailto:linux@base" text:style-name="Internet_20_link" text:visited-style-name="Visited_20_Internet_20_Link">linux@basis</text:a>] ./hello</text:p>
            <text:p text:style-name="P680">Hello, World!</text:p>
          </table:table-cell>
        </table:table-row>
      </table:table>
      <text:p text:style-name="P679"/>
      <text:p text:style-name="P681"><text:span text:style-name="T728">If </text:span><text:span text:style-name="T727">we</text:span><text:span text:style-name="T728"> run the </text:span><text:span text:style-name="T724">file</text:span><text:span text:style-name="T728"> command on the </text:span><text:span text:style-name="T729">static library</text:span><text:span text:style-name="T728"> file it will </text:span><text:span text:style-name="T727">display</text:span><text:span text:style-name="T728"> the file is an archive created with </text:span><text:span text:style-name="T724">ar</text:span></text:p>
      <text:p text:style-name="P682"/>
      <table:table table:name="Table51" table:style-name="Table51">
        <table:table-column table:style-name="Table51.A"/>
        <table:table-row>
          <table:table-cell table:style-name="Table51.A1" office:value-type="string">
            <text:p text:style-name="P683">[<text:a xlink:type="simple" xlink:href="mailto:linux@base" text:style-name="Internet_20_link" text:visited-style-name="Visited_20_Internet_20_Link">linux@basis</text:a>] file <text:span text:style-name="T730">lib_</text:span>hello.a</text:p>
            <text:p text:style-name="P683"/>
            <text:p text:style-name="P683">lib_hello.a: current ar archive</text:p>
          </table:table-cell>
        </table:table-row>
      </table:table>
      <text:p text:style-name="P684"/>
      <text:p text:style-name="P684"/>
      <text:p text:style-name="P654">Dynamic library</text:p>
      <text:p text:style-name="P654"/>
      <text:p text:style-name="P684">To create and <text:span text:style-name="T731">link</text:span> a <text:span text:style-name="T35">dynamic library</text:span>, the procedure is as follows.</text:p>
      <text:p text:style-name="P684"/>
      <text:p text:style-name="P685"><text:span text:style-name="T732">1. Compile the library file (</text:span><text:span text:style-name="T724">lib_hello.c</text:span><text:span text:style-name="T732">) with </text:span><text:span text:style-name="T733">Position Independent Code</text:span><text:span text:style-name="T732"> via the </text:span><text:span text:style-name="T724">-fpic</text:span></text:p>
      <text:p text:style-name="P685"><text:span text:style-name="T732"><text:s text:c="4"/>option. </text:span><text:span text:style-name="T734">This c</text:span><text:span text:style-name="T732">reate</text:span><text:span text:style-name="T734">s</text:span><text:span text:style-name="T732"> the </text:span><text:span text:style-name="T724">lib_hello.o</text:span><text:span text:style-name="T732"> file</text:span></text:p>
      <text:p text:style-name="P686"/>
      <table:table table:name="Table52" table:style-name="Table52">
        <table:table-column table:style-name="Table52.A"/>
        <table:table-row>
          <table:table-cell table:style-name="Table52.A1" office:value-type="string">
            <text:p text:style-name="P687">[<text:a xlink:type="simple" xlink:href="mailto:linux@base" text:style-name="Internet_20_link" text:visited-style-name="Visited_20_Internet_20_Link">linux@basis</text:a>] gcc -c -fpic <text:span text:style-name="T735">lib_</text:span>hello.c</text:p>
            <text:p text:style-name="P687"/>
          </table:table-cell>
        </table:table-row>
      </table:table>
      <text:p text:style-name="P686"/>
      <text:p text:style-name="P688"><text:span text:style-name="T736">2. Create the </text:span><text:span text:style-name="T737">shared library</text:span><text:span text:style-name="T736"> using the </text:span><text:span text:style-name="T724">-shared</text:span><text:span text:style-name="T736"> option. </text:span><text:span text:style-name="T734">This c</text:span><text:span text:style-name="T736">reate</text:span><text:span text:style-name="T734">s</text:span><text:span text:style-name="T736"> the </text:span><text:span text:style-name="T724">libhello.so</text:span><text:span text:style-name="T736"> file.</text:span></text:p>
      <text:p text:style-name="P689"/>
      <table:table table:name="Table53" table:style-name="Table53">
        <table:table-column table:style-name="Table53.A"/>
        <table:table-row>
          <table:table-cell table:style-name="Table53.A1" office:value-type="string">
            <text:p text:style-name="P690">[<text:a xlink:type="simple" xlink:href="mailto:linux@base" text:style-name="Internet_20_link" text:visited-style-name="Visited_20_Internet_20_Link">linux@basis</text:a>] gcc -shared -o libhello.so <text:span text:style-name="T738">lib_</text:span>hello.o</text:p>
            <text:p text:style-name="P690"/>
          </table:table-cell>
        </table:table-row>
      </table:table>
      <text:p text:style-name="P689"/>
      <text:p text:style-name="P688"><text:span text:style-name="T739">3. Compile and link the </text:span><text:span text:style-name="T724">hello.c</text:span><text:span text:style-name="T739"> program to the </text:span><text:span text:style-name="T740">shared library </text:span><text:span text:style-name="T724">libhello.so</text:span></text:p>
      <text:p text:style-name="P691"/>
      <table:table table:name="Table54" table:style-name="Table54">
        <table:table-column table:style-name="Table54.A"/>
        <table:table-row>
          <table:table-cell table:style-name="Table54.A1" office:value-type="string">
            <text:p text:style-name="P692">[<text:a xlink:type="simple" xlink:href="mailto:linux@base" text:style-name="Internet_20_link" text:visited-style-name="Visited_20_Internet_20_Link">linux@basis</text:a>] gcc -o hello hello.c -<text:span text:style-name="T741">L. </text:span>-lhello</text:p>
            <text:p text:style-name="P692"/>
          </table:table-cell>
        </table:table-row>
      </table:table>
      <text:p text:style-name="P693">4. Make the library available at runtime</text:p>
      <text:p text:style-name="P693"/>
      <table:table table:name="Table55" table:style-name="Table55">
        <table:table-column table:style-name="Table55.A"/>
        <table:table-row>
          <table:table-cell table:style-name="Table55.A1" office:value-type="string">
            <text:p text:style-name="P694">[<text:a xlink:type="simple" xlink:href="mailto:linux@base" text:style-name="Internet_20_link" text:visited-style-name="Visited_20_Internet_20_Link">linux@basis</text:a>] export LD_LIBRARY_PATH=$LD_LIBRARY_PATH:.</text:p>
            <text:p text:style-name="P694"/>
          </table:table-cell>
        </table:table-row>
      </table:table>
      <text:p text:style-name="P693"/>
      <text:p text:style-name="P695"><text:span text:style-name="T742">The</text:span><text:span text:style-name="T743"> </text:span><text:span text:style-name="T744">export</text:span><text:span text:style-name="T743"><text:note text:id="ftn48" text:note-class="footnote"><text:note-citation>48</text:note-citation><text:note-body><text:p text:style-name="P696"><text:span text:style-name="T255">See the </text:span><text:s/><text:span text:style-name="T15">export(1POSIX)</text:span><text:span text:style-name="T255"> m</text:span><text:span text:style-name="T745">an</text:span><text:span text:style-name="T255">ual</text:span><text:span text:style-name="T745"> page</text:span></text:p></text:note-body></text:note></text:span><text:span text:style-name="T743"> </text:span><text:span text:style-name="T742">command sets the value of </text:span><text:span text:style-name="T746">the</text:span><text:span text:style-name="T742"> shell variable and makes the variable available to the environment. The commands invoked </text:span><text:span text:style-name="T746">by</text:span><text:span text:style-name="T742"> the shell inherit the environment and therefore the exported environmen</text:span><text:span text:style-name="T747">t</text:span><text:span text:style-name="T742"> variables. The </text:span><text:span text:style-name="T744">LD_LIBRARY_PATH</text:span><text:span text:style-name="T742"> variable contains the paths where the </text:span><text:span text:style-name="T748">dynamic linker</text:span><text:span text:style-name="T742"> can find the </text:span><text:span text:style-name="T748">shared libraries</text:span><text:span text:style-name="T742">. The above command sets that variable to its initial value </text:span><text:span text:style-name="T746">and </text:span><text:span text:style-name="T742">add</text:span><text:span text:style-name="T746">s</text:span><text:span text:style-name="T742"> </text:span><text:span text:style-name="T746">to this value </text:span><text:span text:style-name="T742">the path </text:span><text:span text:style-name="T744">.</text:span><text:span text:style-name="T742"> </text:span><text:span text:style-name="T746">(</text:span><text:span text:style-name="T742">the current directory</text:span><text:span text:style-name="T746">)</text:span><text:span text:style-name="T742">.</text:span></text:p>
      <text:p text:style-name="P693"/>
      <text:p text:style-name="P697"><text:span text:style-name="T749">5. </text:span><text:span text:style-name="T750">Execute </text:span><text:span text:style-name="T744">hello</text:span><text:span text:style-name="T749">.</text:span></text:p>
      <text:p text:style-name="P698"/>
      <table:table table:name="Table56" table:style-name="Table56">
        <table:table-column table:style-name="Table56.A"/>
        <table:table-row>
          <table:table-cell table:style-name="Table56.A1" office:value-type="string">
            <text:p text:style-name="P699">[<text:a xlink:type="simple" xlink:href="mailto:linux@base" text:style-name="Internet_20_link" text:visited-style-name="Visited_20_Internet_20_Link">linux@basis</text:a>] ./hello</text:p>
            <text:p text:style-name="P699">Hello, World!</text:p>
          </table:table-cell>
        </table:table-row>
      </table:table>
      <text:p text:style-name="P700"/>
      <text:p text:style-name="P701"><text:span text:style-name="T751">6. Verify that the program uses the </text:span><text:span text:style-name="T752">libhello.so</text:span><text:span text:style-name="T751"> shared library </text:span><text:span text:style-name="T750">with</text:span><text:span text:style-name="T751"> </text:span><text:span text:style-name="T752">ldd</text:span><text:span text:style-name="T751">.</text:span><text:span text:style-name="T753"> </text:span></text:p>
      <text:p text:style-name="P702"/>
      <table:table table:name="Table57" table:style-name="Table57">
        <table:table-column table:style-name="Table57.A"/>
        <table:table-row>
          <table:table-cell table:style-name="Table57.A1" office:value-type="string">
            <text:p text:style-name="P703">[<text:a xlink:type="simple" xlink:href="mailto:linux@base" text:style-name="Internet_20_link" text:visited-style-name="Visited_20_Internet_20_Link">linux@basis</text:a>] <text:span text:style-name="T754">ldd ./hello</text:span></text:p>
            <text:p text:style-name="P703"><text:tab/>linux-vdso.so.1 (0x00007ffcd453a000)</text:p>
            <text:p text:style-name="P703"><text:tab/><text:span text:style-name="T153">libhello.so</text:span> (0x00007f9611a81000)</text:p>
            <text:p text:style-name="P703"><text:tab/>libc.so.6 =&gt; /lib/x86_64-linux-gnu/libc.so.6 (0x00007f9611875000)</text:p>
            <text:p text:style-name="P703"><text:tab/>/lib64/ld-linux-x86-64.so.2 (0x00007f9611a8d000)</text:p>
          </table:table-cell>
        </table:table-row>
      </table:table>
      <text:p text:style-name="P702"/>
      <text:p text:style-name="P704"><text:span text:style-name="T755">It is a UNIX convention that if the library file is called </text:span><text:span text:style-name="T752">libnew.so</text:span><text:span text:style-name="T755"> the name of the library is </text:span><text:span text:style-name="T752">new</text:span><text:span text:style-name="T755"> and therefore compilers have adopted this convention. To </text:span><text:span text:style-name="T756">the</text:span><text:span text:style-name="T755"> -</text:span><text:span text:style-name="T752">l</text:span><text:span text:style-name="T755"> option </text:span><text:span text:style-name="T756">of </text:span><text:span text:style-name="T752">gcc</text:span><text:span text:style-name="T756"> we </text:span><text:span text:style-name="T755">just pass the library name without the </text:span><text:span text:style-name="T752">lib</text:span><text:span text:style-name="T755"> prefix </text:span><text:span text:style-name="T756">and</text:span><text:span text:style-name="T755"> the </text:span><text:span text:style-name="T752">so</text:span><text:span text:style-name="T755"> extension.</text:span></text:p>
      <text:p text:style-name="P705"><text:span text:style-name="T757">If </text:span><text:span text:style-name="T758">we</text:span><text:span text:style-name="T757"> run the </text:span><text:span text:style-name="T752">file</text:span><text:span text:style-name="T757"> command on the </text:span><text:span text:style-name="T759">shared library</text:span><text:span text:style-name="T757">, it will </text:span><text:span text:style-name="T758">display</text:span><text:span text:style-name="T757"> </text:span><text:span text:style-name="T758">that </text:span><text:span text:style-name="T757">the </text:span><text:span text:style-name="T758">file is a</text:span><text:span text:style-name="T757"> </text:span><text:span text:style-name="T759">shared object</text:span></text:p>
      <text:p text:style-name="P706"/>
      <table:table table:name="Table58" table:style-name="Table58">
        <table:table-column table:style-name="Table58.A"/>
        <table:table-row>
          <table:table-cell table:style-name="Table58.A1" office:value-type="string">
            <text:p text:style-name="P707">[<text:a xlink:type="simple" xlink:href="mailto:linux@base" text:style-name="Internet_20_link" text:visited-style-name="Visited_20_Internet_20_Link">linux@basis</text:a>] file libhello.so</text:p>
            <text:p text:style-name="P707">libhello.so: ELF 64-bit LSB <text:span text:style-name="T153">shared object</text:span>, x86-64, version 1 (SYSV), dynamically linked, BuildID[sha1]=dfdf3ade4475fa6e8f0a0829d7f0a3fdb27e8578, not stripped</text:p>
          </table:table-cell>
        </table:table-row>
      </table:table>
      <text:p text:style-name="P706"/>
      <text:p text:style-name="P708"><text:span text:style-name="T757">To make the </text:span><text:span text:style-name="T759">shared library</text:span><text:span text:style-name="T757"> available to all programs on the system, it must be installed in the </text:span><text:span text:style-name="T759">library path</text:span><text:span text:style-name="T757">. The copy requires </text:span><text:span text:style-name="T759">superuser permissions.</text:span></text:p>
      <text:p text:style-name="P709"/>
      <table:table table:name="Table60" table:style-name="Table60">
        <table:table-column table:style-name="Table60.A"/>
        <table:table-row>
          <table:table-cell table:style-name="Table60.A1" office:value-type="string">
            <text:p text:style-name="P710">[<text:a xlink:type="simple" xlink:href="mailto:linux@base" text:style-name="Internet_20_link" text:visited-style-name="Visited_20_Internet_20_Link">linux@basis</text:a>] sudo cp libhello.so /usr/lib</text:p>
            <text:p text:style-name="P710"/>
            <text:p text:style-name="P710">[<text:a xlink:type="simple" xlink:href="mailto:linux@base" text:style-name="Internet_20_link" text:visited-style-name="Visited_20_Internet_20_Link">linux@basis</text:a>] sudo chmod 755 /usr/lib/libhello.so</text:p>
            <text:p text:style-name="P710"/>
            <text:p text:style-name="P711">[<text:a xlink:type="simple" xlink:href="mailto:linux@base" text:style-name="Internet_20_link" text:visited-style-name="Visited_20_Internet_20_Link">linux@basis</text:a>] sudo ldconfig</text:p>
          </table:table-cell>
        </table:table-row>
      </table:table>
      <text:p text:style-name="P712"/>
      <text:p text:style-name="P713"><text:span text:style-name="T760">The</text:span> <text:span text:style-name="T761">ldconfig</text:span><text:span text:style-name="T761"><text:note text:id="ftn49" text:note-class="footnote"><text:note-citation>49</text:note-citation><text:note-body><text:p text:style-name="P331"><text:span text:style-name="T762">See the </text:span><text:span text:style-name="T763">ldconfig(8)</text:span><text:span text:style-name="T762"> manual page </text:span></text:p></text:note-body></text:note></text:span> <text:span text:style-name="T760">program updates the </text:span><text:span text:style-name="T764">libraries cache</text:span>. <text:span text:style-name="T760">Th</text:span><text:span text:style-name="T718">is</text:span><text:span text:style-name="T760"> cache is used by the</text:span> <text:span text:style-name="T765">dynamic</text:span><text:span text:style-name="T35"> linker</text:span> <text:span text:style-name="T718">when</text:span><text:span text:style-name="T766"> execut</text:span><text:span text:style-name="T718">ing</text:span><text:span text:style-name="T766"> programs and is </text:span><text:span text:style-name="T718">stored </text:span><text:span text:style-name="T766">in </text:span><text:span text:style-name="T760">the </text:span>file <text:span text:style-name="T761">/etc/ld.so.cache</text:span>.</text:p>
      <text:p text:style-name="P713"/>
      <text:p text:style-name="P714"><text:bookmark-start text:name="Tables"/><text:soft-page-break/><text:span text:style-name="T767">List of </text:span>tab<text:span text:style-name="T767">les</text:span><text:bookmark-end text:name="Tables"/></text:p>
      <text:p text:style-name="P715"/>
      <text:p text:style-name="P716"><text:span text:style-name="T768">Tab </text:span><text:span text:style-name="T153">1.</text:span> <text:span text:style-name="T767">File extensions created by</text:span><text:span text:style-name="T769"> </text:span><text:span text:style-name="T770">-save-temps</text:span></text:p>
      <text:p text:style-name="P717"><text:span text:style-name="T771">Tab</text:span><text:span text:style-name="T772"> </text:span><text:span text:style-name="T771">2.</text:span><text:span text:style-name="T773"> </text:span><text:span text:style-name="T774">gcc</text:span><text:span text:style-name="T775">’s option</text:span><text:span text:style-name="T776">s</text:span></text:p>
      <text:p text:style-name="P718"><text:span text:style-name="T777">Tab </text:span><text:span text:style-name="T778">3</text:span><text:span text:style-name="T779">.</text:span><text:span text:style-name="T780"> </text:span><text:span text:style-name="T781">gdb </text:span><text:span text:style-name="T782">commands</text:span></text:p>
      <text:p text:style-name="P719"/>
      <text:p text:style-name="P719"/>
      <text:p text:style-name="P720"><text:bookmark-start text:name="Figures"/>List of figures<text:bookmark-end text:name="Figures"/></text:p>
      <text:p text:style-name="P721"/>
      <text:p text:style-name="P722"><text:span text:style-name="T783">Fig </text:span><text:span text:style-name="T153">1.</text:span> <text:span text:style-name="T784">Compilation</text:span></text:p>
      <text:p text:style-name="P722"><text:span text:style-name="T783">Fig </text:span><text:span text:style-name="T785">2.</text:span> <text:span text:style-name="T767">Compilation steps</text:span><text:span text:style-name="T784"> with</text:span> <text:span text:style-name="T15">gcc</text:span></text:p>
      <text:p text:style-name="P723"><text:span text:style-name="T783">Fig </text:span><text:span text:style-name="T785">3</text:span><text:span text:style-name="T153">.</text:span> <text:span text:style-name="T786">Steps of the build process with</text:span><text:span text:style-name="T787"> </text:span><text:span text:style-name="T788">autoconf</text:span></text:p>
      <text:p text:style-name="P724"><text:span text:style-name="T789">Fig </text:span><text:span text:style-name="T790">4</text:span><text:span text:style-name="T791">.</text:span><text:span text:style-name="T792"> </text:span><text:span text:style-name="T786">HelpMan</text:span></text:p>
      <text:p text:style-name="P725"><text:span text:style-name="T783">Fig </text:span><text:span text:style-name="T793">5</text:span><text:span text:style-name="T153">.</text:span> <text:span text:style-name="T784">B</text:span>yte <text:span text:style-name="T784">order</text:span></text:p>
      <text:p text:style-name="P726"><text:span text:style-name="T783">Fig </text:span><text:span text:style-name="T153">6.</text:span> <text:span text:style-name="T784">Static and dynamic linking</text:span></text:p>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27"><text:bookmark-start text:name="Bibliography"/><text:soft-page-break/>Bibliog<text:span text:style-name="T794">raphy</text:span><text:bookmark-end text:name="Bibliography"/></text:p>
      <text:p text:style-name="P14"/>
      <text:p text:style-name="P728">Alejandro Colomar, Michael Kerrisk, Andries Brouwer, “<text:span text:style-name="T795">GNU/Linux Programmer’s Manual”, </text:span><text:span text:style-name="T796">2020</text:span></text:p>
      <text:p text:style-name="P728"/>
      <text:p text:style-name="P728">Bill O. Gallmeister, “POSIX.4: Programming for the Real World”, O’Reilly, <text:span text:style-name="T797">1995</text:span></text:p>
      <text:p text:style-name="P728"/>
      <text:p text:style-name="P728">Brian W. Kernighan &amp; Dennies M. Ritchie, “The C Programming Language”, 2ed, Prentice Hall, <text:span text:style-name="T798">1988</text:span></text:p>
      <text:p text:style-name="P728"/>
      <text:p text:style-name="P728">Dennis Andriesse, “Practical Binary Analysis”, No Starch Press, 2019</text:p>
      <text:p text:style-name="P728"/>
      <text:p text:style-name="P728">Donald A. Lewine, “<text:span text:style-name="T799">POSIX Programmer’s Guide – Writing Portable UNIX Programs with the POSIX.1 Standard”, O’Reilly, </text:span><text:span text:style-name="T800">1994</text:span></text:p>
      <text:p text:style-name="P728"/>
      <text:p text:style-name="P728"><text:span text:style-name="T801">Intel, </text:span>The Intel 64 and IA-32 Architectures Software Developer's Manual, <text:span text:style-name="T801">Intel 2024</text:span></text:p>
      <text:p text:style-name="P728"/>
      <text:p text:style-name="P728">Jack-Bennny Persson, “Linux System Programming Techniques”, Packt Publishing, <text:span text:style-name="T802">2021</text:span> </text:p>
      <text:p text:style-name="P728"/>
      <text:p text:style-name="P728">Kurt Wall, Mark Watson, Mark Whitis, “<text:span text:style-name="T803">Linux Programming Unleashed</text:span>”, <text:span text:style-name="T803">Sams, </text:span><text:span text:style-name="T804">1999</text:span></text:p>
      <text:p text:style-name="P728"/>
      <text:p text:style-name="P728"><text:span text:style-name="T805">Michael Kerrisk, “</text:span>The Linux Programming Interface”, <text:span text:style-name="T805">No Starch Press, </text:span><text:span text:style-name="T806">2010</text:span></text:p>
      <text:p text:style-name="P728"/>
      <text:p text:style-name="P728">Paul Deitel &amp; Harvey Deitel, “C How to program”, <text:span text:style-name="T807">9ed, </text:span>Pearson, <text:span text:style-name="T807">2022</text:span></text:p>
      <text:p text:style-name="P728"/>
      <text:p text:style-name="P728">Robert Love, “Linux System Programming”, O’Reilly, <text:span text:style-name="T808">2013</text:span></text:p>
      <text:p text:style-name="P728"/>
      <text:p text:style-name="P728">Sandra Loosemore, Richard M. Stallman, Roland McGrath, Andrew Oram, Ulrich Drepper <text:span text:style-name="T809">“</text:span>The GNU C Library <text:span text:style-name="T809">Reference Manual” </text:span><text:span text:style-name="T810">for </text:span><text:span text:style-name="T811">version 2.34</text:span><text:span text:style-name="T809">, Free Software Foundation</text:span></text:p>
      <text:p text:style-name="P728"/>
      <text:p text:style-name="P728"><text:span text:style-name="T812">W. </text:span>Richard <text:span text:style-name="T812">Stevens &amp; Stephen A. Rago, “Advanced Programming in the UNIX Environment”, 3ed, Addison-Wesely, </text:span><text:span text:style-name="T804">2013</text:span></text:p>
      <text:p text:style-name="P728"/>
      <text:p text:style-name="P14"><text:span text:style-name="T813">International Organization for Standardization. (2011). </text:span><text:span text:style-name="Emphasis"><text:span text:style-name="T813">ISO/IEC 9899:2011: Information technology - Programming languages - C</text:span></text:span></text:p>
      <text:p text:style-name="P729"/>
      <text:p text:style-name="P728"/>
      <text:p text:style-name="P728"/>
      <text:p text:style-name="P730"/>
      <text:p text:style-name="P730"/>
      <text:p text:style-name="P730"/>
      <text:p text:style-name="P730"/>
      <text:p text:style-name="P730"/>
      <text:p text:style-name="P730"/>
      <text:p text:style-name="P730"/>
      <text:p text:style-name="P730"/>
      <text:p text:style-name="P730"/>
      <text:p text:style-name="P730"/>
      <text:p text:style-name="P731"><text:soft-page-break/><text:span text:style-name="T814">O</text:span><text:span text:style-name="T815">nline resources</text:span></text:p>
      <text:p text:style-name="P732">GNU/<text:span text:style-name="T816">Linux</text:span></text:p>
      <text:p text:style-name="P733"/>
      <text:p text:style-name="P734">Atomic operations library<text:tab/><text:tab/> <text:s text:c="2"/><text:a xlink:type="simple" xlink:href="https://en.cppreference.com/w/c/atomic.html" text:style-name="Internet_20_link" text:visited-style-name="Visited_20_Internet_20_Link">https://en.cppreference.com/w/c/atomic.html</text:a> </text:p>
      <text:p text:style-name="P735"><text:span text:style-name="T817">A</text:span><text:span text:style-name="T818">utoconf <text:s text:c="16"/><text:tab/><text:tab/><text:tab/> <text:s text:c="2"/></text:span><text:a xlink:type="simple" xlink:href="https://www.gnu.org/software/autoconf/" text:style-name="Internet_20_link" text:visited-style-name="Visited_20_Internet_20_Link"><text:span text:style-name="T819">https://www.gnu.org/software/autoconf/</text:span></text:a></text:p>
      <text:p text:style-name="P736"><text:span text:style-name="T820">Automake</text:span><text:span text:style-name="T821"> <text:s/><text:tab/><text:tab/><text:tab/><text:tab/> <text:s text:c="2"/></text:span><text:span text:style-name="T822">https://www.gnu.org/software/automake/</text:span></text:p>
      <text:p text:style-name="P737"><text:span text:style-name="T823">Bash reference manual <text:s text:c="11"/><text:tab/><text:tab/> <text:s text:c="2"/></text:span><text:a xlink:type="simple" xlink:href="https://www.gnu.org/software/bash/manual/bash.html" text:style-name="Internet_20_link" text:visited-style-name="Visited_20_Internet_20_Link"><text:span text:style-name="T824">https://www.gnu.org/software/bash/manual/bash.html</text:span></text:a><text:span text:style-name="T825">\</text:span></text:p>
      <text:p text:style-name="P50"><text:span text:style-name="T826">Berkeley Packet Filter</text:span><text:span text:style-name="T827"><text:tab/><text:tab/><text:tab/> <text:s text:c="2"/></text:span><text:a xlink:type="simple" xlink:href="https://www.kernel.org/doc/html/latest/bpf/index.html" text:style-name="Internet_20_link" text:visited-style-name="Visited_20_Internet_20_Link"><text:span text:style-name="T827">https://www.kernel.org/doc/html/latest/bpf/index.html</text:span></text:a><text:span text:style-name="T827"> </text:span></text:p>
      <text:p text:style-name="P738"><text:span text:style-name="T828">Binutils<text:tab/><text:tab/><text:tab/><text:tab/><text:tab/> <text:s text:c="2"/></text:span><text:a xlink:type="simple" xlink:href="https://www.gnu.org/software/binutils/" text:style-name="Internet_20_link" text:visited-style-name="Visited_20_Internet_20_Link"><text:span text:style-name="T829">https://www.gnu.org/software/binutils/</text:span></text:a></text:p>
      <text:p text:style-name="P735"><text:span text:style-name="T830">GCC online documentation</text:span><text:span text:style-name="T831"> <text:s/><text:tab/> <text:tab/> <text:s text:c="2"/></text:span><text:a xlink:type="simple" xlink:href="https://gcc.gnu.org/onlinedocs/" text:style-name="Internet_20_link" text:visited-style-name="Visited_20_Internet_20_Link"><text:span text:style-name="T832">https://gcc.gnu.org/onlinedocs/</text:span></text:a></text:p>
      <text:p text:style-name="P736"><text:span text:style-name="T833">GDB: The GNU Debugger</text:span><text:span text:style-name="T834"> <text:s text:c="17"/><text:tab/> <text:s text:c="2"/></text:span><text:span text:style-name="T822">https://www.sourceware.org/gdb/documentation/</text:span></text:p>
      <text:p text:style-name="P50"><text:span text:style-name="T817"><text:tab/><text:tab/><text:tab/><text:tab/><text:tab/> <text:s text:c="2"/></text:span><text:a xlink:type="simple" xlink:href="https://sourceware.org/gdb/current/onlinedocs/gdb.pdf" text:style-name="Internet_20_link" text:visited-style-name="Visited_20_Internet_20_Link"><text:span text:style-name="T832">https://sourceware.org/gdb/current/onlinedocs/gdb.pdf</text:span></text:a><text:span text:style-name="T817"> </text:span></text:p>
      <text:p text:style-name="P50"><text:span text:style-name="T835">GLIBC</text:span><text:span text:style-name="T836"><text:tab/></text:span><text:span text:style-name="T837"><text:tab/><text:tab/><text:tab/> <text:s text:c="2"/><text:tab/> <text:s text:c="2"/></text:span><text:a xlink:type="simple" xlink:href="https://www.gnu.org/software/libc/" text:style-name="Internet_20_link" text:visited-style-name="Visited_20_Internet_20_Link"><text:span text:style-name="T832">https://www.gnu.org/software/libc/</text:span></text:a><text:span text:style-name="T838"> </text:span></text:p>
      <text:p text:style-name="P739"><text:span text:style-name="T839">The GNU C Library (glibc) manual<text:tab/> <text:s text:c="2"/></text:span><text:a xlink:type="simple" xlink:href="https://sourceware.org/glibc/manual/" text:style-name="Internet_20_link" text:visited-style-name="Visited_20_Internet_20_Link"><text:span text:style-name="T839">https://sourceware.org/glibc/manual/</text:span></text:a><text:span text:style-name="T839"> </text:span></text:p>
      <text:p text:style-name="P50"><text:span text:style-name="T840">G</text:span><text:span text:style-name="T841">NU Core</text:span><text:span text:style-name="T842">u</text:span><text:span text:style-name="T841">tils </text:span><text:span text:style-name="T843"><text:s/><text:tab/><text:tab/><text:tab/> <text:s text:c="2"/></text:span><text:a xlink:type="simple" xlink:href="https://www.gnu.org/software/coreutils/manual/" text:style-name="Internet_20_link" text:visited-style-name="Visited_20_Internet_20_Link"><text:span text:style-name="T832">https://www.gnu.org/software/coreutils/manual/</text:span></text:a></text:p>
      <text:p text:style-name="P735"><text:span text:style-name="T844">GNU General Public License <text:s/><text:tab/> <text:s text:c="2"/><text:tab/> <text:s text:c="2"/></text:span><text:a xlink:type="simple" xlink:href="https://www.gnu.org/licenses/gpl-3.0.html" text:style-name="Internet_20_link" text:visited-style-name="Visited_20_Internet_20_Link"><text:span text:style-name="T844">https://www.gnu.org/licenses/gpl-3.0.html</text:span></text:a></text:p>
      <text:p text:style-name="P50"><text:span text:style-name="T845">GNU Gnulib<text:tab/><text:tab/><text:tab/><text:tab/> <text:s text:c="2"/></text:span><text:a xlink:type="simple" xlink:href="https://www.gnu.org/software/gnulib/manual/gnulib.html" text:style-name="Internet_20_link" text:visited-style-name="Visited_20_Internet_20_Link"><text:span text:style-name="T846">https://www.gnu.org/software/gnulib/manual/gnulib.html</text:span></text:a><text:span text:style-name="T845"> </text:span></text:p>
      <text:p text:style-name="P50"><text:span text:style-name="T847">G</text:span><text:span text:style-name="T848">NU Official Site</text:span><text:span text:style-name="T849"><text:tab/><text:tab/><text:tab/> <text:s text:c="2"/></text:span><text:a xlink:type="simple" xlink:href="https://www.gnu.org/home.en.html" text:style-name="Internet_20_link" text:visited-style-name="Visited_20_Internet_20_Link"><text:span text:style-name="T819">https://www.gnu.org/home.en.html</text:span></text:a><text:span text:style-name="T848"> </text:span></text:p>
      <text:p text:style-name="P50"><text:span text:style-name="T830">GNU Make </text:span><text:span text:style-name="T831"><text:tab/><text:tab/> <text:tab/><text:tab/> <text:s text:c="2"/></text:span><text:a xlink:type="simple" xlink:href="https://www.gnu.org/software/make/manual/" text:style-name="Internet_20_link" text:visited-style-name="Visited_20_Internet_20_Link"><text:span text:style-name="T850">https://www.gnu.org/software/make/manual/</text:span></text:a></text:p>
      <text:p text:style-name="P740"><text:span text:style-name="T832">GNU </text:span><text:span text:style-name="T851">Software<text:tab/><text:tab/><text:tab/> <text:s text:c="2"/><text:tab/> <text:s text:c="2"/></text:span><text:a xlink:type="simple" xlink:href="https://www.gnu.org/software" text:style-name="Internet_20_link" text:visited-style-name="Visited_20_Internet_20_Link"><text:span text:style-name="T850">https://www.gnu.org/software</text:span></text:a></text:p>
      <text:p text:style-name="P741">io_uring<text:tab/><text:tab/><text:tab/> <text:s text:c="15"/><text:a xlink:type="simple" xlink:href="https://unixism.net/loti/index.html" text:style-name="Internet_20_link" text:visited-style-name="Visited_20_Internet_20_Link">https://unixism.net/loti/index.html</text:a> </text:p>
      <text:p text:style-name="P742">Libseccomp<text:tab/><text:tab/><text:tab/><text:tab/> <text:s text:c="2"/><text:a xlink:type="simple" xlink:href="https://github.com/seccomp/libseccomp/wiki" text:style-name="Internet_20_link" text:visited-style-name="Visited_20_Internet_20_Link">https://github.com/seccomp/libseccomp/wiki</text:a> </text:p>
      <text:p text:style-name="P742">Libseccomp documentation<text:tab/><text:tab/> <text:s text:c="2"/><text:a xlink:type="simple" xlink:href="https://libseccomp.readthedocs.io/en/latest/" text:style-name="Internet_20_link" text:visited-style-name="Visited_20_Internet_20_Link">https://libseccomp.readthedocs.io/en/latest/</text:a> </text:p>
      <text:p text:style-name="P743"><text:span text:style-name="T832">Liburing<text:tab/><text:tab/><text:tab/><text:tab/> <text:s text:c="2"/></text:span><text:a xlink:type="simple" xlink:href="https://github.com/axboe/liburing" text:style-name="Internet_20_link" text:visited-style-name="Visited_20_Internet_20_Link"><text:span text:style-name="T832">https://github.com/axboe/liburing</text:span></text:a></text:p>
      <text:p text:style-name="P744"><text:span text:style-name="T839">Linux man</text:span><text:span text:style-name="T852">ual</text:span><text:span text:style-name="T839"> pages online<text:tab/><text:tab/> <text:s text:c="2"/></text:span><text:a xlink:type="simple" xlink:href="https://www.man7.org/" text:style-name="Internet_20_link" text:visited-style-name="Visited_20_Internet_20_Link"><text:span text:style-name="T839">https://www.man7.org</text:span></text:a><text:span text:style-name="T839"> </text:span></text:p>
      <text:p text:style-name="P14"><text:span text:style-name="T853">Linux </text:span><text:span text:style-name="T854">Kernel<text:tab/> </text:span><text:span text:style-name="T855"><text:tab/><text:tab/><text:tab/> <text:s text:c="2"/></text:span><text:a xlink:type="simple" xlink:href="https://kernel.org/" text:style-name="Internet_20_link" text:visited-style-name="Visited_20_Internet_20_Link"><text:span text:style-name="T819">https://kernel.org/</text:span></text:a></text:p>
      <text:p text:style-name="P745"><text:span text:style-name="T823">Linux Standard Base <text:tab/><text:tab/><text:tab/> <text:s text:c="2"/></text:span><text:a xlink:type="simple" xlink:href="https://refspecs.linuxbase.org/LSB_5.0.0/allspecs.shtml" text:style-name="Internet_20_link" text:visited-style-name="Visited_20_Internet_20_Link"><text:span text:style-name="T824">https://refspecs.linuxbase.org/LSB_5.0.0/allspecs.shtml</text:span></text:a><text:span text:style-name="T823"> </text:span><text:span text:style-name="T856"><text:line-break/></text:span><text:span text:style-name="T857">Malloc <text:tab/><text:tab/><text:tab/><text:tab/> <text:s text:c="2"/><text:tab/> <text:s text:c="2"/></text:span><text:a xlink:type="simple" xlink:href="https://sourceware.org/glibc/wiki/MallocInternals" text:style-name="Internet_20_link" text:visited-style-name="Visited_20_Internet_20_Link"><text:span text:style-name="T856">https://sourceware.org/glibc/wiki/MallocInternals</text:span></text:a></text:p>
      <text:p text:style-name="P746"><text:span text:style-name="T832">The /proc filesystem<text:tab/> <text:tab/> <text:tab/> <text:s text:c="2"/></text:span><text:a xlink:type="simple" xlink:href="https://www.kernel.org/doc/html/latest/filesystems/proc.html" text:style-name="Internet_20_link" text:visited-style-name="Visited_20_Internet_20_Link"><text:span text:style-name="T858">https://www.kernel.org/doc/html/latest/filesystems/proc.html</text:span></text:a></text:p>
      <text:p text:style-name="P747">The GNU C Reference Manual <text:s text:c="2"/><text:tab/> <text:s text:c="2"/><text:a xlink:type="simple" xlink:href="https://www.gnu.org/software/gnu-c-manual/gnu-c-manual.html" text:style-name="Internet_20_link" text:visited-style-name="Visited_20_Internet_20_Link">https://www.gnu.org/software/gnu-c-manual/gnu-c-manual.html</text:a> </text:p>
      <text:p text:style-name="P748"/>
      <text:p text:style-name="P732">Operating systems</text:p>
      <text:p text:style-name="P749"/>
      <text:p text:style-name="P50"><text:span text:style-name="T847">D</text:span><text:span text:style-name="T859">ebian</text:span><text:span text:style-name="T860"> </text:span><text:span text:style-name="T859">OS</text:span><text:span text:style-name="T860"><text:tab/><text:tab/><text:tab/><text:tab/> <text:s/></text:span><text:span text:style-name="T859"><text:s/></text:span><text:a xlink:type="simple" xlink:href="https://www.debian.org/" text:style-name="Internet_20_link" text:visited-style-name="Visited_20_Internet_20_Link"><text:span text:style-name="T832">https://www.debian.org/</text:span></text:a><text:span text:style-name="T859"> </text:span></text:p>
      <text:p text:style-name="P50"><text:span text:style-name="T859"><text:tab/><text:tab/><text:tab/><text:tab/><text:tab/> <text:s text:c="2"/></text:span><text:a xlink:type="simple" xlink:href="https://www.debian.org/doc/devel-manuals" text:style-name="Internet_20_link" text:visited-style-name="Visited_20_Internet_20_Link"><text:span text:style-name="T832">https://www.debian.org/doc/devel-manuals</text:span></text:a><text:span text:style-name="T859"> </text:span></text:p>
      <text:p text:style-name="P14"><text:span text:style-name="T832">Debian </text:span><text:span text:style-name="T861">A</text:span><text:span text:style-name="T832">PT User's Guide <text:s/><text:tab/><text:tab/> <text:s text:c="2"/></text:span><text:a xlink:type="simple" xlink:href="https://www.debian.org/doc/manuals/apt-guide/index.en.html" text:style-name="Internet_20_link" text:visited-style-name="Visited_20_Internet_20_Link"><text:span text:style-name="T832">https://www.debian.org/doc/manuals/apt-guide/index.en.html</text:span></text:a><text:span text:style-name="T832"> </text:span></text:p>
      <text:p text:style-name="P50"><text:span text:style-name="T862">Kali Linux</text:span><text:span text:style-name="T863"> <text:tab/><text:tab/><text:tab/><text:tab/> <text:s text:c="2"/></text:span><text:a xlink:type="simple" xlink:href="https://www.kali.org/" text:style-name="Internet_20_link" text:visited-style-name="Visited_20_Internet_20_Link"><text:span text:style-name="T819">https://www.kali.org/</text:span></text:a><text:span text:style-name="T862"> </text:span></text:p>
      <text:p text:style-name="P50"><text:span text:style-name="T859">Linux Mint <text:tab/><text:tab/><text:tab/><text:tab/> <text:s text:c="2"/></text:span><text:a xlink:type="simple" xlink:href="https://linuxmint.com/" text:style-name="Internet_20_link" text:visited-style-name="Visited_20_Internet_20_Link"><text:span text:style-name="T819">https://linuxmint.com/</text:span></text:a><text:span text:style-name="T859"> </text:span></text:p>
      <text:p text:style-name="P50"><text:span text:style-name="T862">Ubuntu OS</text:span><text:span text:style-name="T863"><text:tab/><text:tab/><text:tab/><text:tab/> <text:s text:c="2"/></text:span><text:a xlink:type="simple" xlink:href="https://ubuntu.com/" text:style-name="Internet_20_link" text:visited-style-name="Visited_20_Internet_20_Link"><text:span text:style-name="T819">https://ubuntu.com/</text:span></text:a><text:span text:style-name="T862"> </text:span></text:p>
      <text:p text:style-name="P750"><text:span text:style-name="T853">BSD </text:span><text:span text:style-name="T854">Official site<text:tab/><text:tab/><text:tab/> <text:s text:c="2"/></text:span><text:a xlink:type="simple" xlink:href="https://www.bsd.org/" text:style-name="Internet_20_link" text:visited-style-name="Visited_20_Internet_20_Link"><text:span text:style-name="T853">https://www.bsd.org/</text:span></text:a><text:span text:style-name="T853"> </text:span></text:p>
      <text:p text:style-name="P751"><text:span text:style-name="T124">SunOS </text:span><text:s text:c="24"/><text:a xlink:type="simple" xlink:href="https://www.oracle.com/solaris/solaris10/downloads/solaris10-get-jsp-downloads.html" text:style-name="Internet_20_link" text:visited-style-name="Visited_20_Internet_20_Link"><text:span text:style-name="T864">https://www.oracle.com/solaris/solaris10/downloads/solaris10-get-jsp-downloads.html</text:span></text:a></text:p>
      <text:p text:style-name="P14"/>
      <text:p text:style-name="P732">Standards</text:p>
      <text:p text:style-name="P752"/>
      <text:p text:style-name="P753"><text:span text:style-name="T832">ABI<text:tab/><text:tab/><text:tab/><text:tab/><text:tab/> <text:s text:c="2"/></text:span><text:a xlink:type="simple" xlink:href="https://wiki.osdev.org/System_V_ABI" text:style-name="Internet_20_link" text:visited-style-name="Visited_20_Internet_20_Link"><text:span text:style-name="T832">https://wiki.osdev.org/System_V_ABI</text:span></text:a></text:p>
      <text:p text:style-name="P753"><text:span text:style-name="T832"><text:tab/><text:tab/><text:tab/><text:tab/><text:tab/> <text:s text:c="2"/></text:span><text:a xlink:type="simple" xlink:href="https://refspecs.linuxbase.org/elf/x86_64-abi-0.99.pdf" text:style-name="Internet_20_link" text:visited-style-name="Visited_20_Internet_20_Link"><text:span text:style-name="T832">https://refspecs.linuxbase.org/elf/x86_64-abi-0.99.pdf</text:span></text:a><text:span text:style-name="T832"> </text:span></text:p>
      <text:p text:style-name="P753"><text:span text:style-name="T832"><text:tab/><text:tab/><text:tab/><text:tab/><text:tab/> <text:s text:c="2"/></text:span><text:a xlink:type="simple" xlink:href="https://refspecs.linuxbase.org/elf/x86_64-abi-0.21.pdf" text:style-name="Internet_20_link" text:visited-style-name="Visited_20_Internet_20_Link"><text:span text:style-name="T832">https://refspecs.linuxbase.org/elf/x86_64-abi-0.21.pdf</text:span></text:a><text:span text:style-name="T832"> </text:span></text:p>
      <text:p text:style-name="P50"><text:span text:style-name="T865">C </text:span><text:span text:style-name="T866">Language Standard <text:s text:c="3"/><text:tab/><text:tab/> <text:s text:c="2"/><text:tab/> <text:s text:c="2"/></text:span><text:a xlink:type="simple" xlink:href="http://www.open-std.org/jtc1/sc22/wg14/" text:style-name="Internet_20_link" text:visited-style-name="Visited_20_Internet_20_Link"><text:span text:style-name="T865">http://www.open-std.org/jtc1/sc22/wg14/</text:span></text:a></text:p>
      <text:p text:style-name="P754"><text:span text:style-name="T853">ELF </text:span><text:span text:style-name="T867">Standard <text:s/></text:span><text:span text:style-name="T832"><text:s text:c="2"/><text:tab/><text:tab/><text:tab/> <text:s text:c="2"/></text:span><text:a xlink:type="simple" xlink:href="https://refspecs.linuxfoundation.org/elf/elf.pdf" text:style-name="Internet_20_link" text:visited-style-name="Visited_20_Internet_20_Link"><text:span text:style-name="T853">https://refspecs.linuxfoundation.org/elf/elf.pdf</text:span></text:a></text:p>
      <text:p text:style-name="P755"><text:span text:style-name="T853">Linux Standard Base </text:span><text:span text:style-name="T868">Specification </text:span><text:span text:style-name="T853"><text:s text:c="5"/><text:tab/> <text:s text:c="2"/></text:span><text:a xlink:type="simple" xlink:href="https://refspecs.linuxfoundation.org/lsb.shtml" text:style-name="Internet_20_link" text:visited-style-name="Visited_20_Internet_20_Link"><text:span text:style-name="T853">https://refspecs.linuxfoundation.org/lsb.shtml</text:span></text:a></text:p>
      <text:p text:style-name="P756"><text:span text:style-name="T832">System V SCO Dev Specification<text:tab/> <text:s text:c="2"/></text:span><text:a xlink:type="simple" xlink:href="http://www.sco.com/developers/devspecs/" text:style-name="Internet_20_link" text:visited-style-name="Visited_20_Internet_20_Link"><text:span text:style-name="T832">http://www.sco.com/developers/devspecs/</text:span></text:a></text:p>
      <text:p text:style-name="P757"><text:span text:style-name="T832">The Single UNIX Specification <text:s text:c="10"/><text:tab/> <text:s text:c="2"/></text:span><text:a xlink:type="simple" xlink:href="https://unix.org/what_is_unix/single_unix_specification.html" text:style-name="Internet_20_link" text:visited-style-name="Visited_20_Internet_20_Link"><text:span text:style-name="T832">https://unix.org/what_is_unix/single_unix_specification.html</text:span></text:a></text:p>
      <text:p text:style-name="P758"><text:span text:style-name="T124">POSIX </text:span><text:span text:style-name="T869">Standard</text:span><text:span text:style-name="T870"> <text:s text:c="2"/><text:tab/><text:tab/><text:tab/> <text:s text:c="2"/></text:span><text:a xlink:type="simple" xlink:href="https://pubs.opengroup.org/onlinepubs/9699919799.2018edition/" text:style-name="Internet_20_link" text:visited-style-name="Visited_20_Internet_20_Link"><text:span text:style-name="T124">https://pubs.opengroup.org/onlinepubs/9699919799.2018edition/</text:span></text:a></text:p>
      <text:p text:style-name="P759"><text:soft-page-break/><text:span text:style-name="T832">X/Open Portability Guide <text:tab/> <text:s text:c="12"/></text:span><text:a xlink:type="simple" xlink:href="http://archive.opengroup.org/publications/archive/CDROM/g501.pdf" text:style-name="Internet_20_link" text:visited-style-name="Visited_20_Internet_20_Link"><text:span text:style-name="T832">http://archive.opengroup.org/publications/archive/CDROM/g501.pdf</text:span></text:a></text:p>
      <text:p text:style-name="P50"><text:span text:style-name="T871">List of the Unicode symbols</text:span><text:span text:style-name="T872"> <text:tab/><text:tab/></text:span><text:a xlink:type="simple" xlink:href="https://symbl.cc/en/unicode-table/" text:style-name="Internet_20_link" text:visited-style-name="Visited_20_Internet_20_Link"><text:span text:style-name="T873">https://symbl.cc/en/unicode-table/</text:span></text:a><text:span text:style-name="T874"> </text:span></text:p>
      <text:p text:style-name="P719"/>
      <text:p text:style-name="P7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19T20:21:53.967707352</meta:creation-date>
    <dc:date>2026-05-21T22:58:33.229563247</dc:date>
    <meta:editing-duration>P2DT2H45M48S</meta:editing-duration>
    <meta:editing-cycles>1413</meta:editing-cycles>
    <meta:generator>LibreOffice/26.2.1.2$Linux_X86_64 LibreOffice_project/620$Build-2</meta:generator>
    <meta:document-statistic meta:table-count="115" meta:image-count="5" meta:object-count="0" meta:page-count="58" meta:paragraph-count="1173" meta:word-count="10875" meta:character-count="75487" meta:non-whitespace-character-count="62669"/>
  </office:meta>
</office:document-meta>
</file>